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X [nm (air)]</text:p>
          </table:table-cell>
          <table:table-cell office:value-type="string">
            <text:p>Y [Intensity]</text:p>
          </table:table-cell>
          <table:table-cell table:number-columns-repeated="4"/>
        </table:table-row>
        <table:table-row table:style-name="ro1">
          <table:table-cell office:value-type="float" office:value="321.5908203125">
            <text:p>321.5908203125</text:p>
          </table:table-cell>
          <table:table-cell office:value-type="float" office:value="0.007389942">
            <text:p>0.007389942</text:p>
          </table:table-cell>
          <table:table-cell table:number-columns-repeated="4"/>
        </table:table-row>
        <table:table-row table:style-name="ro1">
          <table:table-cell office:value-type="float" office:value="321.698333740234">
            <text:p>321.6983337402</text:p>
          </table:table-cell>
          <table:table-cell office:value-type="float" office:value="0.001467245">
            <text:p>0.001467245</text:p>
          </table:table-cell>
          <table:table-cell table:number-columns-repeated="3"/>
          <table:table-cell>
            <draw:frame table:end-cell-address="Sheet1.M23" table:end-x="0.7083in" table:end-y="0.1417in" draw:z-index="0" draw:style-name="gr1" draw:text-style-name="P1" svg:width="6.2988in" svg:height="3.5429in" svg:x="0.6327in" svg:y="0.1547in">
              <draw:object draw:notify-on-update-of-ranges="Sheet1.A1:Sheet1.A1 Sheet1.A2:Sheet1.A3649 Sheet1.B1:Sheet1.B1 Sheet1.B2:Sheet1.B36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21.805877685547">
            <text:p>321.8058776855</text:p>
          </table:table-cell>
          <table:table-cell office:value-type="float" office:value="0.002952607">
            <text:p>0.002952607</text:p>
          </table:table-cell>
          <table:table-cell table:number-columns-repeated="4"/>
        </table:table-row>
        <table:table-row table:style-name="ro1">
          <table:table-cell office:value-type="float" office:value="321.913421630859">
            <text:p>321.9134216309</text:p>
          </table:table-cell>
          <table:table-cell office:value-type="float" office:value="0.0135094">
            <text:p>0.0135094</text:p>
          </table:table-cell>
          <table:table-cell table:number-columns-repeated="4"/>
        </table:table-row>
        <table:table-row table:style-name="ro1">
          <table:table-cell office:value-type="float" office:value="322.020965576172">
            <text:p>322.0209655762</text:p>
          </table:table-cell>
          <table:table-cell office:value-type="float" office:value="0.009140628">
            <text:p>0.009140628</text:p>
          </table:table-cell>
          <table:table-cell table:number-columns-repeated="4"/>
        </table:table-row>
        <table:table-row table:style-name="ro1">
          <table:table-cell office:value-type="float" office:value="322.128540039063">
            <text:p>322.1285400391</text:p>
          </table:table-cell>
          <table:table-cell office:value-type="float" office:value="0.004829726">
            <text:p>0.004829726</text:p>
          </table:table-cell>
          <table:table-cell table:number-columns-repeated="4"/>
        </table:table-row>
        <table:table-row table:style-name="ro1">
          <table:table-cell office:value-type="float" office:value="322.236083984375">
            <text:p>322.2360839844</text:p>
          </table:table-cell>
          <table:table-cell office:value-type="float" office:value="0.01768567">
            <text:p>0.01768567</text:p>
          </table:table-cell>
          <table:table-cell table:number-columns-repeated="4"/>
        </table:table-row>
        <table:table-row table:style-name="ro1">
          <table:table-cell office:value-type="float" office:value="322.343658447266">
            <text:p>322.3436584473</text:p>
          </table:table-cell>
          <table:table-cell office:value-type="float" office:value="-0.001519775">
            <text:p>-0.001519775</text:p>
          </table:table-cell>
          <table:table-cell table:number-columns-repeated="4"/>
        </table:table-row>
        <table:table-row table:style-name="ro1">
          <table:table-cell office:value-type="float" office:value="322.451232910156">
            <text:p>322.4512329102</text:p>
          </table:table-cell>
          <table:table-cell office:value-type="string">
            <text:p>-3.831694E-06</text:p>
          </table:table-cell>
          <table:table-cell table:number-columns-repeated="4"/>
        </table:table-row>
        <table:table-row table:style-name="ro1">
          <table:table-cell office:value-type="float" office:value="322.558837890625">
            <text:p>322.5588378906</text:p>
          </table:table-cell>
          <table:table-cell office:value-type="float" office:value="0.006631892">
            <text:p>0.006631892</text:p>
          </table:table-cell>
          <table:table-cell table:number-columns-repeated="4"/>
        </table:table-row>
        <table:table-row table:style-name="ro1">
          <table:table-cell office:value-type="float" office:value="322.666412353516">
            <text:p>322.6664123535</text:p>
          </table:table-cell>
          <table:table-cell office:value-type="float" office:value="0.01035947">
            <text:p>0.01035947</text:p>
          </table:table-cell>
          <table:table-cell table:number-columns-repeated="4"/>
        </table:table-row>
        <table:table-row table:style-name="ro1">
          <table:table-cell office:value-type="float" office:value="322.774017333984">
            <text:p>322.774017334</text:p>
          </table:table-cell>
          <table:table-cell office:value-type="float" office:value="0.01323275">
            <text:p>0.01323275</text:p>
          </table:table-cell>
          <table:table-cell table:number-columns-repeated="4"/>
        </table:table-row>
        <table:table-row table:style-name="ro1">
          <table:table-cell office:value-type="float" office:value="322.881622314453">
            <text:p>322.8816223145</text:p>
          </table:table-cell>
          <table:table-cell office:value-type="float" office:value="-0.002651266">
            <text:p>-0.002651266</text:p>
          </table:table-cell>
          <table:table-cell table:number-columns-repeated="4"/>
        </table:table-row>
        <table:table-row table:style-name="ro1">
          <table:table-cell office:value-type="float" office:value="322.989227294922">
            <text:p>322.9892272949</text:p>
          </table:table-cell>
          <table:table-cell office:value-type="float" office:value="0.002524267">
            <text:p>0.002524267</text:p>
          </table:table-cell>
          <table:table-cell table:number-columns-repeated="4"/>
        </table:table-row>
        <table:table-row table:style-name="ro1">
          <table:table-cell office:value-type="float" office:value="323.096862792969">
            <text:p>323.096862793</text:p>
          </table:table-cell>
          <table:table-cell office:value-type="float" office:value="0.0004155988">
            <text:p>0.0004155988</text:p>
          </table:table-cell>
          <table:table-cell table:number-columns-repeated="4"/>
        </table:table-row>
        <table:table-row table:style-name="ro1">
          <table:table-cell office:value-type="float" office:value="323.204498291016">
            <text:p>323.204498291</text:p>
          </table:table-cell>
          <table:table-cell office:value-type="float" office:value="0.007684221">
            <text:p>0.007684221</text:p>
          </table:table-cell>
          <table:table-cell table:number-columns-repeated="4"/>
        </table:table-row>
        <table:table-row table:style-name="ro1">
          <table:table-cell office:value-type="float" office:value="323.312133789063">
            <text:p>323.3121337891</text:p>
          </table:table-cell>
          <table:table-cell office:value-type="float" office:value="-0.002970457">
            <text:p>-0.002970457</text:p>
          </table:table-cell>
          <table:table-cell table:number-columns-repeated="4"/>
        </table:table-row>
        <table:table-row table:style-name="ro1">
          <table:table-cell office:value-type="float" office:value="323.419769287109">
            <text:p>323.4197692871</text:p>
          </table:table-cell>
          <table:table-cell office:value-type="float" office:value="0.0028403">
            <text:p>0.0028403</text:p>
          </table:table-cell>
          <table:table-cell table:number-columns-repeated="4"/>
        </table:table-row>
        <table:table-row table:style-name="ro1">
          <table:table-cell office:value-type="float" office:value="323.527404785156">
            <text:p>323.5274047852</text:p>
          </table:table-cell>
          <table:table-cell office:value-type="float" office:value="0.04304658">
            <text:p>0.04304658</text:p>
          </table:table-cell>
          <table:table-cell table:number-columns-repeated="4"/>
        </table:table-row>
        <table:table-row table:style-name="ro1">
          <table:table-cell office:value-type="float" office:value="323.635070800781">
            <text:p>323.6350708008</text:p>
          </table:table-cell>
          <table:table-cell office:value-type="float" office:value="-0.008047348">
            <text:p>-0.008047348</text:p>
          </table:table-cell>
          <table:table-cell table:number-columns-repeated="4"/>
        </table:table-row>
        <table:table-row table:style-name="ro1">
          <table:table-cell office:value-type="float" office:value="323.742736816406">
            <text:p>323.7427368164</text:p>
          </table:table-cell>
          <table:table-cell office:value-type="float" office:value="-0.003929882">
            <text:p>-0.003929882</text:p>
          </table:table-cell>
          <table:table-cell table:number-columns-repeated="4"/>
        </table:table-row>
        <table:table-row table:style-name="ro1">
          <table:table-cell office:value-type="float" office:value="323.850402832031">
            <text:p>323.850402832</text:p>
          </table:table-cell>
          <table:table-cell office:value-type="float" office:value="0.01121777">
            <text:p>0.01121777</text:p>
          </table:table-cell>
          <table:table-cell table:number-columns-repeated="4"/>
        </table:table-row>
        <table:table-row table:style-name="ro1">
          <table:table-cell office:value-type="float" office:value="323.958068847656">
            <text:p>323.9580688477</text:p>
          </table:table-cell>
          <table:table-cell office:value-type="float" office:value="0.01874221">
            <text:p>0.01874221</text:p>
          </table:table-cell>
          <table:table-cell table:number-columns-repeated="4"/>
        </table:table-row>
        <table:table-row table:style-name="ro1">
          <table:table-cell office:value-type="float" office:value="324.065765380859">
            <text:p>324.0657653809</text:p>
          </table:table-cell>
          <table:table-cell office:value-type="float" office:value="-0.001899137">
            <text:p>-0.001899137</text:p>
          </table:table-cell>
          <table:table-cell table:number-columns-repeated="4"/>
        </table:table-row>
        <table:table-row table:style-name="ro1">
          <table:table-cell office:value-type="float" office:value="324.173461914063">
            <text:p>324.1734619141</text:p>
          </table:table-cell>
          <table:table-cell office:value-type="float" office:value="-0.006122179">
            <text:p>-0.006122179</text:p>
          </table:table-cell>
          <table:table-cell table:number-columns-repeated="4"/>
        </table:table-row>
        <table:table-row table:style-name="ro1">
          <table:table-cell office:value-type="float" office:value="324.281158447266">
            <text:p>324.2811584473</text:p>
          </table:table-cell>
          <table:table-cell office:value-type="float" office:value="0.004633333">
            <text:p>0.004633333</text:p>
          </table:table-cell>
          <table:table-cell table:number-columns-repeated="4"/>
        </table:table-row>
        <table:table-row table:style-name="ro1">
          <table:table-cell office:value-type="float" office:value="324.388854980469">
            <text:p>324.3888549805</text:p>
          </table:table-cell>
          <table:table-cell office:value-type="float" office:value="-0.004448547">
            <text:p>-0.004448547</text:p>
          </table:table-cell>
          <table:table-cell table:number-columns-repeated="4"/>
        </table:table-row>
        <table:table-row table:style-name="ro1">
          <table:table-cell office:value-type="float" office:value="324.496551513672">
            <text:p>324.4965515137</text:p>
          </table:table-cell>
          <table:table-cell office:value-type="float" office:value="0.00250237">
            <text:p>0.00250237</text:p>
          </table:table-cell>
          <table:table-cell table:number-columns-repeated="4"/>
        </table:table-row>
        <table:table-row table:style-name="ro1">
          <table:table-cell office:value-type="float" office:value="324.604278564453">
            <text:p>324.6042785645</text:p>
          </table:table-cell>
          <table:table-cell office:value-type="float" office:value="0.009683485">
            <text:p>0.009683485</text:p>
          </table:table-cell>
          <table:table-cell table:number-columns-repeated="4"/>
        </table:table-row>
        <table:table-row table:style-name="ro1">
          <table:table-cell office:value-type="float" office:value="324.712005615234">
            <text:p>324.7120056152</text:p>
          </table:table-cell>
          <table:table-cell office:value-type="float" office:value="0.004101159">
            <text:p>0.004101159</text:p>
          </table:table-cell>
          <table:table-cell table:number-columns-repeated="4"/>
        </table:table-row>
        <table:table-row table:style-name="ro1">
          <table:table-cell office:value-type="float" office:value="324.819732666016">
            <text:p>324.819732666</text:p>
          </table:table-cell>
          <table:table-cell office:value-type="float" office:value="0.001411476">
            <text:p>0.001411476</text:p>
          </table:table-cell>
          <table:table-cell table:number-columns-repeated="4"/>
        </table:table-row>
        <table:table-row table:style-name="ro1">
          <table:table-cell office:value-type="float" office:value="324.927490234375">
            <text:p>324.9274902344</text:p>
          </table:table-cell>
          <table:table-cell office:value-type="float" office:value="0.02012357">
            <text:p>0.02012357</text:p>
          </table:table-cell>
          <table:table-cell table:number-columns-repeated="4"/>
        </table:table-row>
        <table:table-row table:style-name="ro1">
          <table:table-cell office:value-type="float" office:value="325.035217285156">
            <text:p>325.0352172852</text:p>
          </table:table-cell>
          <table:table-cell office:value-type="float" office:value="-0.009387941">
            <text:p>-0.009387941</text:p>
          </table:table-cell>
          <table:table-cell table:number-columns-repeated="4"/>
        </table:table-row>
        <table:table-row table:style-name="ro1">
          <table:table-cell office:value-type="float" office:value="325.142974853516">
            <text:p>325.1429748535</text:p>
          </table:table-cell>
          <table:table-cell office:value-type="float" office:value="0.001870475">
            <text:p>0.001870475</text:p>
          </table:table-cell>
          <table:table-cell table:number-columns-repeated="4"/>
        </table:table-row>
        <table:table-row table:style-name="ro1">
          <table:table-cell office:value-type="float" office:value="325.250732421875">
            <text:p>325.2507324219</text:p>
          </table:table-cell>
          <table:table-cell office:value-type="float" office:value="0.0004673724">
            <text:p>0.0004673724</text:p>
          </table:table-cell>
          <table:table-cell table:number-columns-repeated="4"/>
        </table:table-row>
        <table:table-row table:style-name="ro1">
          <table:table-cell office:value-type="float" office:value="325.358489990234">
            <text:p>325.3584899902</text:p>
          </table:table-cell>
          <table:table-cell office:value-type="float" office:value="-0.004286614">
            <text:p>-0.004286614</text:p>
          </table:table-cell>
          <table:table-cell table:number-columns-repeated="4"/>
        </table:table-row>
        <table:table-row table:style-name="ro1">
          <table:table-cell office:value-type="float" office:value="325.466278076172">
            <text:p>325.4662780762</text:p>
          </table:table-cell>
          <table:table-cell office:value-type="float" office:value="0.002010032">
            <text:p>0.002010032</text:p>
          </table:table-cell>
          <table:table-cell table:number-columns-repeated="4"/>
        </table:table-row>
        <table:table-row table:style-name="ro1">
          <table:table-cell office:value-type="float" office:value="325.574066162109">
            <text:p>325.5740661621</text:p>
          </table:table-cell>
          <table:table-cell office:value-type="float" office:value="0.004993493">
            <text:p>0.004993493</text:p>
          </table:table-cell>
          <table:table-cell table:number-columns-repeated="4"/>
        </table:table-row>
        <table:table-row table:style-name="ro1">
          <table:table-cell office:value-type="float" office:value="325.681854248047">
            <text:p>325.681854248</text:p>
          </table:table-cell>
          <table:table-cell office:value-type="float" office:value="0.00399382">
            <text:p>0.00399382</text:p>
          </table:table-cell>
          <table:table-cell table:number-columns-repeated="4"/>
        </table:table-row>
        <table:table-row table:style-name="ro1">
          <table:table-cell office:value-type="float" office:value="325.789642333984">
            <text:p>325.789642334</text:p>
          </table:table-cell>
          <table:table-cell office:value-type="float" office:value="0.005955778">
            <text:p>0.005955778</text:p>
          </table:table-cell>
          <table:table-cell table:number-columns-repeated="4"/>
        </table:table-row>
        <table:table-row table:style-name="ro1">
          <table:table-cell office:value-type="float" office:value="325.897430419922">
            <text:p>325.8974304199</text:p>
          </table:table-cell>
          <table:table-cell office:value-type="float" office:value="0.002894027">
            <text:p>0.002894027</text:p>
          </table:table-cell>
          <table:table-cell table:number-columns-repeated="4"/>
        </table:table-row>
        <table:table-row table:style-name="ro1">
          <table:table-cell office:value-type="float" office:value="326.005249023438">
            <text:p>326.0052490234</text:p>
          </table:table-cell>
          <table:table-cell office:value-type="float" office:value="0.000194122">
            <text:p>0.000194122</text:p>
          </table:table-cell>
          <table:table-cell table:number-columns-repeated="4"/>
        </table:table-row>
        <table:table-row table:style-name="ro1">
          <table:table-cell office:value-type="float" office:value="326.113067626953">
            <text:p>326.113067627</text:p>
          </table:table-cell>
          <table:table-cell office:value-type="float" office:value="0.007540032">
            <text:p>0.007540032</text:p>
          </table:table-cell>
          <table:table-cell table:number-columns-repeated="4"/>
        </table:table-row>
        <table:table-row table:style-name="ro1">
          <table:table-cell office:value-type="float" office:value="326.220886230469">
            <text:p>326.2208862305</text:p>
          </table:table-cell>
          <table:table-cell office:value-type="float" office:value="0.01842519">
            <text:p>0.01842519</text:p>
          </table:table-cell>
          <table:table-cell table:number-columns-repeated="4"/>
        </table:table-row>
        <table:table-row table:style-name="ro1">
          <table:table-cell office:value-type="float" office:value="326.328704833984">
            <text:p>326.328704834</text:p>
          </table:table-cell>
          <table:table-cell office:value-type="float" office:value="-0.004551829">
            <text:p>-0.004551829</text:p>
          </table:table-cell>
          <table:table-cell table:number-columns-repeated="4"/>
        </table:table-row>
        <table:table-row table:style-name="ro1">
          <table:table-cell office:value-type="float" office:value="326.436553955078">
            <text:p>326.4365539551</text:p>
          </table:table-cell>
          <table:table-cell office:value-type="float" office:value="0.0101626">
            <text:p>0.0101626</text:p>
          </table:table-cell>
          <table:table-cell table:number-columns-repeated="4"/>
        </table:table-row>
        <table:table-row table:style-name="ro1">
          <table:table-cell office:value-type="float" office:value="326.544403076172">
            <text:p>326.5444030762</text:p>
          </table:table-cell>
          <table:table-cell office:value-type="float" office:value="0.02583031">
            <text:p>0.02583031</text:p>
          </table:table-cell>
          <table:table-cell table:number-columns-repeated="4"/>
        </table:table-row>
        <table:table-row table:style-name="ro1">
          <table:table-cell office:value-type="float" office:value="326.652252197266">
            <text:p>326.6522521973</text:p>
          </table:table-cell>
          <table:table-cell office:value-type="float" office:value="0.01934786">
            <text:p>0.01934786</text:p>
          </table:table-cell>
          <table:table-cell table:number-columns-repeated="4"/>
        </table:table-row>
        <table:table-row table:style-name="ro1">
          <table:table-cell office:value-type="float" office:value="326.760101318359">
            <text:p>326.7601013184</text:p>
          </table:table-cell>
          <table:table-cell office:value-type="float" office:value="0.005619124">
            <text:p>0.005619124</text:p>
          </table:table-cell>
          <table:table-cell table:number-columns-repeated="4"/>
        </table:table-row>
        <table:table-row table:style-name="ro1">
          <table:table-cell office:value-type="float" office:value="326.867950439453">
            <text:p>326.8679504395</text:p>
          </table:table-cell>
          <table:table-cell office:value-type="float" office:value="0.01050773">
            <text:p>0.01050773</text:p>
          </table:table-cell>
          <table:table-cell table:number-columns-repeated="4"/>
        </table:table-row>
        <table:table-row table:style-name="ro1">
          <table:table-cell office:value-type="float" office:value="326.975830078125">
            <text:p>326.9758300781</text:p>
          </table:table-cell>
          <table:table-cell office:value-type="float" office:value="0.003617068">
            <text:p>0.003617068</text:p>
          </table:table-cell>
          <table:table-cell table:number-columns-repeated="4"/>
        </table:table-row>
        <table:table-row table:style-name="ro1">
          <table:table-cell office:value-type="float" office:value="327.083709716797">
            <text:p>327.0837097168</text:p>
          </table:table-cell>
          <table:table-cell office:value-type="float" office:value="0.007344233">
            <text:p>0.007344233</text:p>
          </table:table-cell>
          <table:table-cell table:number-columns-repeated="4"/>
        </table:table-row>
        <table:table-row table:style-name="ro1">
          <table:table-cell office:value-type="float" office:value="327.191589355469">
            <text:p>327.1915893555</text:p>
          </table:table-cell>
          <table:table-cell office:value-type="float" office:value="-0.001629738">
            <text:p>-0.001629738</text:p>
          </table:table-cell>
          <table:table-cell table:number-columns-repeated="4"/>
        </table:table-row>
        <table:table-row table:style-name="ro1">
          <table:table-cell office:value-type="float" office:value="327.299499511719">
            <text:p>327.2994995117</text:p>
          </table:table-cell>
          <table:table-cell office:value-type="float" office:value="0.00487369">
            <text:p>0.00487369</text:p>
          </table:table-cell>
          <table:table-cell table:number-columns-repeated="4"/>
        </table:table-row>
        <table:table-row table:style-name="ro1">
          <table:table-cell office:value-type="float" office:value="327.407379150391">
            <text:p>327.4073791504</text:p>
          </table:table-cell>
          <table:table-cell office:value-type="float" office:value="0.02140358">
            <text:p>0.02140358</text:p>
          </table:table-cell>
          <table:table-cell table:number-columns-repeated="4"/>
        </table:table-row>
        <table:table-row table:style-name="ro1">
          <table:table-cell office:value-type="float" office:value="327.515289306641">
            <text:p>327.5152893066</text:p>
          </table:table-cell>
          <table:table-cell office:value-type="float" office:value="-0.003061289">
            <text:p>-0.003061289</text:p>
          </table:table-cell>
          <table:table-cell table:number-columns-repeated="4"/>
        </table:table-row>
        <table:table-row table:style-name="ro1">
          <table:table-cell office:value-type="float" office:value="327.623199462891">
            <text:p>327.6231994629</text:p>
          </table:table-cell>
          <table:table-cell office:value-type="float" office:value="0.01017511">
            <text:p>0.01017511</text:p>
          </table:table-cell>
          <table:table-cell table:number-columns-repeated="4"/>
        </table:table-row>
        <table:table-row table:style-name="ro1">
          <table:table-cell office:value-type="float" office:value="327.731109619141">
            <text:p>327.7311096191</text:p>
          </table:table-cell>
          <table:table-cell office:value-type="float" office:value="-0.004016445">
            <text:p>-0.004016445</text:p>
          </table:table-cell>
          <table:table-cell table:number-columns-repeated="4"/>
        </table:table-row>
        <table:table-row table:style-name="ro1">
          <table:table-cell office:value-type="float" office:value="327.839050292969">
            <text:p>327.839050293</text:p>
          </table:table-cell>
          <table:table-cell office:value-type="float" office:value="-0.008553262">
            <text:p>-0.008553262</text:p>
          </table:table-cell>
          <table:table-cell table:number-columns-repeated="4"/>
        </table:table-row>
        <table:table-row table:style-name="ro1">
          <table:table-cell office:value-type="float" office:value="327.946990966797">
            <text:p>327.9469909668</text:p>
          </table:table-cell>
          <table:table-cell office:value-type="float" office:value="-0.001378888">
            <text:p>-0.001378888</text:p>
          </table:table-cell>
          <table:table-cell table:number-columns-repeated="4"/>
        </table:table-row>
        <table:table-row table:style-name="ro1">
          <table:table-cell office:value-type="float" office:value="328.054931640625">
            <text:p>328.0549316406</text:p>
          </table:table-cell>
          <table:table-cell office:value-type="float" office:value="0.004023732">
            <text:p>0.004023732</text:p>
          </table:table-cell>
          <table:table-cell table:number-columns-repeated="4"/>
        </table:table-row>
        <table:table-row table:style-name="ro1">
          <table:table-cell office:value-type="float" office:value="328.162872314453">
            <text:p>328.1628723145</text:p>
          </table:table-cell>
          <table:table-cell office:value-type="float" office:value="0.006968047">
            <text:p>0.006968047</text:p>
          </table:table-cell>
          <table:table-cell table:number-columns-repeated="4"/>
        </table:table-row>
        <table:table-row table:style-name="ro1">
          <table:table-cell office:value-type="float" office:value="328.270812988281">
            <text:p>328.2708129883</text:p>
          </table:table-cell>
          <table:table-cell office:value-type="float" office:value="-0.003743216">
            <text:p>-0.003743216</text:p>
          </table:table-cell>
          <table:table-cell table:number-columns-repeated="4"/>
        </table:table-row>
        <table:table-row table:style-name="ro1">
          <table:table-cell office:value-type="float" office:value="328.378784179688">
            <text:p>328.3787841797</text:p>
          </table:table-cell>
          <table:table-cell office:value-type="float" office:value="-0.002111235">
            <text:p>-0.002111235</text:p>
          </table:table-cell>
          <table:table-cell table:number-columns-repeated="4"/>
        </table:table-row>
        <table:table-row table:style-name="ro1">
          <table:table-cell office:value-type="float" office:value="328.486755371094">
            <text:p>328.4867553711</text:p>
          </table:table-cell>
          <table:table-cell office:value-type="float" office:value="-0.009776313">
            <text:p>-0.009776313</text:p>
          </table:table-cell>
          <table:table-cell table:number-columns-repeated="4"/>
        </table:table-row>
        <table:table-row table:style-name="ro1">
          <table:table-cell office:value-type="float" office:value="328.5947265625">
            <text:p>328.5947265625</text:p>
          </table:table-cell>
          <table:table-cell office:value-type="float" office:value="0.002567664">
            <text:p>0.002567664</text:p>
          </table:table-cell>
          <table:table-cell table:number-columns-repeated="4"/>
        </table:table-row>
        <table:table-row table:style-name="ro1">
          <table:table-cell office:value-type="float" office:value="328.702697753906">
            <text:p>328.7026977539</text:p>
          </table:table-cell>
          <table:table-cell office:value-type="float" office:value="0.02457961">
            <text:p>0.02457961</text:p>
          </table:table-cell>
          <table:table-cell table:number-columns-repeated="4"/>
        </table:table-row>
        <table:table-row table:style-name="ro1">
          <table:table-cell office:value-type="float" office:value="328.810699462891">
            <text:p>328.8106994629</text:p>
          </table:table-cell>
          <table:table-cell office:value-type="float" office:value="0.001779334">
            <text:p>0.001779334</text:p>
          </table:table-cell>
          <table:table-cell table:number-columns-repeated="4"/>
        </table:table-row>
        <table:table-row table:style-name="ro1">
          <table:table-cell office:value-type="float" office:value="328.918670654297">
            <text:p>328.9186706543</text:p>
          </table:table-cell>
          <table:table-cell office:value-type="float" office:value="0.009056792">
            <text:p>0.009056792</text:p>
          </table:table-cell>
          <table:table-cell table:number-columns-repeated="4"/>
        </table:table-row>
        <table:table-row table:style-name="ro1">
          <table:table-cell office:value-type="float" office:value="329.026672363281">
            <text:p>329.0266723633</text:p>
          </table:table-cell>
          <table:table-cell office:value-type="float" office:value="0.009018494">
            <text:p>0.009018494</text:p>
          </table:table-cell>
          <table:table-cell table:number-columns-repeated="4"/>
        </table:table-row>
        <table:table-row table:style-name="ro1">
          <table:table-cell office:value-type="float" office:value="329.134704589844">
            <text:p>329.1347045898</text:p>
          </table:table-cell>
          <table:table-cell office:value-type="float" office:value="0.01791959">
            <text:p>0.01791959</text:p>
          </table:table-cell>
          <table:table-cell table:number-columns-repeated="4"/>
        </table:table-row>
        <table:table-row table:style-name="ro1">
          <table:table-cell office:value-type="float" office:value="329.242706298828">
            <text:p>329.2427062988</text:p>
          </table:table-cell>
          <table:table-cell office:value-type="float" office:value="-0.002703521">
            <text:p>-0.002703521</text:p>
          </table:table-cell>
          <table:table-cell table:number-columns-repeated="4"/>
        </table:table-row>
        <table:table-row table:style-name="ro1">
          <table:table-cell office:value-type="float" office:value="329.350738525391">
            <text:p>329.3507385254</text:p>
          </table:table-cell>
          <table:table-cell office:value-type="float" office:value="-0.003598753">
            <text:p>-0.003598753</text:p>
          </table:table-cell>
          <table:table-cell table:number-columns-repeated="4"/>
        </table:table-row>
        <table:table-row table:style-name="ro1">
          <table:table-cell office:value-type="float" office:value="329.458770751953">
            <text:p>329.458770752</text:p>
          </table:table-cell>
          <table:table-cell office:value-type="float" office:value="0.0006884856">
            <text:p>0.0006884856</text:p>
          </table:table-cell>
          <table:table-cell table:number-columns-repeated="4"/>
        </table:table-row>
        <table:table-row table:style-name="ro1">
          <table:table-cell office:value-type="float" office:value="329.566802978516">
            <text:p>329.5668029785</text:p>
          </table:table-cell>
          <table:table-cell office:value-type="float" office:value="0.002976625">
            <text:p>0.002976625</text:p>
          </table:table-cell>
          <table:table-cell table:number-columns-repeated="4"/>
        </table:table-row>
        <table:table-row table:style-name="ro1">
          <table:table-cell office:value-type="float" office:value="329.674835205078">
            <text:p>329.6748352051</text:p>
          </table:table-cell>
          <table:table-cell office:value-type="float" office:value="-0.003100872">
            <text:p>-0.003100872</text:p>
          </table:table-cell>
          <table:table-cell table:number-columns-repeated="4"/>
        </table:table-row>
        <table:table-row table:style-name="ro1">
          <table:table-cell office:value-type="float" office:value="329.782897949219">
            <text:p>329.7828979492</text:p>
          </table:table-cell>
          <table:table-cell office:value-type="float" office:value="0.008332026">
            <text:p>0.008332026</text:p>
          </table:table-cell>
          <table:table-cell table:number-columns-repeated="4"/>
        </table:table-row>
        <table:table-row table:style-name="ro1">
          <table:table-cell office:value-type="float" office:value="329.890960693359">
            <text:p>329.8909606934</text:p>
          </table:table-cell>
          <table:table-cell office:value-type="float" office:value="0.0449557">
            <text:p>0.0449557</text:p>
          </table:table-cell>
          <table:table-cell table:number-columns-repeated="4"/>
        </table:table-row>
        <table:table-row table:style-name="ro1">
          <table:table-cell office:value-type="float" office:value="329.9990234375">
            <text:p>329.9990234375</text:p>
          </table:table-cell>
          <table:table-cell office:value-type="float" office:value="0.0011936">
            <text:p>0.0011936</text:p>
          </table:table-cell>
          <table:table-cell table:number-columns-repeated="4"/>
        </table:table-row>
        <table:table-row table:style-name="ro1">
          <table:table-cell office:value-type="float" office:value="330.107086181641">
            <text:p>330.1070861816</text:p>
          </table:table-cell>
          <table:table-cell office:value-type="float" office:value="0.001556425">
            <text:p>0.001556425</text:p>
          </table:table-cell>
          <table:table-cell table:number-columns-repeated="4"/>
        </table:table-row>
        <table:table-row table:style-name="ro1">
          <table:table-cell office:value-type="float" office:value="330.215148925781">
            <text:p>330.2151489258</text:p>
          </table:table-cell>
          <table:table-cell office:value-type="float" office:value="-0.008268685">
            <text:p>-0.008268685</text:p>
          </table:table-cell>
          <table:table-cell table:number-columns-repeated="4"/>
        </table:table-row>
        <table:table-row table:style-name="ro1">
          <table:table-cell office:value-type="float" office:value="330.3232421875">
            <text:p>330.3232421875</text:p>
          </table:table-cell>
          <table:table-cell office:value-type="float" office:value="0.01787354">
            <text:p>0.01787354</text:p>
          </table:table-cell>
          <table:table-cell table:number-columns-repeated="4"/>
        </table:table-row>
        <table:table-row table:style-name="ro1">
          <table:table-cell office:value-type="float" office:value="330.431335449219">
            <text:p>330.4313354492</text:p>
          </table:table-cell>
          <table:table-cell office:value-type="float" office:value="0.009585041">
            <text:p>0.009585041</text:p>
          </table:table-cell>
          <table:table-cell table:number-columns-repeated="4"/>
        </table:table-row>
        <table:table-row table:style-name="ro1">
          <table:table-cell office:value-type="float" office:value="330.539428710938">
            <text:p>330.5394287109</text:p>
          </table:table-cell>
          <table:table-cell office:value-type="float" office:value="0.009385821">
            <text:p>0.009385821</text:p>
          </table:table-cell>
          <table:table-cell table:number-columns-repeated="4"/>
        </table:table-row>
        <table:table-row table:style-name="ro1">
          <table:table-cell office:value-type="float" office:value="330.647521972656">
            <text:p>330.6475219727</text:p>
          </table:table-cell>
          <table:table-cell office:value-type="float" office:value="-0.003827769">
            <text:p>-0.003827769</text:p>
          </table:table-cell>
          <table:table-cell table:number-columns-repeated="4"/>
        </table:table-row>
        <table:table-row table:style-name="ro1">
          <table:table-cell office:value-type="float" office:value="330.755645751953">
            <text:p>330.755645752</text:p>
          </table:table-cell>
          <table:table-cell office:value-type="float" office:value="0.004977195">
            <text:p>0.004977195</text:p>
          </table:table-cell>
          <table:table-cell table:number-columns-repeated="4"/>
        </table:table-row>
        <table:table-row table:style-name="ro1">
          <table:table-cell office:value-type="float" office:value="330.86376953125">
            <text:p>330.8637695313</text:p>
          </table:table-cell>
          <table:table-cell office:value-type="float" office:value="0.01757599">
            <text:p>0.01757599</text:p>
          </table:table-cell>
          <table:table-cell table:number-columns-repeated="4"/>
        </table:table-row>
        <table:table-row table:style-name="ro1">
          <table:table-cell office:value-type="float" office:value="330.971893310547">
            <text:p>330.9718933105</text:p>
          </table:table-cell>
          <table:table-cell office:value-type="float" office:value="0.0122018">
            <text:p>0.0122018</text:p>
          </table:table-cell>
          <table:table-cell table:number-columns-repeated="4"/>
        </table:table-row>
        <table:table-row table:style-name="ro1">
          <table:table-cell office:value-type="float" office:value="331.080017089844">
            <text:p>331.0800170898</text:p>
          </table:table-cell>
          <table:table-cell office:value-type="float" office:value="0.03239081">
            <text:p>0.03239081</text:p>
          </table:table-cell>
          <table:table-cell table:number-columns-repeated="4"/>
        </table:table-row>
        <table:table-row table:style-name="ro1">
          <table:table-cell office:value-type="float" office:value="331.188171386719">
            <text:p>331.1881713867</text:p>
          </table:table-cell>
          <table:table-cell office:value-type="float" office:value="0.01079708">
            <text:p>0.01079708</text:p>
          </table:table-cell>
          <table:table-cell table:number-columns-repeated="4"/>
        </table:table-row>
        <table:table-row table:style-name="ro1">
          <table:table-cell office:value-type="float" office:value="331.296295166016">
            <text:p>331.296295166</text:p>
          </table:table-cell>
          <table:table-cell office:value-type="float" office:value="0.02202209">
            <text:p>0.02202209</text:p>
          </table:table-cell>
          <table:table-cell table:number-columns-repeated="4"/>
        </table:table-row>
        <table:table-row table:style-name="ro1">
          <table:table-cell office:value-type="float" office:value="331.404449462891">
            <text:p>331.4044494629</text:p>
          </table:table-cell>
          <table:table-cell office:value-type="float" office:value="-0.004563924">
            <text:p>-0.004563924</text:p>
          </table:table-cell>
          <table:table-cell table:number-columns-repeated="4"/>
        </table:table-row>
        <table:table-row table:style-name="ro1">
          <table:table-cell office:value-type="float" office:value="331.512603759766">
            <text:p>331.5126037598</text:p>
          </table:table-cell>
          <table:table-cell office:value-type="float" office:value="-0.004639504">
            <text:p>-0.004639504</text:p>
          </table:table-cell>
          <table:table-cell table:number-columns-repeated="4"/>
        </table:table-row>
        <table:table-row table:style-name="ro1">
          <table:table-cell office:value-type="float" office:value="331.620788574219">
            <text:p>331.6207885742</text:p>
          </table:table-cell>
          <table:table-cell office:value-type="float" office:value="0.003077274">
            <text:p>0.003077274</text:p>
          </table:table-cell>
          <table:table-cell table:number-columns-repeated="4"/>
        </table:table-row>
        <table:table-row table:style-name="ro1">
          <table:table-cell office:value-type="float" office:value="331.728942871094">
            <text:p>331.7289428711</text:p>
          </table:table-cell>
          <table:table-cell office:value-type="float" office:value="0.009654647">
            <text:p>0.009654647</text:p>
          </table:table-cell>
          <table:table-cell table:number-columns-repeated="4"/>
        </table:table-row>
        <table:table-row table:style-name="ro1">
          <table:table-cell office:value-type="float" office:value="331.837127685547">
            <text:p>331.8371276855</text:p>
          </table:table-cell>
          <table:table-cell office:value-type="float" office:value="-0.00118685">
            <text:p>-0.00118685</text:p>
          </table:table-cell>
          <table:table-cell table:number-columns-repeated="4"/>
        </table:table-row>
        <table:table-row table:style-name="ro1">
          <table:table-cell office:value-type="float" office:value="331.9453125">
            <text:p>331.9453125</text:p>
          </table:table-cell>
          <table:table-cell office:value-type="float" office:value="-0.004382763">
            <text:p>-0.004382763</text:p>
          </table:table-cell>
          <table:table-cell table:number-columns-repeated="4"/>
        </table:table-row>
        <table:table-row table:style-name="ro1">
          <table:table-cell office:value-type="float" office:value="332.053527832031">
            <text:p>332.053527832</text:p>
          </table:table-cell>
          <table:table-cell office:value-type="float" office:value="0.006970658">
            <text:p>0.006970658</text:p>
          </table:table-cell>
          <table:table-cell table:number-columns-repeated="4"/>
        </table:table-row>
        <table:table-row table:style-name="ro1">
          <table:table-cell office:value-type="float" office:value="332.161712646484">
            <text:p>332.1617126465</text:p>
          </table:table-cell>
          <table:table-cell office:value-type="float" office:value="-0.001532188">
            <text:p>-0.001532188</text:p>
          </table:table-cell>
          <table:table-cell table:number-columns-repeated="4"/>
        </table:table-row>
        <table:table-row table:style-name="ro1">
          <table:table-cell office:value-type="float" office:value="332.269927978516">
            <text:p>332.2699279785</text:p>
          </table:table-cell>
          <table:table-cell office:value-type="float" office:value="-0.0107077">
            <text:p>-0.0107077</text:p>
          </table:table-cell>
          <table:table-cell table:number-columns-repeated="4"/>
        </table:table-row>
        <table:table-row table:style-name="ro1">
          <table:table-cell office:value-type="float" office:value="332.378143310547">
            <text:p>332.3781433105</text:p>
          </table:table-cell>
          <table:table-cell office:value-type="float" office:value="-0.00410079">
            <text:p>-0.00410079</text:p>
          </table:table-cell>
          <table:table-cell table:number-columns-repeated="4"/>
        </table:table-row>
        <table:table-row table:style-name="ro1">
          <table:table-cell office:value-type="float" office:value="332.486358642578">
            <text:p>332.4863586426</text:p>
          </table:table-cell>
          <table:table-cell office:value-type="float" office:value="0.02142365">
            <text:p>0.02142365</text:p>
          </table:table-cell>
          <table:table-cell table:number-columns-repeated="4"/>
        </table:table-row>
        <table:table-row table:style-name="ro1">
          <table:table-cell office:value-type="float" office:value="332.594573974609">
            <text:p>332.5945739746</text:p>
          </table:table-cell>
          <table:table-cell office:value-type="float" office:value="0.01412937">
            <text:p>0.01412937</text:p>
          </table:table-cell>
          <table:table-cell table:number-columns-repeated="4"/>
        </table:table-row>
        <table:table-row table:style-name="ro1">
          <table:table-cell office:value-type="float" office:value="332.702819824219">
            <text:p>332.7028198242</text:p>
          </table:table-cell>
          <table:table-cell office:value-type="float" office:value="0.004612266">
            <text:p>0.004612266</text:p>
          </table:table-cell>
          <table:table-cell table:number-columns-repeated="4"/>
        </table:table-row>
        <table:table-row table:style-name="ro1">
          <table:table-cell office:value-type="float" office:value="332.811065673828">
            <text:p>332.8110656738</text:p>
          </table:table-cell>
          <table:table-cell office:value-type="float" office:value="-0.009095413">
            <text:p>-0.009095413</text:p>
          </table:table-cell>
          <table:table-cell table:number-columns-repeated="4"/>
        </table:table-row>
        <table:table-row table:style-name="ro1">
          <table:table-cell office:value-type="float" office:value="332.919311523438">
            <text:p>332.9193115234</text:p>
          </table:table-cell>
          <table:table-cell office:value-type="float" office:value="-0.0005173422">
            <text:p>-0.0005173422</text:p>
          </table:table-cell>
          <table:table-cell table:number-columns-repeated="4"/>
        </table:table-row>
        <table:table-row table:style-name="ro1">
          <table:table-cell office:value-type="float" office:value="333.027557373047">
            <text:p>333.027557373</text:p>
          </table:table-cell>
          <table:table-cell office:value-type="float" office:value="-0.0004950201">
            <text:p>-0.0004950201</text:p>
          </table:table-cell>
          <table:table-cell table:number-columns-repeated="4"/>
        </table:table-row>
        <table:table-row table:style-name="ro1">
          <table:table-cell office:value-type="float" office:value="333.135833740234">
            <text:p>333.1358337402</text:p>
          </table:table-cell>
          <table:table-cell office:value-type="float" office:value="0.005879029">
            <text:p>0.005879029</text:p>
          </table:table-cell>
          <table:table-cell table:number-columns-repeated="4"/>
        </table:table-row>
        <table:table-row table:style-name="ro1">
          <table:table-cell office:value-type="float" office:value="333.244079589844">
            <text:p>333.2440795898</text:p>
          </table:table-cell>
          <table:table-cell office:value-type="float" office:value="0.05444449">
            <text:p>0.05444449</text:p>
          </table:table-cell>
          <table:table-cell table:number-columns-repeated="4"/>
        </table:table-row>
        <table:table-row table:style-name="ro1">
          <table:table-cell office:value-type="float" office:value="333.352355957031">
            <text:p>333.352355957</text:p>
          </table:table-cell>
          <table:table-cell office:value-type="float" office:value="-0.002643463">
            <text:p>-0.002643463</text:p>
          </table:table-cell>
          <table:table-cell table:number-columns-repeated="4"/>
        </table:table-row>
        <table:table-row table:style-name="ro1">
          <table:table-cell office:value-type="float" office:value="333.460662841797">
            <text:p>333.4606628418</text:p>
          </table:table-cell>
          <table:table-cell office:value-type="float" office:value="0.001506797">
            <text:p>0.001506797</text:p>
          </table:table-cell>
          <table:table-cell table:number-columns-repeated="4"/>
        </table:table-row>
        <table:table-row table:style-name="ro1">
          <table:table-cell office:value-type="float" office:value="333.568939208984">
            <text:p>333.568939209</text:p>
          </table:table-cell>
          <table:table-cell office:value-type="float" office:value="0.001415882">
            <text:p>0.001415882</text:p>
          </table:table-cell>
          <table:table-cell table:number-columns-repeated="4"/>
        </table:table-row>
        <table:table-row table:style-name="ro1">
          <table:table-cell office:value-type="float" office:value="333.67724609375">
            <text:p>333.6772460938</text:p>
          </table:table-cell>
          <table:table-cell office:value-type="float" office:value="-0.007164698">
            <text:p>-0.007164698</text:p>
          </table:table-cell>
          <table:table-cell table:number-columns-repeated="4"/>
        </table:table-row>
        <table:table-row table:style-name="ro1">
          <table:table-cell office:value-type="float" office:value="333.785552978516">
            <text:p>333.7855529785</text:p>
          </table:table-cell>
          <table:table-cell office:value-type="float" office:value="0.008303972">
            <text:p>0.008303972</text:p>
          </table:table-cell>
          <table:table-cell table:number-columns-repeated="4"/>
        </table:table-row>
        <table:table-row table:style-name="ro1">
          <table:table-cell office:value-type="float" office:value="333.893859863281">
            <text:p>333.8938598633</text:p>
          </table:table-cell>
          <table:table-cell office:value-type="float" office:value="0.0026207">
            <text:p>0.0026207</text:p>
          </table:table-cell>
          <table:table-cell table:number-columns-repeated="4"/>
        </table:table-row>
        <table:table-row table:style-name="ro1">
          <table:table-cell office:value-type="float" office:value="334.002166748047">
            <text:p>334.002166748</text:p>
          </table:table-cell>
          <table:table-cell office:value-type="float" office:value="-0.01227095">
            <text:p>-0.01227095</text:p>
          </table:table-cell>
          <table:table-cell table:number-columns-repeated="4"/>
        </table:table-row>
        <table:table-row table:style-name="ro1">
          <table:table-cell office:value-type="float" office:value="334.110473632813">
            <text:p>334.1104736328</text:p>
          </table:table-cell>
          <table:table-cell office:value-type="float" office:value="-0.000519939">
            <text:p>-0.000519939</text:p>
          </table:table-cell>
          <table:table-cell table:number-columns-repeated="4"/>
        </table:table-row>
        <table:table-row table:style-name="ro1">
          <table:table-cell office:value-type="float" office:value="334.218811035156">
            <text:p>334.2188110352</text:p>
          </table:table-cell>
          <table:table-cell office:value-type="float" office:value="0.004611041">
            <text:p>0.004611041</text:p>
          </table:table-cell>
          <table:table-cell table:number-columns-repeated="4"/>
        </table:table-row>
        <table:table-row table:style-name="ro1">
          <table:table-cell office:value-type="float" office:value="334.3271484375">
            <text:p>334.3271484375</text:p>
          </table:table-cell>
          <table:table-cell office:value-type="float" office:value="-0.001157039">
            <text:p>-0.001157039</text:p>
          </table:table-cell>
          <table:table-cell table:number-columns-repeated="4"/>
        </table:table-row>
        <table:table-row table:style-name="ro1">
          <table:table-cell office:value-type="float" office:value="334.435485839844">
            <text:p>334.4354858398</text:p>
          </table:table-cell>
          <table:table-cell office:value-type="string">
            <text:p>-9.791023E-06</text:p>
          </table:table-cell>
          <table:table-cell table:number-columns-repeated="4"/>
        </table:table-row>
        <table:table-row table:style-name="ro1">
          <table:table-cell office:value-type="float" office:value="334.543853759766">
            <text:p>334.5438537598</text:p>
          </table:table-cell>
          <table:table-cell office:value-type="float" office:value="-0.006859106">
            <text:p>-0.006859106</text:p>
          </table:table-cell>
          <table:table-cell table:number-columns-repeated="4"/>
        </table:table-row>
        <table:table-row table:style-name="ro1">
          <table:table-cell office:value-type="float" office:value="334.652191162109">
            <text:p>334.6521911621</text:p>
          </table:table-cell>
          <table:table-cell office:value-type="float" office:value="0.01634275">
            <text:p>0.01634275</text:p>
          </table:table-cell>
          <table:table-cell table:number-columns-repeated="4"/>
        </table:table-row>
        <table:table-row table:style-name="ro1">
          <table:table-cell office:value-type="float" office:value="334.760559082031">
            <text:p>334.760559082</text:p>
          </table:table-cell>
          <table:table-cell office:value-type="float" office:value="-0.00123223">
            <text:p>-0.00123223</text:p>
          </table:table-cell>
          <table:table-cell table:number-columns-repeated="4"/>
        </table:table-row>
        <table:table-row table:style-name="ro1">
          <table:table-cell office:value-type="float" office:value="334.868927001953">
            <text:p>334.868927002</text:p>
          </table:table-cell>
          <table:table-cell office:value-type="float" office:value="0.00908942">
            <text:p>0.00908942</text:p>
          </table:table-cell>
          <table:table-cell table:number-columns-repeated="4"/>
        </table:table-row>
        <table:table-row table:style-name="ro1">
          <table:table-cell office:value-type="float" office:value="334.977325439453">
            <text:p>334.9773254395</text:p>
          </table:table-cell>
          <table:table-cell office:value-type="float" office:value="0.00777895">
            <text:p>0.00777895</text:p>
          </table:table-cell>
          <table:table-cell table:number-columns-repeated="4"/>
        </table:table-row>
        <table:table-row table:style-name="ro1">
          <table:table-cell office:value-type="float" office:value="335.085693359375">
            <text:p>335.0856933594</text:p>
          </table:table-cell>
          <table:table-cell office:value-type="float" office:value="0.009205553">
            <text:p>0.009205553</text:p>
          </table:table-cell>
          <table:table-cell table:number-columns-repeated="4"/>
        </table:table-row>
        <table:table-row table:style-name="ro1">
          <table:table-cell office:value-type="float" office:value="335.194091796875">
            <text:p>335.1940917969</text:p>
          </table:table-cell>
          <table:table-cell office:value-type="float" office:value="-0.0005635486">
            <text:p>-0.0005635486</text:p>
          </table:table-cell>
          <table:table-cell table:number-columns-repeated="4"/>
        </table:table-row>
        <table:table-row table:style-name="ro1">
          <table:table-cell office:value-type="float" office:value="335.302490234375">
            <text:p>335.3024902344</text:p>
          </table:table-cell>
          <table:table-cell office:value-type="float" office:value="0.01849741">
            <text:p>0.01849741</text:p>
          </table:table-cell>
          <table:table-cell table:number-columns-repeated="4"/>
        </table:table-row>
        <table:table-row table:style-name="ro1">
          <table:table-cell office:value-type="float" office:value="335.410888671875">
            <text:p>335.4108886719</text:p>
          </table:table-cell>
          <table:table-cell office:value-type="float" office:value="0.007517579">
            <text:p>0.007517579</text:p>
          </table:table-cell>
          <table:table-cell table:number-columns-repeated="4"/>
        </table:table-row>
        <table:table-row table:style-name="ro1">
          <table:table-cell office:value-type="float" office:value="335.519287109375">
            <text:p>335.5192871094</text:p>
          </table:table-cell>
          <table:table-cell office:value-type="float" office:value="0.03330297">
            <text:p>0.03330297</text:p>
          </table:table-cell>
          <table:table-cell table:number-columns-repeated="4"/>
        </table:table-row>
        <table:table-row table:style-name="ro1">
          <table:table-cell office:value-type="float" office:value="335.627716064453">
            <text:p>335.6277160645</text:p>
          </table:table-cell>
          <table:table-cell office:value-type="float" office:value="0.009066387">
            <text:p>0.009066387</text:p>
          </table:table-cell>
          <table:table-cell table:number-columns-repeated="4"/>
        </table:table-row>
        <table:table-row table:style-name="ro1">
          <table:table-cell office:value-type="float" office:value="335.736145019531">
            <text:p>335.7361450195</text:p>
          </table:table-cell>
          <table:table-cell office:value-type="float" office:value="0.007582984">
            <text:p>0.007582984</text:p>
          </table:table-cell>
          <table:table-cell table:number-columns-repeated="4"/>
        </table:table-row>
        <table:table-row table:style-name="ro1">
          <table:table-cell office:value-type="float" office:value="335.844573974609">
            <text:p>335.8445739746</text:p>
          </table:table-cell>
          <table:table-cell office:value-type="float" office:value="-0.001752158">
            <text:p>-0.001752158</text:p>
          </table:table-cell>
          <table:table-cell table:number-columns-repeated="4"/>
        </table:table-row>
        <table:table-row table:style-name="ro1">
          <table:table-cell office:value-type="float" office:value="335.953002929688">
            <text:p>335.9530029297</text:p>
          </table:table-cell>
          <table:table-cell office:value-type="float" office:value="0.01004134">
            <text:p>0.01004134</text:p>
          </table:table-cell>
          <table:table-cell table:number-columns-repeated="4"/>
        </table:table-row>
        <table:table-row table:style-name="ro1">
          <table:table-cell office:value-type="float" office:value="336.061462402344">
            <text:p>336.0614624023</text:p>
          </table:table-cell>
          <table:table-cell office:value-type="float" office:value="0.02159502">
            <text:p>0.02159502</text:p>
          </table:table-cell>
          <table:table-cell table:number-columns-repeated="4"/>
        </table:table-row>
        <table:table-row table:style-name="ro1">
          <table:table-cell office:value-type="float" office:value="336.169891357422">
            <text:p>336.1698913574</text:p>
          </table:table-cell>
          <table:table-cell office:value-type="float" office:value="-0.006240402">
            <text:p>-0.006240402</text:p>
          </table:table-cell>
          <table:table-cell table:number-columns-repeated="4"/>
        </table:table-row>
        <table:table-row table:style-name="ro1">
          <table:table-cell office:value-type="float" office:value="336.278350830078">
            <text:p>336.2783508301</text:p>
          </table:table-cell>
          <table:table-cell office:value-type="float" office:value="0.002867558">
            <text:p>0.002867558</text:p>
          </table:table-cell>
          <table:table-cell table:number-columns-repeated="4"/>
        </table:table-row>
        <table:table-row table:style-name="ro1">
          <table:table-cell office:value-type="float" office:value="336.386840820313">
            <text:p>336.3868408203</text:p>
          </table:table-cell>
          <table:table-cell office:value-type="float" office:value="0.01809709">
            <text:p>0.01809709</text:p>
          </table:table-cell>
          <table:table-cell table:number-columns-repeated="4"/>
        </table:table-row>
        <table:table-row table:style-name="ro1">
          <table:table-cell office:value-type="float" office:value="336.495300292969">
            <text:p>336.495300293</text:p>
          </table:table-cell>
          <table:table-cell office:value-type="float" office:value="0.003758768">
            <text:p>0.003758768</text:p>
          </table:table-cell>
          <table:table-cell table:number-columns-repeated="4"/>
        </table:table-row>
        <table:table-row table:style-name="ro1">
          <table:table-cell office:value-type="float" office:value="336.603790283203">
            <text:p>336.6037902832</text:p>
          </table:table-cell>
          <table:table-cell office:value-type="float" office:value="-0.005723219">
            <text:p>-0.005723219</text:p>
          </table:table-cell>
          <table:table-cell table:number-columns-repeated="4"/>
        </table:table-row>
        <table:table-row table:style-name="ro1">
          <table:table-cell office:value-type="float" office:value="336.712249755859">
            <text:p>336.7122497559</text:p>
          </table:table-cell>
          <table:table-cell office:value-type="float" office:value="-0.002784151">
            <text:p>-0.002784151</text:p>
          </table:table-cell>
          <table:table-cell table:number-columns-repeated="4"/>
        </table:table-row>
        <table:table-row table:style-name="ro1">
          <table:table-cell office:value-type="float" office:value="336.820770263672">
            <text:p>336.8207702637</text:p>
          </table:table-cell>
          <table:table-cell office:value-type="float" office:value="-0.002178235">
            <text:p>-0.002178235</text:p>
          </table:table-cell>
          <table:table-cell table:number-columns-repeated="4"/>
        </table:table-row>
        <table:table-row table:style-name="ro1">
          <table:table-cell office:value-type="float" office:value="336.929260253906">
            <text:p>336.9292602539</text:p>
          </table:table-cell>
          <table:table-cell office:value-type="float" office:value="0.001821347">
            <text:p>0.001821347</text:p>
          </table:table-cell>
          <table:table-cell table:number-columns-repeated="4"/>
        </table:table-row>
        <table:table-row table:style-name="ro1">
          <table:table-cell office:value-type="float" office:value="337.037750244141">
            <text:p>337.0377502441</text:p>
          </table:table-cell>
          <table:table-cell office:value-type="float" office:value="-0.007766557">
            <text:p>-0.007766557</text:p>
          </table:table-cell>
          <table:table-cell table:number-columns-repeated="4"/>
        </table:table-row>
        <table:table-row table:style-name="ro1">
          <table:table-cell office:value-type="float" office:value="337.146270751953">
            <text:p>337.146270752</text:p>
          </table:table-cell>
          <table:table-cell office:value-type="float" office:value="-0.009949448">
            <text:p>-0.009949448</text:p>
          </table:table-cell>
          <table:table-cell table:number-columns-repeated="4"/>
        </table:table-row>
        <table:table-row table:style-name="ro1">
          <table:table-cell office:value-type="float" office:value="337.254791259766">
            <text:p>337.2547912598</text:p>
          </table:table-cell>
          <table:table-cell office:value-type="float" office:value="0.02676895">
            <text:p>0.02676895</text:p>
          </table:table-cell>
          <table:table-cell table:number-columns-repeated="4"/>
        </table:table-row>
        <table:table-row table:style-name="ro1">
          <table:table-cell office:value-type="float" office:value="337.363311767578">
            <text:p>337.3633117676</text:p>
          </table:table-cell>
          <table:table-cell office:value-type="float" office:value="0.000610485">
            <text:p>0.000610485</text:p>
          </table:table-cell>
          <table:table-cell table:number-columns-repeated="4"/>
        </table:table-row>
        <table:table-row table:style-name="ro1">
          <table:table-cell office:value-type="float" office:value="337.471862792969">
            <text:p>337.471862793</text:p>
          </table:table-cell>
          <table:table-cell office:value-type="float" office:value="0.00384069">
            <text:p>0.00384069</text:p>
          </table:table-cell>
          <table:table-cell table:number-columns-repeated="4"/>
        </table:table-row>
        <table:table-row table:style-name="ro1">
          <table:table-cell office:value-type="float" office:value="337.580383300781">
            <text:p>337.5803833008</text:p>
          </table:table-cell>
          <table:table-cell office:value-type="float" office:value="-0.004208211">
            <text:p>-0.004208211</text:p>
          </table:table-cell>
          <table:table-cell table:number-columns-repeated="4"/>
        </table:table-row>
        <table:table-row table:style-name="ro1">
          <table:table-cell office:value-type="float" office:value="337.688934326172">
            <text:p>337.6889343262</text:p>
          </table:table-cell>
          <table:table-cell office:value-type="float" office:value="-0.001987321">
            <text:p>-0.001987321</text:p>
          </table:table-cell>
          <table:table-cell table:number-columns-repeated="4"/>
        </table:table-row>
        <table:table-row table:style-name="ro1">
          <table:table-cell office:value-type="float" office:value="337.797485351563">
            <text:p>337.7974853516</text:p>
          </table:table-cell>
          <table:table-cell office:value-type="float" office:value="-0.003915923">
            <text:p>-0.003915923</text:p>
          </table:table-cell>
          <table:table-cell table:number-columns-repeated="4"/>
        </table:table-row>
        <table:table-row table:style-name="ro1">
          <table:table-cell office:value-type="float" office:value="337.906036376953">
            <text:p>337.906036377</text:p>
          </table:table-cell>
          <table:table-cell office:value-type="float" office:value="-0.004057954">
            <text:p>-0.004057954</text:p>
          </table:table-cell>
          <table:table-cell table:number-columns-repeated="4"/>
        </table:table-row>
        <table:table-row table:style-name="ro1">
          <table:table-cell office:value-type="float" office:value="338.014617919922">
            <text:p>338.0146179199</text:p>
          </table:table-cell>
          <table:table-cell office:value-type="float" office:value="-0.003064738">
            <text:p>-0.003064738</text:p>
          </table:table-cell>
          <table:table-cell table:number-columns-repeated="4"/>
        </table:table-row>
        <table:table-row table:style-name="ro1">
          <table:table-cell office:value-type="float" office:value="338.123168945313">
            <text:p>338.1231689453</text:p>
          </table:table-cell>
          <table:table-cell office:value-type="float" office:value="0.01395726">
            <text:p>0.01395726</text:p>
          </table:table-cell>
          <table:table-cell table:number-columns-repeated="4"/>
        </table:table-row>
        <table:table-row table:style-name="ro1">
          <table:table-cell office:value-type="float" office:value="338.231750488281">
            <text:p>338.2317504883</text:p>
          </table:table-cell>
          <table:table-cell office:value-type="float" office:value="0.01142208">
            <text:p>0.01142208</text:p>
          </table:table-cell>
          <table:table-cell table:number-columns-repeated="4"/>
        </table:table-row>
        <table:table-row table:style-name="ro1">
          <table:table-cell office:value-type="float" office:value="338.340362548828">
            <text:p>338.3403625488</text:p>
          </table:table-cell>
          <table:table-cell office:value-type="float" office:value="-0.003342322">
            <text:p>-0.003342322</text:p>
          </table:table-cell>
          <table:table-cell table:number-columns-repeated="4"/>
        </table:table-row>
        <table:table-row table:style-name="ro1">
          <table:table-cell office:value-type="float" office:value="338.448944091797">
            <text:p>338.4489440918</text:p>
          </table:table-cell>
          <table:table-cell office:value-type="float" office:value="0.02771114">
            <text:p>0.02771114</text:p>
          </table:table-cell>
          <table:table-cell table:number-columns-repeated="4"/>
        </table:table-row>
        <table:table-row table:style-name="ro1">
          <table:table-cell office:value-type="float" office:value="338.557525634766">
            <text:p>338.5575256348</text:p>
          </table:table-cell>
          <table:table-cell office:value-type="float" office:value="0.005780423">
            <text:p>0.005780423</text:p>
          </table:table-cell>
          <table:table-cell table:number-columns-repeated="4"/>
        </table:table-row>
        <table:table-row table:style-name="ro1">
          <table:table-cell office:value-type="float" office:value="338.666137695313">
            <text:p>338.6661376953</text:p>
          </table:table-cell>
          <table:table-cell office:value-type="float" office:value="0.01274143">
            <text:p>0.01274143</text:p>
          </table:table-cell>
          <table:table-cell table:number-columns-repeated="4"/>
        </table:table-row>
        <table:table-row table:style-name="ro1">
          <table:table-cell office:value-type="float" office:value="338.774749755859">
            <text:p>338.7747497559</text:p>
          </table:table-cell>
          <table:table-cell office:value-type="float" office:value="-0.005441449">
            <text:p>-0.005441449</text:p>
          </table:table-cell>
          <table:table-cell table:number-columns-repeated="4"/>
        </table:table-row>
        <table:table-row table:style-name="ro1">
          <table:table-cell office:value-type="float" office:value="338.883392333984">
            <text:p>338.883392334</text:p>
          </table:table-cell>
          <table:table-cell office:value-type="float" office:value="-0.003833945">
            <text:p>-0.003833945</text:p>
          </table:table-cell>
          <table:table-cell table:number-columns-repeated="4"/>
        </table:table-row>
        <table:table-row table:style-name="ro1">
          <table:table-cell office:value-type="float" office:value="338.992004394531">
            <text:p>338.9920043945</text:p>
          </table:table-cell>
          <table:table-cell office:value-type="float" office:value="0.004372723">
            <text:p>0.004372723</text:p>
          </table:table-cell>
          <table:table-cell table:number-columns-repeated="4"/>
        </table:table-row>
        <table:table-row table:style-name="ro1">
          <table:table-cell office:value-type="float" office:value="339.100646972656">
            <text:p>339.1006469727</text:p>
          </table:table-cell>
          <table:table-cell office:value-type="float" office:value="0.009756417">
            <text:p>0.009756417</text:p>
          </table:table-cell>
          <table:table-cell table:number-columns-repeated="4"/>
        </table:table-row>
        <table:table-row table:style-name="ro1">
          <table:table-cell office:value-type="float" office:value="339.209289550781">
            <text:p>339.2092895508</text:p>
          </table:table-cell>
          <table:table-cell office:value-type="float" office:value="-0.006398049">
            <text:p>-0.006398049</text:p>
          </table:table-cell>
          <table:table-cell table:number-columns-repeated="4"/>
        </table:table-row>
        <table:table-row table:style-name="ro1">
          <table:table-cell office:value-type="float" office:value="339.317932128906">
            <text:p>339.3179321289</text:p>
          </table:table-cell>
          <table:table-cell office:value-type="float" office:value="0.01022647">
            <text:p>0.01022647</text:p>
          </table:table-cell>
          <table:table-cell table:number-columns-repeated="4"/>
        </table:table-row>
        <table:table-row table:style-name="ro1">
          <table:table-cell office:value-type="float" office:value="339.426574707031">
            <text:p>339.426574707</text:p>
          </table:table-cell>
          <table:table-cell office:value-type="float" office:value="0.002673184">
            <text:p>0.002673184</text:p>
          </table:table-cell>
          <table:table-cell table:number-columns-repeated="4"/>
        </table:table-row>
        <table:table-row table:style-name="ro1">
          <table:table-cell office:value-type="float" office:value="339.535247802734">
            <text:p>339.5352478027</text:p>
          </table:table-cell>
          <table:table-cell office:value-type="float" office:value="0.011356">
            <text:p>0.011356</text:p>
          </table:table-cell>
          <table:table-cell table:number-columns-repeated="4"/>
        </table:table-row>
        <table:table-row table:style-name="ro1">
          <table:table-cell office:value-type="float" office:value="339.643890380859">
            <text:p>339.6438903809</text:p>
          </table:table-cell>
          <table:table-cell office:value-type="float" office:value="0.003845691">
            <text:p>0.003845691</text:p>
          </table:table-cell>
          <table:table-cell table:number-columns-repeated="4"/>
        </table:table-row>
        <table:table-row table:style-name="ro1">
          <table:table-cell office:value-type="float" office:value="339.752563476563">
            <text:p>339.7525634766</text:p>
          </table:table-cell>
          <table:table-cell office:value-type="float" office:value="0.003825187">
            <text:p>0.003825187</text:p>
          </table:table-cell>
          <table:table-cell table:number-columns-repeated="4"/>
        </table:table-row>
        <table:table-row table:style-name="ro1">
          <table:table-cell office:value-type="float" office:value="339.861267089844">
            <text:p>339.8612670898</text:p>
          </table:table-cell>
          <table:table-cell office:value-type="float" office:value="0.000914744">
            <text:p>0.000914744</text:p>
          </table:table-cell>
          <table:table-cell table:number-columns-repeated="4"/>
        </table:table-row>
        <table:table-row table:style-name="ro1">
          <table:table-cell office:value-type="float" office:value="339.969940185547">
            <text:p>339.9699401855</text:p>
          </table:table-cell>
          <table:table-cell office:value-type="float" office:value="0.01834023">
            <text:p>0.01834023</text:p>
          </table:table-cell>
          <table:table-cell table:number-columns-repeated="4"/>
        </table:table-row>
        <table:table-row table:style-name="ro1">
          <table:table-cell office:value-type="float" office:value="340.078643798828">
            <text:p>340.0786437988</text:p>
          </table:table-cell>
          <table:table-cell office:value-type="float" office:value="0.002700691">
            <text:p>0.002700691</text:p>
          </table:table-cell>
          <table:table-cell table:number-columns-repeated="4"/>
        </table:table-row>
        <table:table-row table:style-name="ro1">
          <table:table-cell office:value-type="float" office:value="340.187347412109">
            <text:p>340.1873474121</text:p>
          </table:table-cell>
          <table:table-cell office:value-type="float" office:value="0.01953">
            <text:p>0.01953</text:p>
          </table:table-cell>
          <table:table-cell table:number-columns-repeated="4"/>
        </table:table-row>
        <table:table-row table:style-name="ro1">
          <table:table-cell office:value-type="float" office:value="340.296051025391">
            <text:p>340.2960510254</text:p>
          </table:table-cell>
          <table:table-cell office:value-type="float" office:value="0.006781118">
            <text:p>0.006781118</text:p>
          </table:table-cell>
          <table:table-cell table:number-columns-repeated="4"/>
        </table:table-row>
        <table:table-row table:style-name="ro1">
          <table:table-cell office:value-type="float" office:value="340.404754638672">
            <text:p>340.4047546387</text:p>
          </table:table-cell>
          <table:table-cell office:value-type="float" office:value="0.01005209">
            <text:p>0.01005209</text:p>
          </table:table-cell>
          <table:table-cell table:number-columns-repeated="4"/>
        </table:table-row>
        <table:table-row table:style-name="ro1">
          <table:table-cell office:value-type="float" office:value="340.513488769531">
            <text:p>340.5134887695</text:p>
          </table:table-cell>
          <table:table-cell office:value-type="float" office:value="-0.008872601">
            <text:p>-0.008872601</text:p>
          </table:table-cell>
          <table:table-cell table:number-columns-repeated="4"/>
        </table:table-row>
        <table:table-row table:style-name="ro1">
          <table:table-cell office:value-type="float" office:value="340.622192382813">
            <text:p>340.6221923828</text:p>
          </table:table-cell>
          <table:table-cell office:value-type="float" office:value="0.01936174">
            <text:p>0.01936174</text:p>
          </table:table-cell>
          <table:table-cell table:number-columns-repeated="4"/>
        </table:table-row>
        <table:table-row table:style-name="ro1">
          <table:table-cell office:value-type="float" office:value="340.730926513672">
            <text:p>340.7309265137</text:p>
          </table:table-cell>
          <table:table-cell office:value-type="float" office:value="0.01783326">
            <text:p>0.01783326</text:p>
          </table:table-cell>
          <table:table-cell table:number-columns-repeated="4"/>
        </table:table-row>
        <table:table-row table:style-name="ro1">
          <table:table-cell office:value-type="float" office:value="340.839660644531">
            <text:p>340.8396606445</text:p>
          </table:table-cell>
          <table:table-cell office:value-type="float" office:value="0.01610129">
            <text:p>0.01610129</text:p>
          </table:table-cell>
          <table:table-cell table:number-columns-repeated="4"/>
        </table:table-row>
        <table:table-row table:style-name="ro1">
          <table:table-cell office:value-type="float" office:value="340.948425292969">
            <text:p>340.948425293</text:p>
          </table:table-cell>
          <table:table-cell office:value-type="float" office:value="-0.004993203">
            <text:p>-0.004993203</text:p>
          </table:table-cell>
          <table:table-cell table:number-columns-repeated="4"/>
        </table:table-row>
        <table:table-row table:style-name="ro1">
          <table:table-cell office:value-type="float" office:value="341.057159423828">
            <text:p>341.0571594238</text:p>
          </table:table-cell>
          <table:table-cell office:value-type="float" office:value="-0.0006344151">
            <text:p>-0.0006344151</text:p>
          </table:table-cell>
          <table:table-cell table:number-columns-repeated="4"/>
        </table:table-row>
        <table:table-row table:style-name="ro1">
          <table:table-cell office:value-type="float" office:value="341.165924072266">
            <text:p>341.1659240723</text:p>
          </table:table-cell>
          <table:table-cell office:value-type="float" office:value="-0.003315707">
            <text:p>-0.003315707</text:p>
          </table:table-cell>
          <table:table-cell table:number-columns-repeated="4"/>
        </table:table-row>
        <table:table-row table:style-name="ro1">
          <table:table-cell office:value-type="float" office:value="341.274688720703">
            <text:p>341.2746887207</text:p>
          </table:table-cell>
          <table:table-cell office:value-type="float" office:value="-0.00409147">
            <text:p>-0.00409147</text:p>
          </table:table-cell>
          <table:table-cell table:number-columns-repeated="4"/>
        </table:table-row>
        <table:table-row table:style-name="ro1">
          <table:table-cell office:value-type="float" office:value="341.383483886719">
            <text:p>341.3834838867</text:p>
          </table:table-cell>
          <table:table-cell office:value-type="float" office:value="0.01670926">
            <text:p>0.01670926</text:p>
          </table:table-cell>
          <table:table-cell table:number-columns-repeated="4"/>
        </table:table-row>
        <table:table-row table:style-name="ro1">
          <table:table-cell office:value-type="float" office:value="341.492248535156">
            <text:p>341.4922485352</text:p>
          </table:table-cell>
          <table:table-cell office:value-type="float" office:value="0.005392701">
            <text:p>0.005392701</text:p>
          </table:table-cell>
          <table:table-cell table:number-columns-repeated="4"/>
        </table:table-row>
        <table:table-row table:style-name="ro1">
          <table:table-cell office:value-type="float" office:value="341.601043701172">
            <text:p>341.6010437012</text:p>
          </table:table-cell>
          <table:table-cell office:value-type="float" office:value="0.02565711">
            <text:p>0.02565711</text:p>
          </table:table-cell>
          <table:table-cell table:number-columns-repeated="4"/>
        </table:table-row>
        <table:table-row table:style-name="ro1">
          <table:table-cell office:value-type="float" office:value="341.709838867188">
            <text:p>341.7098388672</text:p>
          </table:table-cell>
          <table:table-cell office:value-type="float" office:value="0.02247977">
            <text:p>0.02247977</text:p>
          </table:table-cell>
          <table:table-cell table:number-columns-repeated="4"/>
        </table:table-row>
        <table:table-row table:style-name="ro1">
          <table:table-cell office:value-type="float" office:value="341.818634033203">
            <text:p>341.8186340332</text:p>
          </table:table-cell>
          <table:table-cell office:value-type="float" office:value="0.01603413">
            <text:p>0.01603413</text:p>
          </table:table-cell>
          <table:table-cell table:number-columns-repeated="4"/>
        </table:table-row>
        <table:table-row table:style-name="ro1">
          <table:table-cell office:value-type="float" office:value="341.927429199219">
            <text:p>341.9274291992</text:p>
          </table:table-cell>
          <table:table-cell office:value-type="float" office:value="-0.002863381">
            <text:p>-0.002863381</text:p>
          </table:table-cell>
          <table:table-cell table:number-columns-repeated="4"/>
        </table:table-row>
        <table:table-row table:style-name="ro1">
          <table:table-cell office:value-type="float" office:value="342.036254882813">
            <text:p>342.0362548828</text:p>
          </table:table-cell>
          <table:table-cell office:value-type="float" office:value="-0.003856553">
            <text:p>-0.003856553</text:p>
          </table:table-cell>
          <table:table-cell table:number-columns-repeated="4"/>
        </table:table-row>
        <table:table-row table:style-name="ro1">
          <table:table-cell office:value-type="float" office:value="342.145080566406">
            <text:p>342.1450805664</text:p>
          </table:table-cell>
          <table:table-cell office:value-type="string">
            <text:p>1.334614E-05</text:p>
          </table:table-cell>
          <table:table-cell table:number-columns-repeated="4"/>
        </table:table-row>
        <table:table-row table:style-name="ro1">
          <table:table-cell office:value-type="float" office:value="342.25390625">
            <text:p>342.25390625</text:p>
          </table:table-cell>
          <table:table-cell office:value-type="float" office:value="0.01086032">
            <text:p>0.01086032</text:p>
          </table:table-cell>
          <table:table-cell table:number-columns-repeated="4"/>
        </table:table-row>
        <table:table-row table:style-name="ro1">
          <table:table-cell office:value-type="float" office:value="342.362731933594">
            <text:p>342.3627319336</text:p>
          </table:table-cell>
          <table:table-cell office:value-type="float" office:value="0.005084153">
            <text:p>0.005084153</text:p>
          </table:table-cell>
          <table:table-cell table:number-columns-repeated="4"/>
        </table:table-row>
        <table:table-row table:style-name="ro1">
          <table:table-cell office:value-type="float" office:value="342.471557617188">
            <text:p>342.4715576172</text:p>
          </table:table-cell>
          <table:table-cell office:value-type="float" office:value="-0.001295825">
            <text:p>-0.001295825</text:p>
          </table:table-cell>
          <table:table-cell table:number-columns-repeated="4"/>
        </table:table-row>
        <table:table-row table:style-name="ro1">
          <table:table-cell office:value-type="float" office:value="342.580413818359">
            <text:p>342.5804138184</text:p>
          </table:table-cell>
          <table:table-cell office:value-type="float" office:value="0.0123319">
            <text:p>0.0123319</text:p>
          </table:table-cell>
          <table:table-cell table:number-columns-repeated="4"/>
        </table:table-row>
        <table:table-row table:style-name="ro1">
          <table:table-cell office:value-type="float" office:value="342.689270019531">
            <text:p>342.6892700195</text:p>
          </table:table-cell>
          <table:table-cell office:value-type="float" office:value="-0.004852014">
            <text:p>-0.004852014</text:p>
          </table:table-cell>
          <table:table-cell table:number-columns-repeated="4"/>
        </table:table-row>
        <table:table-row table:style-name="ro1">
          <table:table-cell office:value-type="float" office:value="342.798126220703">
            <text:p>342.7981262207</text:p>
          </table:table-cell>
          <table:table-cell office:value-type="float" office:value="0.007764582">
            <text:p>0.007764582</text:p>
          </table:table-cell>
          <table:table-cell table:number-columns-repeated="4"/>
        </table:table-row>
        <table:table-row table:style-name="ro1">
          <table:table-cell office:value-type="float" office:value="342.906982421875">
            <text:p>342.9069824219</text:p>
          </table:table-cell>
          <table:table-cell office:value-type="float" office:value="0.01687169">
            <text:p>0.01687169</text:p>
          </table:table-cell>
          <table:table-cell table:number-columns-repeated="4"/>
        </table:table-row>
        <table:table-row table:style-name="ro1">
          <table:table-cell office:value-type="float" office:value="343.015869140625">
            <text:p>343.0158691406</text:p>
          </table:table-cell>
          <table:table-cell office:value-type="float" office:value="0.01398803">
            <text:p>0.01398803</text:p>
          </table:table-cell>
          <table:table-cell table:number-columns-repeated="4"/>
        </table:table-row>
        <table:table-row table:style-name="ro1">
          <table:table-cell office:value-type="float" office:value="343.124755859375">
            <text:p>343.1247558594</text:p>
          </table:table-cell>
          <table:table-cell office:value-type="float" office:value="-0.003748186">
            <text:p>-0.003748186</text:p>
          </table:table-cell>
          <table:table-cell table:number-columns-repeated="4"/>
        </table:table-row>
        <table:table-row table:style-name="ro1">
          <table:table-cell office:value-type="float" office:value="343.233642578125">
            <text:p>343.2336425781</text:p>
          </table:table-cell>
          <table:table-cell office:value-type="float" office:value="-0.008463713">
            <text:p>-0.008463713</text:p>
          </table:table-cell>
          <table:table-cell table:number-columns-repeated="4"/>
        </table:table-row>
        <table:table-row table:style-name="ro1">
          <table:table-cell office:value-type="float" office:value="343.342529296875">
            <text:p>343.3425292969</text:p>
          </table:table-cell>
          <table:table-cell office:value-type="float" office:value="0.00930139">
            <text:p>0.00930139</text:p>
          </table:table-cell>
          <table:table-cell table:number-columns-repeated="4"/>
        </table:table-row>
        <table:table-row table:style-name="ro1">
          <table:table-cell office:value-type="float" office:value="343.451416015625">
            <text:p>343.4514160156</text:p>
          </table:table-cell>
          <table:table-cell office:value-type="float" office:value="0.0008683359">
            <text:p>0.0008683359</text:p>
          </table:table-cell>
          <table:table-cell table:number-columns-repeated="4"/>
        </table:table-row>
        <table:table-row table:style-name="ro1">
          <table:table-cell office:value-type="float" office:value="343.560333251953">
            <text:p>343.560333252</text:p>
          </table:table-cell>
          <table:table-cell office:value-type="float" office:value="-0.003622347">
            <text:p>-0.003622347</text:p>
          </table:table-cell>
          <table:table-cell table:number-columns-repeated="4"/>
        </table:table-row>
        <table:table-row table:style-name="ro1">
          <table:table-cell office:value-type="float" office:value="343.669250488281">
            <text:p>343.6692504883</text:p>
          </table:table-cell>
          <table:table-cell office:value-type="float" office:value="-0.00472965">
            <text:p>-0.00472965</text:p>
          </table:table-cell>
          <table:table-cell table:number-columns-repeated="4"/>
        </table:table-row>
        <table:table-row table:style-name="ro1">
          <table:table-cell office:value-type="float" office:value="343.778167724609">
            <text:p>343.7781677246</text:p>
          </table:table-cell>
          <table:table-cell office:value-type="float" office:value="0.001313301">
            <text:p>0.001313301</text:p>
          </table:table-cell>
          <table:table-cell table:number-columns-repeated="4"/>
        </table:table-row>
        <table:table-row table:style-name="ro1">
          <table:table-cell office:value-type="float" office:value="343.887084960938">
            <text:p>343.8870849609</text:p>
          </table:table-cell>
          <table:table-cell office:value-type="float" office:value="0.004737688">
            <text:p>0.004737688</text:p>
          </table:table-cell>
          <table:table-cell table:number-columns-repeated="4"/>
        </table:table-row>
        <table:table-row table:style-name="ro1">
          <table:table-cell office:value-type="float" office:value="343.996032714844">
            <text:p>343.9960327148</text:p>
          </table:table-cell>
          <table:table-cell office:value-type="float" office:value="-0.00914552">
            <text:p>-0.00914552</text:p>
          </table:table-cell>
          <table:table-cell table:number-columns-repeated="4"/>
        </table:table-row>
        <table:table-row table:style-name="ro1">
          <table:table-cell office:value-type="float" office:value="344.104949951172">
            <text:p>344.1049499512</text:p>
          </table:table-cell>
          <table:table-cell office:value-type="float" office:value="0.01173625">
            <text:p>0.01173625</text:p>
          </table:table-cell>
          <table:table-cell table:number-columns-repeated="4"/>
        </table:table-row>
        <table:table-row table:style-name="ro1">
          <table:table-cell office:value-type="float" office:value="344.213897705078">
            <text:p>344.2138977051</text:p>
          </table:table-cell>
          <table:table-cell office:value-type="float" office:value="-0.003591526">
            <text:p>-0.003591526</text:p>
          </table:table-cell>
          <table:table-cell table:number-columns-repeated="4"/>
        </table:table-row>
        <table:table-row table:style-name="ro1">
          <table:table-cell office:value-type="float" office:value="344.322845458984">
            <text:p>344.322845459</text:p>
          </table:table-cell>
          <table:table-cell office:value-type="float" office:value="0.005863679">
            <text:p>0.005863679</text:p>
          </table:table-cell>
          <table:table-cell table:number-columns-repeated="4"/>
        </table:table-row>
        <table:table-row table:style-name="ro1">
          <table:table-cell office:value-type="float" office:value="344.431823730469">
            <text:p>344.4318237305</text:p>
          </table:table-cell>
          <table:table-cell office:value-type="float" office:value="-0.004589058">
            <text:p>-0.004589058</text:p>
          </table:table-cell>
          <table:table-cell table:number-columns-repeated="4"/>
        </table:table-row>
        <table:table-row table:style-name="ro1">
          <table:table-cell office:value-type="float" office:value="344.540771484375">
            <text:p>344.5407714844</text:p>
          </table:table-cell>
          <table:table-cell office:value-type="float" office:value="-0.000172201">
            <text:p>-0.000172201</text:p>
          </table:table-cell>
          <table:table-cell table:number-columns-repeated="4"/>
        </table:table-row>
        <table:table-row table:style-name="ro1">
          <table:table-cell office:value-type="float" office:value="344.649749755859">
            <text:p>344.6497497559</text:p>
          </table:table-cell>
          <table:table-cell office:value-type="float" office:value="-0.001066068">
            <text:p>-0.001066068</text:p>
          </table:table-cell>
          <table:table-cell table:number-columns-repeated="4"/>
        </table:table-row>
        <table:table-row table:style-name="ro1">
          <table:table-cell office:value-type="float" office:value="344.758728027344">
            <text:p>344.7587280273</text:p>
          </table:table-cell>
          <table:table-cell office:value-type="float" office:value="-0.000650095">
            <text:p>-0.000650095</text:p>
          </table:table-cell>
          <table:table-cell table:number-columns-repeated="4"/>
        </table:table-row>
        <table:table-row table:style-name="ro1">
          <table:table-cell office:value-type="float" office:value="344.867706298828">
            <text:p>344.8677062988</text:p>
          </table:table-cell>
          <table:table-cell office:value-type="float" office:value="0.007173341">
            <text:p>0.007173341</text:p>
          </table:table-cell>
          <table:table-cell table:number-columns-repeated="4"/>
        </table:table-row>
        <table:table-row table:style-name="ro1">
          <table:table-cell office:value-type="float" office:value="344.976715087891">
            <text:p>344.9767150879</text:p>
          </table:table-cell>
          <table:table-cell office:value-type="float" office:value="0.01246131">
            <text:p>0.01246131</text:p>
          </table:table-cell>
          <table:table-cell table:number-columns-repeated="4"/>
        </table:table-row>
        <table:table-row table:style-name="ro1">
          <table:table-cell office:value-type="float" office:value="345.085723876953">
            <text:p>345.085723877</text:p>
          </table:table-cell>
          <table:table-cell office:value-type="float" office:value="-0.002455279">
            <text:p>-0.002455279</text:p>
          </table:table-cell>
          <table:table-cell table:number-columns-repeated="4"/>
        </table:table-row>
        <table:table-row table:style-name="ro1">
          <table:table-cell office:value-type="float" office:value="345.194702148438">
            <text:p>345.1947021484</text:p>
          </table:table-cell>
          <table:table-cell office:value-type="float" office:value="0.001180184">
            <text:p>0.001180184</text:p>
          </table:table-cell>
          <table:table-cell table:number-columns-repeated="4"/>
        </table:table-row>
        <table:table-row table:style-name="ro1">
          <table:table-cell office:value-type="float" office:value="345.303741455078">
            <text:p>345.3037414551</text:p>
          </table:table-cell>
          <table:table-cell office:value-type="float" office:value="0.02593255">
            <text:p>0.02593255</text:p>
          </table:table-cell>
          <table:table-cell table:number-columns-repeated="4"/>
        </table:table-row>
        <table:table-row table:style-name="ro1">
          <table:table-cell office:value-type="float" office:value="345.412750244141">
            <text:p>345.4127502441</text:p>
          </table:table-cell>
          <table:table-cell office:value-type="float" office:value="-0.008131742">
            <text:p>-0.008131742</text:p>
          </table:table-cell>
          <table:table-cell table:number-columns-repeated="4"/>
        </table:table-row>
        <table:table-row table:style-name="ro1">
          <table:table-cell office:value-type="float" office:value="345.521759033203">
            <text:p>345.5217590332</text:p>
          </table:table-cell>
          <table:table-cell office:value-type="float" office:value="-0.005888058">
            <text:p>-0.005888058</text:p>
          </table:table-cell>
          <table:table-cell table:number-columns-repeated="4"/>
        </table:table-row>
        <table:table-row table:style-name="ro1">
          <table:table-cell office:value-type="float" office:value="345.630798339844">
            <text:p>345.6307983398</text:p>
          </table:table-cell>
          <table:table-cell office:value-type="float" office:value="0.003170025">
            <text:p>0.003170025</text:p>
          </table:table-cell>
          <table:table-cell table:number-columns-repeated="4"/>
        </table:table-row>
        <table:table-row table:style-name="ro1">
          <table:table-cell office:value-type="float" office:value="345.739837646484">
            <text:p>345.7398376465</text:p>
          </table:table-cell>
          <table:table-cell office:value-type="float" office:value="-0.001661021">
            <text:p>-0.001661021</text:p>
          </table:table-cell>
          <table:table-cell table:number-columns-repeated="4"/>
        </table:table-row>
        <table:table-row table:style-name="ro1">
          <table:table-cell office:value-type="float" office:value="345.848876953125">
            <text:p>345.8488769531</text:p>
          </table:table-cell>
          <table:table-cell office:value-type="float" office:value="0.01216763">
            <text:p>0.01216763</text:p>
          </table:table-cell>
          <table:table-cell table:number-columns-repeated="4"/>
        </table:table-row>
        <table:table-row table:style-name="ro1">
          <table:table-cell office:value-type="float" office:value="345.957946777344">
            <text:p>345.9579467773</text:p>
          </table:table-cell>
          <table:table-cell office:value-type="float" office:value="0.01316724">
            <text:p>0.01316724</text:p>
          </table:table-cell>
          <table:table-cell table:number-columns-repeated="4"/>
        </table:table-row>
        <table:table-row table:style-name="ro1">
          <table:table-cell office:value-type="float" office:value="346.066986083984">
            <text:p>346.066986084</text:p>
          </table:table-cell>
          <table:table-cell office:value-type="float" office:value="-0.002377728">
            <text:p>-0.002377728</text:p>
          </table:table-cell>
          <table:table-cell table:number-columns-repeated="4"/>
        </table:table-row>
        <table:table-row table:style-name="ro1">
          <table:table-cell office:value-type="float" office:value="346.176055908203">
            <text:p>346.1760559082</text:p>
          </table:table-cell>
          <table:table-cell office:value-type="float" office:value="-0.003578552">
            <text:p>-0.003578552</text:p>
          </table:table-cell>
          <table:table-cell table:number-columns-repeated="4"/>
        </table:table-row>
        <table:table-row table:style-name="ro1">
          <table:table-cell office:value-type="float" office:value="346.285125732422">
            <text:p>346.2851257324</text:p>
          </table:table-cell>
          <table:table-cell office:value-type="float" office:value="-0.005670476">
            <text:p>-0.005670476</text:p>
          </table:table-cell>
          <table:table-cell table:number-columns-repeated="4"/>
        </table:table-row>
        <table:table-row table:style-name="ro1">
          <table:table-cell office:value-type="float" office:value="346.394195556641">
            <text:p>346.3941955566</text:p>
          </table:table-cell>
          <table:table-cell office:value-type="float" office:value="0.002377783">
            <text:p>0.002377783</text:p>
          </table:table-cell>
          <table:table-cell table:number-columns-repeated="4"/>
        </table:table-row>
        <table:table-row table:style-name="ro1">
          <table:table-cell office:value-type="float" office:value="346.503295898438">
            <text:p>346.5032958984</text:p>
          </table:table-cell>
          <table:table-cell office:value-type="float" office:value="-0.003058136">
            <text:p>-0.003058136</text:p>
          </table:table-cell>
          <table:table-cell table:number-columns-repeated="4"/>
        </table:table-row>
        <table:table-row table:style-name="ro1">
          <table:table-cell office:value-type="float" office:value="346.612365722656">
            <text:p>346.6123657227</text:p>
          </table:table-cell>
          <table:table-cell office:value-type="float" office:value="-0.00421227">
            <text:p>-0.00421227</text:p>
          </table:table-cell>
          <table:table-cell table:number-columns-repeated="4"/>
        </table:table-row>
        <table:table-row table:style-name="ro1">
          <table:table-cell office:value-type="float" office:value="346.721466064453">
            <text:p>346.7214660645</text:p>
          </table:table-cell>
          <table:table-cell office:value-type="float" office:value="0.001294601">
            <text:p>0.001294601</text:p>
          </table:table-cell>
          <table:table-cell table:number-columns-repeated="4"/>
        </table:table-row>
        <table:table-row table:style-name="ro1">
          <table:table-cell office:value-type="float" office:value="346.83056640625">
            <text:p>346.8305664063</text:p>
          </table:table-cell>
          <table:table-cell office:value-type="float" office:value="0.01209687">
            <text:p>0.01209687</text:p>
          </table:table-cell>
          <table:table-cell table:number-columns-repeated="4"/>
        </table:table-row>
        <table:table-row table:style-name="ro1">
          <table:table-cell office:value-type="float" office:value="346.939697265625">
            <text:p>346.9396972656</text:p>
          </table:table-cell>
          <table:table-cell office:value-type="float" office:value="0.03294386">
            <text:p>0.03294386</text:p>
          </table:table-cell>
          <table:table-cell table:number-columns-repeated="4"/>
        </table:table-row>
        <table:table-row table:style-name="ro1">
          <table:table-cell office:value-type="float" office:value="347.048797607422">
            <text:p>347.0487976074</text:p>
          </table:table-cell>
          <table:table-cell office:value-type="float" office:value="-0.01041888">
            <text:p>-0.01041888</text:p>
          </table:table-cell>
          <table:table-cell table:number-columns-repeated="4"/>
        </table:table-row>
        <table:table-row table:style-name="ro1">
          <table:table-cell office:value-type="float" office:value="347.157928466797">
            <text:p>347.1579284668</text:p>
          </table:table-cell>
          <table:table-cell office:value-type="float" office:value="-0.009216577">
            <text:p>-0.009216577</text:p>
          </table:table-cell>
          <table:table-cell table:number-columns-repeated="4"/>
        </table:table-row>
        <table:table-row table:style-name="ro1">
          <table:table-cell office:value-type="float" office:value="347.267059326172">
            <text:p>347.2670593262</text:p>
          </table:table-cell>
          <table:table-cell office:value-type="float" office:value="0.003662059">
            <text:p>0.003662059</text:p>
          </table:table-cell>
          <table:table-cell table:number-columns-repeated="4"/>
        </table:table-row>
        <table:table-row table:style-name="ro1">
          <table:table-cell office:value-type="float" office:value="347.376190185547">
            <text:p>347.3761901855</text:p>
          </table:table-cell>
          <table:table-cell office:value-type="float" office:value="-0.0031543">
            <text:p>-0.0031543</text:p>
          </table:table-cell>
          <table:table-cell table:number-columns-repeated="4"/>
        </table:table-row>
        <table:table-row table:style-name="ro1">
          <table:table-cell office:value-type="float" office:value="347.4853515625">
            <text:p>347.4853515625</text:p>
          </table:table-cell>
          <table:table-cell office:value-type="float" office:value="0.005884662">
            <text:p>0.005884662</text:p>
          </table:table-cell>
          <table:table-cell table:number-columns-repeated="4"/>
        </table:table-row>
        <table:table-row table:style-name="ro1">
          <table:table-cell office:value-type="float" office:value="347.594482421875">
            <text:p>347.5944824219</text:p>
          </table:table-cell>
          <table:table-cell office:value-type="float" office:value="-0.0139939">
            <text:p>-0.0139939</text:p>
          </table:table-cell>
          <table:table-cell table:number-columns-repeated="4"/>
        </table:table-row>
        <table:table-row table:style-name="ro1">
          <table:table-cell office:value-type="float" office:value="347.703643798828">
            <text:p>347.7036437988</text:p>
          </table:table-cell>
          <table:table-cell office:value-type="float" office:value="0.00370709">
            <text:p>0.00370709</text:p>
          </table:table-cell>
          <table:table-cell table:number-columns-repeated="4"/>
        </table:table-row>
        <table:table-row table:style-name="ro1">
          <table:table-cell office:value-type="float" office:value="347.812805175781">
            <text:p>347.8128051758</text:p>
          </table:table-cell>
          <table:table-cell office:value-type="float" office:value="-0.002814739">
            <text:p>-0.002814739</text:p>
          </table:table-cell>
          <table:table-cell table:number-columns-repeated="4"/>
        </table:table-row>
        <table:table-row table:style-name="ro1">
          <table:table-cell office:value-type="float" office:value="347.921966552734">
            <text:p>347.9219665527</text:p>
          </table:table-cell>
          <table:table-cell office:value-type="float" office:value="0.002225375">
            <text:p>0.002225375</text:p>
          </table:table-cell>
          <table:table-cell table:number-columns-repeated="4"/>
        </table:table-row>
        <table:table-row table:style-name="ro1">
          <table:table-cell office:value-type="float" office:value="348.031158447266">
            <text:p>348.0311584473</text:p>
          </table:table-cell>
          <table:table-cell office:value-type="float" office:value="0.00773779">
            <text:p>0.00773779</text:p>
          </table:table-cell>
          <table:table-cell table:number-columns-repeated="4"/>
        </table:table-row>
        <table:table-row table:style-name="ro1">
          <table:table-cell office:value-type="float" office:value="348.140319824219">
            <text:p>348.1403198242</text:p>
          </table:table-cell>
          <table:table-cell office:value-type="float" office:value="0.0007251935">
            <text:p>0.0007251935</text:p>
          </table:table-cell>
          <table:table-cell table:number-columns-repeated="4"/>
        </table:table-row>
        <table:table-row table:style-name="ro1">
          <table:table-cell office:value-type="float" office:value="348.24951171875">
            <text:p>348.2495117188</text:p>
          </table:table-cell>
          <table:table-cell office:value-type="float" office:value="0.01364448">
            <text:p>0.01364448</text:p>
          </table:table-cell>
          <table:table-cell table:number-columns-repeated="4"/>
        </table:table-row>
        <table:table-row table:style-name="ro1">
          <table:table-cell office:value-type="float" office:value="348.358703613281">
            <text:p>348.3587036133</text:p>
          </table:table-cell>
          <table:table-cell office:value-type="float" office:value="-0.009857673">
            <text:p>-0.009857673</text:p>
          </table:table-cell>
          <table:table-cell table:number-columns-repeated="4"/>
        </table:table-row>
        <table:table-row table:style-name="ro1">
          <table:table-cell office:value-type="float" office:value="348.467926025391">
            <text:p>348.4679260254</text:p>
          </table:table-cell>
          <table:table-cell office:value-type="float" office:value="-0.0005193047">
            <text:p>-0.0005193047</text:p>
          </table:table-cell>
          <table:table-cell table:number-columns-repeated="4"/>
        </table:table-row>
        <table:table-row table:style-name="ro1">
          <table:table-cell office:value-type="float" office:value="348.577117919922">
            <text:p>348.5771179199</text:p>
          </table:table-cell>
          <table:table-cell office:value-type="float" office:value="-0.002439462">
            <text:p>-0.002439462</text:p>
          </table:table-cell>
          <table:table-cell table:number-columns-repeated="4"/>
        </table:table-row>
        <table:table-row table:style-name="ro1">
          <table:table-cell office:value-type="float" office:value="348.686340332031">
            <text:p>348.686340332</text:p>
          </table:table-cell>
          <table:table-cell office:value-type="float" office:value="0.02241722">
            <text:p>0.02241722</text:p>
          </table:table-cell>
          <table:table-cell table:number-columns-repeated="4"/>
        </table:table-row>
        <table:table-row table:style-name="ro1">
          <table:table-cell office:value-type="float" office:value="348.795562744141">
            <text:p>348.7955627441</text:p>
          </table:table-cell>
          <table:table-cell office:value-type="float" office:value="-0.0004716374">
            <text:p>-0.0004716374</text:p>
          </table:table-cell>
          <table:table-cell table:number-columns-repeated="4"/>
        </table:table-row>
        <table:table-row table:style-name="ro1">
          <table:table-cell office:value-type="float" office:value="348.90478515625">
            <text:p>348.9047851563</text:p>
          </table:table-cell>
          <table:table-cell office:value-type="float" office:value="0.00506539">
            <text:p>0.00506539</text:p>
          </table:table-cell>
          <table:table-cell table:number-columns-repeated="4"/>
        </table:table-row>
        <table:table-row table:style-name="ro1">
          <table:table-cell office:value-type="float" office:value="349.014038085938">
            <text:p>349.0140380859</text:p>
          </table:table-cell>
          <table:table-cell office:value-type="float" office:value="0.000529697">
            <text:p>0.000529697</text:p>
          </table:table-cell>
          <table:table-cell table:number-columns-repeated="4"/>
        </table:table-row>
        <table:table-row table:style-name="ro1">
          <table:table-cell office:value-type="float" office:value="349.123260498047">
            <text:p>349.123260498</text:p>
          </table:table-cell>
          <table:table-cell office:value-type="float" office:value="0.01160809">
            <text:p>0.01160809</text:p>
          </table:table-cell>
          <table:table-cell table:number-columns-repeated="4"/>
        </table:table-row>
        <table:table-row table:style-name="ro1">
          <table:table-cell office:value-type="float" office:value="349.232513427734">
            <text:p>349.2325134277</text:p>
          </table:table-cell>
          <table:table-cell office:value-type="float" office:value="-0.009790742">
            <text:p>-0.009790742</text:p>
          </table:table-cell>
          <table:table-cell table:number-columns-repeated="4"/>
        </table:table-row>
        <table:table-row table:style-name="ro1">
          <table:table-cell office:value-type="float" office:value="349.341766357422">
            <text:p>349.3417663574</text:p>
          </table:table-cell>
          <table:table-cell office:value-type="float" office:value="-0.01082264">
            <text:p>-0.01082264</text:p>
          </table:table-cell>
          <table:table-cell table:number-columns-repeated="4"/>
        </table:table-row>
        <table:table-row table:style-name="ro1">
          <table:table-cell office:value-type="float" office:value="349.451019287109">
            <text:p>349.4510192871</text:p>
          </table:table-cell>
          <table:table-cell office:value-type="float" office:value="0.01013522">
            <text:p>0.01013522</text:p>
          </table:table-cell>
          <table:table-cell table:number-columns-repeated="4"/>
        </table:table-row>
        <table:table-row table:style-name="ro1">
          <table:table-cell office:value-type="float" office:value="349.560302734375">
            <text:p>349.5603027344</text:p>
          </table:table-cell>
          <table:table-cell office:value-type="float" office:value="0.002953525">
            <text:p>0.002953525</text:p>
          </table:table-cell>
          <table:table-cell table:number-columns-repeated="4"/>
        </table:table-row>
        <table:table-row table:style-name="ro1">
          <table:table-cell office:value-type="float" office:value="349.669586181641">
            <text:p>349.6695861816</text:p>
          </table:table-cell>
          <table:table-cell office:value-type="float" office:value="-0.007606929">
            <text:p>-0.007606929</text:p>
          </table:table-cell>
          <table:table-cell table:number-columns-repeated="4"/>
        </table:table-row>
        <table:table-row table:style-name="ro1">
          <table:table-cell office:value-type="float" office:value="349.778839111328">
            <text:p>349.7788391113</text:p>
          </table:table-cell>
          <table:table-cell office:value-type="float" office:value="-0.00521013">
            <text:p>-0.00521013</text:p>
          </table:table-cell>
          <table:table-cell table:number-columns-repeated="4"/>
        </table:table-row>
        <table:table-row table:style-name="ro1">
          <table:table-cell office:value-type="float" office:value="349.888153076172">
            <text:p>349.8881530762</text:p>
          </table:table-cell>
          <table:table-cell office:value-type="float" office:value="0.01505024">
            <text:p>0.01505024</text:p>
          </table:table-cell>
          <table:table-cell table:number-columns-repeated="4"/>
        </table:table-row>
        <table:table-row table:style-name="ro1">
          <table:table-cell office:value-type="float" office:value="349.997436523438">
            <text:p>349.9974365234</text:p>
          </table:table-cell>
          <table:table-cell office:value-type="float" office:value="0.01126092">
            <text:p>0.01126092</text:p>
          </table:table-cell>
          <table:table-cell table:number-columns-repeated="4"/>
        </table:table-row>
        <table:table-row table:style-name="ro1">
          <table:table-cell office:value-type="float" office:value="350.106719970703">
            <text:p>350.1067199707</text:p>
          </table:table-cell>
          <table:table-cell office:value-type="float" office:value="0.01046502">
            <text:p>0.01046502</text:p>
          </table:table-cell>
          <table:table-cell table:number-columns-repeated="4"/>
        </table:table-row>
        <table:table-row table:style-name="ro1">
          <table:table-cell office:value-type="float" office:value="350.216033935547">
            <text:p>350.2160339355</text:p>
          </table:table-cell>
          <table:table-cell office:value-type="float" office:value="-0.008898764">
            <text:p>-0.008898764</text:p>
          </table:table-cell>
          <table:table-cell table:number-columns-repeated="4"/>
        </table:table-row>
        <table:table-row table:style-name="ro1">
          <table:table-cell office:value-type="float" office:value="350.325347900391">
            <text:p>350.3253479004</text:p>
          </table:table-cell>
          <table:table-cell office:value-type="float" office:value="-0.002573405">
            <text:p>-0.002573405</text:p>
          </table:table-cell>
          <table:table-cell table:number-columns-repeated="4"/>
        </table:table-row>
        <table:table-row table:style-name="ro1">
          <table:table-cell office:value-type="float" office:value="350.434661865234">
            <text:p>350.4346618652</text:p>
          </table:table-cell>
          <table:table-cell office:value-type="float" office:value="0.004413533">
            <text:p>0.004413533</text:p>
          </table:table-cell>
          <table:table-cell table:number-columns-repeated="4"/>
        </table:table-row>
        <table:table-row table:style-name="ro1">
          <table:table-cell office:value-type="float" office:value="350.544006347656">
            <text:p>350.5440063477</text:p>
          </table:table-cell>
          <table:table-cell office:value-type="float" office:value="0.003342028">
            <text:p>0.003342028</text:p>
          </table:table-cell>
          <table:table-cell table:number-columns-repeated="4"/>
        </table:table-row>
        <table:table-row table:style-name="ro1">
          <table:table-cell office:value-type="float" office:value="350.6533203125">
            <text:p>350.6533203125</text:p>
          </table:table-cell>
          <table:table-cell office:value-type="float" office:value="0.005232882">
            <text:p>0.005232882</text:p>
          </table:table-cell>
          <table:table-cell table:number-columns-repeated="4"/>
        </table:table-row>
        <table:table-row table:style-name="ro1">
          <table:table-cell office:value-type="float" office:value="350.762664794922">
            <text:p>350.7626647949</text:p>
          </table:table-cell>
          <table:table-cell office:value-type="float" office:value="0.004532626">
            <text:p>0.004532626</text:p>
          </table:table-cell>
          <table:table-cell table:number-columns-repeated="4"/>
        </table:table-row>
        <table:table-row table:style-name="ro1">
          <table:table-cell office:value-type="float" office:value="350.872009277344">
            <text:p>350.8720092773</text:p>
          </table:table-cell>
          <table:table-cell office:value-type="float" office:value="0.01493654">
            <text:p>0.01493654</text:p>
          </table:table-cell>
          <table:table-cell table:number-columns-repeated="4"/>
        </table:table-row>
        <table:table-row table:style-name="ro1">
          <table:table-cell office:value-type="float" office:value="350.981353759766">
            <text:p>350.9813537598</text:p>
          </table:table-cell>
          <table:table-cell office:value-type="float" office:value="-0.01185334">
            <text:p>-0.01185334</text:p>
          </table:table-cell>
          <table:table-cell table:number-columns-repeated="4"/>
        </table:table-row>
        <table:table-row table:style-name="ro1">
          <table:table-cell office:value-type="float" office:value="351.090728759766">
            <text:p>351.0907287598</text:p>
          </table:table-cell>
          <table:table-cell office:value-type="float" office:value="0.004044461">
            <text:p>0.004044461</text:p>
          </table:table-cell>
          <table:table-cell table:number-columns-repeated="4"/>
        </table:table-row>
        <table:table-row table:style-name="ro1">
          <table:table-cell office:value-type="float" office:value="351.200073242188">
            <text:p>351.2000732422</text:p>
          </table:table-cell>
          <table:table-cell office:value-type="float" office:value="0.002320279">
            <text:p>0.002320279</text:p>
          </table:table-cell>
          <table:table-cell table:number-columns-repeated="4"/>
        </table:table-row>
        <table:table-row table:style-name="ro1">
          <table:table-cell office:value-type="float" office:value="351.309448242188">
            <text:p>351.3094482422</text:p>
          </table:table-cell>
          <table:table-cell office:value-type="float" office:value="0.0124245">
            <text:p>0.0124245</text:p>
          </table:table-cell>
          <table:table-cell table:number-columns-repeated="4"/>
        </table:table-row>
        <table:table-row table:style-name="ro1">
          <table:table-cell office:value-type="float" office:value="351.418823242188">
            <text:p>351.4188232422</text:p>
          </table:table-cell>
          <table:table-cell office:value-type="float" office:value="0.01008872">
            <text:p>0.01008872</text:p>
          </table:table-cell>
          <table:table-cell table:number-columns-repeated="4"/>
        </table:table-row>
        <table:table-row table:style-name="ro1">
          <table:table-cell office:value-type="float" office:value="351.528228759766">
            <text:p>351.5282287598</text:p>
          </table:table-cell>
          <table:table-cell office:value-type="float" office:value="-0.01075889">
            <text:p>-0.01075889</text:p>
          </table:table-cell>
          <table:table-cell table:number-columns-repeated="4"/>
        </table:table-row>
        <table:table-row table:style-name="ro1">
          <table:table-cell office:value-type="float" office:value="351.637603759766">
            <text:p>351.6376037598</text:p>
          </table:table-cell>
          <table:table-cell office:value-type="float" office:value="0.01113063">
            <text:p>0.01113063</text:p>
          </table:table-cell>
          <table:table-cell table:number-columns-repeated="4"/>
        </table:table-row>
        <table:table-row table:style-name="ro1">
          <table:table-cell office:value-type="float" office:value="351.747009277344">
            <text:p>351.7470092773</text:p>
          </table:table-cell>
          <table:table-cell office:value-type="float" office:value="0.001292304">
            <text:p>0.001292304</text:p>
          </table:table-cell>
          <table:table-cell table:number-columns-repeated="4"/>
        </table:table-row>
        <table:table-row table:style-name="ro1">
          <table:table-cell office:value-type="float" office:value="351.856414794922">
            <text:p>351.8564147949</text:p>
          </table:table-cell>
          <table:table-cell office:value-type="float" office:value="-0.01064545">
            <text:p>-0.01064545</text:p>
          </table:table-cell>
          <table:table-cell table:number-columns-repeated="4"/>
        </table:table-row>
        <table:table-row table:style-name="ro1">
          <table:table-cell office:value-type="float" office:value="351.9658203125">
            <text:p>351.9658203125</text:p>
          </table:table-cell>
          <table:table-cell office:value-type="float" office:value="0.001030273">
            <text:p>0.001030273</text:p>
          </table:table-cell>
          <table:table-cell table:number-columns-repeated="4"/>
        </table:table-row>
        <table:table-row table:style-name="ro1">
          <table:table-cell office:value-type="float" office:value="352.075225830078">
            <text:p>352.0752258301</text:p>
          </table:table-cell>
          <table:table-cell office:value-type="float" office:value="-0.0009054642">
            <text:p>-0.0009054642</text:p>
          </table:table-cell>
          <table:table-cell table:number-columns-repeated="4"/>
        </table:table-row>
        <table:table-row table:style-name="ro1">
          <table:table-cell office:value-type="float" office:value="352.184661865234">
            <text:p>352.1846618652</text:p>
          </table:table-cell>
          <table:table-cell office:value-type="float" office:value="0.002306258">
            <text:p>0.002306258</text:p>
          </table:table-cell>
          <table:table-cell table:number-columns-repeated="4"/>
        </table:table-row>
        <table:table-row table:style-name="ro1">
          <table:table-cell office:value-type="float" office:value="352.294097900391">
            <text:p>352.2940979004</text:p>
          </table:table-cell>
          <table:table-cell office:value-type="float" office:value="0.005033282">
            <text:p>0.005033282</text:p>
          </table:table-cell>
          <table:table-cell table:number-columns-repeated="4"/>
        </table:table-row>
        <table:table-row table:style-name="ro1">
          <table:table-cell office:value-type="float" office:value="352.403533935547">
            <text:p>352.4035339355</text:p>
          </table:table-cell>
          <table:table-cell office:value-type="float" office:value="-0.002287335">
            <text:p>-0.002287335</text:p>
          </table:table-cell>
          <table:table-cell table:number-columns-repeated="4"/>
        </table:table-row>
        <table:table-row table:style-name="ro1">
          <table:table-cell office:value-type="float" office:value="352.512969970703">
            <text:p>352.5129699707</text:p>
          </table:table-cell>
          <table:table-cell office:value-type="float" office:value="0.001423844">
            <text:p>0.001423844</text:p>
          </table:table-cell>
          <table:table-cell table:number-columns-repeated="4"/>
        </table:table-row>
        <table:table-row table:style-name="ro1">
          <table:table-cell office:value-type="float" office:value="352.622406005859">
            <text:p>352.6224060059</text:p>
          </table:table-cell>
          <table:table-cell office:value-type="float" office:value="0.01870041">
            <text:p>0.01870041</text:p>
          </table:table-cell>
          <table:table-cell table:number-columns-repeated="4"/>
        </table:table-row>
        <table:table-row table:style-name="ro1">
          <table:table-cell office:value-type="float" office:value="352.731872558594">
            <text:p>352.7318725586</text:p>
          </table:table-cell>
          <table:table-cell office:value-type="float" office:value="-0.005946096">
            <text:p>-0.005946096</text:p>
          </table:table-cell>
          <table:table-cell table:number-columns-repeated="4"/>
        </table:table-row>
        <table:table-row table:style-name="ro1">
          <table:table-cell office:value-type="float" office:value="352.841339111328">
            <text:p>352.8413391113</text:p>
          </table:table-cell>
          <table:table-cell office:value-type="float" office:value="-0.008445486">
            <text:p>-0.008445486</text:p>
          </table:table-cell>
          <table:table-cell table:number-columns-repeated="4"/>
        </table:table-row>
        <table:table-row table:style-name="ro1">
          <table:table-cell office:value-type="float" office:value="352.950805664063">
            <text:p>352.9508056641</text:p>
          </table:table-cell>
          <table:table-cell office:value-type="float" office:value="0.01748694">
            <text:p>0.01748694</text:p>
          </table:table-cell>
          <table:table-cell table:number-columns-repeated="4"/>
        </table:table-row>
        <table:table-row table:style-name="ro1">
          <table:table-cell office:value-type="float" office:value="353.060272216797">
            <text:p>353.0602722168</text:p>
          </table:table-cell>
          <table:table-cell office:value-type="float" office:value="0.01204906">
            <text:p>0.01204906</text:p>
          </table:table-cell>
          <table:table-cell table:number-columns-repeated="4"/>
        </table:table-row>
        <table:table-row table:style-name="ro1">
          <table:table-cell office:value-type="float" office:value="353.169738769531">
            <text:p>353.1697387695</text:p>
          </table:table-cell>
          <table:table-cell office:value-type="float" office:value="-0.001545594">
            <text:p>-0.001545594</text:p>
          </table:table-cell>
          <table:table-cell table:number-columns-repeated="4"/>
        </table:table-row>
        <table:table-row table:style-name="ro1">
          <table:table-cell office:value-type="float" office:value="353.279235839844">
            <text:p>353.2792358398</text:p>
          </table:table-cell>
          <table:table-cell office:value-type="float" office:value="-0.003188599">
            <text:p>-0.003188599</text:p>
          </table:table-cell>
          <table:table-cell table:number-columns-repeated="4"/>
        </table:table-row>
        <table:table-row table:style-name="ro1">
          <table:table-cell office:value-type="float" office:value="353.388732910156">
            <text:p>353.3887329102</text:p>
          </table:table-cell>
          <table:table-cell office:value-type="float" office:value="0.004909072">
            <text:p>0.004909072</text:p>
          </table:table-cell>
          <table:table-cell table:number-columns-repeated="4"/>
        </table:table-row>
        <table:table-row table:style-name="ro1">
          <table:table-cell office:value-type="float" office:value="353.498229980469">
            <text:p>353.4982299805</text:p>
          </table:table-cell>
          <table:table-cell office:value-type="float" office:value="0.005574966">
            <text:p>0.005574966</text:p>
          </table:table-cell>
          <table:table-cell table:number-columns-repeated="4"/>
        </table:table-row>
        <table:table-row table:style-name="ro1">
          <table:table-cell office:value-type="float" office:value="353.607727050781">
            <text:p>353.6077270508</text:p>
          </table:table-cell>
          <table:table-cell office:value-type="float" office:value="0.009820592">
            <text:p>0.009820592</text:p>
          </table:table-cell>
          <table:table-cell table:number-columns-repeated="4"/>
        </table:table-row>
        <table:table-row table:style-name="ro1">
          <table:table-cell office:value-type="float" office:value="353.717254638672">
            <text:p>353.7172546387</text:p>
          </table:table-cell>
          <table:table-cell office:value-type="float" office:value="-0.002110586">
            <text:p>-0.002110586</text:p>
          </table:table-cell>
          <table:table-cell table:number-columns-repeated="4"/>
        </table:table-row>
        <table:table-row table:style-name="ro1">
          <table:table-cell office:value-type="float" office:value="353.826782226563">
            <text:p>353.8267822266</text:p>
          </table:table-cell>
          <table:table-cell office:value-type="float" office:value="-0.005314691">
            <text:p>-0.005314691</text:p>
          </table:table-cell>
          <table:table-cell table:number-columns-repeated="4"/>
        </table:table-row>
        <table:table-row table:style-name="ro1">
          <table:table-cell office:value-type="float" office:value="353.936309814453">
            <text:p>353.9363098145</text:p>
          </table:table-cell>
          <table:table-cell office:value-type="float" office:value="0.01690953">
            <text:p>0.01690953</text:p>
          </table:table-cell>
          <table:table-cell table:number-columns-repeated="4"/>
        </table:table-row>
        <table:table-row table:style-name="ro1">
          <table:table-cell office:value-type="float" office:value="354.045837402344">
            <text:p>354.0458374023</text:p>
          </table:table-cell>
          <table:table-cell office:value-type="float" office:value="-0.005585921">
            <text:p>-0.005585921</text:p>
          </table:table-cell>
          <table:table-cell table:number-columns-repeated="4"/>
        </table:table-row>
        <table:table-row table:style-name="ro1">
          <table:table-cell office:value-type="float" office:value="354.155364990234">
            <text:p>354.1553649902</text:p>
          </table:table-cell>
          <table:table-cell office:value-type="float" office:value="0.004932749">
            <text:p>0.004932749</text:p>
          </table:table-cell>
          <table:table-cell table:number-columns-repeated="4"/>
        </table:table-row>
        <table:table-row table:style-name="ro1">
          <table:table-cell office:value-type="float" office:value="354.264923095703">
            <text:p>354.2649230957</text:p>
          </table:table-cell>
          <table:table-cell office:value-type="float" office:value="0.002168159">
            <text:p>0.002168159</text:p>
          </table:table-cell>
          <table:table-cell table:number-columns-repeated="4"/>
        </table:table-row>
        <table:table-row table:style-name="ro1">
          <table:table-cell office:value-type="float" office:value="354.374481201172">
            <text:p>354.3744812012</text:p>
          </table:table-cell>
          <table:table-cell office:value-type="float" office:value="0.004847276">
            <text:p>0.004847276</text:p>
          </table:table-cell>
          <table:table-cell table:number-columns-repeated="4"/>
        </table:table-row>
        <table:table-row table:style-name="ro1">
          <table:table-cell office:value-type="float" office:value="354.484039306641">
            <text:p>354.4840393066</text:p>
          </table:table-cell>
          <table:table-cell office:value-type="float" office:value="0.004025134">
            <text:p>0.004025134</text:p>
          </table:table-cell>
          <table:table-cell table:number-columns-repeated="4"/>
        </table:table-row>
        <table:table-row table:style-name="ro1">
          <table:table-cell office:value-type="float" office:value="354.593597412109">
            <text:p>354.5935974121</text:p>
          </table:table-cell>
          <table:table-cell office:value-type="float" office:value="0.004446202">
            <text:p>0.004446202</text:p>
          </table:table-cell>
          <table:table-cell table:number-columns-repeated="4"/>
        </table:table-row>
        <table:table-row table:style-name="ro1">
          <table:table-cell office:value-type="float" office:value="354.703155517578">
            <text:p>354.7031555176</text:p>
          </table:table-cell>
          <table:table-cell office:value-type="float" office:value="0.0011699">
            <text:p>0.0011699</text:p>
          </table:table-cell>
          <table:table-cell table:number-columns-repeated="4"/>
        </table:table-row>
        <table:table-row table:style-name="ro1">
          <table:table-cell office:value-type="float" office:value="354.812744140625">
            <text:p>354.8127441406</text:p>
          </table:table-cell>
          <table:table-cell office:value-type="float" office:value="0.0120892">
            <text:p>0.0120892</text:p>
          </table:table-cell>
          <table:table-cell table:number-columns-repeated="4"/>
        </table:table-row>
        <table:table-row table:style-name="ro1">
          <table:table-cell office:value-type="float" office:value="354.922332763672">
            <text:p>354.9223327637</text:p>
          </table:table-cell>
          <table:table-cell office:value-type="float" office:value="0.001284551">
            <text:p>0.001284551</text:p>
          </table:table-cell>
          <table:table-cell table:number-columns-repeated="4"/>
        </table:table-row>
        <table:table-row table:style-name="ro1">
          <table:table-cell office:value-type="float" office:value="355.031921386719">
            <text:p>355.0319213867</text:p>
          </table:table-cell>
          <table:table-cell office:value-type="float" office:value="0.00820969">
            <text:p>0.00820969</text:p>
          </table:table-cell>
          <table:table-cell table:number-columns-repeated="4"/>
        </table:table-row>
        <table:table-row table:style-name="ro1">
          <table:table-cell office:value-type="float" office:value="355.141510009766">
            <text:p>355.1415100098</text:p>
          </table:table-cell>
          <table:table-cell office:value-type="float" office:value="-0.002572999">
            <text:p>-0.002572999</text:p>
          </table:table-cell>
          <table:table-cell table:number-columns-repeated="4"/>
        </table:table-row>
        <table:table-row table:style-name="ro1">
          <table:table-cell office:value-type="float" office:value="355.251129150391">
            <text:p>355.2511291504</text:p>
          </table:table-cell>
          <table:table-cell office:value-type="float" office:value="0.004018117">
            <text:p>0.004018117</text:p>
          </table:table-cell>
          <table:table-cell table:number-columns-repeated="4"/>
        </table:table-row>
        <table:table-row table:style-name="ro1">
          <table:table-cell office:value-type="float" office:value="355.360717773438">
            <text:p>355.3607177734</text:p>
          </table:table-cell>
          <table:table-cell office:value-type="float" office:value="0.00445599">
            <text:p>0.00445599</text:p>
          </table:table-cell>
          <table:table-cell table:number-columns-repeated="4"/>
        </table:table-row>
        <table:table-row table:style-name="ro1">
          <table:table-cell office:value-type="float" office:value="355.470336914063">
            <text:p>355.4703369141</text:p>
          </table:table-cell>
          <table:table-cell office:value-type="float" office:value="-0.001036365">
            <text:p>-0.001036365</text:p>
          </table:table-cell>
          <table:table-cell table:number-columns-repeated="4"/>
        </table:table-row>
        <table:table-row table:style-name="ro1">
          <table:table-cell office:value-type="float" office:value="355.579956054688">
            <text:p>355.5799560547</text:p>
          </table:table-cell>
          <table:table-cell office:value-type="float" office:value="0.01038802">
            <text:p>0.01038802</text:p>
          </table:table-cell>
          <table:table-cell table:number-columns-repeated="4"/>
        </table:table-row>
        <table:table-row table:style-name="ro1">
          <table:table-cell office:value-type="float" office:value="355.689605712891">
            <text:p>355.6896057129</text:p>
          </table:table-cell>
          <table:table-cell office:value-type="float" office:value="0.0143124">
            <text:p>0.0143124</text:p>
          </table:table-cell>
          <table:table-cell table:number-columns-repeated="4"/>
        </table:table-row>
        <table:table-row table:style-name="ro1">
          <table:table-cell office:value-type="float" office:value="355.799224853516">
            <text:p>355.7992248535</text:p>
          </table:table-cell>
          <table:table-cell office:value-type="float" office:value="0.01607268">
            <text:p>0.01607268</text:p>
          </table:table-cell>
          <table:table-cell table:number-columns-repeated="4"/>
        </table:table-row>
        <table:table-row table:style-name="ro1">
          <table:table-cell office:value-type="float" office:value="355.908874511719">
            <text:p>355.9088745117</text:p>
          </table:table-cell>
          <table:table-cell office:value-type="float" office:value="-0.007744267">
            <text:p>-0.007744267</text:p>
          </table:table-cell>
          <table:table-cell table:number-columns-repeated="4"/>
        </table:table-row>
        <table:table-row table:style-name="ro1">
          <table:table-cell office:value-type="float" office:value="356.018524169922">
            <text:p>356.0185241699</text:p>
          </table:table-cell>
          <table:table-cell office:value-type="float" office:value="0.01113691">
            <text:p>0.01113691</text:p>
          </table:table-cell>
          <table:table-cell table:number-columns-repeated="4"/>
        </table:table-row>
        <table:table-row table:style-name="ro1">
          <table:table-cell office:value-type="float" office:value="356.128173828125">
            <text:p>356.1281738281</text:p>
          </table:table-cell>
          <table:table-cell office:value-type="float" office:value="-0.003537613">
            <text:p>-0.003537613</text:p>
          </table:table-cell>
          <table:table-cell table:number-columns-repeated="4"/>
        </table:table-row>
        <table:table-row table:style-name="ro1">
          <table:table-cell office:value-type="float" office:value="356.237823486328">
            <text:p>356.2378234863</text:p>
          </table:table-cell>
          <table:table-cell office:value-type="float" office:value="-0.006003255">
            <text:p>-0.006003255</text:p>
          </table:table-cell>
          <table:table-cell table:number-columns-repeated="4"/>
        </table:table-row>
        <table:table-row table:style-name="ro1">
          <table:table-cell office:value-type="float" office:value="356.347503662109">
            <text:p>356.3475036621</text:p>
          </table:table-cell>
          <table:table-cell office:value-type="float" office:value="0.003358704">
            <text:p>0.003358704</text:p>
          </table:table-cell>
          <table:table-cell table:number-columns-repeated="4"/>
        </table:table-row>
        <table:table-row table:style-name="ro1">
          <table:table-cell office:value-type="float" office:value="356.457183837891">
            <text:p>356.4571838379</text:p>
          </table:table-cell>
          <table:table-cell office:value-type="float" office:value="0.002854171">
            <text:p>0.002854171</text:p>
          </table:table-cell>
          <table:table-cell table:number-columns-repeated="4"/>
        </table:table-row>
        <table:table-row table:style-name="ro1">
          <table:table-cell office:value-type="float" office:value="356.566864013672">
            <text:p>356.5668640137</text:p>
          </table:table-cell>
          <table:table-cell office:value-type="float" office:value="-0.0006454486">
            <text:p>-0.0006454486</text:p>
          </table:table-cell>
          <table:table-cell table:number-columns-repeated="4"/>
        </table:table-row>
        <table:table-row table:style-name="ro1">
          <table:table-cell office:value-type="float" office:value="356.676544189453">
            <text:p>356.6765441895</text:p>
          </table:table-cell>
          <table:table-cell office:value-type="float" office:value="-0.007061844">
            <text:p>-0.007061844</text:p>
          </table:table-cell>
          <table:table-cell table:number-columns-repeated="4"/>
        </table:table-row>
        <table:table-row table:style-name="ro1">
          <table:table-cell office:value-type="float" office:value="356.786224365234">
            <text:p>356.7862243652</text:p>
          </table:table-cell>
          <table:table-cell office:value-type="float" office:value="-0.006481905">
            <text:p>-0.006481905</text:p>
          </table:table-cell>
          <table:table-cell table:number-columns-repeated="4"/>
        </table:table-row>
        <table:table-row table:style-name="ro1">
          <table:table-cell office:value-type="float" office:value="356.895935058594">
            <text:p>356.8959350586</text:p>
          </table:table-cell>
          <table:table-cell office:value-type="float" office:value="-0.008035676">
            <text:p>-0.008035676</text:p>
          </table:table-cell>
          <table:table-cell table:number-columns-repeated="4"/>
        </table:table-row>
        <table:table-row table:style-name="ro1">
          <table:table-cell office:value-type="float" office:value="357.005645751953">
            <text:p>357.005645752</text:p>
          </table:table-cell>
          <table:table-cell office:value-type="float" office:value="-0.01014268">
            <text:p>-0.01014268</text:p>
          </table:table-cell>
          <table:table-cell table:number-columns-repeated="4"/>
        </table:table-row>
        <table:table-row table:style-name="ro1">
          <table:table-cell office:value-type="float" office:value="357.115356445313">
            <text:p>357.1153564453</text:p>
          </table:table-cell>
          <table:table-cell office:value-type="float" office:value="0.0002479123">
            <text:p>0.0002479123</text:p>
          </table:table-cell>
          <table:table-cell table:number-columns-repeated="4"/>
        </table:table-row>
        <table:table-row table:style-name="ro1">
          <table:table-cell office:value-type="float" office:value="357.225067138672">
            <text:p>357.2250671387</text:p>
          </table:table-cell>
          <table:table-cell office:value-type="float" office:value="0.004864878">
            <text:p>0.004864878</text:p>
          </table:table-cell>
          <table:table-cell table:number-columns-repeated="4"/>
        </table:table-row>
        <table:table-row table:style-name="ro1">
          <table:table-cell office:value-type="float" office:value="357.334777832031">
            <text:p>357.334777832</text:p>
          </table:table-cell>
          <table:table-cell office:value-type="float" office:value="0.003639338">
            <text:p>0.003639338</text:p>
          </table:table-cell>
          <table:table-cell table:number-columns-repeated="4"/>
        </table:table-row>
        <table:table-row table:style-name="ro1">
          <table:table-cell office:value-type="float" office:value="357.444519042969">
            <text:p>357.444519043</text:p>
          </table:table-cell>
          <table:table-cell office:value-type="float" office:value="0.007506101">
            <text:p>0.007506101</text:p>
          </table:table-cell>
          <table:table-cell table:number-columns-repeated="4"/>
        </table:table-row>
        <table:table-row table:style-name="ro1">
          <table:table-cell office:value-type="float" office:value="357.554260253906">
            <text:p>357.5542602539</text:p>
          </table:table-cell>
          <table:table-cell office:value-type="float" office:value="-0.004377684">
            <text:p>-0.004377684</text:p>
          </table:table-cell>
          <table:table-cell table:number-columns-repeated="4"/>
        </table:table-row>
        <table:table-row table:style-name="ro1">
          <table:table-cell office:value-type="float" office:value="357.664001464844">
            <text:p>357.6640014648</text:p>
          </table:table-cell>
          <table:table-cell office:value-type="float" office:value="-0.001699563">
            <text:p>-0.001699563</text:p>
          </table:table-cell>
          <table:table-cell table:number-columns-repeated="4"/>
        </table:table-row>
        <table:table-row table:style-name="ro1">
          <table:table-cell office:value-type="float" office:value="357.773742675781">
            <text:p>357.7737426758</text:p>
          </table:table-cell>
          <table:table-cell office:value-type="float" office:value="0.01636735">
            <text:p>0.01636735</text:p>
          </table:table-cell>
          <table:table-cell table:number-columns-repeated="4"/>
        </table:table-row>
        <table:table-row table:style-name="ro1">
          <table:table-cell office:value-type="float" office:value="357.883514404297">
            <text:p>357.8835144043</text:p>
          </table:table-cell>
          <table:table-cell office:value-type="float" office:value="0.001042108">
            <text:p>0.001042108</text:p>
          </table:table-cell>
          <table:table-cell table:number-columns-repeated="4"/>
        </table:table-row>
        <table:table-row table:style-name="ro1">
          <table:table-cell office:value-type="float" office:value="357.993286132813">
            <text:p>357.9932861328</text:p>
          </table:table-cell>
          <table:table-cell office:value-type="float" office:value="-0.002602261">
            <text:p>-0.002602261</text:p>
          </table:table-cell>
          <table:table-cell table:number-columns-repeated="4"/>
        </table:table-row>
        <table:table-row table:style-name="ro1">
          <table:table-cell office:value-type="float" office:value="358.10302734375">
            <text:p>358.1030273438</text:p>
          </table:table-cell>
          <table:table-cell office:value-type="float" office:value="0.01142557">
            <text:p>0.01142557</text:p>
          </table:table-cell>
          <table:table-cell table:number-columns-repeated="4"/>
        </table:table-row>
        <table:table-row table:style-name="ro1">
          <table:table-cell office:value-type="float" office:value="358.212829589844">
            <text:p>358.2128295898</text:p>
          </table:table-cell>
          <table:table-cell office:value-type="float" office:value="0.01138442">
            <text:p>0.01138442</text:p>
          </table:table-cell>
          <table:table-cell table:number-columns-repeated="4"/>
        </table:table-row>
        <table:table-row table:style-name="ro1">
          <table:table-cell office:value-type="float" office:value="358.322601318359">
            <text:p>358.3226013184</text:p>
          </table:table-cell>
          <table:table-cell office:value-type="float" office:value="0.001095768">
            <text:p>0.001095768</text:p>
          </table:table-cell>
          <table:table-cell table:number-columns-repeated="4"/>
        </table:table-row>
        <table:table-row table:style-name="ro1">
          <table:table-cell office:value-type="float" office:value="358.432373046875">
            <text:p>358.4323730469</text:p>
          </table:table-cell>
          <table:table-cell office:value-type="float" office:value="0.008347369">
            <text:p>0.008347369</text:p>
          </table:table-cell>
          <table:table-cell table:number-columns-repeated="4"/>
        </table:table-row>
        <table:table-row table:style-name="ro1">
          <table:table-cell office:value-type="float" office:value="358.542175292969">
            <text:p>358.542175293</text:p>
          </table:table-cell>
          <table:table-cell office:value-type="float" office:value="-0.00713049">
            <text:p>-0.00713049</text:p>
          </table:table-cell>
          <table:table-cell table:number-columns-repeated="4"/>
        </table:table-row>
        <table:table-row table:style-name="ro1">
          <table:table-cell office:value-type="float" office:value="358.651977539063">
            <text:p>358.6519775391</text:p>
          </table:table-cell>
          <table:table-cell office:value-type="float" office:value="0.001450981">
            <text:p>0.001450981</text:p>
          </table:table-cell>
          <table:table-cell table:number-columns-repeated="4"/>
        </table:table-row>
        <table:table-row table:style-name="ro1">
          <table:table-cell office:value-type="float" office:value="358.761779785156">
            <text:p>358.7617797852</text:p>
          </table:table-cell>
          <table:table-cell office:value-type="float" office:value="0.009972098">
            <text:p>0.009972098</text:p>
          </table:table-cell>
          <table:table-cell table:number-columns-repeated="4"/>
        </table:table-row>
        <table:table-row table:style-name="ro1">
          <table:table-cell office:value-type="float" office:value="358.871612548828">
            <text:p>358.8716125488</text:p>
          </table:table-cell>
          <table:table-cell office:value-type="float" office:value="-0.006607178">
            <text:p>-0.006607178</text:p>
          </table:table-cell>
          <table:table-cell table:number-columns-repeated="4"/>
        </table:table-row>
        <table:table-row table:style-name="ro1">
          <table:table-cell office:value-type="float" office:value="358.981414794922">
            <text:p>358.9814147949</text:p>
          </table:table-cell>
          <table:table-cell office:value-type="float" office:value="0.002666613">
            <text:p>0.002666613</text:p>
          </table:table-cell>
          <table:table-cell table:number-columns-repeated="4"/>
        </table:table-row>
        <table:table-row table:style-name="ro1">
          <table:table-cell office:value-type="float" office:value="359.091247558594">
            <text:p>359.0912475586</text:p>
          </table:table-cell>
          <table:table-cell office:value-type="float" office:value="0.01629177">
            <text:p>0.01629177</text:p>
          </table:table-cell>
          <table:table-cell table:number-columns-repeated="4"/>
        </table:table-row>
        <table:table-row table:style-name="ro1">
          <table:table-cell office:value-type="float" office:value="359.201080322266">
            <text:p>359.2010803223</text:p>
          </table:table-cell>
          <table:table-cell office:value-type="float" office:value="0.005325551">
            <text:p>0.005325551</text:p>
          </table:table-cell>
          <table:table-cell table:number-columns-repeated="4"/>
        </table:table-row>
        <table:table-row table:style-name="ro1">
          <table:table-cell office:value-type="float" office:value="359.310913085938">
            <text:p>359.3109130859</text:p>
          </table:table-cell>
          <table:table-cell office:value-type="float" office:value="0.001468644">
            <text:p>0.001468644</text:p>
          </table:table-cell>
          <table:table-cell table:number-columns-repeated="4"/>
        </table:table-row>
        <table:table-row table:style-name="ro1">
          <table:table-cell office:value-type="float" office:value="359.420776367188">
            <text:p>359.4207763672</text:p>
          </table:table-cell>
          <table:table-cell office:value-type="float" office:value="-0.01117733">
            <text:p>-0.01117733</text:p>
          </table:table-cell>
          <table:table-cell table:number-columns-repeated="4"/>
        </table:table-row>
        <table:table-row table:style-name="ro1">
          <table:table-cell office:value-type="float" office:value="359.530609130859">
            <text:p>359.5306091309</text:p>
          </table:table-cell>
          <table:table-cell office:value-type="float" office:value="0.01282179">
            <text:p>0.01282179</text:p>
          </table:table-cell>
          <table:table-cell table:number-columns-repeated="4"/>
        </table:table-row>
        <table:table-row table:style-name="ro1">
          <table:table-cell office:value-type="float" office:value="359.640472412109">
            <text:p>359.6404724121</text:p>
          </table:table-cell>
          <table:table-cell office:value-type="float" office:value="-0.0009544237">
            <text:p>-0.0009544237</text:p>
          </table:table-cell>
          <table:table-cell table:number-columns-repeated="4"/>
        </table:table-row>
        <table:table-row table:style-name="ro1">
          <table:table-cell office:value-type="float" office:value="359.750335693359">
            <text:p>359.7503356934</text:p>
          </table:table-cell>
          <table:table-cell office:value-type="float" office:value="-0.002126674">
            <text:p>-0.002126674</text:p>
          </table:table-cell>
          <table:table-cell table:number-columns-repeated="4"/>
        </table:table-row>
        <table:table-row table:style-name="ro1">
          <table:table-cell office:value-type="float" office:value="359.860198974609">
            <text:p>359.8601989746</text:p>
          </table:table-cell>
          <table:table-cell office:value-type="float" office:value="-0.0002116489">
            <text:p>-0.0002116489</text:p>
          </table:table-cell>
          <table:table-cell table:number-columns-repeated="4"/>
        </table:table-row>
        <table:table-row table:style-name="ro1">
          <table:table-cell office:value-type="float" office:value="359.970092773438">
            <text:p>359.9700927734</text:p>
          </table:table-cell>
          <table:table-cell office:value-type="float" office:value="0.006428164">
            <text:p>0.006428164</text:p>
          </table:table-cell>
          <table:table-cell table:number-columns-repeated="4"/>
        </table:table-row>
        <table:table-row table:style-name="ro1">
          <table:table-cell office:value-type="float" office:value="360.079986572266">
            <text:p>360.0799865723</text:p>
          </table:table-cell>
          <table:table-cell office:value-type="float" office:value="-0.007283772">
            <text:p>-0.007283772</text:p>
          </table:table-cell>
          <table:table-cell table:number-columns-repeated="4"/>
        </table:table-row>
        <table:table-row table:style-name="ro1">
          <table:table-cell office:value-type="float" office:value="360.189849853516">
            <text:p>360.1898498535</text:p>
          </table:table-cell>
          <table:table-cell office:value-type="float" office:value="0.01427326">
            <text:p>0.01427326</text:p>
          </table:table-cell>
          <table:table-cell table:number-columns-repeated="4"/>
        </table:table-row>
        <table:table-row table:style-name="ro1">
          <table:table-cell office:value-type="float" office:value="360.299743652344">
            <text:p>360.2997436523</text:p>
          </table:table-cell>
          <table:table-cell office:value-type="float" office:value="0.01243207">
            <text:p>0.01243207</text:p>
          </table:table-cell>
          <table:table-cell table:number-columns-repeated="4"/>
        </table:table-row>
        <table:table-row table:style-name="ro1">
          <table:table-cell office:value-type="float" office:value="360.40966796875">
            <text:p>360.4096679688</text:p>
          </table:table-cell>
          <table:table-cell office:value-type="float" office:value="0.01070786">
            <text:p>0.01070786</text:p>
          </table:table-cell>
          <table:table-cell table:number-columns-repeated="4"/>
        </table:table-row>
        <table:table-row table:style-name="ro1">
          <table:table-cell office:value-type="float" office:value="360.519561767578">
            <text:p>360.5195617676</text:p>
          </table:table-cell>
          <table:table-cell office:value-type="float" office:value="0.002713604">
            <text:p>0.002713604</text:p>
          </table:table-cell>
          <table:table-cell table:number-columns-repeated="4"/>
        </table:table-row>
        <table:table-row table:style-name="ro1">
          <table:table-cell office:value-type="float" office:value="360.629486083984">
            <text:p>360.629486084</text:p>
          </table:table-cell>
          <table:table-cell office:value-type="float" office:value="0.004098756">
            <text:p>0.004098756</text:p>
          </table:table-cell>
          <table:table-cell table:number-columns-repeated="4"/>
        </table:table-row>
        <table:table-row table:style-name="ro1">
          <table:table-cell office:value-type="float" office:value="360.739410400391">
            <text:p>360.7394104004</text:p>
          </table:table-cell>
          <table:table-cell office:value-type="float" office:value="-0.003737794">
            <text:p>-0.003737794</text:p>
          </table:table-cell>
          <table:table-cell table:number-columns-repeated="4"/>
        </table:table-row>
        <table:table-row table:style-name="ro1">
          <table:table-cell office:value-type="float" office:value="360.849334716797">
            <text:p>360.8493347168</text:p>
          </table:table-cell>
          <table:table-cell office:value-type="float" office:value="0.006593763">
            <text:p>0.006593763</text:p>
          </table:table-cell>
          <table:table-cell table:number-columns-repeated="4"/>
        </table:table-row>
        <table:table-row table:style-name="ro1">
          <table:table-cell office:value-type="float" office:value="360.959259033203">
            <text:p>360.9592590332</text:p>
          </table:table-cell>
          <table:table-cell office:value-type="float" office:value="-0.009805617">
            <text:p>-0.009805617</text:p>
          </table:table-cell>
          <table:table-cell table:number-columns-repeated="4"/>
        </table:table-row>
        <table:table-row table:style-name="ro1">
          <table:table-cell office:value-type="float" office:value="361.069213867188">
            <text:p>361.0692138672</text:p>
          </table:table-cell>
          <table:table-cell office:value-type="float" office:value="0.00024249">
            <text:p>0.00024249</text:p>
          </table:table-cell>
          <table:table-cell table:number-columns-repeated="4"/>
        </table:table-row>
        <table:table-row table:style-name="ro1">
          <table:table-cell office:value-type="float" office:value="361.179168701172">
            <text:p>361.1791687012</text:p>
          </table:table-cell>
          <table:table-cell office:value-type="float" office:value="0.0002508913">
            <text:p>0.0002508913</text:p>
          </table:table-cell>
          <table:table-cell table:number-columns-repeated="4"/>
        </table:table-row>
        <table:table-row table:style-name="ro1">
          <table:table-cell office:value-type="float" office:value="361.289093017578">
            <text:p>361.2890930176</text:p>
          </table:table-cell>
          <table:table-cell office:value-type="float" office:value="0.001548224">
            <text:p>0.001548224</text:p>
          </table:table-cell>
          <table:table-cell table:number-columns-repeated="4"/>
        </table:table-row>
        <table:table-row table:style-name="ro1">
          <table:table-cell office:value-type="float" office:value="361.399078369141">
            <text:p>361.3990783691</text:p>
          </table:table-cell>
          <table:table-cell office:value-type="float" office:value="0.002496335">
            <text:p>0.002496335</text:p>
          </table:table-cell>
          <table:table-cell table:number-columns-repeated="4"/>
        </table:table-row>
        <table:table-row table:style-name="ro1">
          <table:table-cell office:value-type="float" office:value="361.509033203125">
            <text:p>361.5090332031</text:p>
          </table:table-cell>
          <table:table-cell office:value-type="float" office:value="-0.007405356">
            <text:p>-0.007405356</text:p>
          </table:table-cell>
          <table:table-cell table:number-columns-repeated="4"/>
        </table:table-row>
        <table:table-row table:style-name="ro1">
          <table:table-cell office:value-type="float" office:value="361.619018554688">
            <text:p>361.6190185547</text:p>
          </table:table-cell>
          <table:table-cell office:value-type="float" office:value="-0.00642295">
            <text:p>-0.00642295</text:p>
          </table:table-cell>
          <table:table-cell table:number-columns-repeated="4"/>
        </table:table-row>
        <table:table-row table:style-name="ro1">
          <table:table-cell office:value-type="float" office:value="361.728973388672">
            <text:p>361.7289733887</text:p>
          </table:table-cell>
          <table:table-cell office:value-type="float" office:value="0.009110228">
            <text:p>0.009110228</text:p>
          </table:table-cell>
          <table:table-cell table:number-columns-repeated="4"/>
        </table:table-row>
        <table:table-row table:style-name="ro1">
          <table:table-cell office:value-type="float" office:value="361.838958740234">
            <text:p>361.8389587402</text:p>
          </table:table-cell>
          <table:table-cell office:value-type="float" office:value="0.002336264">
            <text:p>0.002336264</text:p>
          </table:table-cell>
          <table:table-cell table:number-columns-repeated="4"/>
        </table:table-row>
        <table:table-row table:style-name="ro1">
          <table:table-cell office:value-type="float" office:value="361.948944091797">
            <text:p>361.9489440918</text:p>
          </table:table-cell>
          <table:table-cell office:value-type="float" office:value="-0.001090556">
            <text:p>-0.001090556</text:p>
          </table:table-cell>
          <table:table-cell table:number-columns-repeated="4"/>
        </table:table-row>
        <table:table-row table:style-name="ro1">
          <table:table-cell office:value-type="float" office:value="362.058959960938">
            <text:p>362.0589599609</text:p>
          </table:table-cell>
          <table:table-cell office:value-type="float" office:value="-0.001862248">
            <text:p>-0.001862248</text:p>
          </table:table-cell>
          <table:table-cell table:number-columns-repeated="4"/>
        </table:table-row>
        <table:table-row table:style-name="ro1">
          <table:table-cell office:value-type="float" office:value="362.1689453125">
            <text:p>362.1689453125</text:p>
          </table:table-cell>
          <table:table-cell office:value-type="float" office:value="0.002803589">
            <text:p>0.002803589</text:p>
          </table:table-cell>
          <table:table-cell table:number-columns-repeated="4"/>
        </table:table-row>
        <table:table-row table:style-name="ro1">
          <table:table-cell office:value-type="float" office:value="362.278961181641">
            <text:p>362.2789611816</text:p>
          </table:table-cell>
          <table:table-cell office:value-type="float" office:value="0.01988892">
            <text:p>0.01988892</text:p>
          </table:table-cell>
          <table:table-cell table:number-columns-repeated="4"/>
        </table:table-row>
        <table:table-row table:style-name="ro1">
          <table:table-cell office:value-type="float" office:value="362.388977050781">
            <text:p>362.3889770508</text:p>
          </table:table-cell>
          <table:table-cell office:value-type="float" office:value="0.01114325">
            <text:p>0.01114325</text:p>
          </table:table-cell>
          <table:table-cell table:number-columns-repeated="4"/>
        </table:table-row>
        <table:table-row table:style-name="ro1">
          <table:table-cell office:value-type="float" office:value="362.498992919922">
            <text:p>362.4989929199</text:p>
          </table:table-cell>
          <table:table-cell office:value-type="float" office:value="-0.002561392">
            <text:p>-0.002561392</text:p>
          </table:table-cell>
          <table:table-cell table:number-columns-repeated="4"/>
        </table:table-row>
        <table:table-row table:style-name="ro1">
          <table:table-cell office:value-type="float" office:value="362.609039306641">
            <text:p>362.6090393066</text:p>
          </table:table-cell>
          <table:table-cell office:value-type="float" office:value="-0.002931198">
            <text:p>-0.002931198</text:p>
          </table:table-cell>
          <table:table-cell table:number-columns-repeated="4"/>
        </table:table-row>
        <table:table-row table:style-name="ro1">
          <table:table-cell office:value-type="float" office:value="362.719055175781">
            <text:p>362.7190551758</text:p>
          </table:table-cell>
          <table:table-cell office:value-type="float" office:value="0.00848437">
            <text:p>0.00848437</text:p>
          </table:table-cell>
          <table:table-cell table:number-columns-repeated="4"/>
        </table:table-row>
        <table:table-row table:style-name="ro1">
          <table:table-cell office:value-type="float" office:value="362.8291015625">
            <text:p>362.8291015625</text:p>
          </table:table-cell>
          <table:table-cell office:value-type="float" office:value="0.01323318">
            <text:p>0.01323318</text:p>
          </table:table-cell>
          <table:table-cell table:number-columns-repeated="4"/>
        </table:table-row>
        <table:table-row table:style-name="ro1">
          <table:table-cell office:value-type="float" office:value="362.939147949219">
            <text:p>362.9391479492</text:p>
          </table:table-cell>
          <table:table-cell office:value-type="float" office:value="0.0009383573">
            <text:p>0.0009383573</text:p>
          </table:table-cell>
          <table:table-cell table:number-columns-repeated="4"/>
        </table:table-row>
        <table:table-row table:style-name="ro1">
          <table:table-cell office:value-type="float" office:value="363.049224853516">
            <text:p>363.0492248535</text:p>
          </table:table-cell>
          <table:table-cell office:value-type="float" office:value="-0.001535007">
            <text:p>-0.001535007</text:p>
          </table:table-cell>
          <table:table-cell table:number-columns-repeated="4"/>
        </table:table-row>
        <table:table-row table:style-name="ro1">
          <table:table-cell office:value-type="float" office:value="363.159271240234">
            <text:p>363.1592712402</text:p>
          </table:table-cell>
          <table:table-cell office:value-type="float" office:value="-0.001834354">
            <text:p>-0.001834354</text:p>
          </table:table-cell>
          <table:table-cell table:number-columns-repeated="4"/>
        </table:table-row>
        <table:table-row table:style-name="ro1">
          <table:table-cell office:value-type="float" office:value="363.269348144531">
            <text:p>363.2693481445</text:p>
          </table:table-cell>
          <table:table-cell office:value-type="float" office:value="0.006078003">
            <text:p>0.006078003</text:p>
          </table:table-cell>
          <table:table-cell table:number-columns-repeated="4"/>
        </table:table-row>
        <table:table-row table:style-name="ro1">
          <table:table-cell office:value-type="float" office:value="363.37939453125">
            <text:p>363.3793945313</text:p>
          </table:table-cell>
          <table:table-cell office:value-type="float" office:value="0.005918184">
            <text:p>0.005918184</text:p>
          </table:table-cell>
          <table:table-cell table:number-columns-repeated="4"/>
        </table:table-row>
        <table:table-row table:style-name="ro1">
          <table:table-cell office:value-type="float" office:value="363.489501953125">
            <text:p>363.4895019531</text:p>
          </table:table-cell>
          <table:table-cell office:value-type="float" office:value="-0.007204379">
            <text:p>-0.007204379</text:p>
          </table:table-cell>
          <table:table-cell table:number-columns-repeated="4"/>
        </table:table-row>
        <table:table-row table:style-name="ro1">
          <table:table-cell office:value-type="float" office:value="363.599578857422">
            <text:p>363.5995788574</text:p>
          </table:table-cell>
          <table:table-cell office:value-type="float" office:value="0.01503372">
            <text:p>0.01503372</text:p>
          </table:table-cell>
          <table:table-cell table:number-columns-repeated="4"/>
        </table:table-row>
        <table:table-row table:style-name="ro1">
          <table:table-cell office:value-type="float" office:value="363.709655761719">
            <text:p>363.7096557617</text:p>
          </table:table-cell>
          <table:table-cell office:value-type="float" office:value="0.008717465">
            <text:p>0.008717465</text:p>
          </table:table-cell>
          <table:table-cell table:number-columns-repeated="4"/>
        </table:table-row>
        <table:table-row table:style-name="ro1">
          <table:table-cell office:value-type="float" office:value="363.819763183594">
            <text:p>363.8197631836</text:p>
          </table:table-cell>
          <table:table-cell office:value-type="float" office:value="0.005474493">
            <text:p>0.005474493</text:p>
          </table:table-cell>
          <table:table-cell table:number-columns-repeated="4"/>
        </table:table-row>
        <table:table-row table:style-name="ro1">
          <table:table-cell office:value-type="float" office:value="363.929870605469">
            <text:p>363.9298706055</text:p>
          </table:table-cell>
          <table:table-cell office:value-type="float" office:value="-0.007077928">
            <text:p>-0.007077928</text:p>
          </table:table-cell>
          <table:table-cell table:number-columns-repeated="4"/>
        </table:table-row>
        <table:table-row table:style-name="ro1">
          <table:table-cell office:value-type="float" office:value="364.039978027344">
            <text:p>364.0399780273</text:p>
          </table:table-cell>
          <table:table-cell office:value-type="float" office:value="-0.008164409">
            <text:p>-0.008164409</text:p>
          </table:table-cell>
          <table:table-cell table:number-columns-repeated="4"/>
        </table:table-row>
        <table:table-row table:style-name="ro1">
          <table:table-cell office:value-type="float" office:value="364.150085449219">
            <text:p>364.1500854492</text:p>
          </table:table-cell>
          <table:table-cell office:value-type="float" office:value="-0.005636892">
            <text:p>-0.005636892</text:p>
          </table:table-cell>
          <table:table-cell table:number-columns-repeated="4"/>
        </table:table-row>
        <table:table-row table:style-name="ro1">
          <table:table-cell office:value-type="float" office:value="364.260223388672">
            <text:p>364.2602233887</text:p>
          </table:table-cell>
          <table:table-cell office:value-type="float" office:value="-0.003258416">
            <text:p>-0.003258416</text:p>
          </table:table-cell>
          <table:table-cell table:number-columns-repeated="4"/>
        </table:table-row>
        <table:table-row table:style-name="ro1">
          <table:table-cell office:value-type="float" office:value="364.370330810547">
            <text:p>364.3703308105</text:p>
          </table:table-cell>
          <table:table-cell office:value-type="float" office:value="-0.005858401">
            <text:p>-0.005858401</text:p>
          </table:table-cell>
          <table:table-cell table:number-columns-repeated="4"/>
        </table:table-row>
        <table:table-row table:style-name="ro1">
          <table:table-cell office:value-type="float" office:value="364.48046875">
            <text:p>364.48046875</text:p>
          </table:table-cell>
          <table:table-cell office:value-type="float" office:value="0.007917246">
            <text:p>0.007917246</text:p>
          </table:table-cell>
          <table:table-cell table:number-columns-repeated="4"/>
        </table:table-row>
        <table:table-row table:style-name="ro1">
          <table:table-cell office:value-type="float" office:value="364.590606689453">
            <text:p>364.5906066895</text:p>
          </table:table-cell>
          <table:table-cell office:value-type="float" office:value="0.01049086">
            <text:p>0.01049086</text:p>
          </table:table-cell>
          <table:table-cell table:number-columns-repeated="4"/>
        </table:table-row>
        <table:table-row table:style-name="ro1">
          <table:table-cell office:value-type="float" office:value="364.700775146484">
            <text:p>364.7007751465</text:p>
          </table:table-cell>
          <table:table-cell office:value-type="float" office:value="0.003212336">
            <text:p>0.003212336</text:p>
          </table:table-cell>
          <table:table-cell table:number-columns-repeated="4"/>
        </table:table-row>
        <table:table-row table:style-name="ro1">
          <table:table-cell office:value-type="float" office:value="364.810913085938">
            <text:p>364.8109130859</text:p>
          </table:table-cell>
          <table:table-cell office:value-type="float" office:value="0.01421823">
            <text:p>0.01421823</text:p>
          </table:table-cell>
          <table:table-cell table:number-columns-repeated="4"/>
        </table:table-row>
        <table:table-row table:style-name="ro1">
          <table:table-cell office:value-type="float" office:value="364.921081542969">
            <text:p>364.921081543</text:p>
          </table:table-cell>
          <table:table-cell office:value-type="float" office:value="-0.004779904">
            <text:p>-0.004779904</text:p>
          </table:table-cell>
          <table:table-cell table:number-columns-repeated="4"/>
        </table:table-row>
        <table:table-row table:style-name="ro1">
          <table:table-cell office:value-type="float" office:value="365.03125">
            <text:p>365.03125</text:p>
          </table:table-cell>
          <table:table-cell office:value-type="float" office:value="-0.007111852">
            <text:p>-0.007111852</text:p>
          </table:table-cell>
          <table:table-cell table:number-columns-repeated="4"/>
        </table:table-row>
        <table:table-row table:style-name="ro1">
          <table:table-cell office:value-type="float" office:value="365.141418457031">
            <text:p>365.141418457</text:p>
          </table:table-cell>
          <table:table-cell office:value-type="float" office:value="-0.009821082">
            <text:p>-0.009821082</text:p>
          </table:table-cell>
          <table:table-cell table:number-columns-repeated="4"/>
        </table:table-row>
        <table:table-row table:style-name="ro1">
          <table:table-cell office:value-type="float" office:value="365.251586914063">
            <text:p>365.2515869141</text:p>
          </table:table-cell>
          <table:table-cell office:value-type="float" office:value="0.0101711">
            <text:p>0.0101711</text:p>
          </table:table-cell>
          <table:table-cell table:number-columns-repeated="4"/>
        </table:table-row>
        <table:table-row table:style-name="ro1">
          <table:table-cell office:value-type="float" office:value="365.361785888672">
            <text:p>365.3617858887</text:p>
          </table:table-cell>
          <table:table-cell office:value-type="float" office:value="0.03086484">
            <text:p>0.03086484</text:p>
          </table:table-cell>
          <table:table-cell table:number-columns-repeated="4"/>
        </table:table-row>
        <table:table-row table:style-name="ro1">
          <table:table-cell office:value-type="float" office:value="365.471984863281">
            <text:p>365.4719848633</text:p>
          </table:table-cell>
          <table:table-cell office:value-type="float" office:value="0.004689635">
            <text:p>0.004689635</text:p>
          </table:table-cell>
          <table:table-cell table:number-columns-repeated="4"/>
        </table:table-row>
        <table:table-row table:style-name="ro1">
          <table:table-cell office:value-type="float" office:value="365.582183837891">
            <text:p>365.5821838379</text:p>
          </table:table-cell>
          <table:table-cell office:value-type="float" office:value="0.007664592">
            <text:p>0.007664592</text:p>
          </table:table-cell>
          <table:table-cell table:number-columns-repeated="4"/>
        </table:table-row>
        <table:table-row table:style-name="ro1">
          <table:table-cell office:value-type="float" office:value="365.6923828125">
            <text:p>365.6923828125</text:p>
          </table:table-cell>
          <table:table-cell office:value-type="float" office:value="0.009097733">
            <text:p>0.009097733</text:p>
          </table:table-cell>
          <table:table-cell table:number-columns-repeated="4"/>
        </table:table-row>
        <table:table-row table:style-name="ro1">
          <table:table-cell office:value-type="float" office:value="365.802581787109">
            <text:p>365.8025817871</text:p>
          </table:table-cell>
          <table:table-cell office:value-type="float" office:value="-0.001381823">
            <text:p>-0.001381823</text:p>
          </table:table-cell>
          <table:table-cell table:number-columns-repeated="4"/>
        </table:table-row>
        <table:table-row table:style-name="ro1">
          <table:table-cell office:value-type="float" office:value="365.912811279297">
            <text:p>365.9128112793</text:p>
          </table:table-cell>
          <table:table-cell office:value-type="float" office:value="0.01064568">
            <text:p>0.01064568</text:p>
          </table:table-cell>
          <table:table-cell table:number-columns-repeated="4"/>
        </table:table-row>
        <table:table-row table:style-name="ro1">
          <table:table-cell office:value-type="float" office:value="366.023010253906">
            <text:p>366.0230102539</text:p>
          </table:table-cell>
          <table:table-cell office:value-type="float" office:value="0.003264504">
            <text:p>0.003264504</text:p>
          </table:table-cell>
          <table:table-cell table:number-columns-repeated="4"/>
        </table:table-row>
        <table:table-row table:style-name="ro1">
          <table:table-cell office:value-type="float" office:value="366.133239746094">
            <text:p>366.1332397461</text:p>
          </table:table-cell>
          <table:table-cell office:value-type="float" office:value="0.004831836">
            <text:p>0.004831836</text:p>
          </table:table-cell>
          <table:table-cell table:number-columns-repeated="4"/>
        </table:table-row>
        <table:table-row table:style-name="ro1">
          <table:table-cell office:value-type="float" office:value="366.243499755859">
            <text:p>366.2434997559</text:p>
          </table:table-cell>
          <table:table-cell office:value-type="float" office:value="-0.002769185">
            <text:p>-0.002769185</text:p>
          </table:table-cell>
          <table:table-cell table:number-columns-repeated="4"/>
        </table:table-row>
        <table:table-row table:style-name="ro1">
          <table:table-cell office:value-type="float" office:value="366.353729248047">
            <text:p>366.353729248</text:p>
          </table:table-cell>
          <table:table-cell office:value-type="float" office:value="-0.0004867367">
            <text:p>-0.0004867367</text:p>
          </table:table-cell>
          <table:table-cell table:number-columns-repeated="4"/>
        </table:table-row>
        <table:table-row table:style-name="ro1">
          <table:table-cell office:value-type="float" office:value="366.463989257813">
            <text:p>366.4639892578</text:p>
          </table:table-cell>
          <table:table-cell office:value-type="float" office:value="-0.001365135">
            <text:p>-0.001365135</text:p>
          </table:table-cell>
          <table:table-cell table:number-columns-repeated="4"/>
        </table:table-row>
        <table:table-row table:style-name="ro1">
          <table:table-cell office:value-type="float" office:value="366.57421875">
            <text:p>366.57421875</text:p>
          </table:table-cell>
          <table:table-cell office:value-type="float" office:value="0.00136017">
            <text:p>0.00136017</text:p>
          </table:table-cell>
          <table:table-cell table:number-columns-repeated="4"/>
        </table:table-row>
        <table:table-row table:style-name="ro1">
          <table:table-cell office:value-type="float" office:value="366.684478759766">
            <text:p>366.6844787598</text:p>
          </table:table-cell>
          <table:table-cell office:value-type="float" office:value="-0.002211847">
            <text:p>-0.002211847</text:p>
          </table:table-cell>
          <table:table-cell table:number-columns-repeated="4"/>
        </table:table-row>
        <table:table-row table:style-name="ro1">
          <table:table-cell office:value-type="float" office:value="366.794738769531">
            <text:p>366.7947387695</text:p>
          </table:table-cell>
          <table:table-cell office:value-type="float" office:value="0.01123231">
            <text:p>0.01123231</text:p>
          </table:table-cell>
          <table:table-cell table:number-columns-repeated="4"/>
        </table:table-row>
        <table:table-row table:style-name="ro1">
          <table:table-cell office:value-type="float" office:value="366.905029296875">
            <text:p>366.9050292969</text:p>
          </table:table-cell>
          <table:table-cell office:value-type="float" office:value="-0.003792112">
            <text:p>-0.003792112</text:p>
          </table:table-cell>
          <table:table-cell table:number-columns-repeated="4"/>
        </table:table-row>
        <table:table-row table:style-name="ro1">
          <table:table-cell office:value-type="float" office:value="367.015289306641">
            <text:p>367.0152893066</text:p>
          </table:table-cell>
          <table:table-cell office:value-type="float" office:value="0.0001919636">
            <text:p>0.0001919636</text:p>
          </table:table-cell>
          <table:table-cell table:number-columns-repeated="4"/>
        </table:table-row>
        <table:table-row table:style-name="ro1">
          <table:table-cell office:value-type="float" office:value="367.125579833984">
            <text:p>367.125579834</text:p>
          </table:table-cell>
          <table:table-cell office:value-type="float" office:value="0.0133206">
            <text:p>0.0133206</text:p>
          </table:table-cell>
          <table:table-cell table:number-columns-repeated="4"/>
        </table:table-row>
        <table:table-row table:style-name="ro1">
          <table:table-cell office:value-type="float" office:value="367.235870361328">
            <text:p>367.2358703613</text:p>
          </table:table-cell>
          <table:table-cell office:value-type="float" office:value="0.01660561">
            <text:p>0.01660561</text:p>
          </table:table-cell>
          <table:table-cell table:number-columns-repeated="4"/>
        </table:table-row>
        <table:table-row table:style-name="ro1">
          <table:table-cell office:value-type="float" office:value="367.346160888672">
            <text:p>367.3461608887</text:p>
          </table:table-cell>
          <table:table-cell office:value-type="float" office:value="0.02184327">
            <text:p>0.02184327</text:p>
          </table:table-cell>
          <table:table-cell table:number-columns-repeated="4"/>
        </table:table-row>
        <table:table-row table:style-name="ro1">
          <table:table-cell office:value-type="float" office:value="367.456481933594">
            <text:p>367.4564819336</text:p>
          </table:table-cell>
          <table:table-cell office:value-type="float" office:value="0.01036163">
            <text:p>0.01036163</text:p>
          </table:table-cell>
          <table:table-cell table:number-columns-repeated="4"/>
        </table:table-row>
        <table:table-row table:style-name="ro1">
          <table:table-cell office:value-type="float" office:value="367.566772460938">
            <text:p>367.5667724609</text:p>
          </table:table-cell>
          <table:table-cell office:value-type="float" office:value="-0.006913464">
            <text:p>-0.006913464</text:p>
          </table:table-cell>
          <table:table-cell table:number-columns-repeated="4"/>
        </table:table-row>
        <table:table-row table:style-name="ro1">
          <table:table-cell office:value-type="float" office:value="367.677093505859">
            <text:p>367.6770935059</text:p>
          </table:table-cell>
          <table:table-cell office:value-type="float" office:value="-0.004096526">
            <text:p>-0.004096526</text:p>
          </table:table-cell>
          <table:table-cell table:number-columns-repeated="4"/>
        </table:table-row>
        <table:table-row table:style-name="ro1">
          <table:table-cell office:value-type="float" office:value="367.787414550781">
            <text:p>367.7874145508</text:p>
          </table:table-cell>
          <table:table-cell office:value-type="float" office:value="-0.009203822">
            <text:p>-0.009203822</text:p>
          </table:table-cell>
          <table:table-cell table:number-columns-repeated="4"/>
        </table:table-row>
        <table:table-row table:style-name="ro1">
          <table:table-cell office:value-type="float" office:value="367.897766113281">
            <text:p>367.8977661133</text:p>
          </table:table-cell>
          <table:table-cell office:value-type="float" office:value="-0.009987789">
            <text:p>-0.009987789</text:p>
          </table:table-cell>
          <table:table-cell table:number-columns-repeated="4"/>
        </table:table-row>
        <table:table-row table:style-name="ro1">
          <table:table-cell office:value-type="float" office:value="368.008087158203">
            <text:p>368.0080871582</text:p>
          </table:table-cell>
          <table:table-cell office:value-type="float" office:value="-0.0003250159">
            <text:p>-0.0003250159</text:p>
          </table:table-cell>
          <table:table-cell table:number-columns-repeated="4"/>
        </table:table-row>
        <table:table-row table:style-name="ro1">
          <table:table-cell office:value-type="float" office:value="368.118438720703">
            <text:p>368.1184387207</text:p>
          </table:table-cell>
          <table:table-cell office:value-type="float" office:value="-0.003691561">
            <text:p>-0.003691561</text:p>
          </table:table-cell>
          <table:table-cell table:number-columns-repeated="4"/>
        </table:table-row>
        <table:table-row table:style-name="ro1">
          <table:table-cell office:value-type="float" office:value="368.228759765625">
            <text:p>368.2287597656</text:p>
          </table:table-cell>
          <table:table-cell office:value-type="float" office:value="0.0004435812">
            <text:p>0.0004435812</text:p>
          </table:table-cell>
          <table:table-cell table:number-columns-repeated="4"/>
        </table:table-row>
        <table:table-row table:style-name="ro1">
          <table:table-cell office:value-type="float" office:value="368.339111328125">
            <text:p>368.3391113281</text:p>
          </table:table-cell>
          <table:table-cell office:value-type="float" office:value="-0.002151862">
            <text:p>-0.002151862</text:p>
          </table:table-cell>
          <table:table-cell table:number-columns-repeated="4"/>
        </table:table-row>
        <table:table-row table:style-name="ro1">
          <table:table-cell office:value-type="float" office:value="368.449493408203">
            <text:p>368.4494934082</text:p>
          </table:table-cell>
          <table:table-cell office:value-type="float" office:value="0.002527472">
            <text:p>0.002527472</text:p>
          </table:table-cell>
          <table:table-cell table:number-columns-repeated="4"/>
        </table:table-row>
        <table:table-row table:style-name="ro1">
          <table:table-cell office:value-type="float" office:value="368.559844970703">
            <text:p>368.5598449707</text:p>
          </table:table-cell>
          <table:table-cell office:value-type="float" office:value="0.009320688">
            <text:p>0.009320688</text:p>
          </table:table-cell>
          <table:table-cell table:number-columns-repeated="4"/>
        </table:table-row>
        <table:table-row table:style-name="ro1">
          <table:table-cell office:value-type="float" office:value="368.670227050781">
            <text:p>368.6702270508</text:p>
          </table:table-cell>
          <table:table-cell office:value-type="float" office:value="-0.007904004">
            <text:p>-0.007904004</text:p>
          </table:table-cell>
          <table:table-cell table:number-columns-repeated="4"/>
        </table:table-row>
        <table:table-row table:style-name="ro1">
          <table:table-cell office:value-type="float" office:value="368.780609130859">
            <text:p>368.7806091309</text:p>
          </table:table-cell>
          <table:table-cell office:value-type="float" office:value="-0.003922881">
            <text:p>-0.003922881</text:p>
          </table:table-cell>
          <table:table-cell table:number-columns-repeated="4"/>
        </table:table-row>
        <table:table-row table:style-name="ro1">
          <table:table-cell office:value-type="float" office:value="368.890991210938">
            <text:p>368.8909912109</text:p>
          </table:table-cell>
          <table:table-cell office:value-type="float" office:value="-0.01128764">
            <text:p>-0.01128764</text:p>
          </table:table-cell>
          <table:table-cell table:number-columns-repeated="4"/>
        </table:table-row>
        <table:table-row table:style-name="ro1">
          <table:table-cell office:value-type="float" office:value="369.001373291016">
            <text:p>369.001373291</text:p>
          </table:table-cell>
          <table:table-cell office:value-type="float" office:value="-0.0007862239">
            <text:p>-0.0007862239</text:p>
          </table:table-cell>
          <table:table-cell table:number-columns-repeated="4"/>
        </table:table-row>
        <table:table-row table:style-name="ro1">
          <table:table-cell office:value-type="float" office:value="369.111755371094">
            <text:p>369.1117553711</text:p>
          </table:table-cell>
          <table:table-cell office:value-type="float" office:value="-0.01001591">
            <text:p>-0.01001591</text:p>
          </table:table-cell>
          <table:table-cell table:number-columns-repeated="4"/>
        </table:table-row>
        <table:table-row table:style-name="ro1">
          <table:table-cell office:value-type="float" office:value="369.22216796875">
            <text:p>369.2221679688</text:p>
          </table:table-cell>
          <table:table-cell office:value-type="float" office:value="-0.009689054">
            <text:p>-0.009689054</text:p>
          </table:table-cell>
          <table:table-cell table:number-columns-repeated="4"/>
        </table:table-row>
        <table:table-row table:style-name="ro1">
          <table:table-cell office:value-type="float" office:value="369.332580566406">
            <text:p>369.3325805664</text:p>
          </table:table-cell>
          <table:table-cell office:value-type="float" office:value="-0.009411246">
            <text:p>-0.009411246</text:p>
          </table:table-cell>
          <table:table-cell table:number-columns-repeated="4"/>
        </table:table-row>
        <table:table-row table:style-name="ro1">
          <table:table-cell office:value-type="float" office:value="369.442993164063">
            <text:p>369.4429931641</text:p>
          </table:table-cell>
          <table:table-cell office:value-type="float" office:value="-0.0009194672">
            <text:p>-0.0009194672</text:p>
          </table:table-cell>
          <table:table-cell table:number-columns-repeated="4"/>
        </table:table-row>
        <table:table-row table:style-name="ro1">
          <table:table-cell office:value-type="float" office:value="369.553405761719">
            <text:p>369.5534057617</text:p>
          </table:table-cell>
          <table:table-cell office:value-type="float" office:value="0.003894236">
            <text:p>0.003894236</text:p>
          </table:table-cell>
          <table:table-cell table:number-columns-repeated="4"/>
        </table:table-row>
        <table:table-row table:style-name="ro1">
          <table:table-cell office:value-type="float" office:value="369.663848876953">
            <text:p>369.663848877</text:p>
          </table:table-cell>
          <table:table-cell office:value-type="float" office:value="0.007198146">
            <text:p>0.007198146</text:p>
          </table:table-cell>
          <table:table-cell table:number-columns-repeated="4"/>
        </table:table-row>
        <table:table-row table:style-name="ro1">
          <table:table-cell office:value-type="float" office:value="369.774261474609">
            <text:p>369.7742614746</text:p>
          </table:table-cell>
          <table:table-cell office:value-type="float" office:value="-0.005211465">
            <text:p>-0.005211465</text:p>
          </table:table-cell>
          <table:table-cell table:number-columns-repeated="4"/>
        </table:table-row>
        <table:table-row table:style-name="ro1">
          <table:table-cell office:value-type="float" office:value="369.884704589844">
            <text:p>369.8847045898</text:p>
          </table:table-cell>
          <table:table-cell office:value-type="float" office:value="0.002058969">
            <text:p>0.002058969</text:p>
          </table:table-cell>
          <table:table-cell table:number-columns-repeated="4"/>
        </table:table-row>
        <table:table-row table:style-name="ro1">
          <table:table-cell office:value-type="float" office:value="369.995147705078">
            <text:p>369.9951477051</text:p>
          </table:table-cell>
          <table:table-cell office:value-type="float" office:value="-0.006745848">
            <text:p>-0.006745848</text:p>
          </table:table-cell>
          <table:table-cell table:number-columns-repeated="4"/>
        </table:table-row>
        <table:table-row table:style-name="ro1">
          <table:table-cell office:value-type="float" office:value="370.105621337891">
            <text:p>370.1056213379</text:p>
          </table:table-cell>
          <table:table-cell office:value-type="float" office:value="0.009692758">
            <text:p>0.009692758</text:p>
          </table:table-cell>
          <table:table-cell table:number-columns-repeated="4"/>
        </table:table-row>
        <table:table-row table:style-name="ro1">
          <table:table-cell office:value-type="float" office:value="370.216064453125">
            <text:p>370.2160644531</text:p>
          </table:table-cell>
          <table:table-cell office:value-type="float" office:value="0.007441593">
            <text:p>0.007441593</text:p>
          </table:table-cell>
          <table:table-cell table:number-columns-repeated="4"/>
        </table:table-row>
        <table:table-row table:style-name="ro1">
          <table:table-cell office:value-type="float" office:value="370.326538085938">
            <text:p>370.3265380859</text:p>
          </table:table-cell>
          <table:table-cell office:value-type="float" office:value="0.02122342">
            <text:p>0.02122342</text:p>
          </table:table-cell>
          <table:table-cell table:number-columns-repeated="4"/>
        </table:table-row>
        <table:table-row table:style-name="ro1">
          <table:table-cell office:value-type="float" office:value="370.43701171875">
            <text:p>370.4370117188</text:p>
          </table:table-cell>
          <table:table-cell office:value-type="float" office:value="0.01259444">
            <text:p>0.01259444</text:p>
          </table:table-cell>
          <table:table-cell table:number-columns-repeated="4"/>
        </table:table-row>
        <table:table-row table:style-name="ro1">
          <table:table-cell office:value-type="float" office:value="370.547485351563">
            <text:p>370.5474853516</text:p>
          </table:table-cell>
          <table:table-cell office:value-type="float" office:value="0.002545411">
            <text:p>0.002545411</text:p>
          </table:table-cell>
          <table:table-cell table:number-columns-repeated="4"/>
        </table:table-row>
        <table:table-row table:style-name="ro1">
          <table:table-cell office:value-type="float" office:value="370.657958984375">
            <text:p>370.6579589844</text:p>
          </table:table-cell>
          <table:table-cell office:value-type="float" office:value="-0.00489737">
            <text:p>-0.00489737</text:p>
          </table:table-cell>
          <table:table-cell table:number-columns-repeated="4"/>
        </table:table-row>
        <table:table-row table:style-name="ro1">
          <table:table-cell office:value-type="float" office:value="370.768432617188">
            <text:p>370.7684326172</text:p>
          </table:table-cell>
          <table:table-cell office:value-type="float" office:value="-0.01144497">
            <text:p>-0.01144497</text:p>
          </table:table-cell>
          <table:table-cell table:number-columns-repeated="4"/>
        </table:table-row>
        <table:table-row table:style-name="ro1">
          <table:table-cell office:value-type="float" office:value="370.878936767578">
            <text:p>370.8789367676</text:p>
          </table:table-cell>
          <table:table-cell office:value-type="float" office:value="0.006987816">
            <text:p>0.006987816</text:p>
          </table:table-cell>
          <table:table-cell table:number-columns-repeated="4"/>
        </table:table-row>
        <table:table-row table:style-name="ro1">
          <table:table-cell office:value-type="float" office:value="370.989440917969">
            <text:p>370.989440918</text:p>
          </table:table-cell>
          <table:table-cell office:value-type="float" office:value="-0.007635429">
            <text:p>-0.007635429</text:p>
          </table:table-cell>
          <table:table-cell table:number-columns-repeated="4"/>
        </table:table-row>
        <table:table-row table:style-name="ro1">
          <table:table-cell office:value-type="float" office:value="371.099945068359">
            <text:p>371.0999450684</text:p>
          </table:table-cell>
          <table:table-cell office:value-type="float" office:value="0.004432999">
            <text:p>0.004432999</text:p>
          </table:table-cell>
          <table:table-cell table:number-columns-repeated="4"/>
        </table:table-row>
        <table:table-row table:style-name="ro1">
          <table:table-cell office:value-type="float" office:value="371.21044921875">
            <text:p>371.2104492188</text:p>
          </table:table-cell>
          <table:table-cell office:value-type="float" office:value="-0.007024441">
            <text:p>-0.007024441</text:p>
          </table:table-cell>
          <table:table-cell table:number-columns-repeated="4"/>
        </table:table-row>
        <table:table-row table:style-name="ro1">
          <table:table-cell office:value-type="float" office:value="371.320983886719">
            <text:p>371.3209838867</text:p>
          </table:table-cell>
          <table:table-cell office:value-type="float" office:value="-0.006029067">
            <text:p>-0.006029067</text:p>
          </table:table-cell>
          <table:table-cell table:number-columns-repeated="4"/>
        </table:table-row>
        <table:table-row table:style-name="ro1">
          <table:table-cell office:value-type="float" office:value="371.431488037109">
            <text:p>371.4314880371</text:p>
          </table:table-cell>
          <table:table-cell office:value-type="float" office:value="0.001269652">
            <text:p>0.001269652</text:p>
          </table:table-cell>
          <table:table-cell table:number-columns-repeated="4"/>
        </table:table-row>
        <table:table-row table:style-name="ro1">
          <table:table-cell office:value-type="float" office:value="371.542022705078">
            <text:p>371.5420227051</text:p>
          </table:table-cell>
          <table:table-cell office:value-type="float" office:value="0.01392638">
            <text:p>0.01392638</text:p>
          </table:table-cell>
          <table:table-cell table:number-columns-repeated="4"/>
        </table:table-row>
        <table:table-row table:style-name="ro1">
          <table:table-cell office:value-type="float" office:value="371.652557373047">
            <text:p>371.652557373</text:p>
          </table:table-cell>
          <table:table-cell office:value-type="float" office:value="-0.008631798">
            <text:p>-0.008631798</text:p>
          </table:table-cell>
          <table:table-cell table:number-columns-repeated="4"/>
        </table:table-row>
        <table:table-row table:style-name="ro1">
          <table:table-cell office:value-type="float" office:value="371.763122558594">
            <text:p>371.7631225586</text:p>
          </table:table-cell>
          <table:table-cell office:value-type="float" office:value="-0.006098285">
            <text:p>-0.006098285</text:p>
          </table:table-cell>
          <table:table-cell table:number-columns-repeated="4"/>
        </table:table-row>
        <table:table-row table:style-name="ro1">
          <table:table-cell office:value-type="float" office:value="371.873657226563">
            <text:p>371.8736572266</text:p>
          </table:table-cell>
          <table:table-cell office:value-type="float" office:value="-0.009243961">
            <text:p>-0.009243961</text:p>
          </table:table-cell>
          <table:table-cell table:number-columns-repeated="4"/>
        </table:table-row>
        <table:table-row table:style-name="ro1">
          <table:table-cell office:value-type="float" office:value="371.984222412109">
            <text:p>371.9842224121</text:p>
          </table:table-cell>
          <table:table-cell office:value-type="float" office:value="0.003523804">
            <text:p>0.003523804</text:p>
          </table:table-cell>
          <table:table-cell table:number-columns-repeated="4"/>
        </table:table-row>
        <table:table-row table:style-name="ro1">
          <table:table-cell office:value-type="float" office:value="372.094787597656">
            <text:p>372.0947875977</text:p>
          </table:table-cell>
          <table:table-cell office:value-type="float" office:value="-0.005757268">
            <text:p>-0.005757268</text:p>
          </table:table-cell>
          <table:table-cell table:number-columns-repeated="4"/>
        </table:table-row>
        <table:table-row table:style-name="ro1">
          <table:table-cell office:value-type="float" office:value="372.205352783203">
            <text:p>372.2053527832</text:p>
          </table:table-cell>
          <table:table-cell office:value-type="float" office:value="-0.007241902">
            <text:p>-0.007241902</text:p>
          </table:table-cell>
          <table:table-cell table:number-columns-repeated="4"/>
        </table:table-row>
        <table:table-row table:style-name="ro1">
          <table:table-cell office:value-type="float" office:value="372.31591796875">
            <text:p>372.3159179688</text:p>
          </table:table-cell>
          <table:table-cell office:value-type="float" office:value="-0.00682804">
            <text:p>-0.00682804</text:p>
          </table:table-cell>
          <table:table-cell table:number-columns-repeated="4"/>
        </table:table-row>
        <table:table-row table:style-name="ro1">
          <table:table-cell office:value-type="float" office:value="372.426513671875">
            <text:p>372.4265136719</text:p>
          </table:table-cell>
          <table:table-cell office:value-type="float" office:value="-0.001082888">
            <text:p>-0.001082888</text:p>
          </table:table-cell>
          <table:table-cell table:number-columns-repeated="4"/>
        </table:table-row>
        <table:table-row table:style-name="ro1">
          <table:table-cell office:value-type="float" office:value="372.537078857422">
            <text:p>372.5370788574</text:p>
          </table:table-cell>
          <table:table-cell office:value-type="float" office:value="0.002092197">
            <text:p>0.002092197</text:p>
          </table:table-cell>
          <table:table-cell table:number-columns-repeated="4"/>
        </table:table-row>
        <table:table-row table:style-name="ro1">
          <table:table-cell office:value-type="float" office:value="372.647674560547">
            <text:p>372.6476745605</text:p>
          </table:table-cell>
          <table:table-cell office:value-type="float" office:value="-0.01163982">
            <text:p>-0.01163982</text:p>
          </table:table-cell>
          <table:table-cell table:number-columns-repeated="4"/>
        </table:table-row>
        <table:table-row table:style-name="ro1">
          <table:table-cell office:value-type="float" office:value="372.758270263672">
            <text:p>372.7582702637</text:p>
          </table:table-cell>
          <table:table-cell office:value-type="float" office:value="0.0002884872">
            <text:p>0.0002884872</text:p>
          </table:table-cell>
          <table:table-cell table:number-columns-repeated="4"/>
        </table:table-row>
        <table:table-row table:style-name="ro1">
          <table:table-cell office:value-type="float" office:value="372.868896484375">
            <text:p>372.8688964844</text:p>
          </table:table-cell>
          <table:table-cell office:value-type="float" office:value="0.006365945">
            <text:p>0.006365945</text:p>
          </table:table-cell>
          <table:table-cell table:number-columns-repeated="4"/>
        </table:table-row>
        <table:table-row table:style-name="ro1">
          <table:table-cell office:value-type="float" office:value="372.9794921875">
            <text:p>372.9794921875</text:p>
          </table:table-cell>
          <table:table-cell office:value-type="float" office:value="-0.01159057">
            <text:p>-0.01159057</text:p>
          </table:table-cell>
          <table:table-cell table:number-columns-repeated="4"/>
        </table:table-row>
        <table:table-row table:style-name="ro1">
          <table:table-cell office:value-type="float" office:value="373.090118408203">
            <text:p>373.0901184082</text:p>
          </table:table-cell>
          <table:table-cell office:value-type="float" office:value="-0.001551456">
            <text:p>-0.001551456</text:p>
          </table:table-cell>
          <table:table-cell table:number-columns-repeated="4"/>
        </table:table-row>
        <table:table-row table:style-name="ro1">
          <table:table-cell office:value-type="float" office:value="373.200744628906">
            <text:p>373.2007446289</text:p>
          </table:table-cell>
          <table:table-cell office:value-type="float" office:value="0.03260845">
            <text:p>0.03260845</text:p>
          </table:table-cell>
          <table:table-cell table:number-columns-repeated="4"/>
        </table:table-row>
        <table:table-row table:style-name="ro1">
          <table:table-cell office:value-type="float" office:value="373.311370849609">
            <text:p>373.3113708496</text:p>
          </table:table-cell>
          <table:table-cell office:value-type="float" office:value="-0.001677549">
            <text:p>-0.001677549</text:p>
          </table:table-cell>
          <table:table-cell table:number-columns-repeated="4"/>
        </table:table-row>
        <table:table-row table:style-name="ro1">
          <table:table-cell office:value-type="float" office:value="373.421997070313">
            <text:p>373.4219970703</text:p>
          </table:table-cell>
          <table:table-cell office:value-type="float" office:value="0.0007302728">
            <text:p>0.0007302728</text:p>
          </table:table-cell>
          <table:table-cell table:number-columns-repeated="4"/>
        </table:table-row>
        <table:table-row table:style-name="ro1">
          <table:table-cell office:value-type="float" office:value="373.532623291016">
            <text:p>373.532623291</text:p>
          </table:table-cell>
          <table:table-cell office:value-type="float" office:value="-0.007825529">
            <text:p>-0.007825529</text:p>
          </table:table-cell>
          <table:table-cell table:number-columns-repeated="4"/>
        </table:table-row>
        <table:table-row table:style-name="ro1">
          <table:table-cell office:value-type="float" office:value="373.643280029297">
            <text:p>373.6432800293</text:p>
          </table:table-cell>
          <table:table-cell office:value-type="float" office:value="0.01151795">
            <text:p>0.01151795</text:p>
          </table:table-cell>
          <table:table-cell table:number-columns-repeated="4"/>
        </table:table-row>
        <table:table-row table:style-name="ro1">
          <table:table-cell office:value-type="float" office:value="373.753936767578">
            <text:p>373.7539367676</text:p>
          </table:table-cell>
          <table:table-cell office:value-type="float" office:value="0.005790776">
            <text:p>0.005790776</text:p>
          </table:table-cell>
          <table:table-cell table:number-columns-repeated="4"/>
        </table:table-row>
        <table:table-row table:style-name="ro1">
          <table:table-cell office:value-type="float" office:value="373.864593505859">
            <text:p>373.8645935059</text:p>
          </table:table-cell>
          <table:table-cell office:value-type="float" office:value="-0.006120686">
            <text:p>-0.006120686</text:p>
          </table:table-cell>
          <table:table-cell table:number-columns-repeated="4"/>
        </table:table-row>
        <table:table-row table:style-name="ro1">
          <table:table-cell office:value-type="float" office:value="373.975250244141">
            <text:p>373.9752502441</text:p>
          </table:table-cell>
          <table:table-cell office:value-type="float" office:value="-0.0005906642">
            <text:p>-0.0005906642</text:p>
          </table:table-cell>
          <table:table-cell table:number-columns-repeated="4"/>
        </table:table-row>
        <table:table-row table:style-name="ro1">
          <table:table-cell office:value-type="float" office:value="374.0859375">
            <text:p>374.0859375</text:p>
          </table:table-cell>
          <table:table-cell office:value-type="float" office:value="-0.006317093">
            <text:p>-0.006317093</text:p>
          </table:table-cell>
          <table:table-cell table:number-columns-repeated="4"/>
        </table:table-row>
        <table:table-row table:style-name="ro1">
          <table:table-cell office:value-type="float" office:value="374.196624755859">
            <text:p>374.1966247559</text:p>
          </table:table-cell>
          <table:table-cell office:value-type="float" office:value="-0.009902274">
            <text:p>-0.009902274</text:p>
          </table:table-cell>
          <table:table-cell table:number-columns-repeated="4"/>
        </table:table-row>
        <table:table-row table:style-name="ro1">
          <table:table-cell office:value-type="float" office:value="374.307281494141">
            <text:p>374.3072814941</text:p>
          </table:table-cell>
          <table:table-cell office:value-type="float" office:value="-0.003643788">
            <text:p>-0.003643788</text:p>
          </table:table-cell>
          <table:table-cell table:number-columns-repeated="4"/>
        </table:table-row>
        <table:table-row table:style-name="ro1">
          <table:table-cell office:value-type="float" office:value="374.417999267578">
            <text:p>374.4179992676</text:p>
          </table:table-cell>
          <table:table-cell office:value-type="float" office:value="-0.005959874">
            <text:p>-0.005959874</text:p>
          </table:table-cell>
          <table:table-cell table:number-columns-repeated="4"/>
        </table:table-row>
        <table:table-row table:style-name="ro1">
          <table:table-cell office:value-type="float" office:value="374.528686523438">
            <text:p>374.5286865234</text:p>
          </table:table-cell>
          <table:table-cell office:value-type="float" office:value="0.006467945">
            <text:p>0.006467945</text:p>
          </table:table-cell>
          <table:table-cell table:number-columns-repeated="4"/>
        </table:table-row>
        <table:table-row table:style-name="ro1">
          <table:table-cell office:value-type="float" office:value="374.639373779297">
            <text:p>374.6393737793</text:p>
          </table:table-cell>
          <table:table-cell office:value-type="float" office:value="0.008978395">
            <text:p>0.008978395</text:p>
          </table:table-cell>
          <table:table-cell table:number-columns-repeated="4"/>
        </table:table-row>
        <table:table-row table:style-name="ro1">
          <table:table-cell office:value-type="float" office:value="374.750091552734">
            <text:p>374.7500915527</text:p>
          </table:table-cell>
          <table:table-cell office:value-type="float" office:value="-0.005878839">
            <text:p>-0.005878839</text:p>
          </table:table-cell>
          <table:table-cell table:number-columns-repeated="4"/>
        </table:table-row>
        <table:table-row table:style-name="ro1">
          <table:table-cell office:value-type="float" office:value="374.860809326172">
            <text:p>374.8608093262</text:p>
          </table:table-cell>
          <table:table-cell office:value-type="float" office:value="-0.002434835">
            <text:p>-0.002434835</text:p>
          </table:table-cell>
          <table:table-cell table:number-columns-repeated="4"/>
        </table:table-row>
        <table:table-row table:style-name="ro1">
          <table:table-cell office:value-type="float" office:value="374.971527099609">
            <text:p>374.9715270996</text:p>
          </table:table-cell>
          <table:table-cell office:value-type="float" office:value="-0.001621557">
            <text:p>-0.001621557</text:p>
          </table:table-cell>
          <table:table-cell table:number-columns-repeated="4"/>
        </table:table-row>
        <table:table-row table:style-name="ro1">
          <table:table-cell office:value-type="float" office:value="375.082244873047">
            <text:p>375.082244873</text:p>
          </table:table-cell>
          <table:table-cell office:value-type="float" office:value="-0.001662372">
            <text:p>-0.001662372</text:p>
          </table:table-cell>
          <table:table-cell table:number-columns-repeated="4"/>
        </table:table-row>
        <table:table-row table:style-name="ro1">
          <table:table-cell office:value-type="float" office:value="375.192993164063">
            <text:p>375.1929931641</text:p>
          </table:table-cell>
          <table:table-cell office:value-type="float" office:value="-0.004776609">
            <text:p>-0.004776609</text:p>
          </table:table-cell>
          <table:table-cell table:number-columns-repeated="4"/>
        </table:table-row>
        <table:table-row table:style-name="ro1">
          <table:table-cell office:value-type="float" office:value="375.3037109375">
            <text:p>375.3037109375</text:p>
          </table:table-cell>
          <table:table-cell office:value-type="float" office:value="-0.009134137">
            <text:p>-0.009134137</text:p>
          </table:table-cell>
          <table:table-cell table:number-columns-repeated="4"/>
        </table:table-row>
        <table:table-row table:style-name="ro1">
          <table:table-cell office:value-type="float" office:value="375.414459228516">
            <text:p>375.4144592285</text:p>
          </table:table-cell>
          <table:table-cell office:value-type="float" office:value="0.003091736">
            <text:p>0.003091736</text:p>
          </table:table-cell>
          <table:table-cell table:number-columns-repeated="4"/>
        </table:table-row>
        <table:table-row table:style-name="ro1">
          <table:table-cell office:value-type="float" office:value="375.525207519531">
            <text:p>375.5252075195</text:p>
          </table:table-cell>
          <table:table-cell office:value-type="float" office:value="-0.002531192">
            <text:p>-0.002531192</text:p>
          </table:table-cell>
          <table:table-cell table:number-columns-repeated="4"/>
        </table:table-row>
        <table:table-row table:style-name="ro1">
          <table:table-cell office:value-type="float" office:value="375.635986328125">
            <text:p>375.6359863281</text:p>
          </table:table-cell>
          <table:table-cell office:value-type="float" office:value="0.007419442">
            <text:p>0.007419442</text:p>
          </table:table-cell>
          <table:table-cell table:number-columns-repeated="4"/>
        </table:table-row>
        <table:table-row table:style-name="ro1">
          <table:table-cell office:value-type="float" office:value="375.746734619141">
            <text:p>375.7467346191</text:p>
          </table:table-cell>
          <table:table-cell office:value-type="float" office:value="-0.001483373">
            <text:p>-0.001483373</text:p>
          </table:table-cell>
          <table:table-cell table:number-columns-repeated="4"/>
        </table:table-row>
        <table:table-row table:style-name="ro1">
          <table:table-cell office:value-type="float" office:value="375.857513427734">
            <text:p>375.8575134277</text:p>
          </table:table-cell>
          <table:table-cell office:value-type="float" office:value="-0.004541572">
            <text:p>-0.004541572</text:p>
          </table:table-cell>
          <table:table-cell table:number-columns-repeated="4"/>
        </table:table-row>
        <table:table-row table:style-name="ro1">
          <table:table-cell office:value-type="float" office:value="375.968292236328">
            <text:p>375.9682922363</text:p>
          </table:table-cell>
          <table:table-cell office:value-type="float" office:value="-0.003228355">
            <text:p>-0.003228355</text:p>
          </table:table-cell>
          <table:table-cell table:number-columns-repeated="4"/>
        </table:table-row>
        <table:table-row table:style-name="ro1">
          <table:table-cell office:value-type="float" office:value="376.079071044922">
            <text:p>376.0790710449</text:p>
          </table:table-cell>
          <table:table-cell office:value-type="float" office:value="-0.007549627">
            <text:p>-0.007549627</text:p>
          </table:table-cell>
          <table:table-cell table:number-columns-repeated="4"/>
        </table:table-row>
        <table:table-row table:style-name="ro1">
          <table:table-cell office:value-type="float" office:value="376.189849853516">
            <text:p>376.1898498535</text:p>
          </table:table-cell>
          <table:table-cell office:value-type="float" office:value="0.0004397737">
            <text:p>0.0004397737</text:p>
          </table:table-cell>
          <table:table-cell table:number-columns-repeated="4"/>
        </table:table-row>
        <table:table-row table:style-name="ro1">
          <table:table-cell office:value-type="float" office:value="376.300628662109">
            <text:p>376.3006286621</text:p>
          </table:table-cell>
          <table:table-cell office:value-type="float" office:value="-0.003453854">
            <text:p>-0.003453854</text:p>
          </table:table-cell>
          <table:table-cell table:number-columns-repeated="4"/>
        </table:table-row>
        <table:table-row table:style-name="ro1">
          <table:table-cell office:value-type="float" office:value="376.411437988281">
            <text:p>376.4114379883</text:p>
          </table:table-cell>
          <table:table-cell office:value-type="float" office:value="-0.01222286">
            <text:p>-0.01222286</text:p>
          </table:table-cell>
          <table:table-cell table:number-columns-repeated="4"/>
        </table:table-row>
        <table:table-row table:style-name="ro1">
          <table:table-cell office:value-type="float" office:value="376.522247314453">
            <text:p>376.5222473145</text:p>
          </table:table-cell>
          <table:table-cell office:value-type="float" office:value="-0.001434075">
            <text:p>-0.001434075</text:p>
          </table:table-cell>
          <table:table-cell table:number-columns-repeated="4"/>
        </table:table-row>
        <table:table-row table:style-name="ro1">
          <table:table-cell office:value-type="float" office:value="376.633056640625">
            <text:p>376.6330566406</text:p>
          </table:table-cell>
          <table:table-cell office:value-type="float" office:value="-0.002938747">
            <text:p>-0.002938747</text:p>
          </table:table-cell>
          <table:table-cell table:number-columns-repeated="4"/>
        </table:table-row>
        <table:table-row table:style-name="ro1">
          <table:table-cell office:value-type="float" office:value="376.743865966797">
            <text:p>376.7438659668</text:p>
          </table:table-cell>
          <table:table-cell office:value-type="float" office:value="0.001161572">
            <text:p>0.001161572</text:p>
          </table:table-cell>
          <table:table-cell table:number-columns-repeated="4"/>
        </table:table-row>
        <table:table-row table:style-name="ro1">
          <table:table-cell office:value-type="float" office:value="376.854705810547">
            <text:p>376.8547058105</text:p>
          </table:table-cell>
          <table:table-cell office:value-type="float" office:value="0.01375044">
            <text:p>0.01375044</text:p>
          </table:table-cell>
          <table:table-cell table:number-columns-repeated="4"/>
        </table:table-row>
        <table:table-row table:style-name="ro1">
          <table:table-cell office:value-type="float" office:value="376.965515136719">
            <text:p>376.9655151367</text:p>
          </table:table-cell>
          <table:table-cell office:value-type="float" office:value="0.01664385">
            <text:p>0.01664385</text:p>
          </table:table-cell>
          <table:table-cell table:number-columns-repeated="4"/>
        </table:table-row>
        <table:table-row table:style-name="ro1">
          <table:table-cell office:value-type="float" office:value="377.076354980469">
            <text:p>377.0763549805</text:p>
          </table:table-cell>
          <table:table-cell office:value-type="float" office:value="-0.005779823">
            <text:p>-0.005779823</text:p>
          </table:table-cell>
          <table:table-cell table:number-columns-repeated="4"/>
        </table:table-row>
        <table:table-row table:style-name="ro1">
          <table:table-cell office:value-type="float" office:value="377.187194824219">
            <text:p>377.1871948242</text:p>
          </table:table-cell>
          <table:table-cell office:value-type="float" office:value="0.003852087">
            <text:p>0.003852087</text:p>
          </table:table-cell>
          <table:table-cell table:number-columns-repeated="4"/>
        </table:table-row>
        <table:table-row table:style-name="ro1">
          <table:table-cell office:value-type="float" office:value="377.298034667969">
            <text:p>377.298034668</text:p>
          </table:table-cell>
          <table:table-cell office:value-type="float" office:value="-0.008053797">
            <text:p>-0.008053797</text:p>
          </table:table-cell>
          <table:table-cell table:number-columns-repeated="4"/>
        </table:table-row>
        <table:table-row table:style-name="ro1">
          <table:table-cell office:value-type="float" office:value="377.408905029297">
            <text:p>377.4089050293</text:p>
          </table:table-cell>
          <table:table-cell office:value-type="float" office:value="0.006776168">
            <text:p>0.006776168</text:p>
          </table:table-cell>
          <table:table-cell table:number-columns-repeated="4"/>
        </table:table-row>
        <table:table-row table:style-name="ro1">
          <table:table-cell office:value-type="float" office:value="377.519744873047">
            <text:p>377.519744873</text:p>
          </table:table-cell>
          <table:table-cell office:value-type="float" office:value="-0.005166039">
            <text:p>-0.005166039</text:p>
          </table:table-cell>
          <table:table-cell table:number-columns-repeated="4"/>
        </table:table-row>
        <table:table-row table:style-name="ro1">
          <table:table-cell office:value-type="float" office:value="377.630615234375">
            <text:p>377.6306152344</text:p>
          </table:table-cell>
          <table:table-cell office:value-type="float" office:value="0.002306406">
            <text:p>0.002306406</text:p>
          </table:table-cell>
          <table:table-cell table:number-columns-repeated="4"/>
        </table:table-row>
        <table:table-row table:style-name="ro1">
          <table:table-cell office:value-type="float" office:value="377.741485595703">
            <text:p>377.7414855957</text:p>
          </table:table-cell>
          <table:table-cell office:value-type="float" office:value="-0.006368214">
            <text:p>-0.006368214</text:p>
          </table:table-cell>
          <table:table-cell table:number-columns-repeated="4"/>
        </table:table-row>
        <table:table-row table:style-name="ro1">
          <table:table-cell office:value-type="float" office:value="377.852355957031">
            <text:p>377.852355957</text:p>
          </table:table-cell>
          <table:table-cell office:value-type="float" office:value="-0.007543106">
            <text:p>-0.007543106</text:p>
          </table:table-cell>
          <table:table-cell table:number-columns-repeated="4"/>
        </table:table-row>
        <table:table-row table:style-name="ro1">
          <table:table-cell office:value-type="float" office:value="377.963256835938">
            <text:p>377.9632568359</text:p>
          </table:table-cell>
          <table:table-cell office:value-type="float" office:value="-0.004452776">
            <text:p>-0.004452776</text:p>
          </table:table-cell>
          <table:table-cell table:number-columns-repeated="4"/>
        </table:table-row>
        <table:table-row table:style-name="ro1">
          <table:table-cell office:value-type="float" office:value="378.074157714844">
            <text:p>378.0741577148</text:p>
          </table:table-cell>
          <table:table-cell office:value-type="float" office:value="0.01217547">
            <text:p>0.01217547</text:p>
          </table:table-cell>
          <table:table-cell table:number-columns-repeated="4"/>
        </table:table-row>
        <table:table-row table:style-name="ro1">
          <table:table-cell office:value-type="float" office:value="378.185028076172">
            <text:p>378.1850280762</text:p>
          </table:table-cell>
          <table:table-cell office:value-type="float" office:value="0.009848211">
            <text:p>0.009848211</text:p>
          </table:table-cell>
          <table:table-cell table:number-columns-repeated="4"/>
        </table:table-row>
        <table:table-row table:style-name="ro1">
          <table:table-cell office:value-type="float" office:value="378.295928955078">
            <text:p>378.2959289551</text:p>
          </table:table-cell>
          <table:table-cell office:value-type="float" office:value="-0.007936152">
            <text:p>-0.007936152</text:p>
          </table:table-cell>
          <table:table-cell table:number-columns-repeated="4"/>
        </table:table-row>
        <table:table-row table:style-name="ro1">
          <table:table-cell office:value-type="float" office:value="378.406860351563">
            <text:p>378.4068603516</text:p>
          </table:table-cell>
          <table:table-cell office:value-type="float" office:value="-0.001290454">
            <text:p>-0.001290454</text:p>
          </table:table-cell>
          <table:table-cell table:number-columns-repeated="4"/>
        </table:table-row>
        <table:table-row table:style-name="ro1">
          <table:table-cell office:value-type="float" office:value="378.517761230469">
            <text:p>378.5177612305</text:p>
          </table:table-cell>
          <table:table-cell office:value-type="float" office:value="0.004789454">
            <text:p>0.004789454</text:p>
          </table:table-cell>
          <table:table-cell table:number-columns-repeated="4"/>
        </table:table-row>
        <table:table-row table:style-name="ro1">
          <table:table-cell office:value-type="float" office:value="378.628692626953">
            <text:p>378.628692627</text:p>
          </table:table-cell>
          <table:table-cell office:value-type="float" office:value="0.0003829707">
            <text:p>0.0003829707</text:p>
          </table:table-cell>
          <table:table-cell table:number-columns-repeated="4"/>
        </table:table-row>
        <table:table-row table:style-name="ro1">
          <table:table-cell office:value-type="float" office:value="378.739593505859">
            <text:p>378.7395935059</text:p>
          </table:table-cell>
          <table:table-cell office:value-type="float" office:value="0.001313594">
            <text:p>0.001313594</text:p>
          </table:table-cell>
          <table:table-cell table:number-columns-repeated="4"/>
        </table:table-row>
        <table:table-row table:style-name="ro1">
          <table:table-cell office:value-type="float" office:value="378.850524902344">
            <text:p>378.8505249023</text:p>
          </table:table-cell>
          <table:table-cell office:value-type="float" office:value="0.002268119">
            <text:p>0.002268119</text:p>
          </table:table-cell>
          <table:table-cell table:number-columns-repeated="4"/>
        </table:table-row>
        <table:table-row table:style-name="ro1">
          <table:table-cell office:value-type="float" office:value="378.961486816406">
            <text:p>378.9614868164</text:p>
          </table:table-cell>
          <table:table-cell office:value-type="float" office:value="0.004021931">
            <text:p>0.004021931</text:p>
          </table:table-cell>
          <table:table-cell table:number-columns-repeated="4"/>
        </table:table-row>
        <table:table-row table:style-name="ro1">
          <table:table-cell office:value-type="float" office:value="379.072418212891">
            <text:p>379.0724182129</text:p>
          </table:table-cell>
          <table:table-cell office:value-type="float" office:value="0.01023366">
            <text:p>0.01023366</text:p>
          </table:table-cell>
          <table:table-cell table:number-columns-repeated="4"/>
        </table:table-row>
        <table:table-row table:style-name="ro1">
          <table:table-cell office:value-type="float" office:value="379.183380126953">
            <text:p>379.183380127</text:p>
          </table:table-cell>
          <table:table-cell office:value-type="float" office:value="-0.007459956">
            <text:p>-0.007459956</text:p>
          </table:table-cell>
          <table:table-cell table:number-columns-repeated="4"/>
        </table:table-row>
        <table:table-row table:style-name="ro1">
          <table:table-cell office:value-type="float" office:value="379.294311523438">
            <text:p>379.2943115234</text:p>
          </table:table-cell>
          <table:table-cell office:value-type="float" office:value="0.006752587">
            <text:p>0.006752587</text:p>
          </table:table-cell>
          <table:table-cell table:number-columns-repeated="4"/>
        </table:table-row>
        <table:table-row table:style-name="ro1">
          <table:table-cell office:value-type="float" office:value="379.4052734375">
            <text:p>379.4052734375</text:p>
          </table:table-cell>
          <table:table-cell office:value-type="float" office:value="-0.01180441">
            <text:p>-0.01180441</text:p>
          </table:table-cell>
          <table:table-cell table:number-columns-repeated="4"/>
        </table:table-row>
        <table:table-row table:style-name="ro1">
          <table:table-cell office:value-type="float" office:value="379.516235351563">
            <text:p>379.5162353516</text:p>
          </table:table-cell>
          <table:table-cell office:value-type="float" office:value="-0.007968501">
            <text:p>-0.007968501</text:p>
          </table:table-cell>
          <table:table-cell table:number-columns-repeated="4"/>
        </table:table-row>
        <table:table-row table:style-name="ro1">
          <table:table-cell office:value-type="float" office:value="379.627227783203">
            <text:p>379.6272277832</text:p>
          </table:table-cell>
          <table:table-cell office:value-type="float" office:value="-0.003251367">
            <text:p>-0.003251367</text:p>
          </table:table-cell>
          <table:table-cell table:number-columns-repeated="4"/>
        </table:table-row>
        <table:table-row table:style-name="ro1">
          <table:table-cell office:value-type="float" office:value="379.738189697266">
            <text:p>379.7381896973</text:p>
          </table:table-cell>
          <table:table-cell office:value-type="float" office:value="0.01206361">
            <text:p>0.01206361</text:p>
          </table:table-cell>
          <table:table-cell table:number-columns-repeated="4"/>
        </table:table-row>
        <table:table-row table:style-name="ro1">
          <table:table-cell office:value-type="float" office:value="379.849182128906">
            <text:p>379.8491821289</text:p>
          </table:table-cell>
          <table:table-cell office:value-type="float" office:value="-0.006462904">
            <text:p>-0.006462904</text:p>
          </table:table-cell>
          <table:table-cell table:number-columns-repeated="4"/>
        </table:table-row>
        <table:table-row table:style-name="ro1">
          <table:table-cell office:value-type="float" office:value="379.960174560547">
            <text:p>379.9601745605</text:p>
          </table:table-cell>
          <table:table-cell office:value-type="float" office:value="-0.003639932">
            <text:p>-0.003639932</text:p>
          </table:table-cell>
          <table:table-cell table:number-columns-repeated="4"/>
        </table:table-row>
        <table:table-row table:style-name="ro1">
          <table:table-cell office:value-type="float" office:value="380.071166992188">
            <text:p>380.0711669922</text:p>
          </table:table-cell>
          <table:table-cell office:value-type="float" office:value="-0.006950368">
            <text:p>-0.006950368</text:p>
          </table:table-cell>
          <table:table-cell table:number-columns-repeated="4"/>
        </table:table-row>
        <table:table-row table:style-name="ro1">
          <table:table-cell office:value-type="float" office:value="380.182189941406">
            <text:p>380.1821899414</text:p>
          </table:table-cell>
          <table:table-cell office:value-type="float" office:value="0.01135036">
            <text:p>0.01135036</text:p>
          </table:table-cell>
          <table:table-cell table:number-columns-repeated="4"/>
        </table:table-row>
        <table:table-row table:style-name="ro1">
          <table:table-cell office:value-type="float" office:value="380.293182373047">
            <text:p>380.293182373</text:p>
          </table:table-cell>
          <table:table-cell office:value-type="float" office:value="0.006578128">
            <text:p>0.006578128</text:p>
          </table:table-cell>
          <table:table-cell table:number-columns-repeated="4"/>
        </table:table-row>
        <table:table-row table:style-name="ro1">
          <table:table-cell office:value-type="float" office:value="380.404205322266">
            <text:p>380.4042053223</text:p>
          </table:table-cell>
          <table:table-cell office:value-type="float" office:value="-0.01361022">
            <text:p>-0.01361022</text:p>
          </table:table-cell>
          <table:table-cell table:number-columns-repeated="4"/>
        </table:table-row>
        <table:table-row table:style-name="ro1">
          <table:table-cell office:value-type="float" office:value="380.515228271484">
            <text:p>380.5152282715</text:p>
          </table:table-cell>
          <table:table-cell office:value-type="float" office:value="-0.009264532">
            <text:p>-0.009264532</text:p>
          </table:table-cell>
          <table:table-cell table:number-columns-repeated="4"/>
        </table:table-row>
        <table:table-row table:style-name="ro1">
          <table:table-cell office:value-type="float" office:value="380.626251220703">
            <text:p>380.6262512207</text:p>
          </table:table-cell>
          <table:table-cell office:value-type="float" office:value="-0.002635258">
            <text:p>-0.002635258</text:p>
          </table:table-cell>
          <table:table-cell table:number-columns-repeated="4"/>
        </table:table-row>
        <table:table-row table:style-name="ro1">
          <table:table-cell office:value-type="float" office:value="380.737274169922">
            <text:p>380.7372741699</text:p>
          </table:table-cell>
          <table:table-cell office:value-type="float" office:value="-0.01109903">
            <text:p>-0.01109903</text:p>
          </table:table-cell>
          <table:table-cell table:number-columns-repeated="4"/>
        </table:table-row>
        <table:table-row table:style-name="ro1">
          <table:table-cell office:value-type="float" office:value="380.848327636719">
            <text:p>380.8483276367</text:p>
          </table:table-cell>
          <table:table-cell office:value-type="float" office:value="0.01558885">
            <text:p>0.01558885</text:p>
          </table:table-cell>
          <table:table-cell table:number-columns-repeated="4"/>
        </table:table-row>
        <table:table-row table:style-name="ro1">
          <table:table-cell office:value-type="float" office:value="380.959381103516">
            <text:p>380.9593811035</text:p>
          </table:table-cell>
          <table:table-cell office:value-type="float" office:value="-0.001430285">
            <text:p>-0.001430285</text:p>
          </table:table-cell>
          <table:table-cell table:number-columns-repeated="4"/>
        </table:table-row>
        <table:table-row table:style-name="ro1">
          <table:table-cell office:value-type="float" office:value="381.070404052734">
            <text:p>381.0704040527</text:p>
          </table:table-cell>
          <table:table-cell office:value-type="float" office:value="-0.00614948">
            <text:p>-0.00614948</text:p>
          </table:table-cell>
          <table:table-cell table:number-columns-repeated="4"/>
        </table:table-row>
        <table:table-row table:style-name="ro1">
          <table:table-cell office:value-type="float" office:value="381.181488037109">
            <text:p>381.1814880371</text:p>
          </table:table-cell>
          <table:table-cell office:value-type="float" office:value="0.001244277">
            <text:p>0.001244277</text:p>
          </table:table-cell>
          <table:table-cell table:number-columns-repeated="4"/>
        </table:table-row>
        <table:table-row table:style-name="ro1">
          <table:table-cell office:value-type="float" office:value="381.292541503906">
            <text:p>381.2925415039</text:p>
          </table:table-cell>
          <table:table-cell office:value-type="float" office:value="-0.005479129">
            <text:p>-0.005479129</text:p>
          </table:table-cell>
          <table:table-cell table:number-columns-repeated="4"/>
        </table:table-row>
        <table:table-row table:style-name="ro1">
          <table:table-cell office:value-type="float" office:value="381.403594970703">
            <text:p>381.4035949707</text:p>
          </table:table-cell>
          <table:table-cell office:value-type="float" office:value="0.01142749">
            <text:p>0.01142749</text:p>
          </table:table-cell>
          <table:table-cell table:number-columns-repeated="4"/>
        </table:table-row>
        <table:table-row table:style-name="ro1">
          <table:table-cell office:value-type="float" office:value="381.514678955078">
            <text:p>381.5146789551</text:p>
          </table:table-cell>
          <table:table-cell office:value-type="float" office:value="0.0104973">
            <text:p>0.0104973</text:p>
          </table:table-cell>
          <table:table-cell table:number-columns-repeated="4"/>
        </table:table-row>
        <table:table-row table:style-name="ro1">
          <table:table-cell office:value-type="float" office:value="381.625762939453">
            <text:p>381.6257629395</text:p>
          </table:table-cell>
          <table:table-cell office:value-type="float" office:value="0.01283908">
            <text:p>0.01283908</text:p>
          </table:table-cell>
          <table:table-cell table:number-columns-repeated="4"/>
        </table:table-row>
        <table:table-row table:style-name="ro1">
          <table:table-cell office:value-type="float" office:value="381.736846923828">
            <text:p>381.7368469238</text:p>
          </table:table-cell>
          <table:table-cell office:value-type="float" office:value="0.01058896">
            <text:p>0.01058896</text:p>
          </table:table-cell>
          <table:table-cell table:number-columns-repeated="4"/>
        </table:table-row>
        <table:table-row table:style-name="ro1">
          <table:table-cell office:value-type="float" office:value="381.847930908203">
            <text:p>381.8479309082</text:p>
          </table:table-cell>
          <table:table-cell office:value-type="float" office:value="-0.006819086">
            <text:p>-0.006819086</text:p>
          </table:table-cell>
          <table:table-cell table:number-columns-repeated="4"/>
        </table:table-row>
        <table:table-row table:style-name="ro1">
          <table:table-cell office:value-type="float" office:value="381.959045410156">
            <text:p>381.9590454102</text:p>
          </table:table-cell>
          <table:table-cell office:value-type="float" office:value="0.009414451">
            <text:p>0.009414451</text:p>
          </table:table-cell>
          <table:table-cell table:number-columns-repeated="4"/>
        </table:table-row>
        <table:table-row table:style-name="ro1">
          <table:table-cell office:value-type="float" office:value="382.070129394531">
            <text:p>382.0701293945</text:p>
          </table:table-cell>
          <table:table-cell office:value-type="float" office:value="0.0008534902">
            <text:p>0.0008534902</text:p>
          </table:table-cell>
          <table:table-cell table:number-columns-repeated="4"/>
        </table:table-row>
        <table:table-row table:style-name="ro1">
          <table:table-cell office:value-type="float" office:value="382.181243896484">
            <text:p>382.1812438965</text:p>
          </table:table-cell>
          <table:table-cell office:value-type="float" office:value="0.00497543">
            <text:p>0.00497543</text:p>
          </table:table-cell>
          <table:table-cell table:number-columns-repeated="4"/>
        </table:table-row>
        <table:table-row table:style-name="ro1">
          <table:table-cell office:value-type="float" office:value="382.292358398438">
            <text:p>382.2923583984</text:p>
          </table:table-cell>
          <table:table-cell office:value-type="float" office:value="-0.005519375">
            <text:p>-0.005519375</text:p>
          </table:table-cell>
          <table:table-cell table:number-columns-repeated="4"/>
        </table:table-row>
        <table:table-row table:style-name="ro1">
          <table:table-cell office:value-type="float" office:value="382.403503417969">
            <text:p>382.403503418</text:p>
          </table:table-cell>
          <table:table-cell office:value-type="float" office:value="0.004083221">
            <text:p>0.004083221</text:p>
          </table:table-cell>
          <table:table-cell table:number-columns-repeated="4"/>
        </table:table-row>
        <table:table-row table:style-name="ro1">
          <table:table-cell office:value-type="float" office:value="382.514617919922">
            <text:p>382.5146179199</text:p>
          </table:table-cell>
          <table:table-cell office:value-type="float" office:value="0.01674681">
            <text:p>0.01674681</text:p>
          </table:table-cell>
          <table:table-cell table:number-columns-repeated="4"/>
        </table:table-row>
        <table:table-row table:style-name="ro1">
          <table:table-cell office:value-type="float" office:value="382.625762939453">
            <text:p>382.6257629395</text:p>
          </table:table-cell>
          <table:table-cell office:value-type="float" office:value="-0.004390446">
            <text:p>-0.004390446</text:p>
          </table:table-cell>
          <table:table-cell table:number-columns-repeated="4"/>
        </table:table-row>
        <table:table-row table:style-name="ro1">
          <table:table-cell office:value-type="float" office:value="382.736907958984">
            <text:p>382.736907959</text:p>
          </table:table-cell>
          <table:table-cell office:value-type="float" office:value="0.007497733">
            <text:p>0.007497733</text:p>
          </table:table-cell>
          <table:table-cell table:number-columns-repeated="4"/>
        </table:table-row>
        <table:table-row table:style-name="ro1">
          <table:table-cell office:value-type="float" office:value="382.848052978516">
            <text:p>382.8480529785</text:p>
          </table:table-cell>
          <table:table-cell office:value-type="float" office:value="0.003129203">
            <text:p>0.003129203</text:p>
          </table:table-cell>
          <table:table-cell table:number-columns-repeated="4"/>
        </table:table-row>
        <table:table-row table:style-name="ro1">
          <table:table-cell office:value-type="float" office:value="382.959197998047">
            <text:p>382.959197998</text:p>
          </table:table-cell>
          <table:table-cell office:value-type="float" office:value="0.00888674">
            <text:p>0.00888674</text:p>
          </table:table-cell>
          <table:table-cell table:number-columns-repeated="4"/>
        </table:table-row>
        <table:table-row table:style-name="ro1">
          <table:table-cell office:value-type="float" office:value="383.070343017578">
            <text:p>383.0703430176</text:p>
          </table:table-cell>
          <table:table-cell office:value-type="float" office:value="0.003767248">
            <text:p>0.003767248</text:p>
          </table:table-cell>
          <table:table-cell table:number-columns-repeated="4"/>
        </table:table-row>
        <table:table-row table:style-name="ro1">
          <table:table-cell office:value-type="float" office:value="383.181518554688">
            <text:p>383.1815185547</text:p>
          </table:table-cell>
          <table:table-cell office:value-type="float" office:value="0.01386142">
            <text:p>0.01386142</text:p>
          </table:table-cell>
          <table:table-cell table:number-columns-repeated="4"/>
        </table:table-row>
        <table:table-row table:style-name="ro1">
          <table:table-cell office:value-type="float" office:value="383.292694091797">
            <text:p>383.2926940918</text:p>
          </table:table-cell>
          <table:table-cell office:value-type="float" office:value="0.00330754">
            <text:p>0.00330754</text:p>
          </table:table-cell>
          <table:table-cell table:number-columns-repeated="4"/>
        </table:table-row>
        <table:table-row table:style-name="ro1">
          <table:table-cell office:value-type="float" office:value="383.403869628906">
            <text:p>383.4038696289</text:p>
          </table:table-cell>
          <table:table-cell office:value-type="float" office:value="-0.001992112">
            <text:p>-0.001992112</text:p>
          </table:table-cell>
          <table:table-cell table:number-columns-repeated="4"/>
        </table:table-row>
        <table:table-row table:style-name="ro1">
          <table:table-cell office:value-type="float" office:value="383.515045166016">
            <text:p>383.515045166</text:p>
          </table:table-cell>
          <table:table-cell office:value-type="float" office:value="-0.002037402">
            <text:p>-0.002037402</text:p>
          </table:table-cell>
          <table:table-cell table:number-columns-repeated="4"/>
        </table:table-row>
        <table:table-row table:style-name="ro1">
          <table:table-cell office:value-type="float" office:value="383.626220703125">
            <text:p>383.6262207031</text:p>
          </table:table-cell>
          <table:table-cell office:value-type="float" office:value="0.01216936">
            <text:p>0.01216936</text:p>
          </table:table-cell>
          <table:table-cell table:number-columns-repeated="4"/>
        </table:table-row>
        <table:table-row table:style-name="ro1">
          <table:table-cell office:value-type="float" office:value="383.737426757813">
            <text:p>383.7374267578</text:p>
          </table:table-cell>
          <table:table-cell office:value-type="float" office:value="0.01467805">
            <text:p>0.01467805</text:p>
          </table:table-cell>
          <table:table-cell table:number-columns-repeated="4"/>
        </table:table-row>
        <table:table-row table:style-name="ro1">
          <table:table-cell office:value-type="float" office:value="383.8486328125">
            <text:p>383.8486328125</text:p>
          </table:table-cell>
          <table:table-cell office:value-type="float" office:value="-0.0002931136">
            <text:p>-0.0002931136</text:p>
          </table:table-cell>
          <table:table-cell table:number-columns-repeated="4"/>
        </table:table-row>
        <table:table-row table:style-name="ro1">
          <table:table-cell office:value-type="float" office:value="383.959838867188">
            <text:p>383.9598388672</text:p>
          </table:table-cell>
          <table:table-cell office:value-type="float" office:value="-0.001344333">
            <text:p>-0.001344333</text:p>
          </table:table-cell>
          <table:table-cell table:number-columns-repeated="4"/>
        </table:table-row>
        <table:table-row table:style-name="ro1">
          <table:table-cell office:value-type="float" office:value="384.071044921875">
            <text:p>384.0710449219</text:p>
          </table:table-cell>
          <table:table-cell office:value-type="float" office:value="-0.009813991">
            <text:p>-0.009813991</text:p>
          </table:table-cell>
          <table:table-cell table:number-columns-repeated="4"/>
        </table:table-row>
        <table:table-row table:style-name="ro1">
          <table:table-cell office:value-type="float" office:value="384.182250976563">
            <text:p>384.1822509766</text:p>
          </table:table-cell>
          <table:table-cell office:value-type="float" office:value="0.0119473">
            <text:p>0.0119473</text:p>
          </table:table-cell>
          <table:table-cell table:number-columns-repeated="4"/>
        </table:table-row>
        <table:table-row table:style-name="ro1">
          <table:table-cell office:value-type="float" office:value="384.293487548828">
            <text:p>384.2934875488</text:p>
          </table:table-cell>
          <table:table-cell office:value-type="float" office:value="-0.008897616">
            <text:p>-0.008897616</text:p>
          </table:table-cell>
          <table:table-cell table:number-columns-repeated="4"/>
        </table:table-row>
        <table:table-row table:style-name="ro1">
          <table:table-cell office:value-type="float" office:value="384.404693603516">
            <text:p>384.4046936035</text:p>
          </table:table-cell>
          <table:table-cell office:value-type="float" office:value="0.01181759">
            <text:p>0.01181759</text:p>
          </table:table-cell>
          <table:table-cell table:number-columns-repeated="4"/>
        </table:table-row>
        <table:table-row table:style-name="ro1">
          <table:table-cell office:value-type="float" office:value="384.515930175781">
            <text:p>384.5159301758</text:p>
          </table:table-cell>
          <table:table-cell office:value-type="float" office:value="0.01227586">
            <text:p>0.01227586</text:p>
          </table:table-cell>
          <table:table-cell table:number-columns-repeated="4"/>
        </table:table-row>
        <table:table-row table:style-name="ro1">
          <table:table-cell office:value-type="float" office:value="384.627197265625">
            <text:p>384.6271972656</text:p>
          </table:table-cell>
          <table:table-cell office:value-type="float" office:value="-0.01013604">
            <text:p>-0.01013604</text:p>
          </table:table-cell>
          <table:table-cell table:number-columns-repeated="4"/>
        </table:table-row>
        <table:table-row table:style-name="ro1">
          <table:table-cell office:value-type="float" office:value="384.738433837891">
            <text:p>384.7384338379</text:p>
          </table:table-cell>
          <table:table-cell office:value-type="float" office:value="-0.00504035">
            <text:p>-0.00504035</text:p>
          </table:table-cell>
          <table:table-cell table:number-columns-repeated="4"/>
        </table:table-row>
        <table:table-row table:style-name="ro1">
          <table:table-cell office:value-type="float" office:value="384.849670410156">
            <text:p>384.8496704102</text:p>
          </table:table-cell>
          <table:table-cell office:value-type="float" office:value="0.01818477">
            <text:p>0.01818477</text:p>
          </table:table-cell>
          <table:table-cell table:number-columns-repeated="4"/>
        </table:table-row>
        <table:table-row table:style-name="ro1">
          <table:table-cell office:value-type="float" office:value="384.9609375">
            <text:p>384.9609375</text:p>
          </table:table-cell>
          <table:table-cell office:value-type="float" office:value="0.01371462">
            <text:p>0.01371462</text:p>
          </table:table-cell>
          <table:table-cell table:number-columns-repeated="4"/>
        </table:table-row>
        <table:table-row table:style-name="ro1">
          <table:table-cell office:value-type="float" office:value="385.072204589844">
            <text:p>385.0722045898</text:p>
          </table:table-cell>
          <table:table-cell office:value-type="float" office:value="-0.00687898">
            <text:p>-0.00687898</text:p>
          </table:table-cell>
          <table:table-cell table:number-columns-repeated="4"/>
        </table:table-row>
        <table:table-row table:style-name="ro1">
          <table:table-cell office:value-type="float" office:value="385.183471679688">
            <text:p>385.1834716797</text:p>
          </table:table-cell>
          <table:table-cell office:value-type="float" office:value="0.01526393">
            <text:p>0.01526393</text:p>
          </table:table-cell>
          <table:table-cell table:number-columns-repeated="4"/>
        </table:table-row>
        <table:table-row table:style-name="ro1">
          <table:table-cell office:value-type="float" office:value="385.294738769531">
            <text:p>385.2947387695</text:p>
          </table:table-cell>
          <table:table-cell office:value-type="float" office:value="0.008417744">
            <text:p>0.008417744</text:p>
          </table:table-cell>
          <table:table-cell table:number-columns-repeated="4"/>
        </table:table-row>
        <table:table-row table:style-name="ro1">
          <table:table-cell office:value-type="float" office:value="385.406036376953">
            <text:p>385.406036377</text:p>
          </table:table-cell>
          <table:table-cell office:value-type="float" office:value="-0.003699752">
            <text:p>-0.003699752</text:p>
          </table:table-cell>
          <table:table-cell table:number-columns-repeated="4"/>
        </table:table-row>
        <table:table-row table:style-name="ro1">
          <table:table-cell office:value-type="float" office:value="385.517333984375">
            <text:p>385.5173339844</text:p>
          </table:table-cell>
          <table:table-cell office:value-type="float" office:value="0.003978269">
            <text:p>0.003978269</text:p>
          </table:table-cell>
          <table:table-cell table:number-columns-repeated="4"/>
        </table:table-row>
        <table:table-row table:style-name="ro1">
          <table:table-cell office:value-type="float" office:value="385.628601074219">
            <text:p>385.6286010742</text:p>
          </table:table-cell>
          <table:table-cell office:value-type="float" office:value="-0.004355424">
            <text:p>-0.004355424</text:p>
          </table:table-cell>
          <table:table-cell table:number-columns-repeated="4"/>
        </table:table-row>
        <table:table-row table:style-name="ro1">
          <table:table-cell office:value-type="float" office:value="385.739898681641">
            <text:p>385.7398986816</text:p>
          </table:table-cell>
          <table:table-cell office:value-type="float" office:value="-0.009384851">
            <text:p>-0.009384851</text:p>
          </table:table-cell>
          <table:table-cell table:number-columns-repeated="4"/>
        </table:table-row>
        <table:table-row table:style-name="ro1">
          <table:table-cell office:value-type="float" office:value="385.851226806641">
            <text:p>385.8512268066</text:p>
          </table:table-cell>
          <table:table-cell office:value-type="float" office:value="0.01239854">
            <text:p>0.01239854</text:p>
          </table:table-cell>
          <table:table-cell table:number-columns-repeated="4"/>
        </table:table-row>
        <table:table-row table:style-name="ro1">
          <table:table-cell office:value-type="float" office:value="385.962524414063">
            <text:p>385.9625244141</text:p>
          </table:table-cell>
          <table:table-cell office:value-type="float" office:value="-0.003759502">
            <text:p>-0.003759502</text:p>
          </table:table-cell>
          <table:table-cell table:number-columns-repeated="4"/>
        </table:table-row>
        <table:table-row table:style-name="ro1">
          <table:table-cell office:value-type="float" office:value="386.073852539063">
            <text:p>386.0738525391</text:p>
          </table:table-cell>
          <table:table-cell office:value-type="float" office:value="0.01395449">
            <text:p>0.01395449</text:p>
          </table:table-cell>
          <table:table-cell table:number-columns-repeated="4"/>
        </table:table-row>
        <table:table-row table:style-name="ro1">
          <table:table-cell office:value-type="float" office:value="386.185180664063">
            <text:p>386.1851806641</text:p>
          </table:table-cell>
          <table:table-cell office:value-type="string">
            <text:p>8.04853E-05</text:p>
          </table:table-cell>
          <table:table-cell table:number-columns-repeated="4"/>
        </table:table-row>
        <table:table-row table:style-name="ro1">
          <table:table-cell office:value-type="float" office:value="386.296508789063">
            <text:p>386.2965087891</text:p>
          </table:table-cell>
          <table:table-cell office:value-type="float" office:value="0.007621645">
            <text:p>0.007621645</text:p>
          </table:table-cell>
          <table:table-cell table:number-columns-repeated="4"/>
        </table:table-row>
        <table:table-row table:style-name="ro1">
          <table:table-cell office:value-type="float" office:value="386.407836914063">
            <text:p>386.4078369141</text:p>
          </table:table-cell>
          <table:table-cell office:value-type="float" office:value="0.002285439">
            <text:p>0.002285439</text:p>
          </table:table-cell>
          <table:table-cell table:number-columns-repeated="4"/>
        </table:table-row>
        <table:table-row table:style-name="ro1">
          <table:table-cell office:value-type="float" office:value="386.519165039063">
            <text:p>386.5191650391</text:p>
          </table:table-cell>
          <table:table-cell office:value-type="float" office:value="0.002735665">
            <text:p>0.002735665</text:p>
          </table:table-cell>
          <table:table-cell table:number-columns-repeated="4"/>
        </table:table-row>
        <table:table-row table:style-name="ro1">
          <table:table-cell office:value-type="float" office:value="386.630523681641">
            <text:p>386.6305236816</text:p>
          </table:table-cell>
          <table:table-cell office:value-type="float" office:value="0.002943159">
            <text:p>0.002943159</text:p>
          </table:table-cell>
          <table:table-cell table:number-columns-repeated="4"/>
        </table:table-row>
        <table:table-row table:style-name="ro1">
          <table:table-cell office:value-type="float" office:value="386.741882324219">
            <text:p>386.7418823242</text:p>
          </table:table-cell>
          <table:table-cell office:value-type="float" office:value="-0.0003017488">
            <text:p>-0.0003017488</text:p>
          </table:table-cell>
          <table:table-cell table:number-columns-repeated="4"/>
        </table:table-row>
        <table:table-row table:style-name="ro1">
          <table:table-cell office:value-type="float" office:value="386.853240966797">
            <text:p>386.8532409668</text:p>
          </table:table-cell>
          <table:table-cell office:value-type="float" office:value="-0.003753548">
            <text:p>-0.003753548</text:p>
          </table:table-cell>
          <table:table-cell table:number-columns-repeated="4"/>
        </table:table-row>
        <table:table-row table:style-name="ro1">
          <table:table-cell office:value-type="float" office:value="386.964599609375">
            <text:p>386.9645996094</text:p>
          </table:table-cell>
          <table:table-cell office:value-type="float" office:value="-0.005925657">
            <text:p>-0.005925657</text:p>
          </table:table-cell>
          <table:table-cell table:number-columns-repeated="4"/>
        </table:table-row>
        <table:table-row table:style-name="ro1">
          <table:table-cell office:value-type="float" office:value="387.075958251953">
            <text:p>387.075958252</text:p>
          </table:table-cell>
          <table:table-cell office:value-type="float" office:value="0.0081857">
            <text:p>0.0081857</text:p>
          </table:table-cell>
          <table:table-cell table:number-columns-repeated="4"/>
        </table:table-row>
        <table:table-row table:style-name="ro1">
          <table:table-cell office:value-type="float" office:value="387.187347412109">
            <text:p>387.1873474121</text:p>
          </table:table-cell>
          <table:table-cell office:value-type="float" office:value="-0.006099233">
            <text:p>-0.006099233</text:p>
          </table:table-cell>
          <table:table-cell table:number-columns-repeated="4"/>
        </table:table-row>
        <table:table-row table:style-name="ro1">
          <table:table-cell office:value-type="float" office:value="387.298736572266">
            <text:p>387.2987365723</text:p>
          </table:table-cell>
          <table:table-cell office:value-type="float" office:value="0.01519048">
            <text:p>0.01519048</text:p>
          </table:table-cell>
          <table:table-cell table:number-columns-repeated="4"/>
        </table:table-row>
        <table:table-row table:style-name="ro1">
          <table:table-cell office:value-type="float" office:value="387.410095214844">
            <text:p>387.4100952148</text:p>
          </table:table-cell>
          <table:table-cell office:value-type="float" office:value="0.004799596">
            <text:p>0.004799596</text:p>
          </table:table-cell>
          <table:table-cell table:number-columns-repeated="4"/>
        </table:table-row>
        <table:table-row table:style-name="ro1">
          <table:table-cell office:value-type="float" office:value="387.521514892578">
            <text:p>387.5215148926</text:p>
          </table:table-cell>
          <table:table-cell office:value-type="float" office:value="-0.0009012736">
            <text:p>-0.0009012736</text:p>
          </table:table-cell>
          <table:table-cell table:number-columns-repeated="4"/>
        </table:table-row>
        <table:table-row table:style-name="ro1">
          <table:table-cell office:value-type="float" office:value="387.632904052734">
            <text:p>387.6329040527</text:p>
          </table:table-cell>
          <table:table-cell office:value-type="float" office:value="0.0006317886">
            <text:p>0.0006317886</text:p>
          </table:table-cell>
          <table:table-cell table:number-columns-repeated="4"/>
        </table:table-row>
        <table:table-row table:style-name="ro1">
          <table:table-cell office:value-type="float" office:value="387.744293212891">
            <text:p>387.7442932129</text:p>
          </table:table-cell>
          <table:table-cell office:value-type="float" office:value="0.0141557">
            <text:p>0.0141557</text:p>
          </table:table-cell>
          <table:table-cell table:number-columns-repeated="4"/>
        </table:table-row>
        <table:table-row table:style-name="ro1">
          <table:table-cell office:value-type="float" office:value="387.855712890625">
            <text:p>387.8557128906</text:p>
          </table:table-cell>
          <table:table-cell office:value-type="float" office:value="0.002929705">
            <text:p>0.002929705</text:p>
          </table:table-cell>
          <table:table-cell table:number-columns-repeated="4"/>
        </table:table-row>
        <table:table-row table:style-name="ro1">
          <table:table-cell office:value-type="float" office:value="387.967132568359">
            <text:p>387.9671325684</text:p>
          </table:table-cell>
          <table:table-cell office:value-type="float" office:value="0.004705147">
            <text:p>0.004705147</text:p>
          </table:table-cell>
          <table:table-cell table:number-columns-repeated="4"/>
        </table:table-row>
        <table:table-row table:style-name="ro1">
          <table:table-cell office:value-type="float" office:value="388.078552246094">
            <text:p>388.0785522461</text:p>
          </table:table-cell>
          <table:table-cell office:value-type="float" office:value="0.001353142">
            <text:p>0.001353142</text:p>
          </table:table-cell>
          <table:table-cell table:number-columns-repeated="4"/>
        </table:table-row>
        <table:table-row table:style-name="ro1">
          <table:table-cell office:value-type="float" office:value="388.189971923828">
            <text:p>388.1899719238</text:p>
          </table:table-cell>
          <table:table-cell office:value-type="float" office:value="0.0006638222">
            <text:p>0.0006638222</text:p>
          </table:table-cell>
          <table:table-cell table:number-columns-repeated="4"/>
        </table:table-row>
        <table:table-row table:style-name="ro1">
          <table:table-cell office:value-type="float" office:value="388.301422119141">
            <text:p>388.3014221191</text:p>
          </table:table-cell>
          <table:table-cell office:value-type="float" office:value="-0.005065608">
            <text:p>-0.005065608</text:p>
          </table:table-cell>
          <table:table-cell table:number-columns-repeated="4"/>
        </table:table-row>
        <table:table-row table:style-name="ro1">
          <table:table-cell office:value-type="float" office:value="388.412872314453">
            <text:p>388.4128723145</text:p>
          </table:table-cell>
          <table:table-cell office:value-type="float" office:value="-0.008613306">
            <text:p>-0.008613306</text:p>
          </table:table-cell>
          <table:table-cell table:number-columns-repeated="4"/>
        </table:table-row>
        <table:table-row table:style-name="ro1">
          <table:table-cell office:value-type="float" office:value="388.524291992188">
            <text:p>388.5242919922</text:p>
          </table:table-cell>
          <table:table-cell office:value-type="float" office:value="0.006411649">
            <text:p>0.006411649</text:p>
          </table:table-cell>
          <table:table-cell table:number-columns-repeated="4"/>
        </table:table-row>
        <table:table-row table:style-name="ro1">
          <table:table-cell office:value-type="float" office:value="388.635772705078">
            <text:p>388.6357727051</text:p>
          </table:table-cell>
          <table:table-cell office:value-type="float" office:value="0.00447786">
            <text:p>0.00447786</text:p>
          </table:table-cell>
          <table:table-cell table:number-columns-repeated="4"/>
        </table:table-row>
        <table:table-row table:style-name="ro1">
          <table:table-cell office:value-type="float" office:value="388.747222900391">
            <text:p>388.7472229004</text:p>
          </table:table-cell>
          <table:table-cell office:value-type="float" office:value="-0.001672599">
            <text:p>-0.001672599</text:p>
          </table:table-cell>
          <table:table-cell table:number-columns-repeated="4"/>
        </table:table-row>
        <table:table-row table:style-name="ro1">
          <table:table-cell office:value-type="float" office:value="388.858673095703">
            <text:p>388.8586730957</text:p>
          </table:table-cell>
          <table:table-cell office:value-type="float" office:value="-0.009373079">
            <text:p>-0.009373079</text:p>
          </table:table-cell>
          <table:table-cell table:number-columns-repeated="4"/>
        </table:table-row>
        <table:table-row table:style-name="ro1">
          <table:table-cell office:value-type="float" office:value="388.970153808594">
            <text:p>388.9701538086</text:p>
          </table:table-cell>
          <table:table-cell office:value-type="float" office:value="0.002124142">
            <text:p>0.002124142</text:p>
          </table:table-cell>
          <table:table-cell table:number-columns-repeated="4"/>
        </table:table-row>
        <table:table-row table:style-name="ro1">
          <table:table-cell office:value-type="float" office:value="389.081634521484">
            <text:p>389.0816345215</text:p>
          </table:table-cell>
          <table:table-cell office:value-type="float" office:value="-0.002518456">
            <text:p>-0.002518456</text:p>
          </table:table-cell>
          <table:table-cell table:number-columns-repeated="4"/>
        </table:table-row>
        <table:table-row table:style-name="ro1">
          <table:table-cell office:value-type="float" office:value="389.193115234375">
            <text:p>389.1931152344</text:p>
          </table:table-cell>
          <table:table-cell office:value-type="float" office:value="0.0004690608">
            <text:p>0.0004690608</text:p>
          </table:table-cell>
          <table:table-cell table:number-columns-repeated="4"/>
        </table:table-row>
        <table:table-row table:style-name="ro1">
          <table:table-cell office:value-type="float" office:value="389.304595947266">
            <text:p>389.3045959473</text:p>
          </table:table-cell>
          <table:table-cell office:value-type="float" office:value="-0.002205119">
            <text:p>-0.002205119</text:p>
          </table:table-cell>
          <table:table-cell table:number-columns-repeated="4"/>
        </table:table-row>
        <table:table-row table:style-name="ro1">
          <table:table-cell office:value-type="float" office:value="389.416076660156">
            <text:p>389.4160766602</text:p>
          </table:table-cell>
          <table:table-cell office:value-type="float" office:value="0.00359391">
            <text:p>0.00359391</text:p>
          </table:table-cell>
          <table:table-cell table:number-columns-repeated="4"/>
        </table:table-row>
        <table:table-row table:style-name="ro1">
          <table:table-cell office:value-type="float" office:value="389.527587890625">
            <text:p>389.5275878906</text:p>
          </table:table-cell>
          <table:table-cell office:value-type="float" office:value="-0.003162294">
            <text:p>-0.003162294</text:p>
          </table:table-cell>
          <table:table-cell table:number-columns-repeated="4"/>
        </table:table-row>
        <table:table-row table:style-name="ro1">
          <table:table-cell office:value-type="float" office:value="389.639099121094">
            <text:p>389.6390991211</text:p>
          </table:table-cell>
          <table:table-cell office:value-type="float" office:value="0.0146093">
            <text:p>0.0146093</text:p>
          </table:table-cell>
          <table:table-cell table:number-columns-repeated="4"/>
        </table:table-row>
        <table:table-row table:style-name="ro1">
          <table:table-cell office:value-type="float" office:value="389.750610351563">
            <text:p>389.7506103516</text:p>
          </table:table-cell>
          <table:table-cell office:value-type="float" office:value="-0.003518627">
            <text:p>-0.003518627</text:p>
          </table:table-cell>
          <table:table-cell table:number-columns-repeated="4"/>
        </table:table-row>
        <table:table-row table:style-name="ro1">
          <table:table-cell office:value-type="float" office:value="389.862121582031">
            <text:p>389.862121582</text:p>
          </table:table-cell>
          <table:table-cell office:value-type="float" office:value="-0.004140439">
            <text:p>-0.004140439</text:p>
          </table:table-cell>
          <table:table-cell table:number-columns-repeated="4"/>
        </table:table-row>
        <table:table-row table:style-name="ro1">
          <table:table-cell office:value-type="float" office:value="389.9736328125">
            <text:p>389.9736328125</text:p>
          </table:table-cell>
          <table:table-cell office:value-type="float" office:value="-0.002462953">
            <text:p>-0.002462953</text:p>
          </table:table-cell>
          <table:table-cell table:number-columns-repeated="4"/>
        </table:table-row>
        <table:table-row table:style-name="ro1">
          <table:table-cell office:value-type="float" office:value="390.085174560547">
            <text:p>390.0851745605</text:p>
          </table:table-cell>
          <table:table-cell office:value-type="float" office:value="-0.003344008">
            <text:p>-0.003344008</text:p>
          </table:table-cell>
          <table:table-cell table:number-columns-repeated="4"/>
        </table:table-row>
        <table:table-row table:style-name="ro1">
          <table:table-cell office:value-type="float" office:value="390.196685791016">
            <text:p>390.196685791</text:p>
          </table:table-cell>
          <table:table-cell office:value-type="float" office:value="0.01467158">
            <text:p>0.01467158</text:p>
          </table:table-cell>
          <table:table-cell table:number-columns-repeated="4"/>
        </table:table-row>
        <table:table-row table:style-name="ro1">
          <table:table-cell office:value-type="float" office:value="390.308227539063">
            <text:p>390.3082275391</text:p>
          </table:table-cell>
          <table:table-cell office:value-type="float" office:value="-0.0007962032">
            <text:p>-0.0007962032</text:p>
          </table:table-cell>
          <table:table-cell table:number-columns-repeated="4"/>
        </table:table-row>
        <table:table-row table:style-name="ro1">
          <table:table-cell office:value-type="float" office:value="390.419769287109">
            <text:p>390.4197692871</text:p>
          </table:table-cell>
          <table:table-cell office:value-type="float" office:value="-0.0001198491">
            <text:p>-0.0001198491</text:p>
          </table:table-cell>
          <table:table-cell table:number-columns-repeated="4"/>
        </table:table-row>
        <table:table-row table:style-name="ro1">
          <table:table-cell office:value-type="float" office:value="390.531341552734">
            <text:p>390.5313415527</text:p>
          </table:table-cell>
          <table:table-cell office:value-type="float" office:value="0.00154321">
            <text:p>0.00154321</text:p>
          </table:table-cell>
          <table:table-cell table:number-columns-repeated="4"/>
        </table:table-row>
        <table:table-row table:style-name="ro1">
          <table:table-cell office:value-type="float" office:value="390.642883300781">
            <text:p>390.6428833008</text:p>
          </table:table-cell>
          <table:table-cell office:value-type="float" office:value="-0.004614714">
            <text:p>-0.004614714</text:p>
          </table:table-cell>
          <table:table-cell table:number-columns-repeated="4"/>
        </table:table-row>
        <table:table-row table:style-name="ro1">
          <table:table-cell office:value-type="float" office:value="390.754455566406">
            <text:p>390.7544555664</text:p>
          </table:table-cell>
          <table:table-cell office:value-type="float" office:value="0.01454072">
            <text:p>0.01454072</text:p>
          </table:table-cell>
          <table:table-cell table:number-columns-repeated="4"/>
        </table:table-row>
        <table:table-row table:style-name="ro1">
          <table:table-cell office:value-type="float" office:value="390.866027832031">
            <text:p>390.866027832</text:p>
          </table:table-cell>
          <table:table-cell office:value-type="string">
            <text:p>4.947576E-05</text:p>
          </table:table-cell>
          <table:table-cell table:number-columns-repeated="4"/>
        </table:table-row>
        <table:table-row table:style-name="ro1">
          <table:table-cell office:value-type="float" office:value="390.977600097656">
            <text:p>390.9776000977</text:p>
          </table:table-cell>
          <table:table-cell office:value-type="float" office:value="-0.0004354332">
            <text:p>-0.0004354332</text:p>
          </table:table-cell>
          <table:table-cell table:number-columns-repeated="4"/>
        </table:table-row>
        <table:table-row table:style-name="ro1">
          <table:table-cell office:value-type="float" office:value="391.089172363281">
            <text:p>391.0891723633</text:p>
          </table:table-cell>
          <table:table-cell office:value-type="float" office:value="-0.007383076">
            <text:p>-0.007383076</text:p>
          </table:table-cell>
          <table:table-cell table:number-columns-repeated="4"/>
        </table:table-row>
        <table:table-row table:style-name="ro1">
          <table:table-cell office:value-type="float" office:value="391.200744628906">
            <text:p>391.2007446289</text:p>
          </table:table-cell>
          <table:table-cell office:value-type="float" office:value="0.01728223">
            <text:p>0.01728223</text:p>
          </table:table-cell>
          <table:table-cell table:number-columns-repeated="4"/>
        </table:table-row>
        <table:table-row table:style-name="ro1">
          <table:table-cell office:value-type="float" office:value="391.312347412109">
            <text:p>391.3123474121</text:p>
          </table:table-cell>
          <table:table-cell office:value-type="float" office:value="-0.002118485">
            <text:p>-0.002118485</text:p>
          </table:table-cell>
          <table:table-cell table:number-columns-repeated="4"/>
        </table:table-row>
        <table:table-row table:style-name="ro1">
          <table:table-cell office:value-type="float" office:value="391.423950195313">
            <text:p>391.4239501953</text:p>
          </table:table-cell>
          <table:table-cell office:value-type="float" office:value="0.01287675">
            <text:p>0.01287675</text:p>
          </table:table-cell>
          <table:table-cell table:number-columns-repeated="4"/>
        </table:table-row>
        <table:table-row table:style-name="ro1">
          <table:table-cell office:value-type="float" office:value="391.535552978516">
            <text:p>391.5355529785</text:p>
          </table:table-cell>
          <table:table-cell office:value-type="float" office:value="-0.01022927">
            <text:p>-0.01022927</text:p>
          </table:table-cell>
          <table:table-cell table:number-columns-repeated="4"/>
        </table:table-row>
        <table:table-row table:style-name="ro1">
          <table:table-cell office:value-type="float" office:value="391.647155761719">
            <text:p>391.6471557617</text:p>
          </table:table-cell>
          <table:table-cell office:value-type="float" office:value="0.00384869">
            <text:p>0.00384869</text:p>
          </table:table-cell>
          <table:table-cell table:number-columns-repeated="4"/>
        </table:table-row>
        <table:table-row table:style-name="ro1">
          <table:table-cell office:value-type="float" office:value="391.758758544922">
            <text:p>391.7587585449</text:p>
          </table:table-cell>
          <table:table-cell office:value-type="float" office:value="-0.01021748">
            <text:p>-0.01021748</text:p>
          </table:table-cell>
          <table:table-cell table:number-columns-repeated="4"/>
        </table:table-row>
        <table:table-row table:style-name="ro1">
          <table:table-cell office:value-type="float" office:value="391.870391845703">
            <text:p>391.8703918457</text:p>
          </table:table-cell>
          <table:table-cell office:value-type="float" office:value="0.01261685">
            <text:p>0.01261685</text:p>
          </table:table-cell>
          <table:table-cell table:number-columns-repeated="4"/>
        </table:table-row>
        <table:table-row table:style-name="ro1">
          <table:table-cell office:value-type="float" office:value="391.982025146484">
            <text:p>391.9820251465</text:p>
          </table:table-cell>
          <table:table-cell office:value-type="float" office:value="0.002375296">
            <text:p>0.002375296</text:p>
          </table:table-cell>
          <table:table-cell table:number-columns-repeated="4"/>
        </table:table-row>
        <table:table-row table:style-name="ro1">
          <table:table-cell office:value-type="float" office:value="392.093658447266">
            <text:p>392.0936584473</text:p>
          </table:table-cell>
          <table:table-cell office:value-type="float" office:value="-0.009060538">
            <text:p>-0.009060538</text:p>
          </table:table-cell>
          <table:table-cell table:number-columns-repeated="4"/>
        </table:table-row>
        <table:table-row table:style-name="ro1">
          <table:table-cell office:value-type="float" office:value="392.205291748047">
            <text:p>392.205291748</text:p>
          </table:table-cell>
          <table:table-cell office:value-type="float" office:value="-0.0008861387">
            <text:p>-0.0008861387</text:p>
          </table:table-cell>
          <table:table-cell table:number-columns-repeated="4"/>
        </table:table-row>
        <table:table-row table:style-name="ro1">
          <table:table-cell office:value-type="float" office:value="392.316925048828">
            <text:p>392.3169250488</text:p>
          </table:table-cell>
          <table:table-cell office:value-type="float" office:value="0.01702654">
            <text:p>0.01702654</text:p>
          </table:table-cell>
          <table:table-cell table:number-columns-repeated="4"/>
        </table:table-row>
        <table:table-row table:style-name="ro1">
          <table:table-cell office:value-type="float" office:value="392.428558349609">
            <text:p>392.4285583496</text:p>
          </table:table-cell>
          <table:table-cell office:value-type="float" office:value="0.01210119">
            <text:p>0.01210119</text:p>
          </table:table-cell>
          <table:table-cell table:number-columns-repeated="4"/>
        </table:table-row>
        <table:table-row table:style-name="ro1">
          <table:table-cell office:value-type="float" office:value="392.540222167969">
            <text:p>392.540222168</text:p>
          </table:table-cell>
          <table:table-cell office:value-type="float" office:value="-0.004840761">
            <text:p>-0.004840761</text:p>
          </table:table-cell>
          <table:table-cell table:number-columns-repeated="4"/>
        </table:table-row>
        <table:table-row table:style-name="ro1">
          <table:table-cell office:value-type="float" office:value="392.651885986328">
            <text:p>392.6518859863</text:p>
          </table:table-cell>
          <table:table-cell office:value-type="float" office:value="-0.00922903">
            <text:p>-0.00922903</text:p>
          </table:table-cell>
          <table:table-cell table:number-columns-repeated="4"/>
        </table:table-row>
        <table:table-row table:style-name="ro1">
          <table:table-cell office:value-type="float" office:value="392.763549804688">
            <text:p>392.7635498047</text:p>
          </table:table-cell>
          <table:table-cell office:value-type="float" office:value="-0.001466417">
            <text:p>-0.001466417</text:p>
          </table:table-cell>
          <table:table-cell table:number-columns-repeated="4"/>
        </table:table-row>
        <table:table-row table:style-name="ro1">
          <table:table-cell office:value-type="float" office:value="392.875213623047">
            <text:p>392.875213623</text:p>
          </table:table-cell>
          <table:table-cell office:value-type="float" office:value="-0.001000075">
            <text:p>-0.001000075</text:p>
          </table:table-cell>
          <table:table-cell table:number-columns-repeated="4"/>
        </table:table-row>
        <table:table-row table:style-name="ro1">
          <table:table-cell office:value-type="float" office:value="392.986907958984">
            <text:p>392.986907959</text:p>
          </table:table-cell>
          <table:table-cell office:value-type="float" office:value="0.003742097">
            <text:p>0.003742097</text:p>
          </table:table-cell>
          <table:table-cell table:number-columns-repeated="4"/>
        </table:table-row>
        <table:table-row table:style-name="ro1">
          <table:table-cell office:value-type="float" office:value="393.098602294922">
            <text:p>393.0986022949</text:p>
          </table:table-cell>
          <table:table-cell office:value-type="float" office:value="0.01472213">
            <text:p>0.01472213</text:p>
          </table:table-cell>
          <table:table-cell table:number-columns-repeated="4"/>
        </table:table-row>
        <table:table-row table:style-name="ro1">
          <table:table-cell office:value-type="float" office:value="393.210266113281">
            <text:p>393.2102661133</text:p>
          </table:table-cell>
          <table:table-cell office:value-type="float" office:value="-0.004792956">
            <text:p>-0.004792956</text:p>
          </table:table-cell>
          <table:table-cell table:number-columns-repeated="4"/>
        </table:table-row>
        <table:table-row table:style-name="ro1">
          <table:table-cell office:value-type="float" office:value="393.321960449219">
            <text:p>393.3219604492</text:p>
          </table:table-cell>
          <table:table-cell office:value-type="float" office:value="-0.003235079">
            <text:p>-0.003235079</text:p>
          </table:table-cell>
          <table:table-cell table:number-columns-repeated="4"/>
        </table:table-row>
        <table:table-row table:style-name="ro1">
          <table:table-cell office:value-type="float" office:value="393.433685302734">
            <text:p>393.4336853027</text:p>
          </table:table-cell>
          <table:table-cell office:value-type="float" office:value="-0.006699661">
            <text:p>-0.006699661</text:p>
          </table:table-cell>
          <table:table-cell table:number-columns-repeated="4"/>
        </table:table-row>
        <table:table-row table:style-name="ro1">
          <table:table-cell office:value-type="float" office:value="393.545379638672">
            <text:p>393.5453796387</text:p>
          </table:table-cell>
          <table:table-cell office:value-type="float" office:value="-0.01050174">
            <text:p>-0.01050174</text:p>
          </table:table-cell>
          <table:table-cell table:number-columns-repeated="4"/>
        </table:table-row>
        <table:table-row table:style-name="ro1">
          <table:table-cell office:value-type="float" office:value="393.657104492188">
            <text:p>393.6571044922</text:p>
          </table:table-cell>
          <table:table-cell office:value-type="float" office:value="0.0009251167">
            <text:p>0.0009251167</text:p>
          </table:table-cell>
          <table:table-cell table:number-columns-repeated="4"/>
        </table:table-row>
        <table:table-row table:style-name="ro1">
          <table:table-cell office:value-type="float" office:value="393.768798828125">
            <text:p>393.7687988281</text:p>
          </table:table-cell>
          <table:table-cell office:value-type="float" office:value="-0.006905654">
            <text:p>-0.006905654</text:p>
          </table:table-cell>
          <table:table-cell table:number-columns-repeated="4"/>
        </table:table-row>
        <table:table-row table:style-name="ro1">
          <table:table-cell office:value-type="float" office:value="393.880523681641">
            <text:p>393.8805236816</text:p>
          </table:table-cell>
          <table:table-cell office:value-type="float" office:value="0.01322583">
            <text:p>0.01322583</text:p>
          </table:table-cell>
          <table:table-cell table:number-columns-repeated="4"/>
        </table:table-row>
        <table:table-row table:style-name="ro1">
          <table:table-cell office:value-type="float" office:value="393.992248535156">
            <text:p>393.9922485352</text:p>
          </table:table-cell>
          <table:table-cell office:value-type="float" office:value="0.02354866">
            <text:p>0.02354866</text:p>
          </table:table-cell>
          <table:table-cell table:number-columns-repeated="4"/>
        </table:table-row>
        <table:table-row table:style-name="ro1">
          <table:table-cell office:value-type="float" office:value="394.10400390625">
            <text:p>394.1040039063</text:p>
          </table:table-cell>
          <table:table-cell office:value-type="float" office:value="-0.007252138">
            <text:p>-0.007252138</text:p>
          </table:table-cell>
          <table:table-cell table:number-columns-repeated="4"/>
        </table:table-row>
        <table:table-row table:style-name="ro1">
          <table:table-cell office:value-type="float" office:value="394.215728759766">
            <text:p>394.2157287598</text:p>
          </table:table-cell>
          <table:table-cell office:value-type="float" office:value="0.001620305">
            <text:p>0.001620305</text:p>
          </table:table-cell>
          <table:table-cell table:number-columns-repeated="4"/>
        </table:table-row>
        <table:table-row table:style-name="ro1">
          <table:table-cell office:value-type="float" office:value="394.327484130859">
            <text:p>394.3274841309</text:p>
          </table:table-cell>
          <table:table-cell office:value-type="float" office:value="0.005961653">
            <text:p>0.005961653</text:p>
          </table:table-cell>
          <table:table-cell table:number-columns-repeated="4"/>
        </table:table-row>
        <table:table-row table:style-name="ro1">
          <table:table-cell office:value-type="float" office:value="394.439239501953">
            <text:p>394.439239502</text:p>
          </table:table-cell>
          <table:table-cell office:value-type="float" office:value="-0.001833039">
            <text:p>-0.001833039</text:p>
          </table:table-cell>
          <table:table-cell table:number-columns-repeated="4"/>
        </table:table-row>
        <table:table-row table:style-name="ro1">
          <table:table-cell office:value-type="float" office:value="394.550994873047">
            <text:p>394.550994873</text:p>
          </table:table-cell>
          <table:table-cell office:value-type="float" office:value="-0.008436098">
            <text:p>-0.008436098</text:p>
          </table:table-cell>
          <table:table-cell table:number-columns-repeated="4"/>
        </table:table-row>
        <table:table-row table:style-name="ro1">
          <table:table-cell office:value-type="float" office:value="394.662750244141">
            <text:p>394.6627502441</text:p>
          </table:table-cell>
          <table:table-cell office:value-type="float" office:value="0.003502536">
            <text:p>0.003502536</text:p>
          </table:table-cell>
          <table:table-cell table:number-columns-repeated="4"/>
        </table:table-row>
        <table:table-row table:style-name="ro1">
          <table:table-cell office:value-type="float" office:value="394.774536132813">
            <text:p>394.7745361328</text:p>
          </table:table-cell>
          <table:table-cell office:value-type="float" office:value="-0.003978101">
            <text:p>-0.003978101</text:p>
          </table:table-cell>
          <table:table-cell table:number-columns-repeated="4"/>
        </table:table-row>
        <table:table-row table:style-name="ro1">
          <table:table-cell office:value-type="float" office:value="394.886291503906">
            <text:p>394.8862915039</text:p>
          </table:table-cell>
          <table:table-cell office:value-type="float" office:value="0.007545869">
            <text:p>0.007545869</text:p>
          </table:table-cell>
          <table:table-cell table:number-columns-repeated="4"/>
        </table:table-row>
        <table:table-row table:style-name="ro1">
          <table:table-cell office:value-type="float" office:value="394.998077392578">
            <text:p>394.9980773926</text:p>
          </table:table-cell>
          <table:table-cell office:value-type="float" office:value="-0.004235778">
            <text:p>-0.004235778</text:p>
          </table:table-cell>
          <table:table-cell table:number-columns-repeated="4"/>
        </table:table-row>
        <table:table-row table:style-name="ro1">
          <table:table-cell office:value-type="float" office:value="395.10986328125">
            <text:p>395.1098632813</text:p>
          </table:table-cell>
          <table:table-cell office:value-type="float" office:value="0.0101316">
            <text:p>0.0101316</text:p>
          </table:table-cell>
          <table:table-cell table:number-columns-repeated="4"/>
        </table:table-row>
        <table:table-row table:style-name="ro1">
          <table:table-cell office:value-type="float" office:value="395.221649169922">
            <text:p>395.2216491699</text:p>
          </table:table-cell>
          <table:table-cell office:value-type="float" office:value="-0.003916468">
            <text:p>-0.003916468</text:p>
          </table:table-cell>
          <table:table-cell table:number-columns-repeated="4"/>
        </table:table-row>
        <table:table-row table:style-name="ro1">
          <table:table-cell office:value-type="float" office:value="395.333465576172">
            <text:p>395.3334655762</text:p>
          </table:table-cell>
          <table:table-cell office:value-type="float" office:value="-0.009190084">
            <text:p>-0.009190084</text:p>
          </table:table-cell>
          <table:table-cell table:number-columns-repeated="4"/>
        </table:table-row>
        <table:table-row table:style-name="ro1">
          <table:table-cell office:value-type="float" office:value="395.445251464844">
            <text:p>395.4452514648</text:p>
          </table:table-cell>
          <table:table-cell office:value-type="float" office:value="-0.003386212">
            <text:p>-0.003386212</text:p>
          </table:table-cell>
          <table:table-cell table:number-columns-repeated="4"/>
        </table:table-row>
        <table:table-row table:style-name="ro1">
          <table:table-cell office:value-type="float" office:value="395.557067871094">
            <text:p>395.5570678711</text:p>
          </table:table-cell>
          <table:table-cell office:value-type="float" office:value="-0.007523664">
            <text:p>-0.007523664</text:p>
          </table:table-cell>
          <table:table-cell table:number-columns-repeated="4"/>
        </table:table-row>
        <table:table-row table:style-name="ro1">
          <table:table-cell office:value-type="float" office:value="395.668884277344">
            <text:p>395.6688842773</text:p>
          </table:table-cell>
          <table:table-cell office:value-type="float" office:value="0.04747699">
            <text:p>0.04747699</text:p>
          </table:table-cell>
          <table:table-cell table:number-columns-repeated="4"/>
        </table:table-row>
        <table:table-row table:style-name="ro1">
          <table:table-cell office:value-type="float" office:value="395.780700683594">
            <text:p>395.7807006836</text:p>
          </table:table-cell>
          <table:table-cell office:value-type="float" office:value="-0.004414401">
            <text:p>-0.004414401</text:p>
          </table:table-cell>
          <table:table-cell table:number-columns-repeated="4"/>
        </table:table-row>
        <table:table-row table:style-name="ro1">
          <table:table-cell office:value-type="float" office:value="395.892547607422">
            <text:p>395.8925476074</text:p>
          </table:table-cell>
          <table:table-cell office:value-type="float" office:value="0.003120668">
            <text:p>0.003120668</text:p>
          </table:table-cell>
          <table:table-cell table:number-columns-repeated="4"/>
        </table:table-row>
        <table:table-row table:style-name="ro1">
          <table:table-cell office:value-type="float" office:value="396.004364013672">
            <text:p>396.0043640137</text:p>
          </table:table-cell>
          <table:table-cell office:value-type="float" office:value="0.00220665">
            <text:p>0.00220665</text:p>
          </table:table-cell>
          <table:table-cell table:number-columns-repeated="4"/>
        </table:table-row>
        <table:table-row table:style-name="ro1">
          <table:table-cell office:value-type="float" office:value="396.1162109375">
            <text:p>396.1162109375</text:p>
          </table:table-cell>
          <table:table-cell office:value-type="float" office:value="0.05101816">
            <text:p>0.05101816</text:p>
          </table:table-cell>
          <table:table-cell table:number-columns-repeated="4"/>
        </table:table-row>
        <table:table-row table:style-name="ro1">
          <table:table-cell office:value-type="float" office:value="396.228057861328">
            <text:p>396.2280578613</text:p>
          </table:table-cell>
          <table:table-cell office:value-type="float" office:value="-0.001548551">
            <text:p>-0.001548551</text:p>
          </table:table-cell>
          <table:table-cell table:number-columns-repeated="4"/>
        </table:table-row>
        <table:table-row table:style-name="ro1">
          <table:table-cell office:value-type="float" office:value="396.339904785156">
            <text:p>396.3399047852</text:p>
          </table:table-cell>
          <table:table-cell office:value-type="float" office:value="-0.001668771">
            <text:p>-0.001668771</text:p>
          </table:table-cell>
          <table:table-cell table:number-columns-repeated="4"/>
        </table:table-row>
        <table:table-row table:style-name="ro1">
          <table:table-cell office:value-type="float" office:value="396.451751708984">
            <text:p>396.451751709</text:p>
          </table:table-cell>
          <table:table-cell office:value-type="float" office:value="-0.00536308">
            <text:p>-0.00536308</text:p>
          </table:table-cell>
          <table:table-cell table:number-columns-repeated="4"/>
        </table:table-row>
        <table:table-row table:style-name="ro1">
          <table:table-cell office:value-type="float" office:value="396.563629150391">
            <text:p>396.5636291504</text:p>
          </table:table-cell>
          <table:table-cell office:value-type="float" office:value="-0.008864581">
            <text:p>-0.008864581</text:p>
          </table:table-cell>
          <table:table-cell table:number-columns-repeated="4"/>
        </table:table-row>
        <table:table-row table:style-name="ro1">
          <table:table-cell office:value-type="float" office:value="396.675476074219">
            <text:p>396.6754760742</text:p>
          </table:table-cell>
          <table:table-cell office:value-type="float" office:value="-0.004018947">
            <text:p>-0.004018947</text:p>
          </table:table-cell>
          <table:table-cell table:number-columns-repeated="4"/>
        </table:table-row>
        <table:table-row table:style-name="ro1">
          <table:table-cell office:value-type="float" office:value="396.787353515625">
            <text:p>396.7873535156</text:p>
          </table:table-cell>
          <table:table-cell office:value-type="float" office:value="0.01311566">
            <text:p>0.01311566</text:p>
          </table:table-cell>
          <table:table-cell table:number-columns-repeated="4"/>
        </table:table-row>
        <table:table-row table:style-name="ro1">
          <table:table-cell office:value-type="float" office:value="396.899230957031">
            <text:p>396.899230957</text:p>
          </table:table-cell>
          <table:table-cell office:value-type="float" office:value="-0.005280325">
            <text:p>-0.005280325</text:p>
          </table:table-cell>
          <table:table-cell table:number-columns-repeated="4"/>
        </table:table-row>
        <table:table-row table:style-name="ro1">
          <table:table-cell office:value-type="float" office:value="397.011108398438">
            <text:p>397.0111083984</text:p>
          </table:table-cell>
          <table:table-cell office:value-type="float" office:value="0.0005674674">
            <text:p>0.0005674674</text:p>
          </table:table-cell>
          <table:table-cell table:number-columns-repeated="4"/>
        </table:table-row>
        <table:table-row table:style-name="ro1">
          <table:table-cell office:value-type="float" office:value="397.123016357422">
            <text:p>397.1230163574</text:p>
          </table:table-cell>
          <table:table-cell office:value-type="float" office:value="-0.005157115">
            <text:p>-0.005157115</text:p>
          </table:table-cell>
          <table:table-cell table:number-columns-repeated="4"/>
        </table:table-row>
        <table:table-row table:style-name="ro1">
          <table:table-cell office:value-type="float" office:value="397.234893798828">
            <text:p>397.2348937988</text:p>
          </table:table-cell>
          <table:table-cell office:value-type="float" office:value="0.0053641">
            <text:p>0.0053641</text:p>
          </table:table-cell>
          <table:table-cell table:number-columns-repeated="4"/>
        </table:table-row>
        <table:table-row table:style-name="ro1">
          <table:table-cell office:value-type="float" office:value="397.346801757813">
            <text:p>397.3468017578</text:p>
          </table:table-cell>
          <table:table-cell office:value-type="float" office:value="0.002525869">
            <text:p>0.002525869</text:p>
          </table:table-cell>
          <table:table-cell table:number-columns-repeated="4"/>
        </table:table-row>
        <table:table-row table:style-name="ro1">
          <table:table-cell office:value-type="float" office:value="397.458709716797">
            <text:p>397.4587097168</text:p>
          </table:table-cell>
          <table:table-cell office:value-type="float" office:value="-0.003175183">
            <text:p>-0.003175183</text:p>
          </table:table-cell>
          <table:table-cell table:number-columns-repeated="4"/>
        </table:table-row>
        <table:table-row table:style-name="ro1">
          <table:table-cell office:value-type="float" office:value="397.570617675781">
            <text:p>397.5706176758</text:p>
          </table:table-cell>
          <table:table-cell office:value-type="float" office:value="0.005692258">
            <text:p>0.005692258</text:p>
          </table:table-cell>
          <table:table-cell table:number-columns-repeated="4"/>
        </table:table-row>
        <table:table-row table:style-name="ro1">
          <table:table-cell office:value-type="float" office:value="397.682525634766">
            <text:p>397.6825256348</text:p>
          </table:table-cell>
          <table:table-cell office:value-type="float" office:value="-0.003982089">
            <text:p>-0.003982089</text:p>
          </table:table-cell>
          <table:table-cell table:number-columns-repeated="4"/>
        </table:table-row>
        <table:table-row table:style-name="ro1">
          <table:table-cell office:value-type="float" office:value="397.794464111328">
            <text:p>397.7944641113</text:p>
          </table:table-cell>
          <table:table-cell office:value-type="float" office:value="0.002501332">
            <text:p>0.002501332</text:p>
          </table:table-cell>
          <table:table-cell table:number-columns-repeated="4"/>
        </table:table-row>
        <table:table-row table:style-name="ro1">
          <table:table-cell office:value-type="float" office:value="397.906402587891">
            <text:p>397.9064025879</text:p>
          </table:table-cell>
          <table:table-cell office:value-type="float" office:value="0.0009207895">
            <text:p>0.0009207895</text:p>
          </table:table-cell>
          <table:table-cell table:number-columns-repeated="4"/>
        </table:table-row>
        <table:table-row table:style-name="ro1">
          <table:table-cell office:value-type="float" office:value="398.018310546875">
            <text:p>398.0183105469</text:p>
          </table:table-cell>
          <table:table-cell office:value-type="float" office:value="0.005881796">
            <text:p>0.005881796</text:p>
          </table:table-cell>
          <table:table-cell table:number-columns-repeated="4"/>
        </table:table-row>
        <table:table-row table:style-name="ro1">
          <table:table-cell office:value-type="float" office:value="398.130249023438">
            <text:p>398.1302490234</text:p>
          </table:table-cell>
          <table:table-cell office:value-type="float" office:value="-0.003218646">
            <text:p>-0.003218646</text:p>
          </table:table-cell>
          <table:table-cell table:number-columns-repeated="4"/>
        </table:table-row>
        <table:table-row table:style-name="ro1">
          <table:table-cell office:value-type="float" office:value="398.242218017578">
            <text:p>398.2422180176</text:p>
          </table:table-cell>
          <table:table-cell office:value-type="float" office:value="-0.004773479">
            <text:p>-0.004773479</text:p>
          </table:table-cell>
          <table:table-cell table:number-columns-repeated="4"/>
        </table:table-row>
        <table:table-row table:style-name="ro1">
          <table:table-cell office:value-type="float" office:value="398.354156494141">
            <text:p>398.3541564941</text:p>
          </table:table-cell>
          <table:table-cell office:value-type="float" office:value="-0.003282453">
            <text:p>-0.003282453</text:p>
          </table:table-cell>
          <table:table-cell table:number-columns-repeated="4"/>
        </table:table-row>
        <table:table-row table:style-name="ro1">
          <table:table-cell office:value-type="float" office:value="398.466125488281">
            <text:p>398.4661254883</text:p>
          </table:table-cell>
          <table:table-cell office:value-type="float" office:value="-0.001791312">
            <text:p>-0.001791312</text:p>
          </table:table-cell>
          <table:table-cell table:number-columns-repeated="4"/>
        </table:table-row>
        <table:table-row table:style-name="ro1">
          <table:table-cell office:value-type="float" office:value="398.578094482422">
            <text:p>398.5780944824</text:p>
          </table:table-cell>
          <table:table-cell office:value-type="float" office:value="-0.001875834">
            <text:p>-0.001875834</text:p>
          </table:table-cell>
          <table:table-cell table:number-columns-repeated="4"/>
        </table:table-row>
        <table:table-row table:style-name="ro1">
          <table:table-cell office:value-type="float" office:value="398.690063476563">
            <text:p>398.6900634766</text:p>
          </table:table-cell>
          <table:table-cell office:value-type="float" office:value="-0.00756342">
            <text:p>-0.00756342</text:p>
          </table:table-cell>
          <table:table-cell table:number-columns-repeated="4"/>
        </table:table-row>
        <table:table-row table:style-name="ro1">
          <table:table-cell office:value-type="float" office:value="398.802032470703">
            <text:p>398.8020324707</text:p>
          </table:table-cell>
          <table:table-cell office:value-type="float" office:value="-0.006325537">
            <text:p>-0.006325537</text:p>
          </table:table-cell>
          <table:table-cell table:number-columns-repeated="4"/>
        </table:table-row>
        <table:table-row table:style-name="ro1">
          <table:table-cell office:value-type="float" office:value="398.914001464844">
            <text:p>398.9140014648</text:p>
          </table:table-cell>
          <table:table-cell office:value-type="float" office:value="-0.00490001">
            <text:p>-0.00490001</text:p>
          </table:table-cell>
          <table:table-cell table:number-columns-repeated="4"/>
        </table:table-row>
        <table:table-row table:style-name="ro1">
          <table:table-cell office:value-type="float" office:value="399.026000976563">
            <text:p>399.0260009766</text:p>
          </table:table-cell>
          <table:table-cell office:value-type="float" office:value="0.02248574">
            <text:p>0.02248574</text:p>
          </table:table-cell>
          <table:table-cell table:number-columns-repeated="4"/>
        </table:table-row>
        <table:table-row table:style-name="ro1">
          <table:table-cell office:value-type="float" office:value="399.137969970703">
            <text:p>399.1379699707</text:p>
          </table:table-cell>
          <table:table-cell office:value-type="float" office:value="-0.003797016">
            <text:p>-0.003797016</text:p>
          </table:table-cell>
          <table:table-cell table:number-columns-repeated="4"/>
        </table:table-row>
        <table:table-row table:style-name="ro1">
          <table:table-cell office:value-type="float" office:value="399.249969482422">
            <text:p>399.2499694824</text:p>
          </table:table-cell>
          <table:table-cell office:value-type="float" office:value="0.01713434">
            <text:p>0.01713434</text:p>
          </table:table-cell>
          <table:table-cell table:number-columns-repeated="4"/>
        </table:table-row>
        <table:table-row table:style-name="ro1">
          <table:table-cell office:value-type="float" office:value="399.361968994141">
            <text:p>399.3619689941</text:p>
          </table:table-cell>
          <table:table-cell office:value-type="float" office:value="-0.005198224">
            <text:p>-0.005198224</text:p>
          </table:table-cell>
          <table:table-cell table:number-columns-repeated="4"/>
        </table:table-row>
        <table:table-row table:style-name="ro1">
          <table:table-cell office:value-type="float" office:value="399.473999023438">
            <text:p>399.4739990234</text:p>
          </table:table-cell>
          <table:table-cell office:value-type="float" office:value="0.008648579">
            <text:p>0.008648579</text:p>
          </table:table-cell>
          <table:table-cell table:number-columns-repeated="4"/>
        </table:table-row>
        <table:table-row table:style-name="ro1">
          <table:table-cell office:value-type="float" office:value="399.585998535156">
            <text:p>399.5859985352</text:p>
          </table:table-cell>
          <table:table-cell office:value-type="float" office:value="-0.0008001596">
            <text:p>-0.0008001596</text:p>
          </table:table-cell>
          <table:table-cell table:number-columns-repeated="4"/>
        </table:table-row>
        <table:table-row table:style-name="ro1">
          <table:table-cell office:value-type="float" office:value="399.698028564453">
            <text:p>399.6980285645</text:p>
          </table:table-cell>
          <table:table-cell office:value-type="float" office:value="-0.002673468">
            <text:p>-0.002673468</text:p>
          </table:table-cell>
          <table:table-cell table:number-columns-repeated="4"/>
        </table:table-row>
        <table:table-row table:style-name="ro1">
          <table:table-cell office:value-type="float" office:value="399.81005859375">
            <text:p>399.8100585938</text:p>
          </table:table-cell>
          <table:table-cell office:value-type="float" office:value="-0.007100711">
            <text:p>-0.007100711</text:p>
          </table:table-cell>
          <table:table-cell table:number-columns-repeated="4"/>
        </table:table-row>
        <table:table-row table:style-name="ro1">
          <table:table-cell office:value-type="float" office:value="399.922088623047">
            <text:p>399.922088623</text:p>
          </table:table-cell>
          <table:table-cell office:value-type="float" office:value="-0.003403381">
            <text:p>-0.003403381</text:p>
          </table:table-cell>
          <table:table-cell table:number-columns-repeated="4"/>
        </table:table-row>
        <table:table-row table:style-name="ro1">
          <table:table-cell office:value-type="float" office:value="400.034118652344">
            <text:p>400.0341186523</text:p>
          </table:table-cell>
          <table:table-cell office:value-type="float" office:value="-0.006844314">
            <text:p>-0.006844314</text:p>
          </table:table-cell>
          <table:table-cell table:number-columns-repeated="4"/>
        </table:table-row>
        <table:table-row table:style-name="ro1">
          <table:table-cell office:value-type="float" office:value="400.146148681641">
            <text:p>400.1461486816</text:p>
          </table:table-cell>
          <table:table-cell office:value-type="float" office:value="-0.0006648538">
            <text:p>-0.0006648538</text:p>
          </table:table-cell>
          <table:table-cell table:number-columns-repeated="4"/>
        </table:table-row>
        <table:table-row table:style-name="ro1">
          <table:table-cell office:value-type="float" office:value="400.258209228516">
            <text:p>400.2582092285</text:p>
          </table:table-cell>
          <table:table-cell office:value-type="float" office:value="-0.0035933">
            <text:p>-0.0035933</text:p>
          </table:table-cell>
          <table:table-cell table:number-columns-repeated="4"/>
        </table:table-row>
        <table:table-row table:style-name="ro1">
          <table:table-cell office:value-type="float" office:value="400.370269775391">
            <text:p>400.3702697754</text:p>
          </table:table-cell>
          <table:table-cell office:value-type="float" office:value="0.002244878">
            <text:p>0.002244878</text:p>
          </table:table-cell>
          <table:table-cell table:number-columns-repeated="4"/>
        </table:table-row>
        <table:table-row table:style-name="ro1">
          <table:table-cell office:value-type="float" office:value="400.482330322266">
            <text:p>400.4823303223</text:p>
          </table:table-cell>
          <table:table-cell office:value-type="float" office:value="-0.003013011">
            <text:p>-0.003013011</text:p>
          </table:table-cell>
          <table:table-cell table:number-columns-repeated="4"/>
        </table:table-row>
        <table:table-row table:style-name="ro1">
          <table:table-cell office:value-type="float" office:value="400.594390869141">
            <text:p>400.5943908691</text:p>
          </table:table-cell>
          <table:table-cell office:value-type="float" office:value="0.006167931">
            <text:p>0.006167931</text:p>
          </table:table-cell>
          <table:table-cell table:number-columns-repeated="4"/>
        </table:table-row>
        <table:table-row table:style-name="ro1">
          <table:table-cell office:value-type="float" office:value="400.706451416016">
            <text:p>400.706451416</text:p>
          </table:table-cell>
          <table:table-cell office:value-type="float" office:value="-0.004713777">
            <text:p>-0.004713777</text:p>
          </table:table-cell>
          <table:table-cell table:number-columns-repeated="4"/>
        </table:table-row>
        <table:table-row table:style-name="ro1">
          <table:table-cell office:value-type="float" office:value="400.818511962891">
            <text:p>400.8185119629</text:p>
          </table:table-cell>
          <table:table-cell office:value-type="float" office:value="0.007022446">
            <text:p>0.007022446</text:p>
          </table:table-cell>
          <table:table-cell table:number-columns-repeated="4"/>
        </table:table-row>
        <table:table-row table:style-name="ro1">
          <table:table-cell office:value-type="float" office:value="400.930603027344">
            <text:p>400.9306030273</text:p>
          </table:table-cell>
          <table:table-cell office:value-type="float" office:value="0.006815197">
            <text:p>0.006815197</text:p>
          </table:table-cell>
          <table:table-cell table:number-columns-repeated="4"/>
        </table:table-row>
        <table:table-row table:style-name="ro1">
          <table:table-cell office:value-type="float" office:value="401.042694091797">
            <text:p>401.0426940918</text:p>
          </table:table-cell>
          <table:table-cell office:value-type="float" office:value="-0.001622118">
            <text:p>-0.001622118</text:p>
          </table:table-cell>
          <table:table-cell table:number-columns-repeated="4"/>
        </table:table-row>
        <table:table-row table:style-name="ro1">
          <table:table-cell office:value-type="float" office:value="401.15478515625">
            <text:p>401.1547851563</text:p>
          </table:table-cell>
          <table:table-cell office:value-type="float" office:value="0.004349187">
            <text:p>0.004349187</text:p>
          </table:table-cell>
          <table:table-cell table:number-columns-repeated="4"/>
        </table:table-row>
        <table:table-row table:style-name="ro1">
          <table:table-cell office:value-type="float" office:value="401.266876220703">
            <text:p>401.2668762207</text:p>
          </table:table-cell>
          <table:table-cell office:value-type="float" office:value="0.003777184">
            <text:p>0.003777184</text:p>
          </table:table-cell>
          <table:table-cell table:number-columns-repeated="4"/>
        </table:table-row>
        <table:table-row table:style-name="ro1">
          <table:table-cell office:value-type="float" office:value="401.378997802734">
            <text:p>401.3789978027</text:p>
          </table:table-cell>
          <table:table-cell office:value-type="string">
            <text:p>-2.065125E-05</text:p>
          </table:table-cell>
          <table:table-cell table:number-columns-repeated="4"/>
        </table:table-row>
        <table:table-row table:style-name="ro1">
          <table:table-cell office:value-type="float" office:value="401.491088867188">
            <text:p>401.4910888672</text:p>
          </table:table-cell>
          <table:table-cell office:value-type="float" office:value="-0.002256269">
            <text:p>-0.002256269</text:p>
          </table:table-cell>
          <table:table-cell table:number-columns-repeated="4"/>
        </table:table-row>
        <table:table-row table:style-name="ro1">
          <table:table-cell office:value-type="float" office:value="401.603210449219">
            <text:p>401.6032104492</text:p>
          </table:table-cell>
          <table:table-cell office:value-type="float" office:value="-0.001766174">
            <text:p>-0.001766174</text:p>
          </table:table-cell>
          <table:table-cell table:number-columns-repeated="4"/>
        </table:table-row>
        <table:table-row table:style-name="ro1">
          <table:table-cell office:value-type="float" office:value="401.71533203125">
            <text:p>401.7153320313</text:p>
          </table:table-cell>
          <table:table-cell office:value-type="float" office:value="-0.003724026">
            <text:p>-0.003724026</text:p>
          </table:table-cell>
          <table:table-cell table:number-columns-repeated="4"/>
        </table:table-row>
        <table:table-row table:style-name="ro1">
          <table:table-cell office:value-type="float" office:value="401.827453613281">
            <text:p>401.8274536133</text:p>
          </table:table-cell>
          <table:table-cell office:value-type="float" office:value="0.001824243">
            <text:p>0.001824243</text:p>
          </table:table-cell>
          <table:table-cell table:number-columns-repeated="4"/>
        </table:table-row>
        <table:table-row table:style-name="ro1">
          <table:table-cell office:value-type="float" office:value="401.939605712891">
            <text:p>401.9396057129</text:p>
          </table:table-cell>
          <table:table-cell office:value-type="float" office:value="0.00180006">
            <text:p>0.00180006</text:p>
          </table:table-cell>
          <table:table-cell table:number-columns-repeated="4"/>
        </table:table-row>
        <table:table-row table:style-name="ro1">
          <table:table-cell office:value-type="float" office:value="402.051727294922">
            <text:p>402.0517272949</text:p>
          </table:table-cell>
          <table:table-cell office:value-type="float" office:value="-0.00637651">
            <text:p>-0.00637651</text:p>
          </table:table-cell>
          <table:table-cell table:number-columns-repeated="4"/>
        </table:table-row>
        <table:table-row table:style-name="ro1">
          <table:table-cell office:value-type="float" office:value="402.163879394531">
            <text:p>402.1638793945</text:p>
          </table:table-cell>
          <table:table-cell office:value-type="float" office:value="0.01137072">
            <text:p>0.01137072</text:p>
          </table:table-cell>
          <table:table-cell table:number-columns-repeated="4"/>
        </table:table-row>
        <table:table-row table:style-name="ro1">
          <table:table-cell office:value-type="float" office:value="402.276031494141">
            <text:p>402.2760314941</text:p>
          </table:table-cell>
          <table:table-cell office:value-type="float" office:value="-0.002973034">
            <text:p>-0.002973034</text:p>
          </table:table-cell>
          <table:table-cell table:number-columns-repeated="4"/>
        </table:table-row>
        <table:table-row table:style-name="ro1">
          <table:table-cell office:value-type="float" office:value="402.38818359375">
            <text:p>402.3881835938</text:p>
          </table:table-cell>
          <table:table-cell office:value-type="float" office:value="-0.001636764">
            <text:p>-0.001636764</text:p>
          </table:table-cell>
          <table:table-cell table:number-columns-repeated="4"/>
        </table:table-row>
        <table:table-row table:style-name="ro1">
          <table:table-cell office:value-type="float" office:value="402.500335693359">
            <text:p>402.5003356934</text:p>
          </table:table-cell>
          <table:table-cell office:value-type="float" office:value="-0.0002378966">
            <text:p>-0.0002378966</text:p>
          </table:table-cell>
          <table:table-cell table:number-columns-repeated="4"/>
        </table:table-row>
        <table:table-row table:style-name="ro1">
          <table:table-cell office:value-type="float" office:value="402.612487792969">
            <text:p>402.612487793</text:p>
          </table:table-cell>
          <table:table-cell office:value-type="float" office:value="0.006377168">
            <text:p>0.006377168</text:p>
          </table:table-cell>
          <table:table-cell table:number-columns-repeated="4"/>
        </table:table-row>
        <table:table-row table:style-name="ro1">
          <table:table-cell office:value-type="float" office:value="402.724670410156">
            <text:p>402.7246704102</text:p>
          </table:table-cell>
          <table:table-cell office:value-type="float" office:value="0.005430566">
            <text:p>0.005430566</text:p>
          </table:table-cell>
          <table:table-cell table:number-columns-repeated="4"/>
        </table:table-row>
        <table:table-row table:style-name="ro1">
          <table:table-cell office:value-type="float" office:value="402.836853027344">
            <text:p>402.8368530273</text:p>
          </table:table-cell>
          <table:table-cell office:value-type="float" office:value="0.003576145">
            <text:p>0.003576145</text:p>
          </table:table-cell>
          <table:table-cell table:number-columns-repeated="4"/>
        </table:table-row>
        <table:table-row table:style-name="ro1">
          <table:table-cell office:value-type="float" office:value="402.949035644531">
            <text:p>402.9490356445</text:p>
          </table:table-cell>
          <table:table-cell office:value-type="float" office:value="0.01379569">
            <text:p>0.01379569</text:p>
          </table:table-cell>
          <table:table-cell table:number-columns-repeated="4"/>
        </table:table-row>
        <table:table-row table:style-name="ro1">
          <table:table-cell office:value-type="float" office:value="403.061218261719">
            <text:p>403.0612182617</text:p>
          </table:table-cell>
          <table:table-cell office:value-type="float" office:value="0.001703843">
            <text:p>0.001703843</text:p>
          </table:table-cell>
          <table:table-cell table:number-columns-repeated="4"/>
        </table:table-row>
        <table:table-row table:style-name="ro1">
          <table:table-cell office:value-type="float" office:value="403.173400878906">
            <text:p>403.1734008789</text:p>
          </table:table-cell>
          <table:table-cell office:value-type="float" office:value="0.01220961">
            <text:p>0.01220961</text:p>
          </table:table-cell>
          <table:table-cell table:number-columns-repeated="4"/>
        </table:table-row>
        <table:table-row table:style-name="ro1">
          <table:table-cell office:value-type="float" office:value="403.285614013672">
            <text:p>403.2856140137</text:p>
          </table:table-cell>
          <table:table-cell office:value-type="float" office:value="-0.002059844">
            <text:p>-0.002059844</text:p>
          </table:table-cell>
          <table:table-cell table:number-columns-repeated="4"/>
        </table:table-row>
        <table:table-row table:style-name="ro1">
          <table:table-cell office:value-type="float" office:value="403.397827148438">
            <text:p>403.3978271484</text:p>
          </table:table-cell>
          <table:table-cell office:value-type="float" office:value="-0.007102965">
            <text:p>-0.007102965</text:p>
          </table:table-cell>
          <table:table-cell table:number-columns-repeated="4"/>
        </table:table-row>
        <table:table-row table:style-name="ro1">
          <table:table-cell office:value-type="float" office:value="403.510040283203">
            <text:p>403.5100402832</text:p>
          </table:table-cell>
          <table:table-cell office:value-type="float" office:value="0.001698328">
            <text:p>0.001698328</text:p>
          </table:table-cell>
          <table:table-cell table:number-columns-repeated="4"/>
        </table:table-row>
        <table:table-row table:style-name="ro1">
          <table:table-cell office:value-type="float" office:value="403.622253417969">
            <text:p>403.622253418</text:p>
          </table:table-cell>
          <table:table-cell office:value-type="float" office:value="-0.008298472">
            <text:p>-0.008298472</text:p>
          </table:table-cell>
          <table:table-cell table:number-columns-repeated="4"/>
        </table:table-row>
        <table:table-row table:style-name="ro1">
          <table:table-cell office:value-type="float" office:value="403.734466552734">
            <text:p>403.7344665527</text:p>
          </table:table-cell>
          <table:table-cell office:value-type="float" office:value="0.001771753">
            <text:p>0.001771753</text:p>
          </table:table-cell>
          <table:table-cell table:number-columns-repeated="4"/>
        </table:table-row>
        <table:table-row table:style-name="ro1">
          <table:table-cell office:value-type="float" office:value="403.8466796875">
            <text:p>403.8466796875</text:p>
          </table:table-cell>
          <table:table-cell office:value-type="float" office:value="-0.002910332">
            <text:p>-0.002910332</text:p>
          </table:table-cell>
          <table:table-cell table:number-columns-repeated="4"/>
        </table:table-row>
        <table:table-row table:style-name="ro1">
          <table:table-cell office:value-type="float" office:value="403.958923339844">
            <text:p>403.9589233398</text:p>
          </table:table-cell>
          <table:table-cell office:value-type="float" office:value="-0.001534963">
            <text:p>-0.001534963</text:p>
          </table:table-cell>
          <table:table-cell table:number-columns-repeated="4"/>
        </table:table-row>
        <table:table-row table:style-name="ro1">
          <table:table-cell office:value-type="float" office:value="404.071166992188">
            <text:p>404.0711669922</text:p>
          </table:table-cell>
          <table:table-cell office:value-type="float" office:value="-0.001303525">
            <text:p>-0.001303525</text:p>
          </table:table-cell>
          <table:table-cell table:number-columns-repeated="4"/>
        </table:table-row>
        <table:table-row table:style-name="ro1">
          <table:table-cell office:value-type="float" office:value="404.183410644531">
            <text:p>404.1834106445</text:p>
          </table:table-cell>
          <table:table-cell office:value-type="float" office:value="-0.009881848">
            <text:p>-0.009881848</text:p>
          </table:table-cell>
          <table:table-cell table:number-columns-repeated="4"/>
        </table:table-row>
        <table:table-row table:style-name="ro1">
          <table:table-cell office:value-type="float" office:value="404.295654296875">
            <text:p>404.2956542969</text:p>
          </table:table-cell>
          <table:table-cell office:value-type="float" office:value="0.01020919">
            <text:p>0.01020919</text:p>
          </table:table-cell>
          <table:table-cell table:number-columns-repeated="4"/>
        </table:table-row>
        <table:table-row table:style-name="ro1">
          <table:table-cell office:value-type="float" office:value="404.407897949219">
            <text:p>404.4078979492</text:p>
          </table:table-cell>
          <table:table-cell office:value-type="float" office:value="-0.01077463">
            <text:p>-0.01077463</text:p>
          </table:table-cell>
          <table:table-cell table:number-columns-repeated="4"/>
        </table:table-row>
        <table:table-row table:style-name="ro1">
          <table:table-cell office:value-type="float" office:value="404.520172119141">
            <text:p>404.5201721191</text:p>
          </table:table-cell>
          <table:table-cell office:value-type="float" office:value="0.004578633">
            <text:p>0.004578633</text:p>
          </table:table-cell>
          <table:table-cell table:number-columns-repeated="4"/>
        </table:table-row>
        <table:table-row table:style-name="ro1">
          <table:table-cell office:value-type="float" office:value="404.632446289063">
            <text:p>404.6324462891</text:p>
          </table:table-cell>
          <table:table-cell office:value-type="float" office:value="0.005169075">
            <text:p>0.005169075</text:p>
          </table:table-cell>
          <table:table-cell table:number-columns-repeated="4"/>
        </table:table-row>
        <table:table-row table:style-name="ro1">
          <table:table-cell office:value-type="float" office:value="404.744689941406">
            <text:p>404.7446899414</text:p>
          </table:table-cell>
          <table:table-cell office:value-type="float" office:value="0.004475663">
            <text:p>0.004475663</text:p>
          </table:table-cell>
          <table:table-cell table:number-columns-repeated="4"/>
        </table:table-row>
        <table:table-row table:style-name="ro1">
          <table:table-cell office:value-type="float" office:value="404.856994628906">
            <text:p>404.8569946289</text:p>
          </table:table-cell>
          <table:table-cell office:value-type="float" office:value="-0.009857737">
            <text:p>-0.009857737</text:p>
          </table:table-cell>
          <table:table-cell table:number-columns-repeated="4"/>
        </table:table-row>
        <table:table-row table:style-name="ro1">
          <table:table-cell office:value-type="float" office:value="404.969268798828">
            <text:p>404.9692687988</text:p>
          </table:table-cell>
          <table:table-cell office:value-type="float" office:value="0.002827793">
            <text:p>0.002827793</text:p>
          </table:table-cell>
          <table:table-cell table:number-columns-repeated="4"/>
        </table:table-row>
        <table:table-row table:style-name="ro1">
          <table:table-cell office:value-type="float" office:value="405.08154296875">
            <text:p>405.0815429688</text:p>
          </table:table-cell>
          <table:table-cell office:value-type="float" office:value="0.01462576">
            <text:p>0.01462576</text:p>
          </table:table-cell>
          <table:table-cell table:number-columns-repeated="4"/>
        </table:table-row>
        <table:table-row table:style-name="ro1">
          <table:table-cell office:value-type="float" office:value="405.19384765625">
            <text:p>405.1938476563</text:p>
          </table:table-cell>
          <table:table-cell office:value-type="float" office:value="-0.006115757">
            <text:p>-0.006115757</text:p>
          </table:table-cell>
          <table:table-cell table:number-columns-repeated="4"/>
        </table:table-row>
        <table:table-row table:style-name="ro1">
          <table:table-cell office:value-type="float" office:value="405.30615234375">
            <text:p>405.3061523438</text:p>
          </table:table-cell>
          <table:table-cell office:value-type="string">
            <text:p>7.08489E-05</text:p>
          </table:table-cell>
          <table:table-cell table:number-columns-repeated="4"/>
        </table:table-row>
        <table:table-row table:style-name="ro1">
          <table:table-cell office:value-type="float" office:value="405.41845703125">
            <text:p>405.4184570313</text:p>
          </table:table-cell>
          <table:table-cell office:value-type="float" office:value="-0.0004217975">
            <text:p>-0.0004217975</text:p>
          </table:table-cell>
          <table:table-cell table:number-columns-repeated="4"/>
        </table:table-row>
        <table:table-row table:style-name="ro1">
          <table:table-cell office:value-type="float" office:value="405.53076171875">
            <text:p>405.5307617188</text:p>
          </table:table-cell>
          <table:table-cell office:value-type="float" office:value="0.009818374">
            <text:p>0.009818374</text:p>
          </table:table-cell>
          <table:table-cell table:number-columns-repeated="4"/>
        </table:table-row>
        <table:table-row table:style-name="ro1">
          <table:table-cell office:value-type="float" office:value="405.64306640625">
            <text:p>405.6430664063</text:p>
          </table:table-cell>
          <table:table-cell office:value-type="float" office:value="-0.003810995">
            <text:p>-0.003810995</text:p>
          </table:table-cell>
          <table:table-cell table:number-columns-repeated="4"/>
        </table:table-row>
        <table:table-row table:style-name="ro1">
          <table:table-cell office:value-type="float" office:value="405.755401611328">
            <text:p>405.7554016113</text:p>
          </table:table-cell>
          <table:table-cell office:value-type="float" office:value="-0.002881553">
            <text:p>-0.002881553</text:p>
          </table:table-cell>
          <table:table-cell table:number-columns-repeated="4"/>
        </table:table-row>
        <table:table-row table:style-name="ro1">
          <table:table-cell office:value-type="float" office:value="405.867706298828">
            <text:p>405.8677062988</text:p>
          </table:table-cell>
          <table:table-cell office:value-type="float" office:value="-0.004194655">
            <text:p>-0.004194655</text:p>
          </table:table-cell>
          <table:table-cell table:number-columns-repeated="4"/>
        </table:table-row>
        <table:table-row table:style-name="ro1">
          <table:table-cell office:value-type="float" office:value="405.980041503906">
            <text:p>405.9800415039</text:p>
          </table:table-cell>
          <table:table-cell office:value-type="float" office:value="0.01797592">
            <text:p>0.01797592</text:p>
          </table:table-cell>
          <table:table-cell table:number-columns-repeated="4"/>
        </table:table-row>
        <table:table-row table:style-name="ro1">
          <table:table-cell office:value-type="float" office:value="406.092376708984">
            <text:p>406.092376709</text:p>
          </table:table-cell>
          <table:table-cell office:value-type="float" office:value="-0.008335699">
            <text:p>-0.008335699</text:p>
          </table:table-cell>
          <table:table-cell table:number-columns-repeated="4"/>
        </table:table-row>
        <table:table-row table:style-name="ro1">
          <table:table-cell office:value-type="float" office:value="406.204742431641">
            <text:p>406.2047424316</text:p>
          </table:table-cell>
          <table:table-cell office:value-type="float" office:value="0.006907581">
            <text:p>0.006907581</text:p>
          </table:table-cell>
          <table:table-cell table:number-columns-repeated="4"/>
        </table:table-row>
        <table:table-row table:style-name="ro1">
          <table:table-cell office:value-type="float" office:value="406.317077636719">
            <text:p>406.3170776367</text:p>
          </table:table-cell>
          <table:table-cell office:value-type="float" office:value="0.0001820605">
            <text:p>0.0001820605</text:p>
          </table:table-cell>
          <table:table-cell table:number-columns-repeated="4"/>
        </table:table-row>
        <table:table-row table:style-name="ro1">
          <table:table-cell office:value-type="float" office:value="406.429443359375">
            <text:p>406.4294433594</text:p>
          </table:table-cell>
          <table:table-cell office:value-type="float" office:value="-0.007727366">
            <text:p>-0.007727366</text:p>
          </table:table-cell>
          <table:table-cell table:number-columns-repeated="4"/>
        </table:table-row>
        <table:table-row table:style-name="ro1">
          <table:table-cell office:value-type="float" office:value="406.541809082031">
            <text:p>406.541809082</text:p>
          </table:table-cell>
          <table:table-cell office:value-type="float" office:value="0.0003439099">
            <text:p>0.0003439099</text:p>
          </table:table-cell>
          <table:table-cell table:number-columns-repeated="4"/>
        </table:table-row>
        <table:table-row table:style-name="ro1">
          <table:table-cell office:value-type="float" office:value="406.654174804688">
            <text:p>406.6541748047</text:p>
          </table:table-cell>
          <table:table-cell office:value-type="float" office:value="-0.007320527">
            <text:p>-0.007320527</text:p>
          </table:table-cell>
          <table:table-cell table:number-columns-repeated="4"/>
        </table:table-row>
        <table:table-row table:style-name="ro1">
          <table:table-cell office:value-type="float" office:value="406.766540527344">
            <text:p>406.7665405273</text:p>
          </table:table-cell>
          <table:table-cell office:value-type="float" office:value="-0.009025524">
            <text:p>-0.009025524</text:p>
          </table:table-cell>
          <table:table-cell table:number-columns-repeated="4"/>
        </table:table-row>
        <table:table-row table:style-name="ro1">
          <table:table-cell office:value-type="float" office:value="406.87890625">
            <text:p>406.87890625</text:p>
          </table:table-cell>
          <table:table-cell office:value-type="float" office:value="-0.005727544">
            <text:p>-0.005727544</text:p>
          </table:table-cell>
          <table:table-cell table:number-columns-repeated="4"/>
        </table:table-row>
        <table:table-row table:style-name="ro1">
          <table:table-cell office:value-type="float" office:value="406.991302490234">
            <text:p>406.9913024902</text:p>
          </table:table-cell>
          <table:table-cell office:value-type="float" office:value="0.0008205281">
            <text:p>0.0008205281</text:p>
          </table:table-cell>
          <table:table-cell table:number-columns-repeated="4"/>
        </table:table-row>
        <table:table-row table:style-name="ro1">
          <table:table-cell office:value-type="float" office:value="407.103668212891">
            <text:p>407.1036682129</text:p>
          </table:table-cell>
          <table:table-cell office:value-type="float" office:value="-0.005614146">
            <text:p>-0.005614146</text:p>
          </table:table-cell>
          <table:table-cell table:number-columns-repeated="4"/>
        </table:table-row>
        <table:table-row table:style-name="ro1">
          <table:table-cell office:value-type="float" office:value="407.216064453125">
            <text:p>407.2160644531</text:p>
          </table:table-cell>
          <table:table-cell office:value-type="float" office:value="0.01792471">
            <text:p>0.01792471</text:p>
          </table:table-cell>
          <table:table-cell table:number-columns-repeated="4"/>
        </table:table-row>
        <table:table-row table:style-name="ro1">
          <table:table-cell office:value-type="float" office:value="407.328460693359">
            <text:p>407.3284606934</text:p>
          </table:table-cell>
          <table:table-cell office:value-type="float" office:value="0.003306279">
            <text:p>0.003306279</text:p>
          </table:table-cell>
          <table:table-cell table:number-columns-repeated="4"/>
        </table:table-row>
        <table:table-row table:style-name="ro1">
          <table:table-cell office:value-type="float" office:value="407.440887451172">
            <text:p>407.4408874512</text:p>
          </table:table-cell>
          <table:table-cell office:value-type="float" office:value="-0.00276176">
            <text:p>-0.00276176</text:p>
          </table:table-cell>
          <table:table-cell table:number-columns-repeated="4"/>
        </table:table-row>
        <table:table-row table:style-name="ro1">
          <table:table-cell office:value-type="float" office:value="407.553283691406">
            <text:p>407.5532836914</text:p>
          </table:table-cell>
          <table:table-cell office:value-type="float" office:value="0.008667987">
            <text:p>0.008667987</text:p>
          </table:table-cell>
          <table:table-cell table:number-columns-repeated="4"/>
        </table:table-row>
        <table:table-row table:style-name="ro1">
          <table:table-cell office:value-type="float" office:value="407.665710449219">
            <text:p>407.6657104492</text:p>
          </table:table-cell>
          <table:table-cell office:value-type="float" office:value="-0.004060698">
            <text:p>-0.004060698</text:p>
          </table:table-cell>
          <table:table-cell table:number-columns-repeated="4"/>
        </table:table-row>
        <table:table-row table:style-name="ro1">
          <table:table-cell office:value-type="float" office:value="407.778106689453">
            <text:p>407.7781066895</text:p>
          </table:table-cell>
          <table:table-cell office:value-type="float" office:value="0.01424109">
            <text:p>0.01424109</text:p>
          </table:table-cell>
          <table:table-cell table:number-columns-repeated="4"/>
        </table:table-row>
        <table:table-row table:style-name="ro1">
          <table:table-cell office:value-type="float" office:value="407.890533447266">
            <text:p>407.8905334473</text:p>
          </table:table-cell>
          <table:table-cell office:value-type="float" office:value="0.005586747">
            <text:p>0.005586747</text:p>
          </table:table-cell>
          <table:table-cell table:number-columns-repeated="4"/>
        </table:table-row>
        <table:table-row table:style-name="ro1">
          <table:table-cell office:value-type="float" office:value="408.002990722656">
            <text:p>408.0029907227</text:p>
          </table:table-cell>
          <table:table-cell office:value-type="float" office:value="0.009023538">
            <text:p>0.009023538</text:p>
          </table:table-cell>
          <table:table-cell table:number-columns-repeated="4"/>
        </table:table-row>
        <table:table-row table:style-name="ro1">
          <table:table-cell office:value-type="float" office:value="408.115417480469">
            <text:p>408.1154174805</text:p>
          </table:table-cell>
          <table:table-cell office:value-type="float" office:value="0.003296986">
            <text:p>0.003296986</text:p>
          </table:table-cell>
          <table:table-cell table:number-columns-repeated="4"/>
        </table:table-row>
        <table:table-row table:style-name="ro1">
          <table:table-cell office:value-type="float" office:value="408.227844238281">
            <text:p>408.2278442383</text:p>
          </table:table-cell>
          <table:table-cell office:value-type="float" office:value="0.02144731">
            <text:p>0.02144731</text:p>
          </table:table-cell>
          <table:table-cell table:number-columns-repeated="4"/>
        </table:table-row>
        <table:table-row table:style-name="ro1">
          <table:table-cell office:value-type="float" office:value="408.340301513672">
            <text:p>408.3403015137</text:p>
          </table:table-cell>
          <table:table-cell office:value-type="float" office:value="-0.01259705">
            <text:p>-0.01259705</text:p>
          </table:table-cell>
          <table:table-cell table:number-columns-repeated="4"/>
        </table:table-row>
        <table:table-row table:style-name="ro1">
          <table:table-cell office:value-type="float" office:value="408.452758789063">
            <text:p>408.4527587891</text:p>
          </table:table-cell>
          <table:table-cell office:value-type="float" office:value="-0.00261665">
            <text:p>-0.00261665</text:p>
          </table:table-cell>
          <table:table-cell table:number-columns-repeated="4"/>
        </table:table-row>
        <table:table-row table:style-name="ro1">
          <table:table-cell office:value-type="float" office:value="408.565216064453">
            <text:p>408.5652160645</text:p>
          </table:table-cell>
          <table:table-cell office:value-type="float" office:value="-0.006040527">
            <text:p>-0.006040527</text:p>
          </table:table-cell>
          <table:table-cell table:number-columns-repeated="4"/>
        </table:table-row>
        <table:table-row table:style-name="ro1">
          <table:table-cell office:value-type="float" office:value="408.677673339844">
            <text:p>408.6776733398</text:p>
          </table:table-cell>
          <table:table-cell office:value-type="float" office:value="-0.002194641">
            <text:p>-0.002194641</text:p>
          </table:table-cell>
          <table:table-cell table:number-columns-repeated="4"/>
        </table:table-row>
        <table:table-row table:style-name="ro1">
          <table:table-cell office:value-type="float" office:value="408.790161132813">
            <text:p>408.7901611328</text:p>
          </table:table-cell>
          <table:table-cell office:value-type="float" office:value="-0.004726573">
            <text:p>-0.004726573</text:p>
          </table:table-cell>
          <table:table-cell table:number-columns-repeated="4"/>
        </table:table-row>
        <table:table-row table:style-name="ro1">
          <table:table-cell office:value-type="float" office:value="408.902618408203">
            <text:p>408.9026184082</text:p>
          </table:table-cell>
          <table:table-cell office:value-type="float" office:value="-0.003494194">
            <text:p>-0.003494194</text:p>
          </table:table-cell>
          <table:table-cell table:number-columns-repeated="4"/>
        </table:table-row>
        <table:table-row table:style-name="ro1">
          <table:table-cell office:value-type="float" office:value="409.015106201172">
            <text:p>409.0151062012</text:p>
          </table:table-cell>
          <table:table-cell office:value-type="float" office:value="-0.006492816">
            <text:p>-0.006492816</text:p>
          </table:table-cell>
          <table:table-cell table:number-columns-repeated="4"/>
        </table:table-row>
        <table:table-row table:style-name="ro1">
          <table:table-cell office:value-type="float" office:value="409.127593994141">
            <text:p>409.1275939941</text:p>
          </table:table-cell>
          <table:table-cell office:value-type="float" office:value="0.001199774">
            <text:p>0.001199774</text:p>
          </table:table-cell>
          <table:table-cell table:number-columns-repeated="4"/>
        </table:table-row>
        <table:table-row table:style-name="ro1">
          <table:table-cell office:value-type="float" office:value="409.240081787109">
            <text:p>409.2400817871</text:p>
          </table:table-cell>
          <table:table-cell office:value-type="float" office:value="0.002053908">
            <text:p>0.002053908</text:p>
          </table:table-cell>
          <table:table-cell table:number-columns-repeated="4"/>
        </table:table-row>
        <table:table-row table:style-name="ro1">
          <table:table-cell office:value-type="float" office:value="409.352569580078">
            <text:p>409.3525695801</text:p>
          </table:table-cell>
          <table:table-cell office:value-type="float" office:value="-0.01022485">
            <text:p>-0.01022485</text:p>
          </table:table-cell>
          <table:table-cell table:number-columns-repeated="4"/>
        </table:table-row>
        <table:table-row table:style-name="ro1">
          <table:table-cell office:value-type="float" office:value="409.465087890625">
            <text:p>409.4650878906</text:p>
          </table:table-cell>
          <table:table-cell office:value-type="float" office:value="-0.0036233">
            <text:p>-0.0036233</text:p>
          </table:table-cell>
          <table:table-cell table:number-columns-repeated="4"/>
        </table:table-row>
        <table:table-row table:style-name="ro1">
          <table:table-cell office:value-type="float" office:value="409.577606201172">
            <text:p>409.5776062012</text:p>
          </table:table-cell>
          <table:table-cell office:value-type="float" office:value="-0.008064804">
            <text:p>-0.008064804</text:p>
          </table:table-cell>
          <table:table-cell table:number-columns-repeated="4"/>
        </table:table-row>
        <table:table-row table:style-name="ro1">
          <table:table-cell office:value-type="float" office:value="409.690093994141">
            <text:p>409.6900939941</text:p>
          </table:table-cell>
          <table:table-cell office:value-type="float" office:value="0.001149893">
            <text:p>0.001149893</text:p>
          </table:table-cell>
          <table:table-cell table:number-columns-repeated="4"/>
        </table:table-row>
        <table:table-row table:style-name="ro1">
          <table:table-cell office:value-type="float" office:value="409.802612304688">
            <text:p>409.8026123047</text:p>
          </table:table-cell>
          <table:table-cell office:value-type="float" office:value="-0.00062281">
            <text:p>-0.00062281</text:p>
          </table:table-cell>
          <table:table-cell table:number-columns-repeated="4"/>
        </table:table-row>
        <table:table-row table:style-name="ro1">
          <table:table-cell office:value-type="float" office:value="409.915161132813">
            <text:p>409.9151611328</text:p>
          </table:table-cell>
          <table:table-cell office:value-type="float" office:value="0.001544984">
            <text:p>0.001544984</text:p>
          </table:table-cell>
          <table:table-cell table:number-columns-repeated="4"/>
        </table:table-row>
        <table:table-row table:style-name="ro1">
          <table:table-cell office:value-type="float" office:value="410.027679443359">
            <text:p>410.0276794434</text:p>
          </table:table-cell>
          <table:table-cell office:value-type="float" office:value="-0.003054917">
            <text:p>-0.003054917</text:p>
          </table:table-cell>
          <table:table-cell table:number-columns-repeated="4"/>
        </table:table-row>
        <table:table-row table:style-name="ro1">
          <table:table-cell office:value-type="float" office:value="410.140228271484">
            <text:p>410.1402282715</text:p>
          </table:table-cell>
          <table:table-cell office:value-type="float" office:value="0.002940771">
            <text:p>0.002940771</text:p>
          </table:table-cell>
          <table:table-cell table:number-columns-repeated="4"/>
        </table:table-row>
        <table:table-row table:style-name="ro1">
          <table:table-cell office:value-type="float" office:value="410.252746582031">
            <text:p>410.252746582</text:p>
          </table:table-cell>
          <table:table-cell office:value-type="float" office:value="0.002190494">
            <text:p>0.002190494</text:p>
          </table:table-cell>
          <table:table-cell table:number-columns-repeated="4"/>
        </table:table-row>
        <table:table-row table:style-name="ro1">
          <table:table-cell office:value-type="float" office:value="410.365295410156">
            <text:p>410.3652954102</text:p>
          </table:table-cell>
          <table:table-cell office:value-type="float" office:value="-0.003210971">
            <text:p>-0.003210971</text:p>
          </table:table-cell>
          <table:table-cell table:number-columns-repeated="4"/>
        </table:table-row>
        <table:table-row table:style-name="ro1">
          <table:table-cell office:value-type="float" office:value="410.477844238281">
            <text:p>410.4778442383</text:p>
          </table:table-cell>
          <table:table-cell office:value-type="float" office:value="0.02142172">
            <text:p>0.02142172</text:p>
          </table:table-cell>
          <table:table-cell table:number-columns-repeated="4"/>
        </table:table-row>
        <table:table-row table:style-name="ro1">
          <table:table-cell office:value-type="float" office:value="410.590423583984">
            <text:p>410.590423584</text:p>
          </table:table-cell>
          <table:table-cell office:value-type="float" office:value="0.008082889">
            <text:p>0.008082889</text:p>
          </table:table-cell>
          <table:table-cell table:number-columns-repeated="4"/>
        </table:table-row>
        <table:table-row table:style-name="ro1">
          <table:table-cell office:value-type="float" office:value="410.702972412109">
            <text:p>410.7029724121</text:p>
          </table:table-cell>
          <table:table-cell office:value-type="float" office:value="-0.003970852">
            <text:p>-0.003970852</text:p>
          </table:table-cell>
          <table:table-cell table:number-columns-repeated="4"/>
        </table:table-row>
        <table:table-row table:style-name="ro1">
          <table:table-cell office:value-type="float" office:value="410.815551757813">
            <text:p>410.8155517578</text:p>
          </table:table-cell>
          <table:table-cell office:value-type="float" office:value="0.002375311">
            <text:p>0.002375311</text:p>
          </table:table-cell>
          <table:table-cell table:number-columns-repeated="4"/>
        </table:table-row>
        <table:table-row table:style-name="ro1">
          <table:table-cell office:value-type="float" office:value="410.928131103516">
            <text:p>410.9281311035</text:p>
          </table:table-cell>
          <table:table-cell office:value-type="float" office:value="0.02845347">
            <text:p>0.02845347</text:p>
          </table:table-cell>
          <table:table-cell table:number-columns-repeated="4"/>
        </table:table-row>
        <table:table-row table:style-name="ro1">
          <table:table-cell office:value-type="float" office:value="411.040679931641">
            <text:p>411.0406799316</text:p>
          </table:table-cell>
          <table:table-cell office:value-type="float" office:value="0.006584945">
            <text:p>0.006584945</text:p>
          </table:table-cell>
          <table:table-cell table:number-columns-repeated="4"/>
        </table:table-row>
        <table:table-row table:style-name="ro1">
          <table:table-cell office:value-type="float" office:value="411.153289794922">
            <text:p>411.1532897949</text:p>
          </table:table-cell>
          <table:table-cell office:value-type="float" office:value="0.01527654">
            <text:p>0.01527654</text:p>
          </table:table-cell>
          <table:table-cell table:number-columns-repeated="4"/>
        </table:table-row>
        <table:table-row table:style-name="ro1">
          <table:table-cell office:value-type="float" office:value="411.265869140625">
            <text:p>411.2658691406</text:p>
          </table:table-cell>
          <table:table-cell office:value-type="float" office:value="0.006564216">
            <text:p>0.006564216</text:p>
          </table:table-cell>
          <table:table-cell table:number-columns-repeated="4"/>
        </table:table-row>
        <table:table-row table:style-name="ro1">
          <table:table-cell office:value-type="float" office:value="411.378479003906">
            <text:p>411.3784790039</text:p>
          </table:table-cell>
          <table:table-cell office:value-type="float" office:value="0.002613255">
            <text:p>0.002613255</text:p>
          </table:table-cell>
          <table:table-cell table:number-columns-repeated="4"/>
        </table:table-row>
        <table:table-row table:style-name="ro1">
          <table:table-cell office:value-type="float" office:value="411.491058349609">
            <text:p>411.4910583496</text:p>
          </table:table-cell>
          <table:table-cell office:value-type="float" office:value="0.02711132">
            <text:p>0.02711132</text:p>
          </table:table-cell>
          <table:table-cell table:number-columns-repeated="4"/>
        </table:table-row>
        <table:table-row table:style-name="ro1">
          <table:table-cell office:value-type="float" office:value="411.603668212891">
            <text:p>411.6036682129</text:p>
          </table:table-cell>
          <table:table-cell office:value-type="float" office:value="0.003039737">
            <text:p>0.003039737</text:p>
          </table:table-cell>
          <table:table-cell table:number-columns-repeated="4"/>
        </table:table-row>
        <table:table-row table:style-name="ro1">
          <table:table-cell office:value-type="float" office:value="411.716278076172">
            <text:p>411.7162780762</text:p>
          </table:table-cell>
          <table:table-cell office:value-type="float" office:value="0.0244834">
            <text:p>0.0244834</text:p>
          </table:table-cell>
          <table:table-cell table:number-columns-repeated="4"/>
        </table:table-row>
        <table:table-row table:style-name="ro1">
          <table:table-cell office:value-type="float" office:value="411.828887939453">
            <text:p>411.8288879395</text:p>
          </table:table-cell>
          <table:table-cell office:value-type="float" office:value="0.0005779113">
            <text:p>0.0005779113</text:p>
          </table:table-cell>
          <table:table-cell table:number-columns-repeated="4"/>
        </table:table-row>
        <table:table-row table:style-name="ro1">
          <table:table-cell office:value-type="float" office:value="411.941528320313">
            <text:p>411.9415283203</text:p>
          </table:table-cell>
          <table:table-cell office:value-type="float" office:value="0.00155224">
            <text:p>0.00155224</text:p>
          </table:table-cell>
          <table:table-cell table:number-columns-repeated="4"/>
        </table:table-row>
        <table:table-row table:style-name="ro1">
          <table:table-cell office:value-type="float" office:value="412.054138183594">
            <text:p>412.0541381836</text:p>
          </table:table-cell>
          <table:table-cell office:value-type="float" office:value="0.0005792144">
            <text:p>0.0005792144</text:p>
          </table:table-cell>
          <table:table-cell table:number-columns-repeated="4"/>
        </table:table-row>
        <table:table-row table:style-name="ro1">
          <table:table-cell office:value-type="float" office:value="412.166778564453">
            <text:p>412.1667785645</text:p>
          </table:table-cell>
          <table:table-cell office:value-type="float" office:value="-0.008739742">
            <text:p>-0.008739742</text:p>
          </table:table-cell>
          <table:table-cell table:number-columns-repeated="4"/>
        </table:table-row>
        <table:table-row table:style-name="ro1">
          <table:table-cell office:value-type="float" office:value="412.279418945313">
            <text:p>412.2794189453</text:p>
          </table:table-cell>
          <table:table-cell office:value-type="float" office:value="0.009461716">
            <text:p>0.009461716</text:p>
          </table:table-cell>
          <table:table-cell table:number-columns-repeated="4"/>
        </table:table-row>
        <table:table-row table:style-name="ro1">
          <table:table-cell office:value-type="float" office:value="412.392059326172">
            <text:p>412.3920593262</text:p>
          </table:table-cell>
          <table:table-cell office:value-type="float" office:value="0.00159205">
            <text:p>0.00159205</text:p>
          </table:table-cell>
          <table:table-cell table:number-columns-repeated="4"/>
        </table:table-row>
        <table:table-row table:style-name="ro1">
          <table:table-cell office:value-type="float" office:value="412.504730224609">
            <text:p>412.5047302246</text:p>
          </table:table-cell>
          <table:table-cell office:value-type="float" office:value="-0.009619609">
            <text:p>-0.009619609</text:p>
          </table:table-cell>
          <table:table-cell table:number-columns-repeated="4"/>
        </table:table-row>
        <table:table-row table:style-name="ro1">
          <table:table-cell office:value-type="float" office:value="412.617370605469">
            <text:p>412.6173706055</text:p>
          </table:table-cell>
          <table:table-cell office:value-type="float" office:value="-0.002973937">
            <text:p>-0.002973937</text:p>
          </table:table-cell>
          <table:table-cell table:number-columns-repeated="4"/>
        </table:table-row>
        <table:table-row table:style-name="ro1">
          <table:table-cell office:value-type="float" office:value="412.730041503906">
            <text:p>412.7300415039</text:p>
          </table:table-cell>
          <table:table-cell office:value-type="float" office:value="-0.0001231165">
            <text:p>-0.0001231165</text:p>
          </table:table-cell>
          <table:table-cell table:number-columns-repeated="4"/>
        </table:table-row>
        <table:table-row table:style-name="ro1">
          <table:table-cell office:value-type="float" office:value="412.842712402344">
            <text:p>412.8427124023</text:p>
          </table:table-cell>
          <table:table-cell office:value-type="float" office:value="-0.001669507">
            <text:p>-0.001669507</text:p>
          </table:table-cell>
          <table:table-cell table:number-columns-repeated="4"/>
        </table:table-row>
        <table:table-row table:style-name="ro1">
          <table:table-cell office:value-type="float" office:value="412.955383300781">
            <text:p>412.9553833008</text:p>
          </table:table-cell>
          <table:table-cell office:value-type="float" office:value="-0.0105233">
            <text:p>-0.0105233</text:p>
          </table:table-cell>
          <table:table-cell table:number-columns-repeated="4"/>
        </table:table-row>
        <table:table-row table:style-name="ro1">
          <table:table-cell office:value-type="float" office:value="413.068054199219">
            <text:p>413.0680541992</text:p>
          </table:table-cell>
          <table:table-cell office:value-type="float" office:value="-0.007777859">
            <text:p>-0.007777859</text:p>
          </table:table-cell>
          <table:table-cell table:number-columns-repeated="4"/>
        </table:table-row>
        <table:table-row table:style-name="ro1">
          <table:table-cell office:value-type="float" office:value="413.180725097656">
            <text:p>413.1807250977</text:p>
          </table:table-cell>
          <table:table-cell office:value-type="float" office:value="-0.001489058">
            <text:p>-0.001489058</text:p>
          </table:table-cell>
          <table:table-cell table:number-columns-repeated="4"/>
        </table:table-row>
        <table:table-row table:style-name="ro1">
          <table:table-cell office:value-type="float" office:value="413.293426513672">
            <text:p>413.2934265137</text:p>
          </table:table-cell>
          <table:table-cell office:value-type="float" office:value="-0.001003179">
            <text:p>-0.001003179</text:p>
          </table:table-cell>
          <table:table-cell table:number-columns-repeated="4"/>
        </table:table-row>
        <table:table-row table:style-name="ro1">
          <table:table-cell office:value-type="float" office:value="413.406097412109">
            <text:p>413.4060974121</text:p>
          </table:table-cell>
          <table:table-cell office:value-type="float" office:value="-0.004245953">
            <text:p>-0.004245953</text:p>
          </table:table-cell>
          <table:table-cell table:number-columns-repeated="4"/>
        </table:table-row>
        <table:table-row table:style-name="ro1">
          <table:table-cell office:value-type="float" office:value="413.518798828125">
            <text:p>413.5187988281</text:p>
          </table:table-cell>
          <table:table-cell office:value-type="float" office:value="-0.00261905">
            <text:p>-0.00261905</text:p>
          </table:table-cell>
          <table:table-cell table:number-columns-repeated="4"/>
        </table:table-row>
        <table:table-row table:style-name="ro1">
          <table:table-cell office:value-type="float" office:value="413.631500244141">
            <text:p>413.6315002441</text:p>
          </table:table-cell>
          <table:table-cell office:value-type="float" office:value="-0.008324893">
            <text:p>-0.008324893</text:p>
          </table:table-cell>
          <table:table-cell table:number-columns-repeated="4"/>
        </table:table-row>
        <table:table-row table:style-name="ro1">
          <table:table-cell office:value-type="float" office:value="413.744232177734">
            <text:p>413.7442321777</text:p>
          </table:table-cell>
          <table:table-cell office:value-type="float" office:value="0.001739614">
            <text:p>0.001739614</text:p>
          </table:table-cell>
          <table:table-cell table:number-columns-repeated="4"/>
        </table:table-row>
        <table:table-row table:style-name="ro1">
          <table:table-cell office:value-type="float" office:value="413.85693359375">
            <text:p>413.8569335938</text:p>
          </table:table-cell>
          <table:table-cell office:value-type="float" office:value="0.002789574">
            <text:p>0.002789574</text:p>
          </table:table-cell>
          <table:table-cell table:number-columns-repeated="4"/>
        </table:table-row>
        <table:table-row table:style-name="ro1">
          <table:table-cell office:value-type="float" office:value="413.969665527344">
            <text:p>413.9696655273</text:p>
          </table:table-cell>
          <table:table-cell office:value-type="float" office:value="-0.003491329">
            <text:p>-0.003491329</text:p>
          </table:table-cell>
          <table:table-cell table:number-columns-repeated="4"/>
        </table:table-row>
        <table:table-row table:style-name="ro1">
          <table:table-cell office:value-type="float" office:value="414.082366943359">
            <text:p>414.0823669434</text:p>
          </table:table-cell>
          <table:table-cell office:value-type="float" office:value="0.01266643">
            <text:p>0.01266643</text:p>
          </table:table-cell>
          <table:table-cell table:number-columns-repeated="4"/>
        </table:table-row>
        <table:table-row table:style-name="ro1">
          <table:table-cell office:value-type="float" office:value="414.195098876953">
            <text:p>414.195098877</text:p>
          </table:table-cell>
          <table:table-cell office:value-type="float" office:value="0.0007306395">
            <text:p>0.0007306395</text:p>
          </table:table-cell>
          <table:table-cell table:number-columns-repeated="4"/>
        </table:table-row>
        <table:table-row table:style-name="ro1">
          <table:table-cell office:value-type="float" office:value="414.307861328125">
            <text:p>414.3078613281</text:p>
          </table:table-cell>
          <table:table-cell office:value-type="float" office:value="0.008884094">
            <text:p>0.008884094</text:p>
          </table:table-cell>
          <table:table-cell table:number-columns-repeated="4"/>
        </table:table-row>
        <table:table-row table:style-name="ro1">
          <table:table-cell office:value-type="float" office:value="414.420593261719">
            <text:p>414.4205932617</text:p>
          </table:table-cell>
          <table:table-cell office:value-type="float" office:value="-0.01100154">
            <text:p>-0.01100154</text:p>
          </table:table-cell>
          <table:table-cell table:number-columns-repeated="4"/>
        </table:table-row>
        <table:table-row table:style-name="ro1">
          <table:table-cell office:value-type="float" office:value="414.533325195313">
            <text:p>414.5333251953</text:p>
          </table:table-cell>
          <table:table-cell office:value-type="float" office:value="0.007082226">
            <text:p>0.007082226</text:p>
          </table:table-cell>
          <table:table-cell table:number-columns-repeated="4"/>
        </table:table-row>
        <table:table-row table:style-name="ro1">
          <table:table-cell office:value-type="float" office:value="414.646087646484">
            <text:p>414.6460876465</text:p>
          </table:table-cell>
          <table:table-cell office:value-type="float" office:value="-0.004766627">
            <text:p>-0.004766627</text:p>
          </table:table-cell>
          <table:table-cell table:number-columns-repeated="4"/>
        </table:table-row>
        <table:table-row table:style-name="ro1">
          <table:table-cell office:value-type="float" office:value="414.758850097656">
            <text:p>414.7588500977</text:p>
          </table:table-cell>
          <table:table-cell office:value-type="float" office:value="-0.003329492">
            <text:p>-0.003329492</text:p>
          </table:table-cell>
          <table:table-cell table:number-columns-repeated="4"/>
        </table:table-row>
        <table:table-row table:style-name="ro1">
          <table:table-cell office:value-type="float" office:value="414.871612548828">
            <text:p>414.8716125488</text:p>
          </table:table-cell>
          <table:table-cell office:value-type="float" office:value="0.004356388">
            <text:p>0.004356388</text:p>
          </table:table-cell>
          <table:table-cell table:number-columns-repeated="4"/>
        </table:table-row>
        <table:table-row table:style-name="ro1">
          <table:table-cell office:value-type="float" office:value="414.984375">
            <text:p>414.984375</text:p>
          </table:table-cell>
          <table:table-cell office:value-type="float" office:value="0.00284001">
            <text:p>0.00284001</text:p>
          </table:table-cell>
          <table:table-cell table:number-columns-repeated="4"/>
        </table:table-row>
        <table:table-row table:style-name="ro1">
          <table:table-cell office:value-type="float" office:value="415.09716796875">
            <text:p>415.0971679688</text:p>
          </table:table-cell>
          <table:table-cell office:value-type="float" office:value="-0.0003102617">
            <text:p>-0.0003102617</text:p>
          </table:table-cell>
          <table:table-cell table:number-columns-repeated="4"/>
        </table:table-row>
        <table:table-row table:style-name="ro1">
          <table:table-cell office:value-type="float" office:value="415.209930419922">
            <text:p>415.2099304199</text:p>
          </table:table-cell>
          <table:table-cell office:value-type="float" office:value="-0.004256846">
            <text:p>-0.004256846</text:p>
          </table:table-cell>
          <table:table-cell table:number-columns-repeated="4"/>
        </table:table-row>
        <table:table-row table:style-name="ro1">
          <table:table-cell office:value-type="float" office:value="415.322723388672">
            <text:p>415.3227233887</text:p>
          </table:table-cell>
          <table:table-cell office:value-type="float" office:value="-0.003533422">
            <text:p>-0.003533422</text:p>
          </table:table-cell>
          <table:table-cell table:number-columns-repeated="4"/>
        </table:table-row>
        <table:table-row table:style-name="ro1">
          <table:table-cell office:value-type="float" office:value="415.435516357422">
            <text:p>415.4355163574</text:p>
          </table:table-cell>
          <table:table-cell office:value-type="float" office:value="-0.005871556">
            <text:p>-0.005871556</text:p>
          </table:table-cell>
          <table:table-cell table:number-columns-repeated="4"/>
        </table:table-row>
        <table:table-row table:style-name="ro1">
          <table:table-cell office:value-type="float" office:value="415.548309326172">
            <text:p>415.5483093262</text:p>
          </table:table-cell>
          <table:table-cell office:value-type="float" office:value="-0.0006954549">
            <text:p>-0.0006954549</text:p>
          </table:table-cell>
          <table:table-cell table:number-columns-repeated="4"/>
        </table:table-row>
        <table:table-row table:style-name="ro1">
          <table:table-cell office:value-type="float" office:value="415.661102294922">
            <text:p>415.6611022949</text:p>
          </table:table-cell>
          <table:table-cell office:value-type="float" office:value="-0.008141104">
            <text:p>-0.008141104</text:p>
          </table:table-cell>
          <table:table-cell table:number-columns-repeated="4"/>
        </table:table-row>
        <table:table-row table:style-name="ro1">
          <table:table-cell office:value-type="float" office:value="415.773895263672">
            <text:p>415.7738952637</text:p>
          </table:table-cell>
          <table:table-cell office:value-type="float" office:value="0.00626187">
            <text:p>0.00626187</text:p>
          </table:table-cell>
          <table:table-cell table:number-columns-repeated="4"/>
        </table:table-row>
        <table:table-row table:style-name="ro1">
          <table:table-cell office:value-type="float" office:value="415.88671875">
            <text:p>415.88671875</text:p>
          </table:table-cell>
          <table:table-cell office:value-type="float" office:value="-0.005905755">
            <text:p>-0.005905755</text:p>
          </table:table-cell>
          <table:table-cell table:number-columns-repeated="4"/>
        </table:table-row>
        <table:table-row table:style-name="ro1">
          <table:table-cell office:value-type="float" office:value="415.999542236328">
            <text:p>415.9995422363</text:p>
          </table:table-cell>
          <table:table-cell office:value-type="float" office:value="-0.01110456">
            <text:p>-0.01110456</text:p>
          </table:table-cell>
          <table:table-cell table:number-columns-repeated="4"/>
        </table:table-row>
        <table:table-row table:style-name="ro1">
          <table:table-cell office:value-type="float" office:value="416.112365722656">
            <text:p>416.1123657227</text:p>
          </table:table-cell>
          <table:table-cell office:value-type="float" office:value="-0.01030938">
            <text:p>-0.01030938</text:p>
          </table:table-cell>
          <table:table-cell table:number-columns-repeated="4"/>
        </table:table-row>
        <table:table-row table:style-name="ro1">
          <table:table-cell office:value-type="float" office:value="416.225189208984">
            <text:p>416.225189209</text:p>
          </table:table-cell>
          <table:table-cell office:value-type="float" office:value="-0.0006362387">
            <text:p>-0.0006362387</text:p>
          </table:table-cell>
          <table:table-cell table:number-columns-repeated="4"/>
        </table:table-row>
        <table:table-row table:style-name="ro1">
          <table:table-cell office:value-type="float" office:value="416.338012695313">
            <text:p>416.3380126953</text:p>
          </table:table-cell>
          <table:table-cell office:value-type="float" office:value="-0.004313741">
            <text:p>-0.004313741</text:p>
          </table:table-cell>
          <table:table-cell table:number-columns-repeated="4"/>
        </table:table-row>
        <table:table-row table:style-name="ro1">
          <table:table-cell office:value-type="float" office:value="416.450866699219">
            <text:p>416.4508666992</text:p>
          </table:table-cell>
          <table:table-cell office:value-type="float" office:value="0.0005806931">
            <text:p>0.0005806931</text:p>
          </table:table-cell>
          <table:table-cell table:number-columns-repeated="4"/>
        </table:table-row>
        <table:table-row table:style-name="ro1">
          <table:table-cell office:value-type="float" office:value="416.563690185547">
            <text:p>416.5636901855</text:p>
          </table:table-cell>
          <table:table-cell office:value-type="float" office:value="-0.004385214">
            <text:p>-0.004385214</text:p>
          </table:table-cell>
          <table:table-cell table:number-columns-repeated="4"/>
        </table:table-row>
        <table:table-row table:style-name="ro1">
          <table:table-cell office:value-type="float" office:value="416.676544189453">
            <text:p>416.6765441895</text:p>
          </table:table-cell>
          <table:table-cell office:value-type="float" office:value="-0.005091695">
            <text:p>-0.005091695</text:p>
          </table:table-cell>
          <table:table-cell table:number-columns-repeated="4"/>
        </table:table-row>
        <table:table-row table:style-name="ro1">
          <table:table-cell office:value-type="float" office:value="416.789398193359">
            <text:p>416.7893981934</text:p>
          </table:table-cell>
          <table:table-cell office:value-type="float" office:value="0.0004701805">
            <text:p>0.0004701805</text:p>
          </table:table-cell>
          <table:table-cell table:number-columns-repeated="4"/>
        </table:table-row>
        <table:table-row table:style-name="ro1">
          <table:table-cell office:value-type="float" office:value="416.902252197266">
            <text:p>416.9022521973</text:p>
          </table:table-cell>
          <table:table-cell office:value-type="float" office:value="-0.004419293">
            <text:p>-0.004419293</text:p>
          </table:table-cell>
          <table:table-cell table:number-columns-repeated="4"/>
        </table:table-row>
        <table:table-row table:style-name="ro1">
          <table:table-cell office:value-type="float" office:value="417.01513671875">
            <text:p>417.0151367188</text:p>
          </table:table-cell>
          <table:table-cell office:value-type="float" office:value="-0.007037937">
            <text:p>-0.007037937</text:p>
          </table:table-cell>
          <table:table-cell table:number-columns-repeated="4"/>
        </table:table-row>
        <table:table-row table:style-name="ro1">
          <table:table-cell office:value-type="float" office:value="417.127990722656">
            <text:p>417.1279907227</text:p>
          </table:table-cell>
          <table:table-cell office:value-type="float" office:value="0.01251694">
            <text:p>0.01251694</text:p>
          </table:table-cell>
          <table:table-cell table:number-columns-repeated="4"/>
        </table:table-row>
        <table:table-row table:style-name="ro1">
          <table:table-cell office:value-type="float" office:value="417.240875244141">
            <text:p>417.2408752441</text:p>
          </table:table-cell>
          <table:table-cell office:value-type="float" office:value="0.002595838">
            <text:p>0.002595838</text:p>
          </table:table-cell>
          <table:table-cell table:number-columns-repeated="4"/>
        </table:table-row>
        <table:table-row table:style-name="ro1">
          <table:table-cell office:value-type="float" office:value="417.353759765625">
            <text:p>417.3537597656</text:p>
          </table:table-cell>
          <table:table-cell office:value-type="float" office:value="0.02169375">
            <text:p>0.02169375</text:p>
          </table:table-cell>
          <table:table-cell table:number-columns-repeated="4"/>
        </table:table-row>
        <table:table-row table:style-name="ro1">
          <table:table-cell office:value-type="float" office:value="417.466644287109">
            <text:p>417.4666442871</text:p>
          </table:table-cell>
          <table:table-cell office:value-type="float" office:value="-0.01195568">
            <text:p>-0.01195568</text:p>
          </table:table-cell>
          <table:table-cell table:number-columns-repeated="4"/>
        </table:table-row>
        <table:table-row table:style-name="ro1">
          <table:table-cell office:value-type="float" office:value="417.579528808594">
            <text:p>417.5795288086</text:p>
          </table:table-cell>
          <table:table-cell office:value-type="float" office:value="-0.00695981">
            <text:p>-0.00695981</text:p>
          </table:table-cell>
          <table:table-cell table:number-columns-repeated="4"/>
        </table:table-row>
        <table:table-row table:style-name="ro1">
          <table:table-cell office:value-type="float" office:value="417.692443847656">
            <text:p>417.6924438477</text:p>
          </table:table-cell>
          <table:table-cell office:value-type="string">
            <text:p>5.648527E-05</text:p>
          </table:table-cell>
          <table:table-cell table:number-columns-repeated="4"/>
        </table:table-row>
        <table:table-row table:style-name="ro1">
          <table:table-cell office:value-type="float" office:value="417.805328369141">
            <text:p>417.8053283691</text:p>
          </table:table-cell>
          <table:table-cell office:value-type="float" office:value="0.001587625">
            <text:p>0.001587625</text:p>
          </table:table-cell>
          <table:table-cell table:number-columns-repeated="4"/>
        </table:table-row>
        <table:table-row table:style-name="ro1">
          <table:table-cell office:value-type="float" office:value="417.918243408203">
            <text:p>417.9182434082</text:p>
          </table:table-cell>
          <table:table-cell office:value-type="float" office:value="-0.01742238">
            <text:p>-0.01742238</text:p>
          </table:table-cell>
          <table:table-cell table:number-columns-repeated="4"/>
        </table:table-row>
        <table:table-row table:style-name="ro1">
          <table:table-cell office:value-type="float" office:value="418.031158447266">
            <text:p>418.0311584473</text:p>
          </table:table-cell>
          <table:table-cell office:value-type="float" office:value="-0.009255669">
            <text:p>-0.009255669</text:p>
          </table:table-cell>
          <table:table-cell table:number-columns-repeated="4"/>
        </table:table-row>
        <table:table-row table:style-name="ro1">
          <table:table-cell office:value-type="float" office:value="418.144073486328">
            <text:p>418.1440734863</text:p>
          </table:table-cell>
          <table:table-cell office:value-type="float" office:value="0.03298181">
            <text:p>0.03298181</text:p>
          </table:table-cell>
          <table:table-cell table:number-columns-repeated="4"/>
        </table:table-row>
        <table:table-row table:style-name="ro1">
          <table:table-cell office:value-type="float" office:value="418.256988525391">
            <text:p>418.2569885254</text:p>
          </table:table-cell>
          <table:table-cell office:value-type="float" office:value="0.01647593">
            <text:p>0.01647593</text:p>
          </table:table-cell>
          <table:table-cell table:number-columns-repeated="4"/>
        </table:table-row>
        <table:table-row table:style-name="ro1">
          <table:table-cell office:value-type="float" office:value="418.369934082031">
            <text:p>418.369934082</text:p>
          </table:table-cell>
          <table:table-cell office:value-type="float" office:value="0.005560339">
            <text:p>0.005560339</text:p>
          </table:table-cell>
          <table:table-cell table:number-columns-repeated="4"/>
        </table:table-row>
        <table:table-row table:style-name="ro1">
          <table:table-cell office:value-type="float" office:value="418.482849121094">
            <text:p>418.4828491211</text:p>
          </table:table-cell>
          <table:table-cell office:value-type="float" office:value="0.004566696">
            <text:p>0.004566696</text:p>
          </table:table-cell>
          <table:table-cell table:number-columns-repeated="4"/>
        </table:table-row>
        <table:table-row table:style-name="ro1">
          <table:table-cell office:value-type="float" office:value="418.595794677734">
            <text:p>418.5957946777</text:p>
          </table:table-cell>
          <table:table-cell office:value-type="string">
            <text:p>1.611376E-05</text:p>
          </table:table-cell>
          <table:table-cell table:number-columns-repeated="4"/>
        </table:table-row>
        <table:table-row table:style-name="ro1">
          <table:table-cell office:value-type="float" office:value="418.708740234375">
            <text:p>418.7087402344</text:p>
          </table:table-cell>
          <table:table-cell office:value-type="float" office:value="0.0004626267">
            <text:p>0.0004626267</text:p>
          </table:table-cell>
          <table:table-cell table:number-columns-repeated="4"/>
        </table:table-row>
        <table:table-row table:style-name="ro1">
          <table:table-cell office:value-type="float" office:value="418.821685791016">
            <text:p>418.821685791</text:p>
          </table:table-cell>
          <table:table-cell office:value-type="float" office:value="0.001308578">
            <text:p>0.001308578</text:p>
          </table:table-cell>
          <table:table-cell table:number-columns-repeated="4"/>
        </table:table-row>
        <table:table-row table:style-name="ro1">
          <table:table-cell office:value-type="float" office:value="418.934661865234">
            <text:p>418.9346618652</text:p>
          </table:table-cell>
          <table:table-cell office:value-type="float" office:value="0.00400163">
            <text:p>0.00400163</text:p>
          </table:table-cell>
          <table:table-cell table:number-columns-repeated="4"/>
        </table:table-row>
        <table:table-row table:style-name="ro1">
          <table:table-cell office:value-type="float" office:value="419.047607421875">
            <text:p>419.0476074219</text:p>
          </table:table-cell>
          <table:table-cell office:value-type="float" office:value="-0.005977462">
            <text:p>-0.005977462</text:p>
          </table:table-cell>
          <table:table-cell table:number-columns-repeated="4"/>
        </table:table-row>
        <table:table-row table:style-name="ro1">
          <table:table-cell office:value-type="float" office:value="419.160583496094">
            <text:p>419.1605834961</text:p>
          </table:table-cell>
          <table:table-cell office:value-type="float" office:value="-0.01036246">
            <text:p>-0.01036246</text:p>
          </table:table-cell>
          <table:table-cell table:number-columns-repeated="4"/>
        </table:table-row>
        <table:table-row table:style-name="ro1">
          <table:table-cell office:value-type="float" office:value="419.273559570313">
            <text:p>419.2735595703</text:p>
          </table:table-cell>
          <table:table-cell office:value-type="float" office:value="-0.00754238">
            <text:p>-0.00754238</text:p>
          </table:table-cell>
          <table:table-cell table:number-columns-repeated="4"/>
        </table:table-row>
        <table:table-row table:style-name="ro1">
          <table:table-cell office:value-type="float" office:value="419.386535644531">
            <text:p>419.3865356445</text:p>
          </table:table-cell>
          <table:table-cell office:value-type="float" office:value="-0.001648351">
            <text:p>-0.001648351</text:p>
          </table:table-cell>
          <table:table-cell table:number-columns-repeated="4"/>
        </table:table-row>
        <table:table-row table:style-name="ro1">
          <table:table-cell office:value-type="float" office:value="419.49951171875">
            <text:p>419.4995117188</text:p>
          </table:table-cell>
          <table:table-cell office:value-type="float" office:value="0.01112964">
            <text:p>0.01112964</text:p>
          </table:table-cell>
          <table:table-cell table:number-columns-repeated="4"/>
        </table:table-row>
        <table:table-row table:style-name="ro1">
          <table:table-cell office:value-type="float" office:value="419.612487792969">
            <text:p>419.612487793</text:p>
          </table:table-cell>
          <table:table-cell office:value-type="float" office:value="0.00529507">
            <text:p>0.00529507</text:p>
          </table:table-cell>
          <table:table-cell table:number-columns-repeated="4"/>
        </table:table-row>
        <table:table-row table:style-name="ro1">
          <table:table-cell office:value-type="float" office:value="419.725494384766">
            <text:p>419.7254943848</text:p>
          </table:table-cell>
          <table:table-cell office:value-type="float" office:value="0.009275715">
            <text:p>0.009275715</text:p>
          </table:table-cell>
          <table:table-cell table:number-columns-repeated="4"/>
        </table:table-row>
        <table:table-row table:style-name="ro1">
          <table:table-cell office:value-type="float" office:value="419.838470458984">
            <text:p>419.838470459</text:p>
          </table:table-cell>
          <table:table-cell office:value-type="float" office:value="-0.0001195709">
            <text:p>-0.0001195709</text:p>
          </table:table-cell>
          <table:table-cell table:number-columns-repeated="4"/>
        </table:table-row>
        <table:table-row table:style-name="ro1">
          <table:table-cell office:value-type="float" office:value="419.951477050781">
            <text:p>419.9514770508</text:p>
          </table:table-cell>
          <table:table-cell office:value-type="float" office:value="0.0131306">
            <text:p>0.0131306</text:p>
          </table:table-cell>
          <table:table-cell table:number-columns-repeated="4"/>
        </table:table-row>
        <table:table-row table:style-name="ro1">
          <table:table-cell office:value-type="float" office:value="420.064483642578">
            <text:p>420.0644836426</text:p>
          </table:table-cell>
          <table:table-cell office:value-type="float" office:value="-0.004789534">
            <text:p>-0.004789534</text:p>
          </table:table-cell>
          <table:table-cell table:number-columns-repeated="4"/>
        </table:table-row>
        <table:table-row table:style-name="ro1">
          <table:table-cell office:value-type="float" office:value="420.177520751953">
            <text:p>420.177520752</text:p>
          </table:table-cell>
          <table:table-cell office:value-type="float" office:value="-0.004928728">
            <text:p>-0.004928728</text:p>
          </table:table-cell>
          <table:table-cell table:number-columns-repeated="4"/>
        </table:table-row>
        <table:table-row table:style-name="ro1">
          <table:table-cell office:value-type="float" office:value="420.29052734375">
            <text:p>420.2905273438</text:p>
          </table:table-cell>
          <table:table-cell office:value-type="float" office:value="-0.008775382">
            <text:p>-0.008775382</text:p>
          </table:table-cell>
          <table:table-cell table:number-columns-repeated="4"/>
        </table:table-row>
        <table:table-row table:style-name="ro1">
          <table:table-cell office:value-type="float" office:value="420.403564453125">
            <text:p>420.4035644531</text:p>
          </table:table-cell>
          <table:table-cell office:value-type="float" office:value="-0.006757029">
            <text:p>-0.006757029</text:p>
          </table:table-cell>
          <table:table-cell table:number-columns-repeated="4"/>
        </table:table-row>
        <table:table-row table:style-name="ro1">
          <table:table-cell office:value-type="float" office:value="420.516571044922">
            <text:p>420.5165710449</text:p>
          </table:table-cell>
          <table:table-cell office:value-type="float" office:value="-0.00514267">
            <text:p>-0.00514267</text:p>
          </table:table-cell>
          <table:table-cell table:number-columns-repeated="4"/>
        </table:table-row>
        <table:table-row table:style-name="ro1">
          <table:table-cell office:value-type="float" office:value="420.629608154297">
            <text:p>420.6296081543</text:p>
          </table:table-cell>
          <table:table-cell office:value-type="float" office:value="0.002551416">
            <text:p>0.002551416</text:p>
          </table:table-cell>
          <table:table-cell table:number-columns-repeated="4"/>
        </table:table-row>
        <table:table-row table:style-name="ro1">
          <table:table-cell office:value-type="float" office:value="420.742645263672">
            <text:p>420.7426452637</text:p>
          </table:table-cell>
          <table:table-cell office:value-type="float" office:value="0.004480002">
            <text:p>0.004480002</text:p>
          </table:table-cell>
          <table:table-cell table:number-columns-repeated="4"/>
        </table:table-row>
        <table:table-row table:style-name="ro1">
          <table:table-cell office:value-type="float" office:value="420.855712890625">
            <text:p>420.8557128906</text:p>
          </table:table-cell>
          <table:table-cell office:value-type="float" office:value="0.004850273">
            <text:p>0.004850273</text:p>
          </table:table-cell>
          <table:table-cell table:number-columns-repeated="4"/>
        </table:table-row>
        <table:table-row table:style-name="ro1">
          <table:table-cell office:value-type="float" office:value="420.96875">
            <text:p>420.96875</text:p>
          </table:table-cell>
          <table:table-cell office:value-type="float" office:value="0.01446146">
            <text:p>0.01446146</text:p>
          </table:table-cell>
          <table:table-cell table:number-columns-repeated="4"/>
        </table:table-row>
        <table:table-row table:style-name="ro1">
          <table:table-cell office:value-type="float" office:value="421.081817626953">
            <text:p>421.081817627</text:p>
          </table:table-cell>
          <table:table-cell office:value-type="float" office:value="-0.004869914">
            <text:p>-0.004869914</text:p>
          </table:table-cell>
          <table:table-cell table:number-columns-repeated="4"/>
        </table:table-row>
        <table:table-row table:style-name="ro1">
          <table:table-cell office:value-type="float" office:value="421.194854736328">
            <text:p>421.1948547363</text:p>
          </table:table-cell>
          <table:table-cell office:value-type="float" office:value="-0.006015108">
            <text:p>-0.006015108</text:p>
          </table:table-cell>
          <table:table-cell table:number-columns-repeated="4"/>
        </table:table-row>
        <table:table-row table:style-name="ro1">
          <table:table-cell office:value-type="float" office:value="421.307922363281">
            <text:p>421.3079223633</text:p>
          </table:table-cell>
          <table:table-cell office:value-type="float" office:value="0.0006510654">
            <text:p>0.0006510654</text:p>
          </table:table-cell>
          <table:table-cell table:number-columns-repeated="4"/>
        </table:table-row>
        <table:table-row table:style-name="ro1">
          <table:table-cell office:value-type="float" office:value="421.421020507813">
            <text:p>421.4210205078</text:p>
          </table:table-cell>
          <table:table-cell office:value-type="float" office:value="0.01150202">
            <text:p>0.01150202</text:p>
          </table:table-cell>
          <table:table-cell table:number-columns-repeated="4"/>
        </table:table-row>
        <table:table-row table:style-name="ro1">
          <table:table-cell office:value-type="float" office:value="421.534088134766">
            <text:p>421.5340881348</text:p>
          </table:table-cell>
          <table:table-cell office:value-type="float" office:value="-0.01046058">
            <text:p>-0.01046058</text:p>
          </table:table-cell>
          <table:table-cell table:number-columns-repeated="4"/>
        </table:table-row>
        <table:table-row table:style-name="ro1">
          <table:table-cell office:value-type="float" office:value="421.647155761719">
            <text:p>421.6471557617</text:p>
          </table:table-cell>
          <table:table-cell office:value-type="float" office:value="0.003763712">
            <text:p>0.003763712</text:p>
          </table:table-cell>
          <table:table-cell table:number-columns-repeated="4"/>
        </table:table-row>
        <table:table-row table:style-name="ro1">
          <table:table-cell office:value-type="float" office:value="421.76025390625">
            <text:p>421.7602539063</text:p>
          </table:table-cell>
          <table:table-cell office:value-type="float" office:value="-0.003919296">
            <text:p>-0.003919296</text:p>
          </table:table-cell>
          <table:table-cell table:number-columns-repeated="4"/>
        </table:table-row>
        <table:table-row table:style-name="ro1">
          <table:table-cell office:value-type="float" office:value="421.873352050781">
            <text:p>421.8733520508</text:p>
          </table:table-cell>
          <table:table-cell office:value-type="float" office:value="0.0084226">
            <text:p>0.0084226</text:p>
          </table:table-cell>
          <table:table-cell table:number-columns-repeated="4"/>
        </table:table-row>
        <table:table-row table:style-name="ro1">
          <table:table-cell office:value-type="float" office:value="421.986450195313">
            <text:p>421.9864501953</text:p>
          </table:table-cell>
          <table:table-cell office:value-type="float" office:value="0.006047553">
            <text:p>0.006047553</text:p>
          </table:table-cell>
          <table:table-cell table:number-columns-repeated="4"/>
        </table:table-row>
        <table:table-row table:style-name="ro1">
          <table:table-cell office:value-type="float" office:value="422.099548339844">
            <text:p>422.0995483398</text:p>
          </table:table-cell>
          <table:table-cell office:value-type="float" office:value="-0.002941016">
            <text:p>-0.002941016</text:p>
          </table:table-cell>
          <table:table-cell table:number-columns-repeated="4"/>
        </table:table-row>
        <table:table-row table:style-name="ro1">
          <table:table-cell office:value-type="float" office:value="422.212646484375">
            <text:p>422.2126464844</text:p>
          </table:table-cell>
          <table:table-cell office:value-type="float" office:value="0.02292605">
            <text:p>0.02292605</text:p>
          </table:table-cell>
          <table:table-cell table:number-columns-repeated="4"/>
        </table:table-row>
        <table:table-row table:style-name="ro1">
          <table:table-cell office:value-type="float" office:value="422.325775146484">
            <text:p>422.3257751465</text:p>
          </table:table-cell>
          <table:table-cell office:value-type="float" office:value="-0.004621412">
            <text:p>-0.004621412</text:p>
          </table:table-cell>
          <table:table-cell table:number-columns-repeated="4"/>
        </table:table-row>
        <table:table-row table:style-name="ro1">
          <table:table-cell office:value-type="float" office:value="422.438903808594">
            <text:p>422.4389038086</text:p>
          </table:table-cell>
          <table:table-cell office:value-type="float" office:value="-0.009353258">
            <text:p>-0.009353258</text:p>
          </table:table-cell>
          <table:table-cell table:number-columns-repeated="4"/>
        </table:table-row>
        <table:table-row table:style-name="ro1">
          <table:table-cell office:value-type="float" office:value="422.552001953125">
            <text:p>422.5520019531</text:p>
          </table:table-cell>
          <table:table-cell office:value-type="float" office:value="-0.009480977">
            <text:p>-0.009480977</text:p>
          </table:table-cell>
          <table:table-cell table:number-columns-repeated="4"/>
        </table:table-row>
        <table:table-row table:style-name="ro1">
          <table:table-cell office:value-type="float" office:value="422.665130615234">
            <text:p>422.6651306152</text:p>
          </table:table-cell>
          <table:table-cell office:value-type="float" office:value="0.00867902">
            <text:p>0.00867902</text:p>
          </table:table-cell>
          <table:table-cell table:number-columns-repeated="4"/>
        </table:table-row>
        <table:table-row table:style-name="ro1">
          <table:table-cell office:value-type="float" office:value="422.778289794922">
            <text:p>422.7782897949</text:p>
          </table:table-cell>
          <table:table-cell office:value-type="float" office:value="-0.007285222">
            <text:p>-0.007285222</text:p>
          </table:table-cell>
          <table:table-cell table:number-columns-repeated="4"/>
        </table:table-row>
        <table:table-row table:style-name="ro1">
          <table:table-cell office:value-type="float" office:value="422.891418457031">
            <text:p>422.891418457</text:p>
          </table:table-cell>
          <table:table-cell office:value-type="float" office:value="0.01225204">
            <text:p>0.01225204</text:p>
          </table:table-cell>
          <table:table-cell table:number-columns-repeated="4"/>
        </table:table-row>
        <table:table-row table:style-name="ro1">
          <table:table-cell office:value-type="float" office:value="423.004577636719">
            <text:p>423.0045776367</text:p>
          </table:table-cell>
          <table:table-cell office:value-type="float" office:value="0.007014466">
            <text:p>0.007014466</text:p>
          </table:table-cell>
          <table:table-cell table:number-columns-repeated="4"/>
        </table:table-row>
        <table:table-row table:style-name="ro1">
          <table:table-cell office:value-type="float" office:value="423.117706298828">
            <text:p>423.1177062988</text:p>
          </table:table-cell>
          <table:table-cell office:value-type="float" office:value="-0.002859245">
            <text:p>-0.002859245</text:p>
          </table:table-cell>
          <table:table-cell table:number-columns-repeated="4"/>
        </table:table-row>
        <table:table-row table:style-name="ro1">
          <table:table-cell office:value-type="float" office:value="423.230865478516">
            <text:p>423.2308654785</text:p>
          </table:table-cell>
          <table:table-cell office:value-type="float" office:value="-0.005202014">
            <text:p>-0.005202014</text:p>
          </table:table-cell>
          <table:table-cell table:number-columns-repeated="4"/>
        </table:table-row>
        <table:table-row table:style-name="ro1">
          <table:table-cell office:value-type="float" office:value="423.344024658203">
            <text:p>423.3440246582</text:p>
          </table:table-cell>
          <table:table-cell office:value-type="float" office:value="0.002183519">
            <text:p>0.002183519</text:p>
          </table:table-cell>
          <table:table-cell table:number-columns-repeated="4"/>
        </table:table-row>
        <table:table-row table:style-name="ro1">
          <table:table-cell office:value-type="float" office:value="423.457183837891">
            <text:p>423.4571838379</text:p>
          </table:table-cell>
          <table:table-cell office:value-type="float" office:value="-0.01056474">
            <text:p>-0.01056474</text:p>
          </table:table-cell>
          <table:table-cell table:number-columns-repeated="4"/>
        </table:table-row>
        <table:table-row table:style-name="ro1">
          <table:table-cell office:value-type="float" office:value="423.570373535156">
            <text:p>423.5703735352</text:p>
          </table:table-cell>
          <table:table-cell office:value-type="float" office:value="0.01011577">
            <text:p>0.01011577</text:p>
          </table:table-cell>
          <table:table-cell table:number-columns-repeated="4"/>
        </table:table-row>
        <table:table-row table:style-name="ro1">
          <table:table-cell office:value-type="float" office:value="423.683532714844">
            <text:p>423.6835327148</text:p>
          </table:table-cell>
          <table:table-cell office:value-type="float" office:value="-0.001116985">
            <text:p>-0.001116985</text:p>
          </table:table-cell>
          <table:table-cell table:number-columns-repeated="4"/>
        </table:table-row>
        <table:table-row table:style-name="ro1">
          <table:table-cell office:value-type="float" office:value="423.796722412109">
            <text:p>423.7967224121</text:p>
          </table:table-cell>
          <table:table-cell office:value-type="float" office:value="-0.00535755">
            <text:p>-0.00535755</text:p>
          </table:table-cell>
          <table:table-cell table:number-columns-repeated="4"/>
        </table:table-row>
        <table:table-row table:style-name="ro1">
          <table:table-cell office:value-type="float" office:value="423.909912109375">
            <text:p>423.9099121094</text:p>
          </table:table-cell>
          <table:table-cell office:value-type="float" office:value="-0.01200944">
            <text:p>-0.01200944</text:p>
          </table:table-cell>
          <table:table-cell table:number-columns-repeated="4"/>
        </table:table-row>
        <table:table-row table:style-name="ro1">
          <table:table-cell office:value-type="float" office:value="424.023101806641">
            <text:p>424.0231018066</text:p>
          </table:table-cell>
          <table:table-cell office:value-type="float" office:value="0.00322577">
            <text:p>0.00322577</text:p>
          </table:table-cell>
          <table:table-cell table:number-columns-repeated="4"/>
        </table:table-row>
        <table:table-row table:style-name="ro1">
          <table:table-cell office:value-type="float" office:value="424.136291503906">
            <text:p>424.1362915039</text:p>
          </table:table-cell>
          <table:table-cell office:value-type="float" office:value="0.009868356">
            <text:p>0.009868356</text:p>
          </table:table-cell>
          <table:table-cell table:number-columns-repeated="4"/>
        </table:table-row>
        <table:table-row table:style-name="ro1">
          <table:table-cell office:value-type="float" office:value="424.24951171875">
            <text:p>424.2495117188</text:p>
          </table:table-cell>
          <table:table-cell office:value-type="float" office:value="0.005547821">
            <text:p>0.005547821</text:p>
          </table:table-cell>
          <table:table-cell table:number-columns-repeated="4"/>
        </table:table-row>
        <table:table-row table:style-name="ro1">
          <table:table-cell office:value-type="float" office:value="424.362701416016">
            <text:p>424.362701416</text:p>
          </table:table-cell>
          <table:table-cell office:value-type="float" office:value="-0.005733974">
            <text:p>-0.005733974</text:p>
          </table:table-cell>
          <table:table-cell table:number-columns-repeated="4"/>
        </table:table-row>
        <table:table-row table:style-name="ro1">
          <table:table-cell office:value-type="float" office:value="424.475921630859">
            <text:p>424.4759216309</text:p>
          </table:table-cell>
          <table:table-cell office:value-type="float" office:value="0.002545319">
            <text:p>0.002545319</text:p>
          </table:table-cell>
          <table:table-cell table:number-columns-repeated="4"/>
        </table:table-row>
        <table:table-row table:style-name="ro1">
          <table:table-cell office:value-type="float" office:value="424.589141845703">
            <text:p>424.5891418457</text:p>
          </table:table-cell>
          <table:table-cell office:value-type="float" office:value="-0.001657539">
            <text:p>-0.001657539</text:p>
          </table:table-cell>
          <table:table-cell table:number-columns-repeated="4"/>
        </table:table-row>
        <table:table-row table:style-name="ro1">
          <table:table-cell office:value-type="float" office:value="424.702362060547">
            <text:p>424.7023620605</text:p>
          </table:table-cell>
          <table:table-cell office:value-type="float" office:value="-0.007282782">
            <text:p>-0.007282782</text:p>
          </table:table-cell>
          <table:table-cell table:number-columns-repeated="4"/>
        </table:table-row>
        <table:table-row table:style-name="ro1">
          <table:table-cell office:value-type="float" office:value="424.815612792969">
            <text:p>424.815612793</text:p>
          </table:table-cell>
          <table:table-cell office:value-type="float" office:value="-0.003202684">
            <text:p>-0.003202684</text:p>
          </table:table-cell>
          <table:table-cell table:number-columns-repeated="4"/>
        </table:table-row>
        <table:table-row table:style-name="ro1">
          <table:table-cell office:value-type="float" office:value="424.928833007813">
            <text:p>424.9288330078</text:p>
          </table:table-cell>
          <table:table-cell office:value-type="float" office:value="0.01649821">
            <text:p>0.01649821</text:p>
          </table:table-cell>
          <table:table-cell table:number-columns-repeated="4"/>
        </table:table-row>
        <table:table-row table:style-name="ro1">
          <table:table-cell office:value-type="float" office:value="425.042083740234">
            <text:p>425.0420837402</text:p>
          </table:table-cell>
          <table:table-cell office:value-type="float" office:value="-0.005514882">
            <text:p>-0.005514882</text:p>
          </table:table-cell>
          <table:table-cell table:number-columns-repeated="4"/>
        </table:table-row>
        <table:table-row table:style-name="ro1">
          <table:table-cell office:value-type="float" office:value="425.155303955078">
            <text:p>425.1553039551</text:p>
          </table:table-cell>
          <table:table-cell office:value-type="float" office:value="-0.003302264">
            <text:p>-0.003302264</text:p>
          </table:table-cell>
          <table:table-cell table:number-columns-repeated="4"/>
        </table:table-row>
        <table:table-row table:style-name="ro1">
          <table:table-cell office:value-type="float" office:value="425.2685546875">
            <text:p>425.2685546875</text:p>
          </table:table-cell>
          <table:table-cell office:value-type="float" office:value="-0.01518641">
            <text:p>-0.01518641</text:p>
          </table:table-cell>
          <table:table-cell table:number-columns-repeated="4"/>
        </table:table-row>
        <table:table-row table:style-name="ro1">
          <table:table-cell office:value-type="float" office:value="425.3818359375">
            <text:p>425.3818359375</text:p>
          </table:table-cell>
          <table:table-cell office:value-type="float" office:value="-0.002345521">
            <text:p>-0.002345521</text:p>
          </table:table-cell>
          <table:table-cell table:number-columns-repeated="4"/>
        </table:table-row>
        <table:table-row table:style-name="ro1">
          <table:table-cell office:value-type="float" office:value="425.495086669922">
            <text:p>425.4950866699</text:p>
          </table:table-cell>
          <table:table-cell office:value-type="float" office:value="0.005219075">
            <text:p>0.005219075</text:p>
          </table:table-cell>
          <table:table-cell table:number-columns-repeated="4"/>
        </table:table-row>
        <table:table-row table:style-name="ro1">
          <table:table-cell office:value-type="float" office:value="425.608337402344">
            <text:p>425.6083374023</text:p>
          </table:table-cell>
          <table:table-cell office:value-type="float" office:value="0.005734246">
            <text:p>0.005734246</text:p>
          </table:table-cell>
          <table:table-cell table:number-columns-repeated="4"/>
        </table:table-row>
        <table:table-row table:style-name="ro1">
          <table:table-cell office:value-type="float" office:value="425.721618652344">
            <text:p>425.7216186523</text:p>
          </table:table-cell>
          <table:table-cell office:value-type="float" office:value="-0.006303436">
            <text:p>-0.006303436</text:p>
          </table:table-cell>
          <table:table-cell table:number-columns-repeated="4"/>
        </table:table-row>
        <table:table-row table:style-name="ro1">
          <table:table-cell office:value-type="float" office:value="425.834899902344">
            <text:p>425.8348999023</text:p>
          </table:table-cell>
          <table:table-cell office:value-type="float" office:value="-0.00817602">
            <text:p>-0.00817602</text:p>
          </table:table-cell>
          <table:table-cell table:number-columns-repeated="4"/>
        </table:table-row>
        <table:table-row table:style-name="ro1">
          <table:table-cell office:value-type="float" office:value="425.948181152344">
            <text:p>425.9481811523</text:p>
          </table:table-cell>
          <table:table-cell office:value-type="float" office:value="0.002381114">
            <text:p>0.002381114</text:p>
          </table:table-cell>
          <table:table-cell table:number-columns-repeated="4"/>
        </table:table-row>
        <table:table-row table:style-name="ro1">
          <table:table-cell office:value-type="float" office:value="426.061462402344">
            <text:p>426.0614624023</text:p>
          </table:table-cell>
          <table:table-cell office:value-type="float" office:value="0.01172824">
            <text:p>0.01172824</text:p>
          </table:table-cell>
          <table:table-cell table:number-columns-repeated="4"/>
        </table:table-row>
        <table:table-row table:style-name="ro1">
          <table:table-cell office:value-type="float" office:value="426.174743652344">
            <text:p>426.1747436523</text:p>
          </table:table-cell>
          <table:table-cell office:value-type="float" office:value="-0.006216319">
            <text:p>-0.006216319</text:p>
          </table:table-cell>
          <table:table-cell table:number-columns-repeated="4"/>
        </table:table-row>
        <table:table-row table:style-name="ro1">
          <table:table-cell office:value-type="float" office:value="426.288055419922">
            <text:p>426.2880554199</text:p>
          </table:table-cell>
          <table:table-cell office:value-type="float" office:value="0.009637324">
            <text:p>0.009637324</text:p>
          </table:table-cell>
          <table:table-cell table:number-columns-repeated="4"/>
        </table:table-row>
        <table:table-row table:style-name="ro1">
          <table:table-cell office:value-type="float" office:value="426.401336669922">
            <text:p>426.4013366699</text:p>
          </table:table-cell>
          <table:table-cell office:value-type="float" office:value="-0.001590265">
            <text:p>-0.001590265</text:p>
          </table:table-cell>
          <table:table-cell table:number-columns-repeated="4"/>
        </table:table-row>
        <table:table-row table:style-name="ro1">
          <table:table-cell office:value-type="float" office:value="426.5146484375">
            <text:p>426.5146484375</text:p>
          </table:table-cell>
          <table:table-cell office:value-type="float" office:value="-0.003373436">
            <text:p>-0.003373436</text:p>
          </table:table-cell>
          <table:table-cell table:number-columns-repeated="4"/>
        </table:table-row>
        <table:table-row table:style-name="ro1">
          <table:table-cell office:value-type="float" office:value="426.627960205078">
            <text:p>426.6279602051</text:p>
          </table:table-cell>
          <table:table-cell office:value-type="float" office:value="0.002026009">
            <text:p>0.002026009</text:p>
          </table:table-cell>
          <table:table-cell table:number-columns-repeated="4"/>
        </table:table-row>
        <table:table-row table:style-name="ro1">
          <table:table-cell office:value-type="float" office:value="426.741271972656">
            <text:p>426.7412719727</text:p>
          </table:table-cell>
          <table:table-cell office:value-type="float" office:value="0.00833558">
            <text:p>0.00833558</text:p>
          </table:table-cell>
          <table:table-cell table:number-columns-repeated="4"/>
        </table:table-row>
        <table:table-row table:style-name="ro1">
          <table:table-cell office:value-type="float" office:value="426.854614257813">
            <text:p>426.8546142578</text:p>
          </table:table-cell>
          <table:table-cell office:value-type="float" office:value="0.009072156">
            <text:p>0.009072156</text:p>
          </table:table-cell>
          <table:table-cell table:number-columns-repeated="4"/>
        </table:table-row>
        <table:table-row table:style-name="ro1">
          <table:table-cell office:value-type="float" office:value="426.967926025391">
            <text:p>426.9679260254</text:p>
          </table:table-cell>
          <table:table-cell office:value-type="float" office:value="-0.004600787">
            <text:p>-0.004600787</text:p>
          </table:table-cell>
          <table:table-cell table:number-columns-repeated="4"/>
        </table:table-row>
        <table:table-row table:style-name="ro1">
          <table:table-cell office:value-type="float" office:value="427.081268310547">
            <text:p>427.0812683105</text:p>
          </table:table-cell>
          <table:table-cell office:value-type="float" office:value="-0.005067143">
            <text:p>-0.005067143</text:p>
          </table:table-cell>
          <table:table-cell table:number-columns-repeated="4"/>
        </table:table-row>
        <table:table-row table:style-name="ro1">
          <table:table-cell office:value-type="float" office:value="427.194610595703">
            <text:p>427.1946105957</text:p>
          </table:table-cell>
          <table:table-cell office:value-type="float" office:value="0.003820119">
            <text:p>0.003820119</text:p>
          </table:table-cell>
          <table:table-cell table:number-columns-repeated="4"/>
        </table:table-row>
        <table:table-row table:style-name="ro1">
          <table:table-cell office:value-type="float" office:value="427.307952880859">
            <text:p>427.3079528809</text:p>
          </table:table-cell>
          <table:table-cell office:value-type="float" office:value="0.002474198">
            <text:p>0.002474198</text:p>
          </table:table-cell>
          <table:table-cell table:number-columns-repeated="4"/>
        </table:table-row>
        <table:table-row table:style-name="ro1">
          <table:table-cell office:value-type="float" office:value="427.421295166016">
            <text:p>427.421295166</text:p>
          </table:table-cell>
          <table:table-cell office:value-type="float" office:value="0.0008331494">
            <text:p>0.0008331494</text:p>
          </table:table-cell>
          <table:table-cell table:number-columns-repeated="4"/>
        </table:table-row>
        <table:table-row table:style-name="ro1">
          <table:table-cell office:value-type="float" office:value="427.534637451172">
            <text:p>427.5346374512</text:p>
          </table:table-cell>
          <table:table-cell office:value-type="float" office:value="-0.0109832">
            <text:p>-0.0109832</text:p>
          </table:table-cell>
          <table:table-cell table:number-columns-repeated="4"/>
        </table:table-row>
        <table:table-row table:style-name="ro1">
          <table:table-cell office:value-type="float" office:value="427.648010253906">
            <text:p>427.6480102539</text:p>
          </table:table-cell>
          <table:table-cell office:value-type="float" office:value="0.001981565">
            <text:p>0.001981565</text:p>
          </table:table-cell>
          <table:table-cell table:number-columns-repeated="4"/>
        </table:table-row>
        <table:table-row table:style-name="ro1">
          <table:table-cell office:value-type="float" office:value="427.761383056641">
            <text:p>427.7613830566</text:p>
          </table:table-cell>
          <table:table-cell office:value-type="float" office:value="0.004205452">
            <text:p>0.004205452</text:p>
          </table:table-cell>
          <table:table-cell table:number-columns-repeated="4"/>
        </table:table-row>
        <table:table-row table:style-name="ro1">
          <table:table-cell office:value-type="float" office:value="427.874755859375">
            <text:p>427.8747558594</text:p>
          </table:table-cell>
          <table:table-cell office:value-type="float" office:value="-0.007327958">
            <text:p>-0.007327958</text:p>
          </table:table-cell>
          <table:table-cell table:number-columns-repeated="4"/>
        </table:table-row>
        <table:table-row table:style-name="ro1">
          <table:table-cell office:value-type="float" office:value="427.988128662109">
            <text:p>427.9881286621</text:p>
          </table:table-cell>
          <table:table-cell office:value-type="float" office:value="-0.01139374">
            <text:p>-0.01139374</text:p>
          </table:table-cell>
          <table:table-cell table:number-columns-repeated="4"/>
        </table:table-row>
        <table:table-row table:style-name="ro1">
          <table:table-cell office:value-type="float" office:value="428.101501464844">
            <text:p>428.1015014648</text:p>
          </table:table-cell>
          <table:table-cell office:value-type="float" office:value="-0.003328709">
            <text:p>-0.003328709</text:p>
          </table:table-cell>
          <table:table-cell table:number-columns-repeated="4"/>
        </table:table-row>
        <table:table-row table:style-name="ro1">
          <table:table-cell office:value-type="float" office:value="428.214874267578">
            <text:p>428.2148742676</text:p>
          </table:table-cell>
          <table:table-cell office:value-type="float" office:value="0.008867963">
            <text:p>0.008867963</text:p>
          </table:table-cell>
          <table:table-cell table:number-columns-repeated="4"/>
        </table:table-row>
        <table:table-row table:style-name="ro1">
          <table:table-cell office:value-type="float" office:value="428.328277587891">
            <text:p>428.3282775879</text:p>
          </table:table-cell>
          <table:table-cell office:value-type="float" office:value="-0.003573693">
            <text:p>-0.003573693</text:p>
          </table:table-cell>
          <table:table-cell table:number-columns-repeated="4"/>
        </table:table-row>
        <table:table-row table:style-name="ro1">
          <table:table-cell office:value-type="float" office:value="428.441650390625">
            <text:p>428.4416503906</text:p>
          </table:table-cell>
          <table:table-cell office:value-type="float" office:value="-0.007925056">
            <text:p>-0.007925056</text:p>
          </table:table-cell>
          <table:table-cell table:number-columns-repeated="4"/>
        </table:table-row>
        <table:table-row table:style-name="ro1">
          <table:table-cell office:value-type="float" office:value="428.555053710938">
            <text:p>428.5550537109</text:p>
          </table:table-cell>
          <table:table-cell office:value-type="float" office:value="-0.005410321">
            <text:p>-0.005410321</text:p>
          </table:table-cell>
          <table:table-cell table:number-columns-repeated="4"/>
        </table:table-row>
        <table:table-row table:style-name="ro1">
          <table:table-cell office:value-type="float" office:value="428.66845703125">
            <text:p>428.6684570313</text:p>
          </table:table-cell>
          <table:table-cell office:value-type="float" office:value="0.002873016">
            <text:p>0.002873016</text:p>
          </table:table-cell>
          <table:table-cell table:number-columns-repeated="4"/>
        </table:table-row>
        <table:table-row table:style-name="ro1">
          <table:table-cell office:value-type="float" office:value="428.781890869141">
            <text:p>428.7818908691</text:p>
          </table:table-cell>
          <table:table-cell office:value-type="float" office:value="-0.0005295259">
            <text:p>-0.0005295259</text:p>
          </table:table-cell>
          <table:table-cell table:number-columns-repeated="4"/>
        </table:table-row>
        <table:table-row table:style-name="ro1">
          <table:table-cell office:value-type="float" office:value="428.895294189453">
            <text:p>428.8952941895</text:p>
          </table:table-cell>
          <table:table-cell office:value-type="float" office:value="0.007621186">
            <text:p>0.007621186</text:p>
          </table:table-cell>
          <table:table-cell table:number-columns-repeated="4"/>
        </table:table-row>
        <table:table-row table:style-name="ro1">
          <table:table-cell office:value-type="float" office:value="429.008728027344">
            <text:p>429.0087280273</text:p>
          </table:table-cell>
          <table:table-cell office:value-type="float" office:value="-0.006969613">
            <text:p>-0.006969613</text:p>
          </table:table-cell>
          <table:table-cell table:number-columns-repeated="4"/>
        </table:table-row>
        <table:table-row table:style-name="ro1">
          <table:table-cell office:value-type="float" office:value="429.122131347656">
            <text:p>429.1221313477</text:p>
          </table:table-cell>
          <table:table-cell office:value-type="float" office:value="-0.005249398">
            <text:p>-0.005249398</text:p>
          </table:table-cell>
          <table:table-cell table:number-columns-repeated="4"/>
        </table:table-row>
        <table:table-row table:style-name="ro1">
          <table:table-cell office:value-type="float" office:value="429.235565185547">
            <text:p>429.2355651855</text:p>
          </table:table-cell>
          <table:table-cell office:value-type="float" office:value="-0.006847801">
            <text:p>-0.006847801</text:p>
          </table:table-cell>
          <table:table-cell table:number-columns-repeated="4"/>
        </table:table-row>
        <table:table-row table:style-name="ro1">
          <table:table-cell office:value-type="float" office:value="429.348999023438">
            <text:p>429.3489990234</text:p>
          </table:table-cell>
          <table:table-cell office:value-type="float" office:value="0.01917194">
            <text:p>0.01917194</text:p>
          </table:table-cell>
          <table:table-cell table:number-columns-repeated="4"/>
        </table:table-row>
        <table:table-row table:style-name="ro1">
          <table:table-cell office:value-type="float" office:value="429.462432861328">
            <text:p>429.4624328613</text:p>
          </table:table-cell>
          <table:table-cell office:value-type="float" office:value="0.02750552">
            <text:p>0.02750552</text:p>
          </table:table-cell>
          <table:table-cell table:number-columns-repeated="4"/>
        </table:table-row>
        <table:table-row table:style-name="ro1">
          <table:table-cell office:value-type="float" office:value="429.575897216797">
            <text:p>429.5758972168</text:p>
          </table:table-cell>
          <table:table-cell office:value-type="float" office:value="0.0004985452">
            <text:p>0.0004985452</text:p>
          </table:table-cell>
          <table:table-cell table:number-columns-repeated="4"/>
        </table:table-row>
        <table:table-row table:style-name="ro1">
          <table:table-cell office:value-type="float" office:value="429.689331054688">
            <text:p>429.6893310547</text:p>
          </table:table-cell>
          <table:table-cell office:value-type="float" office:value="-0.005873953">
            <text:p>-0.005873953</text:p>
          </table:table-cell>
          <table:table-cell table:number-columns-repeated="4"/>
        </table:table-row>
        <table:table-row table:style-name="ro1">
          <table:table-cell office:value-type="float" office:value="429.802795410156">
            <text:p>429.8027954102</text:p>
          </table:table-cell>
          <table:table-cell office:value-type="float" office:value="0.007195551">
            <text:p>0.007195551</text:p>
          </table:table-cell>
          <table:table-cell table:number-columns-repeated="4"/>
        </table:table-row>
        <table:table-row table:style-name="ro1">
          <table:table-cell office:value-type="float" office:value="429.916259765625">
            <text:p>429.9162597656</text:p>
          </table:table-cell>
          <table:table-cell office:value-type="float" office:value="-0.001810096">
            <text:p>-0.001810096</text:p>
          </table:table-cell>
          <table:table-cell table:number-columns-repeated="4"/>
        </table:table-row>
        <table:table-row table:style-name="ro1">
          <table:table-cell office:value-type="float" office:value="430.029724121094">
            <text:p>430.0297241211</text:p>
          </table:table-cell>
          <table:table-cell office:value-type="float" office:value="0.007868114">
            <text:p>0.007868114</text:p>
          </table:table-cell>
          <table:table-cell table:number-columns-repeated="4"/>
        </table:table-row>
        <table:table-row table:style-name="ro1">
          <table:table-cell office:value-type="float" office:value="430.143188476563">
            <text:p>430.1431884766</text:p>
          </table:table-cell>
          <table:table-cell office:value-type="float" office:value="0.008130158">
            <text:p>0.008130158</text:p>
          </table:table-cell>
          <table:table-cell table:number-columns-repeated="4"/>
        </table:table-row>
        <table:table-row table:style-name="ro1">
          <table:table-cell office:value-type="float" office:value="430.256683349609">
            <text:p>430.2566833496</text:p>
          </table:table-cell>
          <table:table-cell office:value-type="float" office:value="-0.005562749">
            <text:p>-0.005562749</text:p>
          </table:table-cell>
          <table:table-cell table:number-columns-repeated="4"/>
        </table:table-row>
        <table:table-row table:style-name="ro1">
          <table:table-cell office:value-type="float" office:value="430.370147705078">
            <text:p>430.3701477051</text:p>
          </table:table-cell>
          <table:table-cell office:value-type="float" office:value="0.01186866">
            <text:p>0.01186866</text:p>
          </table:table-cell>
          <table:table-cell table:number-columns-repeated="4"/>
        </table:table-row>
        <table:table-row table:style-name="ro1">
          <table:table-cell office:value-type="float" office:value="430.483642578125">
            <text:p>430.4836425781</text:p>
          </table:table-cell>
          <table:table-cell office:value-type="float" office:value="-0.004517174">
            <text:p>-0.004517174</text:p>
          </table:table-cell>
          <table:table-cell table:number-columns-repeated="4"/>
        </table:table-row>
        <table:table-row table:style-name="ro1">
          <table:table-cell office:value-type="float" office:value="430.597137451172">
            <text:p>430.5971374512</text:p>
          </table:table-cell>
          <table:table-cell office:value-type="float" office:value="0.0001048064">
            <text:p>0.0001048064</text:p>
          </table:table-cell>
          <table:table-cell table:number-columns-repeated="4"/>
        </table:table-row>
        <table:table-row table:style-name="ro1">
          <table:table-cell office:value-type="float" office:value="430.710632324219">
            <text:p>430.7106323242</text:p>
          </table:table-cell>
          <table:table-cell office:value-type="float" office:value="-0.003334006">
            <text:p>-0.003334006</text:p>
          </table:table-cell>
          <table:table-cell table:number-columns-repeated="4"/>
        </table:table-row>
        <table:table-row table:style-name="ro1">
          <table:table-cell office:value-type="float" office:value="430.824127197266">
            <text:p>430.8241271973</text:p>
          </table:table-cell>
          <table:table-cell office:value-type="float" office:value="0.006808786">
            <text:p>0.006808786</text:p>
          </table:table-cell>
          <table:table-cell table:number-columns-repeated="4"/>
        </table:table-row>
        <table:table-row table:style-name="ro1">
          <table:table-cell office:value-type="float" office:value="430.937652587891">
            <text:p>430.9376525879</text:p>
          </table:table-cell>
          <table:table-cell office:value-type="float" office:value="-0.001773543">
            <text:p>-0.001773543</text:p>
          </table:table-cell>
          <table:table-cell table:number-columns-repeated="4"/>
        </table:table-row>
        <table:table-row table:style-name="ro1">
          <table:table-cell office:value-type="float" office:value="431.051147460938">
            <text:p>431.0511474609</text:p>
          </table:table-cell>
          <table:table-cell office:value-type="float" office:value="-0.003992442">
            <text:p>-0.003992442</text:p>
          </table:table-cell>
          <table:table-cell table:number-columns-repeated="4"/>
        </table:table-row>
        <table:table-row table:style-name="ro1">
          <table:table-cell office:value-type="float" office:value="431.164672851563">
            <text:p>431.1646728516</text:p>
          </table:table-cell>
          <table:table-cell office:value-type="float" office:value="-0.006780864">
            <text:p>-0.006780864</text:p>
          </table:table-cell>
          <table:table-cell table:number-columns-repeated="4"/>
        </table:table-row>
        <table:table-row table:style-name="ro1">
          <table:table-cell office:value-type="float" office:value="431.278198242188">
            <text:p>431.2781982422</text:p>
          </table:table-cell>
          <table:table-cell office:value-type="float" office:value="0.003754793">
            <text:p>0.003754793</text:p>
          </table:table-cell>
          <table:table-cell table:number-columns-repeated="4"/>
        </table:table-row>
        <table:table-row table:style-name="ro1">
          <table:table-cell office:value-type="float" office:value="431.391723632813">
            <text:p>431.3917236328</text:p>
          </table:table-cell>
          <table:table-cell office:value-type="float" office:value="-0.004952027">
            <text:p>-0.004952027</text:p>
          </table:table-cell>
          <table:table-cell table:number-columns-repeated="4"/>
        </table:table-row>
        <table:table-row table:style-name="ro1">
          <table:table-cell office:value-type="float" office:value="431.505249023438">
            <text:p>431.5052490234</text:p>
          </table:table-cell>
          <table:table-cell office:value-type="float" office:value="-0.001724125">
            <text:p>-0.001724125</text:p>
          </table:table-cell>
          <table:table-cell table:number-columns-repeated="4"/>
        </table:table-row>
        <table:table-row table:style-name="ro1">
          <table:table-cell office:value-type="float" office:value="431.618804931641">
            <text:p>431.6188049316</text:p>
          </table:table-cell>
          <table:table-cell office:value-type="float" office:value="-0.004190092">
            <text:p>-0.004190092</text:p>
          </table:table-cell>
          <table:table-cell table:number-columns-repeated="4"/>
        </table:table-row>
        <table:table-row table:style-name="ro1">
          <table:table-cell office:value-type="float" office:value="431.732330322266">
            <text:p>431.7323303223</text:p>
          </table:table-cell>
          <table:table-cell office:value-type="float" office:value="0.009381083">
            <text:p>0.009381083</text:p>
          </table:table-cell>
          <table:table-cell table:number-columns-repeated="4"/>
        </table:table-row>
        <table:table-row table:style-name="ro1">
          <table:table-cell office:value-type="float" office:value="431.845886230469">
            <text:p>431.8458862305</text:p>
          </table:table-cell>
          <table:table-cell office:value-type="float" office:value="0.01056027">
            <text:p>0.01056027</text:p>
          </table:table-cell>
          <table:table-cell table:number-columns-repeated="4"/>
        </table:table-row>
        <table:table-row table:style-name="ro1">
          <table:table-cell office:value-type="float" office:value="431.959442138672">
            <text:p>431.9594421387</text:p>
          </table:table-cell>
          <table:table-cell office:value-type="float" office:value="0.006388267">
            <text:p>0.006388267</text:p>
          </table:table-cell>
          <table:table-cell table:number-columns-repeated="4"/>
        </table:table-row>
        <table:table-row table:style-name="ro1">
          <table:table-cell office:value-type="float" office:value="432.072998046875">
            <text:p>432.0729980469</text:p>
          </table:table-cell>
          <table:table-cell office:value-type="float" office:value="0.02048432">
            <text:p>0.02048432</text:p>
          </table:table-cell>
          <table:table-cell table:number-columns-repeated="4"/>
        </table:table-row>
        <table:table-row table:style-name="ro1">
          <table:table-cell office:value-type="float" office:value="432.186553955078">
            <text:p>432.1865539551</text:p>
          </table:table-cell>
          <table:table-cell office:value-type="float" office:value="-0.008020896">
            <text:p>-0.008020896</text:p>
          </table:table-cell>
          <table:table-cell table:number-columns-repeated="4"/>
        </table:table-row>
        <table:table-row table:style-name="ro1">
          <table:table-cell office:value-type="float" office:value="432.300140380859">
            <text:p>432.3001403809</text:p>
          </table:table-cell>
          <table:table-cell office:value-type="float" office:value="-0.003287312">
            <text:p>-0.003287312</text:p>
          </table:table-cell>
          <table:table-cell table:number-columns-repeated="4"/>
        </table:table-row>
        <table:table-row table:style-name="ro1">
          <table:table-cell office:value-type="float" office:value="432.413696289063">
            <text:p>432.4136962891</text:p>
          </table:table-cell>
          <table:table-cell office:value-type="string">
            <text:p>-9.463961E-05</text:p>
          </table:table-cell>
          <table:table-cell table:number-columns-repeated="4"/>
        </table:table-row>
        <table:table-row table:style-name="ro1">
          <table:table-cell office:value-type="float" office:value="432.527282714844">
            <text:p>432.5272827148</text:p>
          </table:table-cell>
          <table:table-cell office:value-type="float" office:value="0.003561246">
            <text:p>0.003561246</text:p>
          </table:table-cell>
          <table:table-cell table:number-columns-repeated="4"/>
        </table:table-row>
        <table:table-row table:style-name="ro1">
          <table:table-cell office:value-type="float" office:value="432.640869140625">
            <text:p>432.6408691406</text:p>
          </table:table-cell>
          <table:table-cell office:value-type="float" office:value="-0.004478257">
            <text:p>-0.004478257</text:p>
          </table:table-cell>
          <table:table-cell table:number-columns-repeated="4"/>
        </table:table-row>
        <table:table-row table:style-name="ro1">
          <table:table-cell office:value-type="float" office:value="432.754455566406">
            <text:p>432.7544555664</text:p>
          </table:table-cell>
          <table:table-cell office:value-type="float" office:value="0.01304102">
            <text:p>0.01304102</text:p>
          </table:table-cell>
          <table:table-cell table:number-columns-repeated="4"/>
        </table:table-row>
        <table:table-row table:style-name="ro1">
          <table:table-cell office:value-type="float" office:value="432.868041992188">
            <text:p>432.8680419922</text:p>
          </table:table-cell>
          <table:table-cell office:value-type="float" office:value="0.01831128">
            <text:p>0.01831128</text:p>
          </table:table-cell>
          <table:table-cell table:number-columns-repeated="4"/>
        </table:table-row>
        <table:table-row table:style-name="ro1">
          <table:table-cell office:value-type="float" office:value="432.981658935547">
            <text:p>432.9816589355</text:p>
          </table:table-cell>
          <table:table-cell office:value-type="float" office:value="0.00915294">
            <text:p>0.00915294</text:p>
          </table:table-cell>
          <table:table-cell table:number-columns-repeated="4"/>
        </table:table-row>
        <table:table-row table:style-name="ro1">
          <table:table-cell office:value-type="float" office:value="433.095245361328">
            <text:p>433.0952453613</text:p>
          </table:table-cell>
          <table:table-cell office:value-type="float" office:value="0.00236131">
            <text:p>0.00236131</text:p>
          </table:table-cell>
          <table:table-cell table:number-columns-repeated="4"/>
        </table:table-row>
        <table:table-row table:style-name="ro1">
          <table:table-cell office:value-type="float" office:value="433.208862304688">
            <text:p>433.2088623047</text:p>
          </table:table-cell>
          <table:table-cell office:value-type="float" office:value="0.003602717">
            <text:p>0.003602717</text:p>
          </table:table-cell>
          <table:table-cell table:number-columns-repeated="4"/>
        </table:table-row>
        <table:table-row table:style-name="ro1">
          <table:table-cell office:value-type="float" office:value="433.322479248047">
            <text:p>433.322479248</text:p>
          </table:table-cell>
          <table:table-cell office:value-type="float" office:value="-0.001630158">
            <text:p>-0.001630158</text:p>
          </table:table-cell>
          <table:table-cell table:number-columns-repeated="4"/>
        </table:table-row>
        <table:table-row table:style-name="ro1">
          <table:table-cell office:value-type="float" office:value="433.436096191406">
            <text:p>433.4360961914</text:p>
          </table:table-cell>
          <table:table-cell office:value-type="float" office:value="0.004541751">
            <text:p>0.004541751</text:p>
          </table:table-cell>
          <table:table-cell table:number-columns-repeated="4"/>
        </table:table-row>
        <table:table-row table:style-name="ro1">
          <table:table-cell office:value-type="float" office:value="433.549713134766">
            <text:p>433.5497131348</text:p>
          </table:table-cell>
          <table:table-cell office:value-type="float" office:value="-0.002566589">
            <text:p>-0.002566589</text:p>
          </table:table-cell>
          <table:table-cell table:number-columns-repeated="4"/>
        </table:table-row>
        <table:table-row table:style-name="ro1">
          <table:table-cell office:value-type="float" office:value="433.663330078125">
            <text:p>433.6633300781</text:p>
          </table:table-cell>
          <table:table-cell office:value-type="float" office:value="-0.004416989">
            <text:p>-0.004416989</text:p>
          </table:table-cell>
          <table:table-cell table:number-columns-repeated="4"/>
        </table:table-row>
        <table:table-row table:style-name="ro1">
          <table:table-cell office:value-type="float" office:value="433.776977539063">
            <text:p>433.7769775391</text:p>
          </table:table-cell>
          <table:table-cell office:value-type="float" office:value="-0.00596171">
            <text:p>-0.00596171</text:p>
          </table:table-cell>
          <table:table-cell table:number-columns-repeated="4"/>
        </table:table-row>
        <table:table-row table:style-name="ro1">
          <table:table-cell office:value-type="float" office:value="433.890625">
            <text:p>433.890625</text:p>
          </table:table-cell>
          <table:table-cell office:value-type="float" office:value="0.01542281">
            <text:p>0.01542281</text:p>
          </table:table-cell>
          <table:table-cell table:number-columns-repeated="4"/>
        </table:table-row>
        <table:table-row table:style-name="ro1">
          <table:table-cell office:value-type="float" office:value="434.004272460938">
            <text:p>434.0042724609</text:p>
          </table:table-cell>
          <table:table-cell office:value-type="float" office:value="-0.001344389">
            <text:p>-0.001344389</text:p>
          </table:table-cell>
          <table:table-cell table:number-columns-repeated="4"/>
        </table:table-row>
        <table:table-row table:style-name="ro1">
          <table:table-cell office:value-type="float" office:value="434.117919921875">
            <text:p>434.1179199219</text:p>
          </table:table-cell>
          <table:table-cell office:value-type="float" office:value="0.002112025">
            <text:p>0.002112025</text:p>
          </table:table-cell>
          <table:table-cell table:number-columns-repeated="4"/>
        </table:table-row>
        <table:table-row table:style-name="ro1">
          <table:table-cell office:value-type="float" office:value="434.231567382813">
            <text:p>434.2315673828</text:p>
          </table:table-cell>
          <table:table-cell office:value-type="float" office:value="-0.009523274">
            <text:p>-0.009523274</text:p>
          </table:table-cell>
          <table:table-cell table:number-columns-repeated="4"/>
        </table:table-row>
        <table:table-row table:style-name="ro1">
          <table:table-cell office:value-type="float" office:value="434.34521484375">
            <text:p>434.3452148438</text:p>
          </table:table-cell>
          <table:table-cell office:value-type="float" office:value="-0.007968811">
            <text:p>-0.007968811</text:p>
          </table:table-cell>
          <table:table-cell table:number-columns-repeated="4"/>
        </table:table-row>
        <table:table-row table:style-name="ro1">
          <table:table-cell office:value-type="float" office:value="434.458892822266">
            <text:p>434.4588928223</text:p>
          </table:table-cell>
          <table:table-cell office:value-type="float" office:value="0.02190025">
            <text:p>0.02190025</text:p>
          </table:table-cell>
          <table:table-cell table:number-columns-repeated="4"/>
        </table:table-row>
        <table:table-row table:style-name="ro1">
          <table:table-cell office:value-type="float" office:value="434.572570800781">
            <text:p>434.5725708008</text:p>
          </table:table-cell>
          <table:table-cell office:value-type="float" office:value="-0.005583677">
            <text:p>-0.005583677</text:p>
          </table:table-cell>
          <table:table-cell table:number-columns-repeated="4"/>
        </table:table-row>
        <table:table-row table:style-name="ro1">
          <table:table-cell office:value-type="float" office:value="434.686248779297">
            <text:p>434.6862487793</text:p>
          </table:table-cell>
          <table:table-cell office:value-type="float" office:value="-0.003523897">
            <text:p>-0.003523897</text:p>
          </table:table-cell>
          <table:table-cell table:number-columns-repeated="4"/>
        </table:table-row>
        <table:table-row table:style-name="ro1">
          <table:table-cell office:value-type="float" office:value="434.799926757813">
            <text:p>434.7999267578</text:p>
          </table:table-cell>
          <table:table-cell office:value-type="float" office:value="-0.005408534">
            <text:p>-0.005408534</text:p>
          </table:table-cell>
          <table:table-cell table:number-columns-repeated="4"/>
        </table:table-row>
        <table:table-row table:style-name="ro1">
          <table:table-cell office:value-type="float" office:value="434.913604736328">
            <text:p>434.9136047363</text:p>
          </table:table-cell>
          <table:table-cell office:value-type="float" office:value="0.002254132">
            <text:p>0.002254132</text:p>
          </table:table-cell>
          <table:table-cell table:number-columns-repeated="4"/>
        </table:table-row>
        <table:table-row table:style-name="ro1">
          <table:table-cell office:value-type="float" office:value="435.027282714844">
            <text:p>435.0272827148</text:p>
          </table:table-cell>
          <table:table-cell office:value-type="float" office:value="-0.003207088">
            <text:p>-0.003207088</text:p>
          </table:table-cell>
          <table:table-cell table:number-columns-repeated="4"/>
        </table:table-row>
        <table:table-row table:style-name="ro1">
          <table:table-cell office:value-type="float" office:value="435.140991210938">
            <text:p>435.1409912109</text:p>
          </table:table-cell>
          <table:table-cell office:value-type="float" office:value="-0.001841526">
            <text:p>-0.001841526</text:p>
          </table:table-cell>
          <table:table-cell table:number-columns-repeated="4"/>
        </table:table-row>
        <table:table-row table:style-name="ro1">
          <table:table-cell office:value-type="float" office:value="435.254669189453">
            <text:p>435.2546691895</text:p>
          </table:table-cell>
          <table:table-cell office:value-type="float" office:value="0.006203873">
            <text:p>0.006203873</text:p>
          </table:table-cell>
          <table:table-cell table:number-columns-repeated="4"/>
        </table:table-row>
        <table:table-row table:style-name="ro1">
          <table:table-cell office:value-type="float" office:value="435.368377685547">
            <text:p>435.3683776855</text:p>
          </table:table-cell>
          <table:table-cell office:value-type="float" office:value="-0.008577113">
            <text:p>-0.008577113</text:p>
          </table:table-cell>
          <table:table-cell table:number-columns-repeated="4"/>
        </table:table-row>
        <table:table-row table:style-name="ro1">
          <table:table-cell office:value-type="float" office:value="435.482086181641">
            <text:p>435.4820861816</text:p>
          </table:table-cell>
          <table:table-cell office:value-type="float" office:value="-0.008209844">
            <text:p>-0.008209844</text:p>
          </table:table-cell>
          <table:table-cell table:number-columns-repeated="4"/>
        </table:table-row>
        <table:table-row table:style-name="ro1">
          <table:table-cell office:value-type="float" office:value="435.595825195313">
            <text:p>435.5958251953</text:p>
          </table:table-cell>
          <table:table-cell office:value-type="float" office:value="-0.005577841">
            <text:p>-0.005577841</text:p>
          </table:table-cell>
          <table:table-cell table:number-columns-repeated="4"/>
        </table:table-row>
        <table:table-row table:style-name="ro1">
          <table:table-cell office:value-type="float" office:value="435.709533691406">
            <text:p>435.7095336914</text:p>
          </table:table-cell>
          <table:table-cell office:value-type="float" office:value="0.01270452">
            <text:p>0.01270452</text:p>
          </table:table-cell>
          <table:table-cell table:number-columns-repeated="4"/>
        </table:table-row>
        <table:table-row table:style-name="ro1">
          <table:table-cell office:value-type="float" office:value="435.823272705078">
            <text:p>435.8232727051</text:p>
          </table:table-cell>
          <table:table-cell office:value-type="float" office:value="0.00185732">
            <text:p>0.00185732</text:p>
          </table:table-cell>
          <table:table-cell table:number-columns-repeated="4"/>
        </table:table-row>
        <table:table-row table:style-name="ro1">
          <table:table-cell office:value-type="float" office:value="435.936981201172">
            <text:p>435.9369812012</text:p>
          </table:table-cell>
          <table:table-cell office:value-type="float" office:value="-0.01134393">
            <text:p>-0.01134393</text:p>
          </table:table-cell>
          <table:table-cell table:number-columns-repeated="4"/>
        </table:table-row>
        <table:table-row table:style-name="ro1">
          <table:table-cell office:value-type="float" office:value="436.050720214844">
            <text:p>436.0507202148</text:p>
          </table:table-cell>
          <table:table-cell office:value-type="float" office:value="0.001793132">
            <text:p>0.001793132</text:p>
          </table:table-cell>
          <table:table-cell table:number-columns-repeated="4"/>
        </table:table-row>
        <table:table-row table:style-name="ro1">
          <table:table-cell office:value-type="float" office:value="436.164459228516">
            <text:p>436.1644592285</text:p>
          </table:table-cell>
          <table:table-cell office:value-type="float" office:value="-0.003227346">
            <text:p>-0.003227346</text:p>
          </table:table-cell>
          <table:table-cell table:number-columns-repeated="4"/>
        </table:table-row>
        <table:table-row table:style-name="ro1">
          <table:table-cell office:value-type="float" office:value="436.278198242188">
            <text:p>436.2781982422</text:p>
          </table:table-cell>
          <table:table-cell office:value-type="float" office:value="0.02728921">
            <text:p>0.02728921</text:p>
          </table:table-cell>
          <table:table-cell table:number-columns-repeated="4"/>
        </table:table-row>
        <table:table-row table:style-name="ro1">
          <table:table-cell office:value-type="float" office:value="436.391967773438">
            <text:p>436.3919677734</text:p>
          </table:table-cell>
          <table:table-cell office:value-type="float" office:value="-0.002208018">
            <text:p>-0.002208018</text:p>
          </table:table-cell>
          <table:table-cell table:number-columns-repeated="4"/>
        </table:table-row>
        <table:table-row table:style-name="ro1">
          <table:table-cell office:value-type="float" office:value="436.505706787109">
            <text:p>436.5057067871</text:p>
          </table:table-cell>
          <table:table-cell office:value-type="float" office:value="-0.003174262">
            <text:p>-0.003174262</text:p>
          </table:table-cell>
          <table:table-cell table:number-columns-repeated="4"/>
        </table:table-row>
        <table:table-row table:style-name="ro1">
          <table:table-cell office:value-type="float" office:value="436.619476318359">
            <text:p>436.6194763184</text:p>
          </table:table-cell>
          <table:table-cell office:value-type="float" office:value="0.004194912">
            <text:p>0.004194912</text:p>
          </table:table-cell>
          <table:table-cell table:number-columns-repeated="4"/>
        </table:table-row>
        <table:table-row table:style-name="ro1">
          <table:table-cell office:value-type="float" office:value="436.733245849609">
            <text:p>436.7332458496</text:p>
          </table:table-cell>
          <table:table-cell office:value-type="float" office:value="0.001254779">
            <text:p>0.001254779</text:p>
          </table:table-cell>
          <table:table-cell table:number-columns-repeated="4"/>
        </table:table-row>
        <table:table-row table:style-name="ro1">
          <table:table-cell office:value-type="float" office:value="436.847015380859">
            <text:p>436.8470153809</text:p>
          </table:table-cell>
          <table:table-cell office:value-type="float" office:value="-0.01015604">
            <text:p>-0.01015604</text:p>
          </table:table-cell>
          <table:table-cell table:number-columns-repeated="4"/>
        </table:table-row>
        <table:table-row table:style-name="ro1">
          <table:table-cell office:value-type="float" office:value="436.960784912109">
            <text:p>436.9607849121</text:p>
          </table:table-cell>
          <table:table-cell office:value-type="float" office:value="0.005338085">
            <text:p>0.005338085</text:p>
          </table:table-cell>
          <table:table-cell table:number-columns-repeated="4"/>
        </table:table-row>
        <table:table-row table:style-name="ro1">
          <table:table-cell office:value-type="float" office:value="437.074554443359">
            <text:p>437.0745544434</text:p>
          </table:table-cell>
          <table:table-cell office:value-type="float" office:value="0.003041045">
            <text:p>0.003041045</text:p>
          </table:table-cell>
          <table:table-cell table:number-columns-repeated="4"/>
        </table:table-row>
        <table:table-row table:style-name="ro1">
          <table:table-cell office:value-type="float" office:value="437.188354492188">
            <text:p>437.1883544922</text:p>
          </table:table-cell>
          <table:table-cell office:value-type="float" office:value="-0.001692347">
            <text:p>-0.001692347</text:p>
          </table:table-cell>
          <table:table-cell table:number-columns-repeated="4"/>
        </table:table-row>
        <table:table-row table:style-name="ro1">
          <table:table-cell office:value-type="float" office:value="437.302154541016">
            <text:p>437.302154541</text:p>
          </table:table-cell>
          <table:table-cell office:value-type="float" office:value="0.003570141">
            <text:p>0.003570141</text:p>
          </table:table-cell>
          <table:table-cell table:number-columns-repeated="4"/>
        </table:table-row>
        <table:table-row table:style-name="ro1">
          <table:table-cell office:value-type="float" office:value="437.415924072266">
            <text:p>437.4159240723</text:p>
          </table:table-cell>
          <table:table-cell office:value-type="float" office:value="0.004120478">
            <text:p>0.004120478</text:p>
          </table:table-cell>
          <table:table-cell table:number-columns-repeated="4"/>
        </table:table-row>
        <table:table-row table:style-name="ro1">
          <table:table-cell office:value-type="float" office:value="437.529724121094">
            <text:p>437.5297241211</text:p>
          </table:table-cell>
          <table:table-cell office:value-type="string">
            <text:p>-1.536113E-05</text:p>
          </table:table-cell>
          <table:table-cell table:number-columns-repeated="4"/>
        </table:table-row>
        <table:table-row table:style-name="ro1">
          <table:table-cell office:value-type="float" office:value="437.6435546875">
            <text:p>437.6435546875</text:p>
          </table:table-cell>
          <table:table-cell office:value-type="float" office:value="-0.001251822">
            <text:p>-0.001251822</text:p>
          </table:table-cell>
          <table:table-cell table:number-columns-repeated="4"/>
        </table:table-row>
        <table:table-row table:style-name="ro1">
          <table:table-cell office:value-type="float" office:value="437.757354736328">
            <text:p>437.7573547363</text:p>
          </table:table-cell>
          <table:table-cell office:value-type="float" office:value="0.0054472">
            <text:p>0.0054472</text:p>
          </table:table-cell>
          <table:table-cell table:number-columns-repeated="4"/>
        </table:table-row>
        <table:table-row table:style-name="ro1">
          <table:table-cell office:value-type="float" office:value="437.871154785156">
            <text:p>437.8711547852</text:p>
          </table:table-cell>
          <table:table-cell office:value-type="float" office:value="-0.004579739">
            <text:p>-0.004579739</text:p>
          </table:table-cell>
          <table:table-cell table:number-columns-repeated="4"/>
        </table:table-row>
        <table:table-row table:style-name="ro1">
          <table:table-cell office:value-type="float" office:value="437.984985351563">
            <text:p>437.9849853516</text:p>
          </table:table-cell>
          <table:table-cell office:value-type="float" office:value="0.01503123">
            <text:p>0.01503123</text:p>
          </table:table-cell>
          <table:table-cell table:number-columns-repeated="4"/>
        </table:table-row>
        <table:table-row table:style-name="ro1">
          <table:table-cell office:value-type="float" office:value="438.098815917969">
            <text:p>438.098815918</text:p>
          </table:table-cell>
          <table:table-cell office:value-type="float" office:value="0.00372976">
            <text:p>0.00372976</text:p>
          </table:table-cell>
          <table:table-cell table:number-columns-repeated="4"/>
        </table:table-row>
        <table:table-row table:style-name="ro1">
          <table:table-cell office:value-type="float" office:value="438.212646484375">
            <text:p>438.2126464844</text:p>
          </table:table-cell>
          <table:table-cell office:value-type="float" office:value="-0.007876451">
            <text:p>-0.007876451</text:p>
          </table:table-cell>
          <table:table-cell table:number-columns-repeated="4"/>
        </table:table-row>
        <table:table-row table:style-name="ro1">
          <table:table-cell office:value-type="float" office:value="438.326477050781">
            <text:p>438.3264770508</text:p>
          </table:table-cell>
          <table:table-cell office:value-type="float" office:value="-0.0115521">
            <text:p>-0.0115521</text:p>
          </table:table-cell>
          <table:table-cell table:number-columns-repeated="4"/>
        </table:table-row>
        <table:table-row table:style-name="ro1">
          <table:table-cell office:value-type="float" office:value="438.440307617188">
            <text:p>438.4403076172</text:p>
          </table:table-cell>
          <table:table-cell office:value-type="float" office:value="-0.001512032">
            <text:p>-0.001512032</text:p>
          </table:table-cell>
          <table:table-cell table:number-columns-repeated="4"/>
        </table:table-row>
        <table:table-row table:style-name="ro1">
          <table:table-cell office:value-type="float" office:value="438.554168701172">
            <text:p>438.5541687012</text:p>
          </table:table-cell>
          <table:table-cell office:value-type="float" office:value="0.006938442">
            <text:p>0.006938442</text:p>
          </table:table-cell>
          <table:table-cell table:number-columns-repeated="4"/>
        </table:table-row>
        <table:table-row table:style-name="ro1">
          <table:table-cell office:value-type="float" office:value="438.667999267578">
            <text:p>438.6679992676</text:p>
          </table:table-cell>
          <table:table-cell office:value-type="float" office:value="-0.01011907">
            <text:p>-0.01011907</text:p>
          </table:table-cell>
          <table:table-cell table:number-columns-repeated="4"/>
        </table:table-row>
        <table:table-row table:style-name="ro1">
          <table:table-cell office:value-type="float" office:value="438.781860351563">
            <text:p>438.7818603516</text:p>
          </table:table-cell>
          <table:table-cell office:value-type="float" office:value="-0.01427488">
            <text:p>-0.01427488</text:p>
          </table:table-cell>
          <table:table-cell table:number-columns-repeated="4"/>
        </table:table-row>
        <table:table-row table:style-name="ro1">
          <table:table-cell office:value-type="float" office:value="438.895721435547">
            <text:p>438.8957214355</text:p>
          </table:table-cell>
          <table:table-cell office:value-type="float" office:value="-0.004278515">
            <text:p>-0.004278515</text:p>
          </table:table-cell>
          <table:table-cell table:number-columns-repeated="4"/>
        </table:table-row>
        <table:table-row table:style-name="ro1">
          <table:table-cell office:value-type="float" office:value="439.009582519531">
            <text:p>439.0095825195</text:p>
          </table:table-cell>
          <table:table-cell office:value-type="float" office:value="0.001327921">
            <text:p>0.001327921</text:p>
          </table:table-cell>
          <table:table-cell table:number-columns-repeated="4"/>
        </table:table-row>
        <table:table-row table:style-name="ro1">
          <table:table-cell office:value-type="float" office:value="439.123474121094">
            <text:p>439.1234741211</text:p>
          </table:table-cell>
          <table:table-cell office:value-type="float" office:value="-0.0109995">
            <text:p>-0.0109995</text:p>
          </table:table-cell>
          <table:table-cell table:number-columns-repeated="4"/>
        </table:table-row>
        <table:table-row table:style-name="ro1">
          <table:table-cell office:value-type="float" office:value="439.237335205078">
            <text:p>439.2373352051</text:p>
          </table:table-cell>
          <table:table-cell office:value-type="float" office:value="-0.008406855">
            <text:p>-0.008406855</text:p>
          </table:table-cell>
          <table:table-cell table:number-columns-repeated="4"/>
        </table:table-row>
        <table:table-row table:style-name="ro1">
          <table:table-cell office:value-type="float" office:value="439.351226806641">
            <text:p>439.3512268066</text:p>
          </table:table-cell>
          <table:table-cell office:value-type="float" office:value="0.003482854">
            <text:p>0.003482854</text:p>
          </table:table-cell>
          <table:table-cell table:number-columns-repeated="4"/>
        </table:table-row>
        <table:table-row table:style-name="ro1">
          <table:table-cell office:value-type="float" office:value="439.465087890625">
            <text:p>439.4650878906</text:p>
          </table:table-cell>
          <table:table-cell office:value-type="float" office:value="0.0220956">
            <text:p>0.0220956</text:p>
          </table:table-cell>
          <table:table-cell table:number-columns-repeated="4"/>
        </table:table-row>
        <table:table-row table:style-name="ro1">
          <table:table-cell office:value-type="float" office:value="439.578979492188">
            <text:p>439.5789794922</text:p>
          </table:table-cell>
          <table:table-cell office:value-type="float" office:value="-0.005628922">
            <text:p>-0.005628922</text:p>
          </table:table-cell>
          <table:table-cell table:number-columns-repeated="4"/>
        </table:table-row>
        <table:table-row table:style-name="ro1">
          <table:table-cell office:value-type="float" office:value="439.69287109375">
            <text:p>439.6928710938</text:p>
          </table:table-cell>
          <table:table-cell office:value-type="float" office:value="-0.009692939">
            <text:p>-0.009692939</text:p>
          </table:table-cell>
          <table:table-cell table:number-columns-repeated="4"/>
        </table:table-row>
        <table:table-row table:style-name="ro1">
          <table:table-cell office:value-type="float" office:value="439.806793212891">
            <text:p>439.8067932129</text:p>
          </table:table-cell>
          <table:table-cell office:value-type="float" office:value="-0.007760459">
            <text:p>-0.007760459</text:p>
          </table:table-cell>
          <table:table-cell table:number-columns-repeated="4"/>
        </table:table-row>
        <table:table-row table:style-name="ro1">
          <table:table-cell office:value-type="float" office:value="439.920684814453">
            <text:p>439.9206848145</text:p>
          </table:table-cell>
          <table:table-cell office:value-type="float" office:value="0.06423979">
            <text:p>0.06423979</text:p>
          </table:table-cell>
          <table:table-cell table:number-columns-repeated="4"/>
        </table:table-row>
        <table:table-row table:style-name="ro1">
          <table:table-cell office:value-type="float" office:value="440.034606933594">
            <text:p>440.0346069336</text:p>
          </table:table-cell>
          <table:table-cell office:value-type="float" office:value="-0.0005348334">
            <text:p>-0.0005348334</text:p>
          </table:table-cell>
          <table:table-cell table:number-columns-repeated="4"/>
        </table:table-row>
        <table:table-row table:style-name="ro1">
          <table:table-cell office:value-type="float" office:value="440.148498535156">
            <text:p>440.1484985352</text:p>
          </table:table-cell>
          <table:table-cell office:value-type="float" office:value="-0.003972925">
            <text:p>-0.003972925</text:p>
          </table:table-cell>
          <table:table-cell table:number-columns-repeated="4"/>
        </table:table-row>
        <table:table-row table:style-name="ro1">
          <table:table-cell office:value-type="float" office:value="440.262420654297">
            <text:p>440.2624206543</text:p>
          </table:table-cell>
          <table:table-cell office:value-type="float" office:value="0.00735397">
            <text:p>0.00735397</text:p>
          </table:table-cell>
          <table:table-cell table:number-columns-repeated="4"/>
        </table:table-row>
        <table:table-row table:style-name="ro1">
          <table:table-cell office:value-type="float" office:value="440.376342773438">
            <text:p>440.3763427734</text:p>
          </table:table-cell>
          <table:table-cell office:value-type="float" office:value="0.03344585">
            <text:p>0.03344585</text:p>
          </table:table-cell>
          <table:table-cell table:number-columns-repeated="4"/>
        </table:table-row>
        <table:table-row table:style-name="ro1">
          <table:table-cell office:value-type="float" office:value="440.490295410156">
            <text:p>440.4902954102</text:p>
          </table:table-cell>
          <table:table-cell office:value-type="float" office:value="-0.001188869">
            <text:p>-0.001188869</text:p>
          </table:table-cell>
          <table:table-cell table:number-columns-repeated="4"/>
        </table:table-row>
        <table:table-row table:style-name="ro1">
          <table:table-cell office:value-type="float" office:value="440.604217529297">
            <text:p>440.6042175293</text:p>
          </table:table-cell>
          <table:table-cell office:value-type="float" office:value="-0.0187484">
            <text:p>-0.0187484</text:p>
          </table:table-cell>
          <table:table-cell table:number-columns-repeated="4"/>
        </table:table-row>
        <table:table-row table:style-name="ro1">
          <table:table-cell office:value-type="float" office:value="440.718170166016">
            <text:p>440.718170166</text:p>
          </table:table-cell>
          <table:table-cell office:value-type="float" office:value="0.02161553">
            <text:p>0.02161553</text:p>
          </table:table-cell>
          <table:table-cell table:number-columns-repeated="4"/>
        </table:table-row>
        <table:table-row table:style-name="ro1">
          <table:table-cell office:value-type="float" office:value="440.832092285156">
            <text:p>440.8320922852</text:p>
          </table:table-cell>
          <table:table-cell office:value-type="float" office:value="0.01055673">
            <text:p>0.01055673</text:p>
          </table:table-cell>
          <table:table-cell table:number-columns-repeated="4"/>
        </table:table-row>
        <table:table-row table:style-name="ro1">
          <table:table-cell office:value-type="float" office:value="440.946044921875">
            <text:p>440.9460449219</text:p>
          </table:table-cell>
          <table:table-cell office:value-type="float" office:value="-0.004445108">
            <text:p>-0.004445108</text:p>
          </table:table-cell>
          <table:table-cell table:number-columns-repeated="4"/>
        </table:table-row>
        <table:table-row table:style-name="ro1">
          <table:table-cell office:value-type="float" office:value="441.059997558594">
            <text:p>441.0599975586</text:p>
          </table:table-cell>
          <table:table-cell office:value-type="float" office:value="-0.002266757">
            <text:p>-0.002266757</text:p>
          </table:table-cell>
          <table:table-cell table:number-columns-repeated="4"/>
        </table:table-row>
        <table:table-row table:style-name="ro1">
          <table:table-cell office:value-type="float" office:value="441.173950195313">
            <text:p>441.1739501953</text:p>
          </table:table-cell>
          <table:table-cell office:value-type="float" office:value="0.004830435">
            <text:p>0.004830435</text:p>
          </table:table-cell>
          <table:table-cell table:number-columns-repeated="4"/>
        </table:table-row>
        <table:table-row table:style-name="ro1">
          <table:table-cell office:value-type="float" office:value="441.287933349609">
            <text:p>441.2879333496</text:p>
          </table:table-cell>
          <table:table-cell office:value-type="float" office:value="-0.001852827">
            <text:p>-0.001852827</text:p>
          </table:table-cell>
          <table:table-cell table:number-columns-repeated="4"/>
        </table:table-row>
        <table:table-row table:style-name="ro1">
          <table:table-cell office:value-type="float" office:value="441.401885986328">
            <text:p>441.4018859863</text:p>
          </table:table-cell>
          <table:table-cell office:value-type="float" office:value="0.0003823249">
            <text:p>0.0003823249</text:p>
          </table:table-cell>
          <table:table-cell table:number-columns-repeated="4"/>
        </table:table-row>
        <table:table-row table:style-name="ro1">
          <table:table-cell office:value-type="float" office:value="441.515869140625">
            <text:p>441.5158691406</text:p>
          </table:table-cell>
          <table:table-cell office:value-type="float" office:value="0.01721312">
            <text:p>0.01721312</text:p>
          </table:table-cell>
          <table:table-cell table:number-columns-repeated="4"/>
        </table:table-row>
        <table:table-row table:style-name="ro1">
          <table:table-cell office:value-type="float" office:value="441.629852294922">
            <text:p>441.6298522949</text:p>
          </table:table-cell>
          <table:table-cell office:value-type="float" office:value="0.0004383968">
            <text:p>0.0004383968</text:p>
          </table:table-cell>
          <table:table-cell table:number-columns-repeated="4"/>
        </table:table-row>
        <table:table-row table:style-name="ro1">
          <table:table-cell office:value-type="float" office:value="441.743835449219">
            <text:p>441.7438354492</text:p>
          </table:table-cell>
          <table:table-cell office:value-type="float" office:value="0.006175636">
            <text:p>0.006175636</text:p>
          </table:table-cell>
          <table:table-cell table:number-columns-repeated="4"/>
        </table:table-row>
        <table:table-row table:style-name="ro1">
          <table:table-cell office:value-type="float" office:value="441.857818603516">
            <text:p>441.8578186035</text:p>
          </table:table-cell>
          <table:table-cell office:value-type="float" office:value="-0.01161725">
            <text:p>-0.01161725</text:p>
          </table:table-cell>
          <table:table-cell table:number-columns-repeated="4"/>
        </table:table-row>
        <table:table-row table:style-name="ro1">
          <table:table-cell office:value-type="float" office:value="441.971801757813">
            <text:p>441.9718017578</text:p>
          </table:table-cell>
          <table:table-cell office:value-type="float" office:value="0.001294875">
            <text:p>0.001294875</text:p>
          </table:table-cell>
          <table:table-cell table:number-columns-repeated="4"/>
        </table:table-row>
        <table:table-row table:style-name="ro1">
          <table:table-cell office:value-type="float" office:value="442.085815429688">
            <text:p>442.0858154297</text:p>
          </table:table-cell>
          <table:table-cell office:value-type="float" office:value="0.009327375">
            <text:p>0.009327375</text:p>
          </table:table-cell>
          <table:table-cell table:number-columns-repeated="4"/>
        </table:table-row>
        <table:table-row table:style-name="ro1">
          <table:table-cell office:value-type="float" office:value="442.199829101563">
            <text:p>442.1998291016</text:p>
          </table:table-cell>
          <table:table-cell office:value-type="float" office:value="-0.007128536">
            <text:p>-0.007128536</text:p>
          </table:table-cell>
          <table:table-cell table:number-columns-repeated="4"/>
        </table:table-row>
        <table:table-row table:style-name="ro1">
          <table:table-cell office:value-type="float" office:value="442.313812255859">
            <text:p>442.3138122559</text:p>
          </table:table-cell>
          <table:table-cell office:value-type="float" office:value="-0.000806951">
            <text:p>-0.000806951</text:p>
          </table:table-cell>
          <table:table-cell table:number-columns-repeated="4"/>
        </table:table-row>
        <table:table-row table:style-name="ro1">
          <table:table-cell office:value-type="float" office:value="442.427825927734">
            <text:p>442.4278259277</text:p>
          </table:table-cell>
          <table:table-cell office:value-type="float" office:value="0.02192697">
            <text:p>0.02192697</text:p>
          </table:table-cell>
          <table:table-cell table:number-columns-repeated="4"/>
        </table:table-row>
        <table:table-row table:style-name="ro1">
          <table:table-cell office:value-type="float" office:value="442.541839599609">
            <text:p>442.5418395996</text:p>
          </table:table-cell>
          <table:table-cell office:value-type="float" office:value="0.001100673">
            <text:p>0.001100673</text:p>
          </table:table-cell>
          <table:table-cell table:number-columns-repeated="4"/>
        </table:table-row>
        <table:table-row table:style-name="ro1">
          <table:table-cell office:value-type="float" office:value="442.655883789063">
            <text:p>442.6558837891</text:p>
          </table:table-cell>
          <table:table-cell office:value-type="float" office:value="-0.003589896">
            <text:p>-0.003589896</text:p>
          </table:table-cell>
          <table:table-cell table:number-columns-repeated="4"/>
        </table:table-row>
        <table:table-row table:style-name="ro1">
          <table:table-cell office:value-type="float" office:value="442.769897460938">
            <text:p>442.7698974609</text:p>
          </table:table-cell>
          <table:table-cell office:value-type="float" office:value="-0.0007925538">
            <text:p>-0.0007925538</text:p>
          </table:table-cell>
          <table:table-cell table:number-columns-repeated="4"/>
        </table:table-row>
        <table:table-row table:style-name="ro1">
          <table:table-cell office:value-type="float" office:value="442.883941650391">
            <text:p>442.8839416504</text:p>
          </table:table-cell>
          <table:table-cell office:value-type="float" office:value="-0.002836298">
            <text:p>-0.002836298</text:p>
          </table:table-cell>
          <table:table-cell table:number-columns-repeated="4"/>
        </table:table-row>
        <table:table-row table:style-name="ro1">
          <table:table-cell office:value-type="float" office:value="442.997985839844">
            <text:p>442.9979858398</text:p>
          </table:table-cell>
          <table:table-cell office:value-type="float" office:value="0.007640108">
            <text:p>0.007640108</text:p>
          </table:table-cell>
          <table:table-cell table:number-columns-repeated="4"/>
        </table:table-row>
        <table:table-row table:style-name="ro1">
          <table:table-cell office:value-type="float" office:value="443.112030029297">
            <text:p>443.1120300293</text:p>
          </table:table-cell>
          <table:table-cell office:value-type="float" office:value="0.003396183">
            <text:p>0.003396183</text:p>
          </table:table-cell>
          <table:table-cell table:number-columns-repeated="4"/>
        </table:table-row>
        <table:table-row table:style-name="ro1">
          <table:table-cell office:value-type="float" office:value="443.22607421875">
            <text:p>443.2260742188</text:p>
          </table:table-cell>
          <table:table-cell office:value-type="float" office:value="-0.006154786">
            <text:p>-0.006154786</text:p>
          </table:table-cell>
          <table:table-cell table:number-columns-repeated="4"/>
        </table:table-row>
        <table:table-row table:style-name="ro1">
          <table:table-cell office:value-type="float" office:value="443.340118408203">
            <text:p>443.3401184082</text:p>
          </table:table-cell>
          <table:table-cell office:value-type="float" office:value="-0.001392435">
            <text:p>-0.001392435</text:p>
          </table:table-cell>
          <table:table-cell table:number-columns-repeated="4"/>
        </table:table-row>
        <table:table-row table:style-name="ro1">
          <table:table-cell office:value-type="float" office:value="443.454162597656">
            <text:p>443.4541625977</text:p>
          </table:table-cell>
          <table:table-cell office:value-type="float" office:value="0.003641749">
            <text:p>0.003641749</text:p>
          </table:table-cell>
          <table:table-cell table:number-columns-repeated="4"/>
        </table:table-row>
        <table:table-row table:style-name="ro1">
          <table:table-cell office:value-type="float" office:value="443.568237304688">
            <text:p>443.5682373047</text:p>
          </table:table-cell>
          <table:table-cell office:value-type="float" office:value="-0.006370682">
            <text:p>-0.006370682</text:p>
          </table:table-cell>
          <table:table-cell table:number-columns-repeated="4"/>
        </table:table-row>
        <table:table-row table:style-name="ro1">
          <table:table-cell office:value-type="float" office:value="443.682312011719">
            <text:p>443.6823120117</text:p>
          </table:table-cell>
          <table:table-cell office:value-type="float" office:value="-0.01070906">
            <text:p>-0.01070906</text:p>
          </table:table-cell>
          <table:table-cell table:number-columns-repeated="4"/>
        </table:table-row>
        <table:table-row table:style-name="ro1">
          <table:table-cell office:value-type="float" office:value="443.79638671875">
            <text:p>443.7963867188</text:p>
          </table:table-cell>
          <table:table-cell office:value-type="float" office:value="0.002500797">
            <text:p>0.002500797</text:p>
          </table:table-cell>
          <table:table-cell table:number-columns-repeated="4"/>
        </table:table-row>
        <table:table-row table:style-name="ro1">
          <table:table-cell office:value-type="float" office:value="443.910461425781">
            <text:p>443.9104614258</text:p>
          </table:table-cell>
          <table:table-cell office:value-type="float" office:value="-0.005026598">
            <text:p>-0.005026598</text:p>
          </table:table-cell>
          <table:table-cell table:number-columns-repeated="4"/>
        </table:table-row>
        <table:table-row table:style-name="ro1">
          <table:table-cell office:value-type="float" office:value="444.024536132813">
            <text:p>444.0245361328</text:p>
          </table:table-cell>
          <table:table-cell office:value-type="float" office:value="0.003850952">
            <text:p>0.003850952</text:p>
          </table:table-cell>
          <table:table-cell table:number-columns-repeated="4"/>
        </table:table-row>
        <table:table-row table:style-name="ro1">
          <table:table-cell office:value-type="float" office:value="444.138610839844">
            <text:p>444.1386108398</text:p>
          </table:table-cell>
          <table:table-cell office:value-type="float" office:value="0.02846891">
            <text:p>0.02846891</text:p>
          </table:table-cell>
          <table:table-cell table:number-columns-repeated="4"/>
        </table:table-row>
        <table:table-row table:style-name="ro1">
          <table:table-cell office:value-type="float" office:value="444.252716064453">
            <text:p>444.2527160645</text:p>
          </table:table-cell>
          <table:table-cell office:value-type="float" office:value="-0.004797393">
            <text:p>-0.004797393</text:p>
          </table:table-cell>
          <table:table-cell table:number-columns-repeated="4"/>
        </table:table-row>
        <table:table-row table:style-name="ro1">
          <table:table-cell office:value-type="float" office:value="444.366821289063">
            <text:p>444.3668212891</text:p>
          </table:table-cell>
          <table:table-cell office:value-type="float" office:value="-0.001290763">
            <text:p>-0.001290763</text:p>
          </table:table-cell>
          <table:table-cell table:number-columns-repeated="4"/>
        </table:table-row>
        <table:table-row table:style-name="ro1">
          <table:table-cell office:value-type="float" office:value="444.480895996094">
            <text:p>444.4808959961</text:p>
          </table:table-cell>
          <table:table-cell office:value-type="float" office:value="0.0007431004">
            <text:p>0.0007431004</text:p>
          </table:table-cell>
          <table:table-cell table:number-columns-repeated="4"/>
        </table:table-row>
        <table:table-row table:style-name="ro1">
          <table:table-cell office:value-type="float" office:value="444.595001220703">
            <text:p>444.5950012207</text:p>
          </table:table-cell>
          <table:table-cell office:value-type="float" office:value="-0.005529869">
            <text:p>-0.005529869</text:p>
          </table:table-cell>
          <table:table-cell table:number-columns-repeated="4"/>
        </table:table-row>
        <table:table-row table:style-name="ro1">
          <table:table-cell office:value-type="float" office:value="444.709136962891">
            <text:p>444.7091369629</text:p>
          </table:table-cell>
          <table:table-cell office:value-type="float" office:value="-0.003457132">
            <text:p>-0.003457132</text:p>
          </table:table-cell>
          <table:table-cell table:number-columns-repeated="4"/>
        </table:table-row>
        <table:table-row table:style-name="ro1">
          <table:table-cell office:value-type="float" office:value="444.8232421875">
            <text:p>444.8232421875</text:p>
          </table:table-cell>
          <table:table-cell office:value-type="float" office:value="0.003839709">
            <text:p>0.003839709</text:p>
          </table:table-cell>
          <table:table-cell table:number-columns-repeated="4"/>
        </table:table-row>
        <table:table-row table:style-name="ro1">
          <table:table-cell office:value-type="float" office:value="444.937347412109">
            <text:p>444.9373474121</text:p>
          </table:table-cell>
          <table:table-cell office:value-type="float" office:value="0.006327373">
            <text:p>0.006327373</text:p>
          </table:table-cell>
          <table:table-cell table:number-columns-repeated="4"/>
        </table:table-row>
        <table:table-row table:style-name="ro1">
          <table:table-cell office:value-type="float" office:value="445.051483154297">
            <text:p>445.0514831543</text:p>
          </table:table-cell>
          <table:table-cell office:value-type="float" office:value="-0.004003252">
            <text:p>-0.004003252</text:p>
          </table:table-cell>
          <table:table-cell table:number-columns-repeated="4"/>
        </table:table-row>
        <table:table-row table:style-name="ro1">
          <table:table-cell office:value-type="float" office:value="445.165618896484">
            <text:p>445.1656188965</text:p>
          </table:table-cell>
          <table:table-cell office:value-type="float" office:value="-0.01147026">
            <text:p>-0.01147026</text:p>
          </table:table-cell>
          <table:table-cell table:number-columns-repeated="4"/>
        </table:table-row>
        <table:table-row table:style-name="ro1">
          <table:table-cell office:value-type="float" office:value="445.279754638672">
            <text:p>445.2797546387</text:p>
          </table:table-cell>
          <table:table-cell office:value-type="float" office:value="0.00556394">
            <text:p>0.00556394</text:p>
          </table:table-cell>
          <table:table-cell table:number-columns-repeated="4"/>
        </table:table-row>
        <table:table-row table:style-name="ro1">
          <table:table-cell office:value-type="float" office:value="445.393890380859">
            <text:p>445.3938903809</text:p>
          </table:table-cell>
          <table:table-cell office:value-type="float" office:value="-0.001161204">
            <text:p>-0.001161204</text:p>
          </table:table-cell>
          <table:table-cell table:number-columns-repeated="4"/>
        </table:table-row>
        <table:table-row table:style-name="ro1">
          <table:table-cell office:value-type="float" office:value="445.508026123047">
            <text:p>445.508026123</text:p>
          </table:table-cell>
          <table:table-cell office:value-type="float" office:value="-0.00642621">
            <text:p>-0.00642621</text:p>
          </table:table-cell>
          <table:table-cell table:number-columns-repeated="4"/>
        </table:table-row>
        <table:table-row table:style-name="ro1">
          <table:table-cell office:value-type="float" office:value="445.622192382813">
            <text:p>445.6221923828</text:p>
          </table:table-cell>
          <table:table-cell office:value-type="float" office:value="0.001553287">
            <text:p>0.001553287</text:p>
          </table:table-cell>
          <table:table-cell table:number-columns-repeated="4"/>
        </table:table-row>
        <table:table-row table:style-name="ro1">
          <table:table-cell office:value-type="float" office:value="445.736328125">
            <text:p>445.736328125</text:p>
          </table:table-cell>
          <table:table-cell office:value-type="float" office:value="0.0004072981">
            <text:p>0.0004072981</text:p>
          </table:table-cell>
          <table:table-cell table:number-columns-repeated="4"/>
        </table:table-row>
        <table:table-row table:style-name="ro1">
          <table:table-cell office:value-type="float" office:value="445.850494384766">
            <text:p>445.8504943848</text:p>
          </table:table-cell>
          <table:table-cell office:value-type="float" office:value="0.00409096">
            <text:p>0.00409096</text:p>
          </table:table-cell>
          <table:table-cell table:number-columns-repeated="4"/>
        </table:table-row>
        <table:table-row table:style-name="ro1">
          <table:table-cell office:value-type="float" office:value="445.964660644531">
            <text:p>445.9646606445</text:p>
          </table:table-cell>
          <table:table-cell office:value-type="float" office:value="-0.004810519">
            <text:p>-0.004810519</text:p>
          </table:table-cell>
          <table:table-cell table:number-columns-repeated="4"/>
        </table:table-row>
        <table:table-row table:style-name="ro1">
          <table:table-cell office:value-type="float" office:value="446.078826904297">
            <text:p>446.0788269043</text:p>
          </table:table-cell>
          <table:table-cell office:value-type="float" office:value="-0.0001059442">
            <text:p>-0.0001059442</text:p>
          </table:table-cell>
          <table:table-cell table:number-columns-repeated="4"/>
        </table:table-row>
        <table:table-row table:style-name="ro1">
          <table:table-cell office:value-type="float" office:value="446.192993164063">
            <text:p>446.1929931641</text:p>
          </table:table-cell>
          <table:table-cell office:value-type="float" office:value="0.005354062">
            <text:p>0.005354062</text:p>
          </table:table-cell>
          <table:table-cell table:number-columns-repeated="4"/>
        </table:table-row>
        <table:table-row table:style-name="ro1">
          <table:table-cell office:value-type="float" office:value="446.307189941406">
            <text:p>446.3071899414</text:p>
          </table:table-cell>
          <table:table-cell office:value-type="float" office:value="0.003830722">
            <text:p>0.003830722</text:p>
          </table:table-cell>
          <table:table-cell table:number-columns-repeated="4"/>
        </table:table-row>
        <table:table-row table:style-name="ro1">
          <table:table-cell office:value-type="float" office:value="446.421356201172">
            <text:p>446.4213562012</text:p>
          </table:table-cell>
          <table:table-cell office:value-type="float" office:value="-0.005210075">
            <text:p>-0.005210075</text:p>
          </table:table-cell>
          <table:table-cell table:number-columns-repeated="4"/>
        </table:table-row>
        <table:table-row table:style-name="ro1">
          <table:table-cell office:value-type="float" office:value="446.535552978516">
            <text:p>446.5355529785</text:p>
          </table:table-cell>
          <table:table-cell office:value-type="float" office:value="0.001659997">
            <text:p>0.001659997</text:p>
          </table:table-cell>
          <table:table-cell table:number-columns-repeated="4"/>
        </table:table-row>
        <table:table-row table:style-name="ro1">
          <table:table-cell office:value-type="float" office:value="446.649749755859">
            <text:p>446.6497497559</text:p>
          </table:table-cell>
          <table:table-cell office:value-type="float" office:value="0.01352245">
            <text:p>0.01352245</text:p>
          </table:table-cell>
          <table:table-cell table:number-columns-repeated="4"/>
        </table:table-row>
        <table:table-row table:style-name="ro1">
          <table:table-cell office:value-type="float" office:value="446.763946533203">
            <text:p>446.7639465332</text:p>
          </table:table-cell>
          <table:table-cell office:value-type="float" office:value="-0.004658998">
            <text:p>-0.004658998</text:p>
          </table:table-cell>
          <table:table-cell table:number-columns-repeated="4"/>
        </table:table-row>
        <table:table-row table:style-name="ro1">
          <table:table-cell office:value-type="float" office:value="446.878143310547">
            <text:p>446.8781433105</text:p>
          </table:table-cell>
          <table:table-cell office:value-type="float" office:value="-0.002815398">
            <text:p>-0.002815398</text:p>
          </table:table-cell>
          <table:table-cell table:number-columns-repeated="4"/>
        </table:table-row>
        <table:table-row table:style-name="ro1">
          <table:table-cell office:value-type="float" office:value="446.992370605469">
            <text:p>446.9923706055</text:p>
          </table:table-cell>
          <table:table-cell office:value-type="float" office:value="-0.00429916">
            <text:p>-0.00429916</text:p>
          </table:table-cell>
          <table:table-cell table:number-columns-repeated="4"/>
        </table:table-row>
        <table:table-row table:style-name="ro1">
          <table:table-cell office:value-type="float" office:value="447.106567382813">
            <text:p>447.1065673828</text:p>
          </table:table-cell>
          <table:table-cell office:value-type="float" office:value="0.01476494">
            <text:p>0.01476494</text:p>
          </table:table-cell>
          <table:table-cell table:number-columns-repeated="4"/>
        </table:table-row>
        <table:table-row table:style-name="ro1">
          <table:table-cell office:value-type="float" office:value="447.220794677734">
            <text:p>447.2207946777</text:p>
          </table:table-cell>
          <table:table-cell office:value-type="float" office:value="0.00206408">
            <text:p>0.00206408</text:p>
          </table:table-cell>
          <table:table-cell table:number-columns-repeated="4"/>
        </table:table-row>
        <table:table-row table:style-name="ro1">
          <table:table-cell office:value-type="float" office:value="447.335021972656">
            <text:p>447.3350219727</text:p>
          </table:table-cell>
          <table:table-cell office:value-type="float" office:value="0.003219875">
            <text:p>0.003219875</text:p>
          </table:table-cell>
          <table:table-cell table:number-columns-repeated="4"/>
        </table:table-row>
        <table:table-row table:style-name="ro1">
          <table:table-cell office:value-type="float" office:value="447.449249267578">
            <text:p>447.4492492676</text:p>
          </table:table-cell>
          <table:table-cell office:value-type="float" office:value="0.008596203">
            <text:p>0.008596203</text:p>
          </table:table-cell>
          <table:table-cell table:number-columns-repeated="4"/>
        </table:table-row>
        <table:table-row table:style-name="ro1">
          <table:table-cell office:value-type="float" office:value="447.5634765625">
            <text:p>447.5634765625</text:p>
          </table:table-cell>
          <table:table-cell office:value-type="float" office:value="0.0005499503">
            <text:p>0.0005499503</text:p>
          </table:table-cell>
          <table:table-cell table:number-columns-repeated="4"/>
        </table:table-row>
        <table:table-row table:style-name="ro1">
          <table:table-cell office:value-type="float" office:value="447.677703857422">
            <text:p>447.6777038574</text:p>
          </table:table-cell>
          <table:table-cell office:value-type="float" office:value="0.003838297">
            <text:p>0.003838297</text:p>
          </table:table-cell>
          <table:table-cell table:number-columns-repeated="4"/>
        </table:table-row>
        <table:table-row table:style-name="ro1">
          <table:table-cell office:value-type="float" office:value="447.791961669922">
            <text:p>447.7919616699</text:p>
          </table:table-cell>
          <table:table-cell office:value-type="float" office:value="-0.00650935">
            <text:p>-0.00650935</text:p>
          </table:table-cell>
          <table:table-cell table:number-columns-repeated="4"/>
        </table:table-row>
        <table:table-row table:style-name="ro1">
          <table:table-cell office:value-type="float" office:value="447.906188964844">
            <text:p>447.9061889648</text:p>
          </table:table-cell>
          <table:table-cell office:value-type="float" office:value="-0.008835317">
            <text:p>-0.008835317</text:p>
          </table:table-cell>
          <table:table-cell table:number-columns-repeated="4"/>
        </table:table-row>
        <table:table-row table:style-name="ro1">
          <table:table-cell office:value-type="float" office:value="448.020446777344">
            <text:p>448.0204467773</text:p>
          </table:table-cell>
          <table:table-cell office:value-type="float" office:value="-0.007018331">
            <text:p>-0.007018331</text:p>
          </table:table-cell>
          <table:table-cell table:number-columns-repeated="4"/>
        </table:table-row>
        <table:table-row table:style-name="ro1">
          <table:table-cell office:value-type="float" office:value="448.134704589844">
            <text:p>448.1347045898</text:p>
          </table:table-cell>
          <table:table-cell office:value-type="float" office:value="0.012812">
            <text:p>0.012812</text:p>
          </table:table-cell>
          <table:table-cell table:number-columns-repeated="4"/>
        </table:table-row>
        <table:table-row table:style-name="ro1">
          <table:table-cell office:value-type="float" office:value="448.248962402344">
            <text:p>448.2489624023</text:p>
          </table:table-cell>
          <table:table-cell office:value-type="float" office:value="-0.007772599">
            <text:p>-0.007772599</text:p>
          </table:table-cell>
          <table:table-cell table:number-columns-repeated="4"/>
        </table:table-row>
        <table:table-row table:style-name="ro1">
          <table:table-cell office:value-type="float" office:value="448.363220214844">
            <text:p>448.3632202148</text:p>
          </table:table-cell>
          <table:table-cell office:value-type="float" office:value="-0.00190229">
            <text:p>-0.00190229</text:p>
          </table:table-cell>
          <table:table-cell table:number-columns-repeated="4"/>
        </table:table-row>
        <table:table-row table:style-name="ro1">
          <table:table-cell office:value-type="float" office:value="448.477508544922">
            <text:p>448.4775085449</text:p>
          </table:table-cell>
          <table:table-cell office:value-type="float" office:value="0.006737088">
            <text:p>0.006737088</text:p>
          </table:table-cell>
          <table:table-cell table:number-columns-repeated="4"/>
        </table:table-row>
        <table:table-row table:style-name="ro1">
          <table:table-cell office:value-type="float" office:value="448.591766357422">
            <text:p>448.5917663574</text:p>
          </table:table-cell>
          <table:table-cell office:value-type="float" office:value="0.01099754">
            <text:p>0.01099754</text:p>
          </table:table-cell>
          <table:table-cell table:number-columns-repeated="4"/>
        </table:table-row>
        <table:table-row table:style-name="ro1">
          <table:table-cell office:value-type="float" office:value="448.7060546875">
            <text:p>448.7060546875</text:p>
          </table:table-cell>
          <table:table-cell office:value-type="float" office:value="0.01118395">
            <text:p>0.01118395</text:p>
          </table:table-cell>
          <table:table-cell table:number-columns-repeated="4"/>
        </table:table-row>
        <table:table-row table:style-name="ro1">
          <table:table-cell office:value-type="float" office:value="448.820343017578">
            <text:p>448.8203430176</text:p>
          </table:table-cell>
          <table:table-cell office:value-type="float" office:value="-0.009613401">
            <text:p>-0.009613401</text:p>
          </table:table-cell>
          <table:table-cell table:number-columns-repeated="4"/>
        </table:table-row>
        <table:table-row table:style-name="ro1">
          <table:table-cell office:value-type="float" office:value="448.934631347656">
            <text:p>448.9346313477</text:p>
          </table:table-cell>
          <table:table-cell office:value-type="float" office:value="-0.002712733">
            <text:p>-0.002712733</text:p>
          </table:table-cell>
          <table:table-cell table:number-columns-repeated="4"/>
        </table:table-row>
        <table:table-row table:style-name="ro1">
          <table:table-cell office:value-type="float" office:value="449.048919677734">
            <text:p>449.0489196777</text:p>
          </table:table-cell>
          <table:table-cell office:value-type="float" office:value="-0.003158496">
            <text:p>-0.003158496</text:p>
          </table:table-cell>
          <table:table-cell table:number-columns-repeated="4"/>
        </table:table-row>
        <table:table-row table:style-name="ro1">
          <table:table-cell office:value-type="float" office:value="449.163238525391">
            <text:p>449.1632385254</text:p>
          </table:table-cell>
          <table:table-cell office:value-type="float" office:value="-0.01265224">
            <text:p>-0.01265224</text:p>
          </table:table-cell>
          <table:table-cell table:number-columns-repeated="4"/>
        </table:table-row>
        <table:table-row table:style-name="ro1">
          <table:table-cell office:value-type="float" office:value="449.277526855469">
            <text:p>449.2775268555</text:p>
          </table:table-cell>
          <table:table-cell office:value-type="float" office:value="0.0005032228">
            <text:p>0.0005032228</text:p>
          </table:table-cell>
          <table:table-cell table:number-columns-repeated="4"/>
        </table:table-row>
        <table:table-row table:style-name="ro1">
          <table:table-cell office:value-type="float" office:value="449.391845703125">
            <text:p>449.3918457031</text:p>
          </table:table-cell>
          <table:table-cell office:value-type="float" office:value="0.01594685">
            <text:p>0.01594685</text:p>
          </table:table-cell>
          <table:table-cell table:number-columns-repeated="4"/>
        </table:table-row>
        <table:table-row table:style-name="ro1">
          <table:table-cell office:value-type="float" office:value="449.506164550781">
            <text:p>449.5061645508</text:p>
          </table:table-cell>
          <table:table-cell office:value-type="float" office:value="0.001009423">
            <text:p>0.001009423</text:p>
          </table:table-cell>
          <table:table-cell table:number-columns-repeated="4"/>
        </table:table-row>
        <table:table-row table:style-name="ro1">
          <table:table-cell office:value-type="float" office:value="449.620483398438">
            <text:p>449.6204833984</text:p>
          </table:table-cell>
          <table:table-cell office:value-type="float" office:value="0.01078158">
            <text:p>0.01078158</text:p>
          </table:table-cell>
          <table:table-cell table:number-columns-repeated="4"/>
        </table:table-row>
        <table:table-row table:style-name="ro1">
          <table:table-cell office:value-type="float" office:value="449.734802246094">
            <text:p>449.7348022461</text:p>
          </table:table-cell>
          <table:table-cell office:value-type="float" office:value="-0.01132389">
            <text:p>-0.01132389</text:p>
          </table:table-cell>
          <table:table-cell table:number-columns-repeated="4"/>
        </table:table-row>
        <table:table-row table:style-name="ro1">
          <table:table-cell office:value-type="float" office:value="449.84912109375">
            <text:p>449.8491210938</text:p>
          </table:table-cell>
          <table:table-cell office:value-type="float" office:value="0.007228285">
            <text:p>0.007228285</text:p>
          </table:table-cell>
          <table:table-cell table:number-columns-repeated="4"/>
        </table:table-row>
        <table:table-row table:style-name="ro1">
          <table:table-cell office:value-type="float" office:value="449.963439941406">
            <text:p>449.9634399414</text:p>
          </table:table-cell>
          <table:table-cell office:value-type="float" office:value="-0.004080791">
            <text:p>-0.004080791</text:p>
          </table:table-cell>
          <table:table-cell table:number-columns-repeated="4"/>
        </table:table-row>
        <table:table-row table:style-name="ro1">
          <table:table-cell office:value-type="float" office:value="450.077789306641">
            <text:p>450.0777893066</text:p>
          </table:table-cell>
          <table:table-cell office:value-type="float" office:value="-0.00177459">
            <text:p>-0.00177459</text:p>
          </table:table-cell>
          <table:table-cell table:number-columns-repeated="4"/>
        </table:table-row>
        <table:table-row table:style-name="ro1">
          <table:table-cell office:value-type="float" office:value="450.192138671875">
            <text:p>450.1921386719</text:p>
          </table:table-cell>
          <table:table-cell office:value-type="float" office:value="-0.01339626">
            <text:p>-0.01339626</text:p>
          </table:table-cell>
          <table:table-cell table:number-columns-repeated="4"/>
        </table:table-row>
        <table:table-row table:style-name="ro1">
          <table:table-cell office:value-type="float" office:value="450.306488037109">
            <text:p>450.3064880371</text:p>
          </table:table-cell>
          <table:table-cell office:value-type="float" office:value="0.006700225">
            <text:p>0.006700225</text:p>
          </table:table-cell>
          <table:table-cell table:number-columns-repeated="4"/>
        </table:table-row>
        <table:table-row table:style-name="ro1">
          <table:table-cell office:value-type="float" office:value="450.420837402344">
            <text:p>450.4208374023</text:p>
          </table:table-cell>
          <table:table-cell office:value-type="float" office:value="0.003018271">
            <text:p>0.003018271</text:p>
          </table:table-cell>
          <table:table-cell table:number-columns-repeated="4"/>
        </table:table-row>
        <table:table-row table:style-name="ro1">
          <table:table-cell office:value-type="float" office:value="450.535186767578">
            <text:p>450.5351867676</text:p>
          </table:table-cell>
          <table:table-cell office:value-type="float" office:value="0.001027496">
            <text:p>0.001027496</text:p>
          </table:table-cell>
          <table:table-cell table:number-columns-repeated="4"/>
        </table:table-row>
        <table:table-row table:style-name="ro1">
          <table:table-cell office:value-type="float" office:value="450.649536132813">
            <text:p>450.6495361328</text:p>
          </table:table-cell>
          <table:table-cell office:value-type="float" office:value="-0.0128486">
            <text:p>-0.0128486</text:p>
          </table:table-cell>
          <table:table-cell table:number-columns-repeated="4"/>
        </table:table-row>
        <table:table-row table:style-name="ro1">
          <table:table-cell office:value-type="float" office:value="450.763916015625">
            <text:p>450.7639160156</text:p>
          </table:table-cell>
          <table:table-cell office:value-type="float" office:value="0.008180664">
            <text:p>0.008180664</text:p>
          </table:table-cell>
          <table:table-cell table:number-columns-repeated="4"/>
        </table:table-row>
        <table:table-row table:style-name="ro1">
          <table:table-cell office:value-type="float" office:value="450.878295898438">
            <text:p>450.8782958984</text:p>
          </table:table-cell>
          <table:table-cell office:value-type="float" office:value="-0.007598497">
            <text:p>-0.007598497</text:p>
          </table:table-cell>
          <table:table-cell table:number-columns-repeated="4"/>
        </table:table-row>
        <table:table-row table:style-name="ro1">
          <table:table-cell office:value-type="float" office:value="450.99267578125">
            <text:p>450.9926757813</text:p>
          </table:table-cell>
          <table:table-cell office:value-type="float" office:value="-0.0009693782">
            <text:p>-0.0009693782</text:p>
          </table:table-cell>
          <table:table-cell table:number-columns-repeated="4"/>
        </table:table-row>
        <table:table-row table:style-name="ro1">
          <table:table-cell office:value-type="float" office:value="451.107055664063">
            <text:p>451.1070556641</text:p>
          </table:table-cell>
          <table:table-cell office:value-type="float" office:value="-0.01560005">
            <text:p>-0.01560005</text:p>
          </table:table-cell>
          <table:table-cell table:number-columns-repeated="4"/>
        </table:table-row>
        <table:table-row table:style-name="ro1">
          <table:table-cell office:value-type="float" office:value="451.221435546875">
            <text:p>451.2214355469</text:p>
          </table:table-cell>
          <table:table-cell office:value-type="string">
            <text:p>5.659107E-05</text:p>
          </table:table-cell>
          <table:table-cell table:number-columns-repeated="4"/>
        </table:table-row>
        <table:table-row table:style-name="ro1">
          <table:table-cell office:value-type="float" office:value="451.335815429688">
            <text:p>451.3358154297</text:p>
          </table:table-cell>
          <table:table-cell office:value-type="float" office:value="0.01182982">
            <text:p>0.01182982</text:p>
          </table:table-cell>
          <table:table-cell table:number-columns-repeated="4"/>
        </table:table-row>
        <table:table-row table:style-name="ro1">
          <table:table-cell office:value-type="float" office:value="451.450225830078">
            <text:p>451.4502258301</text:p>
          </table:table-cell>
          <table:table-cell office:value-type="float" office:value="0.001874404">
            <text:p>0.001874404</text:p>
          </table:table-cell>
          <table:table-cell table:number-columns-repeated="4"/>
        </table:table-row>
        <table:table-row table:style-name="ro1">
          <table:table-cell office:value-type="float" office:value="451.564605712891">
            <text:p>451.5646057129</text:p>
          </table:table-cell>
          <table:table-cell office:value-type="float" office:value="-0.01352611">
            <text:p>-0.01352611</text:p>
          </table:table-cell>
          <table:table-cell table:number-columns-repeated="4"/>
        </table:table-row>
        <table:table-row table:style-name="ro1">
          <table:table-cell office:value-type="float" office:value="451.679016113281">
            <text:p>451.6790161133</text:p>
          </table:table-cell>
          <table:table-cell office:value-type="float" office:value="0.007425028">
            <text:p>0.007425028</text:p>
          </table:table-cell>
          <table:table-cell table:number-columns-repeated="4"/>
        </table:table-row>
        <table:table-row table:style-name="ro1">
          <table:table-cell office:value-type="float" office:value="451.793426513672">
            <text:p>451.7934265137</text:p>
          </table:table-cell>
          <table:table-cell office:value-type="float" office:value="0.01038429">
            <text:p>0.01038429</text:p>
          </table:table-cell>
          <table:table-cell table:number-columns-repeated="4"/>
        </table:table-row>
        <table:table-row table:style-name="ro1">
          <table:table-cell office:value-type="float" office:value="451.907836914063">
            <text:p>451.9078369141</text:p>
          </table:table-cell>
          <table:table-cell office:value-type="float" office:value="-0.008016651">
            <text:p>-0.008016651</text:p>
          </table:table-cell>
          <table:table-cell table:number-columns-repeated="4"/>
        </table:table-row>
        <table:table-row table:style-name="ro1">
          <table:table-cell office:value-type="float" office:value="452.022247314453">
            <text:p>452.0222473145</text:p>
          </table:table-cell>
          <table:table-cell office:value-type="float" office:value="-0.002534954">
            <text:p>-0.002534954</text:p>
          </table:table-cell>
          <table:table-cell table:number-columns-repeated="4"/>
        </table:table-row>
        <table:table-row table:style-name="ro1">
          <table:table-cell office:value-type="float" office:value="452.136688232422">
            <text:p>452.1366882324</text:p>
          </table:table-cell>
          <table:table-cell office:value-type="float" office:value="0.002159542">
            <text:p>0.002159542</text:p>
          </table:table-cell>
          <table:table-cell table:number-columns-repeated="4"/>
        </table:table-row>
        <table:table-row table:style-name="ro1">
          <table:table-cell office:value-type="float" office:value="452.251098632813">
            <text:p>452.2510986328</text:p>
          </table:table-cell>
          <table:table-cell office:value-type="float" office:value="0.008617416">
            <text:p>0.008617416</text:p>
          </table:table-cell>
          <table:table-cell table:number-columns-repeated="4"/>
        </table:table-row>
        <table:table-row table:style-name="ro1">
          <table:table-cell office:value-type="float" office:value="452.365539550781">
            <text:p>452.3655395508</text:p>
          </table:table-cell>
          <table:table-cell office:value-type="float" office:value="-0.01066769">
            <text:p>-0.01066769</text:p>
          </table:table-cell>
          <table:table-cell table:number-columns-repeated="4"/>
        </table:table-row>
        <table:table-row table:style-name="ro1">
          <table:table-cell office:value-type="float" office:value="452.47998046875">
            <text:p>452.4799804688</text:p>
          </table:table-cell>
          <table:table-cell office:value-type="float" office:value="0.003933384">
            <text:p>0.003933384</text:p>
          </table:table-cell>
          <table:table-cell table:number-columns-repeated="4"/>
        </table:table-row>
        <table:table-row table:style-name="ro1">
          <table:table-cell office:value-type="float" office:value="452.594421386719">
            <text:p>452.5944213867</text:p>
          </table:table-cell>
          <table:table-cell office:value-type="float" office:value="0.01000784">
            <text:p>0.01000784</text:p>
          </table:table-cell>
          <table:table-cell table:number-columns-repeated="4"/>
        </table:table-row>
        <table:table-row table:style-name="ro1">
          <table:table-cell office:value-type="float" office:value="452.708862304688">
            <text:p>452.7088623047</text:p>
          </table:table-cell>
          <table:table-cell office:value-type="float" office:value="0.005946004">
            <text:p>0.005946004</text:p>
          </table:table-cell>
          <table:table-cell table:number-columns-repeated="4"/>
        </table:table-row>
        <table:table-row table:style-name="ro1">
          <table:table-cell office:value-type="float" office:value="452.823333740234">
            <text:p>452.8233337402</text:p>
          </table:table-cell>
          <table:table-cell office:value-type="float" office:value="0.01082437">
            <text:p>0.01082437</text:p>
          </table:table-cell>
          <table:table-cell table:number-columns-repeated="4"/>
        </table:table-row>
        <table:table-row table:style-name="ro1">
          <table:table-cell office:value-type="float" office:value="452.937774658203">
            <text:p>452.9377746582</text:p>
          </table:table-cell>
          <table:table-cell office:value-type="float" office:value="-0.00709486">
            <text:p>-0.00709486</text:p>
          </table:table-cell>
          <table:table-cell table:number-columns-repeated="4"/>
        </table:table-row>
        <table:table-row table:style-name="ro1">
          <table:table-cell office:value-type="float" office:value="453.05224609375">
            <text:p>453.0522460938</text:p>
          </table:table-cell>
          <table:table-cell office:value-type="float" office:value="-0.003585121">
            <text:p>-0.003585121</text:p>
          </table:table-cell>
          <table:table-cell table:number-columns-repeated="4"/>
        </table:table-row>
        <table:table-row table:style-name="ro1">
          <table:table-cell office:value-type="float" office:value="453.166717529297">
            <text:p>453.1667175293</text:p>
          </table:table-cell>
          <table:table-cell office:value-type="float" office:value="0.006587606">
            <text:p>0.006587606</text:p>
          </table:table-cell>
          <table:table-cell table:number-columns-repeated="4"/>
        </table:table-row>
        <table:table-row table:style-name="ro1">
          <table:table-cell office:value-type="float" office:value="453.281188964844">
            <text:p>453.2811889648</text:p>
          </table:table-cell>
          <table:table-cell office:value-type="float" office:value="-0.01205732">
            <text:p>-0.01205732</text:p>
          </table:table-cell>
          <table:table-cell table:number-columns-repeated="4"/>
        </table:table-row>
        <table:table-row table:style-name="ro1">
          <table:table-cell office:value-type="float" office:value="453.395660400391">
            <text:p>453.3956604004</text:p>
          </table:table-cell>
          <table:table-cell office:value-type="float" office:value="-0.004284215">
            <text:p>-0.004284215</text:p>
          </table:table-cell>
          <table:table-cell table:number-columns-repeated="4"/>
        </table:table-row>
        <table:table-row table:style-name="ro1">
          <table:table-cell office:value-type="float" office:value="453.510131835938">
            <text:p>453.5101318359</text:p>
          </table:table-cell>
          <table:table-cell office:value-type="float" office:value="0.01687058">
            <text:p>0.01687058</text:p>
          </table:table-cell>
          <table:table-cell table:number-columns-repeated="4"/>
        </table:table-row>
        <table:table-row table:style-name="ro1">
          <table:table-cell office:value-type="float" office:value="453.624603271484">
            <text:p>453.6246032715</text:p>
          </table:table-cell>
          <table:table-cell office:value-type="float" office:value="-0.007841586">
            <text:p>-0.007841586</text:p>
          </table:table-cell>
          <table:table-cell table:number-columns-repeated="4"/>
        </table:table-row>
        <table:table-row table:style-name="ro1">
          <table:table-cell office:value-type="float" office:value="453.739105224609">
            <text:p>453.7391052246</text:p>
          </table:table-cell>
          <table:table-cell office:value-type="float" office:value="-0.004128336">
            <text:p>-0.004128336</text:p>
          </table:table-cell>
          <table:table-cell table:number-columns-repeated="4"/>
        </table:table-row>
        <table:table-row table:style-name="ro1">
          <table:table-cell office:value-type="float" office:value="453.853607177734">
            <text:p>453.8536071777</text:p>
          </table:table-cell>
          <table:table-cell office:value-type="float" office:value="-0.003968889">
            <text:p>-0.003968889</text:p>
          </table:table-cell>
          <table:table-cell table:number-columns-repeated="4"/>
        </table:table-row>
        <table:table-row table:style-name="ro1">
          <table:table-cell office:value-type="float" office:value="453.968109130859">
            <text:p>453.9681091309</text:p>
          </table:table-cell>
          <table:table-cell office:value-type="float" office:value="0.001975934">
            <text:p>0.001975934</text:p>
          </table:table-cell>
          <table:table-cell table:number-columns-repeated="4"/>
        </table:table-row>
        <table:table-row table:style-name="ro1">
          <table:table-cell office:value-type="float" office:value="454.082611083984">
            <text:p>454.082611084</text:p>
          </table:table-cell>
          <table:table-cell office:value-type="float" office:value="-0.003165632">
            <text:p>-0.003165632</text:p>
          </table:table-cell>
          <table:table-cell table:number-columns-repeated="4"/>
        </table:table-row>
        <table:table-row table:style-name="ro1">
          <table:table-cell office:value-type="float" office:value="454.197113037109">
            <text:p>454.1971130371</text:p>
          </table:table-cell>
          <table:table-cell office:value-type="float" office:value="-0.01126278">
            <text:p>-0.01126278</text:p>
          </table:table-cell>
          <table:table-cell table:number-columns-repeated="4"/>
        </table:table-row>
        <table:table-row table:style-name="ro1">
          <table:table-cell office:value-type="float" office:value="454.311614990234">
            <text:p>454.3116149902</text:p>
          </table:table-cell>
          <table:table-cell office:value-type="float" office:value="-0.0163094">
            <text:p>-0.0163094</text:p>
          </table:table-cell>
          <table:table-cell table:number-columns-repeated="4"/>
        </table:table-row>
        <table:table-row table:style-name="ro1">
          <table:table-cell office:value-type="float" office:value="454.426147460938">
            <text:p>454.4261474609</text:p>
          </table:table-cell>
          <table:table-cell office:value-type="float" office:value="0.006527323">
            <text:p>0.006527323</text:p>
          </table:table-cell>
          <table:table-cell table:number-columns-repeated="4"/>
        </table:table-row>
        <table:table-row table:style-name="ro1">
          <table:table-cell office:value-type="float" office:value="454.540649414063">
            <text:p>454.5406494141</text:p>
          </table:table-cell>
          <table:table-cell office:value-type="float" office:value="0.01004293">
            <text:p>0.01004293</text:p>
          </table:table-cell>
          <table:table-cell table:number-columns-repeated="4"/>
        </table:table-row>
        <table:table-row table:style-name="ro1">
          <table:table-cell office:value-type="float" office:value="454.655181884766">
            <text:p>454.6551818848</text:p>
          </table:table-cell>
          <table:table-cell office:value-type="float" office:value="-0.006125152">
            <text:p>-0.006125152</text:p>
          </table:table-cell>
          <table:table-cell table:number-columns-repeated="4"/>
        </table:table-row>
        <table:table-row table:style-name="ro1">
          <table:table-cell office:value-type="float" office:value="454.769714355469">
            <text:p>454.7697143555</text:p>
          </table:table-cell>
          <table:table-cell office:value-type="float" office:value="-0.002923273">
            <text:p>-0.002923273</text:p>
          </table:table-cell>
          <table:table-cell table:number-columns-repeated="4"/>
        </table:table-row>
        <table:table-row table:style-name="ro1">
          <table:table-cell office:value-type="float" office:value="454.884246826172">
            <text:p>454.8842468262</text:p>
          </table:table-cell>
          <table:table-cell office:value-type="float" office:value="0.01092734">
            <text:p>0.01092734</text:p>
          </table:table-cell>
          <table:table-cell table:number-columns-repeated="4"/>
        </table:table-row>
        <table:table-row table:style-name="ro1">
          <table:table-cell office:value-type="float" office:value="454.998809814453">
            <text:p>454.9988098145</text:p>
          </table:table-cell>
          <table:table-cell office:value-type="float" office:value="0.01228422">
            <text:p>0.01228422</text:p>
          </table:table-cell>
          <table:table-cell table:number-columns-repeated="4"/>
        </table:table-row>
        <table:table-row table:style-name="ro1">
          <table:table-cell office:value-type="float" office:value="455.113342285156">
            <text:p>455.1133422852</text:p>
          </table:table-cell>
          <table:table-cell office:value-type="float" office:value="-0.007713606">
            <text:p>-0.007713606</text:p>
          </table:table-cell>
          <table:table-cell table:number-columns-repeated="4"/>
        </table:table-row>
        <table:table-row table:style-name="ro1">
          <table:table-cell office:value-type="float" office:value="455.227905273438">
            <text:p>455.2279052734</text:p>
          </table:table-cell>
          <table:table-cell office:value-type="float" office:value="-0.006764454">
            <text:p>-0.006764454</text:p>
          </table:table-cell>
          <table:table-cell table:number-columns-repeated="4"/>
        </table:table-row>
        <table:table-row table:style-name="ro1">
          <table:table-cell office:value-type="float" office:value="455.342468261719">
            <text:p>455.3424682617</text:p>
          </table:table-cell>
          <table:table-cell office:value-type="float" office:value="0.007563879">
            <text:p>0.007563879</text:p>
          </table:table-cell>
          <table:table-cell table:number-columns-repeated="4"/>
        </table:table-row>
        <table:table-row table:style-name="ro1">
          <table:table-cell office:value-type="float" office:value="455.457000732422">
            <text:p>455.4570007324</text:p>
          </table:table-cell>
          <table:table-cell office:value-type="float" office:value="0.008412273">
            <text:p>0.008412273</text:p>
          </table:table-cell>
          <table:table-cell table:number-columns-repeated="4"/>
        </table:table-row>
        <table:table-row table:style-name="ro1">
          <table:table-cell office:value-type="float" office:value="455.571563720703">
            <text:p>455.5715637207</text:p>
          </table:table-cell>
          <table:table-cell office:value-type="float" office:value="-0.0111757">
            <text:p>-0.0111757</text:p>
          </table:table-cell>
          <table:table-cell table:number-columns-repeated="4"/>
        </table:table-row>
        <table:table-row table:style-name="ro1">
          <table:table-cell office:value-type="float" office:value="455.686157226563">
            <text:p>455.6861572266</text:p>
          </table:table-cell>
          <table:table-cell office:value-type="float" office:value="-0.01199551">
            <text:p>-0.01199551</text:p>
          </table:table-cell>
          <table:table-cell table:number-columns-repeated="4"/>
        </table:table-row>
        <table:table-row table:style-name="ro1">
          <table:table-cell office:value-type="float" office:value="455.800720214844">
            <text:p>455.8007202148</text:p>
          </table:table-cell>
          <table:table-cell office:value-type="float" office:value="0.01050807">
            <text:p>0.01050807</text:p>
          </table:table-cell>
          <table:table-cell table:number-columns-repeated="4"/>
        </table:table-row>
        <table:table-row table:style-name="ro1">
          <table:table-cell office:value-type="float" office:value="455.915313720703">
            <text:p>455.9153137207</text:p>
          </table:table-cell>
          <table:table-cell office:value-type="float" office:value="-0.001762945">
            <text:p>-0.001762945</text:p>
          </table:table-cell>
          <table:table-cell table:number-columns-repeated="4"/>
        </table:table-row>
        <table:table-row table:style-name="ro1">
          <table:table-cell office:value-type="float" office:value="456.029876708984">
            <text:p>456.029876709</text:p>
          </table:table-cell>
          <table:table-cell office:value-type="float" office:value="-0.006830119">
            <text:p>-0.006830119</text:p>
          </table:table-cell>
          <table:table-cell table:number-columns-repeated="4"/>
        </table:table-row>
        <table:table-row table:style-name="ro1">
          <table:table-cell office:value-type="float" office:value="456.144470214844">
            <text:p>456.1444702148</text:p>
          </table:table-cell>
          <table:table-cell office:value-type="float" office:value="-0.005130272">
            <text:p>-0.005130272</text:p>
          </table:table-cell>
          <table:table-cell table:number-columns-repeated="4"/>
        </table:table-row>
        <table:table-row table:style-name="ro1">
          <table:table-cell office:value-type="float" office:value="456.259063720703">
            <text:p>456.2590637207</text:p>
          </table:table-cell>
          <table:table-cell office:value-type="float" office:value="-0.005763615">
            <text:p>-0.005763615</text:p>
          </table:table-cell>
          <table:table-cell table:number-columns-repeated="4"/>
        </table:table-row>
        <table:table-row table:style-name="ro1">
          <table:table-cell office:value-type="float" office:value="456.373657226563">
            <text:p>456.3736572266</text:p>
          </table:table-cell>
          <table:table-cell office:value-type="float" office:value="0.008901454">
            <text:p>0.008901454</text:p>
          </table:table-cell>
          <table:table-cell table:number-columns-repeated="4"/>
        </table:table-row>
        <table:table-row table:style-name="ro1">
          <table:table-cell office:value-type="float" office:value="456.488250732422">
            <text:p>456.4882507324</text:p>
          </table:table-cell>
          <table:table-cell office:value-type="float" office:value="-0.01155965">
            <text:p>-0.01155965</text:p>
          </table:table-cell>
          <table:table-cell table:number-columns-repeated="4"/>
        </table:table-row>
        <table:table-row table:style-name="ro1">
          <table:table-cell office:value-type="float" office:value="456.602874755859">
            <text:p>456.6028747559</text:p>
          </table:table-cell>
          <table:table-cell office:value-type="float" office:value="-0.01553586">
            <text:p>-0.01553586</text:p>
          </table:table-cell>
          <table:table-cell table:number-columns-repeated="4"/>
        </table:table-row>
        <table:table-row table:style-name="ro1">
          <table:table-cell office:value-type="float" office:value="456.717468261719">
            <text:p>456.7174682617</text:p>
          </table:table-cell>
          <table:table-cell office:value-type="float" office:value="0.01637841">
            <text:p>0.01637841</text:p>
          </table:table-cell>
          <table:table-cell table:number-columns-repeated="4"/>
        </table:table-row>
        <table:table-row table:style-name="ro1">
          <table:table-cell office:value-type="float" office:value="456.832092285156">
            <text:p>456.8320922852</text:p>
          </table:table-cell>
          <table:table-cell office:value-type="float" office:value="-0.0003760556">
            <text:p>-0.0003760556</text:p>
          </table:table-cell>
          <table:table-cell table:number-columns-repeated="4"/>
        </table:table-row>
        <table:table-row table:style-name="ro1">
          <table:table-cell office:value-type="float" office:value="456.946716308594">
            <text:p>456.9467163086</text:p>
          </table:table-cell>
          <table:table-cell office:value-type="float" office:value="-0.01152921">
            <text:p>-0.01152921</text:p>
          </table:table-cell>
          <table:table-cell table:number-columns-repeated="4"/>
        </table:table-row>
        <table:table-row table:style-name="ro1">
          <table:table-cell office:value-type="float" office:value="457.061340332031">
            <text:p>457.061340332</text:p>
          </table:table-cell>
          <table:table-cell office:value-type="float" office:value="0.009898593">
            <text:p>0.009898593</text:p>
          </table:table-cell>
          <table:table-cell table:number-columns-repeated="4"/>
        </table:table-row>
        <table:table-row table:style-name="ro1">
          <table:table-cell office:value-type="float" office:value="457.175964355469">
            <text:p>457.1759643555</text:p>
          </table:table-cell>
          <table:table-cell office:value-type="float" office:value="0.002949515">
            <text:p>0.002949515</text:p>
          </table:table-cell>
          <table:table-cell table:number-columns-repeated="4"/>
        </table:table-row>
        <table:table-row table:style-name="ro1">
          <table:table-cell office:value-type="float" office:value="457.290618896484">
            <text:p>457.2906188965</text:p>
          </table:table-cell>
          <table:table-cell office:value-type="float" office:value="0.00291631">
            <text:p>0.00291631</text:p>
          </table:table-cell>
          <table:table-cell table:number-columns-repeated="4"/>
        </table:table-row>
        <table:table-row table:style-name="ro1">
          <table:table-cell office:value-type="float" office:value="457.405242919922">
            <text:p>457.4052429199</text:p>
          </table:table-cell>
          <table:table-cell office:value-type="float" office:value="-0.01474416">
            <text:p>-0.01474416</text:p>
          </table:table-cell>
          <table:table-cell table:number-columns-repeated="4"/>
        </table:table-row>
        <table:table-row table:style-name="ro1">
          <table:table-cell office:value-type="float" office:value="457.519897460938">
            <text:p>457.5198974609</text:p>
          </table:table-cell>
          <table:table-cell office:value-type="float" office:value="0.01821023">
            <text:p>0.01821023</text:p>
          </table:table-cell>
          <table:table-cell table:number-columns-repeated="4"/>
        </table:table-row>
        <table:table-row table:style-name="ro1">
          <table:table-cell office:value-type="float" office:value="457.634552001953">
            <text:p>457.634552002</text:p>
          </table:table-cell>
          <table:table-cell office:value-type="float" office:value="0.00958862">
            <text:p>0.00958862</text:p>
          </table:table-cell>
          <table:table-cell table:number-columns-repeated="4"/>
        </table:table-row>
        <table:table-row table:style-name="ro1">
          <table:table-cell office:value-type="float" office:value="457.749206542969">
            <text:p>457.749206543</text:p>
          </table:table-cell>
          <table:table-cell office:value-type="float" office:value="0.01137732">
            <text:p>0.01137732</text:p>
          </table:table-cell>
          <table:table-cell table:number-columns-repeated="4"/>
        </table:table-row>
        <table:table-row table:style-name="ro1">
          <table:table-cell office:value-type="float" office:value="457.863861083984">
            <text:p>457.863861084</text:p>
          </table:table-cell>
          <table:table-cell office:value-type="float" office:value="-0.001519286">
            <text:p>-0.001519286</text:p>
          </table:table-cell>
          <table:table-cell table:number-columns-repeated="4"/>
        </table:table-row>
        <table:table-row table:style-name="ro1">
          <table:table-cell office:value-type="float" office:value="457.978515625">
            <text:p>457.978515625</text:p>
          </table:table-cell>
          <table:table-cell office:value-type="float" office:value="-0.00129077">
            <text:p>-0.00129077</text:p>
          </table:table-cell>
          <table:table-cell table:number-columns-repeated="4"/>
        </table:table-row>
        <table:table-row table:style-name="ro1">
          <table:table-cell office:value-type="float" office:value="458.093200683594">
            <text:p>458.0932006836</text:p>
          </table:table-cell>
          <table:table-cell office:value-type="float" office:value="-0.003092797">
            <text:p>-0.003092797</text:p>
          </table:table-cell>
          <table:table-cell table:number-columns-repeated="4"/>
        </table:table-row>
        <table:table-row table:style-name="ro1">
          <table:table-cell office:value-type="float" office:value="458.207855224609">
            <text:p>458.2078552246</text:p>
          </table:table-cell>
          <table:table-cell office:value-type="float" office:value="0.009111003">
            <text:p>0.009111003</text:p>
          </table:table-cell>
          <table:table-cell table:number-columns-repeated="4"/>
        </table:table-row>
        <table:table-row table:style-name="ro1">
          <table:table-cell office:value-type="float" office:value="458.322540283203">
            <text:p>458.3225402832</text:p>
          </table:table-cell>
          <table:table-cell office:value-type="float" office:value="0.01400412">
            <text:p>0.01400412</text:p>
          </table:table-cell>
          <table:table-cell table:number-columns-repeated="4"/>
        </table:table-row>
        <table:table-row table:style-name="ro1">
          <table:table-cell office:value-type="float" office:value="458.437225341797">
            <text:p>458.4372253418</text:p>
          </table:table-cell>
          <table:table-cell office:value-type="float" office:value="0.0006536999">
            <text:p>0.0006536999</text:p>
          </table:table-cell>
          <table:table-cell table:number-columns-repeated="4"/>
        </table:table-row>
        <table:table-row table:style-name="ro1">
          <table:table-cell office:value-type="float" office:value="458.551910400391">
            <text:p>458.5519104004</text:p>
          </table:table-cell>
          <table:table-cell office:value-type="float" office:value="0.007505669">
            <text:p>0.007505669</text:p>
          </table:table-cell>
          <table:table-cell table:number-columns-repeated="4"/>
        </table:table-row>
        <table:table-row table:style-name="ro1">
          <table:table-cell office:value-type="float" office:value="458.666595458984">
            <text:p>458.666595459</text:p>
          </table:table-cell>
          <table:table-cell office:value-type="float" office:value="0.01681897">
            <text:p>0.01681897</text:p>
          </table:table-cell>
          <table:table-cell table:number-columns-repeated="4"/>
        </table:table-row>
        <table:table-row table:style-name="ro1">
          <table:table-cell office:value-type="float" office:value="458.781280517578">
            <text:p>458.7812805176</text:p>
          </table:table-cell>
          <table:table-cell office:value-type="float" office:value="-0.006384877">
            <text:p>-0.006384877</text:p>
          </table:table-cell>
          <table:table-cell table:number-columns-repeated="4"/>
        </table:table-row>
        <table:table-row table:style-name="ro1">
          <table:table-cell office:value-type="float" office:value="458.89599609375">
            <text:p>458.8959960938</text:p>
          </table:table-cell>
          <table:table-cell office:value-type="float" office:value="-0.0008658381">
            <text:p>-0.0008658381</text:p>
          </table:table-cell>
          <table:table-cell table:number-columns-repeated="4"/>
        </table:table-row>
        <table:table-row table:style-name="ro1">
          <table:table-cell office:value-type="float" office:value="459.010681152344">
            <text:p>459.0106811523</text:p>
          </table:table-cell>
          <table:table-cell office:value-type="float" office:value="0.0109692">
            <text:p>0.0109692</text:p>
          </table:table-cell>
          <table:table-cell table:number-columns-repeated="4"/>
        </table:table-row>
        <table:table-row table:style-name="ro1">
          <table:table-cell office:value-type="float" office:value="459.125396728516">
            <text:p>459.1253967285</text:p>
          </table:table-cell>
          <table:table-cell office:value-type="float" office:value="0.03599255">
            <text:p>0.03599255</text:p>
          </table:table-cell>
          <table:table-cell table:number-columns-repeated="4"/>
        </table:table-row>
        <table:table-row table:style-name="ro1">
          <table:table-cell office:value-type="float" office:value="459.240112304688">
            <text:p>459.2401123047</text:p>
          </table:table-cell>
          <table:table-cell office:value-type="float" office:value="0.01204112">
            <text:p>0.01204112</text:p>
          </table:table-cell>
          <table:table-cell table:number-columns-repeated="4"/>
        </table:table-row>
        <table:table-row table:style-name="ro1">
          <table:table-cell office:value-type="float" office:value="459.354827880859">
            <text:p>459.3548278809</text:p>
          </table:table-cell>
          <table:table-cell office:value-type="float" office:value="-0.00768278">
            <text:p>-0.00768278</text:p>
          </table:table-cell>
          <table:table-cell table:number-columns-repeated="4"/>
        </table:table-row>
        <table:table-row table:style-name="ro1">
          <table:table-cell office:value-type="float" office:value="459.469543457031">
            <text:p>459.469543457</text:p>
          </table:table-cell>
          <table:table-cell office:value-type="float" office:value="0.004100797">
            <text:p>0.004100797</text:p>
          </table:table-cell>
          <table:table-cell table:number-columns-repeated="4"/>
        </table:table-row>
        <table:table-row table:style-name="ro1">
          <table:table-cell office:value-type="float" office:value="459.584289550781">
            <text:p>459.5842895508</text:p>
          </table:table-cell>
          <table:table-cell office:value-type="float" office:value="-0.002320265">
            <text:p>-0.002320265</text:p>
          </table:table-cell>
          <table:table-cell table:number-columns-repeated="4"/>
        </table:table-row>
        <table:table-row table:style-name="ro1">
          <table:table-cell office:value-type="float" office:value="459.699005126953">
            <text:p>459.699005127</text:p>
          </table:table-cell>
          <table:table-cell office:value-type="float" office:value="0.006576655">
            <text:p>0.006576655</text:p>
          </table:table-cell>
          <table:table-cell table:number-columns-repeated="4"/>
        </table:table-row>
        <table:table-row table:style-name="ro1">
          <table:table-cell office:value-type="float" office:value="459.813751220703">
            <text:p>459.8137512207</text:p>
          </table:table-cell>
          <table:table-cell office:value-type="float" office:value="-0.006526043">
            <text:p>-0.006526043</text:p>
          </table:table-cell>
          <table:table-cell table:number-columns-repeated="4"/>
        </table:table-row>
        <table:table-row table:style-name="ro1">
          <table:table-cell office:value-type="float" office:value="459.928497314453">
            <text:p>459.9284973145</text:p>
          </table:table-cell>
          <table:table-cell office:value-type="float" office:value="0.008032383">
            <text:p>0.008032383</text:p>
          </table:table-cell>
          <table:table-cell table:number-columns-repeated="4"/>
        </table:table-row>
        <table:table-row table:style-name="ro1">
          <table:table-cell office:value-type="float" office:value="460.043243408203">
            <text:p>460.0432434082</text:p>
          </table:table-cell>
          <table:table-cell office:value-type="float" office:value="0.03883331">
            <text:p>0.03883331</text:p>
          </table:table-cell>
          <table:table-cell table:number-columns-repeated="4"/>
        </table:table-row>
        <table:table-row table:style-name="ro1">
          <table:table-cell office:value-type="float" office:value="460.157989501953">
            <text:p>460.157989502</text:p>
          </table:table-cell>
          <table:table-cell office:value-type="float" office:value="0.01549665">
            <text:p>0.01549665</text:p>
          </table:table-cell>
          <table:table-cell table:number-columns-repeated="4"/>
        </table:table-row>
        <table:table-row table:style-name="ro1">
          <table:table-cell office:value-type="float" office:value="460.272735595703">
            <text:p>460.2727355957</text:p>
          </table:table-cell>
          <table:table-cell office:value-type="float" office:value="-0.01155463">
            <text:p>-0.01155463</text:p>
          </table:table-cell>
          <table:table-cell table:number-columns-repeated="4"/>
        </table:table-row>
        <table:table-row table:style-name="ro1">
          <table:table-cell office:value-type="float" office:value="460.387512207031">
            <text:p>460.387512207</text:p>
          </table:table-cell>
          <table:table-cell office:value-type="float" office:value="-0.004469597">
            <text:p>-0.004469597</text:p>
          </table:table-cell>
          <table:table-cell table:number-columns-repeated="4"/>
        </table:table-row>
        <table:table-row table:style-name="ro1">
          <table:table-cell office:value-type="float" office:value="460.502258300781">
            <text:p>460.5022583008</text:p>
          </table:table-cell>
          <table:table-cell office:value-type="float" office:value="0.01071582">
            <text:p>0.01071582</text:p>
          </table:table-cell>
          <table:table-cell table:number-columns-repeated="4"/>
        </table:table-row>
        <table:table-row table:style-name="ro1">
          <table:table-cell office:value-type="float" office:value="460.617034912109">
            <text:p>460.6170349121</text:p>
          </table:table-cell>
          <table:table-cell office:value-type="float" office:value="-0.002544058">
            <text:p>-0.002544058</text:p>
          </table:table-cell>
          <table:table-cell table:number-columns-repeated="4"/>
        </table:table-row>
        <table:table-row table:style-name="ro1">
          <table:table-cell office:value-type="float" office:value="460.731811523438">
            <text:p>460.7318115234</text:p>
          </table:table-cell>
          <table:table-cell office:value-type="float" office:value="0.008381394">
            <text:p>0.008381394</text:p>
          </table:table-cell>
          <table:table-cell table:number-columns-repeated="4"/>
        </table:table-row>
        <table:table-row table:style-name="ro1">
          <table:table-cell office:value-type="float" office:value="460.846588134766">
            <text:p>460.8465881348</text:p>
          </table:table-cell>
          <table:table-cell office:value-type="float" office:value="0.01387202">
            <text:p>0.01387202</text:p>
          </table:table-cell>
          <table:table-cell table:number-columns-repeated="4"/>
        </table:table-row>
        <table:table-row table:style-name="ro1">
          <table:table-cell office:value-type="float" office:value="460.961364746094">
            <text:p>460.9613647461</text:p>
          </table:table-cell>
          <table:table-cell office:value-type="float" office:value="0.0001415509">
            <text:p>0.0001415509</text:p>
          </table:table-cell>
          <table:table-cell table:number-columns-repeated="4"/>
        </table:table-row>
        <table:table-row table:style-name="ro1">
          <table:table-cell office:value-type="float" office:value="461.076171875">
            <text:p>461.076171875</text:p>
          </table:table-cell>
          <table:table-cell office:value-type="float" office:value="-0.01226147">
            <text:p>-0.01226147</text:p>
          </table:table-cell>
          <table:table-cell table:number-columns-repeated="4"/>
        </table:table-row>
        <table:table-row table:style-name="ro1">
          <table:table-cell office:value-type="float" office:value="461.190948486328">
            <text:p>461.1909484863</text:p>
          </table:table-cell>
          <table:table-cell office:value-type="float" office:value="-0.001045993">
            <text:p>-0.001045993</text:p>
          </table:table-cell>
          <table:table-cell table:number-columns-repeated="4"/>
        </table:table-row>
        <table:table-row table:style-name="ro1">
          <table:table-cell office:value-type="float" office:value="461.305755615234">
            <text:p>461.3057556152</text:p>
          </table:table-cell>
          <table:table-cell office:value-type="float" office:value="0.005958734">
            <text:p>0.005958734</text:p>
          </table:table-cell>
          <table:table-cell table:number-columns-repeated="4"/>
        </table:table-row>
        <table:table-row table:style-name="ro1">
          <table:table-cell office:value-type="float" office:value="461.420562744141">
            <text:p>461.4205627441</text:p>
          </table:table-cell>
          <table:table-cell office:value-type="float" office:value="-0.001783794">
            <text:p>-0.001783794</text:p>
          </table:table-cell>
          <table:table-cell table:number-columns-repeated="4"/>
        </table:table-row>
        <table:table-row table:style-name="ro1">
          <table:table-cell office:value-type="float" office:value="461.535369873047">
            <text:p>461.535369873</text:p>
          </table:table-cell>
          <table:table-cell office:value-type="float" office:value="-0.0109403">
            <text:p>-0.0109403</text:p>
          </table:table-cell>
          <table:table-cell table:number-columns-repeated="4"/>
        </table:table-row>
        <table:table-row table:style-name="ro1">
          <table:table-cell office:value-type="float" office:value="461.650177001953">
            <text:p>461.650177002</text:p>
          </table:table-cell>
          <table:table-cell office:value-type="float" office:value="0.007658938">
            <text:p>0.007658938</text:p>
          </table:table-cell>
          <table:table-cell table:number-columns-repeated="4"/>
        </table:table-row>
        <table:table-row table:style-name="ro1">
          <table:table-cell office:value-type="float" office:value="461.764984130859">
            <text:p>461.7649841309</text:p>
          </table:table-cell>
          <table:table-cell office:value-type="float" office:value="0.00205933">
            <text:p>0.00205933</text:p>
          </table:table-cell>
          <table:table-cell table:number-columns-repeated="4"/>
        </table:table-row>
        <table:table-row table:style-name="ro1">
          <table:table-cell office:value-type="float" office:value="461.879791259766">
            <text:p>461.8797912598</text:p>
          </table:table-cell>
          <table:table-cell office:value-type="float" office:value="0.007331359">
            <text:p>0.007331359</text:p>
          </table:table-cell>
          <table:table-cell table:number-columns-repeated="4"/>
        </table:table-row>
        <table:table-row table:style-name="ro1">
          <table:table-cell office:value-type="float" office:value="461.99462890625">
            <text:p>461.9946289063</text:p>
          </table:table-cell>
          <table:table-cell office:value-type="float" office:value="-0.004086311">
            <text:p>-0.004086311</text:p>
          </table:table-cell>
          <table:table-cell table:number-columns-repeated="4"/>
        </table:table-row>
        <table:table-row table:style-name="ro1">
          <table:table-cell office:value-type="float" office:value="462.109466552734">
            <text:p>462.1094665527</text:p>
          </table:table-cell>
          <table:table-cell office:value-type="float" office:value="0.005908828">
            <text:p>0.005908828</text:p>
          </table:table-cell>
          <table:table-cell table:number-columns-repeated="4"/>
        </table:table-row>
        <table:table-row table:style-name="ro1">
          <table:table-cell office:value-type="float" office:value="462.224304199219">
            <text:p>462.2243041992</text:p>
          </table:table-cell>
          <table:table-cell office:value-type="string">
            <text:p>-2.060119E-06</text:p>
          </table:table-cell>
          <table:table-cell table:number-columns-repeated="4"/>
        </table:table-row>
        <table:table-row table:style-name="ro1">
          <table:table-cell office:value-type="float" office:value="462.339141845703">
            <text:p>462.3391418457</text:p>
          </table:table-cell>
          <table:table-cell office:value-type="float" office:value="0.0107731">
            <text:p>0.0107731</text:p>
          </table:table-cell>
          <table:table-cell table:number-columns-repeated="4"/>
        </table:table-row>
        <table:table-row table:style-name="ro1">
          <table:table-cell office:value-type="float" office:value="462.453979492188">
            <text:p>462.4539794922</text:p>
          </table:table-cell>
          <table:table-cell office:value-type="float" office:value="-0.0006404943">
            <text:p>-0.0006404943</text:p>
          </table:table-cell>
          <table:table-cell table:number-columns-repeated="4"/>
        </table:table-row>
        <table:table-row table:style-name="ro1">
          <table:table-cell office:value-type="float" office:value="462.568817138672">
            <text:p>462.5688171387</text:p>
          </table:table-cell>
          <table:table-cell office:value-type="float" office:value="0.002758068">
            <text:p>0.002758068</text:p>
          </table:table-cell>
          <table:table-cell table:number-columns-repeated="4"/>
        </table:table-row>
        <table:table-row table:style-name="ro1">
          <table:table-cell office:value-type="float" office:value="462.683654785156">
            <text:p>462.6836547852</text:p>
          </table:table-cell>
          <table:table-cell office:value-type="float" office:value="0.01267279">
            <text:p>0.01267279</text:p>
          </table:table-cell>
          <table:table-cell table:number-columns-repeated="4"/>
        </table:table-row>
        <table:table-row table:style-name="ro1">
          <table:table-cell office:value-type="float" office:value="462.798522949219">
            <text:p>462.7985229492</text:p>
          </table:table-cell>
          <table:table-cell office:value-type="float" office:value="-0.008582356">
            <text:p>-0.008582356</text:p>
          </table:table-cell>
          <table:table-cell table:number-columns-repeated="4"/>
        </table:table-row>
        <table:table-row table:style-name="ro1">
          <table:table-cell office:value-type="float" office:value="462.913391113281">
            <text:p>462.9133911133</text:p>
          </table:table-cell>
          <table:table-cell office:value-type="float" office:value="-0.005349316">
            <text:p>-0.005349316</text:p>
          </table:table-cell>
          <table:table-cell table:number-columns-repeated="4"/>
        </table:table-row>
        <table:table-row table:style-name="ro1">
          <table:table-cell office:value-type="float" office:value="463.028259277344">
            <text:p>463.0282592773</text:p>
          </table:table-cell>
          <table:table-cell office:value-type="float" office:value="0.006910245">
            <text:p>0.006910245</text:p>
          </table:table-cell>
          <table:table-cell table:number-columns-repeated="4"/>
        </table:table-row>
        <table:table-row table:style-name="ro1">
          <table:table-cell office:value-type="float" office:value="463.143127441406">
            <text:p>463.1431274414</text:p>
          </table:table-cell>
          <table:table-cell office:value-type="float" office:value="0.005393322">
            <text:p>0.005393322</text:p>
          </table:table-cell>
          <table:table-cell table:number-columns-repeated="4"/>
        </table:table-row>
        <table:table-row table:style-name="ro1">
          <table:table-cell office:value-type="float" office:value="463.257995605469">
            <text:p>463.2579956055</text:p>
          </table:table-cell>
          <table:table-cell office:value-type="float" office:value="-0.008377112">
            <text:p>-0.008377112</text:p>
          </table:table-cell>
          <table:table-cell table:number-columns-repeated="4"/>
        </table:table-row>
        <table:table-row table:style-name="ro1">
          <table:table-cell office:value-type="float" office:value="463.372863769531">
            <text:p>463.3728637695</text:p>
          </table:table-cell>
          <table:table-cell office:value-type="float" office:value="0.01494789">
            <text:p>0.01494789</text:p>
          </table:table-cell>
          <table:table-cell table:number-columns-repeated="4"/>
        </table:table-row>
        <table:table-row table:style-name="ro1">
          <table:table-cell office:value-type="float" office:value="463.487762451172">
            <text:p>463.4877624512</text:p>
          </table:table-cell>
          <table:table-cell office:value-type="float" office:value="0.00687316">
            <text:p>0.00687316</text:p>
          </table:table-cell>
          <table:table-cell table:number-columns-repeated="4"/>
        </table:table-row>
        <table:table-row table:style-name="ro1">
          <table:table-cell office:value-type="float" office:value="463.602661132813">
            <text:p>463.6026611328</text:p>
          </table:table-cell>
          <table:table-cell office:value-type="float" office:value="0.00514486">
            <text:p>0.00514486</text:p>
          </table:table-cell>
          <table:table-cell table:number-columns-repeated="4"/>
        </table:table-row>
        <table:table-row table:style-name="ro1">
          <table:table-cell office:value-type="float" office:value="463.717529296875">
            <text:p>463.7175292969</text:p>
          </table:table-cell>
          <table:table-cell office:value-type="float" office:value="-0.0008840571">
            <text:p>-0.0008840571</text:p>
          </table:table-cell>
          <table:table-cell table:number-columns-repeated="4"/>
        </table:table-row>
        <table:table-row table:style-name="ro1">
          <table:table-cell office:value-type="float" office:value="463.832427978516">
            <text:p>463.8324279785</text:p>
          </table:table-cell>
          <table:table-cell office:value-type="float" office:value="-0.01274233">
            <text:p>-0.01274233</text:p>
          </table:table-cell>
          <table:table-cell table:number-columns-repeated="4"/>
        </table:table-row>
        <table:table-row table:style-name="ro1">
          <table:table-cell office:value-type="float" office:value="463.947326660156">
            <text:p>463.9473266602</text:p>
          </table:table-cell>
          <table:table-cell office:value-type="float" office:value="0.001385428">
            <text:p>0.001385428</text:p>
          </table:table-cell>
          <table:table-cell table:number-columns-repeated="4"/>
        </table:table-row>
        <table:table-row table:style-name="ro1">
          <table:table-cell office:value-type="float" office:value="464.062255859375">
            <text:p>464.0622558594</text:p>
          </table:table-cell>
          <table:table-cell office:value-type="float" office:value="-0.006537979">
            <text:p>-0.006537979</text:p>
          </table:table-cell>
          <table:table-cell table:number-columns-repeated="4"/>
        </table:table-row>
        <table:table-row table:style-name="ro1">
          <table:table-cell office:value-type="float" office:value="464.177154541016">
            <text:p>464.177154541</text:p>
          </table:table-cell>
          <table:table-cell office:value-type="float" office:value="-0.007371325">
            <text:p>-0.007371325</text:p>
          </table:table-cell>
          <table:table-cell table:number-columns-repeated="4"/>
        </table:table-row>
        <table:table-row table:style-name="ro1">
          <table:table-cell office:value-type="float" office:value="464.292083740234">
            <text:p>464.2920837402</text:p>
          </table:table-cell>
          <table:table-cell office:value-type="float" office:value="-0.01072731">
            <text:p>-0.01072731</text:p>
          </table:table-cell>
          <table:table-cell table:number-columns-repeated="4"/>
        </table:table-row>
        <table:table-row table:style-name="ro1">
          <table:table-cell office:value-type="float" office:value="464.406982421875">
            <text:p>464.4069824219</text:p>
          </table:table-cell>
          <table:table-cell office:value-type="float" office:value="0.005260065">
            <text:p>0.005260065</text:p>
          </table:table-cell>
          <table:table-cell table:number-columns-repeated="4"/>
        </table:table-row>
        <table:table-row table:style-name="ro1">
          <table:table-cell office:value-type="float" office:value="464.521911621094">
            <text:p>464.5219116211</text:p>
          </table:table-cell>
          <table:table-cell office:value-type="float" office:value="-0.005072006">
            <text:p>-0.005072006</text:p>
          </table:table-cell>
          <table:table-cell table:number-columns-repeated="4"/>
        </table:table-row>
        <table:table-row table:style-name="ro1">
          <table:table-cell office:value-type="float" office:value="464.636840820313">
            <text:p>464.6368408203</text:p>
          </table:table-cell>
          <table:table-cell office:value-type="float" office:value="-0.002824325">
            <text:p>-0.002824325</text:p>
          </table:table-cell>
          <table:table-cell table:number-columns-repeated="4"/>
        </table:table-row>
        <table:table-row table:style-name="ro1">
          <table:table-cell office:value-type="float" office:value="464.751770019531">
            <text:p>464.7517700195</text:p>
          </table:table-cell>
          <table:table-cell office:value-type="float" office:value="-0.008059101">
            <text:p>-0.008059101</text:p>
          </table:table-cell>
          <table:table-cell table:number-columns-repeated="4"/>
        </table:table-row>
        <table:table-row table:style-name="ro1">
          <table:table-cell office:value-type="float" office:value="464.866729736328">
            <text:p>464.8667297363</text:p>
          </table:table-cell>
          <table:table-cell office:value-type="float" office:value="0.003488441">
            <text:p>0.003488441</text:p>
          </table:table-cell>
          <table:table-cell table:number-columns-repeated="4"/>
        </table:table-row>
        <table:table-row table:style-name="ro1">
          <table:table-cell office:value-type="float" office:value="464.981658935547">
            <text:p>464.9816589355</text:p>
          </table:table-cell>
          <table:table-cell office:value-type="float" office:value="0.01454457">
            <text:p>0.01454457</text:p>
          </table:table-cell>
          <table:table-cell table:number-columns-repeated="4"/>
        </table:table-row>
        <table:table-row table:style-name="ro1">
          <table:table-cell office:value-type="float" office:value="465.096618652344">
            <text:p>465.0966186523</text:p>
          </table:table-cell>
          <table:table-cell office:value-type="float" office:value="-0.007004624">
            <text:p>-0.007004624</text:p>
          </table:table-cell>
          <table:table-cell table:number-columns-repeated="4"/>
        </table:table-row>
        <table:table-row table:style-name="ro1">
          <table:table-cell office:value-type="float" office:value="465.211547851563">
            <text:p>465.2115478516</text:p>
          </table:table-cell>
          <table:table-cell office:value-type="float" office:value="-0.01393758">
            <text:p>-0.01393758</text:p>
          </table:table-cell>
          <table:table-cell table:number-columns-repeated="4"/>
        </table:table-row>
        <table:table-row table:style-name="ro1">
          <table:table-cell office:value-type="float" office:value="465.326507568359">
            <text:p>465.3265075684</text:p>
          </table:table-cell>
          <table:table-cell office:value-type="float" office:value="-0.01009395">
            <text:p>-0.01009395</text:p>
          </table:table-cell>
          <table:table-cell table:number-columns-repeated="4"/>
        </table:table-row>
        <table:table-row table:style-name="ro1">
          <table:table-cell office:value-type="float" office:value="465.441467285156">
            <text:p>465.4414672852</text:p>
          </table:table-cell>
          <table:table-cell office:value-type="float" office:value="0.001372111">
            <text:p>0.001372111</text:p>
          </table:table-cell>
          <table:table-cell table:number-columns-repeated="4"/>
        </table:table-row>
        <table:table-row table:style-name="ro1">
          <table:table-cell office:value-type="float" office:value="465.556427001953">
            <text:p>465.556427002</text:p>
          </table:table-cell>
          <table:table-cell office:value-type="float" office:value="-0.003973699">
            <text:p>-0.003973699</text:p>
          </table:table-cell>
          <table:table-cell table:number-columns-repeated="4"/>
        </table:table-row>
        <table:table-row table:style-name="ro1">
          <table:table-cell office:value-type="float" office:value="465.671417236328">
            <text:p>465.6714172363</text:p>
          </table:table-cell>
          <table:table-cell office:value-type="float" office:value="-0.007465629">
            <text:p>-0.007465629</text:p>
          </table:table-cell>
          <table:table-cell table:number-columns-repeated="4"/>
        </table:table-row>
        <table:table-row table:style-name="ro1">
          <table:table-cell office:value-type="float" office:value="465.786376953125">
            <text:p>465.7863769531</text:p>
          </table:table-cell>
          <table:table-cell office:value-type="float" office:value="0.003285579">
            <text:p>0.003285579</text:p>
          </table:table-cell>
          <table:table-cell table:number-columns-repeated="4"/>
        </table:table-row>
        <table:table-row table:style-name="ro1">
          <table:table-cell office:value-type="float" office:value="465.9013671875">
            <text:p>465.9013671875</text:p>
          </table:table-cell>
          <table:table-cell office:value-type="float" office:value="0.004903127">
            <text:p>0.004903127</text:p>
          </table:table-cell>
          <table:table-cell table:number-columns-repeated="4"/>
        </table:table-row>
        <table:table-row table:style-name="ro1">
          <table:table-cell office:value-type="float" office:value="466.016357421875">
            <text:p>466.0163574219</text:p>
          </table:table-cell>
          <table:table-cell office:value-type="float" office:value="-0.002637292">
            <text:p>-0.002637292</text:p>
          </table:table-cell>
          <table:table-cell table:number-columns-repeated="4"/>
        </table:table-row>
        <table:table-row table:style-name="ro1">
          <table:table-cell office:value-type="float" office:value="466.13134765625">
            <text:p>466.1313476563</text:p>
          </table:table-cell>
          <table:table-cell office:value-type="float" office:value="-0.009891845">
            <text:p>-0.009891845</text:p>
          </table:table-cell>
          <table:table-cell table:number-columns-repeated="4"/>
        </table:table-row>
        <table:table-row table:style-name="ro1">
          <table:table-cell office:value-type="float" office:value="466.246337890625">
            <text:p>466.2463378906</text:p>
          </table:table-cell>
          <table:table-cell office:value-type="float" office:value="0.01666922">
            <text:p>0.01666922</text:p>
          </table:table-cell>
          <table:table-cell table:number-columns-repeated="4"/>
        </table:table-row>
        <table:table-row table:style-name="ro1">
          <table:table-cell office:value-type="float" office:value="466.361328125">
            <text:p>466.361328125</text:p>
          </table:table-cell>
          <table:table-cell office:value-type="float" office:value="-0.003820862">
            <text:p>-0.003820862</text:p>
          </table:table-cell>
          <table:table-cell table:number-columns-repeated="4"/>
        </table:table-row>
        <table:table-row table:style-name="ro1">
          <table:table-cell office:value-type="float" office:value="466.476318359375">
            <text:p>466.4763183594</text:p>
          </table:table-cell>
          <table:table-cell office:value-type="float" office:value="-0.01349802">
            <text:p>-0.01349802</text:p>
          </table:table-cell>
          <table:table-cell table:number-columns-repeated="4"/>
        </table:table-row>
        <table:table-row table:style-name="ro1">
          <table:table-cell office:value-type="float" office:value="466.591339111328">
            <text:p>466.5913391113</text:p>
          </table:table-cell>
          <table:table-cell office:value-type="float" office:value="0.003592304">
            <text:p>0.003592304</text:p>
          </table:table-cell>
          <table:table-cell table:number-columns-repeated="4"/>
        </table:table-row>
        <table:table-row table:style-name="ro1">
          <table:table-cell office:value-type="float" office:value="466.706329345703">
            <text:p>466.7063293457</text:p>
          </table:table-cell>
          <table:table-cell office:value-type="float" office:value="0.02626177">
            <text:p>0.02626177</text:p>
          </table:table-cell>
          <table:table-cell table:number-columns-repeated="4"/>
        </table:table-row>
        <table:table-row table:style-name="ro1">
          <table:table-cell office:value-type="float" office:value="466.821350097656">
            <text:p>466.8213500977</text:p>
          </table:table-cell>
          <table:table-cell office:value-type="float" office:value="-0.001586553">
            <text:p>-0.001586553</text:p>
          </table:table-cell>
          <table:table-cell table:number-columns-repeated="4"/>
        </table:table-row>
        <table:table-row table:style-name="ro1">
          <table:table-cell office:value-type="float" office:value="466.936370849609">
            <text:p>466.9363708496</text:p>
          </table:table-cell>
          <table:table-cell office:value-type="float" office:value="-0.006117521">
            <text:p>-0.006117521</text:p>
          </table:table-cell>
          <table:table-cell table:number-columns-repeated="4"/>
        </table:table-row>
        <table:table-row table:style-name="ro1">
          <table:table-cell office:value-type="float" office:value="467.051391601563">
            <text:p>467.0513916016</text:p>
          </table:table-cell>
          <table:table-cell office:value-type="float" office:value="0.009610989">
            <text:p>0.009610989</text:p>
          </table:table-cell>
          <table:table-cell table:number-columns-repeated="4"/>
        </table:table-row>
        <table:table-row table:style-name="ro1">
          <table:table-cell office:value-type="float" office:value="467.166442871094">
            <text:p>467.1664428711</text:p>
          </table:table-cell>
          <table:table-cell office:value-type="float" office:value="-0.005887977">
            <text:p>-0.005887977</text:p>
          </table:table-cell>
          <table:table-cell table:number-columns-repeated="4"/>
        </table:table-row>
        <table:table-row table:style-name="ro1">
          <table:table-cell office:value-type="float" office:value="467.281463623047">
            <text:p>467.281463623</text:p>
          </table:table-cell>
          <table:table-cell office:value-type="float" office:value="0.0008061319">
            <text:p>0.0008061319</text:p>
          </table:table-cell>
          <table:table-cell table:number-columns-repeated="4"/>
        </table:table-row>
        <table:table-row table:style-name="ro1">
          <table:table-cell office:value-type="float" office:value="467.396484375">
            <text:p>467.396484375</text:p>
          </table:table-cell>
          <table:table-cell office:value-type="float" office:value="-0.006962405">
            <text:p>-0.006962405</text:p>
          </table:table-cell>
          <table:table-cell table:number-columns-repeated="4"/>
        </table:table-row>
        <table:table-row table:style-name="ro1">
          <table:table-cell office:value-type="float" office:value="467.511535644531">
            <text:p>467.5115356445</text:p>
          </table:table-cell>
          <table:table-cell office:value-type="float" office:value="-0.009946955">
            <text:p>-0.009946955</text:p>
          </table:table-cell>
          <table:table-cell table:number-columns-repeated="4"/>
        </table:table-row>
        <table:table-row table:style-name="ro1">
          <table:table-cell office:value-type="float" office:value="467.626586914063">
            <text:p>467.6265869141</text:p>
          </table:table-cell>
          <table:table-cell office:value-type="float" office:value="0.001657601">
            <text:p>0.001657601</text:p>
          </table:table-cell>
          <table:table-cell table:number-columns-repeated="4"/>
        </table:table-row>
        <table:table-row table:style-name="ro1">
          <table:table-cell office:value-type="float" office:value="467.741638183594">
            <text:p>467.7416381836</text:p>
          </table:table-cell>
          <table:table-cell office:value-type="float" office:value="-0.01166252">
            <text:p>-0.01166252</text:p>
          </table:table-cell>
          <table:table-cell table:number-columns-repeated="4"/>
        </table:table-row>
        <table:table-row table:style-name="ro1">
          <table:table-cell office:value-type="float" office:value="467.856689453125">
            <text:p>467.8566894531</text:p>
          </table:table-cell>
          <table:table-cell office:value-type="float" office:value="-0.006833093">
            <text:p>-0.006833093</text:p>
          </table:table-cell>
          <table:table-cell table:number-columns-repeated="4"/>
        </table:table-row>
        <table:table-row table:style-name="ro1">
          <table:table-cell office:value-type="float" office:value="467.971740722656">
            <text:p>467.9717407227</text:p>
          </table:table-cell>
          <table:table-cell office:value-type="float" office:value="-0.008378959">
            <text:p>-0.008378959</text:p>
          </table:table-cell>
          <table:table-cell table:number-columns-repeated="4"/>
        </table:table-row>
        <table:table-row table:style-name="ro1">
          <table:table-cell office:value-type="float" office:value="468.086822509766">
            <text:p>468.0868225098</text:p>
          </table:table-cell>
          <table:table-cell office:value-type="float" office:value="-0.001671269">
            <text:p>-0.001671269</text:p>
          </table:table-cell>
          <table:table-cell table:number-columns-repeated="4"/>
        </table:table-row>
        <table:table-row table:style-name="ro1">
          <table:table-cell office:value-type="float" office:value="468.201873779297">
            <text:p>468.2018737793</text:p>
          </table:table-cell>
          <table:table-cell office:value-type="float" office:value="0.009445113">
            <text:p>0.009445113</text:p>
          </table:table-cell>
          <table:table-cell table:number-columns-repeated="4"/>
        </table:table-row>
        <table:table-row table:style-name="ro1">
          <table:table-cell office:value-type="float" office:value="468.316955566406">
            <text:p>468.3169555664</text:p>
          </table:table-cell>
          <table:table-cell office:value-type="float" office:value="-0.002075097">
            <text:p>-0.002075097</text:p>
          </table:table-cell>
          <table:table-cell table:number-columns-repeated="4"/>
        </table:table-row>
        <table:table-row table:style-name="ro1">
          <table:table-cell office:value-type="float" office:value="468.432037353516">
            <text:p>468.4320373535</text:p>
          </table:table-cell>
          <table:table-cell office:value-type="float" office:value="-0.004829294">
            <text:p>-0.004829294</text:p>
          </table:table-cell>
          <table:table-cell table:number-columns-repeated="4"/>
        </table:table-row>
        <table:table-row table:style-name="ro1">
          <table:table-cell office:value-type="float" office:value="468.547119140625">
            <text:p>468.5471191406</text:p>
          </table:table-cell>
          <table:table-cell office:value-type="float" office:value="-0.001596409">
            <text:p>-0.001596409</text:p>
          </table:table-cell>
          <table:table-cell table:number-columns-repeated="4"/>
        </table:table-row>
        <table:table-row table:style-name="ro1">
          <table:table-cell office:value-type="float" office:value="468.662200927734">
            <text:p>468.6622009277</text:p>
          </table:table-cell>
          <table:table-cell office:value-type="float" office:value="-0.009117946">
            <text:p>-0.009117946</text:p>
          </table:table-cell>
          <table:table-cell table:number-columns-repeated="4"/>
        </table:table-row>
        <table:table-row table:style-name="ro1">
          <table:table-cell office:value-type="float" office:value="468.777282714844">
            <text:p>468.7772827148</text:p>
          </table:table-cell>
          <table:table-cell office:value-type="float" office:value="-0.007334473">
            <text:p>-0.007334473</text:p>
          </table:table-cell>
          <table:table-cell table:number-columns-repeated="4"/>
        </table:table-row>
        <table:table-row table:style-name="ro1">
          <table:table-cell office:value-type="float" office:value="468.892395019531">
            <text:p>468.8923950195</text:p>
          </table:table-cell>
          <table:table-cell office:value-type="float" office:value="-0.006544612">
            <text:p>-0.006544612</text:p>
          </table:table-cell>
          <table:table-cell table:number-columns-repeated="4"/>
        </table:table-row>
        <table:table-row table:style-name="ro1">
          <table:table-cell office:value-type="float" office:value="469.007476806641">
            <text:p>469.0074768066</text:p>
          </table:table-cell>
          <table:table-cell office:value-type="float" office:value="0.02674441">
            <text:p>0.02674441</text:p>
          </table:table-cell>
          <table:table-cell table:number-columns-repeated="4"/>
        </table:table-row>
        <table:table-row table:style-name="ro1">
          <table:table-cell office:value-type="float" office:value="469.122589111328">
            <text:p>469.1225891113</text:p>
          </table:table-cell>
          <table:table-cell office:value-type="float" office:value="-0.002093723">
            <text:p>-0.002093723</text:p>
          </table:table-cell>
          <table:table-cell table:number-columns-repeated="4"/>
        </table:table-row>
        <table:table-row table:style-name="ro1">
          <table:table-cell office:value-type="float" office:value="469.237701416016">
            <text:p>469.237701416</text:p>
          </table:table-cell>
          <table:table-cell office:value-type="float" office:value="0.004097568">
            <text:p>0.004097568</text:p>
          </table:table-cell>
          <table:table-cell table:number-columns-repeated="4"/>
        </table:table-row>
        <table:table-row table:style-name="ro1">
          <table:table-cell office:value-type="float" office:value="469.352813720703">
            <text:p>469.3528137207</text:p>
          </table:table-cell>
          <table:table-cell office:value-type="float" office:value="0.01017641">
            <text:p>0.01017641</text:p>
          </table:table-cell>
          <table:table-cell table:number-columns-repeated="4"/>
        </table:table-row>
        <table:table-row table:style-name="ro1">
          <table:table-cell office:value-type="float" office:value="469.467926025391">
            <text:p>469.4679260254</text:p>
          </table:table-cell>
          <table:table-cell office:value-type="float" office:value="0.009924205">
            <text:p>0.009924205</text:p>
          </table:table-cell>
          <table:table-cell table:number-columns-repeated="4"/>
        </table:table-row>
        <table:table-row table:style-name="ro1">
          <table:table-cell office:value-type="float" office:value="469.583068847656">
            <text:p>469.5830688477</text:p>
          </table:table-cell>
          <table:table-cell office:value-type="float" office:value="0.01006795">
            <text:p>0.01006795</text:p>
          </table:table-cell>
          <table:table-cell table:number-columns-repeated="4"/>
        </table:table-row>
        <table:table-row table:style-name="ro1">
          <table:table-cell office:value-type="float" office:value="469.698181152344">
            <text:p>469.6981811523</text:p>
          </table:table-cell>
          <table:table-cell office:value-type="float" office:value="0.0009832456">
            <text:p>0.0009832456</text:p>
          </table:table-cell>
          <table:table-cell table:number-columns-repeated="4"/>
        </table:table-row>
        <table:table-row table:style-name="ro1">
          <table:table-cell office:value-type="float" office:value="469.813323974609">
            <text:p>469.8133239746</text:p>
          </table:table-cell>
          <table:table-cell office:value-type="float" office:value="-0.005408492">
            <text:p>-0.005408492</text:p>
          </table:table-cell>
          <table:table-cell table:number-columns-repeated="4"/>
        </table:table-row>
        <table:table-row table:style-name="ro1">
          <table:table-cell office:value-type="float" office:value="469.928436279297">
            <text:p>469.9284362793</text:p>
          </table:table-cell>
          <table:table-cell office:value-type="float" office:value="-0.003820343">
            <text:p>-0.003820343</text:p>
          </table:table-cell>
          <table:table-cell table:number-columns-repeated="4"/>
        </table:table-row>
        <table:table-row table:style-name="ro1">
          <table:table-cell office:value-type="float" office:value="470.043579101563">
            <text:p>470.0435791016</text:p>
          </table:table-cell>
          <table:table-cell office:value-type="float" office:value="0.004385715">
            <text:p>0.004385715</text:p>
          </table:table-cell>
          <table:table-cell table:number-columns-repeated="4"/>
        </table:table-row>
        <table:table-row table:style-name="ro1">
          <table:table-cell office:value-type="float" office:value="470.158721923828">
            <text:p>470.1587219238</text:p>
          </table:table-cell>
          <table:table-cell office:value-type="float" office:value="-0.01093782">
            <text:p>-0.01093782</text:p>
          </table:table-cell>
          <table:table-cell table:number-columns-repeated="4"/>
        </table:table-row>
        <table:table-row table:style-name="ro1">
          <table:table-cell office:value-type="float" office:value="470.273895263672">
            <text:p>470.2738952637</text:p>
          </table:table-cell>
          <table:table-cell office:value-type="float" office:value="0.004639161">
            <text:p>0.004639161</text:p>
          </table:table-cell>
          <table:table-cell table:number-columns-repeated="4"/>
        </table:table-row>
        <table:table-row table:style-name="ro1">
          <table:table-cell office:value-type="float" office:value="470.389038085938">
            <text:p>470.3890380859</text:p>
          </table:table-cell>
          <table:table-cell office:value-type="float" office:value="0.004150749">
            <text:p>0.004150749</text:p>
          </table:table-cell>
          <table:table-cell table:number-columns-repeated="4"/>
        </table:table-row>
        <table:table-row table:style-name="ro1">
          <table:table-cell office:value-type="float" office:value="470.504180908203">
            <text:p>470.5041809082</text:p>
          </table:table-cell>
          <table:table-cell office:value-type="float" office:value="-0.001622983">
            <text:p>-0.001622983</text:p>
          </table:table-cell>
          <table:table-cell table:number-columns-repeated="4"/>
        </table:table-row>
        <table:table-row table:style-name="ro1">
          <table:table-cell office:value-type="float" office:value="470.619354248047">
            <text:p>470.619354248</text:p>
          </table:table-cell>
          <table:table-cell office:value-type="float" office:value="-0.01098119">
            <text:p>-0.01098119</text:p>
          </table:table-cell>
          <table:table-cell table:number-columns-repeated="4"/>
        </table:table-row>
        <table:table-row table:style-name="ro1">
          <table:table-cell office:value-type="float" office:value="470.734527587891">
            <text:p>470.7345275879</text:p>
          </table:table-cell>
          <table:table-cell office:value-type="float" office:value="0.01085339">
            <text:p>0.01085339</text:p>
          </table:table-cell>
          <table:table-cell table:number-columns-repeated="4"/>
        </table:table-row>
        <table:table-row table:style-name="ro1">
          <table:table-cell office:value-type="float" office:value="470.849700927734">
            <text:p>470.8497009277</text:p>
          </table:table-cell>
          <table:table-cell office:value-type="float" office:value="0.04700544">
            <text:p>0.04700544</text:p>
          </table:table-cell>
          <table:table-cell table:number-columns-repeated="4"/>
        </table:table-row>
        <table:table-row table:style-name="ro1">
          <table:table-cell office:value-type="float" office:value="470.964874267578">
            <text:p>470.9648742676</text:p>
          </table:table-cell>
          <table:table-cell office:value-type="float" office:value="0.0001717355">
            <text:p>0.0001717355</text:p>
          </table:table-cell>
          <table:table-cell table:number-columns-repeated="4"/>
        </table:table-row>
        <table:table-row table:style-name="ro1">
          <table:table-cell office:value-type="float" office:value="471.080047607422">
            <text:p>471.0800476074</text:p>
          </table:table-cell>
          <table:table-cell office:value-type="float" office:value="0.01860991">
            <text:p>0.01860991</text:p>
          </table:table-cell>
          <table:table-cell table:number-columns-repeated="4"/>
        </table:table-row>
        <table:table-row table:style-name="ro1">
          <table:table-cell office:value-type="float" office:value="471.195220947266">
            <text:p>471.1952209473</text:p>
          </table:table-cell>
          <table:table-cell office:value-type="float" office:value="-0.01277706">
            <text:p>-0.01277706</text:p>
          </table:table-cell>
          <table:table-cell table:number-columns-repeated="4"/>
        </table:table-row>
        <table:table-row table:style-name="ro1">
          <table:table-cell office:value-type="float" office:value="471.310424804688">
            <text:p>471.3104248047</text:p>
          </table:table-cell>
          <table:table-cell office:value-type="float" office:value="0.007020331">
            <text:p>0.007020331</text:p>
          </table:table-cell>
          <table:table-cell table:number-columns-repeated="4"/>
        </table:table-row>
        <table:table-row table:style-name="ro1">
          <table:table-cell office:value-type="float" office:value="471.425628662109">
            <text:p>471.4256286621</text:p>
          </table:table-cell>
          <table:table-cell office:value-type="float" office:value="0.00407028">
            <text:p>0.00407028</text:p>
          </table:table-cell>
          <table:table-cell table:number-columns-repeated="4"/>
        </table:table-row>
        <table:table-row table:style-name="ro1">
          <table:table-cell office:value-type="float" office:value="471.540802001953">
            <text:p>471.540802002</text:p>
          </table:table-cell>
          <table:table-cell office:value-type="float" office:value="0.01770499">
            <text:p>0.01770499</text:p>
          </table:table-cell>
          <table:table-cell table:number-columns-repeated="4"/>
        </table:table-row>
        <table:table-row table:style-name="ro1">
          <table:table-cell office:value-type="float" office:value="471.656005859375">
            <text:p>471.6560058594</text:p>
          </table:table-cell>
          <table:table-cell office:value-type="float" office:value="-0.001025477">
            <text:p>-0.001025477</text:p>
          </table:table-cell>
          <table:table-cell table:number-columns-repeated="4"/>
        </table:table-row>
        <table:table-row table:style-name="ro1">
          <table:table-cell office:value-type="float" office:value="471.771209716797">
            <text:p>471.7712097168</text:p>
          </table:table-cell>
          <table:table-cell office:value-type="float" office:value="0.02092136">
            <text:p>0.02092136</text:p>
          </table:table-cell>
          <table:table-cell table:number-columns-repeated="4"/>
        </table:table-row>
        <table:table-row table:style-name="ro1">
          <table:table-cell office:value-type="float" office:value="471.886444091797">
            <text:p>471.8864440918</text:p>
          </table:table-cell>
          <table:table-cell office:value-type="float" office:value="0.01493588">
            <text:p>0.01493588</text:p>
          </table:table-cell>
          <table:table-cell table:number-columns-repeated="4"/>
        </table:table-row>
        <table:table-row table:style-name="ro1">
          <table:table-cell office:value-type="float" office:value="472.001647949219">
            <text:p>472.0016479492</text:p>
          </table:table-cell>
          <table:table-cell office:value-type="float" office:value="0.006549847">
            <text:p>0.006549847</text:p>
          </table:table-cell>
          <table:table-cell table:number-columns-repeated="4"/>
        </table:table-row>
        <table:table-row table:style-name="ro1">
          <table:table-cell office:value-type="float" office:value="472.116882324219">
            <text:p>472.1168823242</text:p>
          </table:table-cell>
          <table:table-cell office:value-type="float" office:value="-0.009078314">
            <text:p>-0.009078314</text:p>
          </table:table-cell>
          <table:table-cell table:number-columns-repeated="4"/>
        </table:table-row>
        <table:table-row table:style-name="ro1">
          <table:table-cell office:value-type="float" office:value="472.232086181641">
            <text:p>472.2320861816</text:p>
          </table:table-cell>
          <table:table-cell office:value-type="float" office:value="0.001915764">
            <text:p>0.001915764</text:p>
          </table:table-cell>
          <table:table-cell table:number-columns-repeated="4"/>
        </table:table-row>
        <table:table-row table:style-name="ro1">
          <table:table-cell office:value-type="float" office:value="472.347320556641">
            <text:p>472.3473205566</text:p>
          </table:table-cell>
          <table:table-cell office:value-type="float" office:value="0.0009125199">
            <text:p>0.0009125199</text:p>
          </table:table-cell>
          <table:table-cell table:number-columns-repeated="4"/>
        </table:table-row>
        <table:table-row table:style-name="ro1">
          <table:table-cell office:value-type="float" office:value="472.462554931641">
            <text:p>472.4625549316</text:p>
          </table:table-cell>
          <table:table-cell office:value-type="float" office:value="-0.01488446">
            <text:p>-0.01488446</text:p>
          </table:table-cell>
          <table:table-cell table:number-columns-repeated="4"/>
        </table:table-row>
        <table:table-row table:style-name="ro1">
          <table:table-cell office:value-type="float" office:value="472.577789306641">
            <text:p>472.5777893066</text:p>
          </table:table-cell>
          <table:table-cell office:value-type="float" office:value="-0.01066782">
            <text:p>-0.01066782</text:p>
          </table:table-cell>
          <table:table-cell table:number-columns-repeated="4"/>
        </table:table-row>
        <table:table-row table:style-name="ro1">
          <table:table-cell office:value-type="float" office:value="472.693023681641">
            <text:p>472.6930236816</text:p>
          </table:table-cell>
          <table:table-cell office:value-type="float" office:value="0.008920639">
            <text:p>0.008920639</text:p>
          </table:table-cell>
          <table:table-cell table:number-columns-repeated="4"/>
        </table:table-row>
        <table:table-row table:style-name="ro1">
          <table:table-cell office:value-type="float" office:value="472.808288574219">
            <text:p>472.8082885742</text:p>
          </table:table-cell>
          <table:table-cell office:value-type="float" office:value="-0.003144098">
            <text:p>-0.003144098</text:p>
          </table:table-cell>
          <table:table-cell table:number-columns-repeated="4"/>
        </table:table-row>
        <table:table-row table:style-name="ro1">
          <table:table-cell office:value-type="float" office:value="472.923522949219">
            <text:p>472.9235229492</text:p>
          </table:table-cell>
          <table:table-cell office:value-type="float" office:value="-0.008791257">
            <text:p>-0.008791257</text:p>
          </table:table-cell>
          <table:table-cell table:number-columns-repeated="4"/>
        </table:table-row>
        <table:table-row table:style-name="ro1">
          <table:table-cell office:value-type="float" office:value="473.038787841797">
            <text:p>473.0387878418</text:p>
          </table:table-cell>
          <table:table-cell office:value-type="float" office:value="-0.01321875">
            <text:p>-0.01321875</text:p>
          </table:table-cell>
          <table:table-cell table:number-columns-repeated="4"/>
        </table:table-row>
        <table:table-row table:style-name="ro1">
          <table:table-cell office:value-type="float" office:value="473.154052734375">
            <text:p>473.1540527344</text:p>
          </table:table-cell>
          <table:table-cell office:value-type="float" office:value="0.013468">
            <text:p>0.013468</text:p>
          </table:table-cell>
          <table:table-cell table:number-columns-repeated="4"/>
        </table:table-row>
        <table:table-row table:style-name="ro1">
          <table:table-cell office:value-type="float" office:value="473.269317626953">
            <text:p>473.269317627</text:p>
          </table:table-cell>
          <table:table-cell office:value-type="float" office:value="0.005301207">
            <text:p>0.005301207</text:p>
          </table:table-cell>
          <table:table-cell table:number-columns-repeated="4"/>
        </table:table-row>
        <table:table-row table:style-name="ro1">
          <table:table-cell office:value-type="float" office:value="473.384582519531">
            <text:p>473.3845825195</text:p>
          </table:table-cell>
          <table:table-cell office:value-type="float" office:value="-0.006192872">
            <text:p>-0.006192872</text:p>
          </table:table-cell>
          <table:table-cell table:number-columns-repeated="4"/>
        </table:table-row>
        <table:table-row table:style-name="ro1">
          <table:table-cell office:value-type="float" office:value="473.499847412109">
            <text:p>473.4998474121</text:p>
          </table:table-cell>
          <table:table-cell office:value-type="float" office:value="-0.003019488">
            <text:p>-0.003019488</text:p>
          </table:table-cell>
          <table:table-cell table:number-columns-repeated="4"/>
        </table:table-row>
        <table:table-row table:style-name="ro1">
          <table:table-cell office:value-type="float" office:value="473.615112304688">
            <text:p>473.6151123047</text:p>
          </table:table-cell>
          <table:table-cell office:value-type="float" office:value="0.01599364">
            <text:p>0.01599364</text:p>
          </table:table-cell>
          <table:table-cell table:number-columns-repeated="4"/>
        </table:table-row>
        <table:table-row table:style-name="ro1">
          <table:table-cell office:value-type="float" office:value="473.730407714844">
            <text:p>473.7304077148</text:p>
          </table:table-cell>
          <table:table-cell office:value-type="float" office:value="0.02831179">
            <text:p>0.02831179</text:p>
          </table:table-cell>
          <table:table-cell table:number-columns-repeated="4"/>
        </table:table-row>
        <table:table-row table:style-name="ro1">
          <table:table-cell office:value-type="float" office:value="473.845703125">
            <text:p>473.845703125</text:p>
          </table:table-cell>
          <table:table-cell office:value-type="float" office:value="-0.005172161">
            <text:p>-0.005172161</text:p>
          </table:table-cell>
          <table:table-cell table:number-columns-repeated="4"/>
        </table:table-row>
        <table:table-row table:style-name="ro1">
          <table:table-cell office:value-type="float" office:value="473.960998535156">
            <text:p>473.9609985352</text:p>
          </table:table-cell>
          <table:table-cell office:value-type="float" office:value="0.003546416">
            <text:p>0.003546416</text:p>
          </table:table-cell>
          <table:table-cell table:number-columns-repeated="4"/>
        </table:table-row>
        <table:table-row table:style-name="ro1">
          <table:table-cell office:value-type="float" office:value="474.076263427734">
            <text:p>474.0762634277</text:p>
          </table:table-cell>
          <table:table-cell office:value-type="float" office:value="0.001114858">
            <text:p>0.001114858</text:p>
          </table:table-cell>
          <table:table-cell table:number-columns-repeated="4"/>
        </table:table-row>
        <table:table-row table:style-name="ro1">
          <table:table-cell office:value-type="float" office:value="474.191589355469">
            <text:p>474.1915893555</text:p>
          </table:table-cell>
          <table:table-cell office:value-type="float" office:value="0.01944345">
            <text:p>0.01944345</text:p>
          </table:table-cell>
          <table:table-cell table:number-columns-repeated="4"/>
        </table:table-row>
        <table:table-row table:style-name="ro1">
          <table:table-cell office:value-type="float" office:value="474.306884765625">
            <text:p>474.3068847656</text:p>
          </table:table-cell>
          <table:table-cell office:value-type="float" office:value="0.02434122">
            <text:p>0.02434122</text:p>
          </table:table-cell>
          <table:table-cell table:number-columns-repeated="4"/>
        </table:table-row>
        <table:table-row table:style-name="ro1">
          <table:table-cell office:value-type="float" office:value="474.422180175781">
            <text:p>474.4221801758</text:p>
          </table:table-cell>
          <table:table-cell office:value-type="float" office:value="-0.01358057">
            <text:p>-0.01358057</text:p>
          </table:table-cell>
          <table:table-cell table:number-columns-repeated="4"/>
        </table:table-row>
        <table:table-row table:style-name="ro1">
          <table:table-cell office:value-type="float" office:value="474.537506103516">
            <text:p>474.5375061035</text:p>
          </table:table-cell>
          <table:table-cell office:value-type="float" office:value="0.005457736">
            <text:p>0.005457736</text:p>
          </table:table-cell>
          <table:table-cell table:number-columns-repeated="4"/>
        </table:table-row>
        <table:table-row table:style-name="ro1">
          <table:table-cell office:value-type="float" office:value="474.652801513672">
            <text:p>474.6528015137</text:p>
          </table:table-cell>
          <table:table-cell office:value-type="float" office:value="-0.006220067">
            <text:p>-0.006220067</text:p>
          </table:table-cell>
          <table:table-cell table:number-columns-repeated="4"/>
        </table:table-row>
        <table:table-row table:style-name="ro1">
          <table:table-cell office:value-type="float" office:value="474.768127441406">
            <text:p>474.7681274414</text:p>
          </table:table-cell>
          <table:table-cell office:value-type="float" office:value="-0.009301093">
            <text:p>-0.009301093</text:p>
          </table:table-cell>
          <table:table-cell table:number-columns-repeated="4"/>
        </table:table-row>
        <table:table-row table:style-name="ro1">
          <table:table-cell office:value-type="float" office:value="474.883453369141">
            <text:p>474.8834533691</text:p>
          </table:table-cell>
          <table:table-cell office:value-type="float" office:value="-0.007500482">
            <text:p>-0.007500482</text:p>
          </table:table-cell>
          <table:table-cell table:number-columns-repeated="4"/>
        </table:table-row>
        <table:table-row table:style-name="ro1">
          <table:table-cell office:value-type="float" office:value="474.998779296875">
            <text:p>474.9987792969</text:p>
          </table:table-cell>
          <table:table-cell office:value-type="float" office:value="0.003373122">
            <text:p>0.003373122</text:p>
          </table:table-cell>
          <table:table-cell table:number-columns-repeated="4"/>
        </table:table-row>
        <table:table-row table:style-name="ro1">
          <table:table-cell office:value-type="float" office:value="475.114135742188">
            <text:p>475.1141357422</text:p>
          </table:table-cell>
          <table:table-cell office:value-type="float" office:value="-0.008148536">
            <text:p>-0.008148536</text:p>
          </table:table-cell>
          <table:table-cell table:number-columns-repeated="4"/>
        </table:table-row>
        <table:table-row table:style-name="ro1">
          <table:table-cell office:value-type="float" office:value="475.229461669922">
            <text:p>475.2294616699</text:p>
          </table:table-cell>
          <table:table-cell office:value-type="float" office:value="-0.006328131">
            <text:p>-0.006328131</text:p>
          </table:table-cell>
          <table:table-cell table:number-columns-repeated="4"/>
        </table:table-row>
        <table:table-row table:style-name="ro1">
          <table:table-cell office:value-type="float" office:value="475.344818115234">
            <text:p>475.3448181152</text:p>
          </table:table-cell>
          <table:table-cell office:value-type="float" office:value="0.00247927">
            <text:p>0.00247927</text:p>
          </table:table-cell>
          <table:table-cell table:number-columns-repeated="4"/>
        </table:table-row>
        <table:table-row table:style-name="ro1">
          <table:table-cell office:value-type="float" office:value="475.460144042969">
            <text:p>475.460144043</text:p>
          </table:table-cell>
          <table:table-cell office:value-type="float" office:value="0.008286536">
            <text:p>0.008286536</text:p>
          </table:table-cell>
          <table:table-cell table:number-columns-repeated="4"/>
        </table:table-row>
        <table:table-row table:style-name="ro1">
          <table:table-cell office:value-type="float" office:value="475.575500488281">
            <text:p>475.5755004883</text:p>
          </table:table-cell>
          <table:table-cell office:value-type="float" office:value="0.001381881">
            <text:p>0.001381881</text:p>
          </table:table-cell>
          <table:table-cell table:number-columns-repeated="4"/>
        </table:table-row>
        <table:table-row table:style-name="ro1">
          <table:table-cell office:value-type="float" office:value="475.690856933594">
            <text:p>475.6908569336</text:p>
          </table:table-cell>
          <table:table-cell office:value-type="float" office:value="-0.0123324">
            <text:p>-0.0123324</text:p>
          </table:table-cell>
          <table:table-cell table:number-columns-repeated="4"/>
        </table:table-row>
        <table:table-row table:style-name="ro1">
          <table:table-cell office:value-type="float" office:value="475.806213378906">
            <text:p>475.8062133789</text:p>
          </table:table-cell>
          <table:table-cell office:value-type="float" office:value="-0.01203565">
            <text:p>-0.01203565</text:p>
          </table:table-cell>
          <table:table-cell table:number-columns-repeated="4"/>
        </table:table-row>
        <table:table-row table:style-name="ro1">
          <table:table-cell office:value-type="float" office:value="475.921569824219">
            <text:p>475.9215698242</text:p>
          </table:table-cell>
          <table:table-cell office:value-type="float" office:value="0.0002232093">
            <text:p>0.0002232093</text:p>
          </table:table-cell>
          <table:table-cell table:number-columns-repeated="4"/>
        </table:table-row>
        <table:table-row table:style-name="ro1">
          <table:table-cell office:value-type="float" office:value="476.036956787109">
            <text:p>476.0369567871</text:p>
          </table:table-cell>
          <table:table-cell office:value-type="float" office:value="0.007223069">
            <text:p>0.007223069</text:p>
          </table:table-cell>
          <table:table-cell table:number-columns-repeated="4"/>
        </table:table-row>
        <table:table-row table:style-name="ro1">
          <table:table-cell office:value-type="float" office:value="476.152313232422">
            <text:p>476.1523132324</text:p>
          </table:table-cell>
          <table:table-cell office:value-type="float" office:value="0.007234741">
            <text:p>0.007234741</text:p>
          </table:table-cell>
          <table:table-cell table:number-columns-repeated="4"/>
        </table:table-row>
        <table:table-row table:style-name="ro1">
          <table:table-cell office:value-type="float" office:value="476.267700195313">
            <text:p>476.2677001953</text:p>
          </table:table-cell>
          <table:table-cell office:value-type="float" office:value="-0.01314805">
            <text:p>-0.01314805</text:p>
          </table:table-cell>
          <table:table-cell table:number-columns-repeated="4"/>
        </table:table-row>
        <table:table-row table:style-name="ro1">
          <table:table-cell office:value-type="float" office:value="476.383087158203">
            <text:p>476.3830871582</text:p>
          </table:table-cell>
          <table:table-cell office:value-type="float" office:value="0.01431323">
            <text:p>0.01431323</text:p>
          </table:table-cell>
          <table:table-cell table:number-columns-repeated="4"/>
        </table:table-row>
        <table:table-row table:style-name="ro1">
          <table:table-cell office:value-type="float" office:value="476.498474121094">
            <text:p>476.4984741211</text:p>
          </table:table-cell>
          <table:table-cell office:value-type="float" office:value="-0.000537637">
            <text:p>-0.000537637</text:p>
          </table:table-cell>
          <table:table-cell table:number-columns-repeated="4"/>
        </table:table-row>
        <table:table-row table:style-name="ro1">
          <table:table-cell office:value-type="float" office:value="476.613861083984">
            <text:p>476.613861084</text:p>
          </table:table-cell>
          <table:table-cell office:value-type="float" office:value="-0.009310451">
            <text:p>-0.009310451</text:p>
          </table:table-cell>
          <table:table-cell table:number-columns-repeated="4"/>
        </table:table-row>
        <table:table-row table:style-name="ro1">
          <table:table-cell office:value-type="float" office:value="476.729248046875">
            <text:p>476.7292480469</text:p>
          </table:table-cell>
          <table:table-cell office:value-type="float" office:value="-0.007110803">
            <text:p>-0.007110803</text:p>
          </table:table-cell>
          <table:table-cell table:number-columns-repeated="4"/>
        </table:table-row>
        <table:table-row table:style-name="ro1">
          <table:table-cell office:value-type="float" office:value="476.844665527344">
            <text:p>476.8446655273</text:p>
          </table:table-cell>
          <table:table-cell office:value-type="float" office:value="0.01630335">
            <text:p>0.01630335</text:p>
          </table:table-cell>
          <table:table-cell table:number-columns-repeated="4"/>
        </table:table-row>
        <table:table-row table:style-name="ro1">
          <table:table-cell office:value-type="float" office:value="476.960052490234">
            <text:p>476.9600524902</text:p>
          </table:table-cell>
          <table:table-cell office:value-type="float" office:value="0.0001425237">
            <text:p>0.0001425237</text:p>
          </table:table-cell>
          <table:table-cell table:number-columns-repeated="4"/>
        </table:table-row>
        <table:table-row table:style-name="ro1">
          <table:table-cell office:value-type="float" office:value="477.075469970703">
            <text:p>477.0754699707</text:p>
          </table:table-cell>
          <table:table-cell office:value-type="float" office:value="-0.01398738">
            <text:p>-0.01398738</text:p>
          </table:table-cell>
          <table:table-cell table:number-columns-repeated="4"/>
        </table:table-row>
        <table:table-row table:style-name="ro1">
          <table:table-cell office:value-type="float" office:value="477.190887451172">
            <text:p>477.1908874512</text:p>
          </table:table-cell>
          <table:table-cell office:value-type="float" office:value="-0.008839277">
            <text:p>-0.008839277</text:p>
          </table:table-cell>
          <table:table-cell table:number-columns-repeated="4"/>
        </table:table-row>
        <table:table-row table:style-name="ro1">
          <table:table-cell office:value-type="float" office:value="477.306304931641">
            <text:p>477.3063049316</text:p>
          </table:table-cell>
          <table:table-cell office:value-type="float" office:value="0.01554193">
            <text:p>0.01554193</text:p>
          </table:table-cell>
          <table:table-cell table:number-columns-repeated="4"/>
        </table:table-row>
        <table:table-row table:style-name="ro1">
          <table:table-cell office:value-type="float" office:value="477.421722412109">
            <text:p>477.4217224121</text:p>
          </table:table-cell>
          <table:table-cell office:value-type="float" office:value="-0.01014441">
            <text:p>-0.01014441</text:p>
          </table:table-cell>
          <table:table-cell table:number-columns-repeated="4"/>
        </table:table-row>
        <table:table-row table:style-name="ro1">
          <table:table-cell office:value-type="float" office:value="477.537139892578">
            <text:p>477.5371398926</text:p>
          </table:table-cell>
          <table:table-cell office:value-type="float" office:value="-0.005522491">
            <text:p>-0.005522491</text:p>
          </table:table-cell>
          <table:table-cell table:number-columns-repeated="4"/>
        </table:table-row>
        <table:table-row table:style-name="ro1">
          <table:table-cell office:value-type="float" office:value="477.652557373047">
            <text:p>477.652557373</text:p>
          </table:table-cell>
          <table:table-cell office:value-type="float" office:value="-0.0145372">
            <text:p>-0.0145372</text:p>
          </table:table-cell>
          <table:table-cell table:number-columns-repeated="4"/>
        </table:table-row>
        <table:table-row table:style-name="ro1">
          <table:table-cell office:value-type="float" office:value="477.768005371094">
            <text:p>477.7680053711</text:p>
          </table:table-cell>
          <table:table-cell office:value-type="float" office:value="-0.007305073">
            <text:p>-0.007305073</text:p>
          </table:table-cell>
          <table:table-cell table:number-columns-repeated="4"/>
        </table:table-row>
        <table:table-row table:style-name="ro1">
          <table:table-cell office:value-type="float" office:value="477.883422851563">
            <text:p>477.8834228516</text:p>
          </table:table-cell>
          <table:table-cell office:value-type="float" office:value="0.01098556">
            <text:p>0.01098556</text:p>
          </table:table-cell>
          <table:table-cell table:number-columns-repeated="4"/>
        </table:table-row>
        <table:table-row table:style-name="ro1">
          <table:table-cell office:value-type="float" office:value="477.998870849609">
            <text:p>477.9988708496</text:p>
          </table:table-cell>
          <table:table-cell office:value-type="float" office:value="-0.014832">
            <text:p>-0.014832</text:p>
          </table:table-cell>
          <table:table-cell table:number-columns-repeated="4"/>
        </table:table-row>
        <table:table-row table:style-name="ro1">
          <table:table-cell office:value-type="float" office:value="478.114318847656">
            <text:p>478.1143188477</text:p>
          </table:table-cell>
          <table:table-cell office:value-type="float" office:value="-0.006005903">
            <text:p>-0.006005903</text:p>
          </table:table-cell>
          <table:table-cell table:number-columns-repeated="4"/>
        </table:table-row>
        <table:table-row table:style-name="ro1">
          <table:table-cell office:value-type="float" office:value="478.229766845703">
            <text:p>478.2297668457</text:p>
          </table:table-cell>
          <table:table-cell office:value-type="float" office:value="0.002605302">
            <text:p>0.002605302</text:p>
          </table:table-cell>
          <table:table-cell table:number-columns-repeated="4"/>
        </table:table-row>
        <table:table-row table:style-name="ro1">
          <table:table-cell office:value-type="float" office:value="478.345245361328">
            <text:p>478.3452453613</text:p>
          </table:table-cell>
          <table:table-cell office:value-type="float" office:value="-0.0004573523">
            <text:p>-0.0004573523</text:p>
          </table:table-cell>
          <table:table-cell table:number-columns-repeated="4"/>
        </table:table-row>
        <table:table-row table:style-name="ro1">
          <table:table-cell office:value-type="float" office:value="478.460693359375">
            <text:p>478.4606933594</text:p>
          </table:table-cell>
          <table:table-cell office:value-type="float" office:value="-0.0125866">
            <text:p>-0.0125866</text:p>
          </table:table-cell>
          <table:table-cell table:number-columns-repeated="4"/>
        </table:table-row>
        <table:table-row table:style-name="ro1">
          <table:table-cell office:value-type="float" office:value="478.576141357422">
            <text:p>478.5761413574</text:p>
          </table:table-cell>
          <table:table-cell office:value-type="float" office:value="-0.007227086">
            <text:p>-0.007227086</text:p>
          </table:table-cell>
          <table:table-cell table:number-columns-repeated="4"/>
        </table:table-row>
        <table:table-row table:style-name="ro1">
          <table:table-cell office:value-type="float" office:value="478.691619873047">
            <text:p>478.691619873</text:p>
          </table:table-cell>
          <table:table-cell office:value-type="float" office:value="0.01191122">
            <text:p>0.01191122</text:p>
          </table:table-cell>
          <table:table-cell table:number-columns-repeated="4"/>
        </table:table-row>
        <table:table-row table:style-name="ro1">
          <table:table-cell office:value-type="float" office:value="478.807098388672">
            <text:p>478.8070983887</text:p>
          </table:table-cell>
          <table:table-cell office:value-type="float" office:value="-0.003663219">
            <text:p>-0.003663219</text:p>
          </table:table-cell>
          <table:table-cell table:number-columns-repeated="4"/>
        </table:table-row>
        <table:table-row table:style-name="ro1">
          <table:table-cell office:value-type="float" office:value="478.922576904297">
            <text:p>478.9225769043</text:p>
          </table:table-cell>
          <table:table-cell office:value-type="float" office:value="-0.004471757">
            <text:p>-0.004471757</text:p>
          </table:table-cell>
          <table:table-cell table:number-columns-repeated="4"/>
        </table:table-row>
        <table:table-row table:style-name="ro1">
          <table:table-cell office:value-type="float" office:value="479.038055419922">
            <text:p>479.0380554199</text:p>
          </table:table-cell>
          <table:table-cell office:value-type="float" office:value="-0.01351732">
            <text:p>-0.01351732</text:p>
          </table:table-cell>
          <table:table-cell table:number-columns-repeated="4"/>
        </table:table-row>
        <table:table-row table:style-name="ro1">
          <table:table-cell office:value-type="float" office:value="479.153533935547">
            <text:p>479.1535339355</text:p>
          </table:table-cell>
          <table:table-cell office:value-type="float" office:value="-0.003368617">
            <text:p>-0.003368617</text:p>
          </table:table-cell>
          <table:table-cell table:number-columns-repeated="4"/>
        </table:table-row>
        <table:table-row table:style-name="ro1">
          <table:table-cell office:value-type="float" office:value="479.269012451172">
            <text:p>479.2690124512</text:p>
          </table:table-cell>
          <table:table-cell office:value-type="float" office:value="0.02043848">
            <text:p>0.02043848</text:p>
          </table:table-cell>
          <table:table-cell table:number-columns-repeated="4"/>
        </table:table-row>
        <table:table-row table:style-name="ro1">
          <table:table-cell office:value-type="float" office:value="479.384521484375">
            <text:p>479.3845214844</text:p>
          </table:table-cell>
          <table:table-cell office:value-type="float" office:value="-0.01019852">
            <text:p>-0.01019852</text:p>
          </table:table-cell>
          <table:table-cell table:number-columns-repeated="4"/>
        </table:table-row>
        <table:table-row table:style-name="ro1">
          <table:table-cell office:value-type="float" office:value="479.500030517578">
            <text:p>479.5000305176</text:p>
          </table:table-cell>
          <table:table-cell office:value-type="float" office:value="-0.007718422">
            <text:p>-0.007718422</text:p>
          </table:table-cell>
          <table:table-cell table:number-columns-repeated="4"/>
        </table:table-row>
        <table:table-row table:style-name="ro1">
          <table:table-cell office:value-type="float" office:value="479.615509033203">
            <text:p>479.6155090332</text:p>
          </table:table-cell>
          <table:table-cell office:value-type="float" office:value="0.0007460095">
            <text:p>0.0007460095</text:p>
          </table:table-cell>
          <table:table-cell table:number-columns-repeated="4"/>
        </table:table-row>
        <table:table-row table:style-name="ro1">
          <table:table-cell office:value-type="float" office:value="479.731018066406">
            <text:p>479.7310180664</text:p>
          </table:table-cell>
          <table:table-cell office:value-type="string">
            <text:p>7.176515E-05</text:p>
          </table:table-cell>
          <table:table-cell table:number-columns-repeated="4"/>
        </table:table-row>
        <table:table-row table:style-name="ro1">
          <table:table-cell office:value-type="float" office:value="479.846527099609">
            <text:p>479.8465270996</text:p>
          </table:table-cell>
          <table:table-cell office:value-type="float" office:value="-0.006968995">
            <text:p>-0.006968995</text:p>
          </table:table-cell>
          <table:table-cell table:number-columns-repeated="4"/>
        </table:table-row>
        <table:table-row table:style-name="ro1">
          <table:table-cell office:value-type="float" office:value="479.962066650391">
            <text:p>479.9620666504</text:p>
          </table:table-cell>
          <table:table-cell office:value-type="float" office:value="-0.003914508">
            <text:p>-0.003914508</text:p>
          </table:table-cell>
          <table:table-cell table:number-columns-repeated="4"/>
        </table:table-row>
        <table:table-row table:style-name="ro1">
          <table:table-cell office:value-type="float" office:value="480.077575683594">
            <text:p>480.0775756836</text:p>
          </table:table-cell>
          <table:table-cell office:value-type="float" office:value="0.002132366">
            <text:p>0.002132366</text:p>
          </table:table-cell>
          <table:table-cell table:number-columns-repeated="4"/>
        </table:table-row>
        <table:table-row table:style-name="ro1">
          <table:table-cell office:value-type="float" office:value="480.193084716797">
            <text:p>480.1930847168</text:p>
          </table:table-cell>
          <table:table-cell office:value-type="float" office:value="0.01409133">
            <text:p>0.01409133</text:p>
          </table:table-cell>
          <table:table-cell table:number-columns-repeated="4"/>
        </table:table-row>
        <table:table-row table:style-name="ro1">
          <table:table-cell office:value-type="float" office:value="480.308624267578">
            <text:p>480.3086242676</text:p>
          </table:table-cell>
          <table:table-cell office:value-type="float" office:value="-0.005874654">
            <text:p>-0.005874654</text:p>
          </table:table-cell>
          <table:table-cell table:number-columns-repeated="4"/>
        </table:table-row>
        <table:table-row table:style-name="ro1">
          <table:table-cell office:value-type="float" office:value="480.424163818359">
            <text:p>480.4241638184</text:p>
          </table:table-cell>
          <table:table-cell office:value-type="float" office:value="-0.005418096">
            <text:p>-0.005418096</text:p>
          </table:table-cell>
          <table:table-cell table:number-columns-repeated="4"/>
        </table:table-row>
        <table:table-row table:style-name="ro1">
          <table:table-cell office:value-type="float" office:value="480.539703369141">
            <text:p>480.5397033691</text:p>
          </table:table-cell>
          <table:table-cell office:value-type="float" office:value="0.00687116">
            <text:p>0.00687116</text:p>
          </table:table-cell>
          <table:table-cell table:number-columns-repeated="4"/>
        </table:table-row>
        <table:table-row table:style-name="ro1">
          <table:table-cell office:value-type="float" office:value="480.655242919922">
            <text:p>480.6552429199</text:p>
          </table:table-cell>
          <table:table-cell office:value-type="float" office:value="-0.005298869">
            <text:p>-0.005298869</text:p>
          </table:table-cell>
          <table:table-cell table:number-columns-repeated="4"/>
        </table:table-row>
        <table:table-row table:style-name="ro1">
          <table:table-cell office:value-type="float" office:value="480.770782470703">
            <text:p>480.7707824707</text:p>
          </table:table-cell>
          <table:table-cell office:value-type="float" office:value="-0.01068609">
            <text:p>-0.01068609</text:p>
          </table:table-cell>
          <table:table-cell table:number-columns-repeated="4"/>
        </table:table-row>
        <table:table-row table:style-name="ro1">
          <table:table-cell office:value-type="float" office:value="480.886322021484">
            <text:p>480.8863220215</text:p>
          </table:table-cell>
          <table:table-cell office:value-type="float" office:value="-0.006939617">
            <text:p>-0.006939617</text:p>
          </table:table-cell>
          <table:table-cell table:number-columns-repeated="4"/>
        </table:table-row>
        <table:table-row table:style-name="ro1">
          <table:table-cell office:value-type="float" office:value="481.001892089844">
            <text:p>481.0018920898</text:p>
          </table:table-cell>
          <table:table-cell office:value-type="string">
            <text:p>-1.790728E-05</text:p>
          </table:table-cell>
          <table:table-cell table:number-columns-repeated="4"/>
        </table:table-row>
        <table:table-row table:style-name="ro1">
          <table:table-cell office:value-type="float" office:value="481.117431640625">
            <text:p>481.1174316406</text:p>
          </table:table-cell>
          <table:table-cell office:value-type="float" office:value="0.002355871">
            <text:p>0.002355871</text:p>
          </table:table-cell>
          <table:table-cell table:number-columns-repeated="4"/>
        </table:table-row>
        <table:table-row table:style-name="ro1">
          <table:table-cell office:value-type="float" office:value="481.233001708984">
            <text:p>481.233001709</text:p>
          </table:table-cell>
          <table:table-cell office:value-type="float" office:value="0.003308662">
            <text:p>0.003308662</text:p>
          </table:table-cell>
          <table:table-cell table:number-columns-repeated="4"/>
        </table:table-row>
        <table:table-row table:style-name="ro1">
          <table:table-cell office:value-type="float" office:value="481.348571777344">
            <text:p>481.3485717773</text:p>
          </table:table-cell>
          <table:table-cell office:value-type="float" office:value="-0.01233161">
            <text:p>-0.01233161</text:p>
          </table:table-cell>
          <table:table-cell table:number-columns-repeated="4"/>
        </table:table-row>
        <table:table-row table:style-name="ro1">
          <table:table-cell office:value-type="float" office:value="481.464141845703">
            <text:p>481.4641418457</text:p>
          </table:table-cell>
          <table:table-cell office:value-type="float" office:value="-0.006598832">
            <text:p>-0.006598832</text:p>
          </table:table-cell>
          <table:table-cell table:number-columns-repeated="4"/>
        </table:table-row>
        <table:table-row table:style-name="ro1">
          <table:table-cell office:value-type="float" office:value="481.579711914063">
            <text:p>481.5797119141</text:p>
          </table:table-cell>
          <table:table-cell office:value-type="float" office:value="0.002431951">
            <text:p>0.002431951</text:p>
          </table:table-cell>
          <table:table-cell table:number-columns-repeated="4"/>
        </table:table-row>
        <table:table-row table:style-name="ro1">
          <table:table-cell office:value-type="float" office:value="481.695281982422">
            <text:p>481.6952819824</text:p>
          </table:table-cell>
          <table:table-cell office:value-type="float" office:value="-0.01214845">
            <text:p>-0.01214845</text:p>
          </table:table-cell>
          <table:table-cell table:number-columns-repeated="4"/>
        </table:table-row>
        <table:table-row table:style-name="ro1">
          <table:table-cell office:value-type="float" office:value="481.810882568359">
            <text:p>481.8108825684</text:p>
          </table:table-cell>
          <table:table-cell office:value-type="float" office:value="-0.006336372">
            <text:p>-0.006336372</text:p>
          </table:table-cell>
          <table:table-cell table:number-columns-repeated="4"/>
        </table:table-row>
        <table:table-row table:style-name="ro1">
          <table:table-cell office:value-type="float" office:value="481.926452636719">
            <text:p>481.9264526367</text:p>
          </table:table-cell>
          <table:table-cell office:value-type="float" office:value="-0.004824763">
            <text:p>-0.004824763</text:p>
          </table:table-cell>
          <table:table-cell table:number-columns-repeated="4"/>
        </table:table-row>
        <table:table-row table:style-name="ro1">
          <table:table-cell office:value-type="float" office:value="482.042053222656">
            <text:p>482.0420532227</text:p>
          </table:table-cell>
          <table:table-cell office:value-type="float" office:value="0.01541635">
            <text:p>0.01541635</text:p>
          </table:table-cell>
          <table:table-cell table:number-columns-repeated="4"/>
        </table:table-row>
        <table:table-row table:style-name="ro1">
          <table:table-cell office:value-type="float" office:value="482.157653808594">
            <text:p>482.1576538086</text:p>
          </table:table-cell>
          <table:table-cell office:value-type="float" office:value="-0.009674442">
            <text:p>-0.009674442</text:p>
          </table:table-cell>
          <table:table-cell table:number-columns-repeated="4"/>
        </table:table-row>
        <table:table-row table:style-name="ro1">
          <table:table-cell office:value-type="float" office:value="482.273254394531">
            <text:p>482.2732543945</text:p>
          </table:table-cell>
          <table:table-cell office:value-type="float" office:value="-0.003631017">
            <text:p>-0.003631017</text:p>
          </table:table-cell>
          <table:table-cell table:number-columns-repeated="4"/>
        </table:table-row>
        <table:table-row table:style-name="ro1">
          <table:table-cell office:value-type="float" office:value="482.388854980469">
            <text:p>482.3888549805</text:p>
          </table:table-cell>
          <table:table-cell office:value-type="float" office:value="0.01181422">
            <text:p>0.01181422</text:p>
          </table:table-cell>
          <table:table-cell table:number-columns-repeated="4"/>
        </table:table-row>
        <table:table-row table:style-name="ro1">
          <table:table-cell office:value-type="float" office:value="482.504455566406">
            <text:p>482.5044555664</text:p>
          </table:table-cell>
          <table:table-cell office:value-type="float" office:value="0.0171579">
            <text:p>0.0171579</text:p>
          </table:table-cell>
          <table:table-cell table:number-columns-repeated="4"/>
        </table:table-row>
        <table:table-row table:style-name="ro1">
          <table:table-cell office:value-type="float" office:value="482.620086669922">
            <text:p>482.6200866699</text:p>
          </table:table-cell>
          <table:table-cell office:value-type="float" office:value="-0.007913311">
            <text:p>-0.007913311</text:p>
          </table:table-cell>
          <table:table-cell table:number-columns-repeated="4"/>
        </table:table-row>
        <table:table-row table:style-name="ro1">
          <table:table-cell office:value-type="float" office:value="482.735687255859">
            <text:p>482.7356872559</text:p>
          </table:table-cell>
          <table:table-cell office:value-type="float" office:value="0.003150596">
            <text:p>0.003150596</text:p>
          </table:table-cell>
          <table:table-cell table:number-columns-repeated="4"/>
        </table:table-row>
        <table:table-row table:style-name="ro1">
          <table:table-cell office:value-type="float" office:value="482.851318359375">
            <text:p>482.8513183594</text:p>
          </table:table-cell>
          <table:table-cell office:value-type="float" office:value="-0.006757909">
            <text:p>-0.006757909</text:p>
          </table:table-cell>
          <table:table-cell table:number-columns-repeated="4"/>
        </table:table-row>
        <table:table-row table:style-name="ro1">
          <table:table-cell office:value-type="float" office:value="482.966949462891">
            <text:p>482.9669494629</text:p>
          </table:table-cell>
          <table:table-cell office:value-type="float" office:value="0.008345108">
            <text:p>0.008345108</text:p>
          </table:table-cell>
          <table:table-cell table:number-columns-repeated="4"/>
        </table:table-row>
        <table:table-row table:style-name="ro1">
          <table:table-cell office:value-type="float" office:value="483.082580566406">
            <text:p>483.0825805664</text:p>
          </table:table-cell>
          <table:table-cell office:value-type="float" office:value="-0.01677114">
            <text:p>-0.01677114</text:p>
          </table:table-cell>
          <table:table-cell table:number-columns-repeated="4"/>
        </table:table-row>
        <table:table-row table:style-name="ro1">
          <table:table-cell office:value-type="float" office:value="483.198211669922">
            <text:p>483.1982116699</text:p>
          </table:table-cell>
          <table:table-cell office:value-type="float" office:value="-0.0003063315">
            <text:p>-0.0003063315</text:p>
          </table:table-cell>
          <table:table-cell table:number-columns-repeated="4"/>
        </table:table-row>
        <table:table-row table:style-name="ro1">
          <table:table-cell office:value-type="float" office:value="483.313842773438">
            <text:p>483.3138427734</text:p>
          </table:table-cell>
          <table:table-cell office:value-type="float" office:value="0.0035762">
            <text:p>0.0035762</text:p>
          </table:table-cell>
          <table:table-cell table:number-columns-repeated="4"/>
        </table:table-row>
        <table:table-row table:style-name="ro1">
          <table:table-cell office:value-type="float" office:value="483.429473876953">
            <text:p>483.429473877</text:p>
          </table:table-cell>
          <table:table-cell office:value-type="float" office:value="0.008823774">
            <text:p>0.008823774</text:p>
          </table:table-cell>
          <table:table-cell table:number-columns-repeated="4"/>
        </table:table-row>
        <table:table-row table:style-name="ro1">
          <table:table-cell office:value-type="float" office:value="483.545135498047">
            <text:p>483.545135498</text:p>
          </table:table-cell>
          <table:table-cell office:value-type="float" office:value="-0.002774828">
            <text:p>-0.002774828</text:p>
          </table:table-cell>
          <table:table-cell table:number-columns-repeated="4"/>
        </table:table-row>
        <table:table-row table:style-name="ro1">
          <table:table-cell office:value-type="float" office:value="483.660797119141">
            <text:p>483.6607971191</text:p>
          </table:table-cell>
          <table:table-cell office:value-type="float" office:value="-0.01007504">
            <text:p>-0.01007504</text:p>
          </table:table-cell>
          <table:table-cell table:number-columns-repeated="4"/>
        </table:table-row>
        <table:table-row table:style-name="ro1">
          <table:table-cell office:value-type="float" office:value="483.776428222656">
            <text:p>483.7764282227</text:p>
          </table:table-cell>
          <table:table-cell office:value-type="float" office:value="0.0003553198">
            <text:p>0.0003553198</text:p>
          </table:table-cell>
          <table:table-cell table:number-columns-repeated="4"/>
        </table:table-row>
        <table:table-row table:style-name="ro1">
          <table:table-cell office:value-type="float" office:value="483.89208984375">
            <text:p>483.8920898438</text:p>
          </table:table-cell>
          <table:table-cell office:value-type="float" office:value="0.01663383">
            <text:p>0.01663383</text:p>
          </table:table-cell>
          <table:table-cell table:number-columns-repeated="4"/>
        </table:table-row>
        <table:table-row table:style-name="ro1">
          <table:table-cell office:value-type="float" office:value="484.007751464844">
            <text:p>484.0077514648</text:p>
          </table:table-cell>
          <table:table-cell office:value-type="float" office:value="-0.01300651">
            <text:p>-0.01300651</text:p>
          </table:table-cell>
          <table:table-cell table:number-columns-repeated="4"/>
        </table:table-row>
        <table:table-row table:style-name="ro1">
          <table:table-cell office:value-type="float" office:value="484.123413085938">
            <text:p>484.1234130859</text:p>
          </table:table-cell>
          <table:table-cell office:value-type="float" office:value="-0.016959">
            <text:p>-0.016959</text:p>
          </table:table-cell>
          <table:table-cell table:number-columns-repeated="4"/>
        </table:table-row>
        <table:table-row table:style-name="ro1">
          <table:table-cell office:value-type="float" office:value="484.239105224609">
            <text:p>484.2391052246</text:p>
          </table:table-cell>
          <table:table-cell office:value-type="float" office:value="0.00723066">
            <text:p>0.00723066</text:p>
          </table:table-cell>
          <table:table-cell table:number-columns-repeated="4"/>
        </table:table-row>
        <table:table-row table:style-name="ro1">
          <table:table-cell office:value-type="float" office:value="484.354766845703">
            <text:p>484.3547668457</text:p>
          </table:table-cell>
          <table:table-cell office:value-type="float" office:value="-0.001662057">
            <text:p>-0.001662057</text:p>
          </table:table-cell>
          <table:table-cell table:number-columns-repeated="4"/>
        </table:table-row>
        <table:table-row table:style-name="ro1">
          <table:table-cell office:value-type="float" office:value="484.470458984375">
            <text:p>484.4704589844</text:p>
          </table:table-cell>
          <table:table-cell office:value-type="float" office:value="-0.003240514">
            <text:p>-0.003240514</text:p>
          </table:table-cell>
          <table:table-cell table:number-columns-repeated="4"/>
        </table:table-row>
        <table:table-row table:style-name="ro1">
          <table:table-cell office:value-type="float" office:value="484.586151123047">
            <text:p>484.586151123</text:p>
          </table:table-cell>
          <table:table-cell office:value-type="float" office:value="-0.01160383">
            <text:p>-0.01160383</text:p>
          </table:table-cell>
          <table:table-cell table:number-columns-repeated="4"/>
        </table:table-row>
        <table:table-row table:style-name="ro1">
          <table:table-cell office:value-type="float" office:value="484.701843261719">
            <text:p>484.7018432617</text:p>
          </table:table-cell>
          <table:table-cell office:value-type="float" office:value="-0.003168136">
            <text:p>-0.003168136</text:p>
          </table:table-cell>
          <table:table-cell table:number-columns-repeated="4"/>
        </table:table-row>
        <table:table-row table:style-name="ro1">
          <table:table-cell office:value-type="float" office:value="484.817535400391">
            <text:p>484.8175354004</text:p>
          </table:table-cell>
          <table:table-cell office:value-type="float" office:value="0.002727364">
            <text:p>0.002727364</text:p>
          </table:table-cell>
          <table:table-cell table:number-columns-repeated="4"/>
        </table:table-row>
        <table:table-row table:style-name="ro1">
          <table:table-cell office:value-type="float" office:value="484.933227539063">
            <text:p>484.9332275391</text:p>
          </table:table-cell>
          <table:table-cell office:value-type="float" office:value="-0.01444776">
            <text:p>-0.01444776</text:p>
          </table:table-cell>
          <table:table-cell table:number-columns-repeated="4"/>
        </table:table-row>
        <table:table-row table:style-name="ro1">
          <table:table-cell office:value-type="float" office:value="485.048919677734">
            <text:p>485.0489196777</text:p>
          </table:table-cell>
          <table:table-cell office:value-type="float" office:value="-0.005723515">
            <text:p>-0.005723515</text:p>
          </table:table-cell>
          <table:table-cell table:number-columns-repeated="4"/>
        </table:table-row>
        <table:table-row table:style-name="ro1">
          <table:table-cell office:value-type="float" office:value="485.164642333984">
            <text:p>485.164642334</text:p>
          </table:table-cell>
          <table:table-cell office:value-type="float" office:value="0.01245886">
            <text:p>0.01245886</text:p>
          </table:table-cell>
          <table:table-cell table:number-columns-repeated="4"/>
        </table:table-row>
        <table:table-row table:style-name="ro1">
          <table:table-cell office:value-type="float" office:value="485.280334472656">
            <text:p>485.2803344727</text:p>
          </table:table-cell>
          <table:table-cell office:value-type="float" office:value="0.0005198076">
            <text:p>0.0005198076</text:p>
          </table:table-cell>
          <table:table-cell table:number-columns-repeated="4"/>
        </table:table-row>
        <table:table-row table:style-name="ro1">
          <table:table-cell office:value-type="float" office:value="485.396057128906">
            <text:p>485.3960571289</text:p>
          </table:table-cell>
          <table:table-cell office:value-type="float" office:value="0.007012591">
            <text:p>0.007012591</text:p>
          </table:table-cell>
          <table:table-cell table:number-columns-repeated="4"/>
        </table:table-row>
        <table:table-row table:style-name="ro1">
          <table:table-cell office:value-type="float" office:value="485.511779785156">
            <text:p>485.5117797852</text:p>
          </table:table-cell>
          <table:table-cell office:value-type="float" office:value="-0.009220621">
            <text:p>-0.009220621</text:p>
          </table:table-cell>
          <table:table-cell table:number-columns-repeated="4"/>
        </table:table-row>
        <table:table-row table:style-name="ro1">
          <table:table-cell office:value-type="float" office:value="485.627502441406">
            <text:p>485.6275024414</text:p>
          </table:table-cell>
          <table:table-cell office:value-type="float" office:value="-0.00248566">
            <text:p>-0.00248566</text:p>
          </table:table-cell>
          <table:table-cell table:number-columns-repeated="4"/>
        </table:table-row>
        <table:table-row table:style-name="ro1">
          <table:table-cell office:value-type="float" office:value="485.743225097656">
            <text:p>485.7432250977</text:p>
          </table:table-cell>
          <table:table-cell office:value-type="float" office:value="0.02403817">
            <text:p>0.02403817</text:p>
          </table:table-cell>
          <table:table-cell table:number-columns-repeated="4"/>
        </table:table-row>
        <table:table-row table:style-name="ro1">
          <table:table-cell office:value-type="float" office:value="485.858947753906">
            <text:p>485.8589477539</text:p>
          </table:table-cell>
          <table:table-cell office:value-type="float" office:value="-0.01406838">
            <text:p>-0.01406838</text:p>
          </table:table-cell>
          <table:table-cell table:number-columns-repeated="4"/>
        </table:table-row>
        <table:table-row table:style-name="ro1">
          <table:table-cell office:value-type="float" office:value="485.974670410156">
            <text:p>485.9746704102</text:p>
          </table:table-cell>
          <table:table-cell office:value-type="float" office:value="-0.01017505">
            <text:p>-0.01017505</text:p>
          </table:table-cell>
          <table:table-cell table:number-columns-repeated="4"/>
        </table:table-row>
        <table:table-row table:style-name="ro1">
          <table:table-cell office:value-type="float" office:value="486.090423583984">
            <text:p>486.090423584</text:p>
          </table:table-cell>
          <table:table-cell office:value-type="float" office:value="0.02154953">
            <text:p>0.02154953</text:p>
          </table:table-cell>
          <table:table-cell table:number-columns-repeated="4"/>
        </table:table-row>
        <table:table-row table:style-name="ro1">
          <table:table-cell office:value-type="float" office:value="486.206176757813">
            <text:p>486.2061767578</text:p>
          </table:table-cell>
          <table:table-cell office:value-type="float" office:value="-0.0003237892">
            <text:p>-0.0003237892</text:p>
          </table:table-cell>
          <table:table-cell table:number-columns-repeated="4"/>
        </table:table-row>
        <table:table-row table:style-name="ro1">
          <table:table-cell office:value-type="float" office:value="486.321899414063">
            <text:p>486.3218994141</text:p>
          </table:table-cell>
          <table:table-cell office:value-type="float" office:value="-0.003180381">
            <text:p>-0.003180381</text:p>
          </table:table-cell>
          <table:table-cell table:number-columns-repeated="4"/>
        </table:table-row>
        <table:table-row table:style-name="ro1">
          <table:table-cell office:value-type="float" office:value="486.437652587891">
            <text:p>486.4376525879</text:p>
          </table:table-cell>
          <table:table-cell office:value-type="float" office:value="-0.002841842">
            <text:p>-0.002841842</text:p>
          </table:table-cell>
          <table:table-cell table:number-columns-repeated="4"/>
        </table:table-row>
        <table:table-row table:style-name="ro1">
          <table:table-cell office:value-type="float" office:value="486.553436279297">
            <text:p>486.5534362793</text:p>
          </table:table-cell>
          <table:table-cell office:value-type="float" office:value="0.004914837">
            <text:p>0.004914837</text:p>
          </table:table-cell>
          <table:table-cell table:number-columns-repeated="4"/>
        </table:table-row>
        <table:table-row table:style-name="ro1">
          <table:table-cell office:value-type="float" office:value="486.669189453125">
            <text:p>486.6691894531</text:p>
          </table:table-cell>
          <table:table-cell office:value-type="float" office:value="0.001081741">
            <text:p>0.001081741</text:p>
          </table:table-cell>
          <table:table-cell table:number-columns-repeated="4"/>
        </table:table-row>
        <table:table-row table:style-name="ro1">
          <table:table-cell office:value-type="float" office:value="486.784942626953">
            <text:p>486.784942627</text:p>
          </table:table-cell>
          <table:table-cell office:value-type="float" office:value="0.0009639786">
            <text:p>0.0009639786</text:p>
          </table:table-cell>
          <table:table-cell table:number-columns-repeated="4"/>
        </table:table-row>
        <table:table-row table:style-name="ro1">
          <table:table-cell office:value-type="float" office:value="486.900726318359">
            <text:p>486.9007263184</text:p>
          </table:table-cell>
          <table:table-cell office:value-type="float" office:value="-0.005757764">
            <text:p>-0.005757764</text:p>
          </table:table-cell>
          <table:table-cell table:number-columns-repeated="4"/>
        </table:table-row>
        <table:table-row table:style-name="ro1">
          <table:table-cell office:value-type="float" office:value="487.016479492188">
            <text:p>487.0164794922</text:p>
          </table:table-cell>
          <table:table-cell office:value-type="float" office:value="0.008839148">
            <text:p>0.008839148</text:p>
          </table:table-cell>
          <table:table-cell table:number-columns-repeated="4"/>
        </table:table-row>
        <table:table-row table:style-name="ro1">
          <table:table-cell office:value-type="float" office:value="487.132263183594">
            <text:p>487.1322631836</text:p>
          </table:table-cell>
          <table:table-cell office:value-type="float" office:value="-0.00436921">
            <text:p>-0.00436921</text:p>
          </table:table-cell>
          <table:table-cell table:number-columns-repeated="4"/>
        </table:table-row>
        <table:table-row table:style-name="ro1">
          <table:table-cell office:value-type="float" office:value="487.248046875">
            <text:p>487.248046875</text:p>
          </table:table-cell>
          <table:table-cell office:value-type="float" office:value="0.01132824">
            <text:p>0.01132824</text:p>
          </table:table-cell>
          <table:table-cell table:number-columns-repeated="4"/>
        </table:table-row>
        <table:table-row table:style-name="ro1">
          <table:table-cell office:value-type="float" office:value="487.363830566406">
            <text:p>487.3638305664</text:p>
          </table:table-cell>
          <table:table-cell office:value-type="float" office:value="0.001790806">
            <text:p>0.001790806</text:p>
          </table:table-cell>
          <table:table-cell table:number-columns-repeated="4"/>
        </table:table-row>
        <table:table-row table:style-name="ro1">
          <table:table-cell office:value-type="float" office:value="487.479614257813">
            <text:p>487.4796142578</text:p>
          </table:table-cell>
          <table:table-cell office:value-type="float" office:value="0.006525805">
            <text:p>0.006525805</text:p>
          </table:table-cell>
          <table:table-cell table:number-columns-repeated="4"/>
        </table:table-row>
        <table:table-row table:style-name="ro1">
          <table:table-cell office:value-type="float" office:value="487.595397949219">
            <text:p>487.5953979492</text:p>
          </table:table-cell>
          <table:table-cell office:value-type="float" office:value="0.005453199">
            <text:p>0.005453199</text:p>
          </table:table-cell>
          <table:table-cell table:number-columns-repeated="4"/>
        </table:table-row>
        <table:table-row table:style-name="ro1">
          <table:table-cell office:value-type="float" office:value="487.711212158203">
            <text:p>487.7112121582</text:p>
          </table:table-cell>
          <table:table-cell office:value-type="float" office:value="0.006696247">
            <text:p>0.006696247</text:p>
          </table:table-cell>
          <table:table-cell table:number-columns-repeated="4"/>
        </table:table-row>
        <table:table-row table:style-name="ro1">
          <table:table-cell office:value-type="float" office:value="487.826995849609">
            <text:p>487.8269958496</text:p>
          </table:table-cell>
          <table:table-cell office:value-type="float" office:value="-0.01106904">
            <text:p>-0.01106904</text:p>
          </table:table-cell>
          <table:table-cell table:number-columns-repeated="4"/>
        </table:table-row>
        <table:table-row table:style-name="ro1">
          <table:table-cell office:value-type="float" office:value="487.942810058594">
            <text:p>487.9428100586</text:p>
          </table:table-cell>
          <table:table-cell office:value-type="float" office:value="0.002779583">
            <text:p>0.002779583</text:p>
          </table:table-cell>
          <table:table-cell table:number-columns-repeated="4"/>
        </table:table-row>
        <table:table-row table:style-name="ro1">
          <table:table-cell office:value-type="float" office:value="488.058624267578">
            <text:p>488.0586242676</text:p>
          </table:table-cell>
          <table:table-cell office:value-type="float" office:value="0.01766282">
            <text:p>0.01766282</text:p>
          </table:table-cell>
          <table:table-cell table:number-columns-repeated="4"/>
        </table:table-row>
        <table:table-row table:style-name="ro1">
          <table:table-cell office:value-type="float" office:value="488.174438476563">
            <text:p>488.1744384766</text:p>
          </table:table-cell>
          <table:table-cell office:value-type="float" office:value="-0.005955565">
            <text:p>-0.005955565</text:p>
          </table:table-cell>
          <table:table-cell table:number-columns-repeated="4"/>
        </table:table-row>
        <table:table-row table:style-name="ro1">
          <table:table-cell office:value-type="float" office:value="488.290252685547">
            <text:p>488.2902526855</text:p>
          </table:table-cell>
          <table:table-cell office:value-type="float" office:value="-0.01355785">
            <text:p>-0.01355785</text:p>
          </table:table-cell>
          <table:table-cell table:number-columns-repeated="4"/>
        </table:table-row>
        <table:table-row table:style-name="ro1">
          <table:table-cell office:value-type="float" office:value="488.406066894531">
            <text:p>488.4060668945</text:p>
          </table:table-cell>
          <table:table-cell office:value-type="float" office:value="0.00623505">
            <text:p>0.00623505</text:p>
          </table:table-cell>
          <table:table-cell table:number-columns-repeated="4"/>
        </table:table-row>
        <table:table-row table:style-name="ro1">
          <table:table-cell office:value-type="float" office:value="488.521911621094">
            <text:p>488.5219116211</text:p>
          </table:table-cell>
          <table:table-cell office:value-type="float" office:value="-0.004320828">
            <text:p>-0.004320828</text:p>
          </table:table-cell>
          <table:table-cell table:number-columns-repeated="4"/>
        </table:table-row>
        <table:table-row table:style-name="ro1">
          <table:table-cell office:value-type="float" office:value="488.637725830078">
            <text:p>488.6377258301</text:p>
          </table:table-cell>
          <table:table-cell office:value-type="float" office:value="-0.01348983">
            <text:p>-0.01348983</text:p>
          </table:table-cell>
          <table:table-cell table:number-columns-repeated="4"/>
        </table:table-row>
        <table:table-row table:style-name="ro1">
          <table:table-cell office:value-type="float" office:value="488.753570556641">
            <text:p>488.7535705566</text:p>
          </table:table-cell>
          <table:table-cell office:value-type="float" office:value="-0.01388585">
            <text:p>-0.01388585</text:p>
          </table:table-cell>
          <table:table-cell table:number-columns-repeated="4"/>
        </table:table-row>
        <table:table-row table:style-name="ro1">
          <table:table-cell office:value-type="float" office:value="488.869415283203">
            <text:p>488.8694152832</text:p>
          </table:table-cell>
          <table:table-cell office:value-type="float" office:value="0.006126929">
            <text:p>0.006126929</text:p>
          </table:table-cell>
          <table:table-cell table:number-columns-repeated="4"/>
        </table:table-row>
        <table:table-row table:style-name="ro1">
          <table:table-cell office:value-type="float" office:value="488.985260009766">
            <text:p>488.9852600098</text:p>
          </table:table-cell>
          <table:table-cell office:value-type="float" office:value="-0.004963549">
            <text:p>-0.004963549</text:p>
          </table:table-cell>
          <table:table-cell table:number-columns-repeated="4"/>
        </table:table-row>
        <table:table-row table:style-name="ro1">
          <table:table-cell office:value-type="float" office:value="489.101104736328">
            <text:p>489.1011047363</text:p>
          </table:table-cell>
          <table:table-cell office:value-type="float" office:value="-0.001483179">
            <text:p>-0.001483179</text:p>
          </table:table-cell>
          <table:table-cell table:number-columns-repeated="4"/>
        </table:table-row>
        <table:table-row table:style-name="ro1">
          <table:table-cell office:value-type="float" office:value="489.216949462891">
            <text:p>489.2169494629</text:p>
          </table:table-cell>
          <table:table-cell office:value-type="float" office:value="-0.009519309">
            <text:p>-0.009519309</text:p>
          </table:table-cell>
          <table:table-cell table:number-columns-repeated="4"/>
        </table:table-row>
        <table:table-row table:style-name="ro1">
          <table:table-cell office:value-type="float" office:value="489.332794189453">
            <text:p>489.3327941895</text:p>
          </table:table-cell>
          <table:table-cell office:value-type="float" office:value="0.003213414">
            <text:p>0.003213414</text:p>
          </table:table-cell>
          <table:table-cell table:number-columns-repeated="4"/>
        </table:table-row>
        <table:table-row table:style-name="ro1">
          <table:table-cell office:value-type="float" office:value="489.448669433594">
            <text:p>489.4486694336</text:p>
          </table:table-cell>
          <table:table-cell office:value-type="float" office:value="0.003330402">
            <text:p>0.003330402</text:p>
          </table:table-cell>
          <table:table-cell table:number-columns-repeated="4"/>
        </table:table-row>
        <table:table-row table:style-name="ro1">
          <table:table-cell office:value-type="float" office:value="489.564544677734">
            <text:p>489.5645446777</text:p>
          </table:table-cell>
          <table:table-cell office:value-type="float" office:value="-0.01640008">
            <text:p>-0.01640008</text:p>
          </table:table-cell>
          <table:table-cell table:number-columns-repeated="4"/>
        </table:table-row>
        <table:table-row table:style-name="ro1">
          <table:table-cell office:value-type="float" office:value="489.680389404297">
            <text:p>489.6803894043</text:p>
          </table:table-cell>
          <table:table-cell office:value-type="float" office:value="-0.007217969">
            <text:p>-0.007217969</text:p>
          </table:table-cell>
          <table:table-cell table:number-columns-repeated="4"/>
        </table:table-row>
        <table:table-row table:style-name="ro1">
          <table:table-cell office:value-type="float" office:value="489.796264648438">
            <text:p>489.7962646484</text:p>
          </table:table-cell>
          <table:table-cell office:value-type="float" office:value="0.00668554">
            <text:p>0.00668554</text:p>
          </table:table-cell>
          <table:table-cell table:number-columns-repeated="4"/>
        </table:table-row>
        <table:table-row table:style-name="ro1">
          <table:table-cell office:value-type="float" office:value="489.912139892578">
            <text:p>489.9121398926</text:p>
          </table:table-cell>
          <table:table-cell office:value-type="float" office:value="-0.00206706">
            <text:p>-0.00206706</text:p>
          </table:table-cell>
          <table:table-cell table:number-columns-repeated="4"/>
        </table:table-row>
        <table:table-row table:style-name="ro1">
          <table:table-cell office:value-type="float" office:value="490.028015136719">
            <text:p>490.0280151367</text:p>
          </table:table-cell>
          <table:table-cell office:value-type="float" office:value="-0.01288599">
            <text:p>-0.01288599</text:p>
          </table:table-cell>
          <table:table-cell table:number-columns-repeated="4"/>
        </table:table-row>
        <table:table-row table:style-name="ro1">
          <table:table-cell office:value-type="float" office:value="490.143920898438">
            <text:p>490.1439208984</text:p>
          </table:table-cell>
          <table:table-cell office:value-type="float" office:value="0.01238907">
            <text:p>0.01238907</text:p>
          </table:table-cell>
          <table:table-cell table:number-columns-repeated="4"/>
        </table:table-row>
        <table:table-row table:style-name="ro1">
          <table:table-cell office:value-type="float" office:value="490.259796142578">
            <text:p>490.2597961426</text:p>
          </table:table-cell>
          <table:table-cell office:value-type="float" office:value="0.00437485">
            <text:p>0.00437485</text:p>
          </table:table-cell>
          <table:table-cell table:number-columns-repeated="4"/>
        </table:table-row>
        <table:table-row table:style-name="ro1">
          <table:table-cell office:value-type="float" office:value="490.375701904297">
            <text:p>490.3757019043</text:p>
          </table:table-cell>
          <table:table-cell office:value-type="float" office:value="-0.01456029">
            <text:p>-0.01456029</text:p>
          </table:table-cell>
          <table:table-cell table:number-columns-repeated="4"/>
        </table:table-row>
        <table:table-row table:style-name="ro1">
          <table:table-cell office:value-type="float" office:value="490.491577148438">
            <text:p>490.4915771484</text:p>
          </table:table-cell>
          <table:table-cell office:value-type="float" office:value="-0.002152127">
            <text:p>-0.002152127</text:p>
          </table:table-cell>
          <table:table-cell table:number-columns-repeated="4"/>
        </table:table-row>
        <table:table-row table:style-name="ro1">
          <table:table-cell office:value-type="float" office:value="490.607482910156">
            <text:p>490.6074829102</text:p>
          </table:table-cell>
          <table:table-cell office:value-type="float" office:value="-0.006584866">
            <text:p>-0.006584866</text:p>
          </table:table-cell>
          <table:table-cell table:number-columns-repeated="4"/>
        </table:table-row>
        <table:table-row table:style-name="ro1">
          <table:table-cell office:value-type="float" office:value="490.723388671875">
            <text:p>490.7233886719</text:p>
          </table:table-cell>
          <table:table-cell office:value-type="float" office:value="0.008904665">
            <text:p>0.008904665</text:p>
          </table:table-cell>
          <table:table-cell table:number-columns-repeated="4"/>
        </table:table-row>
        <table:table-row table:style-name="ro1">
          <table:table-cell office:value-type="float" office:value="490.839294433594">
            <text:p>490.8392944336</text:p>
          </table:table-cell>
          <table:table-cell office:value-type="float" office:value="-0.0002943049">
            <text:p>-0.0002943049</text:p>
          </table:table-cell>
          <table:table-cell table:number-columns-repeated="4"/>
        </table:table-row>
        <table:table-row table:style-name="ro1">
          <table:table-cell office:value-type="float" office:value="490.955200195313">
            <text:p>490.9552001953</text:p>
          </table:table-cell>
          <table:table-cell office:value-type="float" office:value="-0.00389745">
            <text:p>-0.00389745</text:p>
          </table:table-cell>
          <table:table-cell table:number-columns-repeated="4"/>
        </table:table-row>
        <table:table-row table:style-name="ro1">
          <table:table-cell office:value-type="float" office:value="491.071136474609">
            <text:p>491.0711364746</text:p>
          </table:table-cell>
          <table:table-cell office:value-type="float" office:value="-0.0001633082">
            <text:p>-0.0001633082</text:p>
          </table:table-cell>
          <table:table-cell table:number-columns-repeated="4"/>
        </table:table-row>
        <table:table-row table:style-name="ro1">
          <table:table-cell office:value-type="float" office:value="491.187042236328">
            <text:p>491.1870422363</text:p>
          </table:table-cell>
          <table:table-cell office:value-type="float" office:value="0.01036872">
            <text:p>0.01036872</text:p>
          </table:table-cell>
          <table:table-cell table:number-columns-repeated="4"/>
        </table:table-row>
        <table:table-row table:style-name="ro1">
          <table:table-cell office:value-type="float" office:value="491.302978515625">
            <text:p>491.3029785156</text:p>
          </table:table-cell>
          <table:table-cell office:value-type="float" office:value="-0.004604492">
            <text:p>-0.004604492</text:p>
          </table:table-cell>
          <table:table-cell table:number-columns-repeated="4"/>
        </table:table-row>
        <table:table-row table:style-name="ro1">
          <table:table-cell office:value-type="float" office:value="491.418914794922">
            <text:p>491.4189147949</text:p>
          </table:table-cell>
          <table:table-cell office:value-type="float" office:value="-0.01114542">
            <text:p>-0.01114542</text:p>
          </table:table-cell>
          <table:table-cell table:number-columns-repeated="4"/>
        </table:table-row>
        <table:table-row table:style-name="ro1">
          <table:table-cell office:value-type="float" office:value="491.534851074219">
            <text:p>491.5348510742</text:p>
          </table:table-cell>
          <table:table-cell office:value-type="float" office:value="0.008803161">
            <text:p>0.008803161</text:p>
          </table:table-cell>
          <table:table-cell table:number-columns-repeated="4"/>
        </table:table-row>
        <table:table-row table:style-name="ro1">
          <table:table-cell office:value-type="float" office:value="491.650787353516">
            <text:p>491.6507873535</text:p>
          </table:table-cell>
          <table:table-cell office:value-type="float" office:value="-0.00101338">
            <text:p>-0.00101338</text:p>
          </table:table-cell>
          <table:table-cell table:number-columns-repeated="4"/>
        </table:table-row>
        <table:table-row table:style-name="ro1">
          <table:table-cell office:value-type="float" office:value="491.766723632813">
            <text:p>491.7667236328</text:p>
          </table:table-cell>
          <table:table-cell office:value-type="float" office:value="-0.004696397">
            <text:p>-0.004696397</text:p>
          </table:table-cell>
          <table:table-cell table:number-columns-repeated="4"/>
        </table:table-row>
        <table:table-row table:style-name="ro1">
          <table:table-cell office:value-type="float" office:value="491.882659912109">
            <text:p>491.8826599121</text:p>
          </table:table-cell>
          <table:table-cell office:value-type="float" office:value="-0.01362575">
            <text:p>-0.01362575</text:p>
          </table:table-cell>
          <table:table-cell table:number-columns-repeated="4"/>
        </table:table-row>
        <table:table-row table:style-name="ro1">
          <table:table-cell office:value-type="float" office:value="491.998596191406">
            <text:p>491.9985961914</text:p>
          </table:table-cell>
          <table:table-cell office:value-type="float" office:value="0.002890135">
            <text:p>0.002890135</text:p>
          </table:table-cell>
          <table:table-cell table:number-columns-repeated="4"/>
        </table:table-row>
        <table:table-row table:style-name="ro1">
          <table:table-cell office:value-type="float" office:value="492.114562988281">
            <text:p>492.1145629883</text:p>
          </table:table-cell>
          <table:table-cell office:value-type="float" office:value="0.002816279">
            <text:p>0.002816279</text:p>
          </table:table-cell>
          <table:table-cell table:number-columns-repeated="4"/>
        </table:table-row>
        <table:table-row table:style-name="ro1">
          <table:table-cell office:value-type="float" office:value="492.230529785156">
            <text:p>492.2305297852</text:p>
          </table:table-cell>
          <table:table-cell office:value-type="float" office:value="-0.013854">
            <text:p>-0.013854</text:p>
          </table:table-cell>
          <table:table-cell table:number-columns-repeated="4"/>
        </table:table-row>
        <table:table-row table:style-name="ro1">
          <table:table-cell office:value-type="float" office:value="492.346496582031">
            <text:p>492.346496582</text:p>
          </table:table-cell>
          <table:table-cell office:value-type="float" office:value="0.001675088">
            <text:p>0.001675088</text:p>
          </table:table-cell>
          <table:table-cell table:number-columns-repeated="4"/>
        </table:table-row>
        <table:table-row table:style-name="ro1">
          <table:table-cell office:value-type="float" office:value="492.462463378906">
            <text:p>492.4624633789</text:p>
          </table:table-cell>
          <table:table-cell office:value-type="float" office:value="0.0007134796">
            <text:p>0.0007134796</text:p>
          </table:table-cell>
          <table:table-cell table:number-columns-repeated="4"/>
        </table:table-row>
        <table:table-row table:style-name="ro1">
          <table:table-cell office:value-type="float" office:value="492.578430175781">
            <text:p>492.5784301758</text:p>
          </table:table-cell>
          <table:table-cell office:value-type="float" office:value="0.001330239">
            <text:p>0.001330239</text:p>
          </table:table-cell>
          <table:table-cell table:number-columns-repeated="4"/>
        </table:table-row>
        <table:table-row table:style-name="ro1">
          <table:table-cell office:value-type="float" office:value="492.694396972656">
            <text:p>492.6943969727</text:p>
          </table:table-cell>
          <table:table-cell office:value-type="float" office:value="-0.006001437">
            <text:p>-0.006001437</text:p>
          </table:table-cell>
          <table:table-cell table:number-columns-repeated="4"/>
        </table:table-row>
        <table:table-row table:style-name="ro1">
          <table:table-cell office:value-type="float" office:value="492.810363769531">
            <text:p>492.8103637695</text:p>
          </table:table-cell>
          <table:table-cell office:value-type="float" office:value="-0.009906977">
            <text:p>-0.009906977</text:p>
          </table:table-cell>
          <table:table-cell table:number-columns-repeated="4"/>
        </table:table-row>
        <table:table-row table:style-name="ro1">
          <table:table-cell office:value-type="float" office:value="492.926361083984">
            <text:p>492.926361084</text:p>
          </table:table-cell>
          <table:table-cell office:value-type="float" office:value="0.01041726">
            <text:p>0.01041726</text:p>
          </table:table-cell>
          <table:table-cell table:number-columns-repeated="4"/>
        </table:table-row>
        <table:table-row table:style-name="ro1">
          <table:table-cell office:value-type="float" office:value="493.042327880859">
            <text:p>493.0423278809</text:p>
          </table:table-cell>
          <table:table-cell office:value-type="float" office:value="-0.006458838">
            <text:p>-0.006458838</text:p>
          </table:table-cell>
          <table:table-cell table:number-columns-repeated="4"/>
        </table:table-row>
        <table:table-row table:style-name="ro1">
          <table:table-cell office:value-type="float" office:value="493.158325195313">
            <text:p>493.1583251953</text:p>
          </table:table-cell>
          <table:table-cell office:value-type="float" office:value="-0.009035162">
            <text:p>-0.009035162</text:p>
          </table:table-cell>
          <table:table-cell table:number-columns-repeated="4"/>
        </table:table-row>
        <table:table-row table:style-name="ro1">
          <table:table-cell office:value-type="float" office:value="493.274322509766">
            <text:p>493.2743225098</text:p>
          </table:table-cell>
          <table:table-cell office:value-type="float" office:value="-0.0005673094">
            <text:p>-0.0005673094</text:p>
          </table:table-cell>
          <table:table-cell table:number-columns-repeated="4"/>
        </table:table-row>
        <table:table-row table:style-name="ro1">
          <table:table-cell office:value-type="float" office:value="493.390319824219">
            <text:p>493.3903198242</text:p>
          </table:table-cell>
          <table:table-cell office:value-type="float" office:value="0.01138209">
            <text:p>0.01138209</text:p>
          </table:table-cell>
          <table:table-cell table:number-columns-repeated="4"/>
        </table:table-row>
        <table:table-row table:style-name="ro1">
          <table:table-cell office:value-type="float" office:value="493.506317138672">
            <text:p>493.5063171387</text:p>
          </table:table-cell>
          <table:table-cell office:value-type="float" office:value="0.003218196">
            <text:p>0.003218196</text:p>
          </table:table-cell>
          <table:table-cell table:number-columns-repeated="4"/>
        </table:table-row>
        <table:table-row table:style-name="ro1">
          <table:table-cell office:value-type="float" office:value="493.622344970703">
            <text:p>493.6223449707</text:p>
          </table:table-cell>
          <table:table-cell office:value-type="float" office:value="-0.0004081805">
            <text:p>-0.0004081805</text:p>
          </table:table-cell>
          <table:table-cell table:number-columns-repeated="4"/>
        </table:table-row>
        <table:table-row table:style-name="ro1">
          <table:table-cell office:value-type="float" office:value="493.738342285156">
            <text:p>493.7383422852</text:p>
          </table:table-cell>
          <table:table-cell office:value-type="float" office:value="-0.01304444">
            <text:p>-0.01304444</text:p>
          </table:table-cell>
          <table:table-cell table:number-columns-repeated="4"/>
        </table:table-row>
        <table:table-row table:style-name="ro1">
          <table:table-cell office:value-type="float" office:value="493.854370117188">
            <text:p>493.8543701172</text:p>
          </table:table-cell>
          <table:table-cell office:value-type="float" office:value="-0.006157529">
            <text:p>-0.006157529</text:p>
          </table:table-cell>
          <table:table-cell table:number-columns-repeated="4"/>
        </table:table-row>
        <table:table-row table:style-name="ro1">
          <table:table-cell office:value-type="float" office:value="493.970367431641">
            <text:p>493.9703674316</text:p>
          </table:table-cell>
          <table:table-cell office:value-type="float" office:value="0.004896412">
            <text:p>0.004896412</text:p>
          </table:table-cell>
          <table:table-cell table:number-columns-repeated="4"/>
        </table:table-row>
        <table:table-row table:style-name="ro1">
          <table:table-cell office:value-type="float" office:value="494.086395263672">
            <text:p>494.0863952637</text:p>
          </table:table-cell>
          <table:table-cell office:value-type="float" office:value="0.0008043814">
            <text:p>0.0008043814</text:p>
          </table:table-cell>
          <table:table-cell table:number-columns-repeated="4"/>
        </table:table-row>
        <table:table-row table:style-name="ro1">
          <table:table-cell office:value-type="float" office:value="494.202423095703">
            <text:p>494.2024230957</text:p>
          </table:table-cell>
          <table:table-cell office:value-type="float" office:value="-0.001251537">
            <text:p>-0.001251537</text:p>
          </table:table-cell>
          <table:table-cell table:number-columns-repeated="4"/>
        </table:table-row>
        <table:table-row table:style-name="ro1">
          <table:table-cell office:value-type="float" office:value="494.318450927734">
            <text:p>494.3184509277</text:p>
          </table:table-cell>
          <table:table-cell office:value-type="float" office:value="-0.006362307">
            <text:p>-0.006362307</text:p>
          </table:table-cell>
          <table:table-cell table:number-columns-repeated="4"/>
        </table:table-row>
        <table:table-row table:style-name="ro1">
          <table:table-cell office:value-type="float" office:value="494.434478759766">
            <text:p>494.4344787598</text:p>
          </table:table-cell>
          <table:table-cell office:value-type="float" office:value="-0.003275767">
            <text:p>-0.003275767</text:p>
          </table:table-cell>
          <table:table-cell table:number-columns-repeated="4"/>
        </table:table-row>
        <table:table-row table:style-name="ro1">
          <table:table-cell office:value-type="float" office:value="494.550537109375">
            <text:p>494.5505371094</text:p>
          </table:table-cell>
          <table:table-cell office:value-type="float" office:value="-0.007442995">
            <text:p>-0.007442995</text:p>
          </table:table-cell>
          <table:table-cell table:number-columns-repeated="4"/>
        </table:table-row>
        <table:table-row table:style-name="ro1">
          <table:table-cell office:value-type="float" office:value="494.666564941406">
            <text:p>494.6665649414</text:p>
          </table:table-cell>
          <table:table-cell office:value-type="float" office:value="-0.006560253">
            <text:p>-0.006560253</text:p>
          </table:table-cell>
          <table:table-cell table:number-columns-repeated="4"/>
        </table:table-row>
        <table:table-row table:style-name="ro1">
          <table:table-cell office:value-type="float" office:value="494.782623291016">
            <text:p>494.782623291</text:p>
          </table:table-cell>
          <table:table-cell office:value-type="float" office:value="-0.0035343">
            <text:p>-0.0035343</text:p>
          </table:table-cell>
          <table:table-cell table:number-columns-repeated="4"/>
        </table:table-row>
        <table:table-row table:style-name="ro1">
          <table:table-cell office:value-type="float" office:value="494.898681640625">
            <text:p>494.8986816406</text:p>
          </table:table-cell>
          <table:table-cell office:value-type="float" office:value="0.005796911">
            <text:p>0.005796911</text:p>
          </table:table-cell>
          <table:table-cell table:number-columns-repeated="4"/>
        </table:table-row>
        <table:table-row table:style-name="ro1">
          <table:table-cell office:value-type="float" office:value="495.014739990234">
            <text:p>495.0147399902</text:p>
          </table:table-cell>
          <table:table-cell office:value-type="float" office:value="-0.01328989">
            <text:p>-0.01328989</text:p>
          </table:table-cell>
          <table:table-cell table:number-columns-repeated="4"/>
        </table:table-row>
        <table:table-row table:style-name="ro1">
          <table:table-cell office:value-type="float" office:value="495.130798339844">
            <text:p>495.1307983398</text:p>
          </table:table-cell>
          <table:table-cell office:value-type="float" office:value="-0.01129866">
            <text:p>-0.01129866</text:p>
          </table:table-cell>
          <table:table-cell table:number-columns-repeated="4"/>
        </table:table-row>
        <table:table-row table:style-name="ro1">
          <table:table-cell office:value-type="float" office:value="495.246856689453">
            <text:p>495.2468566895</text:p>
          </table:table-cell>
          <table:table-cell office:value-type="float" office:value="0.002499581">
            <text:p>0.002499581</text:p>
          </table:table-cell>
          <table:table-cell table:number-columns-repeated="4"/>
        </table:table-row>
        <table:table-row table:style-name="ro1">
          <table:table-cell office:value-type="float" office:value="495.362915039063">
            <text:p>495.3629150391</text:p>
          </table:table-cell>
          <table:table-cell office:value-type="float" office:value="0.007860742">
            <text:p>0.007860742</text:p>
          </table:table-cell>
          <table:table-cell table:number-columns-repeated="4"/>
        </table:table-row>
        <table:table-row table:style-name="ro1">
          <table:table-cell office:value-type="float" office:value="495.478973388672">
            <text:p>495.4789733887</text:p>
          </table:table-cell>
          <table:table-cell office:value-type="float" office:value="-0.01322999">
            <text:p>-0.01322999</text:p>
          </table:table-cell>
          <table:table-cell table:number-columns-repeated="4"/>
        </table:table-row>
        <table:table-row table:style-name="ro1">
          <table:table-cell office:value-type="float" office:value="495.595062255859">
            <text:p>495.5950622559</text:p>
          </table:table-cell>
          <table:table-cell office:value-type="float" office:value="0.0049194">
            <text:p>0.0049194</text:p>
          </table:table-cell>
          <table:table-cell table:number-columns-repeated="4"/>
        </table:table-row>
        <table:table-row table:style-name="ro1">
          <table:table-cell office:value-type="float" office:value="495.711151123047">
            <text:p>495.711151123</text:p>
          </table:table-cell>
          <table:table-cell office:value-type="float" office:value="-0.005267375">
            <text:p>-0.005267375</text:p>
          </table:table-cell>
          <table:table-cell table:number-columns-repeated="4"/>
        </table:table-row>
        <table:table-row table:style-name="ro1">
          <table:table-cell office:value-type="float" office:value="495.827209472656">
            <text:p>495.8272094727</text:p>
          </table:table-cell>
          <table:table-cell office:value-type="float" office:value="0.02656195">
            <text:p>0.02656195</text:p>
          </table:table-cell>
          <table:table-cell table:number-columns-repeated="4"/>
        </table:table-row>
        <table:table-row table:style-name="ro1">
          <table:table-cell office:value-type="float" office:value="495.943298339844">
            <text:p>495.9432983398</text:p>
          </table:table-cell>
          <table:table-cell office:value-type="float" office:value="-0.00191252">
            <text:p>-0.00191252</text:p>
          </table:table-cell>
          <table:table-cell table:number-columns-repeated="4"/>
        </table:table-row>
        <table:table-row table:style-name="ro1">
          <table:table-cell office:value-type="float" office:value="496.059387207031">
            <text:p>496.059387207</text:p>
          </table:table-cell>
          <table:table-cell office:value-type="float" office:value="0.009730031">
            <text:p>0.009730031</text:p>
          </table:table-cell>
          <table:table-cell table:number-columns-repeated="4"/>
        </table:table-row>
        <table:table-row table:style-name="ro1">
          <table:table-cell office:value-type="float" office:value="496.175506591797">
            <text:p>496.1755065918</text:p>
          </table:table-cell>
          <table:table-cell office:value-type="float" office:value="-0.006348785">
            <text:p>-0.006348785</text:p>
          </table:table-cell>
          <table:table-cell table:number-columns-repeated="4"/>
        </table:table-row>
        <table:table-row table:style-name="ro1">
          <table:table-cell office:value-type="float" office:value="496.291595458984">
            <text:p>496.291595459</text:p>
          </table:table-cell>
          <table:table-cell office:value-type="float" office:value="-0.008616895">
            <text:p>-0.008616895</text:p>
          </table:table-cell>
          <table:table-cell table:number-columns-repeated="4"/>
        </table:table-row>
        <table:table-row table:style-name="ro1">
          <table:table-cell office:value-type="float" office:value="496.407684326172">
            <text:p>496.4076843262</text:p>
          </table:table-cell>
          <table:table-cell office:value-type="float" office:value="0.01277307">
            <text:p>0.01277307</text:p>
          </table:table-cell>
          <table:table-cell table:number-columns-repeated="4"/>
        </table:table-row>
        <table:table-row table:style-name="ro1">
          <table:table-cell office:value-type="float" office:value="496.523803710938">
            <text:p>496.5238037109</text:p>
          </table:table-cell>
          <table:table-cell office:value-type="float" office:value="-0.0117861">
            <text:p>-0.0117861</text:p>
          </table:table-cell>
          <table:table-cell table:number-columns-repeated="4"/>
        </table:table-row>
        <table:table-row table:style-name="ro1">
          <table:table-cell office:value-type="float" office:value="496.639923095703">
            <text:p>496.6399230957</text:p>
          </table:table-cell>
          <table:table-cell office:value-type="float" office:value="0.007484854">
            <text:p>0.007484854</text:p>
          </table:table-cell>
          <table:table-cell table:number-columns-repeated="4"/>
        </table:table-row>
        <table:table-row table:style-name="ro1">
          <table:table-cell office:value-type="float" office:value="496.756042480469">
            <text:p>496.7560424805</text:p>
          </table:table-cell>
          <table:table-cell office:value-type="float" office:value="0.003761949">
            <text:p>0.003761949</text:p>
          </table:table-cell>
          <table:table-cell table:number-columns-repeated="4"/>
        </table:table-row>
        <table:table-row table:style-name="ro1">
          <table:table-cell office:value-type="float" office:value="496.872161865234">
            <text:p>496.8721618652</text:p>
          </table:table-cell>
          <table:table-cell office:value-type="float" office:value="-0.004947297">
            <text:p>-0.004947297</text:p>
          </table:table-cell>
          <table:table-cell table:number-columns-repeated="4"/>
        </table:table-row>
        <table:table-row table:style-name="ro1">
          <table:table-cell office:value-type="float" office:value="496.98828125">
            <text:p>496.98828125</text:p>
          </table:table-cell>
          <table:table-cell office:value-type="float" office:value="0.001892641">
            <text:p>0.001892641</text:p>
          </table:table-cell>
          <table:table-cell table:number-columns-repeated="4"/>
        </table:table-row>
        <table:table-row table:style-name="ro1">
          <table:table-cell office:value-type="float" office:value="497.104400634766">
            <text:p>497.1044006348</text:p>
          </table:table-cell>
          <table:table-cell office:value-type="float" office:value="0.02229134">
            <text:p>0.02229134</text:p>
          </table:table-cell>
          <table:table-cell table:number-columns-repeated="4"/>
        </table:table-row>
        <table:table-row table:style-name="ro1">
          <table:table-cell office:value-type="float" office:value="497.220520019531">
            <text:p>497.2205200195</text:p>
          </table:table-cell>
          <table:table-cell office:value-type="float" office:value="0.00295228">
            <text:p>0.00295228</text:p>
          </table:table-cell>
          <table:table-cell table:number-columns-repeated="4"/>
        </table:table-row>
        <table:table-row table:style-name="ro1">
          <table:table-cell office:value-type="float" office:value="497.336669921875">
            <text:p>497.3366699219</text:p>
          </table:table-cell>
          <table:table-cell office:value-type="float" office:value="-0.002607804">
            <text:p>-0.002607804</text:p>
          </table:table-cell>
          <table:table-cell table:number-columns-repeated="4"/>
        </table:table-row>
        <table:table-row table:style-name="ro1">
          <table:table-cell office:value-type="float" office:value="497.452819824219">
            <text:p>497.4528198242</text:p>
          </table:table-cell>
          <table:table-cell office:value-type="float" office:value="-0.01046004">
            <text:p>-0.01046004</text:p>
          </table:table-cell>
          <table:table-cell table:number-columns-repeated="4"/>
        </table:table-row>
        <table:table-row table:style-name="ro1">
          <table:table-cell office:value-type="float" office:value="497.568939208984">
            <text:p>497.568939209</text:p>
          </table:table-cell>
          <table:table-cell office:value-type="float" office:value="0.004571742">
            <text:p>0.004571742</text:p>
          </table:table-cell>
          <table:table-cell table:number-columns-repeated="4"/>
        </table:table-row>
        <table:table-row table:style-name="ro1">
          <table:table-cell office:value-type="float" office:value="497.685089111328">
            <text:p>497.6850891113</text:p>
          </table:table-cell>
          <table:table-cell office:value-type="float" office:value="0.006029246">
            <text:p>0.006029246</text:p>
          </table:table-cell>
          <table:table-cell table:number-columns-repeated="4"/>
        </table:table-row>
        <table:table-row table:style-name="ro1">
          <table:table-cell office:value-type="float" office:value="497.801239013672">
            <text:p>497.8012390137</text:p>
          </table:table-cell>
          <table:table-cell office:value-type="string">
            <text:p>-1.101061E-05</text:p>
          </table:table-cell>
          <table:table-cell table:number-columns-repeated="4"/>
        </table:table-row>
        <table:table-row table:style-name="ro1">
          <table:table-cell office:value-type="float" office:value="497.917388916016">
            <text:p>497.917388916</text:p>
          </table:table-cell>
          <table:table-cell office:value-type="float" office:value="-0.01238566">
            <text:p>-0.01238566</text:p>
          </table:table-cell>
          <table:table-cell table:number-columns-repeated="4"/>
        </table:table-row>
        <table:table-row table:style-name="ro1">
          <table:table-cell office:value-type="float" office:value="498.033569335938">
            <text:p>498.0335693359</text:p>
          </table:table-cell>
          <table:table-cell office:value-type="float" office:value="0.006680499">
            <text:p>0.006680499</text:p>
          </table:table-cell>
          <table:table-cell table:number-columns-repeated="4"/>
        </table:table-row>
        <table:table-row table:style-name="ro1">
          <table:table-cell office:value-type="float" office:value="498.149719238281">
            <text:p>498.1497192383</text:p>
          </table:table-cell>
          <table:table-cell office:value-type="float" office:value="0.01684307">
            <text:p>0.01684307</text:p>
          </table:table-cell>
          <table:table-cell table:number-columns-repeated="4"/>
        </table:table-row>
        <table:table-row table:style-name="ro1">
          <table:table-cell office:value-type="float" office:value="498.265899658203">
            <text:p>498.2658996582</text:p>
          </table:table-cell>
          <table:table-cell office:value-type="float" office:value="-0.005454245">
            <text:p>-0.005454245</text:p>
          </table:table-cell>
          <table:table-cell table:number-columns-repeated="4"/>
        </table:table-row>
        <table:table-row table:style-name="ro1">
          <table:table-cell office:value-type="float" office:value="498.382049560547">
            <text:p>498.3820495605</text:p>
          </table:table-cell>
          <table:table-cell office:value-type="float" office:value="-0.002109778">
            <text:p>-0.002109778</text:p>
          </table:table-cell>
          <table:table-cell table:number-columns-repeated="4"/>
        </table:table-row>
        <table:table-row table:style-name="ro1">
          <table:table-cell office:value-type="float" office:value="498.498229980469">
            <text:p>498.4982299805</text:p>
          </table:table-cell>
          <table:table-cell office:value-type="float" office:value="0.01395449">
            <text:p>0.01395449</text:p>
          </table:table-cell>
          <table:table-cell table:number-columns-repeated="4"/>
        </table:table-row>
        <table:table-row table:style-name="ro1">
          <table:table-cell office:value-type="float" office:value="498.614410400391">
            <text:p>498.6144104004</text:p>
          </table:table-cell>
          <table:table-cell office:value-type="float" office:value="-0.001969684">
            <text:p>-0.001969684</text:p>
          </table:table-cell>
          <table:table-cell table:number-columns-repeated="4"/>
        </table:table-row>
        <table:table-row table:style-name="ro1">
          <table:table-cell office:value-type="float" office:value="498.730590820313">
            <text:p>498.7305908203</text:p>
          </table:table-cell>
          <table:table-cell office:value-type="float" office:value="0.00325393">
            <text:p>0.00325393</text:p>
          </table:table-cell>
          <table:table-cell table:number-columns-repeated="4"/>
        </table:table-row>
        <table:table-row table:style-name="ro1">
          <table:table-cell office:value-type="float" office:value="498.846771240234">
            <text:p>498.8467712402</text:p>
          </table:table-cell>
          <table:table-cell office:value-type="float" office:value="-0.01445474">
            <text:p>-0.01445474</text:p>
          </table:table-cell>
          <table:table-cell table:number-columns-repeated="4"/>
        </table:table-row>
        <table:table-row table:style-name="ro1">
          <table:table-cell office:value-type="float" office:value="498.962982177734">
            <text:p>498.9629821777</text:p>
          </table:table-cell>
          <table:table-cell office:value-type="float" office:value="0.002488129">
            <text:p>0.002488129</text:p>
          </table:table-cell>
          <table:table-cell table:number-columns-repeated="4"/>
        </table:table-row>
        <table:table-row table:style-name="ro1">
          <table:table-cell office:value-type="float" office:value="499.079162597656">
            <text:p>499.0791625977</text:p>
          </table:table-cell>
          <table:table-cell office:value-type="float" office:value="0.02832491">
            <text:p>0.02832491</text:p>
          </table:table-cell>
          <table:table-cell table:number-columns-repeated="4"/>
        </table:table-row>
        <table:table-row table:style-name="ro1">
          <table:table-cell office:value-type="float" office:value="499.195373535156">
            <text:p>499.1953735352</text:p>
          </table:table-cell>
          <table:table-cell office:value-type="float" office:value="-0.007972355">
            <text:p>-0.007972355</text:p>
          </table:table-cell>
          <table:table-cell table:number-columns-repeated="4"/>
        </table:table-row>
        <table:table-row table:style-name="ro1">
          <table:table-cell office:value-type="float" office:value="499.311584472656">
            <text:p>499.3115844727</text:p>
          </table:table-cell>
          <table:table-cell office:value-type="float" office:value="-0.007059221">
            <text:p>-0.007059221</text:p>
          </table:table-cell>
          <table:table-cell table:number-columns-repeated="4"/>
        </table:table-row>
        <table:table-row table:style-name="ro1">
          <table:table-cell office:value-type="float" office:value="499.427764892578">
            <text:p>499.4277648926</text:p>
          </table:table-cell>
          <table:table-cell office:value-type="float" office:value="0.007849097">
            <text:p>0.007849097</text:p>
          </table:table-cell>
          <table:table-cell table:number-columns-repeated="4"/>
        </table:table-row>
        <table:table-row table:style-name="ro1">
          <table:table-cell office:value-type="float" office:value="499.543975830078">
            <text:p>499.5439758301</text:p>
          </table:table-cell>
          <table:table-cell office:value-type="float" office:value="-0.002938297">
            <text:p>-0.002938297</text:p>
          </table:table-cell>
          <table:table-cell table:number-columns-repeated="4"/>
        </table:table-row>
        <table:table-row table:style-name="ro1">
          <table:table-cell office:value-type="float" office:value="499.660217285156">
            <text:p>499.6602172852</text:p>
          </table:table-cell>
          <table:table-cell office:value-type="float" office:value="-0.008298847">
            <text:p>-0.008298847</text:p>
          </table:table-cell>
          <table:table-cell table:number-columns-repeated="4"/>
        </table:table-row>
        <table:table-row table:style-name="ro1">
          <table:table-cell office:value-type="float" office:value="499.776428222656">
            <text:p>499.7764282227</text:p>
          </table:table-cell>
          <table:table-cell office:value-type="float" office:value="-0.01472455">
            <text:p>-0.01472455</text:p>
          </table:table-cell>
          <table:table-cell table:number-columns-repeated="4"/>
        </table:table-row>
        <table:table-row table:style-name="ro1">
          <table:table-cell office:value-type="float" office:value="499.892639160156">
            <text:p>499.8926391602</text:p>
          </table:table-cell>
          <table:table-cell office:value-type="float" office:value="-0.0001862058">
            <text:p>-0.0001862058</text:p>
          </table:table-cell>
          <table:table-cell table:number-columns-repeated="4"/>
        </table:table-row>
        <table:table-row table:style-name="ro1">
          <table:table-cell office:value-type="float" office:value="500.008880615234">
            <text:p>500.0088806152</text:p>
          </table:table-cell>
          <table:table-cell office:value-type="float" office:value="0.0276541">
            <text:p>0.0276541</text:p>
          </table:table-cell>
          <table:table-cell table:number-columns-repeated="4"/>
        </table:table-row>
        <table:table-row table:style-name="ro1">
          <table:table-cell office:value-type="float" office:value="500.125091552734">
            <text:p>500.1250915527</text:p>
          </table:table-cell>
          <table:table-cell office:value-type="float" office:value="-0.003372723">
            <text:p>-0.003372723</text:p>
          </table:table-cell>
          <table:table-cell table:number-columns-repeated="4"/>
        </table:table-row>
        <table:table-row table:style-name="ro1">
          <table:table-cell office:value-type="float" office:value="500.241333007813">
            <text:p>500.2413330078</text:p>
          </table:table-cell>
          <table:table-cell office:value-type="float" office:value="0.002341582">
            <text:p>0.002341582</text:p>
          </table:table-cell>
          <table:table-cell table:number-columns-repeated="4"/>
        </table:table-row>
        <table:table-row table:style-name="ro1">
          <table:table-cell office:value-type="float" office:value="500.357574462891">
            <text:p>500.3575744629</text:p>
          </table:table-cell>
          <table:table-cell office:value-type="float" office:value="0.001847253">
            <text:p>0.001847253</text:p>
          </table:table-cell>
          <table:table-cell table:number-columns-repeated="4"/>
        </table:table-row>
        <table:table-row table:style-name="ro1">
          <table:table-cell office:value-type="float" office:value="500.473815917969">
            <text:p>500.473815918</text:p>
          </table:table-cell>
          <table:table-cell office:value-type="float" office:value="-0.0004276809">
            <text:p>-0.0004276809</text:p>
          </table:table-cell>
          <table:table-cell table:number-columns-repeated="4"/>
        </table:table-row>
        <table:table-row table:style-name="ro1">
          <table:table-cell office:value-type="float" office:value="500.590057373047">
            <text:p>500.590057373</text:p>
          </table:table-cell>
          <table:table-cell office:value-type="float" office:value="-0.01098058">
            <text:p>-0.01098058</text:p>
          </table:table-cell>
          <table:table-cell table:number-columns-repeated="4"/>
        </table:table-row>
        <table:table-row table:style-name="ro1">
          <table:table-cell office:value-type="float" office:value="500.706298828125">
            <text:p>500.7062988281</text:p>
          </table:table-cell>
          <table:table-cell office:value-type="float" office:value="-0.01275515">
            <text:p>-0.01275515</text:p>
          </table:table-cell>
          <table:table-cell table:number-columns-repeated="4"/>
        </table:table-row>
        <table:table-row table:style-name="ro1">
          <table:table-cell office:value-type="float" office:value="500.822570800781">
            <text:p>500.8225708008</text:p>
          </table:table-cell>
          <table:table-cell office:value-type="float" office:value="-0.001532071">
            <text:p>-0.001532071</text:p>
          </table:table-cell>
          <table:table-cell table:number-columns-repeated="4"/>
        </table:table-row>
        <table:table-row table:style-name="ro1">
          <table:table-cell office:value-type="float" office:value="500.938812255859">
            <text:p>500.9388122559</text:p>
          </table:table-cell>
          <table:table-cell office:value-type="float" office:value="0.001038569">
            <text:p>0.001038569</text:p>
          </table:table-cell>
          <table:table-cell table:number-columns-repeated="4"/>
        </table:table-row>
        <table:table-row table:style-name="ro1">
          <table:table-cell office:value-type="float" office:value="501.055084228516">
            <text:p>501.0550842285</text:p>
          </table:table-cell>
          <table:table-cell office:value-type="float" office:value="-0.01468271">
            <text:p>-0.01468271</text:p>
          </table:table-cell>
          <table:table-cell table:number-columns-repeated="4"/>
        </table:table-row>
        <table:table-row table:style-name="ro1">
          <table:table-cell office:value-type="float" office:value="501.171356201172">
            <text:p>501.1713562012</text:p>
          </table:table-cell>
          <table:table-cell office:value-type="float" office:value="-0.00519153">
            <text:p>-0.00519153</text:p>
          </table:table-cell>
          <table:table-cell table:number-columns-repeated="4"/>
        </table:table-row>
        <table:table-row table:style-name="ro1">
          <table:table-cell office:value-type="float" office:value="501.287628173828">
            <text:p>501.2876281738</text:p>
          </table:table-cell>
          <table:table-cell office:value-type="float" office:value="0.006982329">
            <text:p>0.006982329</text:p>
          </table:table-cell>
          <table:table-cell table:number-columns-repeated="4"/>
        </table:table-row>
        <table:table-row table:style-name="ro1">
          <table:table-cell office:value-type="float" office:value="501.403900146484">
            <text:p>501.4039001465</text:p>
          </table:table-cell>
          <table:table-cell office:value-type="float" office:value="0.0001855771">
            <text:p>0.0001855771</text:p>
          </table:table-cell>
          <table:table-cell table:number-columns-repeated="4"/>
        </table:table-row>
        <table:table-row table:style-name="ro1">
          <table:table-cell office:value-type="float" office:value="501.520172119141">
            <text:p>501.5201721191</text:p>
          </table:table-cell>
          <table:table-cell office:value-type="float" office:value="-0.003119988">
            <text:p>-0.003119988</text:p>
          </table:table-cell>
          <table:table-cell table:number-columns-repeated="4"/>
        </table:table-row>
        <table:table-row table:style-name="ro1">
          <table:table-cell office:value-type="float" office:value="501.636444091797">
            <text:p>501.6364440918</text:p>
          </table:table-cell>
          <table:table-cell office:value-type="float" office:value="0.07197692">
            <text:p>0.07197692</text:p>
          </table:table-cell>
          <table:table-cell table:number-columns-repeated="4"/>
        </table:table-row>
        <table:table-row table:style-name="ro1">
          <table:table-cell office:value-type="float" office:value="501.752746582031">
            <text:p>501.752746582</text:p>
          </table:table-cell>
          <table:table-cell office:value-type="float" office:value="-0.0006951508">
            <text:p>-0.0006951508</text:p>
          </table:table-cell>
          <table:table-cell table:number-columns-repeated="4"/>
        </table:table-row>
        <table:table-row table:style-name="ro1">
          <table:table-cell office:value-type="float" office:value="501.869018554688">
            <text:p>501.8690185547</text:p>
          </table:table-cell>
          <table:table-cell office:value-type="float" office:value="-0.003112823">
            <text:p>-0.003112823</text:p>
          </table:table-cell>
          <table:table-cell table:number-columns-repeated="4"/>
        </table:table-row>
        <table:table-row table:style-name="ro1">
          <table:table-cell office:value-type="float" office:value="501.985321044922">
            <text:p>501.9853210449</text:p>
          </table:table-cell>
          <table:table-cell office:value-type="float" office:value="0.003172439">
            <text:p>0.003172439</text:p>
          </table:table-cell>
          <table:table-cell table:number-columns-repeated="4"/>
        </table:table-row>
        <table:table-row table:style-name="ro1">
          <table:table-cell office:value-type="float" office:value="502.101623535156">
            <text:p>502.1016235352</text:p>
          </table:table-cell>
          <table:table-cell office:value-type="float" office:value="-0.01253752">
            <text:p>-0.01253752</text:p>
          </table:table-cell>
          <table:table-cell table:number-columns-repeated="4"/>
        </table:table-row>
        <table:table-row table:style-name="ro1">
          <table:table-cell office:value-type="float" office:value="502.217926025391">
            <text:p>502.2179260254</text:p>
          </table:table-cell>
          <table:table-cell office:value-type="float" office:value="0.00191684">
            <text:p>0.00191684</text:p>
          </table:table-cell>
          <table:table-cell table:number-columns-repeated="4"/>
        </table:table-row>
        <table:table-row table:style-name="ro1">
          <table:table-cell office:value-type="float" office:value="502.334228515625">
            <text:p>502.3342285156</text:p>
          </table:table-cell>
          <table:table-cell office:value-type="float" office:value="-0.004931446">
            <text:p>-0.004931446</text:p>
          </table:table-cell>
          <table:table-cell table:number-columns-repeated="4"/>
        </table:table-row>
        <table:table-row table:style-name="ro1">
          <table:table-cell office:value-type="float" office:value="502.450531005859">
            <text:p>502.4505310059</text:p>
          </table:table-cell>
          <table:table-cell office:value-type="float" office:value="-0.01003959">
            <text:p>-0.01003959</text:p>
          </table:table-cell>
          <table:table-cell table:number-columns-repeated="4"/>
        </table:table-row>
        <table:table-row table:style-name="ro1">
          <table:table-cell office:value-type="float" office:value="502.566833496094">
            <text:p>502.5668334961</text:p>
          </table:table-cell>
          <table:table-cell office:value-type="float" office:value="-0.000264841">
            <text:p>-0.000264841</text:p>
          </table:table-cell>
          <table:table-cell table:number-columns-repeated="4"/>
        </table:table-row>
        <table:table-row table:style-name="ro1">
          <table:table-cell office:value-type="float" office:value="502.683166503906">
            <text:p>502.6831665039</text:p>
          </table:table-cell>
          <table:table-cell office:value-type="float" office:value="0.004018167">
            <text:p>0.004018167</text:p>
          </table:table-cell>
          <table:table-cell table:number-columns-repeated="4"/>
        </table:table-row>
        <table:table-row table:style-name="ro1">
          <table:table-cell office:value-type="float" office:value="502.799468994141">
            <text:p>502.7994689941</text:p>
          </table:table-cell>
          <table:table-cell office:value-type="float" office:value="-0.002639837">
            <text:p>-0.002639837</text:p>
          </table:table-cell>
          <table:table-cell table:number-columns-repeated="4"/>
        </table:table-row>
        <table:table-row table:style-name="ro1">
          <table:table-cell office:value-type="float" office:value="502.915802001953">
            <text:p>502.915802002</text:p>
          </table:table-cell>
          <table:table-cell office:value-type="float" office:value="-0.007858781">
            <text:p>-0.007858781</text:p>
          </table:table-cell>
          <table:table-cell table:number-columns-repeated="4"/>
        </table:table-row>
        <table:table-row table:style-name="ro1">
          <table:table-cell office:value-type="float" office:value="503.032135009766">
            <text:p>503.0321350098</text:p>
          </table:table-cell>
          <table:table-cell office:value-type="float" office:value="-0.01092425">
            <text:p>-0.01092425</text:p>
          </table:table-cell>
          <table:table-cell table:number-columns-repeated="4"/>
        </table:table-row>
        <table:table-row table:style-name="ro1">
          <table:table-cell office:value-type="float" office:value="503.148468017578">
            <text:p>503.1484680176</text:p>
          </table:table-cell>
          <table:table-cell office:value-type="float" office:value="-0.004653675">
            <text:p>-0.004653675</text:p>
          </table:table-cell>
          <table:table-cell table:number-columns-repeated="4"/>
        </table:table-row>
        <table:table-row table:style-name="ro1">
          <table:table-cell office:value-type="float" office:value="503.264801025391">
            <text:p>503.2648010254</text:p>
          </table:table-cell>
          <table:table-cell office:value-type="float" office:value="0.005029272">
            <text:p>0.005029272</text:p>
          </table:table-cell>
          <table:table-cell table:number-columns-repeated="4"/>
        </table:table-row>
        <table:table-row table:style-name="ro1">
          <table:table-cell office:value-type="float" office:value="503.381134033203">
            <text:p>503.3811340332</text:p>
          </table:table-cell>
          <table:table-cell office:value-type="float" office:value="-0.01182068">
            <text:p>-0.01182068</text:p>
          </table:table-cell>
          <table:table-cell table:number-columns-repeated="4"/>
        </table:table-row>
        <table:table-row table:style-name="ro1">
          <table:table-cell office:value-type="float" office:value="503.497497558594">
            <text:p>503.4974975586</text:p>
          </table:table-cell>
          <table:table-cell office:value-type="float" office:value="-0.007834509">
            <text:p>-0.007834509</text:p>
          </table:table-cell>
          <table:table-cell table:number-columns-repeated="4"/>
        </table:table-row>
        <table:table-row table:style-name="ro1">
          <table:table-cell office:value-type="float" office:value="503.613830566406">
            <text:p>503.6138305664</text:p>
          </table:table-cell>
          <table:table-cell office:value-type="float" office:value="-0.0004887687">
            <text:p>-0.0004887687</text:p>
          </table:table-cell>
          <table:table-cell table:number-columns-repeated="4"/>
        </table:table-row>
        <table:table-row table:style-name="ro1">
          <table:table-cell office:value-type="float" office:value="503.730194091797">
            <text:p>503.7301940918</text:p>
          </table:table-cell>
          <table:table-cell office:value-type="float" office:value="-0.004069842">
            <text:p>-0.004069842</text:p>
          </table:table-cell>
          <table:table-cell table:number-columns-repeated="4"/>
        </table:table-row>
        <table:table-row table:style-name="ro1">
          <table:table-cell office:value-type="float" office:value="503.846527099609">
            <text:p>503.8465270996</text:p>
          </table:table-cell>
          <table:table-cell office:value-type="float" office:value="-0.001276795">
            <text:p>-0.001276795</text:p>
          </table:table-cell>
          <table:table-cell table:number-columns-repeated="4"/>
        </table:table-row>
        <table:table-row table:style-name="ro1">
          <table:table-cell office:value-type="float" office:value="503.962890625">
            <text:p>503.962890625</text:p>
          </table:table-cell>
          <table:table-cell office:value-type="float" office:value="-0.01357412">
            <text:p>-0.01357412</text:p>
          </table:table-cell>
          <table:table-cell table:number-columns-repeated="4"/>
        </table:table-row>
        <table:table-row table:style-name="ro1">
          <table:table-cell office:value-type="float" office:value="504.079254150391">
            <text:p>504.0792541504</text:p>
          </table:table-cell>
          <table:table-cell office:value-type="float" office:value="-0.001083672">
            <text:p>-0.001083672</text:p>
          </table:table-cell>
          <table:table-cell table:number-columns-repeated="4"/>
        </table:table-row>
        <table:table-row table:style-name="ro1">
          <table:table-cell office:value-type="float" office:value="504.195617675781">
            <text:p>504.1956176758</text:p>
          </table:table-cell>
          <table:table-cell office:value-type="float" office:value="0.004413423">
            <text:p>0.004413423</text:p>
          </table:table-cell>
          <table:table-cell table:number-columns-repeated="4"/>
        </table:table-row>
        <table:table-row table:style-name="ro1">
          <table:table-cell office:value-type="float" office:value="504.31201171875">
            <text:p>504.3120117188</text:p>
          </table:table-cell>
          <table:table-cell office:value-type="float" office:value="0.00635503">
            <text:p>0.00635503</text:p>
          </table:table-cell>
          <table:table-cell table:number-columns-repeated="4"/>
        </table:table-row>
        <table:table-row table:style-name="ro1">
          <table:table-cell office:value-type="float" office:value="504.428375244141">
            <text:p>504.4283752441</text:p>
          </table:table-cell>
          <table:table-cell office:value-type="float" office:value="-0.008325559">
            <text:p>-0.008325559</text:p>
          </table:table-cell>
          <table:table-cell table:number-columns-repeated="4"/>
        </table:table-row>
        <table:table-row table:style-name="ro1">
          <table:table-cell office:value-type="float" office:value="504.544738769531">
            <text:p>504.5447387695</text:p>
          </table:table-cell>
          <table:table-cell office:value-type="float" office:value="-0.003675802">
            <text:p>-0.003675802</text:p>
          </table:table-cell>
          <table:table-cell table:number-columns-repeated="4"/>
        </table:table-row>
        <table:table-row table:style-name="ro1">
          <table:table-cell office:value-type="float" office:value="504.6611328125">
            <text:p>504.6611328125</text:p>
          </table:table-cell>
          <table:table-cell office:value-type="float" office:value="-0.001369554">
            <text:p>-0.001369554</text:p>
          </table:table-cell>
          <table:table-cell table:number-columns-repeated="4"/>
        </table:table-row>
        <table:table-row table:style-name="ro1">
          <table:table-cell office:value-type="float" office:value="504.777526855469">
            <text:p>504.7775268555</text:p>
          </table:table-cell>
          <table:table-cell office:value-type="float" office:value="-0.003042958">
            <text:p>-0.003042958</text:p>
          </table:table-cell>
          <table:table-cell table:number-columns-repeated="4"/>
        </table:table-row>
        <table:table-row table:style-name="ro1">
          <table:table-cell office:value-type="float" office:value="504.893920898438">
            <text:p>504.8939208984</text:p>
          </table:table-cell>
          <table:table-cell office:value-type="float" office:value="-0.003026071">
            <text:p>-0.003026071</text:p>
          </table:table-cell>
          <table:table-cell table:number-columns-repeated="4"/>
        </table:table-row>
        <table:table-row table:style-name="ro1">
          <table:table-cell office:value-type="float" office:value="505.010314941406">
            <text:p>505.0103149414</text:p>
          </table:table-cell>
          <table:table-cell office:value-type="float" office:value="0.007039609">
            <text:p>0.007039609</text:p>
          </table:table-cell>
          <table:table-cell table:number-columns-repeated="4"/>
        </table:table-row>
        <table:table-row table:style-name="ro1">
          <table:table-cell office:value-type="float" office:value="505.126708984375">
            <text:p>505.1267089844</text:p>
          </table:table-cell>
          <table:table-cell office:value-type="float" office:value="0.0239551">
            <text:p>0.0239551</text:p>
          </table:table-cell>
          <table:table-cell table:number-columns-repeated="4"/>
        </table:table-row>
        <table:table-row table:style-name="ro1">
          <table:table-cell office:value-type="float" office:value="505.243103027344">
            <text:p>505.2431030273</text:p>
          </table:table-cell>
          <table:table-cell office:value-type="float" office:value="-0.001499338">
            <text:p>-0.001499338</text:p>
          </table:table-cell>
          <table:table-cell table:number-columns-repeated="4"/>
        </table:table-row>
        <table:table-row table:style-name="ro1">
          <table:table-cell office:value-type="float" office:value="505.359497070313">
            <text:p>505.3594970703</text:p>
          </table:table-cell>
          <table:table-cell office:value-type="float" office:value="-0.006973741">
            <text:p>-0.006973741</text:p>
          </table:table-cell>
          <table:table-cell table:number-columns-repeated="4"/>
        </table:table-row>
        <table:table-row table:style-name="ro1">
          <table:table-cell office:value-type="float" office:value="505.475921630859">
            <text:p>505.4759216309</text:p>
          </table:table-cell>
          <table:table-cell office:value-type="float" office:value="0.001143766">
            <text:p>0.001143766</text:p>
          </table:table-cell>
          <table:table-cell table:number-columns-repeated="4"/>
        </table:table-row>
        <table:table-row table:style-name="ro1">
          <table:table-cell office:value-type="float" office:value="505.592346191406">
            <text:p>505.5923461914</text:p>
          </table:table-cell>
          <table:table-cell office:value-type="float" office:value="0.01050699">
            <text:p>0.01050699</text:p>
          </table:table-cell>
          <table:table-cell table:number-columns-repeated="4"/>
        </table:table-row>
        <table:table-row table:style-name="ro1">
          <table:table-cell office:value-type="float" office:value="505.708740234375">
            <text:p>505.7087402344</text:p>
          </table:table-cell>
          <table:table-cell office:value-type="float" office:value="-0.008989368">
            <text:p>-0.008989368</text:p>
          </table:table-cell>
          <table:table-cell table:number-columns-repeated="4"/>
        </table:table-row>
        <table:table-row table:style-name="ro1">
          <table:table-cell office:value-type="float" office:value="505.825164794922">
            <text:p>505.8251647949</text:p>
          </table:table-cell>
          <table:table-cell office:value-type="float" office:value="-0.00671277">
            <text:p>-0.00671277</text:p>
          </table:table-cell>
          <table:table-cell table:number-columns-repeated="4"/>
        </table:table-row>
        <table:table-row table:style-name="ro1">
          <table:table-cell office:value-type="float" office:value="505.941589355469">
            <text:p>505.9415893555</text:p>
          </table:table-cell>
          <table:table-cell office:value-type="float" office:value="0.0008512927">
            <text:p>0.0008512927</text:p>
          </table:table-cell>
          <table:table-cell table:number-columns-repeated="4"/>
        </table:table-row>
        <table:table-row table:style-name="ro1">
          <table:table-cell office:value-type="float" office:value="506.058013916016">
            <text:p>506.058013916</text:p>
          </table:table-cell>
          <table:table-cell office:value-type="float" office:value="-0.0003299624">
            <text:p>-0.0003299624</text:p>
          </table:table-cell>
          <table:table-cell table:number-columns-repeated="4"/>
        </table:table-row>
        <table:table-row table:style-name="ro1">
          <table:table-cell office:value-type="float" office:value="506.174468994141">
            <text:p>506.1744689941</text:p>
          </table:table-cell>
          <table:table-cell office:value-type="float" office:value="0.001661947">
            <text:p>0.001661947</text:p>
          </table:table-cell>
          <table:table-cell table:number-columns-repeated="4"/>
        </table:table-row>
        <table:table-row table:style-name="ro1">
          <table:table-cell office:value-type="float" office:value="506.290893554688">
            <text:p>506.2908935547</text:p>
          </table:table-cell>
          <table:table-cell office:value-type="float" office:value="-0.00501665">
            <text:p>-0.00501665</text:p>
          </table:table-cell>
          <table:table-cell table:number-columns-repeated="4"/>
        </table:table-row>
        <table:table-row table:style-name="ro1">
          <table:table-cell office:value-type="float" office:value="506.407348632813">
            <text:p>506.4073486328</text:p>
          </table:table-cell>
          <table:table-cell office:value-type="float" office:value="0.008140496">
            <text:p>0.008140496</text:p>
          </table:table-cell>
          <table:table-cell table:number-columns-repeated="4"/>
        </table:table-row>
        <table:table-row table:style-name="ro1">
          <table:table-cell office:value-type="float" office:value="506.523773193359">
            <text:p>506.5237731934</text:p>
          </table:table-cell>
          <table:table-cell office:value-type="float" office:value="0.0003874475">
            <text:p>0.0003874475</text:p>
          </table:table-cell>
          <table:table-cell table:number-columns-repeated="4"/>
        </table:table-row>
        <table:table-row table:style-name="ro1">
          <table:table-cell office:value-type="float" office:value="506.640228271484">
            <text:p>506.6402282715</text:p>
          </table:table-cell>
          <table:table-cell office:value-type="float" office:value="0.001968645">
            <text:p>0.001968645</text:p>
          </table:table-cell>
          <table:table-cell table:number-columns-repeated="4"/>
        </table:table-row>
        <table:table-row table:style-name="ro1">
          <table:table-cell office:value-type="float" office:value="506.756683349609">
            <text:p>506.7566833496</text:p>
          </table:table-cell>
          <table:table-cell office:value-type="float" office:value="0.004982891">
            <text:p>0.004982891</text:p>
          </table:table-cell>
          <table:table-cell table:number-columns-repeated="4"/>
        </table:table-row>
        <table:table-row table:style-name="ro1">
          <table:table-cell office:value-type="float" office:value="506.873138427734">
            <text:p>506.8731384277</text:p>
          </table:table-cell>
          <table:table-cell office:value-type="float" office:value="0.008881362">
            <text:p>0.008881362</text:p>
          </table:table-cell>
          <table:table-cell table:number-columns-repeated="4"/>
        </table:table-row>
        <table:table-row table:style-name="ro1">
          <table:table-cell office:value-type="float" office:value="506.989593505859">
            <text:p>506.9895935059</text:p>
          </table:table-cell>
          <table:table-cell office:value-type="float" office:value="-0.002798921">
            <text:p>-0.002798921</text:p>
          </table:table-cell>
          <table:table-cell table:number-columns-repeated="4"/>
        </table:table-row>
        <table:table-row table:style-name="ro1">
          <table:table-cell office:value-type="float" office:value="507.106048583984">
            <text:p>507.106048584</text:p>
          </table:table-cell>
          <table:table-cell office:value-type="float" office:value="-0.007324535">
            <text:p>-0.007324535</text:p>
          </table:table-cell>
          <table:table-cell table:number-columns-repeated="4"/>
        </table:table-row>
        <table:table-row table:style-name="ro1">
          <table:table-cell office:value-type="float" office:value="507.222534179688">
            <text:p>507.2225341797</text:p>
          </table:table-cell>
          <table:table-cell office:value-type="float" office:value="-0.01524244">
            <text:p>-0.01524244</text:p>
          </table:table-cell>
          <table:table-cell table:number-columns-repeated="4"/>
        </table:table-row>
        <table:table-row table:style-name="ro1">
          <table:table-cell office:value-type="float" office:value="507.338989257813">
            <text:p>507.3389892578</text:p>
          </table:table-cell>
          <table:table-cell office:value-type="float" office:value="-0.008107079">
            <text:p>-0.008107079</text:p>
          </table:table-cell>
          <table:table-cell table:number-columns-repeated="4"/>
        </table:table-row>
        <table:table-row table:style-name="ro1">
          <table:table-cell office:value-type="float" office:value="507.455474853516">
            <text:p>507.4554748535</text:p>
          </table:table-cell>
          <table:table-cell office:value-type="float" office:value="-0.002415316">
            <text:p>-0.002415316</text:p>
          </table:table-cell>
          <table:table-cell table:number-columns-repeated="4"/>
        </table:table-row>
        <table:table-row table:style-name="ro1">
          <table:table-cell office:value-type="float" office:value="507.571960449219">
            <text:p>507.5719604492</text:p>
          </table:table-cell>
          <table:table-cell office:value-type="float" office:value="-0.01393582">
            <text:p>-0.01393582</text:p>
          </table:table-cell>
          <table:table-cell table:number-columns-repeated="4"/>
        </table:table-row>
        <table:table-row table:style-name="ro1">
          <table:table-cell office:value-type="float" office:value="507.688446044922">
            <text:p>507.6884460449</text:p>
          </table:table-cell>
          <table:table-cell office:value-type="float" office:value="-0.01035043">
            <text:p>-0.01035043</text:p>
          </table:table-cell>
          <table:table-cell table:number-columns-repeated="4"/>
        </table:table-row>
        <table:table-row table:style-name="ro1">
          <table:table-cell office:value-type="float" office:value="507.804931640625">
            <text:p>507.8049316406</text:p>
          </table:table-cell>
          <table:table-cell office:value-type="float" office:value="-0.003064862">
            <text:p>-0.003064862</text:p>
          </table:table-cell>
          <table:table-cell table:number-columns-repeated="4"/>
        </table:table-row>
        <table:table-row table:style-name="ro1">
          <table:table-cell office:value-type="float" office:value="507.921417236328">
            <text:p>507.9214172363</text:p>
          </table:table-cell>
          <table:table-cell office:value-type="float" office:value="-0.003273561">
            <text:p>-0.003273561</text:p>
          </table:table-cell>
          <table:table-cell table:number-columns-repeated="4"/>
        </table:table-row>
        <table:table-row table:style-name="ro1">
          <table:table-cell office:value-type="float" office:value="508.037902832031">
            <text:p>508.037902832</text:p>
          </table:table-cell>
          <table:table-cell office:value-type="float" office:value="-0.006854521">
            <text:p>-0.006854521</text:p>
          </table:table-cell>
          <table:table-cell table:number-columns-repeated="4"/>
        </table:table-row>
        <table:table-row table:style-name="ro1">
          <table:table-cell office:value-type="float" office:value="508.154388427734">
            <text:p>508.1543884277</text:p>
          </table:table-cell>
          <table:table-cell office:value-type="float" office:value="-0.000293366">
            <text:p>-0.000293366</text:p>
          </table:table-cell>
          <table:table-cell table:number-columns-repeated="4"/>
        </table:table-row>
        <table:table-row table:style-name="ro1">
          <table:table-cell office:value-type="float" office:value="508.270904541016">
            <text:p>508.270904541</text:p>
          </table:table-cell>
          <table:table-cell office:value-type="float" office:value="0.0003682098">
            <text:p>0.0003682098</text:p>
          </table:table-cell>
          <table:table-cell table:number-columns-repeated="4"/>
        </table:table-row>
        <table:table-row table:style-name="ro1">
          <table:table-cell office:value-type="float" office:value="508.387420654297">
            <text:p>508.3874206543</text:p>
          </table:table-cell>
          <table:table-cell office:value-type="float" office:value="-0.006826262">
            <text:p>-0.006826262</text:p>
          </table:table-cell>
          <table:table-cell table:number-columns-repeated="4"/>
        </table:table-row>
        <table:table-row table:style-name="ro1">
          <table:table-cell office:value-type="float" office:value="508.50390625">
            <text:p>508.50390625</text:p>
          </table:table-cell>
          <table:table-cell office:value-type="float" office:value="-0.008614648">
            <text:p>-0.008614648</text:p>
          </table:table-cell>
          <table:table-cell table:number-columns-repeated="4"/>
        </table:table-row>
        <table:table-row table:style-name="ro1">
          <table:table-cell office:value-type="float" office:value="508.620422363281">
            <text:p>508.6204223633</text:p>
          </table:table-cell>
          <table:table-cell office:value-type="float" office:value="-0.01018819">
            <text:p>-0.01018819</text:p>
          </table:table-cell>
          <table:table-cell table:number-columns-repeated="4"/>
        </table:table-row>
        <table:table-row table:style-name="ro1">
          <table:table-cell office:value-type="float" office:value="508.736938476563">
            <text:p>508.7369384766</text:p>
          </table:table-cell>
          <table:table-cell office:value-type="float" office:value="0.01894927">
            <text:p>0.01894927</text:p>
          </table:table-cell>
          <table:table-cell table:number-columns-repeated="4"/>
        </table:table-row>
        <table:table-row table:style-name="ro1">
          <table:table-cell office:value-type="float" office:value="508.853454589844">
            <text:p>508.8534545898</text:p>
          </table:table-cell>
          <table:table-cell office:value-type="float" office:value="0.004764076">
            <text:p>0.004764076</text:p>
          </table:table-cell>
          <table:table-cell table:number-columns-repeated="4"/>
        </table:table-row>
        <table:table-row table:style-name="ro1">
          <table:table-cell office:value-type="float" office:value="508.970001220703">
            <text:p>508.9700012207</text:p>
          </table:table-cell>
          <table:table-cell office:value-type="float" office:value="-0.00619933">
            <text:p>-0.00619933</text:p>
          </table:table-cell>
          <table:table-cell table:number-columns-repeated="4"/>
        </table:table-row>
        <table:table-row table:style-name="ro1">
          <table:table-cell office:value-type="float" office:value="509.086517333984">
            <text:p>509.086517334</text:p>
          </table:table-cell>
          <table:table-cell office:value-type="float" office:value="-0.001938668">
            <text:p>-0.001938668</text:p>
          </table:table-cell>
          <table:table-cell table:number-columns-repeated="4"/>
        </table:table-row>
        <table:table-row table:style-name="ro1">
          <table:table-cell office:value-type="float" office:value="509.203063964844">
            <text:p>509.2030639648</text:p>
          </table:table-cell>
          <table:table-cell office:value-type="float" office:value="0.01399524">
            <text:p>0.01399524</text:p>
          </table:table-cell>
          <table:table-cell table:number-columns-repeated="4"/>
        </table:table-row>
        <table:table-row table:style-name="ro1">
          <table:table-cell office:value-type="float" office:value="509.319580078125">
            <text:p>509.3195800781</text:p>
          </table:table-cell>
          <table:table-cell office:value-type="float" office:value="-0.004343016">
            <text:p>-0.004343016</text:p>
          </table:table-cell>
          <table:table-cell table:number-columns-repeated="4"/>
        </table:table-row>
        <table:table-row table:style-name="ro1">
          <table:table-cell office:value-type="float" office:value="509.436126708984">
            <text:p>509.436126709</text:p>
          </table:table-cell>
          <table:table-cell office:value-type="float" office:value="-0.004768871">
            <text:p>-0.004768871</text:p>
          </table:table-cell>
          <table:table-cell table:number-columns-repeated="4"/>
        </table:table-row>
        <table:table-row table:style-name="ro1">
          <table:table-cell office:value-type="float" office:value="509.552673339844">
            <text:p>509.5526733398</text:p>
          </table:table-cell>
          <table:table-cell office:value-type="float" office:value="-0.007339101">
            <text:p>-0.007339101</text:p>
          </table:table-cell>
          <table:table-cell table:number-columns-repeated="4"/>
        </table:table-row>
        <table:table-row table:style-name="ro1">
          <table:table-cell office:value-type="float" office:value="509.669219970703">
            <text:p>509.6692199707</text:p>
          </table:table-cell>
          <table:table-cell office:value-type="float" office:value="0.006664636">
            <text:p>0.006664636</text:p>
          </table:table-cell>
          <table:table-cell table:number-columns-repeated="4"/>
        </table:table-row>
        <table:table-row table:style-name="ro1">
          <table:table-cell office:value-type="float" office:value="509.785766601563">
            <text:p>509.7857666016</text:p>
          </table:table-cell>
          <table:table-cell office:value-type="float" office:value="0.002409657">
            <text:p>0.002409657</text:p>
          </table:table-cell>
          <table:table-cell table:number-columns-repeated="4"/>
        </table:table-row>
        <table:table-row table:style-name="ro1">
          <table:table-cell office:value-type="float" office:value="509.902313232422">
            <text:p>509.9023132324</text:p>
          </table:table-cell>
          <table:table-cell office:value-type="float" office:value="-0.003480327">
            <text:p>-0.003480327</text:p>
          </table:table-cell>
          <table:table-cell table:number-columns-repeated="4"/>
        </table:table-row>
        <table:table-row table:style-name="ro1">
          <table:table-cell office:value-type="float" office:value="510.018890380859">
            <text:p>510.0188903809</text:p>
          </table:table-cell>
          <table:table-cell office:value-type="float" office:value="-0.01114464">
            <text:p>-0.01114464</text:p>
          </table:table-cell>
          <table:table-cell table:number-columns-repeated="4"/>
        </table:table-row>
        <table:table-row table:style-name="ro1">
          <table:table-cell office:value-type="float" office:value="510.135437011719">
            <text:p>510.1354370117</text:p>
          </table:table-cell>
          <table:table-cell office:value-type="float" office:value="-0.004806173">
            <text:p>-0.004806173</text:p>
          </table:table-cell>
          <table:table-cell table:number-columns-repeated="4"/>
        </table:table-row>
        <table:table-row table:style-name="ro1">
          <table:table-cell office:value-type="float" office:value="510.252014160156">
            <text:p>510.2520141602</text:p>
          </table:table-cell>
          <table:table-cell office:value-type="float" office:value="0.004010473">
            <text:p>0.004010473</text:p>
          </table:table-cell>
          <table:table-cell table:number-columns-repeated="4"/>
        </table:table-row>
        <table:table-row table:style-name="ro1">
          <table:table-cell office:value-type="float" office:value="510.368560791016">
            <text:p>510.368560791</text:p>
          </table:table-cell>
          <table:table-cell office:value-type="float" office:value="-0.004514159">
            <text:p>-0.004514159</text:p>
          </table:table-cell>
          <table:table-cell table:number-columns-repeated="4"/>
        </table:table-row>
        <table:table-row table:style-name="ro1">
          <table:table-cell office:value-type="float" office:value="510.485137939453">
            <text:p>510.4851379395</text:p>
          </table:table-cell>
          <table:table-cell office:value-type="float" office:value="-0.01247043">
            <text:p>-0.01247043</text:p>
          </table:table-cell>
          <table:table-cell table:number-columns-repeated="4"/>
        </table:table-row>
        <table:table-row table:style-name="ro1">
          <table:table-cell office:value-type="float" office:value="510.601715087891">
            <text:p>510.6017150879</text:p>
          </table:table-cell>
          <table:table-cell office:value-type="float" office:value="0.004822687">
            <text:p>0.004822687</text:p>
          </table:table-cell>
          <table:table-cell table:number-columns-repeated="4"/>
        </table:table-row>
        <table:table-row table:style-name="ro1">
          <table:table-cell office:value-type="float" office:value="510.718322753906">
            <text:p>510.7183227539</text:p>
          </table:table-cell>
          <table:table-cell office:value-type="float" office:value="0.001225702">
            <text:p>0.001225702</text:p>
          </table:table-cell>
          <table:table-cell table:number-columns-repeated="4"/>
        </table:table-row>
        <table:table-row table:style-name="ro1">
          <table:table-cell office:value-type="float" office:value="510.834899902344">
            <text:p>510.8348999023</text:p>
          </table:table-cell>
          <table:table-cell office:value-type="float" office:value="-0.01333839">
            <text:p>-0.01333839</text:p>
          </table:table-cell>
          <table:table-cell table:number-columns-repeated="4"/>
        </table:table-row>
        <table:table-row table:style-name="ro1">
          <table:table-cell office:value-type="float" office:value="510.951477050781">
            <text:p>510.9514770508</text:p>
          </table:table-cell>
          <table:table-cell office:value-type="float" office:value="0.009392478">
            <text:p>0.009392478</text:p>
          </table:table-cell>
          <table:table-cell table:number-columns-repeated="4"/>
        </table:table-row>
        <table:table-row table:style-name="ro1">
          <table:table-cell office:value-type="float" office:value="511.068084716797">
            <text:p>511.0680847168</text:p>
          </table:table-cell>
          <table:table-cell office:value-type="float" office:value="-0.003535453">
            <text:p>-0.003535453</text:p>
          </table:table-cell>
          <table:table-cell table:number-columns-repeated="4"/>
        </table:table-row>
        <table:table-row table:style-name="ro1">
          <table:table-cell office:value-type="float" office:value="511.184661865234">
            <text:p>511.1846618652</text:p>
          </table:table-cell>
          <table:table-cell office:value-type="float" office:value="-0.007130796">
            <text:p>-0.007130796</text:p>
          </table:table-cell>
          <table:table-cell table:number-columns-repeated="4"/>
        </table:table-row>
        <table:table-row table:style-name="ro1">
          <table:table-cell office:value-type="float" office:value="511.30126953125">
            <text:p>511.3012695313</text:p>
          </table:table-cell>
          <table:table-cell office:value-type="float" office:value="-0.01189995">
            <text:p>-0.01189995</text:p>
          </table:table-cell>
          <table:table-cell table:number-columns-repeated="4"/>
        </table:table-row>
        <table:table-row table:style-name="ro1">
          <table:table-cell office:value-type="float" office:value="511.417877197266">
            <text:p>511.4178771973</text:p>
          </table:table-cell>
          <table:table-cell office:value-type="float" office:value="-0.01401315">
            <text:p>-0.01401315</text:p>
          </table:table-cell>
          <table:table-cell table:number-columns-repeated="4"/>
        </table:table-row>
        <table:table-row table:style-name="ro1">
          <table:table-cell office:value-type="float" office:value="511.534484863281">
            <text:p>511.5344848633</text:p>
          </table:table-cell>
          <table:table-cell office:value-type="float" office:value="-0.006204878">
            <text:p>-0.006204878</text:p>
          </table:table-cell>
          <table:table-cell table:number-columns-repeated="4"/>
        </table:table-row>
        <table:table-row table:style-name="ro1">
          <table:table-cell office:value-type="float" office:value="511.651092529297">
            <text:p>511.6510925293</text:p>
          </table:table-cell>
          <table:table-cell office:value-type="float" office:value="-0.007028077">
            <text:p>-0.007028077</text:p>
          </table:table-cell>
          <table:table-cell table:number-columns-repeated="4"/>
        </table:table-row>
        <table:table-row table:style-name="ro1">
          <table:table-cell office:value-type="float" office:value="511.767700195313">
            <text:p>511.7677001953</text:p>
          </table:table-cell>
          <table:table-cell office:value-type="float" office:value="-0.003808243">
            <text:p>-0.003808243</text:p>
          </table:table-cell>
          <table:table-cell table:number-columns-repeated="4"/>
        </table:table-row>
        <table:table-row table:style-name="ro1">
          <table:table-cell office:value-type="float" office:value="511.884338378906">
            <text:p>511.8843383789</text:p>
          </table:table-cell>
          <table:table-cell office:value-type="float" office:value="-0.004244972">
            <text:p>-0.004244972</text:p>
          </table:table-cell>
          <table:table-cell table:number-columns-repeated="4"/>
        </table:table-row>
        <table:table-row table:style-name="ro1">
          <table:table-cell office:value-type="float" office:value="512.0009765625">
            <text:p>512.0009765625</text:p>
          </table:table-cell>
          <table:table-cell office:value-type="float" office:value="-0.006780987">
            <text:p>-0.006780987</text:p>
          </table:table-cell>
          <table:table-cell table:number-columns-repeated="4"/>
        </table:table-row>
        <table:table-row table:style-name="ro1">
          <table:table-cell office:value-type="float" office:value="512.117553710938">
            <text:p>512.1175537109</text:p>
          </table:table-cell>
          <table:table-cell office:value-type="float" office:value="0.004288382">
            <text:p>0.004288382</text:p>
          </table:table-cell>
          <table:table-cell table:number-columns-repeated="4"/>
        </table:table-row>
        <table:table-row table:style-name="ro1">
          <table:table-cell office:value-type="float" office:value="512.234191894531">
            <text:p>512.2341918945</text:p>
          </table:table-cell>
          <table:table-cell office:value-type="float" office:value="0.008146204">
            <text:p>0.008146204</text:p>
          </table:table-cell>
          <table:table-cell table:number-columns-repeated="4"/>
        </table:table-row>
        <table:table-row table:style-name="ro1">
          <table:table-cell office:value-type="float" office:value="512.350830078125">
            <text:p>512.3508300781</text:p>
          </table:table-cell>
          <table:table-cell office:value-type="float" office:value="-0.001694738">
            <text:p>-0.001694738</text:p>
          </table:table-cell>
          <table:table-cell table:number-columns-repeated="4"/>
        </table:table-row>
        <table:table-row table:style-name="ro1">
          <table:table-cell office:value-type="float" office:value="512.467468261719">
            <text:p>512.4674682617</text:p>
          </table:table-cell>
          <table:table-cell office:value-type="float" office:value="0.008553232">
            <text:p>0.008553232</text:p>
          </table:table-cell>
          <table:table-cell table:number-columns-repeated="4"/>
        </table:table-row>
        <table:table-row table:style-name="ro1">
          <table:table-cell office:value-type="float" office:value="512.584106445313">
            <text:p>512.5841064453</text:p>
          </table:table-cell>
          <table:table-cell office:value-type="float" office:value="-0.003045182">
            <text:p>-0.003045182</text:p>
          </table:table-cell>
          <table:table-cell table:number-columns-repeated="4"/>
        </table:table-row>
        <table:table-row table:style-name="ro1">
          <table:table-cell office:value-type="float" office:value="512.700744628906">
            <text:p>512.7007446289</text:p>
          </table:table-cell>
          <table:table-cell office:value-type="float" office:value="0.02171144">
            <text:p>0.02171144</text:p>
          </table:table-cell>
          <table:table-cell table:number-columns-repeated="4"/>
        </table:table-row>
        <table:table-row table:style-name="ro1">
          <table:table-cell office:value-type="float" office:value="512.8173828125">
            <text:p>512.8173828125</text:p>
          </table:table-cell>
          <table:table-cell office:value-type="float" office:value="-0.0109748">
            <text:p>-0.0109748</text:p>
          </table:table-cell>
          <table:table-cell table:number-columns-repeated="4"/>
        </table:table-row>
        <table:table-row table:style-name="ro1">
          <table:table-cell office:value-type="float" office:value="512.93408203125">
            <text:p>512.9340820313</text:p>
          </table:table-cell>
          <table:table-cell office:value-type="float" office:value="0.004669605">
            <text:p>0.004669605</text:p>
          </table:table-cell>
          <table:table-cell table:number-columns-repeated="4"/>
        </table:table-row>
        <table:table-row table:style-name="ro1">
          <table:table-cell office:value-type="float" office:value="513.050720214844">
            <text:p>513.0507202148</text:p>
          </table:table-cell>
          <table:table-cell office:value-type="float" office:value="0.004388459">
            <text:p>0.004388459</text:p>
          </table:table-cell>
          <table:table-cell table:number-columns-repeated="4"/>
        </table:table-row>
        <table:table-row table:style-name="ro1">
          <table:table-cell office:value-type="float" office:value="513.167358398438">
            <text:p>513.1673583984</text:p>
          </table:table-cell>
          <table:table-cell office:value-type="float" office:value="-0.01047995">
            <text:p>-0.01047995</text:p>
          </table:table-cell>
          <table:table-cell table:number-columns-repeated="4"/>
        </table:table-row>
        <table:table-row table:style-name="ro1">
          <table:table-cell office:value-type="float" office:value="513.284057617188">
            <text:p>513.2840576172</text:p>
          </table:table-cell>
          <table:table-cell office:value-type="float" office:value="-0.0111981">
            <text:p>-0.0111981</text:p>
          </table:table-cell>
          <table:table-cell table:number-columns-repeated="4"/>
        </table:table-row>
        <table:table-row table:style-name="ro1">
          <table:table-cell office:value-type="float" office:value="513.400695800781">
            <text:p>513.4006958008</text:p>
          </table:table-cell>
          <table:table-cell office:value-type="float" office:value="0.009239228">
            <text:p>0.009239228</text:p>
          </table:table-cell>
          <table:table-cell table:number-columns-repeated="4"/>
        </table:table-row>
        <table:table-row table:style-name="ro1">
          <table:table-cell office:value-type="float" office:value="513.517395019531">
            <text:p>513.5173950195</text:p>
          </table:table-cell>
          <table:table-cell office:value-type="float" office:value="0.003517401">
            <text:p>0.003517401</text:p>
          </table:table-cell>
          <table:table-cell table:number-columns-repeated="4"/>
        </table:table-row>
        <table:table-row table:style-name="ro1">
          <table:table-cell office:value-type="float" office:value="513.634033203125">
            <text:p>513.6340332031</text:p>
          </table:table-cell>
          <table:table-cell office:value-type="float" office:value="-0.005730241">
            <text:p>-0.005730241</text:p>
          </table:table-cell>
          <table:table-cell table:number-columns-repeated="4"/>
        </table:table-row>
        <table:table-row table:style-name="ro1">
          <table:table-cell office:value-type="float" office:value="513.750732421875">
            <text:p>513.7507324219</text:p>
          </table:table-cell>
          <table:table-cell office:value-type="float" office:value="0.006150702">
            <text:p>0.006150702</text:p>
          </table:table-cell>
          <table:table-cell table:number-columns-repeated="4"/>
        </table:table-row>
        <table:table-row table:style-name="ro1">
          <table:table-cell office:value-type="float" office:value="513.867431640625">
            <text:p>513.8674316406</text:p>
          </table:table-cell>
          <table:table-cell office:value-type="float" office:value="0.004160631">
            <text:p>0.004160631</text:p>
          </table:table-cell>
          <table:table-cell table:number-columns-repeated="4"/>
        </table:table-row>
        <table:table-row table:style-name="ro1">
          <table:table-cell office:value-type="float" office:value="513.984069824219">
            <text:p>513.9840698242</text:p>
          </table:table-cell>
          <table:table-cell office:value-type="float" office:value="0.005713054">
            <text:p>0.005713054</text:p>
          </table:table-cell>
          <table:table-cell table:number-columns-repeated="4"/>
        </table:table-row>
        <table:table-row table:style-name="ro1">
          <table:table-cell office:value-type="float" office:value="514.100769042969">
            <text:p>514.100769043</text:p>
          </table:table-cell>
          <table:table-cell office:value-type="float" office:value="0.009917497">
            <text:p>0.009917497</text:p>
          </table:table-cell>
          <table:table-cell table:number-columns-repeated="4"/>
        </table:table-row>
        <table:table-row table:style-name="ro1">
          <table:table-cell office:value-type="float" office:value="514.217468261719">
            <text:p>514.2174682617</text:p>
          </table:table-cell>
          <table:table-cell office:value-type="float" office:value="-0.004895819">
            <text:p>-0.004895819</text:p>
          </table:table-cell>
          <table:table-cell table:number-columns-repeated="4"/>
        </table:table-row>
        <table:table-row table:style-name="ro1">
          <table:table-cell office:value-type="float" office:value="514.334167480469">
            <text:p>514.3341674805</text:p>
          </table:table-cell>
          <table:table-cell office:value-type="float" office:value="-0.0003687414">
            <text:p>-0.0003687414</text:p>
          </table:table-cell>
          <table:table-cell table:number-columns-repeated="4"/>
        </table:table-row>
        <table:table-row table:style-name="ro1">
          <table:table-cell office:value-type="float" office:value="514.450866699219">
            <text:p>514.4508666992</text:p>
          </table:table-cell>
          <table:table-cell office:value-type="float" office:value="0.006284454">
            <text:p>0.006284454</text:p>
          </table:table-cell>
          <table:table-cell table:number-columns-repeated="4"/>
        </table:table-row>
        <table:table-row table:style-name="ro1">
          <table:table-cell office:value-type="float" office:value="514.567565917969">
            <text:p>514.567565918</text:p>
          </table:table-cell>
          <table:table-cell office:value-type="float" office:value="-0.00816989">
            <text:p>-0.00816989</text:p>
          </table:table-cell>
          <table:table-cell table:number-columns-repeated="4"/>
        </table:table-row>
        <table:table-row table:style-name="ro1">
          <table:table-cell office:value-type="float" office:value="514.684265136719">
            <text:p>514.6842651367</text:p>
          </table:table-cell>
          <table:table-cell office:value-type="float" office:value="0.000676784">
            <text:p>0.000676784</text:p>
          </table:table-cell>
          <table:table-cell table:number-columns-repeated="4"/>
        </table:table-row>
        <table:table-row table:style-name="ro1">
          <table:table-cell office:value-type="float" office:value="514.801025390625">
            <text:p>514.8010253906</text:p>
          </table:table-cell>
          <table:table-cell office:value-type="float" office:value="-0.0009558017">
            <text:p>-0.0009558017</text:p>
          </table:table-cell>
          <table:table-cell table:number-columns-repeated="4"/>
        </table:table-row>
        <table:table-row table:style-name="ro1">
          <table:table-cell office:value-type="float" office:value="514.917724609375">
            <text:p>514.9177246094</text:p>
          </table:table-cell>
          <table:table-cell office:value-type="float" office:value="0.004443909">
            <text:p>0.004443909</text:p>
          </table:table-cell>
          <table:table-cell table:number-columns-repeated="4"/>
        </table:table-row>
        <table:table-row table:style-name="ro1">
          <table:table-cell office:value-type="float" office:value="515.034423828125">
            <text:p>515.0344238281</text:p>
          </table:table-cell>
          <table:table-cell office:value-type="float" office:value="-0.004908312">
            <text:p>-0.004908312</text:p>
          </table:table-cell>
          <table:table-cell table:number-columns-repeated="4"/>
        </table:table-row>
        <table:table-row table:style-name="ro1">
          <table:table-cell office:value-type="float" office:value="515.151184082031">
            <text:p>515.151184082</text:p>
          </table:table-cell>
          <table:table-cell office:value-type="float" office:value="-0.01369707">
            <text:p>-0.01369707</text:p>
          </table:table-cell>
          <table:table-cell table:number-columns-repeated="4"/>
        </table:table-row>
        <table:table-row table:style-name="ro1">
          <table:table-cell office:value-type="float" office:value="515.267883300781">
            <text:p>515.2678833008</text:p>
          </table:table-cell>
          <table:table-cell office:value-type="float" office:value="-0.002781037">
            <text:p>-0.002781037</text:p>
          </table:table-cell>
          <table:table-cell table:number-columns-repeated="4"/>
        </table:table-row>
        <table:table-row table:style-name="ro1">
          <table:table-cell office:value-type="float" office:value="515.384643554688">
            <text:p>515.3846435547</text:p>
          </table:table-cell>
          <table:table-cell office:value-type="float" office:value="0.005344789">
            <text:p>0.005344789</text:p>
          </table:table-cell>
          <table:table-cell table:number-columns-repeated="4"/>
        </table:table-row>
        <table:table-row table:style-name="ro1">
          <table:table-cell office:value-type="float" office:value="515.501342773438">
            <text:p>515.5013427734</text:p>
          </table:table-cell>
          <table:table-cell office:value-type="float" office:value="-0.0009756539">
            <text:p>-0.0009756539</text:p>
          </table:table-cell>
          <table:table-cell table:number-columns-repeated="4"/>
        </table:table-row>
        <table:table-row table:style-name="ro1">
          <table:table-cell office:value-type="float" office:value="515.618103027344">
            <text:p>515.6181030273</text:p>
          </table:table-cell>
          <table:table-cell office:value-type="float" office:value="0.00180729">
            <text:p>0.00180729</text:p>
          </table:table-cell>
          <table:table-cell table:number-columns-repeated="4"/>
        </table:table-row>
        <table:table-row table:style-name="ro1">
          <table:table-cell office:value-type="float" office:value="515.734802246094">
            <text:p>515.7348022461</text:p>
          </table:table-cell>
          <table:table-cell office:value-type="float" office:value="-0.003355527">
            <text:p>-0.003355527</text:p>
          </table:table-cell>
          <table:table-cell table:number-columns-repeated="4"/>
        </table:table-row>
        <table:table-row table:style-name="ro1">
          <table:table-cell office:value-type="float" office:value="515.8515625">
            <text:p>515.8515625</text:p>
          </table:table-cell>
          <table:table-cell office:value-type="float" office:value="0.01235353">
            <text:p>0.01235353</text:p>
          </table:table-cell>
          <table:table-cell table:number-columns-repeated="4"/>
        </table:table-row>
        <table:table-row table:style-name="ro1">
          <table:table-cell office:value-type="float" office:value="515.968322753906">
            <text:p>515.9683227539</text:p>
          </table:table-cell>
          <table:table-cell office:value-type="float" office:value="-0.0002036861">
            <text:p>-0.0002036861</text:p>
          </table:table-cell>
          <table:table-cell table:number-columns-repeated="4"/>
        </table:table-row>
        <table:table-row table:style-name="ro1">
          <table:table-cell office:value-type="float" office:value="516.085083007813">
            <text:p>516.0850830078</text:p>
          </table:table-cell>
          <table:table-cell office:value-type="float" office:value="0.0009386968">
            <text:p>0.0009386968</text:p>
          </table:table-cell>
          <table:table-cell table:number-columns-repeated="4"/>
        </table:table-row>
        <table:table-row table:style-name="ro1">
          <table:table-cell office:value-type="float" office:value="516.201843261719">
            <text:p>516.2018432617</text:p>
          </table:table-cell>
          <table:table-cell office:value-type="float" office:value="-0.003194618">
            <text:p>-0.003194618</text:p>
          </table:table-cell>
          <table:table-cell table:number-columns-repeated="4"/>
        </table:table-row>
        <table:table-row table:style-name="ro1">
          <table:table-cell office:value-type="float" office:value="516.318603515625">
            <text:p>516.3186035156</text:p>
          </table:table-cell>
          <table:table-cell office:value-type="float" office:value="-0.006235525">
            <text:p>-0.006235525</text:p>
          </table:table-cell>
          <table:table-cell table:number-columns-repeated="4"/>
        </table:table-row>
        <table:table-row table:style-name="ro1">
          <table:table-cell office:value-type="float" office:value="516.435363769531">
            <text:p>516.4353637695</text:p>
          </table:table-cell>
          <table:table-cell office:value-type="float" office:value="-0.008334293">
            <text:p>-0.008334293</text:p>
          </table:table-cell>
          <table:table-cell table:number-columns-repeated="4"/>
        </table:table-row>
        <table:table-row table:style-name="ro1">
          <table:table-cell office:value-type="float" office:value="516.552124023438">
            <text:p>516.5521240234</text:p>
          </table:table-cell>
          <table:table-cell office:value-type="float" office:value="-0.002957814">
            <text:p>-0.002957814</text:p>
          </table:table-cell>
          <table:table-cell table:number-columns-repeated="4"/>
        </table:table-row>
        <table:table-row table:style-name="ro1">
          <table:table-cell office:value-type="float" office:value="516.668884277344">
            <text:p>516.6688842773</text:p>
          </table:table-cell>
          <table:table-cell office:value-type="float" office:value="-0.00314821">
            <text:p>-0.00314821</text:p>
          </table:table-cell>
          <table:table-cell table:number-columns-repeated="4"/>
        </table:table-row>
        <table:table-row table:style-name="ro1">
          <table:table-cell office:value-type="float" office:value="516.78564453125">
            <text:p>516.7856445313</text:p>
          </table:table-cell>
          <table:table-cell office:value-type="float" office:value="0.01197539">
            <text:p>0.01197539</text:p>
          </table:table-cell>
          <table:table-cell table:number-columns-repeated="4"/>
        </table:table-row>
        <table:table-row table:style-name="ro1">
          <table:table-cell office:value-type="float" office:value="516.902465820313">
            <text:p>516.9024658203</text:p>
          </table:table-cell>
          <table:table-cell office:value-type="float" office:value="0.03308583">
            <text:p>0.03308583</text:p>
          </table:table-cell>
          <table:table-cell table:number-columns-repeated="4"/>
        </table:table-row>
        <table:table-row table:style-name="ro1">
          <table:table-cell office:value-type="float" office:value="517.019226074219">
            <text:p>517.0192260742</text:p>
          </table:table-cell>
          <table:table-cell office:value-type="float" office:value="-0.007219942">
            <text:p>-0.007219942</text:p>
          </table:table-cell>
          <table:table-cell table:number-columns-repeated="4"/>
        </table:table-row>
        <table:table-row table:style-name="ro1">
          <table:table-cell office:value-type="float" office:value="517.135986328125">
            <text:p>517.1359863281</text:p>
          </table:table-cell>
          <table:table-cell office:value-type="float" office:value="-0.00037022">
            <text:p>-0.00037022</text:p>
          </table:table-cell>
          <table:table-cell table:number-columns-repeated="4"/>
        </table:table-row>
        <table:table-row table:style-name="ro1">
          <table:table-cell office:value-type="float" office:value="517.252807617188">
            <text:p>517.2528076172</text:p>
          </table:table-cell>
          <table:table-cell office:value-type="float" office:value="0.005260281">
            <text:p>0.005260281</text:p>
          </table:table-cell>
          <table:table-cell table:number-columns-repeated="4"/>
        </table:table-row>
        <table:table-row table:style-name="ro1">
          <table:table-cell office:value-type="float" office:value="517.369567871094">
            <text:p>517.3695678711</text:p>
          </table:table-cell>
          <table:table-cell office:value-type="float" office:value="-0.006909472">
            <text:p>-0.006909472</text:p>
          </table:table-cell>
          <table:table-cell table:number-columns-repeated="4"/>
        </table:table-row>
        <table:table-row table:style-name="ro1">
          <table:table-cell office:value-type="float" office:value="517.486389160156">
            <text:p>517.4863891602</text:p>
          </table:table-cell>
          <table:table-cell office:value-type="float" office:value="0.001876286">
            <text:p>0.001876286</text:p>
          </table:table-cell>
          <table:table-cell table:number-columns-repeated="4"/>
        </table:table-row>
        <table:table-row table:style-name="ro1">
          <table:table-cell office:value-type="float" office:value="517.603210449219">
            <text:p>517.6032104492</text:p>
          </table:table-cell>
          <table:table-cell office:value-type="float" office:value="0.01341724">
            <text:p>0.01341724</text:p>
          </table:table-cell>
          <table:table-cell table:number-columns-repeated="4"/>
        </table:table-row>
        <table:table-row table:style-name="ro1">
          <table:table-cell office:value-type="float" office:value="517.719970703125">
            <text:p>517.7199707031</text:p>
          </table:table-cell>
          <table:table-cell office:value-type="string">
            <text:p>-5.781766E-05</text:p>
          </table:table-cell>
          <table:table-cell table:number-columns-repeated="4"/>
        </table:table-row>
        <table:table-row table:style-name="ro1">
          <table:table-cell office:value-type="float" office:value="517.836791992188">
            <text:p>517.8367919922</text:p>
          </table:table-cell>
          <table:table-cell office:value-type="float" office:value="0.002871351">
            <text:p>0.002871351</text:p>
          </table:table-cell>
          <table:table-cell table:number-columns-repeated="4"/>
        </table:table-row>
        <table:table-row table:style-name="ro1">
          <table:table-cell office:value-type="float" office:value="517.95361328125">
            <text:p>517.9536132813</text:p>
          </table:table-cell>
          <table:table-cell office:value-type="float" office:value="0.0001537292">
            <text:p>0.0001537292</text:p>
          </table:table-cell>
          <table:table-cell table:number-columns-repeated="4"/>
        </table:table-row>
        <table:table-row table:style-name="ro1">
          <table:table-cell office:value-type="float" office:value="518.070434570313">
            <text:p>518.0704345703</text:p>
          </table:table-cell>
          <table:table-cell office:value-type="float" office:value="-0.005558189">
            <text:p>-0.005558189</text:p>
          </table:table-cell>
          <table:table-cell table:number-columns-repeated="4"/>
        </table:table-row>
        <table:table-row table:style-name="ro1">
          <table:table-cell office:value-type="float" office:value="518.187255859375">
            <text:p>518.1872558594</text:p>
          </table:table-cell>
          <table:table-cell office:value-type="float" office:value="0.00508991">
            <text:p>0.00508991</text:p>
          </table:table-cell>
          <table:table-cell table:number-columns-repeated="4"/>
        </table:table-row>
        <table:table-row table:style-name="ro1">
          <table:table-cell office:value-type="float" office:value="518.304077148438">
            <text:p>518.3040771484</text:p>
          </table:table-cell>
          <table:table-cell office:value-type="float" office:value="0.01322466">
            <text:p>0.01322466</text:p>
          </table:table-cell>
          <table:table-cell table:number-columns-repeated="4"/>
        </table:table-row>
        <table:table-row table:style-name="ro1">
          <table:table-cell office:value-type="float" office:value="518.4208984375">
            <text:p>518.4208984375</text:p>
          </table:table-cell>
          <table:table-cell office:value-type="float" office:value="0.00483311">
            <text:p>0.00483311</text:p>
          </table:table-cell>
          <table:table-cell table:number-columns-repeated="4"/>
        </table:table-row>
        <table:table-row table:style-name="ro1">
          <table:table-cell office:value-type="float" office:value="518.537719726563">
            <text:p>518.5377197266</text:p>
          </table:table-cell>
          <table:table-cell office:value-type="float" office:value="0.02102269">
            <text:p>0.02102269</text:p>
          </table:table-cell>
          <table:table-cell table:number-columns-repeated="4"/>
        </table:table-row>
        <table:table-row table:style-name="ro1">
          <table:table-cell office:value-type="float" office:value="518.654541015625">
            <text:p>518.6545410156</text:p>
          </table:table-cell>
          <table:table-cell office:value-type="float" office:value="0.007204483">
            <text:p>0.007204483</text:p>
          </table:table-cell>
          <table:table-cell table:number-columns-repeated="4"/>
        </table:table-row>
        <table:table-row table:style-name="ro1">
          <table:table-cell office:value-type="float" office:value="518.771362304688">
            <text:p>518.7713623047</text:p>
          </table:table-cell>
          <table:table-cell office:value-type="float" office:value="-0.01093468">
            <text:p>-0.01093468</text:p>
          </table:table-cell>
          <table:table-cell table:number-columns-repeated="4"/>
        </table:table-row>
        <table:table-row table:style-name="ro1">
          <table:table-cell office:value-type="float" office:value="518.888244628906">
            <text:p>518.8882446289</text:p>
          </table:table-cell>
          <table:table-cell office:value-type="float" office:value="-0.01127861">
            <text:p>-0.01127861</text:p>
          </table:table-cell>
          <table:table-cell table:number-columns-repeated="4"/>
        </table:table-row>
        <table:table-row table:style-name="ro1">
          <table:table-cell office:value-type="float" office:value="519.005065917969">
            <text:p>519.005065918</text:p>
          </table:table-cell>
          <table:table-cell office:value-type="float" office:value="0.001134836">
            <text:p>0.001134836</text:p>
          </table:table-cell>
          <table:table-cell table:number-columns-repeated="4"/>
        </table:table-row>
        <table:table-row table:style-name="ro1">
          <table:table-cell office:value-type="float" office:value="519.121887207031">
            <text:p>519.121887207</text:p>
          </table:table-cell>
          <table:table-cell office:value-type="float" office:value="-0.002424677">
            <text:p>-0.002424677</text:p>
          </table:table-cell>
          <table:table-cell table:number-columns-repeated="4"/>
        </table:table-row>
        <table:table-row table:style-name="ro1">
          <table:table-cell office:value-type="float" office:value="519.23876953125">
            <text:p>519.2387695313</text:p>
          </table:table-cell>
          <table:table-cell office:value-type="float" office:value="0.005411181">
            <text:p>0.005411181</text:p>
          </table:table-cell>
          <table:table-cell table:number-columns-repeated="4"/>
        </table:table-row>
        <table:table-row table:style-name="ro1">
          <table:table-cell office:value-type="float" office:value="519.355590820313">
            <text:p>519.3555908203</text:p>
          </table:table-cell>
          <table:table-cell office:value-type="float" office:value="-0.002647329">
            <text:p>-0.002647329</text:p>
          </table:table-cell>
          <table:table-cell table:number-columns-repeated="4"/>
        </table:table-row>
        <table:table-row table:style-name="ro1">
          <table:table-cell office:value-type="float" office:value="519.472473144531">
            <text:p>519.4724731445</text:p>
          </table:table-cell>
          <table:table-cell office:value-type="float" office:value="0.002543526">
            <text:p>0.002543526</text:p>
          </table:table-cell>
          <table:table-cell table:number-columns-repeated="4"/>
        </table:table-row>
        <table:table-row table:style-name="ro1">
          <table:table-cell office:value-type="float" office:value="519.58935546875">
            <text:p>519.5893554688</text:p>
          </table:table-cell>
          <table:table-cell office:value-type="float" office:value="0.0007443523">
            <text:p>0.0007443523</text:p>
          </table:table-cell>
          <table:table-cell table:number-columns-repeated="4"/>
        </table:table-row>
        <table:table-row table:style-name="ro1">
          <table:table-cell office:value-type="float" office:value="519.706176757813">
            <text:p>519.7061767578</text:p>
          </table:table-cell>
          <table:table-cell office:value-type="float" office:value="-0.003823233">
            <text:p>-0.003823233</text:p>
          </table:table-cell>
          <table:table-cell table:number-columns-repeated="4"/>
        </table:table-row>
        <table:table-row table:style-name="ro1">
          <table:table-cell office:value-type="float" office:value="519.823059082031">
            <text:p>519.823059082</text:p>
          </table:table-cell>
          <table:table-cell office:value-type="float" office:value="-0.0067366">
            <text:p>-0.0067366</text:p>
          </table:table-cell>
          <table:table-cell table:number-columns-repeated="4"/>
        </table:table-row>
        <table:table-row table:style-name="ro1">
          <table:table-cell office:value-type="float" office:value="519.93994140625">
            <text:p>519.9399414063</text:p>
          </table:table-cell>
          <table:table-cell office:value-type="float" office:value="0.01517891">
            <text:p>0.01517891</text:p>
          </table:table-cell>
          <table:table-cell table:number-columns-repeated="4"/>
        </table:table-row>
        <table:table-row table:style-name="ro1">
          <table:table-cell office:value-type="float" office:value="520.056823730469">
            <text:p>520.0568237305</text:p>
          </table:table-cell>
          <table:table-cell office:value-type="float" office:value="-0.005930224">
            <text:p>-0.005930224</text:p>
          </table:table-cell>
          <table:table-cell table:number-columns-repeated="4"/>
        </table:table-row>
        <table:table-row table:style-name="ro1">
          <table:table-cell office:value-type="float" office:value="520.173706054688">
            <text:p>520.1737060547</text:p>
          </table:table-cell>
          <table:table-cell office:value-type="string">
            <text:p>-7.749101E-05</text:p>
          </table:table-cell>
          <table:table-cell table:number-columns-repeated="4"/>
        </table:table-row>
        <table:table-row table:style-name="ro1">
          <table:table-cell office:value-type="float" office:value="520.290588378906">
            <text:p>520.2905883789</text:p>
          </table:table-cell>
          <table:table-cell office:value-type="float" office:value="-0.007793396">
            <text:p>-0.007793396</text:p>
          </table:table-cell>
          <table:table-cell table:number-columns-repeated="4"/>
        </table:table-row>
        <table:table-row table:style-name="ro1">
          <table:table-cell office:value-type="float" office:value="520.407470703125">
            <text:p>520.4074707031</text:p>
          </table:table-cell>
          <table:table-cell office:value-type="float" office:value="-0.004078668">
            <text:p>-0.004078668</text:p>
          </table:table-cell>
          <table:table-cell table:number-columns-repeated="4"/>
        </table:table-row>
        <table:table-row table:style-name="ro1">
          <table:table-cell office:value-type="float" office:value="520.524353027344">
            <text:p>520.5243530273</text:p>
          </table:table-cell>
          <table:table-cell office:value-type="float" office:value="-0.006476119">
            <text:p>-0.006476119</text:p>
          </table:table-cell>
          <table:table-cell table:number-columns-repeated="4"/>
        </table:table-row>
        <table:table-row table:style-name="ro1">
          <table:table-cell office:value-type="float" office:value="520.641235351563">
            <text:p>520.6412353516</text:p>
          </table:table-cell>
          <table:table-cell office:value-type="float" office:value="-0.008686448">
            <text:p>-0.008686448</text:p>
          </table:table-cell>
          <table:table-cell table:number-columns-repeated="4"/>
        </table:table-row>
        <table:table-row table:style-name="ro1">
          <table:table-cell office:value-type="float" office:value="520.758178710938">
            <text:p>520.7581787109</text:p>
          </table:table-cell>
          <table:table-cell office:value-type="float" office:value="-0.003461377">
            <text:p>-0.003461377</text:p>
          </table:table-cell>
          <table:table-cell table:number-columns-repeated="4"/>
        </table:table-row>
        <table:table-row table:style-name="ro1">
          <table:table-cell office:value-type="float" office:value="520.875061035156">
            <text:p>520.8750610352</text:p>
          </table:table-cell>
          <table:table-cell office:value-type="float" office:value="0.02320031">
            <text:p>0.02320031</text:p>
          </table:table-cell>
          <table:table-cell table:number-columns-repeated="4"/>
        </table:table-row>
        <table:table-row table:style-name="ro1">
          <table:table-cell office:value-type="float" office:value="520.991943359375">
            <text:p>520.9919433594</text:p>
          </table:table-cell>
          <table:table-cell office:value-type="float" office:value="0.001771432">
            <text:p>0.001771432</text:p>
          </table:table-cell>
          <table:table-cell table:number-columns-repeated="4"/>
        </table:table-row>
        <table:table-row table:style-name="ro1">
          <table:table-cell office:value-type="float" office:value="521.10888671875">
            <text:p>521.1088867188</text:p>
          </table:table-cell>
          <table:table-cell office:value-type="float" office:value="-0.009552298">
            <text:p>-0.009552298</text:p>
          </table:table-cell>
          <table:table-cell table:number-columns-repeated="4"/>
        </table:table-row>
        <table:table-row table:style-name="ro1">
          <table:table-cell office:value-type="float" office:value="521.225769042969">
            <text:p>521.225769043</text:p>
          </table:table-cell>
          <table:table-cell office:value-type="float" office:value="0.0009098702">
            <text:p>0.0009098702</text:p>
          </table:table-cell>
          <table:table-cell table:number-columns-repeated="4"/>
        </table:table-row>
        <table:table-row table:style-name="ro1">
          <table:table-cell office:value-type="float" office:value="521.342712402344">
            <text:p>521.3427124023</text:p>
          </table:table-cell>
          <table:table-cell office:value-type="float" office:value="0.006578246">
            <text:p>0.006578246</text:p>
          </table:table-cell>
          <table:table-cell table:number-columns-repeated="4"/>
        </table:table-row>
        <table:table-row table:style-name="ro1">
          <table:table-cell office:value-type="float" office:value="521.459594726563">
            <text:p>521.4595947266</text:p>
          </table:table-cell>
          <table:table-cell office:value-type="float" office:value="-0.006937866">
            <text:p>-0.006937866</text:p>
          </table:table-cell>
          <table:table-cell table:number-columns-repeated="4"/>
        </table:table-row>
        <table:table-row table:style-name="ro1">
          <table:table-cell office:value-type="float" office:value="521.576538085938">
            <text:p>521.5765380859</text:p>
          </table:table-cell>
          <table:table-cell office:value-type="float" office:value="-0.006338471">
            <text:p>-0.006338471</text:p>
          </table:table-cell>
          <table:table-cell table:number-columns-repeated="4"/>
        </table:table-row>
        <table:table-row table:style-name="ro1">
          <table:table-cell office:value-type="float" office:value="521.693481445313">
            <text:p>521.6934814453</text:p>
          </table:table-cell>
          <table:table-cell office:value-type="float" office:value="-0.002808037">
            <text:p>-0.002808037</text:p>
          </table:table-cell>
          <table:table-cell table:number-columns-repeated="4"/>
        </table:table-row>
        <table:table-row table:style-name="ro1">
          <table:table-cell office:value-type="float" office:value="521.810424804688">
            <text:p>521.8104248047</text:p>
          </table:table-cell>
          <table:table-cell office:value-type="float" office:value="-0.00735308">
            <text:p>-0.00735308</text:p>
          </table:table-cell>
          <table:table-cell table:number-columns-repeated="4"/>
        </table:table-row>
        <table:table-row table:style-name="ro1">
          <table:table-cell office:value-type="float" office:value="521.927307128906">
            <text:p>521.9273071289</text:p>
          </table:table-cell>
          <table:table-cell office:value-type="float" office:value="0.01220219">
            <text:p>0.01220219</text:p>
          </table:table-cell>
          <table:table-cell table:number-columns-repeated="4"/>
        </table:table-row>
        <table:table-row table:style-name="ro1">
          <table:table-cell office:value-type="float" office:value="522.044250488281">
            <text:p>522.0442504883</text:p>
          </table:table-cell>
          <table:table-cell office:value-type="float" office:value="0.001872906">
            <text:p>0.001872906</text:p>
          </table:table-cell>
          <table:table-cell table:number-columns-repeated="4"/>
        </table:table-row>
        <table:table-row table:style-name="ro1">
          <table:table-cell office:value-type="float" office:value="522.161193847656">
            <text:p>522.1611938477</text:p>
          </table:table-cell>
          <table:table-cell office:value-type="float" office:value="0.04099652">
            <text:p>0.04099652</text:p>
          </table:table-cell>
          <table:table-cell table:number-columns-repeated="4"/>
        </table:table-row>
        <table:table-row table:style-name="ro1">
          <table:table-cell office:value-type="float" office:value="522.278137207031">
            <text:p>522.278137207</text:p>
          </table:table-cell>
          <table:table-cell office:value-type="float" office:value="0.009384413">
            <text:p>0.009384413</text:p>
          </table:table-cell>
          <table:table-cell table:number-columns-repeated="4"/>
        </table:table-row>
        <table:table-row table:style-name="ro1">
          <table:table-cell office:value-type="float" office:value="522.395080566406">
            <text:p>522.3950805664</text:p>
          </table:table-cell>
          <table:table-cell office:value-type="float" office:value="0.0001511905">
            <text:p>0.0001511905</text:p>
          </table:table-cell>
          <table:table-cell table:number-columns-repeated="4"/>
        </table:table-row>
        <table:table-row table:style-name="ro1">
          <table:table-cell office:value-type="float" office:value="522.512023925781">
            <text:p>522.5120239258</text:p>
          </table:table-cell>
          <table:table-cell office:value-type="float" office:value="-0.005839935">
            <text:p>-0.005839935</text:p>
          </table:table-cell>
          <table:table-cell table:number-columns-repeated="4"/>
        </table:table-row>
        <table:table-row table:style-name="ro1">
          <table:table-cell office:value-type="float" office:value="522.629028320313">
            <text:p>522.6290283203</text:p>
          </table:table-cell>
          <table:table-cell office:value-type="float" office:value="0.0009562515">
            <text:p>0.0009562515</text:p>
          </table:table-cell>
          <table:table-cell table:number-columns-repeated="4"/>
        </table:table-row>
        <table:table-row table:style-name="ro1">
          <table:table-cell office:value-type="float" office:value="522.745971679688">
            <text:p>522.7459716797</text:p>
          </table:table-cell>
          <table:table-cell office:value-type="float" office:value="-0.0007510778">
            <text:p>-0.0007510778</text:p>
          </table:table-cell>
          <table:table-cell table:number-columns-repeated="4"/>
        </table:table-row>
        <table:table-row table:style-name="ro1">
          <table:table-cell office:value-type="float" office:value="522.862915039063">
            <text:p>522.8629150391</text:p>
          </table:table-cell>
          <table:table-cell office:value-type="float" office:value="0.01670666">
            <text:p>0.01670666</text:p>
          </table:table-cell>
          <table:table-cell table:number-columns-repeated="4"/>
        </table:table-row>
        <table:table-row table:style-name="ro1">
          <table:table-cell office:value-type="float" office:value="522.979919433594">
            <text:p>522.9799194336</text:p>
          </table:table-cell>
          <table:table-cell office:value-type="float" office:value="-0.01138783">
            <text:p>-0.01138783</text:p>
          </table:table-cell>
          <table:table-cell table:number-columns-repeated="4"/>
        </table:table-row>
        <table:table-row table:style-name="ro1">
          <table:table-cell office:value-type="float" office:value="523.096862792969">
            <text:p>523.096862793</text:p>
          </table:table-cell>
          <table:table-cell office:value-type="float" office:value="0.01638635">
            <text:p>0.01638635</text:p>
          </table:table-cell>
          <table:table-cell table:number-columns-repeated="4"/>
        </table:table-row>
        <table:table-row table:style-name="ro1">
          <table:table-cell office:value-type="float" office:value="523.2138671875">
            <text:p>523.2138671875</text:p>
          </table:table-cell>
          <table:table-cell office:value-type="float" office:value="0.006306221">
            <text:p>0.006306221</text:p>
          </table:table-cell>
          <table:table-cell table:number-columns-repeated="4"/>
        </table:table-row>
        <table:table-row table:style-name="ro1">
          <table:table-cell office:value-type="float" office:value="523.330810546875">
            <text:p>523.3308105469</text:p>
          </table:table-cell>
          <table:table-cell office:value-type="float" office:value="0.002950973">
            <text:p>0.002950973</text:p>
          </table:table-cell>
          <table:table-cell table:number-columns-repeated="4"/>
        </table:table-row>
        <table:table-row table:style-name="ro1">
          <table:table-cell office:value-type="float" office:value="523.447814941406">
            <text:p>523.4478149414</text:p>
          </table:table-cell>
          <table:table-cell office:value-type="float" office:value="0.001231364">
            <text:p>0.001231364</text:p>
          </table:table-cell>
          <table:table-cell table:number-columns-repeated="4"/>
        </table:table-row>
        <table:table-row table:style-name="ro1">
          <table:table-cell office:value-type="float" office:value="523.564758300781">
            <text:p>523.5647583008</text:p>
          </table:table-cell>
          <table:table-cell office:value-type="float" office:value="0.001600622">
            <text:p>0.001600622</text:p>
          </table:table-cell>
          <table:table-cell table:number-columns-repeated="4"/>
        </table:table-row>
        <table:table-row table:style-name="ro1">
          <table:table-cell office:value-type="float" office:value="523.681762695313">
            <text:p>523.6817626953</text:p>
          </table:table-cell>
          <table:table-cell office:value-type="float" office:value="-0.004195951">
            <text:p>-0.004195951</text:p>
          </table:table-cell>
          <table:table-cell table:number-columns-repeated="4"/>
        </table:table-row>
        <table:table-row table:style-name="ro1">
          <table:table-cell office:value-type="float" office:value="523.798767089844">
            <text:p>523.7987670898</text:p>
          </table:table-cell>
          <table:table-cell office:value-type="float" office:value="-0.00690208">
            <text:p>-0.00690208</text:p>
          </table:table-cell>
          <table:table-cell table:number-columns-repeated="4"/>
        </table:table-row>
        <table:table-row table:style-name="ro1">
          <table:table-cell office:value-type="float" office:value="523.915771484375">
            <text:p>523.9157714844</text:p>
          </table:table-cell>
          <table:table-cell office:value-type="float" office:value="-0.01118867">
            <text:p>-0.01118867</text:p>
          </table:table-cell>
          <table:table-cell table:number-columns-repeated="4"/>
        </table:table-row>
        <table:table-row table:style-name="ro1">
          <table:table-cell office:value-type="float" office:value="524.032775878906">
            <text:p>524.0327758789</text:p>
          </table:table-cell>
          <table:table-cell office:value-type="float" office:value="0.00818923">
            <text:p>0.00818923</text:p>
          </table:table-cell>
          <table:table-cell table:number-columns-repeated="4"/>
        </table:table-row>
        <table:table-row table:style-name="ro1">
          <table:table-cell office:value-type="float" office:value="524.149719238281">
            <text:p>524.1497192383</text:p>
          </table:table-cell>
          <table:table-cell office:value-type="float" office:value="0.002246246">
            <text:p>0.002246246</text:p>
          </table:table-cell>
          <table:table-cell table:number-columns-repeated="4"/>
        </table:table-row>
        <table:table-row table:style-name="ro1">
          <table:table-cell office:value-type="float" office:value="524.266723632813">
            <text:p>524.2667236328</text:p>
          </table:table-cell>
          <table:table-cell office:value-type="float" office:value="0.004768911">
            <text:p>0.004768911</text:p>
          </table:table-cell>
          <table:table-cell table:number-columns-repeated="4"/>
        </table:table-row>
        <table:table-row table:style-name="ro1">
          <table:table-cell office:value-type="float" office:value="524.3837890625">
            <text:p>524.3837890625</text:p>
          </table:table-cell>
          <table:table-cell office:value-type="float" office:value="-0.01192133">
            <text:p>-0.01192133</text:p>
          </table:table-cell>
          <table:table-cell table:number-columns-repeated="4"/>
        </table:table-row>
        <table:table-row table:style-name="ro1">
          <table:table-cell office:value-type="float" office:value="524.500793457031">
            <text:p>524.500793457</text:p>
          </table:table-cell>
          <table:table-cell office:value-type="float" office:value="0.01979402">
            <text:p>0.01979402</text:p>
          </table:table-cell>
          <table:table-cell table:number-columns-repeated="4"/>
        </table:table-row>
        <table:table-row table:style-name="ro1">
          <table:table-cell office:value-type="float" office:value="524.617797851563">
            <text:p>524.6177978516</text:p>
          </table:table-cell>
          <table:table-cell office:value-type="float" office:value="0.005903137">
            <text:p>0.005903137</text:p>
          </table:table-cell>
          <table:table-cell table:number-columns-repeated="4"/>
        </table:table-row>
        <table:table-row table:style-name="ro1">
          <table:table-cell office:value-type="float" office:value="524.734802246094">
            <text:p>524.7348022461</text:p>
          </table:table-cell>
          <table:table-cell office:value-type="float" office:value="-0.00998092">
            <text:p>-0.00998092</text:p>
          </table:table-cell>
          <table:table-cell table:number-columns-repeated="4"/>
        </table:table-row>
        <table:table-row table:style-name="ro1">
          <table:table-cell office:value-type="float" office:value="524.851806640625">
            <text:p>524.8518066406</text:p>
          </table:table-cell>
          <table:table-cell office:value-type="float" office:value="-0.008395435">
            <text:p>-0.008395435</text:p>
          </table:table-cell>
          <table:table-cell table:number-columns-repeated="4"/>
        </table:table-row>
        <table:table-row table:style-name="ro1">
          <table:table-cell office:value-type="float" office:value="524.968872070313">
            <text:p>524.9688720703</text:p>
          </table:table-cell>
          <table:table-cell office:value-type="float" office:value="-0.0001835648">
            <text:p>-0.0001835648</text:p>
          </table:table-cell>
          <table:table-cell table:number-columns-repeated="4"/>
        </table:table-row>
        <table:table-row table:style-name="ro1">
          <table:table-cell office:value-type="float" office:value="525.085876464844">
            <text:p>525.0858764648</text:p>
          </table:table-cell>
          <table:table-cell office:value-type="float" office:value="0.01998766">
            <text:p>0.01998766</text:p>
          </table:table-cell>
          <table:table-cell table:number-columns-repeated="4"/>
        </table:table-row>
        <table:table-row table:style-name="ro1">
          <table:table-cell office:value-type="float" office:value="525.202941894531">
            <text:p>525.2029418945</text:p>
          </table:table-cell>
          <table:table-cell office:value-type="float" office:value="-0.006452098">
            <text:p>-0.006452098</text:p>
          </table:table-cell>
          <table:table-cell table:number-columns-repeated="4"/>
        </table:table-row>
        <table:table-row table:style-name="ro1">
          <table:table-cell office:value-type="float" office:value="525.319946289063">
            <text:p>525.3199462891</text:p>
          </table:table-cell>
          <table:table-cell office:value-type="float" office:value="-0.003933405">
            <text:p>-0.003933405</text:p>
          </table:table-cell>
          <table:table-cell table:number-columns-repeated="4"/>
        </table:table-row>
        <table:table-row table:style-name="ro1">
          <table:table-cell office:value-type="float" office:value="525.43701171875">
            <text:p>525.4370117188</text:p>
          </table:table-cell>
          <table:table-cell office:value-type="float" office:value="0.006082948">
            <text:p>0.006082948</text:p>
          </table:table-cell>
          <table:table-cell table:number-columns-repeated="4"/>
        </table:table-row>
        <table:table-row table:style-name="ro1">
          <table:table-cell office:value-type="float" office:value="525.554016113281">
            <text:p>525.5540161133</text:p>
          </table:table-cell>
          <table:table-cell office:value-type="float" office:value="0.00519484">
            <text:p>0.00519484</text:p>
          </table:table-cell>
          <table:table-cell table:number-columns-repeated="4"/>
        </table:table-row>
        <table:table-row table:style-name="ro1">
          <table:table-cell office:value-type="float" office:value="525.671081542969">
            <text:p>525.671081543</text:p>
          </table:table-cell>
          <table:table-cell office:value-type="float" office:value="-0.005567447">
            <text:p>-0.005567447</text:p>
          </table:table-cell>
          <table:table-cell table:number-columns-repeated="4"/>
        </table:table-row>
        <table:table-row table:style-name="ro1">
          <table:table-cell office:value-type="float" office:value="525.788146972656">
            <text:p>525.7881469727</text:p>
          </table:table-cell>
          <table:table-cell office:value-type="float" office:value="-0.01494464">
            <text:p>-0.01494464</text:p>
          </table:table-cell>
          <table:table-cell table:number-columns-repeated="4"/>
        </table:table-row>
        <table:table-row table:style-name="ro1">
          <table:table-cell office:value-type="float" office:value="525.905212402344">
            <text:p>525.9052124023</text:p>
          </table:table-cell>
          <table:table-cell office:value-type="float" office:value="-0.00242818">
            <text:p>-0.00242818</text:p>
          </table:table-cell>
          <table:table-cell table:number-columns-repeated="4"/>
        </table:table-row>
        <table:table-row table:style-name="ro1">
          <table:table-cell office:value-type="float" office:value="526.022277832031">
            <text:p>526.022277832</text:p>
          </table:table-cell>
          <table:table-cell office:value-type="float" office:value="-0.007199016">
            <text:p>-0.007199016</text:p>
          </table:table-cell>
          <table:table-cell table:number-columns-repeated="4"/>
        </table:table-row>
        <table:table-row table:style-name="ro1">
          <table:table-cell office:value-type="float" office:value="526.139282226563">
            <text:p>526.1392822266</text:p>
          </table:table-cell>
          <table:table-cell office:value-type="float" office:value="-0.005228117">
            <text:p>-0.005228117</text:p>
          </table:table-cell>
          <table:table-cell table:number-columns-repeated="4"/>
        </table:table-row>
        <table:table-row table:style-name="ro1">
          <table:table-cell office:value-type="float" office:value="526.25634765625">
            <text:p>526.2563476563</text:p>
          </table:table-cell>
          <table:table-cell office:value-type="float" office:value="0.0139836">
            <text:p>0.0139836</text:p>
          </table:table-cell>
          <table:table-cell table:number-columns-repeated="4"/>
        </table:table-row>
        <table:table-row table:style-name="ro1">
          <table:table-cell office:value-type="float" office:value="526.373474121094">
            <text:p>526.3734741211</text:p>
          </table:table-cell>
          <table:table-cell office:value-type="float" office:value="-0.007438086">
            <text:p>-0.007438086</text:p>
          </table:table-cell>
          <table:table-cell table:number-columns-repeated="4"/>
        </table:table-row>
        <table:table-row table:style-name="ro1">
          <table:table-cell office:value-type="float" office:value="526.490539550781">
            <text:p>526.4905395508</text:p>
          </table:table-cell>
          <table:table-cell office:value-type="float" office:value="0.01184227">
            <text:p>0.01184227</text:p>
          </table:table-cell>
          <table:table-cell table:number-columns-repeated="4"/>
        </table:table-row>
        <table:table-row table:style-name="ro1">
          <table:table-cell office:value-type="float" office:value="526.607604980469">
            <text:p>526.6076049805</text:p>
          </table:table-cell>
          <table:table-cell office:value-type="float" office:value="-0.007418135">
            <text:p>-0.007418135</text:p>
          </table:table-cell>
          <table:table-cell table:number-columns-repeated="4"/>
        </table:table-row>
        <table:table-row table:style-name="ro1">
          <table:table-cell office:value-type="float" office:value="526.724670410156">
            <text:p>526.7246704102</text:p>
          </table:table-cell>
          <table:table-cell office:value-type="float" office:value="0.006926032">
            <text:p>0.006926032</text:p>
          </table:table-cell>
          <table:table-cell table:number-columns-repeated="4"/>
        </table:table-row>
        <table:table-row table:style-name="ro1">
          <table:table-cell office:value-type="float" office:value="526.841735839844">
            <text:p>526.8417358398</text:p>
          </table:table-cell>
          <table:table-cell office:value-type="float" office:value="0.01201486">
            <text:p>0.01201486</text:p>
          </table:table-cell>
          <table:table-cell table:number-columns-repeated="4"/>
        </table:table-row>
        <table:table-row table:style-name="ro1">
          <table:table-cell office:value-type="float" office:value="526.958862304688">
            <text:p>526.9588623047</text:p>
          </table:table-cell>
          <table:table-cell office:value-type="float" office:value="0.0004840202">
            <text:p>0.0004840202</text:p>
          </table:table-cell>
          <table:table-cell table:number-columns-repeated="4"/>
        </table:table-row>
        <table:table-row table:style-name="ro1">
          <table:table-cell office:value-type="float" office:value="527.075927734375">
            <text:p>527.0759277344</text:p>
          </table:table-cell>
          <table:table-cell office:value-type="float" office:value="0.01826999">
            <text:p>0.01826999</text:p>
          </table:table-cell>
          <table:table-cell table:number-columns-repeated="4"/>
        </table:table-row>
        <table:table-row table:style-name="ro1">
          <table:table-cell office:value-type="float" office:value="527.192993164063">
            <text:p>527.1929931641</text:p>
          </table:table-cell>
          <table:table-cell office:value-type="float" office:value="-0.009912643">
            <text:p>-0.009912643</text:p>
          </table:table-cell>
          <table:table-cell table:number-columns-repeated="4"/>
        </table:table-row>
        <table:table-row table:style-name="ro1">
          <table:table-cell office:value-type="float" office:value="527.310119628906">
            <text:p>527.3101196289</text:p>
          </table:table-cell>
          <table:table-cell office:value-type="float" office:value="0.002716702">
            <text:p>0.002716702</text:p>
          </table:table-cell>
          <table:table-cell table:number-columns-repeated="4"/>
        </table:table-row>
        <table:table-row table:style-name="ro1">
          <table:table-cell office:value-type="float" office:value="527.42724609375">
            <text:p>527.4272460938</text:p>
          </table:table-cell>
          <table:table-cell office:value-type="float" office:value="-0.00297118">
            <text:p>-0.00297118</text:p>
          </table:table-cell>
          <table:table-cell table:number-columns-repeated="4"/>
        </table:table-row>
        <table:table-row table:style-name="ro1">
          <table:table-cell office:value-type="float" office:value="527.544311523438">
            <text:p>527.5443115234</text:p>
          </table:table-cell>
          <table:table-cell office:value-type="float" office:value="-0.009082828">
            <text:p>-0.009082828</text:p>
          </table:table-cell>
          <table:table-cell table:number-columns-repeated="4"/>
        </table:table-row>
        <table:table-row table:style-name="ro1">
          <table:table-cell office:value-type="float" office:value="527.661437988281">
            <text:p>527.6614379883</text:p>
          </table:table-cell>
          <table:table-cell office:value-type="float" office:value="-0.0141734">
            <text:p>-0.0141734</text:p>
          </table:table-cell>
          <table:table-cell table:number-columns-repeated="4"/>
        </table:table-row>
        <table:table-row table:style-name="ro1">
          <table:table-cell office:value-type="float" office:value="527.778564453125">
            <text:p>527.7785644531</text:p>
          </table:table-cell>
          <table:table-cell office:value-type="float" office:value="0.006627559">
            <text:p>0.006627559</text:p>
          </table:table-cell>
          <table:table-cell table:number-columns-repeated="4"/>
        </table:table-row>
        <table:table-row table:style-name="ro1">
          <table:table-cell office:value-type="float" office:value="527.895629882813">
            <text:p>527.8956298828</text:p>
          </table:table-cell>
          <table:table-cell office:value-type="float" office:value="0.003121908">
            <text:p>0.003121908</text:p>
          </table:table-cell>
          <table:table-cell table:number-columns-repeated="4"/>
        </table:table-row>
        <table:table-row table:style-name="ro1">
          <table:table-cell office:value-type="float" office:value="528.012756347656">
            <text:p>528.0127563477</text:p>
          </table:table-cell>
          <table:table-cell office:value-type="float" office:value="-0.009146239">
            <text:p>-0.009146239</text:p>
          </table:table-cell>
          <table:table-cell table:number-columns-repeated="4"/>
        </table:table-row>
        <table:table-row table:style-name="ro1">
          <table:table-cell office:value-type="float" office:value="528.1298828125">
            <text:p>528.1298828125</text:p>
          </table:table-cell>
          <table:table-cell office:value-type="float" office:value="-0.002268709">
            <text:p>-0.002268709</text:p>
          </table:table-cell>
          <table:table-cell table:number-columns-repeated="4"/>
        </table:table-row>
        <table:table-row table:style-name="ro1">
          <table:table-cell office:value-type="float" office:value="528.247009277344">
            <text:p>528.2470092773</text:p>
          </table:table-cell>
          <table:table-cell office:value-type="float" office:value="0.00941668">
            <text:p>0.00941668</text:p>
          </table:table-cell>
          <table:table-cell table:number-columns-repeated="4"/>
        </table:table-row>
        <table:table-row table:style-name="ro1">
          <table:table-cell office:value-type="float" office:value="528.364135742188">
            <text:p>528.3641357422</text:p>
          </table:table-cell>
          <table:table-cell office:value-type="float" office:value="-0.009281643">
            <text:p>-0.009281643</text:p>
          </table:table-cell>
          <table:table-cell table:number-columns-repeated="4"/>
        </table:table-row>
        <table:table-row table:style-name="ro1">
          <table:table-cell office:value-type="float" office:value="528.481262207031">
            <text:p>528.481262207</text:p>
          </table:table-cell>
          <table:table-cell office:value-type="float" office:value="0.01910338">
            <text:p>0.01910338</text:p>
          </table:table-cell>
          <table:table-cell table:number-columns-repeated="4"/>
        </table:table-row>
        <table:table-row table:style-name="ro1">
          <table:table-cell office:value-type="float" office:value="528.598388671875">
            <text:p>528.5983886719</text:p>
          </table:table-cell>
          <table:table-cell office:value-type="float" office:value="0.01197138">
            <text:p>0.01197138</text:p>
          </table:table-cell>
          <table:table-cell table:number-columns-repeated="4"/>
        </table:table-row>
        <table:table-row table:style-name="ro1">
          <table:table-cell office:value-type="float" office:value="528.715576171875">
            <text:p>528.7155761719</text:p>
          </table:table-cell>
          <table:table-cell office:value-type="float" office:value="0.002051177">
            <text:p>0.002051177</text:p>
          </table:table-cell>
          <table:table-cell table:number-columns-repeated="4"/>
        </table:table-row>
        <table:table-row table:style-name="ro1">
          <table:table-cell office:value-type="float" office:value="528.832702636719">
            <text:p>528.8327026367</text:p>
          </table:table-cell>
          <table:table-cell office:value-type="float" office:value="-0.0008023802">
            <text:p>-0.0008023802</text:p>
          </table:table-cell>
          <table:table-cell table:number-columns-repeated="4"/>
        </table:table-row>
        <table:table-row table:style-name="ro1">
          <table:table-cell office:value-type="float" office:value="528.949829101563">
            <text:p>528.9498291016</text:p>
          </table:table-cell>
          <table:table-cell office:value-type="float" office:value="-0.005298264">
            <text:p>-0.005298264</text:p>
          </table:table-cell>
          <table:table-cell table:number-columns-repeated="4"/>
        </table:table-row>
        <table:table-row table:style-name="ro1">
          <table:table-cell office:value-type="float" office:value="529.066955566406">
            <text:p>529.0669555664</text:p>
          </table:table-cell>
          <table:table-cell office:value-type="float" office:value="-0.01495555">
            <text:p>-0.01495555</text:p>
          </table:table-cell>
          <table:table-cell table:number-columns-repeated="4"/>
        </table:table-row>
        <table:table-row table:style-name="ro1">
          <table:table-cell office:value-type="float" office:value="529.184143066406">
            <text:p>529.1841430664</text:p>
          </table:table-cell>
          <table:table-cell office:value-type="float" office:value="0.003128008">
            <text:p>0.003128008</text:p>
          </table:table-cell>
          <table:table-cell table:number-columns-repeated="4"/>
        </table:table-row>
        <table:table-row table:style-name="ro1">
          <table:table-cell office:value-type="float" office:value="529.30126953125">
            <text:p>529.3012695313</text:p>
          </table:table-cell>
          <table:table-cell office:value-type="float" office:value="0.01241459">
            <text:p>0.01241459</text:p>
          </table:table-cell>
          <table:table-cell table:number-columns-repeated="4"/>
        </table:table-row>
        <table:table-row table:style-name="ro1">
          <table:table-cell office:value-type="float" office:value="529.41845703125">
            <text:p>529.4184570313</text:p>
          </table:table-cell>
          <table:table-cell office:value-type="float" office:value="-0.004545474">
            <text:p>-0.004545474</text:p>
          </table:table-cell>
          <table:table-cell table:number-columns-repeated="4"/>
        </table:table-row>
        <table:table-row table:style-name="ro1">
          <table:table-cell office:value-type="float" office:value="529.535583496094">
            <text:p>529.5355834961</text:p>
          </table:table-cell>
          <table:table-cell office:value-type="float" office:value="0.00250366">
            <text:p>0.00250366</text:p>
          </table:table-cell>
          <table:table-cell table:number-columns-repeated="4"/>
        </table:table-row>
        <table:table-row table:style-name="ro1">
          <table:table-cell office:value-type="float" office:value="529.652770996094">
            <text:p>529.6527709961</text:p>
          </table:table-cell>
          <table:table-cell office:value-type="float" office:value="-0.0002521581">
            <text:p>-0.0002521581</text:p>
          </table:table-cell>
          <table:table-cell table:number-columns-repeated="4"/>
        </table:table-row>
        <table:table-row table:style-name="ro1">
          <table:table-cell office:value-type="float" office:value="529.769958496094">
            <text:p>529.7699584961</text:p>
          </table:table-cell>
          <table:table-cell office:value-type="float" office:value="-0.001033677">
            <text:p>-0.001033677</text:p>
          </table:table-cell>
          <table:table-cell table:number-columns-repeated="4"/>
        </table:table-row>
        <table:table-row table:style-name="ro1">
          <table:table-cell office:value-type="float" office:value="529.887145996094">
            <text:p>529.8871459961</text:p>
          </table:table-cell>
          <table:table-cell office:value-type="float" office:value="-0.0006483941">
            <text:p>-0.0006483941</text:p>
          </table:table-cell>
          <table:table-cell table:number-columns-repeated="4"/>
        </table:table-row>
        <table:table-row table:style-name="ro1">
          <table:table-cell office:value-type="float" office:value="530.004272460938">
            <text:p>530.0042724609</text:p>
          </table:table-cell>
          <table:table-cell office:value-type="string">
            <text:p>6.435124E-05</text:p>
          </table:table-cell>
          <table:table-cell table:number-columns-repeated="4"/>
        </table:table-row>
        <table:table-row table:style-name="ro1">
          <table:table-cell office:value-type="float" office:value="530.121459960938">
            <text:p>530.1214599609</text:p>
          </table:table-cell>
          <table:table-cell office:value-type="float" office:value="0.0006977106">
            <text:p>0.0006977106</text:p>
          </table:table-cell>
          <table:table-cell table:number-columns-repeated="4"/>
        </table:table-row>
        <table:table-row table:style-name="ro1">
          <table:table-cell office:value-type="float" office:value="530.238647460938">
            <text:p>530.2386474609</text:p>
          </table:table-cell>
          <table:table-cell office:value-type="float" office:value="-0.002029651">
            <text:p>-0.002029651</text:p>
          </table:table-cell>
          <table:table-cell table:number-columns-repeated="4"/>
        </table:table-row>
        <table:table-row table:style-name="ro1">
          <table:table-cell office:value-type="float" office:value="530.355834960938">
            <text:p>530.3558349609</text:p>
          </table:table-cell>
          <table:table-cell office:value-type="float" office:value="-0.008387285">
            <text:p>-0.008387285</text:p>
          </table:table-cell>
          <table:table-cell table:number-columns-repeated="4"/>
        </table:table-row>
        <table:table-row table:style-name="ro1">
          <table:table-cell office:value-type="float" office:value="530.473022460938">
            <text:p>530.4730224609</text:p>
          </table:table-cell>
          <table:table-cell office:value-type="float" office:value="-0.0119094">
            <text:p>-0.0119094</text:p>
          </table:table-cell>
          <table:table-cell table:number-columns-repeated="4"/>
        </table:table-row>
        <table:table-row table:style-name="ro1">
          <table:table-cell office:value-type="float" office:value="530.590209960938">
            <text:p>530.5902099609</text:p>
          </table:table-cell>
          <table:table-cell office:value-type="float" office:value="0.003111816">
            <text:p>0.003111816</text:p>
          </table:table-cell>
          <table:table-cell table:number-columns-repeated="4"/>
        </table:table-row>
        <table:table-row table:style-name="ro1">
          <table:table-cell office:value-type="float" office:value="530.707397460938">
            <text:p>530.7073974609</text:p>
          </table:table-cell>
          <table:table-cell office:value-type="float" office:value="0.05360217">
            <text:p>0.05360217</text:p>
          </table:table-cell>
          <table:table-cell table:number-columns-repeated="4"/>
        </table:table-row>
        <table:table-row table:style-name="ro1">
          <table:table-cell office:value-type="float" office:value="530.824645996094">
            <text:p>530.8246459961</text:p>
          </table:table-cell>
          <table:table-cell office:value-type="float" office:value="0.007209915">
            <text:p>0.007209915</text:p>
          </table:table-cell>
          <table:table-cell table:number-columns-repeated="4"/>
        </table:table-row>
        <table:table-row table:style-name="ro1">
          <table:table-cell office:value-type="float" office:value="530.941833496094">
            <text:p>530.9418334961</text:p>
          </table:table-cell>
          <table:table-cell office:value-type="float" office:value="0.001901658">
            <text:p>0.001901658</text:p>
          </table:table-cell>
          <table:table-cell table:number-columns-repeated="4"/>
        </table:table-row>
        <table:table-row table:style-name="ro1">
          <table:table-cell office:value-type="float" office:value="531.059020996094">
            <text:p>531.0590209961</text:p>
          </table:table-cell>
          <table:table-cell office:value-type="float" office:value="0.001851426">
            <text:p>0.001851426</text:p>
          </table:table-cell>
          <table:table-cell table:number-columns-repeated="4"/>
        </table:table-row>
        <table:table-row table:style-name="ro1">
          <table:table-cell office:value-type="float" office:value="531.17626953125">
            <text:p>531.1762695313</text:p>
          </table:table-cell>
          <table:table-cell office:value-type="float" office:value="-0.003060281">
            <text:p>-0.003060281</text:p>
          </table:table-cell>
          <table:table-cell table:number-columns-repeated="4"/>
        </table:table-row>
        <table:table-row table:style-name="ro1">
          <table:table-cell office:value-type="float" office:value="531.29345703125">
            <text:p>531.2934570313</text:p>
          </table:table-cell>
          <table:table-cell office:value-type="float" office:value="0.001756473">
            <text:p>0.001756473</text:p>
          </table:table-cell>
          <table:table-cell table:number-columns-repeated="4"/>
        </table:table-row>
        <table:table-row table:style-name="ro1">
          <table:table-cell office:value-type="float" office:value="531.410705566406">
            <text:p>531.4107055664</text:p>
          </table:table-cell>
          <table:table-cell office:value-type="float" office:value="0.002441312">
            <text:p>0.002441312</text:p>
          </table:table-cell>
          <table:table-cell table:number-columns-repeated="4"/>
        </table:table-row>
        <table:table-row table:style-name="ro1">
          <table:table-cell office:value-type="float" office:value="531.527893066406">
            <text:p>531.5278930664</text:p>
          </table:table-cell>
          <table:table-cell office:value-type="float" office:value="-0.005933646">
            <text:p>-0.005933646</text:p>
          </table:table-cell>
          <table:table-cell table:number-columns-repeated="4"/>
        </table:table-row>
        <table:table-row table:style-name="ro1">
          <table:table-cell office:value-type="float" office:value="531.645141601563">
            <text:p>531.6451416016</text:p>
          </table:table-cell>
          <table:table-cell office:value-type="float" office:value="-0.002285338">
            <text:p>-0.002285338</text:p>
          </table:table-cell>
          <table:table-cell table:number-columns-repeated="4"/>
        </table:table-row>
        <table:table-row table:style-name="ro1">
          <table:table-cell office:value-type="float" office:value="531.762329101563">
            <text:p>531.7623291016</text:p>
          </table:table-cell>
          <table:table-cell office:value-type="float" office:value="-0.0002067516">
            <text:p>-0.0002067516</text:p>
          </table:table-cell>
          <table:table-cell table:number-columns-repeated="4"/>
        </table:table-row>
        <table:table-row table:style-name="ro1">
          <table:table-cell office:value-type="float" office:value="531.879577636719">
            <text:p>531.8795776367</text:p>
          </table:table-cell>
          <table:table-cell office:value-type="float" office:value="-0.004735935">
            <text:p>-0.004735935</text:p>
          </table:table-cell>
          <table:table-cell table:number-columns-repeated="4"/>
        </table:table-row>
        <table:table-row table:style-name="ro1">
          <table:table-cell office:value-type="float" office:value="531.996826171875">
            <text:p>531.9968261719</text:p>
          </table:table-cell>
          <table:table-cell office:value-type="float" office:value="0.002647015">
            <text:p>0.002647015</text:p>
          </table:table-cell>
          <table:table-cell table:number-columns-repeated="4"/>
        </table:table-row>
        <table:table-row table:style-name="ro1">
          <table:table-cell office:value-type="float" office:value="532.114074707031">
            <text:p>532.114074707</text:p>
          </table:table-cell>
          <table:table-cell office:value-type="float" office:value="0.02685035">
            <text:p>0.02685035</text:p>
          </table:table-cell>
          <table:table-cell table:number-columns-repeated="4"/>
        </table:table-row>
        <table:table-row table:style-name="ro1">
          <table:table-cell office:value-type="float" office:value="532.231323242188">
            <text:p>532.2313232422</text:p>
          </table:table-cell>
          <table:table-cell office:value-type="float" office:value="0.003295896">
            <text:p>0.003295896</text:p>
          </table:table-cell>
          <table:table-cell table:number-columns-repeated="4"/>
        </table:table-row>
        <table:table-row table:style-name="ro1">
          <table:table-cell office:value-type="float" office:value="532.348510742188">
            <text:p>532.3485107422</text:p>
          </table:table-cell>
          <table:table-cell office:value-type="float" office:value="0.01946419">
            <text:p>0.01946419</text:p>
          </table:table-cell>
          <table:table-cell table:number-columns-repeated="4"/>
        </table:table-row>
        <table:table-row table:style-name="ro1">
          <table:table-cell office:value-type="float" office:value="532.465759277344">
            <text:p>532.4657592773</text:p>
          </table:table-cell>
          <table:table-cell office:value-type="float" office:value="-0.007137342">
            <text:p>-0.007137342</text:p>
          </table:table-cell>
          <table:table-cell table:number-columns-repeated="4"/>
        </table:table-row>
        <table:table-row table:style-name="ro1">
          <table:table-cell office:value-type="float" office:value="532.583068847656">
            <text:p>532.5830688477</text:p>
          </table:table-cell>
          <table:table-cell office:value-type="float" office:value="-0.00326102">
            <text:p>-0.00326102</text:p>
          </table:table-cell>
          <table:table-cell table:number-columns-repeated="4"/>
        </table:table-row>
        <table:table-row table:style-name="ro1">
          <table:table-cell office:value-type="float" office:value="532.700317382813">
            <text:p>532.7003173828</text:p>
          </table:table-cell>
          <table:table-cell office:value-type="string">
            <text:p>6.92645E-05</text:p>
          </table:table-cell>
          <table:table-cell table:number-columns-repeated="4"/>
        </table:table-row>
        <table:table-row table:style-name="ro1">
          <table:table-cell office:value-type="float" office:value="532.817565917969">
            <text:p>532.817565918</text:p>
          </table:table-cell>
          <table:table-cell office:value-type="float" office:value="-0.01157693">
            <text:p>-0.01157693</text:p>
          </table:table-cell>
          <table:table-cell table:number-columns-repeated="4"/>
        </table:table-row>
        <table:table-row table:style-name="ro1">
          <table:table-cell office:value-type="float" office:value="532.934814453125">
            <text:p>532.9348144531</text:p>
          </table:table-cell>
          <table:table-cell office:value-type="float" office:value="0.007672027">
            <text:p>0.007672027</text:p>
          </table:table-cell>
          <table:table-cell table:number-columns-repeated="4"/>
        </table:table-row>
        <table:table-row table:style-name="ro1">
          <table:table-cell office:value-type="float" office:value="533.052062988281">
            <text:p>533.0520629883</text:p>
          </table:table-cell>
          <table:table-cell office:value-type="float" office:value="-0.006021138">
            <text:p>-0.006021138</text:p>
          </table:table-cell>
          <table:table-cell table:number-columns-repeated="4"/>
        </table:table-row>
        <table:table-row table:style-name="ro1">
          <table:table-cell office:value-type="float" office:value="533.169372558594">
            <text:p>533.1693725586</text:p>
          </table:table-cell>
          <table:table-cell office:value-type="float" office:value="-0.00602203">
            <text:p>-0.00602203</text:p>
          </table:table-cell>
          <table:table-cell table:number-columns-repeated="4"/>
        </table:table-row>
        <table:table-row table:style-name="ro1">
          <table:table-cell office:value-type="float" office:value="533.28662109375">
            <text:p>533.2866210938</text:p>
          </table:table-cell>
          <table:table-cell office:value-type="float" office:value="0.02433437">
            <text:p>0.02433437</text:p>
          </table:table-cell>
          <table:table-cell table:number-columns-repeated="4"/>
        </table:table-row>
        <table:table-row table:style-name="ro1">
          <table:table-cell office:value-type="float" office:value="533.403869628906">
            <text:p>533.4038696289</text:p>
          </table:table-cell>
          <table:table-cell office:value-type="float" office:value="-0.002721541">
            <text:p>-0.002721541</text:p>
          </table:table-cell>
          <table:table-cell table:number-columns-repeated="4"/>
        </table:table-row>
        <table:table-row table:style-name="ro1">
          <table:table-cell office:value-type="float" office:value="533.521179199219">
            <text:p>533.5211791992</text:p>
          </table:table-cell>
          <table:table-cell office:value-type="float" office:value="0.006578151">
            <text:p>0.006578151</text:p>
          </table:table-cell>
          <table:table-cell table:number-columns-repeated="4"/>
        </table:table-row>
        <table:table-row table:style-name="ro1">
          <table:table-cell office:value-type="float" office:value="533.638427734375">
            <text:p>533.6384277344</text:p>
          </table:table-cell>
          <table:table-cell office:value-type="float" office:value="0.005533057">
            <text:p>0.005533057</text:p>
          </table:table-cell>
          <table:table-cell table:number-columns-repeated="4"/>
        </table:table-row>
        <table:table-row table:style-name="ro1">
          <table:table-cell office:value-type="float" office:value="533.755737304688">
            <text:p>533.7557373047</text:p>
          </table:table-cell>
          <table:table-cell office:value-type="float" office:value="-0.009445792">
            <text:p>-0.009445792</text:p>
          </table:table-cell>
          <table:table-cell table:number-columns-repeated="4"/>
        </table:table-row>
        <table:table-row table:style-name="ro1">
          <table:table-cell office:value-type="float" office:value="533.873046875">
            <text:p>533.873046875</text:p>
          </table:table-cell>
          <table:table-cell office:value-type="float" office:value="0.01413971">
            <text:p>0.01413971</text:p>
          </table:table-cell>
          <table:table-cell table:number-columns-repeated="4"/>
        </table:table-row>
        <table:table-row table:style-name="ro1">
          <table:table-cell office:value-type="float" office:value="533.990295410156">
            <text:p>533.9902954102</text:p>
          </table:table-cell>
          <table:table-cell office:value-type="float" office:value="0.008265158">
            <text:p>0.008265158</text:p>
          </table:table-cell>
          <table:table-cell table:number-columns-repeated="4"/>
        </table:table-row>
        <table:table-row table:style-name="ro1">
          <table:table-cell office:value-type="float" office:value="534.107604980469">
            <text:p>534.1076049805</text:p>
          </table:table-cell>
          <table:table-cell office:value-type="float" office:value="-0.0006890853">
            <text:p>-0.0006890853</text:p>
          </table:table-cell>
          <table:table-cell table:number-columns-repeated="4"/>
        </table:table-row>
        <table:table-row table:style-name="ro1">
          <table:table-cell office:value-type="float" office:value="534.224914550781">
            <text:p>534.2249145508</text:p>
          </table:table-cell>
          <table:table-cell office:value-type="float" office:value="0.006036631">
            <text:p>0.006036631</text:p>
          </table:table-cell>
          <table:table-cell table:number-columns-repeated="4"/>
        </table:table-row>
        <table:table-row table:style-name="ro1">
          <table:table-cell office:value-type="float" office:value="534.342224121094">
            <text:p>534.3422241211</text:p>
          </table:table-cell>
          <table:table-cell office:value-type="float" office:value="-0.005169746">
            <text:p>-0.005169746</text:p>
          </table:table-cell>
          <table:table-cell table:number-columns-repeated="4"/>
        </table:table-row>
        <table:table-row table:style-name="ro1">
          <table:table-cell office:value-type="float" office:value="534.459533691406">
            <text:p>534.4595336914</text:p>
          </table:table-cell>
          <table:table-cell office:value-type="float" office:value="-0.00441478">
            <text:p>-0.00441478</text:p>
          </table:table-cell>
          <table:table-cell table:number-columns-repeated="4"/>
        </table:table-row>
        <table:table-row table:style-name="ro1">
          <table:table-cell office:value-type="float" office:value="534.576843261719">
            <text:p>534.5768432617</text:p>
          </table:table-cell>
          <table:table-cell office:value-type="float" office:value="0.00796133">
            <text:p>0.00796133</text:p>
          </table:table-cell>
          <table:table-cell table:number-columns-repeated="4"/>
        </table:table-row>
        <table:table-row table:style-name="ro1">
          <table:table-cell office:value-type="float" office:value="534.694152832031">
            <text:p>534.694152832</text:p>
          </table:table-cell>
          <table:table-cell office:value-type="float" office:value="-0.009612183">
            <text:p>-0.009612183</text:p>
          </table:table-cell>
          <table:table-cell table:number-columns-repeated="4"/>
        </table:table-row>
        <table:table-row table:style-name="ro1">
          <table:table-cell office:value-type="float" office:value="534.811462402344">
            <text:p>534.8114624023</text:p>
          </table:table-cell>
          <table:table-cell office:value-type="float" office:value="-0.00179452">
            <text:p>-0.00179452</text:p>
          </table:table-cell>
          <table:table-cell table:number-columns-repeated="4"/>
        </table:table-row>
        <table:table-row table:style-name="ro1">
          <table:table-cell office:value-type="float" office:value="534.928771972656">
            <text:p>534.9287719727</text:p>
          </table:table-cell>
          <table:table-cell office:value-type="float" office:value="-0.006402906">
            <text:p>-0.006402906</text:p>
          </table:table-cell>
          <table:table-cell table:number-columns-repeated="4"/>
        </table:table-row>
        <table:table-row table:style-name="ro1">
          <table:table-cell office:value-type="float" office:value="535.046081542969">
            <text:p>535.046081543</text:p>
          </table:table-cell>
          <table:table-cell office:value-type="float" office:value="-0.008617386">
            <text:p>-0.008617386</text:p>
          </table:table-cell>
          <table:table-cell table:number-columns-repeated="4"/>
        </table:table-row>
        <table:table-row table:style-name="ro1">
          <table:table-cell office:value-type="float" office:value="535.163452148438">
            <text:p>535.1634521484</text:p>
          </table:table-cell>
          <table:table-cell office:value-type="float" office:value="0.004815978">
            <text:p>0.004815978</text:p>
          </table:table-cell>
          <table:table-cell table:number-columns-repeated="4"/>
        </table:table-row>
        <table:table-row table:style-name="ro1">
          <table:table-cell office:value-type="float" office:value="535.28076171875">
            <text:p>535.2807617188</text:p>
          </table:table-cell>
          <table:table-cell office:value-type="string">
            <text:p>-6.47416E-05</text:p>
          </table:table-cell>
          <table:table-cell table:number-columns-repeated="4"/>
        </table:table-row>
        <table:table-row table:style-name="ro1">
          <table:table-cell office:value-type="float" office:value="535.398071289063">
            <text:p>535.3980712891</text:p>
          </table:table-cell>
          <table:table-cell office:value-type="float" office:value="0.0007475817">
            <text:p>0.0007475817</text:p>
          </table:table-cell>
          <table:table-cell table:number-columns-repeated="4"/>
        </table:table-row>
        <table:table-row table:style-name="ro1">
          <table:table-cell office:value-type="float" office:value="535.515441894531">
            <text:p>535.5154418945</text:p>
          </table:table-cell>
          <table:table-cell office:value-type="float" office:value="-0.01086531">
            <text:p>-0.01086531</text:p>
          </table:table-cell>
          <table:table-cell table:number-columns-repeated="4"/>
        </table:table-row>
        <table:table-row table:style-name="ro1">
          <table:table-cell office:value-type="float" office:value="535.632751464844">
            <text:p>535.6327514648</text:p>
          </table:table-cell>
          <table:table-cell office:value-type="float" office:value="-0.005534784">
            <text:p>-0.005534784</text:p>
          </table:table-cell>
          <table:table-cell table:number-columns-repeated="4"/>
        </table:table-row>
        <table:table-row table:style-name="ro1">
          <table:table-cell office:value-type="float" office:value="535.750122070313">
            <text:p>535.7501220703</text:p>
          </table:table-cell>
          <table:table-cell office:value-type="float" office:value="-0.004487757">
            <text:p>-0.004487757</text:p>
          </table:table-cell>
          <table:table-cell table:number-columns-repeated="4"/>
        </table:table-row>
        <table:table-row table:style-name="ro1">
          <table:table-cell office:value-type="float" office:value="535.867431640625">
            <text:p>535.8674316406</text:p>
          </table:table-cell>
          <table:table-cell office:value-type="float" office:value="0.004200228">
            <text:p>0.004200228</text:p>
          </table:table-cell>
          <table:table-cell table:number-columns-repeated="4"/>
        </table:table-row>
        <table:table-row table:style-name="ro1">
          <table:table-cell office:value-type="float" office:value="535.984802246094">
            <text:p>535.9848022461</text:p>
          </table:table-cell>
          <table:table-cell office:value-type="float" office:value="0.01030716">
            <text:p>0.01030716</text:p>
          </table:table-cell>
          <table:table-cell table:number-columns-repeated="4"/>
        </table:table-row>
        <table:table-row table:style-name="ro1">
          <table:table-cell office:value-type="float" office:value="536.102172851563">
            <text:p>536.1021728516</text:p>
          </table:table-cell>
          <table:table-cell office:value-type="float" office:value="0.008169389">
            <text:p>0.008169389</text:p>
          </table:table-cell>
          <table:table-cell table:number-columns-repeated="4"/>
        </table:table-row>
        <table:table-row table:style-name="ro1">
          <table:table-cell office:value-type="float" office:value="536.219543457031">
            <text:p>536.219543457</text:p>
          </table:table-cell>
          <table:table-cell office:value-type="float" office:value="-0.001260536">
            <text:p>-0.001260536</text:p>
          </table:table-cell>
          <table:table-cell table:number-columns-repeated="4"/>
        </table:table-row>
        <table:table-row table:style-name="ro1">
          <table:table-cell office:value-type="float" office:value="536.336853027344">
            <text:p>536.3368530273</text:p>
          </table:table-cell>
          <table:table-cell office:value-type="float" office:value="-0.004782185">
            <text:p>-0.004782185</text:p>
          </table:table-cell>
          <table:table-cell table:number-columns-repeated="4"/>
        </table:table-row>
        <table:table-row table:style-name="ro1">
          <table:table-cell office:value-type="float" office:value="536.454223632813">
            <text:p>536.4542236328</text:p>
          </table:table-cell>
          <table:table-cell office:value-type="float" office:value="-0.0137885">
            <text:p>-0.0137885</text:p>
          </table:table-cell>
          <table:table-cell table:number-columns-repeated="4"/>
        </table:table-row>
        <table:table-row table:style-name="ro1">
          <table:table-cell office:value-type="float" office:value="536.571594238281">
            <text:p>536.5715942383</text:p>
          </table:table-cell>
          <table:table-cell office:value-type="float" office:value="-0.01037626">
            <text:p>-0.01037626</text:p>
          </table:table-cell>
          <table:table-cell table:number-columns-repeated="4"/>
        </table:table-row>
        <table:table-row table:style-name="ro1">
          <table:table-cell office:value-type="float" office:value="536.68896484375">
            <text:p>536.6889648438</text:p>
          </table:table-cell>
          <table:table-cell office:value-type="float" office:value="-0.004515377">
            <text:p>-0.004515377</text:p>
          </table:table-cell>
          <table:table-cell table:number-columns-repeated="4"/>
        </table:table-row>
        <table:table-row table:style-name="ro1">
          <table:table-cell office:value-type="float" office:value="536.806335449219">
            <text:p>536.8063354492</text:p>
          </table:table-cell>
          <table:table-cell office:value-type="float" office:value="-0.001320917">
            <text:p>-0.001320917</text:p>
          </table:table-cell>
          <table:table-cell table:number-columns-repeated="4"/>
        </table:table-row>
        <table:table-row table:style-name="ro1">
          <table:table-cell office:value-type="float" office:value="536.923706054688">
            <text:p>536.9237060547</text:p>
          </table:table-cell>
          <table:table-cell office:value-type="float" office:value="0.02072556">
            <text:p>0.02072556</text:p>
          </table:table-cell>
          <table:table-cell table:number-columns-repeated="4"/>
        </table:table-row>
        <table:table-row table:style-name="ro1">
          <table:table-cell office:value-type="float" office:value="537.041076660156">
            <text:p>537.0410766602</text:p>
          </table:table-cell>
          <table:table-cell office:value-type="float" office:value="-0.002231837">
            <text:p>-0.002231837</text:p>
          </table:table-cell>
          <table:table-cell table:number-columns-repeated="4"/>
        </table:table-row>
        <table:table-row table:style-name="ro1">
          <table:table-cell office:value-type="float" office:value="537.158508300781">
            <text:p>537.1585083008</text:p>
          </table:table-cell>
          <table:table-cell office:value-type="float" office:value="0.0008177432">
            <text:p>0.0008177432</text:p>
          </table:table-cell>
          <table:table-cell table:number-columns-repeated="4"/>
        </table:table-row>
        <table:table-row table:style-name="ro1">
          <table:table-cell office:value-type="float" office:value="537.27587890625">
            <text:p>537.2758789063</text:p>
          </table:table-cell>
          <table:table-cell office:value-type="float" office:value="-0.0005829405">
            <text:p>-0.0005829405</text:p>
          </table:table-cell>
          <table:table-cell table:number-columns-repeated="4"/>
        </table:table-row>
        <table:table-row table:style-name="ro1">
          <table:table-cell office:value-type="float" office:value="537.393249511719">
            <text:p>537.3932495117</text:p>
          </table:table-cell>
          <table:table-cell office:value-type="float" office:value="0.002087907">
            <text:p>0.002087907</text:p>
          </table:table-cell>
          <table:table-cell table:number-columns-repeated="4"/>
        </table:table-row>
        <table:table-row table:style-name="ro1">
          <table:table-cell office:value-type="float" office:value="537.510681152344">
            <text:p>537.5106811523</text:p>
          </table:table-cell>
          <table:table-cell office:value-type="float" office:value="-0.005406796">
            <text:p>-0.005406796</text:p>
          </table:table-cell>
          <table:table-cell table:number-columns-repeated="4"/>
        </table:table-row>
        <table:table-row table:style-name="ro1">
          <table:table-cell office:value-type="float" office:value="537.628051757813">
            <text:p>537.6280517578</text:p>
          </table:table-cell>
          <table:table-cell office:value-type="float" office:value="0.001161363">
            <text:p>0.001161363</text:p>
          </table:table-cell>
          <table:table-cell table:number-columns-repeated="4"/>
        </table:table-row>
        <table:table-row table:style-name="ro1">
          <table:table-cell office:value-type="float" office:value="537.745483398438">
            <text:p>537.7454833984</text:p>
          </table:table-cell>
          <table:table-cell office:value-type="float" office:value="-0.004018315">
            <text:p>-0.004018315</text:p>
          </table:table-cell>
          <table:table-cell table:number-columns-repeated="4"/>
        </table:table-row>
        <table:table-row table:style-name="ro1">
          <table:table-cell office:value-type="float" office:value="537.862854003906">
            <text:p>537.8628540039</text:p>
          </table:table-cell>
          <table:table-cell office:value-type="float" office:value="0.001820655">
            <text:p>0.001820655</text:p>
          </table:table-cell>
          <table:table-cell table:number-columns-repeated="4"/>
        </table:table-row>
        <table:table-row table:style-name="ro1">
          <table:table-cell office:value-type="float" office:value="537.980285644531">
            <text:p>537.9802856445</text:p>
          </table:table-cell>
          <table:table-cell office:value-type="float" office:value="-0.01391233">
            <text:p>-0.01391233</text:p>
          </table:table-cell>
          <table:table-cell table:number-columns-repeated="4"/>
        </table:table-row>
        <table:table-row table:style-name="ro1">
          <table:table-cell office:value-type="float" office:value="538.09765625">
            <text:p>538.09765625</text:p>
          </table:table-cell>
          <table:table-cell office:value-type="float" office:value="0.03452605">
            <text:p>0.03452605</text:p>
          </table:table-cell>
          <table:table-cell table:number-columns-repeated="4"/>
        </table:table-row>
        <table:table-row table:style-name="ro1">
          <table:table-cell office:value-type="float" office:value="538.215087890625">
            <text:p>538.2150878906</text:p>
          </table:table-cell>
          <table:table-cell office:value-type="float" office:value="0.0007406042">
            <text:p>0.0007406042</text:p>
          </table:table-cell>
          <table:table-cell table:number-columns-repeated="4"/>
        </table:table-row>
        <table:table-row table:style-name="ro1">
          <table:table-cell office:value-type="float" office:value="538.33251953125">
            <text:p>538.3325195313</text:p>
          </table:table-cell>
          <table:table-cell office:value-type="float" office:value="0.02977515">
            <text:p>0.02977515</text:p>
          </table:table-cell>
          <table:table-cell table:number-columns-repeated="4"/>
        </table:table-row>
        <table:table-row table:style-name="ro1">
          <table:table-cell office:value-type="float" office:value="538.449890136719">
            <text:p>538.4498901367</text:p>
          </table:table-cell>
          <table:table-cell office:value-type="string">
            <text:p>-4.833578E-05</text:p>
          </table:table-cell>
          <table:table-cell table:number-columns-repeated="4"/>
        </table:table-row>
        <table:table-row table:style-name="ro1">
          <table:table-cell office:value-type="float" office:value="538.567321777344">
            <text:p>538.5673217773</text:p>
          </table:table-cell>
          <table:table-cell office:value-type="float" office:value="0.03413024">
            <text:p>0.03413024</text:p>
          </table:table-cell>
          <table:table-cell table:number-columns-repeated="4"/>
        </table:table-row>
        <table:table-row table:style-name="ro1">
          <table:table-cell office:value-type="float" office:value="538.684753417969">
            <text:p>538.684753418</text:p>
          </table:table-cell>
          <table:table-cell office:value-type="float" office:value="-0.001754302">
            <text:p>-0.001754302</text:p>
          </table:table-cell>
          <table:table-cell table:number-columns-repeated="4"/>
        </table:table-row>
        <table:table-row table:style-name="ro1">
          <table:table-cell office:value-type="float" office:value="538.802185058594">
            <text:p>538.8021850586</text:p>
          </table:table-cell>
          <table:table-cell office:value-type="float" office:value="0.00449505">
            <text:p>0.00449505</text:p>
          </table:table-cell>
          <table:table-cell table:number-columns-repeated="4"/>
        </table:table-row>
        <table:table-row table:style-name="ro1">
          <table:table-cell office:value-type="float" office:value="538.919616699219">
            <text:p>538.9196166992</text:p>
          </table:table-cell>
          <table:table-cell office:value-type="float" office:value="-0.01186987">
            <text:p>-0.01186987</text:p>
          </table:table-cell>
          <table:table-cell table:number-columns-repeated="4"/>
        </table:table-row>
        <table:table-row table:style-name="ro1">
          <table:table-cell office:value-type="float" office:value="539.037048339844">
            <text:p>539.0370483398</text:p>
          </table:table-cell>
          <table:table-cell office:value-type="float" office:value="0.00717863">
            <text:p>0.00717863</text:p>
          </table:table-cell>
          <table:table-cell table:number-columns-repeated="4"/>
        </table:table-row>
        <table:table-row table:style-name="ro1">
          <table:table-cell office:value-type="float" office:value="539.154479980469">
            <text:p>539.1544799805</text:p>
          </table:table-cell>
          <table:table-cell office:value-type="float" office:value="0.001339478">
            <text:p>0.001339478</text:p>
          </table:table-cell>
          <table:table-cell table:number-columns-repeated="4"/>
        </table:table-row>
        <table:table-row table:style-name="ro1">
          <table:table-cell office:value-type="float" office:value="539.27197265625">
            <text:p>539.2719726563</text:p>
          </table:table-cell>
          <table:table-cell office:value-type="float" office:value="-0.009526871">
            <text:p>-0.009526871</text:p>
          </table:table-cell>
          <table:table-cell table:number-columns-repeated="4"/>
        </table:table-row>
        <table:table-row table:style-name="ro1">
          <table:table-cell office:value-type="float" office:value="539.389404296875">
            <text:p>539.3894042969</text:p>
          </table:table-cell>
          <table:table-cell office:value-type="float" office:value="0.0002638463">
            <text:p>0.0002638463</text:p>
          </table:table-cell>
          <table:table-cell table:number-columns-repeated="4"/>
        </table:table-row>
        <table:table-row table:style-name="ro1">
          <table:table-cell office:value-type="float" office:value="539.5068359375">
            <text:p>539.5068359375</text:p>
          </table:table-cell>
          <table:table-cell office:value-type="float" office:value="-0.002415108">
            <text:p>-0.002415108</text:p>
          </table:table-cell>
          <table:table-cell table:number-columns-repeated="4"/>
        </table:table-row>
        <table:table-row table:style-name="ro1">
          <table:table-cell office:value-type="float" office:value="539.624267578125">
            <text:p>539.6242675781</text:p>
          </table:table-cell>
          <table:table-cell office:value-type="float" office:value="-0.003096775">
            <text:p>-0.003096775</text:p>
          </table:table-cell>
          <table:table-cell table:number-columns-repeated="4"/>
        </table:table-row>
        <table:table-row table:style-name="ro1">
          <table:table-cell office:value-type="float" office:value="539.741760253906">
            <text:p>539.7417602539</text:p>
          </table:table-cell>
          <table:table-cell office:value-type="float" office:value="-0.004612128">
            <text:p>-0.004612128</text:p>
          </table:table-cell>
          <table:table-cell table:number-columns-repeated="4"/>
        </table:table-row>
        <table:table-row table:style-name="ro1">
          <table:table-cell office:value-type="float" office:value="539.859191894531">
            <text:p>539.8591918945</text:p>
          </table:table-cell>
          <table:table-cell office:value-type="float" office:value="-0.01267078">
            <text:p>-0.01267078</text:p>
          </table:table-cell>
          <table:table-cell table:number-columns-repeated="4"/>
        </table:table-row>
        <table:table-row table:style-name="ro1">
          <table:table-cell office:value-type="float" office:value="539.976684570313">
            <text:p>539.9766845703</text:p>
          </table:table-cell>
          <table:table-cell office:value-type="float" office:value="0.006115727">
            <text:p>0.006115727</text:p>
          </table:table-cell>
          <table:table-cell table:number-columns-repeated="4"/>
        </table:table-row>
        <table:table-row table:style-name="ro1">
          <table:table-cell office:value-type="float" office:value="540.094116210938">
            <text:p>540.0941162109</text:p>
          </table:table-cell>
          <table:table-cell office:value-type="float" office:value="-0.009912028">
            <text:p>-0.009912028</text:p>
          </table:table-cell>
          <table:table-cell table:number-columns-repeated="4"/>
        </table:table-row>
        <table:table-row table:style-name="ro1">
          <table:table-cell office:value-type="float" office:value="540.211608886719">
            <text:p>540.2116088867</text:p>
          </table:table-cell>
          <table:table-cell office:value-type="float" office:value="-0.01057338">
            <text:p>-0.01057338</text:p>
          </table:table-cell>
          <table:table-cell table:number-columns-repeated="4"/>
        </table:table-row>
        <table:table-row table:style-name="ro1">
          <table:table-cell office:value-type="float" office:value="540.3291015625">
            <text:p>540.3291015625</text:p>
          </table:table-cell>
          <table:table-cell office:value-type="float" office:value="-0.003026595">
            <text:p>-0.003026595</text:p>
          </table:table-cell>
          <table:table-cell table:number-columns-repeated="4"/>
        </table:table-row>
        <table:table-row table:style-name="ro1">
          <table:table-cell office:value-type="float" office:value="540.446533203125">
            <text:p>540.4465332031</text:p>
          </table:table-cell>
          <table:table-cell office:value-type="float" office:value="-0.005239562">
            <text:p>-0.005239562</text:p>
          </table:table-cell>
          <table:table-cell table:number-columns-repeated="4"/>
        </table:table-row>
        <table:table-row table:style-name="ro1">
          <table:table-cell office:value-type="float" office:value="540.564025878906">
            <text:p>540.5640258789</text:p>
          </table:table-cell>
          <table:table-cell office:value-type="float" office:value="0.01283765">
            <text:p>0.01283765</text:p>
          </table:table-cell>
          <table:table-cell table:number-columns-repeated="4"/>
        </table:table-row>
        <table:table-row table:style-name="ro1">
          <table:table-cell office:value-type="float" office:value="540.681518554688">
            <text:p>540.6815185547</text:p>
          </table:table-cell>
          <table:table-cell office:value-type="float" office:value="-0.004709399">
            <text:p>-0.004709399</text:p>
          </table:table-cell>
          <table:table-cell table:number-columns-repeated="4"/>
        </table:table-row>
        <table:table-row table:style-name="ro1">
          <table:table-cell office:value-type="float" office:value="540.799011230469">
            <text:p>540.7990112305</text:p>
          </table:table-cell>
          <table:table-cell office:value-type="float" office:value="-0.00477284">
            <text:p>-0.00477284</text:p>
          </table:table-cell>
          <table:table-cell table:number-columns-repeated="4"/>
        </table:table-row>
        <table:table-row table:style-name="ro1">
          <table:table-cell office:value-type="float" office:value="540.91650390625">
            <text:p>540.9165039063</text:p>
          </table:table-cell>
          <table:table-cell office:value-type="float" office:value="-0.01080709">
            <text:p>-0.01080709</text:p>
          </table:table-cell>
          <table:table-cell table:number-columns-repeated="4"/>
        </table:table-row>
        <table:table-row table:style-name="ro1">
          <table:table-cell office:value-type="float" office:value="541.033996582031">
            <text:p>541.033996582</text:p>
          </table:table-cell>
          <table:table-cell office:value-type="float" office:value="-0.002274969">
            <text:p>-0.002274969</text:p>
          </table:table-cell>
          <table:table-cell table:number-columns-repeated="4"/>
        </table:table-row>
        <table:table-row table:style-name="ro1">
          <table:table-cell office:value-type="float" office:value="541.151489257813">
            <text:p>541.1514892578</text:p>
          </table:table-cell>
          <table:table-cell office:value-type="float" office:value="0.001623635">
            <text:p>0.001623635</text:p>
          </table:table-cell>
          <table:table-cell table:number-columns-repeated="4"/>
        </table:table-row>
        <table:table-row table:style-name="ro1">
          <table:table-cell office:value-type="float" office:value="541.268981933594">
            <text:p>541.2689819336</text:p>
          </table:table-cell>
          <table:table-cell office:value-type="float" office:value="-0.00495418">
            <text:p>-0.00495418</text:p>
          </table:table-cell>
          <table:table-cell table:number-columns-repeated="4"/>
        </table:table-row>
        <table:table-row table:style-name="ro1">
          <table:table-cell office:value-type="float" office:value="541.386474609375">
            <text:p>541.3864746094</text:p>
          </table:table-cell>
          <table:table-cell office:value-type="float" office:value="0.008401022">
            <text:p>0.008401022</text:p>
          </table:table-cell>
          <table:table-cell table:number-columns-repeated="4"/>
        </table:table-row>
        <table:table-row table:style-name="ro1">
          <table:table-cell office:value-type="float" office:value="541.503967285156">
            <text:p>541.5039672852</text:p>
          </table:table-cell>
          <table:table-cell office:value-type="float" office:value="-0.004136775">
            <text:p>-0.004136775</text:p>
          </table:table-cell>
          <table:table-cell table:number-columns-repeated="4"/>
        </table:table-row>
        <table:table-row table:style-name="ro1">
          <table:table-cell office:value-type="float" office:value="541.621459960938">
            <text:p>541.6214599609</text:p>
          </table:table-cell>
          <table:table-cell office:value-type="float" office:value="0.0005500786">
            <text:p>0.0005500786</text:p>
          </table:table-cell>
          <table:table-cell table:number-columns-repeated="4"/>
        </table:table-row>
        <table:table-row table:style-name="ro1">
          <table:table-cell office:value-type="float" office:value="541.739013671875">
            <text:p>541.7390136719</text:p>
          </table:table-cell>
          <table:table-cell office:value-type="float" office:value="0.01367037">
            <text:p>0.01367037</text:p>
          </table:table-cell>
          <table:table-cell table:number-columns-repeated="4"/>
        </table:table-row>
        <table:table-row table:style-name="ro1">
          <table:table-cell office:value-type="float" office:value="541.856506347656">
            <text:p>541.8565063477</text:p>
          </table:table-cell>
          <table:table-cell office:value-type="float" office:value="-0.002859234">
            <text:p>-0.002859234</text:p>
          </table:table-cell>
          <table:table-cell table:number-columns-repeated="4"/>
        </table:table-row>
        <table:table-row table:style-name="ro1">
          <table:table-cell office:value-type="float" office:value="541.974060058594">
            <text:p>541.9740600586</text:p>
          </table:table-cell>
          <table:table-cell office:value-type="float" office:value="-0.01265305">
            <text:p>-0.01265305</text:p>
          </table:table-cell>
          <table:table-cell table:number-columns-repeated="4"/>
        </table:table-row>
        <table:table-row table:style-name="ro1">
          <table:table-cell office:value-type="float" office:value="542.091552734375">
            <text:p>542.0915527344</text:p>
          </table:table-cell>
          <table:table-cell office:value-type="float" office:value="0.001795636">
            <text:p>0.001795636</text:p>
          </table:table-cell>
          <table:table-cell table:number-columns-repeated="4"/>
        </table:table-row>
        <table:table-row table:style-name="ro1">
          <table:table-cell office:value-type="float" office:value="542.209106445313">
            <text:p>542.2091064453</text:p>
          </table:table-cell>
          <table:table-cell office:value-type="float" office:value="0.0006471399">
            <text:p>0.0006471399</text:p>
          </table:table-cell>
          <table:table-cell table:number-columns-repeated="4"/>
        </table:table-row>
        <table:table-row table:style-name="ro1">
          <table:table-cell office:value-type="float" office:value="542.326599121094">
            <text:p>542.3265991211</text:p>
          </table:table-cell>
          <table:table-cell office:value-type="float" office:value="-0.00843206">
            <text:p>-0.00843206</text:p>
          </table:table-cell>
          <table:table-cell table:number-columns-repeated="4"/>
        </table:table-row>
        <table:table-row table:style-name="ro1">
          <table:table-cell office:value-type="float" office:value="542.444152832031">
            <text:p>542.444152832</text:p>
          </table:table-cell>
          <table:table-cell office:value-type="float" office:value="0.007504304">
            <text:p>0.007504304</text:p>
          </table:table-cell>
          <table:table-cell table:number-columns-repeated="4"/>
        </table:table-row>
        <table:table-row table:style-name="ro1">
          <table:table-cell office:value-type="float" office:value="542.561645507813">
            <text:p>542.5616455078</text:p>
          </table:table-cell>
          <table:table-cell office:value-type="float" office:value="-0.002312331">
            <text:p>-0.002312331</text:p>
          </table:table-cell>
          <table:table-cell table:number-columns-repeated="4"/>
        </table:table-row>
        <table:table-row table:style-name="ro1">
          <table:table-cell office:value-type="float" office:value="542.67919921875">
            <text:p>542.6791992188</text:p>
          </table:table-cell>
          <table:table-cell office:value-type="float" office:value="-0.008895274">
            <text:p>-0.008895274</text:p>
          </table:table-cell>
          <table:table-cell table:number-columns-repeated="4"/>
        </table:table-row>
        <table:table-row table:style-name="ro1">
          <table:table-cell office:value-type="float" office:value="542.796752929688">
            <text:p>542.7967529297</text:p>
          </table:table-cell>
          <table:table-cell office:value-type="float" office:value="0.007344123">
            <text:p>0.007344123</text:p>
          </table:table-cell>
          <table:table-cell table:number-columns-repeated="4"/>
        </table:table-row>
        <table:table-row table:style-name="ro1">
          <table:table-cell office:value-type="float" office:value="542.914306640625">
            <text:p>542.9143066406</text:p>
          </table:table-cell>
          <table:table-cell office:value-type="float" office:value="-0.00440385">
            <text:p>-0.00440385</text:p>
          </table:table-cell>
          <table:table-cell table:number-columns-repeated="4"/>
        </table:table-row>
        <table:table-row table:style-name="ro1">
          <table:table-cell office:value-type="float" office:value="543.031860351563">
            <text:p>543.0318603516</text:p>
          </table:table-cell>
          <table:table-cell office:value-type="float" office:value="0.005522482">
            <text:p>0.005522482</text:p>
          </table:table-cell>
          <table:table-cell table:number-columns-repeated="4"/>
        </table:table-row>
        <table:table-row table:style-name="ro1">
          <table:table-cell office:value-type="float" office:value="543.1494140625">
            <text:p>543.1494140625</text:p>
          </table:table-cell>
          <table:table-cell office:value-type="float" office:value="-0.01338739">
            <text:p>-0.01338739</text:p>
          </table:table-cell>
          <table:table-cell table:number-columns-repeated="4"/>
        </table:table-row>
        <table:table-row table:style-name="ro1">
          <table:table-cell office:value-type="float" office:value="543.266967773438">
            <text:p>543.2669677734</text:p>
          </table:table-cell>
          <table:table-cell office:value-type="float" office:value="0.0008968835">
            <text:p>0.0008968835</text:p>
          </table:table-cell>
          <table:table-cell table:number-columns-repeated="4"/>
        </table:table-row>
        <table:table-row table:style-name="ro1">
          <table:table-cell office:value-type="float" office:value="543.384521484375">
            <text:p>543.3845214844</text:p>
          </table:table-cell>
          <table:table-cell office:value-type="float" office:value="0.004199316">
            <text:p>0.004199316</text:p>
          </table:table-cell>
          <table:table-cell table:number-columns-repeated="4"/>
        </table:table-row>
        <table:table-row table:style-name="ro1">
          <table:table-cell office:value-type="float" office:value="543.502075195313">
            <text:p>543.5020751953</text:p>
          </table:table-cell>
          <table:table-cell office:value-type="float" office:value="-0.0101387">
            <text:p>-0.0101387</text:p>
          </table:table-cell>
          <table:table-cell table:number-columns-repeated="4"/>
        </table:table-row>
        <table:table-row table:style-name="ro1">
          <table:table-cell office:value-type="float" office:value="543.61962890625">
            <text:p>543.6196289063</text:p>
          </table:table-cell>
          <table:table-cell office:value-type="float" office:value="0.0007067786">
            <text:p>0.0007067786</text:p>
          </table:table-cell>
          <table:table-cell table:number-columns-repeated="4"/>
        </table:table-row>
        <table:table-row table:style-name="ro1">
          <table:table-cell office:value-type="float" office:value="543.737182617188">
            <text:p>543.7371826172</text:p>
          </table:table-cell>
          <table:table-cell office:value-type="float" office:value="-0.007222534">
            <text:p>-0.007222534</text:p>
          </table:table-cell>
          <table:table-cell table:number-columns-repeated="4"/>
        </table:table-row>
        <table:table-row table:style-name="ro1">
          <table:table-cell office:value-type="float" office:value="543.854736328125">
            <text:p>543.8547363281</text:p>
          </table:table-cell>
          <table:table-cell office:value-type="float" office:value="-0.005464017">
            <text:p>-0.005464017</text:p>
          </table:table-cell>
          <table:table-cell table:number-columns-repeated="4"/>
        </table:table-row>
        <table:table-row table:style-name="ro1">
          <table:table-cell office:value-type="float" office:value="543.972351074219">
            <text:p>543.9723510742</text:p>
          </table:table-cell>
          <table:table-cell office:value-type="float" office:value="0.0001499367">
            <text:p>0.0001499367</text:p>
          </table:table-cell>
          <table:table-cell table:number-columns-repeated="4"/>
        </table:table-row>
        <table:table-row table:style-name="ro1">
          <table:table-cell office:value-type="float" office:value="544.089904785156">
            <text:p>544.0899047852</text:p>
          </table:table-cell>
          <table:table-cell office:value-type="float" office:value="-0.003629463">
            <text:p>-0.003629463</text:p>
          </table:table-cell>
          <table:table-cell table:number-columns-repeated="4"/>
        </table:table-row>
        <table:table-row table:style-name="ro1">
          <table:table-cell office:value-type="float" office:value="544.207458496094">
            <text:p>544.2074584961</text:p>
          </table:table-cell>
          <table:table-cell office:value-type="float" office:value="-0.001508721">
            <text:p>-0.001508721</text:p>
          </table:table-cell>
          <table:table-cell table:number-columns-repeated="4"/>
        </table:table-row>
        <table:table-row table:style-name="ro1">
          <table:table-cell office:value-type="float" office:value="544.325073242188">
            <text:p>544.3250732422</text:p>
          </table:table-cell>
          <table:table-cell office:value-type="float" office:value="0.005299175">
            <text:p>0.005299175</text:p>
          </table:table-cell>
          <table:table-cell table:number-columns-repeated="4"/>
        </table:table-row>
        <table:table-row table:style-name="ro1">
          <table:table-cell office:value-type="float" office:value="544.442626953125">
            <text:p>544.4426269531</text:p>
          </table:table-cell>
          <table:table-cell office:value-type="float" office:value="-0.009276687">
            <text:p>-0.009276687</text:p>
          </table:table-cell>
          <table:table-cell table:number-columns-repeated="4"/>
        </table:table-row>
        <table:table-row table:style-name="ro1">
          <table:table-cell office:value-type="float" office:value="544.560241699219">
            <text:p>544.5602416992</text:p>
          </table:table-cell>
          <table:table-cell office:value-type="float" office:value="0.00197782">
            <text:p>0.00197782</text:p>
          </table:table-cell>
          <table:table-cell table:number-columns-repeated="4"/>
        </table:table-row>
        <table:table-row table:style-name="ro1">
          <table:table-cell office:value-type="float" office:value="544.677856445313">
            <text:p>544.6778564453</text:p>
          </table:table-cell>
          <table:table-cell office:value-type="float" office:value="0.001979976">
            <text:p>0.001979976</text:p>
          </table:table-cell>
          <table:table-cell table:number-columns-repeated="4"/>
        </table:table-row>
        <table:table-row table:style-name="ro1">
          <table:table-cell office:value-type="float" office:value="544.79541015625">
            <text:p>544.7954101563</text:p>
          </table:table-cell>
          <table:table-cell office:value-type="float" office:value="0.002758229">
            <text:p>0.002758229</text:p>
          </table:table-cell>
          <table:table-cell table:number-columns-repeated="4"/>
        </table:table-row>
        <table:table-row table:style-name="ro1">
          <table:table-cell office:value-type="float" office:value="544.913024902344">
            <text:p>544.9130249023</text:p>
          </table:table-cell>
          <table:table-cell office:value-type="float" office:value="-0.01095667">
            <text:p>-0.01095667</text:p>
          </table:table-cell>
          <table:table-cell table:number-columns-repeated="4"/>
        </table:table-row>
        <table:table-row table:style-name="ro1">
          <table:table-cell office:value-type="float" office:value="545.030639648438">
            <text:p>545.0306396484</text:p>
          </table:table-cell>
          <table:table-cell office:value-type="string">
            <text:p>-6.442564E-06</text:p>
          </table:table-cell>
          <table:table-cell table:number-columns-repeated="4"/>
        </table:table-row>
        <table:table-row table:style-name="ro1">
          <table:table-cell office:value-type="float" office:value="545.148254394531">
            <text:p>545.1482543945</text:p>
          </table:table-cell>
          <table:table-cell office:value-type="float" office:value="0.002554045">
            <text:p>0.002554045</text:p>
          </table:table-cell>
          <table:table-cell table:number-columns-repeated="4"/>
        </table:table-row>
        <table:table-row table:style-name="ro1">
          <table:table-cell office:value-type="float" office:value="545.265869140625">
            <text:p>545.2658691406</text:p>
          </table:table-cell>
          <table:table-cell office:value-type="float" office:value="0.001339778">
            <text:p>0.001339778</text:p>
          </table:table-cell>
          <table:table-cell table:number-columns-repeated="4"/>
        </table:table-row>
        <table:table-row table:style-name="ro1">
          <table:table-cell office:value-type="float" office:value="545.383483886719">
            <text:p>545.3834838867</text:p>
          </table:table-cell>
          <table:table-cell office:value-type="float" office:value="-0.01393182">
            <text:p>-0.01393182</text:p>
          </table:table-cell>
          <table:table-cell table:number-columns-repeated="4"/>
        </table:table-row>
        <table:table-row table:style-name="ro1">
          <table:table-cell office:value-type="float" office:value="545.501098632813">
            <text:p>545.5010986328</text:p>
          </table:table-cell>
          <table:table-cell office:value-type="float" office:value="-0.0007809165">
            <text:p>-0.0007809165</text:p>
          </table:table-cell>
          <table:table-cell table:number-columns-repeated="4"/>
        </table:table-row>
        <table:table-row table:style-name="ro1">
          <table:table-cell office:value-type="float" office:value="545.618713378906">
            <text:p>545.6187133789</text:p>
          </table:table-cell>
          <table:table-cell office:value-type="float" office:value="0.005239622">
            <text:p>0.005239622</text:p>
          </table:table-cell>
          <table:table-cell table:number-columns-repeated="4"/>
        </table:table-row>
        <table:table-row table:style-name="ro1">
          <table:table-cell office:value-type="float" office:value="545.736328125">
            <text:p>545.736328125</text:p>
          </table:table-cell>
          <table:table-cell office:value-type="float" office:value="0.004264586">
            <text:p>0.004264586</text:p>
          </table:table-cell>
          <table:table-cell table:number-columns-repeated="4"/>
        </table:table-row>
        <table:table-row table:style-name="ro1">
          <table:table-cell office:value-type="float" office:value="545.853942871094">
            <text:p>545.8539428711</text:p>
          </table:table-cell>
          <table:table-cell office:value-type="float" office:value="0.001563261">
            <text:p>0.001563261</text:p>
          </table:table-cell>
          <table:table-cell table:number-columns-repeated="4"/>
        </table:table-row>
        <table:table-row table:style-name="ro1">
          <table:table-cell office:value-type="float" office:value="545.971557617188">
            <text:p>545.9715576172</text:p>
          </table:table-cell>
          <table:table-cell office:value-type="float" office:value="0.0100502">
            <text:p>0.0100502</text:p>
          </table:table-cell>
          <table:table-cell table:number-columns-repeated="4"/>
        </table:table-row>
        <table:table-row table:style-name="ro1">
          <table:table-cell office:value-type="float" office:value="546.089172363281">
            <text:p>546.0891723633</text:p>
          </table:table-cell>
          <table:table-cell office:value-type="float" office:value="0.01131559">
            <text:p>0.01131559</text:p>
          </table:table-cell>
          <table:table-cell table:number-columns-repeated="4"/>
        </table:table-row>
        <table:table-row table:style-name="ro1">
          <table:table-cell office:value-type="float" office:value="546.206848144531">
            <text:p>546.2068481445</text:p>
          </table:table-cell>
          <table:table-cell office:value-type="float" office:value="0.01110069">
            <text:p>0.01110069</text:p>
          </table:table-cell>
          <table:table-cell table:number-columns-repeated="4"/>
        </table:table-row>
        <table:table-row table:style-name="ro1">
          <table:table-cell office:value-type="float" office:value="546.324462890625">
            <text:p>546.3244628906</text:p>
          </table:table-cell>
          <table:table-cell office:value-type="float" office:value="-0.00620697">
            <text:p>-0.00620697</text:p>
          </table:table-cell>
          <table:table-cell table:number-columns-repeated="4"/>
        </table:table-row>
        <table:table-row table:style-name="ro1">
          <table:table-cell office:value-type="float" office:value="546.442077636719">
            <text:p>546.4420776367</text:p>
          </table:table-cell>
          <table:table-cell office:value-type="float" office:value="0.003452319">
            <text:p>0.003452319</text:p>
          </table:table-cell>
          <table:table-cell table:number-columns-repeated="4"/>
        </table:table-row>
        <table:table-row table:style-name="ro1">
          <table:table-cell office:value-type="float" office:value="546.559753417969">
            <text:p>546.559753418</text:p>
          </table:table-cell>
          <table:table-cell office:value-type="float" office:value="0.004316628">
            <text:p>0.004316628</text:p>
          </table:table-cell>
          <table:table-cell table:number-columns-repeated="4"/>
        </table:table-row>
        <table:table-row table:style-name="ro1">
          <table:table-cell office:value-type="float" office:value="546.677368164063">
            <text:p>546.6773681641</text:p>
          </table:table-cell>
          <table:table-cell office:value-type="float" office:value="0.0001592674">
            <text:p>0.0001592674</text:p>
          </table:table-cell>
          <table:table-cell table:number-columns-repeated="4"/>
        </table:table-row>
        <table:table-row table:style-name="ro1">
          <table:table-cell office:value-type="float" office:value="546.795043945313">
            <text:p>546.7950439453</text:p>
          </table:table-cell>
          <table:table-cell office:value-type="float" office:value="0.001511156">
            <text:p>0.001511156</text:p>
          </table:table-cell>
          <table:table-cell table:number-columns-repeated="4"/>
        </table:table-row>
        <table:table-row table:style-name="ro1">
          <table:table-cell office:value-type="float" office:value="546.912719726563">
            <text:p>546.9127197266</text:p>
          </table:table-cell>
          <table:table-cell office:value-type="float" office:value="0.005304684">
            <text:p>0.005304684</text:p>
          </table:table-cell>
          <table:table-cell table:number-columns-repeated="4"/>
        </table:table-row>
        <table:table-row table:style-name="ro1">
          <table:table-cell office:value-type="float" office:value="547.030334472656">
            <text:p>547.0303344727</text:p>
          </table:table-cell>
          <table:table-cell office:value-type="float" office:value="-0.003751123">
            <text:p>-0.003751123</text:p>
          </table:table-cell>
          <table:table-cell table:number-columns-repeated="4"/>
        </table:table-row>
        <table:table-row table:style-name="ro1">
          <table:table-cell office:value-type="float" office:value="547.148010253906">
            <text:p>547.1480102539</text:p>
          </table:table-cell>
          <table:table-cell office:value-type="float" office:value="0.004789958">
            <text:p>0.004789958</text:p>
          </table:table-cell>
          <table:table-cell table:number-columns-repeated="4"/>
        </table:table-row>
        <table:table-row table:style-name="ro1">
          <table:table-cell office:value-type="float" office:value="547.265686035156">
            <text:p>547.2656860352</text:p>
          </table:table-cell>
          <table:table-cell office:value-type="float" office:value="0.005879279">
            <text:p>0.005879279</text:p>
          </table:table-cell>
          <table:table-cell table:number-columns-repeated="4"/>
        </table:table-row>
        <table:table-row table:style-name="ro1">
          <table:table-cell office:value-type="float" office:value="547.383361816406">
            <text:p>547.3833618164</text:p>
          </table:table-cell>
          <table:table-cell office:value-type="float" office:value="0.005899072">
            <text:p>0.005899072</text:p>
          </table:table-cell>
          <table:table-cell table:number-columns-repeated="4"/>
        </table:table-row>
        <table:table-row table:style-name="ro1">
          <table:table-cell office:value-type="float" office:value="547.5009765625">
            <text:p>547.5009765625</text:p>
          </table:table-cell>
          <table:table-cell office:value-type="float" office:value="-0.007326414">
            <text:p>-0.007326414</text:p>
          </table:table-cell>
          <table:table-cell table:number-columns-repeated="4"/>
        </table:table-row>
        <table:table-row table:style-name="ro1">
          <table:table-cell office:value-type="float" office:value="547.61865234375">
            <text:p>547.6186523438</text:p>
          </table:table-cell>
          <table:table-cell office:value-type="float" office:value="0.000888521">
            <text:p>0.000888521</text:p>
          </table:table-cell>
          <table:table-cell table:number-columns-repeated="4"/>
        </table:table-row>
        <table:table-row table:style-name="ro1">
          <table:table-cell office:value-type="float" office:value="547.736328125">
            <text:p>547.736328125</text:p>
          </table:table-cell>
          <table:table-cell office:value-type="float" office:value="0.003947369">
            <text:p>0.003947369</text:p>
          </table:table-cell>
          <table:table-cell table:number-columns-repeated="4"/>
        </table:table-row>
        <table:table-row table:style-name="ro1">
          <table:table-cell office:value-type="float" office:value="547.85400390625">
            <text:p>547.8540039063</text:p>
          </table:table-cell>
          <table:table-cell office:value-type="float" office:value="-0.002909567">
            <text:p>-0.002909567</text:p>
          </table:table-cell>
          <table:table-cell table:number-columns-repeated="4"/>
        </table:table-row>
        <table:table-row table:style-name="ro1">
          <table:table-cell office:value-type="float" office:value="547.971740722656">
            <text:p>547.9717407227</text:p>
          </table:table-cell>
          <table:table-cell office:value-type="float" office:value="-0.0116894">
            <text:p>-0.0116894</text:p>
          </table:table-cell>
          <table:table-cell table:number-columns-repeated="4"/>
        </table:table-row>
        <table:table-row table:style-name="ro1">
          <table:table-cell office:value-type="float" office:value="548.089416503906">
            <text:p>548.0894165039</text:p>
          </table:table-cell>
          <table:table-cell office:value-type="float" office:value="-0.007459983">
            <text:p>-0.007459983</text:p>
          </table:table-cell>
          <table:table-cell table:number-columns-repeated="4"/>
        </table:table-row>
        <table:table-row table:style-name="ro1">
          <table:table-cell office:value-type="float" office:value="548.207092285156">
            <text:p>548.2070922852</text:p>
          </table:table-cell>
          <table:table-cell office:value-type="float" office:value="0.007932511">
            <text:p>0.007932511</text:p>
          </table:table-cell>
          <table:table-cell table:number-columns-repeated="4"/>
        </table:table-row>
        <table:table-row table:style-name="ro1">
          <table:table-cell office:value-type="float" office:value="548.324768066406">
            <text:p>548.3247680664</text:p>
          </table:table-cell>
          <table:table-cell office:value-type="float" office:value="-0.009783866">
            <text:p>-0.009783866</text:p>
          </table:table-cell>
          <table:table-cell table:number-columns-repeated="4"/>
        </table:table-row>
        <table:table-row table:style-name="ro1">
          <table:table-cell office:value-type="float" office:value="548.442443847656">
            <text:p>548.4424438477</text:p>
          </table:table-cell>
          <table:table-cell office:value-type="float" office:value="-0.003731607">
            <text:p>-0.003731607</text:p>
          </table:table-cell>
          <table:table-cell table:number-columns-repeated="4"/>
        </table:table-row>
        <table:table-row table:style-name="ro1">
          <table:table-cell office:value-type="float" office:value="548.560180664063">
            <text:p>548.5601806641</text:p>
          </table:table-cell>
          <table:table-cell office:value-type="float" office:value="-0.003403714">
            <text:p>-0.003403714</text:p>
          </table:table-cell>
          <table:table-cell table:number-columns-repeated="4"/>
        </table:table-row>
        <table:table-row table:style-name="ro1">
          <table:table-cell office:value-type="float" office:value="548.677856445313">
            <text:p>548.6778564453</text:p>
          </table:table-cell>
          <table:table-cell office:value-type="float" office:value="0.007068576">
            <text:p>0.007068576</text:p>
          </table:table-cell>
          <table:table-cell table:number-columns-repeated="4"/>
        </table:table-row>
        <table:table-row table:style-name="ro1">
          <table:table-cell office:value-type="float" office:value="548.795593261719">
            <text:p>548.7955932617</text:p>
          </table:table-cell>
          <table:table-cell office:value-type="float" office:value="-0.004567716">
            <text:p>-0.004567716</text:p>
          </table:table-cell>
          <table:table-cell table:number-columns-repeated="4"/>
        </table:table-row>
        <table:table-row table:style-name="ro1">
          <table:table-cell office:value-type="float" office:value="548.913269042969">
            <text:p>548.913269043</text:p>
          </table:table-cell>
          <table:table-cell office:value-type="float" office:value="-0.006379917">
            <text:p>-0.006379917</text:p>
          </table:table-cell>
          <table:table-cell table:number-columns-repeated="4"/>
        </table:table-row>
        <table:table-row table:style-name="ro1">
          <table:table-cell office:value-type="float" office:value="549.031005859375">
            <text:p>549.0310058594</text:p>
          </table:table-cell>
          <table:table-cell office:value-type="float" office:value="-0.002758448">
            <text:p>-0.002758448</text:p>
          </table:table-cell>
          <table:table-cell table:number-columns-repeated="4"/>
        </table:table-row>
        <table:table-row table:style-name="ro1">
          <table:table-cell office:value-type="float" office:value="549.148681640625">
            <text:p>549.1486816406</text:p>
          </table:table-cell>
          <table:table-cell office:value-type="float" office:value="-0.005365353">
            <text:p>-0.005365353</text:p>
          </table:table-cell>
          <table:table-cell table:number-columns-repeated="4"/>
        </table:table-row>
        <table:table-row table:style-name="ro1">
          <table:table-cell office:value-type="float" office:value="549.266418457031">
            <text:p>549.266418457</text:p>
          </table:table-cell>
          <table:table-cell office:value-type="float" office:value="0.005237874">
            <text:p>0.005237874</text:p>
          </table:table-cell>
          <table:table-cell table:number-columns-repeated="4"/>
        </table:table-row>
        <table:table-row table:style-name="ro1">
          <table:table-cell office:value-type="float" office:value="549.384155273438">
            <text:p>549.3841552734</text:p>
          </table:table-cell>
          <table:table-cell office:value-type="float" office:value="-0.001295646">
            <text:p>-0.001295646</text:p>
          </table:table-cell>
          <table:table-cell table:number-columns-repeated="4"/>
        </table:table-row>
        <table:table-row table:style-name="ro1">
          <table:table-cell office:value-type="float" office:value="549.501831054688">
            <text:p>549.5018310547</text:p>
          </table:table-cell>
          <table:table-cell office:value-type="float" office:value="0.0040118">
            <text:p>0.0040118</text:p>
          </table:table-cell>
          <table:table-cell table:number-columns-repeated="4"/>
        </table:table-row>
        <table:table-row table:style-name="ro1">
          <table:table-cell office:value-type="float" office:value="549.619567871094">
            <text:p>549.6195678711</text:p>
          </table:table-cell>
          <table:table-cell office:value-type="float" office:value="0.01625946">
            <text:p>0.01625946</text:p>
          </table:table-cell>
          <table:table-cell table:number-columns-repeated="4"/>
        </table:table-row>
        <table:table-row table:style-name="ro1">
          <table:table-cell office:value-type="float" office:value="549.7373046875">
            <text:p>549.7373046875</text:p>
          </table:table-cell>
          <table:table-cell office:value-type="float" office:value="0.007840333">
            <text:p>0.007840333</text:p>
          </table:table-cell>
          <table:table-cell table:number-columns-repeated="4"/>
        </table:table-row>
        <table:table-row table:style-name="ro1">
          <table:table-cell office:value-type="float" office:value="549.855041503906">
            <text:p>549.8550415039</text:p>
          </table:table-cell>
          <table:table-cell office:value-type="float" office:value="0.00227997">
            <text:p>0.00227997</text:p>
          </table:table-cell>
          <table:table-cell table:number-columns-repeated="4"/>
        </table:table-row>
        <table:table-row table:style-name="ro1">
          <table:table-cell office:value-type="float" office:value="549.972778320313">
            <text:p>549.9727783203</text:p>
          </table:table-cell>
          <table:table-cell office:value-type="float" office:value="0.009052929">
            <text:p>0.009052929</text:p>
          </table:table-cell>
          <table:table-cell table:number-columns-repeated="4"/>
        </table:table-row>
        <table:table-row table:style-name="ro1">
          <table:table-cell office:value-type="float" office:value="550.090515136719">
            <text:p>550.0905151367</text:p>
          </table:table-cell>
          <table:table-cell office:value-type="float" office:value="-0.01106312">
            <text:p>-0.01106312</text:p>
          </table:table-cell>
          <table:table-cell table:number-columns-repeated="4"/>
        </table:table-row>
        <table:table-row table:style-name="ro1">
          <table:table-cell office:value-type="float" office:value="550.208251953125">
            <text:p>550.2082519531</text:p>
          </table:table-cell>
          <table:table-cell office:value-type="float" office:value="0.002688653">
            <text:p>0.002688653</text:p>
          </table:table-cell>
          <table:table-cell table:number-columns-repeated="4"/>
        </table:table-row>
        <table:table-row table:style-name="ro1">
          <table:table-cell office:value-type="float" office:value="550.325988769531">
            <text:p>550.3259887695</text:p>
          </table:table-cell>
          <table:table-cell office:value-type="float" office:value="-0.00582884">
            <text:p>-0.00582884</text:p>
          </table:table-cell>
          <table:table-cell table:number-columns-repeated="4"/>
        </table:table-row>
        <table:table-row table:style-name="ro1">
          <table:table-cell office:value-type="float" office:value="550.443725585938">
            <text:p>550.4437255859</text:p>
          </table:table-cell>
          <table:table-cell office:value-type="float" office:value="-0.0005420346">
            <text:p>-0.0005420346</text:p>
          </table:table-cell>
          <table:table-cell table:number-columns-repeated="4"/>
        </table:table-row>
        <table:table-row table:style-name="ro1">
          <table:table-cell office:value-type="float" office:value="550.561462402344">
            <text:p>550.5614624023</text:p>
          </table:table-cell>
          <table:table-cell office:value-type="float" office:value="0.01040415">
            <text:p>0.01040415</text:p>
          </table:table-cell>
          <table:table-cell table:number-columns-repeated="4"/>
        </table:table-row>
        <table:table-row table:style-name="ro1">
          <table:table-cell office:value-type="float" office:value="550.679260253906">
            <text:p>550.6792602539</text:p>
          </table:table-cell>
          <table:table-cell office:value-type="float" office:value="0.004790849">
            <text:p>0.004790849</text:p>
          </table:table-cell>
          <table:table-cell table:number-columns-repeated="4"/>
        </table:table-row>
        <table:table-row table:style-name="ro1">
          <table:table-cell office:value-type="float" office:value="550.796997070313">
            <text:p>550.7969970703</text:p>
          </table:table-cell>
          <table:table-cell office:value-type="float" office:value="0.0007444785">
            <text:p>0.0007444785</text:p>
          </table:table-cell>
          <table:table-cell table:number-columns-repeated="4"/>
        </table:table-row>
        <table:table-row table:style-name="ro1">
          <table:table-cell office:value-type="float" office:value="550.914733886719">
            <text:p>550.9147338867</text:p>
          </table:table-cell>
          <table:table-cell office:value-type="float" office:value="0.003805948">
            <text:p>0.003805948</text:p>
          </table:table-cell>
          <table:table-cell table:number-columns-repeated="4"/>
        </table:table-row>
        <table:table-row table:style-name="ro1">
          <table:table-cell office:value-type="float" office:value="551.032531738281">
            <text:p>551.0325317383</text:p>
          </table:table-cell>
          <table:table-cell office:value-type="float" office:value="-0.003612262">
            <text:p>-0.003612262</text:p>
          </table:table-cell>
          <table:table-cell table:number-columns-repeated="4"/>
        </table:table-row>
        <table:table-row table:style-name="ro1">
          <table:table-cell office:value-type="float" office:value="551.150268554688">
            <text:p>551.1502685547</text:p>
          </table:table-cell>
          <table:table-cell office:value-type="float" office:value="0.003978503">
            <text:p>0.003978503</text:p>
          </table:table-cell>
          <table:table-cell table:number-columns-repeated="4"/>
        </table:table-row>
        <table:table-row table:style-name="ro1">
          <table:table-cell office:value-type="float" office:value="551.26806640625">
            <text:p>551.2680664063</text:p>
          </table:table-cell>
          <table:table-cell office:value-type="float" office:value="-0.009736053">
            <text:p>-0.009736053</text:p>
          </table:table-cell>
          <table:table-cell table:number-columns-repeated="4"/>
        </table:table-row>
        <table:table-row table:style-name="ro1">
          <table:table-cell office:value-type="float" office:value="551.385803222656">
            <text:p>551.3858032227</text:p>
          </table:table-cell>
          <table:table-cell office:value-type="float" office:value="0.005217816">
            <text:p>0.005217816</text:p>
          </table:table-cell>
          <table:table-cell table:number-columns-repeated="4"/>
        </table:table-row>
        <table:table-row table:style-name="ro1">
          <table:table-cell office:value-type="float" office:value="551.503601074219">
            <text:p>551.5036010742</text:p>
          </table:table-cell>
          <table:table-cell office:value-type="float" office:value="-0.008851162">
            <text:p>-0.008851162</text:p>
          </table:table-cell>
          <table:table-cell table:number-columns-repeated="4"/>
        </table:table-row>
        <table:table-row table:style-name="ro1">
          <table:table-cell office:value-type="float" office:value="551.621398925781">
            <text:p>551.6213989258</text:p>
          </table:table-cell>
          <table:table-cell office:value-type="float" office:value="0.01555712">
            <text:p>0.01555712</text:p>
          </table:table-cell>
          <table:table-cell table:number-columns-repeated="4"/>
        </table:table-row>
        <table:table-row table:style-name="ro1">
          <table:table-cell office:value-type="float" office:value="551.739135742188">
            <text:p>551.7391357422</text:p>
          </table:table-cell>
          <table:table-cell office:value-type="float" office:value="-0.001575764">
            <text:p>-0.001575764</text:p>
          </table:table-cell>
          <table:table-cell table:number-columns-repeated="4"/>
        </table:table-row>
        <table:table-row table:style-name="ro1">
          <table:table-cell office:value-type="float" office:value="551.85693359375">
            <text:p>551.8569335938</text:p>
          </table:table-cell>
          <table:table-cell office:value-type="float" office:value="-0.005755802">
            <text:p>-0.005755802</text:p>
          </table:table-cell>
          <table:table-cell table:number-columns-repeated="4"/>
        </table:table-row>
        <table:table-row table:style-name="ro1">
          <table:table-cell office:value-type="float" office:value="551.974731445313">
            <text:p>551.9747314453</text:p>
          </table:table-cell>
          <table:table-cell office:value-type="float" office:value="0.005033548">
            <text:p>0.005033548</text:p>
          </table:table-cell>
          <table:table-cell table:number-columns-repeated="4"/>
        </table:table-row>
        <table:table-row table:style-name="ro1">
          <table:table-cell office:value-type="float" office:value="552.092529296875">
            <text:p>552.0925292969</text:p>
          </table:table-cell>
          <table:table-cell office:value-type="float" office:value="-0.004326935">
            <text:p>-0.004326935</text:p>
          </table:table-cell>
          <table:table-cell table:number-columns-repeated="4"/>
        </table:table-row>
        <table:table-row table:style-name="ro1">
          <table:table-cell office:value-type="float" office:value="552.210327148438">
            <text:p>552.2103271484</text:p>
          </table:table-cell>
          <table:table-cell office:value-type="float" office:value="0.01171499">
            <text:p>0.01171499</text:p>
          </table:table-cell>
          <table:table-cell table:number-columns-repeated="4"/>
        </table:table-row>
        <table:table-row table:style-name="ro1">
          <table:table-cell office:value-type="float" office:value="552.328125">
            <text:p>552.328125</text:p>
          </table:table-cell>
          <table:table-cell office:value-type="float" office:value="-0.000905874">
            <text:p>-0.000905874</text:p>
          </table:table-cell>
          <table:table-cell table:number-columns-repeated="4"/>
        </table:table-row>
        <table:table-row table:style-name="ro1">
          <table:table-cell office:value-type="float" office:value="552.445922851563">
            <text:p>552.4459228516</text:p>
          </table:table-cell>
          <table:table-cell office:value-type="float" office:value="0.001485556">
            <text:p>0.001485556</text:p>
          </table:table-cell>
          <table:table-cell table:number-columns-repeated="4"/>
        </table:table-row>
        <table:table-row table:style-name="ro1">
          <table:table-cell office:value-type="float" office:value="552.563720703125">
            <text:p>552.5637207031</text:p>
          </table:table-cell>
          <table:table-cell office:value-type="float" office:value="0.01576474">
            <text:p>0.01576474</text:p>
          </table:table-cell>
          <table:table-cell table:number-columns-repeated="4"/>
        </table:table-row>
        <table:table-row table:style-name="ro1">
          <table:table-cell office:value-type="float" office:value="552.681518554688">
            <text:p>552.6815185547</text:p>
          </table:table-cell>
          <table:table-cell office:value-type="float" office:value="-0.002841256">
            <text:p>-0.002841256</text:p>
          </table:table-cell>
          <table:table-cell table:number-columns-repeated="4"/>
        </table:table-row>
        <table:table-row table:style-name="ro1">
          <table:table-cell office:value-type="float" office:value="552.79931640625">
            <text:p>552.7993164063</text:p>
          </table:table-cell>
          <table:table-cell office:value-type="float" office:value="-0.001179809">
            <text:p>-0.001179809</text:p>
          </table:table-cell>
          <table:table-cell table:number-columns-repeated="4"/>
        </table:table-row>
        <table:table-row table:style-name="ro1">
          <table:table-cell office:value-type="float" office:value="552.917114257813">
            <text:p>552.9171142578</text:p>
          </table:table-cell>
          <table:table-cell office:value-type="float" office:value="-0.003211446">
            <text:p>-0.003211446</text:p>
          </table:table-cell>
          <table:table-cell table:number-columns-repeated="4"/>
        </table:table-row>
        <table:table-row table:style-name="ro1">
          <table:table-cell office:value-type="float" office:value="553.034973144531">
            <text:p>553.0349731445</text:p>
          </table:table-cell>
          <table:table-cell office:value-type="float" office:value="-0.002345625">
            <text:p>-0.002345625</text:p>
          </table:table-cell>
          <table:table-cell table:number-columns-repeated="4"/>
        </table:table-row>
        <table:table-row table:style-name="ro1">
          <table:table-cell office:value-type="float" office:value="553.152770996094">
            <text:p>553.1527709961</text:p>
          </table:table-cell>
          <table:table-cell office:value-type="float" office:value="0.00318195">
            <text:p>0.00318195</text:p>
          </table:table-cell>
          <table:table-cell table:number-columns-repeated="4"/>
        </table:table-row>
        <table:table-row table:style-name="ro1">
          <table:table-cell office:value-type="float" office:value="553.270568847656">
            <text:p>553.2705688477</text:p>
          </table:table-cell>
          <table:table-cell office:value-type="float" office:value="0.02141654">
            <text:p>0.02141654</text:p>
          </table:table-cell>
          <table:table-cell table:number-columns-repeated="4"/>
        </table:table-row>
        <table:table-row table:style-name="ro1">
          <table:table-cell office:value-type="float" office:value="553.388427734375">
            <text:p>553.3884277344</text:p>
          </table:table-cell>
          <table:table-cell office:value-type="float" office:value="-0.00706638">
            <text:p>-0.00706638</text:p>
          </table:table-cell>
          <table:table-cell table:number-columns-repeated="4"/>
        </table:table-row>
        <table:table-row table:style-name="ro1">
          <table:table-cell office:value-type="float" office:value="553.506225585938">
            <text:p>553.5062255859</text:p>
          </table:table-cell>
          <table:table-cell office:value-type="float" office:value="0.01274755">
            <text:p>0.01274755</text:p>
          </table:table-cell>
          <table:table-cell table:number-columns-repeated="4"/>
        </table:table-row>
        <table:table-row table:style-name="ro1">
          <table:table-cell office:value-type="float" office:value="553.624084472656">
            <text:p>553.6240844727</text:p>
          </table:table-cell>
          <table:table-cell office:value-type="float" office:value="0.001884509">
            <text:p>0.001884509</text:p>
          </table:table-cell>
          <table:table-cell table:number-columns-repeated="4"/>
        </table:table-row>
        <table:table-row table:style-name="ro1">
          <table:table-cell office:value-type="float" office:value="553.741882324219">
            <text:p>553.7418823242</text:p>
          </table:table-cell>
          <table:table-cell office:value-type="float" office:value="-0.001985996">
            <text:p>-0.001985996</text:p>
          </table:table-cell>
          <table:table-cell table:number-columns-repeated="4"/>
        </table:table-row>
        <table:table-row table:style-name="ro1">
          <table:table-cell office:value-type="float" office:value="553.859741210938">
            <text:p>553.8597412109</text:p>
          </table:table-cell>
          <table:table-cell office:value-type="float" office:value="-0.009731881">
            <text:p>-0.009731881</text:p>
          </table:table-cell>
          <table:table-cell table:number-columns-repeated="4"/>
        </table:table-row>
        <table:table-row table:style-name="ro1">
          <table:table-cell office:value-type="float" office:value="553.977600097656">
            <text:p>553.9776000977</text:p>
          </table:table-cell>
          <table:table-cell office:value-type="float" office:value="0.002080506">
            <text:p>0.002080506</text:p>
          </table:table-cell>
          <table:table-cell table:number-columns-repeated="4"/>
        </table:table-row>
        <table:table-row table:style-name="ro1">
          <table:table-cell office:value-type="float" office:value="554.095458984375">
            <text:p>554.0954589844</text:p>
          </table:table-cell>
          <table:table-cell office:value-type="float" office:value="-0.002762669">
            <text:p>-0.002762669</text:p>
          </table:table-cell>
          <table:table-cell table:number-columns-repeated="4"/>
        </table:table-row>
        <table:table-row table:style-name="ro1">
          <table:table-cell office:value-type="float" office:value="554.213256835938">
            <text:p>554.2132568359</text:p>
          </table:table-cell>
          <table:table-cell office:value-type="float" office:value="0.02081816">
            <text:p>0.02081816</text:p>
          </table:table-cell>
          <table:table-cell table:number-columns-repeated="4"/>
        </table:table-row>
        <table:table-row table:style-name="ro1">
          <table:table-cell office:value-type="float" office:value="554.331115722656">
            <text:p>554.3311157227</text:p>
          </table:table-cell>
          <table:table-cell office:value-type="float" office:value="0.002815518">
            <text:p>0.002815518</text:p>
          </table:table-cell>
          <table:table-cell table:number-columns-repeated="4"/>
        </table:table-row>
        <table:table-row table:style-name="ro1">
          <table:table-cell office:value-type="float" office:value="554.448974609375">
            <text:p>554.4489746094</text:p>
          </table:table-cell>
          <table:table-cell office:value-type="float" office:value="0.001641987">
            <text:p>0.001641987</text:p>
          </table:table-cell>
          <table:table-cell table:number-columns-repeated="4"/>
        </table:table-row>
        <table:table-row table:style-name="ro1">
          <table:table-cell office:value-type="float" office:value="554.566833496094">
            <text:p>554.5668334961</text:p>
          </table:table-cell>
          <table:table-cell office:value-type="float" office:value="0.002248578">
            <text:p>0.002248578</text:p>
          </table:table-cell>
          <table:table-cell table:number-columns-repeated="4"/>
        </table:table-row>
        <table:table-row table:style-name="ro1">
          <table:table-cell office:value-type="float" office:value="554.684692382813">
            <text:p>554.6846923828</text:p>
          </table:table-cell>
          <table:table-cell office:value-type="float" office:value="-0.004345607">
            <text:p>-0.004345607</text:p>
          </table:table-cell>
          <table:table-cell table:number-columns-repeated="4"/>
        </table:table-row>
        <table:table-row table:style-name="ro1">
          <table:table-cell office:value-type="float" office:value="554.802551269531">
            <text:p>554.8025512695</text:p>
          </table:table-cell>
          <table:table-cell office:value-type="float" office:value="-0.003185414">
            <text:p>-0.003185414</text:p>
          </table:table-cell>
          <table:table-cell table:number-columns-repeated="4"/>
        </table:table-row>
        <table:table-row table:style-name="ro1">
          <table:table-cell office:value-type="float" office:value="554.92041015625">
            <text:p>554.9204101563</text:p>
          </table:table-cell>
          <table:table-cell office:value-type="float" office:value="-0.007257106">
            <text:p>-0.007257106</text:p>
          </table:table-cell>
          <table:table-cell table:number-columns-repeated="4"/>
        </table:table-row>
        <table:table-row table:style-name="ro1">
          <table:table-cell office:value-type="float" office:value="555.038269042969">
            <text:p>555.038269043</text:p>
          </table:table-cell>
          <table:table-cell office:value-type="float" office:value="-0.0006151854">
            <text:p>-0.0006151854</text:p>
          </table:table-cell>
          <table:table-cell table:number-columns-repeated="4"/>
        </table:table-row>
        <table:table-row table:style-name="ro1">
          <table:table-cell office:value-type="float" office:value="555.156127929688">
            <text:p>555.1561279297</text:p>
          </table:table-cell>
          <table:table-cell office:value-type="float" office:value="-0.0005666695">
            <text:p>-0.0005666695</text:p>
          </table:table-cell>
          <table:table-cell table:number-columns-repeated="4"/>
        </table:table-row>
        <table:table-row table:style-name="ro1">
          <table:table-cell office:value-type="float" office:value="555.274047851563">
            <text:p>555.2740478516</text:p>
          </table:table-cell>
          <table:table-cell office:value-type="float" office:value="0.000621695">
            <text:p>0.000621695</text:p>
          </table:table-cell>
          <table:table-cell table:number-columns-repeated="4"/>
        </table:table-row>
        <table:table-row table:style-name="ro1">
          <table:table-cell office:value-type="float" office:value="555.391906738281">
            <text:p>555.3919067383</text:p>
          </table:table-cell>
          <table:table-cell office:value-type="float" office:value="0.003185738">
            <text:p>0.003185738</text:p>
          </table:table-cell>
          <table:table-cell table:number-columns-repeated="4"/>
        </table:table-row>
        <table:table-row table:style-name="ro1">
          <table:table-cell office:value-type="float" office:value="555.509765625">
            <text:p>555.509765625</text:p>
          </table:table-cell>
          <table:table-cell office:value-type="float" office:value="0.002004652">
            <text:p>0.002004652</text:p>
          </table:table-cell>
          <table:table-cell table:number-columns-repeated="4"/>
        </table:table-row>
        <table:table-row table:style-name="ro1">
          <table:table-cell office:value-type="float" office:value="555.627685546875">
            <text:p>555.6276855469</text:p>
          </table:table-cell>
          <table:table-cell office:value-type="float" office:value="0.009848861">
            <text:p>0.009848861</text:p>
          </table:table-cell>
          <table:table-cell table:number-columns-repeated="4"/>
        </table:table-row>
        <table:table-row table:style-name="ro1">
          <table:table-cell office:value-type="float" office:value="555.745544433594">
            <text:p>555.7455444336</text:p>
          </table:table-cell>
          <table:table-cell office:value-type="float" office:value="0.007173517">
            <text:p>0.007173517</text:p>
          </table:table-cell>
          <table:table-cell table:number-columns-repeated="4"/>
        </table:table-row>
        <table:table-row table:style-name="ro1">
          <table:table-cell office:value-type="float" office:value="555.863403320313">
            <text:p>555.8634033203</text:p>
          </table:table-cell>
          <table:table-cell office:value-type="float" office:value="-0.004941696">
            <text:p>-0.004941696</text:p>
          </table:table-cell>
          <table:table-cell table:number-columns-repeated="4"/>
        </table:table-row>
        <table:table-row table:style-name="ro1">
          <table:table-cell office:value-type="float" office:value="555.981323242188">
            <text:p>555.9813232422</text:p>
          </table:table-cell>
          <table:table-cell office:value-type="float" office:value="0.003088405">
            <text:p>0.003088405</text:p>
          </table:table-cell>
          <table:table-cell table:number-columns-repeated="4"/>
        </table:table-row>
        <table:table-row table:style-name="ro1">
          <table:table-cell office:value-type="float" office:value="556.099243164063">
            <text:p>556.0992431641</text:p>
          </table:table-cell>
          <table:table-cell office:value-type="float" office:value="-0.001951635">
            <text:p>-0.001951635</text:p>
          </table:table-cell>
          <table:table-cell table:number-columns-repeated="4"/>
        </table:table-row>
        <table:table-row table:style-name="ro1">
          <table:table-cell office:value-type="float" office:value="556.217102050781">
            <text:p>556.2171020508</text:p>
          </table:table-cell>
          <table:table-cell office:value-type="float" office:value="0.0124185">
            <text:p>0.0124185</text:p>
          </table:table-cell>
          <table:table-cell table:number-columns-repeated="4"/>
        </table:table-row>
        <table:table-row table:style-name="ro1">
          <table:table-cell office:value-type="float" office:value="556.335021972656">
            <text:p>556.3350219727</text:p>
          </table:table-cell>
          <table:table-cell office:value-type="float" office:value="0.0132558">
            <text:p>0.0132558</text:p>
          </table:table-cell>
          <table:table-cell table:number-columns-repeated="4"/>
        </table:table-row>
        <table:table-row table:style-name="ro1">
          <table:table-cell office:value-type="float" office:value="556.452941894531">
            <text:p>556.4529418945</text:p>
          </table:table-cell>
          <table:table-cell office:value-type="float" office:value="0.005059682">
            <text:p>0.005059682</text:p>
          </table:table-cell>
          <table:table-cell table:number-columns-repeated="4"/>
        </table:table-row>
        <table:table-row table:style-name="ro1">
          <table:table-cell office:value-type="float" office:value="556.57080078125">
            <text:p>556.5708007813</text:p>
          </table:table-cell>
          <table:table-cell office:value-type="float" office:value="0.005317095">
            <text:p>0.005317095</text:p>
          </table:table-cell>
          <table:table-cell table:number-columns-repeated="4"/>
        </table:table-row>
        <table:table-row table:style-name="ro1">
          <table:table-cell office:value-type="float" office:value="556.688720703125">
            <text:p>556.6887207031</text:p>
          </table:table-cell>
          <table:table-cell office:value-type="float" office:value="0.003270506">
            <text:p>0.003270506</text:p>
          </table:table-cell>
          <table:table-cell table:number-columns-repeated="4"/>
        </table:table-row>
        <table:table-row table:style-name="ro1">
          <table:table-cell office:value-type="float" office:value="556.806640625">
            <text:p>556.806640625</text:p>
          </table:table-cell>
          <table:table-cell office:value-type="float" office:value="0.0009730126">
            <text:p>0.0009730126</text:p>
          </table:table-cell>
          <table:table-cell table:number-columns-repeated="4"/>
        </table:table-row>
        <table:table-row table:style-name="ro1">
          <table:table-cell office:value-type="float" office:value="556.924560546875">
            <text:p>556.9245605469</text:p>
          </table:table-cell>
          <table:table-cell office:value-type="float" office:value="0.007948439">
            <text:p>0.007948439</text:p>
          </table:table-cell>
          <table:table-cell table:number-columns-repeated="4"/>
        </table:table-row>
        <table:table-row table:style-name="ro1">
          <table:table-cell office:value-type="float" office:value="557.04248046875">
            <text:p>557.0424804688</text:p>
          </table:table-cell>
          <table:table-cell office:value-type="float" office:value="0.002597689">
            <text:p>0.002597689</text:p>
          </table:table-cell>
          <table:table-cell table:number-columns-repeated="4"/>
        </table:table-row>
        <table:table-row table:style-name="ro1">
          <table:table-cell office:value-type="float" office:value="557.160400390625">
            <text:p>557.1604003906</text:p>
          </table:table-cell>
          <table:table-cell office:value-type="float" office:value="-0.002973871">
            <text:p>-0.002973871</text:p>
          </table:table-cell>
          <table:table-cell table:number-columns-repeated="4"/>
        </table:table-row>
        <table:table-row table:style-name="ro1">
          <table:table-cell office:value-type="float" office:value="557.2783203125">
            <text:p>557.2783203125</text:p>
          </table:table-cell>
          <table:table-cell office:value-type="float" office:value="0.01826072">
            <text:p>0.01826072</text:p>
          </table:table-cell>
          <table:table-cell table:number-columns-repeated="4"/>
        </table:table-row>
        <table:table-row table:style-name="ro1">
          <table:table-cell office:value-type="float" office:value="557.396240234375">
            <text:p>557.3962402344</text:p>
          </table:table-cell>
          <table:table-cell office:value-type="float" office:value="0.002391657">
            <text:p>0.002391657</text:p>
          </table:table-cell>
          <table:table-cell table:number-columns-repeated="4"/>
        </table:table-row>
        <table:table-row table:style-name="ro1">
          <table:table-cell office:value-type="float" office:value="557.51416015625">
            <text:p>557.5141601563</text:p>
          </table:table-cell>
          <table:table-cell office:value-type="float" office:value="-0.008330899">
            <text:p>-0.008330899</text:p>
          </table:table-cell>
          <table:table-cell table:number-columns-repeated="4"/>
        </table:table-row>
        <table:table-row table:style-name="ro1">
          <table:table-cell office:value-type="float" office:value="557.632141113281">
            <text:p>557.6321411133</text:p>
          </table:table-cell>
          <table:table-cell office:value-type="float" office:value="0.004596881">
            <text:p>0.004596881</text:p>
          </table:table-cell>
          <table:table-cell table:number-columns-repeated="4"/>
        </table:table-row>
        <table:table-row table:style-name="ro1">
          <table:table-cell office:value-type="float" office:value="557.750061035156">
            <text:p>557.7500610352</text:p>
          </table:table-cell>
          <table:table-cell office:value-type="float" office:value="-0.0002541163">
            <text:p>-0.0002541163</text:p>
          </table:table-cell>
          <table:table-cell table:number-columns-repeated="4"/>
        </table:table-row>
        <table:table-row table:style-name="ro1">
          <table:table-cell office:value-type="float" office:value="557.867980957031">
            <text:p>557.867980957</text:p>
          </table:table-cell>
          <table:table-cell office:value-type="float" office:value="0.003583626">
            <text:p>0.003583626</text:p>
          </table:table-cell>
          <table:table-cell table:number-columns-repeated="4"/>
        </table:table-row>
        <table:table-row table:style-name="ro1">
          <table:table-cell office:value-type="float" office:value="557.985961914063">
            <text:p>557.9859619141</text:p>
          </table:table-cell>
          <table:table-cell office:value-type="float" office:value="-0.009248873">
            <text:p>-0.009248873</text:p>
          </table:table-cell>
          <table:table-cell table:number-columns-repeated="4"/>
        </table:table-row>
        <table:table-row table:style-name="ro1">
          <table:table-cell office:value-type="float" office:value="558.103881835938">
            <text:p>558.1038818359</text:p>
          </table:table-cell>
          <table:table-cell office:value-type="float" office:value="-0.006322998">
            <text:p>-0.006322998</text:p>
          </table:table-cell>
          <table:table-cell table:number-columns-repeated="4"/>
        </table:table-row>
        <table:table-row table:style-name="ro1">
          <table:table-cell office:value-type="float" office:value="558.221801757813">
            <text:p>558.2218017578</text:p>
          </table:table-cell>
          <table:table-cell office:value-type="float" office:value="-0.001699809">
            <text:p>-0.001699809</text:p>
          </table:table-cell>
          <table:table-cell table:number-columns-repeated="4"/>
        </table:table-row>
        <table:table-row table:style-name="ro1">
          <table:table-cell office:value-type="float" office:value="558.339782714844">
            <text:p>558.3397827148</text:p>
          </table:table-cell>
          <table:table-cell office:value-type="float" office:value="0.01080403">
            <text:p>0.01080403</text:p>
          </table:table-cell>
          <table:table-cell table:number-columns-repeated="4"/>
        </table:table-row>
        <table:table-row table:style-name="ro1">
          <table:table-cell office:value-type="float" office:value="558.457702636719">
            <text:p>558.4577026367</text:p>
          </table:table-cell>
          <table:table-cell office:value-type="float" office:value="-0.002401209">
            <text:p>-0.002401209</text:p>
          </table:table-cell>
          <table:table-cell table:number-columns-repeated="4"/>
        </table:table-row>
        <table:table-row table:style-name="ro1">
          <table:table-cell office:value-type="float" office:value="558.57568359375">
            <text:p>558.5756835938</text:p>
          </table:table-cell>
          <table:table-cell office:value-type="float" office:value="0.002694461">
            <text:p>0.002694461</text:p>
          </table:table-cell>
          <table:table-cell table:number-columns-repeated="4"/>
        </table:table-row>
        <table:table-row table:style-name="ro1">
          <table:table-cell office:value-type="float" office:value="558.693664550781">
            <text:p>558.6936645508</text:p>
          </table:table-cell>
          <table:table-cell office:value-type="float" office:value="0.00619067">
            <text:p>0.00619067</text:p>
          </table:table-cell>
          <table:table-cell table:number-columns-repeated="4"/>
        </table:table-row>
        <table:table-row table:style-name="ro1">
          <table:table-cell office:value-type="float" office:value="558.811584472656">
            <text:p>558.8115844727</text:p>
          </table:table-cell>
          <table:table-cell office:value-type="float" office:value="0.01015978">
            <text:p>0.01015978</text:p>
          </table:table-cell>
          <table:table-cell table:number-columns-repeated="4"/>
        </table:table-row>
        <table:table-row table:style-name="ro1">
          <table:table-cell office:value-type="float" office:value="558.929565429688">
            <text:p>558.9295654297</text:p>
          </table:table-cell>
          <table:table-cell office:value-type="float" office:value="-0.002112497">
            <text:p>-0.002112497</text:p>
          </table:table-cell>
          <table:table-cell table:number-columns-repeated="4"/>
        </table:table-row>
        <table:table-row table:style-name="ro1">
          <table:table-cell office:value-type="float" office:value="559.047546386719">
            <text:p>559.0475463867</text:p>
          </table:table-cell>
          <table:table-cell office:value-type="float" office:value="0.005171101">
            <text:p>0.005171101</text:p>
          </table:table-cell>
          <table:table-cell table:number-columns-repeated="4"/>
        </table:table-row>
        <table:table-row table:style-name="ro1">
          <table:table-cell office:value-type="float" office:value="559.16552734375">
            <text:p>559.1655273438</text:p>
          </table:table-cell>
          <table:table-cell office:value-type="float" office:value="0.004363128">
            <text:p>0.004363128</text:p>
          </table:table-cell>
          <table:table-cell table:number-columns-repeated="4"/>
        </table:table-row>
        <table:table-row table:style-name="ro1">
          <table:table-cell office:value-type="float" office:value="559.283508300781">
            <text:p>559.2835083008</text:p>
          </table:table-cell>
          <table:table-cell office:value-type="float" office:value="0.002360248">
            <text:p>0.002360248</text:p>
          </table:table-cell>
          <table:table-cell table:number-columns-repeated="4"/>
        </table:table-row>
        <table:table-row table:style-name="ro1">
          <table:table-cell office:value-type="float" office:value="559.401489257813">
            <text:p>559.4014892578</text:p>
          </table:table-cell>
          <table:table-cell office:value-type="float" office:value="0.008849293">
            <text:p>0.008849293</text:p>
          </table:table-cell>
          <table:table-cell table:number-columns-repeated="4"/>
        </table:table-row>
        <table:table-row table:style-name="ro1">
          <table:table-cell office:value-type="float" office:value="559.519470214844">
            <text:p>559.5194702148</text:p>
          </table:table-cell>
          <table:table-cell office:value-type="float" office:value="-0.008792556">
            <text:p>-0.008792556</text:p>
          </table:table-cell>
          <table:table-cell table:number-columns-repeated="4"/>
        </table:table-row>
        <table:table-row table:style-name="ro1">
          <table:table-cell office:value-type="float" office:value="559.637451171875">
            <text:p>559.6374511719</text:p>
          </table:table-cell>
          <table:table-cell office:value-type="float" office:value="0.005448265">
            <text:p>0.005448265</text:p>
          </table:table-cell>
          <table:table-cell table:number-columns-repeated="4"/>
        </table:table-row>
        <table:table-row table:style-name="ro1">
          <table:table-cell office:value-type="float" office:value="559.755432128906">
            <text:p>559.7554321289</text:p>
          </table:table-cell>
          <table:table-cell office:value-type="float" office:value="0.01208092">
            <text:p>0.01208092</text:p>
          </table:table-cell>
          <table:table-cell table:number-columns-repeated="4"/>
        </table:table-row>
        <table:table-row table:style-name="ro1">
          <table:table-cell office:value-type="float" office:value="559.873413085938">
            <text:p>559.8734130859</text:p>
          </table:table-cell>
          <table:table-cell office:value-type="float" office:value="0.0009975001">
            <text:p>0.0009975001</text:p>
          </table:table-cell>
          <table:table-cell table:number-columns-repeated="4"/>
        </table:table-row>
        <table:table-row table:style-name="ro1">
          <table:table-cell office:value-type="float" office:value="559.991394042969">
            <text:p>559.991394043</text:p>
          </table:table-cell>
          <table:table-cell office:value-type="float" office:value="0.006074636">
            <text:p>0.006074636</text:p>
          </table:table-cell>
          <table:table-cell table:number-columns-repeated="4"/>
        </table:table-row>
        <table:table-row table:style-name="ro1">
          <table:table-cell office:value-type="float" office:value="560.109375">
            <text:p>560.109375</text:p>
          </table:table-cell>
          <table:table-cell office:value-type="float" office:value="0.008855636">
            <text:p>0.008855636</text:p>
          </table:table-cell>
          <table:table-cell table:number-columns-repeated="4"/>
        </table:table-row>
        <table:table-row table:style-name="ro1">
          <table:table-cell office:value-type="float" office:value="560.227416992188">
            <text:p>560.2274169922</text:p>
          </table:table-cell>
          <table:table-cell office:value-type="float" office:value="0.001191183">
            <text:p>0.001191183</text:p>
          </table:table-cell>
          <table:table-cell table:number-columns-repeated="4"/>
        </table:table-row>
        <table:table-row table:style-name="ro1">
          <table:table-cell office:value-type="float" office:value="560.345397949219">
            <text:p>560.3453979492</text:p>
          </table:table-cell>
          <table:table-cell office:value-type="float" office:value="-0.004112442">
            <text:p>-0.004112442</text:p>
          </table:table-cell>
          <table:table-cell table:number-columns-repeated="4"/>
        </table:table-row>
        <table:table-row table:style-name="ro1">
          <table:table-cell office:value-type="float" office:value="560.46337890625">
            <text:p>560.4633789063</text:p>
          </table:table-cell>
          <table:table-cell office:value-type="float" office:value="0.008031293">
            <text:p>0.008031293</text:p>
          </table:table-cell>
          <table:table-cell table:number-columns-repeated="4"/>
        </table:table-row>
        <table:table-row table:style-name="ro1">
          <table:table-cell office:value-type="float" office:value="560.581420898438">
            <text:p>560.5814208984</text:p>
          </table:table-cell>
          <table:table-cell office:value-type="float" office:value="0.03004708">
            <text:p>0.03004708</text:p>
          </table:table-cell>
          <table:table-cell table:number-columns-repeated="4"/>
        </table:table-row>
        <table:table-row table:style-name="ro1">
          <table:table-cell office:value-type="float" office:value="560.699401855469">
            <text:p>560.6994018555</text:p>
          </table:table-cell>
          <table:table-cell office:value-type="float" office:value="-0.004059427">
            <text:p>-0.004059427</text:p>
          </table:table-cell>
          <table:table-cell table:number-columns-repeated="4"/>
        </table:table-row>
        <table:table-row table:style-name="ro1">
          <table:table-cell office:value-type="float" office:value="560.817443847656">
            <text:p>560.8174438477</text:p>
          </table:table-cell>
          <table:table-cell office:value-type="float" office:value="-0.001720669">
            <text:p>-0.001720669</text:p>
          </table:table-cell>
          <table:table-cell table:number-columns-repeated="4"/>
        </table:table-row>
        <table:table-row table:style-name="ro1">
          <table:table-cell office:value-type="float" office:value="560.935424804688">
            <text:p>560.9354248047</text:p>
          </table:table-cell>
          <table:table-cell office:value-type="float" office:value="0.01075294">
            <text:p>0.01075294</text:p>
          </table:table-cell>
          <table:table-cell table:number-columns-repeated="4"/>
        </table:table-row>
        <table:table-row table:style-name="ro1">
          <table:table-cell office:value-type="float" office:value="561.053466796875">
            <text:p>561.0534667969</text:p>
          </table:table-cell>
          <table:table-cell office:value-type="float" office:value="0.002669167">
            <text:p>0.002669167</text:p>
          </table:table-cell>
          <table:table-cell table:number-columns-repeated="4"/>
        </table:table-row>
        <table:table-row table:style-name="ro1">
          <table:table-cell office:value-type="float" office:value="561.171508789063">
            <text:p>561.1715087891</text:p>
          </table:table-cell>
          <table:table-cell office:value-type="float" office:value="-0.000157561">
            <text:p>-0.000157561</text:p>
          </table:table-cell>
          <table:table-cell table:number-columns-repeated="4"/>
        </table:table-row>
        <table:table-row table:style-name="ro1">
          <table:table-cell office:value-type="float" office:value="561.289489746094">
            <text:p>561.2894897461</text:p>
          </table:table-cell>
          <table:table-cell office:value-type="float" office:value="0.01071216">
            <text:p>0.01071216</text:p>
          </table:table-cell>
          <table:table-cell table:number-columns-repeated="4"/>
        </table:table-row>
        <table:table-row table:style-name="ro1">
          <table:table-cell office:value-type="float" office:value="561.407531738281">
            <text:p>561.4075317383</text:p>
          </table:table-cell>
          <table:table-cell office:value-type="float" office:value="0.001325286">
            <text:p>0.001325286</text:p>
          </table:table-cell>
          <table:table-cell table:number-columns-repeated="4"/>
        </table:table-row>
        <table:table-row table:style-name="ro1">
          <table:table-cell office:value-type="float" office:value="561.525573730469">
            <text:p>561.5255737305</text:p>
          </table:table-cell>
          <table:table-cell office:value-type="float" office:value="0.01723982">
            <text:p>0.01723982</text:p>
          </table:table-cell>
          <table:table-cell table:number-columns-repeated="4"/>
        </table:table-row>
        <table:table-row table:style-name="ro1">
          <table:table-cell office:value-type="float" office:value="561.643615722656">
            <text:p>561.6436157227</text:p>
          </table:table-cell>
          <table:table-cell office:value-type="float" office:value="-0.0008684333">
            <text:p>-0.0008684333</text:p>
          </table:table-cell>
          <table:table-cell table:number-columns-repeated="4"/>
        </table:table-row>
        <table:table-row table:style-name="ro1">
          <table:table-cell office:value-type="float" office:value="561.761657714844">
            <text:p>561.7616577148</text:p>
          </table:table-cell>
          <table:table-cell office:value-type="float" office:value="-0.0051646">
            <text:p>-0.0051646</text:p>
          </table:table-cell>
          <table:table-cell table:number-columns-repeated="4"/>
        </table:table-row>
        <table:table-row table:style-name="ro1">
          <table:table-cell office:value-type="float" office:value="561.879699707031">
            <text:p>561.879699707</text:p>
          </table:table-cell>
          <table:table-cell office:value-type="float" office:value="0.0152838">
            <text:p>0.0152838</text:p>
          </table:table-cell>
          <table:table-cell table:number-columns-repeated="4"/>
        </table:table-row>
        <table:table-row table:style-name="ro1">
          <table:table-cell office:value-type="float" office:value="561.997741699219">
            <text:p>561.9977416992</text:p>
          </table:table-cell>
          <table:table-cell office:value-type="float" office:value="0.02308871">
            <text:p>0.02308871</text:p>
          </table:table-cell>
          <table:table-cell table:number-columns-repeated="4"/>
        </table:table-row>
        <table:table-row table:style-name="ro1">
          <table:table-cell office:value-type="float" office:value="562.115783691406">
            <text:p>562.1157836914</text:p>
          </table:table-cell>
          <table:table-cell office:value-type="float" office:value="-0.0008453006">
            <text:p>-0.0008453006</text:p>
          </table:table-cell>
          <table:table-cell table:number-columns-repeated="4"/>
        </table:table-row>
        <table:table-row table:style-name="ro1">
          <table:table-cell office:value-type="float" office:value="562.233825683594">
            <text:p>562.2338256836</text:p>
          </table:table-cell>
          <table:table-cell office:value-type="float" office:value="0.01304991">
            <text:p>0.01304991</text:p>
          </table:table-cell>
          <table:table-cell table:number-columns-repeated="4"/>
        </table:table-row>
        <table:table-row table:style-name="ro1">
          <table:table-cell office:value-type="float" office:value="562.351867675781">
            <text:p>562.3518676758</text:p>
          </table:table-cell>
          <table:table-cell office:value-type="float" office:value="0.009986307">
            <text:p>0.009986307</text:p>
          </table:table-cell>
          <table:table-cell table:number-columns-repeated="4"/>
        </table:table-row>
        <table:table-row table:style-name="ro1">
          <table:table-cell office:value-type="float" office:value="562.469909667969">
            <text:p>562.469909668</text:p>
          </table:table-cell>
          <table:table-cell office:value-type="float" office:value="0.007962174">
            <text:p>0.007962174</text:p>
          </table:table-cell>
          <table:table-cell table:number-columns-repeated="4"/>
        </table:table-row>
        <table:table-row table:style-name="ro1">
          <table:table-cell office:value-type="float" office:value="562.588012695313">
            <text:p>562.5880126953</text:p>
          </table:table-cell>
          <table:table-cell office:value-type="float" office:value="0.005648824">
            <text:p>0.005648824</text:p>
          </table:table-cell>
          <table:table-cell table:number-columns-repeated="4"/>
        </table:table-row>
        <table:table-row table:style-name="ro1">
          <table:table-cell office:value-type="float" office:value="562.7060546875">
            <text:p>562.7060546875</text:p>
          </table:table-cell>
          <table:table-cell office:value-type="float" office:value="-0.005856181">
            <text:p>-0.005856181</text:p>
          </table:table-cell>
          <table:table-cell table:number-columns-repeated="4"/>
        </table:table-row>
        <table:table-row table:style-name="ro1">
          <table:table-cell office:value-type="float" office:value="562.824096679688">
            <text:p>562.8240966797</text:p>
          </table:table-cell>
          <table:table-cell office:value-type="float" office:value="-0.000980107">
            <text:p>-0.000980107</text:p>
          </table:table-cell>
          <table:table-cell table:number-columns-repeated="4"/>
        </table:table-row>
        <table:table-row table:style-name="ro1">
          <table:table-cell office:value-type="float" office:value="562.942199707031">
            <text:p>562.942199707</text:p>
          </table:table-cell>
          <table:table-cell office:value-type="float" office:value="-0.0006619967">
            <text:p>-0.0006619967</text:p>
          </table:table-cell>
          <table:table-cell table:number-columns-repeated="4"/>
        </table:table-row>
        <table:table-row table:style-name="ro1">
          <table:table-cell office:value-type="float" office:value="563.060241699219">
            <text:p>563.0602416992</text:p>
          </table:table-cell>
          <table:table-cell office:value-type="float" office:value="0.008640761">
            <text:p>0.008640761</text:p>
          </table:table-cell>
          <table:table-cell table:number-columns-repeated="4"/>
        </table:table-row>
        <table:table-row table:style-name="ro1">
          <table:table-cell office:value-type="float" office:value="563.178344726563">
            <text:p>563.1783447266</text:p>
          </table:table-cell>
          <table:table-cell office:value-type="float" office:value="0.02103249">
            <text:p>0.02103249</text:p>
          </table:table-cell>
          <table:table-cell table:number-columns-repeated="4"/>
        </table:table-row>
        <table:table-row table:style-name="ro1">
          <table:table-cell office:value-type="float" office:value="563.29638671875">
            <text:p>563.2963867188</text:p>
          </table:table-cell>
          <table:table-cell office:value-type="float" office:value="-0.001341063">
            <text:p>-0.001341063</text:p>
          </table:table-cell>
          <table:table-cell table:number-columns-repeated="4"/>
        </table:table-row>
        <table:table-row table:style-name="ro1">
          <table:table-cell office:value-type="float" office:value="563.414489746094">
            <text:p>563.4144897461</text:p>
          </table:table-cell>
          <table:table-cell office:value-type="float" office:value="0.009476363">
            <text:p>0.009476363</text:p>
          </table:table-cell>
          <table:table-cell table:number-columns-repeated="4"/>
        </table:table-row>
        <table:table-row table:style-name="ro1">
          <table:table-cell office:value-type="float" office:value="563.532531738281">
            <text:p>563.5325317383</text:p>
          </table:table-cell>
          <table:table-cell office:value-type="float" office:value="0.02191185">
            <text:p>0.02191185</text:p>
          </table:table-cell>
          <table:table-cell table:number-columns-repeated="4"/>
        </table:table-row>
        <table:table-row table:style-name="ro1">
          <table:table-cell office:value-type="float" office:value="563.650634765625">
            <text:p>563.6506347656</text:p>
          </table:table-cell>
          <table:table-cell office:value-type="float" office:value="-0.0005964178">
            <text:p>-0.0005964178</text:p>
          </table:table-cell>
          <table:table-cell table:number-columns-repeated="4"/>
        </table:table-row>
        <table:table-row table:style-name="ro1">
          <table:table-cell office:value-type="float" office:value="563.768737792969">
            <text:p>563.768737793</text:p>
          </table:table-cell>
          <table:table-cell office:value-type="string">
            <text:p>-4.376122E-06</text:p>
          </table:table-cell>
          <table:table-cell table:number-columns-repeated="4"/>
        </table:table-row>
        <table:table-row table:style-name="ro1">
          <table:table-cell office:value-type="float" office:value="563.886779785156">
            <text:p>563.8867797852</text:p>
          </table:table-cell>
          <table:table-cell office:value-type="float" office:value="0.00863776">
            <text:p>0.00863776</text:p>
          </table:table-cell>
          <table:table-cell table:number-columns-repeated="4"/>
        </table:table-row>
        <table:table-row table:style-name="ro1">
          <table:table-cell office:value-type="float" office:value="564.0048828125">
            <text:p>564.0048828125</text:p>
          </table:table-cell>
          <table:table-cell office:value-type="float" office:value="0.001653868">
            <text:p>0.001653868</text:p>
          </table:table-cell>
          <table:table-cell table:number-columns-repeated="4"/>
        </table:table-row>
        <table:table-row table:style-name="ro1">
          <table:table-cell office:value-type="float" office:value="564.122985839844">
            <text:p>564.1229858398</text:p>
          </table:table-cell>
          <table:table-cell office:value-type="float" office:value="-0.004046907">
            <text:p>-0.004046907</text:p>
          </table:table-cell>
          <table:table-cell table:number-columns-repeated="4"/>
        </table:table-row>
        <table:table-row table:style-name="ro1">
          <table:table-cell office:value-type="float" office:value="564.241088867188">
            <text:p>564.2410888672</text:p>
          </table:table-cell>
          <table:table-cell office:value-type="float" office:value="0.01744942">
            <text:p>0.01744942</text:p>
          </table:table-cell>
          <table:table-cell table:number-columns-repeated="4"/>
        </table:table-row>
        <table:table-row table:style-name="ro1">
          <table:table-cell office:value-type="float" office:value="564.359191894531">
            <text:p>564.3591918945</text:p>
          </table:table-cell>
          <table:table-cell office:value-type="float" office:value="0.01538983">
            <text:p>0.01538983</text:p>
          </table:table-cell>
          <table:table-cell table:number-columns-repeated="4"/>
        </table:table-row>
        <table:table-row table:style-name="ro1">
          <table:table-cell office:value-type="float" office:value="564.477294921875">
            <text:p>564.4772949219</text:p>
          </table:table-cell>
          <table:table-cell office:value-type="float" office:value="0.008000102">
            <text:p>0.008000102</text:p>
          </table:table-cell>
          <table:table-cell table:number-columns-repeated="4"/>
        </table:table-row>
        <table:table-row table:style-name="ro1">
          <table:table-cell office:value-type="float" office:value="564.595397949219">
            <text:p>564.5953979492</text:p>
          </table:table-cell>
          <table:table-cell office:value-type="float" office:value="0.01538748">
            <text:p>0.01538748</text:p>
          </table:table-cell>
          <table:table-cell table:number-columns-repeated="4"/>
        </table:table-row>
        <table:table-row table:style-name="ro1">
          <table:table-cell office:value-type="float" office:value="564.713500976563">
            <text:p>564.7135009766</text:p>
          </table:table-cell>
          <table:table-cell office:value-type="float" office:value="0.04711964">
            <text:p>0.04711964</text:p>
          </table:table-cell>
          <table:table-cell table:number-columns-repeated="4"/>
        </table:table-row>
        <table:table-row table:style-name="ro1">
          <table:table-cell office:value-type="float" office:value="564.831604003906">
            <text:p>564.8316040039</text:p>
          </table:table-cell>
          <table:table-cell office:value-type="float" office:value="0.008454565">
            <text:p>0.008454565</text:p>
          </table:table-cell>
          <table:table-cell table:number-columns-repeated="4"/>
        </table:table-row>
        <table:table-row table:style-name="ro1">
          <table:table-cell office:value-type="float" office:value="564.949768066406">
            <text:p>564.9497680664</text:p>
          </table:table-cell>
          <table:table-cell office:value-type="float" office:value="0.01036631">
            <text:p>0.01036631</text:p>
          </table:table-cell>
          <table:table-cell table:number-columns-repeated="4"/>
        </table:table-row>
        <table:table-row table:style-name="ro1">
          <table:table-cell office:value-type="float" office:value="565.06787109375">
            <text:p>565.0678710938</text:p>
          </table:table-cell>
          <table:table-cell office:value-type="float" office:value="0.0173414">
            <text:p>0.0173414</text:p>
          </table:table-cell>
          <table:table-cell table:number-columns-repeated="4"/>
        </table:table-row>
        <table:table-row table:style-name="ro1">
          <table:table-cell office:value-type="float" office:value="565.185974121094">
            <text:p>565.1859741211</text:p>
          </table:table-cell>
          <table:table-cell office:value-type="float" office:value="0.01362825">
            <text:p>0.01362825</text:p>
          </table:table-cell>
          <table:table-cell table:number-columns-repeated="4"/>
        </table:table-row>
        <table:table-row table:style-name="ro1">
          <table:table-cell office:value-type="float" office:value="565.304077148438">
            <text:p>565.3040771484</text:p>
          </table:table-cell>
          <table:table-cell office:value-type="float" office:value="-0.0006547222">
            <text:p>-0.0006547222</text:p>
          </table:table-cell>
          <table:table-cell table:number-columns-repeated="4"/>
        </table:table-row>
        <table:table-row table:style-name="ro1">
          <table:table-cell office:value-type="float" office:value="565.422241210938">
            <text:p>565.4222412109</text:p>
          </table:table-cell>
          <table:table-cell office:value-type="float" office:value="0.007883633">
            <text:p>0.007883633</text:p>
          </table:table-cell>
          <table:table-cell table:number-columns-repeated="4"/>
        </table:table-row>
        <table:table-row table:style-name="ro1">
          <table:table-cell office:value-type="float" office:value="565.540344238281">
            <text:p>565.5403442383</text:p>
          </table:table-cell>
          <table:table-cell office:value-type="float" office:value="0.002662864">
            <text:p>0.002662864</text:p>
          </table:table-cell>
          <table:table-cell table:number-columns-repeated="4"/>
        </table:table-row>
        <table:table-row table:style-name="ro1">
          <table:table-cell office:value-type="float" office:value="565.658508300781">
            <text:p>565.6585083008</text:p>
          </table:table-cell>
          <table:table-cell office:value-type="float" office:value="0.01657141">
            <text:p>0.01657141</text:p>
          </table:table-cell>
          <table:table-cell table:number-columns-repeated="4"/>
        </table:table-row>
        <table:table-row table:style-name="ro1">
          <table:table-cell office:value-type="float" office:value="565.776611328125">
            <text:p>565.7766113281</text:p>
          </table:table-cell>
          <table:table-cell office:value-type="float" office:value="0.01214407">
            <text:p>0.01214407</text:p>
          </table:table-cell>
          <table:table-cell table:number-columns-repeated="4"/>
        </table:table-row>
        <table:table-row table:style-name="ro1">
          <table:table-cell office:value-type="float" office:value="565.894775390625">
            <text:p>565.8947753906</text:p>
          </table:table-cell>
          <table:table-cell office:value-type="float" office:value="0.02531207">
            <text:p>0.02531207</text:p>
          </table:table-cell>
          <table:table-cell table:number-columns-repeated="4"/>
        </table:table-row>
        <table:table-row table:style-name="ro1">
          <table:table-cell office:value-type="float" office:value="566.012878417969">
            <text:p>566.012878418</text:p>
          </table:table-cell>
          <table:table-cell office:value-type="float" office:value="0.01296059">
            <text:p>0.01296059</text:p>
          </table:table-cell>
          <table:table-cell table:number-columns-repeated="4"/>
        </table:table-row>
        <table:table-row table:style-name="ro1">
          <table:table-cell office:value-type="float" office:value="566.131042480469">
            <text:p>566.1310424805</text:p>
          </table:table-cell>
          <table:table-cell office:value-type="float" office:value="0.009780678">
            <text:p>0.009780678</text:p>
          </table:table-cell>
          <table:table-cell table:number-columns-repeated="4"/>
        </table:table-row>
        <table:table-row table:style-name="ro1">
          <table:table-cell office:value-type="float" office:value="566.249206542969">
            <text:p>566.249206543</text:p>
          </table:table-cell>
          <table:table-cell office:value-type="float" office:value="0.01314867">
            <text:p>0.01314867</text:p>
          </table:table-cell>
          <table:table-cell table:number-columns-repeated="4"/>
        </table:table-row>
        <table:table-row table:style-name="ro1">
          <table:table-cell office:value-type="float" office:value="566.367370605469">
            <text:p>566.3673706055</text:p>
          </table:table-cell>
          <table:table-cell office:value-type="float" office:value="0.01575862">
            <text:p>0.01575862</text:p>
          </table:table-cell>
          <table:table-cell table:number-columns-repeated="4"/>
        </table:table-row>
        <table:table-row table:style-name="ro1">
          <table:table-cell office:value-type="float" office:value="566.485473632813">
            <text:p>566.4854736328</text:p>
          </table:table-cell>
          <table:table-cell office:value-type="float" office:value="0.002623969">
            <text:p>0.002623969</text:p>
          </table:table-cell>
          <table:table-cell table:number-columns-repeated="4"/>
        </table:table-row>
        <table:table-row table:style-name="ro1">
          <table:table-cell office:value-type="float" office:value="566.603637695313">
            <text:p>566.6036376953</text:p>
          </table:table-cell>
          <table:table-cell office:value-type="float" office:value="0.03095608">
            <text:p>0.03095608</text:p>
          </table:table-cell>
          <table:table-cell table:number-columns-repeated="4"/>
        </table:table-row>
        <table:table-row table:style-name="ro1">
          <table:table-cell office:value-type="float" office:value="566.721801757813">
            <text:p>566.7218017578</text:p>
          </table:table-cell>
          <table:table-cell office:value-type="float" office:value="0.01664475">
            <text:p>0.01664475</text:p>
          </table:table-cell>
          <table:table-cell table:number-columns-repeated="4"/>
        </table:table-row>
        <table:table-row table:style-name="ro1">
          <table:table-cell office:value-type="float" office:value="566.839965820313">
            <text:p>566.8399658203</text:p>
          </table:table-cell>
          <table:table-cell office:value-type="float" office:value="0.01014502">
            <text:p>0.01014502</text:p>
          </table:table-cell>
          <table:table-cell table:number-columns-repeated="4"/>
        </table:table-row>
        <table:table-row table:style-name="ro1">
          <table:table-cell office:value-type="float" office:value="566.958129882813">
            <text:p>566.9581298828</text:p>
          </table:table-cell>
          <table:table-cell office:value-type="float" office:value="0.0191241">
            <text:p>0.0191241</text:p>
          </table:table-cell>
          <table:table-cell table:number-columns-repeated="4"/>
        </table:table-row>
        <table:table-row table:style-name="ro1">
          <table:table-cell office:value-type="float" office:value="567.076293945313">
            <text:p>567.0762939453</text:p>
          </table:table-cell>
          <table:table-cell office:value-type="float" office:value="0.0344527">
            <text:p>0.0344527</text:p>
          </table:table-cell>
          <table:table-cell table:number-columns-repeated="4"/>
        </table:table-row>
        <table:table-row table:style-name="ro1">
          <table:table-cell office:value-type="float" office:value="567.194458007813">
            <text:p>567.1944580078</text:p>
          </table:table-cell>
          <table:table-cell office:value-type="float" office:value="0.02413486">
            <text:p>0.02413486</text:p>
          </table:table-cell>
          <table:table-cell table:number-columns-repeated="4"/>
        </table:table-row>
        <table:table-row table:style-name="ro1">
          <table:table-cell office:value-type="float" office:value="567.312622070313">
            <text:p>567.3126220703</text:p>
          </table:table-cell>
          <table:table-cell office:value-type="float" office:value="0.01615253">
            <text:p>0.01615253</text:p>
          </table:table-cell>
          <table:table-cell table:number-columns-repeated="4"/>
        </table:table-row>
        <table:table-row table:style-name="ro1">
          <table:table-cell office:value-type="float" office:value="567.430847167969">
            <text:p>567.430847168</text:p>
          </table:table-cell>
          <table:table-cell office:value-type="float" office:value="0.01100377">
            <text:p>0.01100377</text:p>
          </table:table-cell>
          <table:table-cell table:number-columns-repeated="4"/>
        </table:table-row>
        <table:table-row table:style-name="ro1">
          <table:table-cell office:value-type="float" office:value="567.549011230469">
            <text:p>567.5490112305</text:p>
          </table:table-cell>
          <table:table-cell office:value-type="float" office:value="0.02843077">
            <text:p>0.02843077</text:p>
          </table:table-cell>
          <table:table-cell table:number-columns-repeated="4"/>
        </table:table-row>
        <table:table-row table:style-name="ro1">
          <table:table-cell office:value-type="float" office:value="567.667175292969">
            <text:p>567.667175293</text:p>
          </table:table-cell>
          <table:table-cell office:value-type="float" office:value="0.0191504">
            <text:p>0.0191504</text:p>
          </table:table-cell>
          <table:table-cell table:number-columns-repeated="4"/>
        </table:table-row>
        <table:table-row table:style-name="ro1">
          <table:table-cell office:value-type="float" office:value="567.785339355469">
            <text:p>567.7853393555</text:p>
          </table:table-cell>
          <table:table-cell office:value-type="float" office:value="0.02085034">
            <text:p>0.02085034</text:p>
          </table:table-cell>
          <table:table-cell table:number-columns-repeated="4"/>
        </table:table-row>
        <table:table-row table:style-name="ro1">
          <table:table-cell office:value-type="float" office:value="567.903564453125">
            <text:p>567.9035644531</text:p>
          </table:table-cell>
          <table:table-cell office:value-type="float" office:value="0.01331621">
            <text:p>0.01331621</text:p>
          </table:table-cell>
          <table:table-cell table:number-columns-repeated="4"/>
        </table:table-row>
        <table:table-row table:style-name="ro1">
          <table:table-cell office:value-type="float" office:value="568.021728515625">
            <text:p>568.0217285156</text:p>
          </table:table-cell>
          <table:table-cell office:value-type="float" office:value="0.04352777">
            <text:p>0.04352777</text:p>
          </table:table-cell>
          <table:table-cell table:number-columns-repeated="4"/>
        </table:table-row>
        <table:table-row table:style-name="ro1">
          <table:table-cell office:value-type="float" office:value="568.139953613281">
            <text:p>568.1399536133</text:p>
          </table:table-cell>
          <table:table-cell office:value-type="float" office:value="0.04581613">
            <text:p>0.04581613</text:p>
          </table:table-cell>
          <table:table-cell table:number-columns-repeated="4"/>
        </table:table-row>
        <table:table-row table:style-name="ro1">
          <table:table-cell office:value-type="float" office:value="568.258117675781">
            <text:p>568.2581176758</text:p>
          </table:table-cell>
          <table:table-cell office:value-type="float" office:value="0.007546532">
            <text:p>0.007546532</text:p>
          </table:table-cell>
          <table:table-cell table:number-columns-repeated="4"/>
        </table:table-row>
        <table:table-row table:style-name="ro1">
          <table:table-cell office:value-type="float" office:value="568.376342773438">
            <text:p>568.3763427734</text:p>
          </table:table-cell>
          <table:table-cell office:value-type="float" office:value="0.01484533">
            <text:p>0.01484533</text:p>
          </table:table-cell>
          <table:table-cell table:number-columns-repeated="4"/>
        </table:table-row>
        <table:table-row table:style-name="ro1">
          <table:table-cell office:value-type="float" office:value="568.494506835938">
            <text:p>568.4945068359</text:p>
          </table:table-cell>
          <table:table-cell office:value-type="float" office:value="0.02656251">
            <text:p>0.02656251</text:p>
          </table:table-cell>
          <table:table-cell table:number-columns-repeated="4"/>
        </table:table-row>
        <table:table-row table:style-name="ro1">
          <table:table-cell office:value-type="float" office:value="568.612731933594">
            <text:p>568.6127319336</text:p>
          </table:table-cell>
          <table:table-cell office:value-type="float" office:value="0.02861451">
            <text:p>0.02861451</text:p>
          </table:table-cell>
          <table:table-cell table:number-columns-repeated="4"/>
        </table:table-row>
        <table:table-row table:style-name="ro1">
          <table:table-cell office:value-type="float" office:value="568.73095703125">
            <text:p>568.7309570313</text:p>
          </table:table-cell>
          <table:table-cell office:value-type="float" office:value="0.003262381">
            <text:p>0.003262381</text:p>
          </table:table-cell>
          <table:table-cell table:number-columns-repeated="4"/>
        </table:table-row>
        <table:table-row table:style-name="ro1">
          <table:table-cell office:value-type="float" office:value="568.84912109375">
            <text:p>568.8491210938</text:p>
          </table:table-cell>
          <table:table-cell office:value-type="float" office:value="0.02311466">
            <text:p>0.02311466</text:p>
          </table:table-cell>
          <table:table-cell table:number-columns-repeated="4"/>
        </table:table-row>
        <table:table-row table:style-name="ro1">
          <table:table-cell office:value-type="float" office:value="568.967346191406">
            <text:p>568.9673461914</text:p>
          </table:table-cell>
          <table:table-cell office:value-type="float" office:value="0.02523213">
            <text:p>0.02523213</text:p>
          </table:table-cell>
          <table:table-cell table:number-columns-repeated="4"/>
        </table:table-row>
        <table:table-row table:style-name="ro1">
          <table:table-cell office:value-type="float" office:value="569.085571289063">
            <text:p>569.0855712891</text:p>
          </table:table-cell>
          <table:table-cell office:value-type="float" office:value="0.04029486">
            <text:p>0.04029486</text:p>
          </table:table-cell>
          <table:table-cell table:number-columns-repeated="4"/>
        </table:table-row>
        <table:table-row table:style-name="ro1">
          <table:table-cell office:value-type="float" office:value="569.203796386719">
            <text:p>569.2037963867</text:p>
          </table:table-cell>
          <table:table-cell office:value-type="float" office:value="0.005630256">
            <text:p>0.005630256</text:p>
          </table:table-cell>
          <table:table-cell table:number-columns-repeated="4"/>
        </table:table-row>
        <table:table-row table:style-name="ro1">
          <table:table-cell office:value-type="float" office:value="569.322021484375">
            <text:p>569.3220214844</text:p>
          </table:table-cell>
          <table:table-cell office:value-type="float" office:value="0.02053683">
            <text:p>0.02053683</text:p>
          </table:table-cell>
          <table:table-cell table:number-columns-repeated="4"/>
        </table:table-row>
        <table:table-row table:style-name="ro1">
          <table:table-cell office:value-type="float" office:value="569.440246582031">
            <text:p>569.440246582</text:p>
          </table:table-cell>
          <table:table-cell office:value-type="float" office:value="0.02152723">
            <text:p>0.02152723</text:p>
          </table:table-cell>
          <table:table-cell table:number-columns-repeated="4"/>
        </table:table-row>
        <table:table-row table:style-name="ro1">
          <table:table-cell office:value-type="float" office:value="569.558471679688">
            <text:p>569.5584716797</text:p>
          </table:table-cell>
          <table:table-cell office:value-type="float" office:value="0.0287741">
            <text:p>0.0287741</text:p>
          </table:table-cell>
          <table:table-cell table:number-columns-repeated="4"/>
        </table:table-row>
        <table:table-row table:style-name="ro1">
          <table:table-cell office:value-type="float" office:value="569.676696777344">
            <text:p>569.6766967773</text:p>
          </table:table-cell>
          <table:table-cell office:value-type="float" office:value="0.02150272">
            <text:p>0.02150272</text:p>
          </table:table-cell>
          <table:table-cell table:number-columns-repeated="4"/>
        </table:table-row>
        <table:table-row table:style-name="ro1">
          <table:table-cell office:value-type="float" office:value="569.794921875">
            <text:p>569.794921875</text:p>
          </table:table-cell>
          <table:table-cell office:value-type="float" office:value="0.009367861">
            <text:p>0.009367861</text:p>
          </table:table-cell>
          <table:table-cell table:number-columns-repeated="4"/>
        </table:table-row>
        <table:table-row table:style-name="ro1">
          <table:table-cell office:value-type="float" office:value="569.913146972656">
            <text:p>569.9131469727</text:p>
          </table:table-cell>
          <table:table-cell office:value-type="float" office:value="0.007999732">
            <text:p>0.007999732</text:p>
          </table:table-cell>
          <table:table-cell table:number-columns-repeated="4"/>
        </table:table-row>
        <table:table-row table:style-name="ro1">
          <table:table-cell office:value-type="float" office:value="570.031372070313">
            <text:p>570.0313720703</text:p>
          </table:table-cell>
          <table:table-cell office:value-type="float" office:value="0.01712498">
            <text:p>0.01712498</text:p>
          </table:table-cell>
          <table:table-cell table:number-columns-repeated="4"/>
        </table:table-row>
        <table:table-row table:style-name="ro1">
          <table:table-cell office:value-type="float" office:value="570.149597167969">
            <text:p>570.149597168</text:p>
          </table:table-cell>
          <table:table-cell office:value-type="float" office:value="0.01794326">
            <text:p>0.01794326</text:p>
          </table:table-cell>
          <table:table-cell table:number-columns-repeated="4"/>
        </table:table-row>
        <table:table-row table:style-name="ro1">
          <table:table-cell office:value-type="float" office:value="570.267883300781">
            <text:p>570.2678833008</text:p>
          </table:table-cell>
          <table:table-cell office:value-type="float" office:value="0.003496227">
            <text:p>0.003496227</text:p>
          </table:table-cell>
          <table:table-cell table:number-columns-repeated="4"/>
        </table:table-row>
        <table:table-row table:style-name="ro1">
          <table:table-cell office:value-type="float" office:value="570.386108398438">
            <text:p>570.3861083984</text:p>
          </table:table-cell>
          <table:table-cell office:value-type="float" office:value="0.01631304">
            <text:p>0.01631304</text:p>
          </table:table-cell>
          <table:table-cell table:number-columns-repeated="4"/>
        </table:table-row>
        <table:table-row table:style-name="ro1">
          <table:table-cell office:value-type="float" office:value="570.504333496094">
            <text:p>570.5043334961</text:p>
          </table:table-cell>
          <table:table-cell office:value-type="float" office:value="0.03226573">
            <text:p>0.03226573</text:p>
          </table:table-cell>
          <table:table-cell table:number-columns-repeated="4"/>
        </table:table-row>
        <table:table-row table:style-name="ro1">
          <table:table-cell office:value-type="float" office:value="570.622619628906">
            <text:p>570.6226196289</text:p>
          </table:table-cell>
          <table:table-cell office:value-type="float" office:value="0.03277191">
            <text:p>0.03277191</text:p>
          </table:table-cell>
          <table:table-cell table:number-columns-repeated="4"/>
        </table:table-row>
        <table:table-row table:style-name="ro1">
          <table:table-cell office:value-type="float" office:value="570.740844726563">
            <text:p>570.7408447266</text:p>
          </table:table-cell>
          <table:table-cell office:value-type="float" office:value="0.01687883">
            <text:p>0.01687883</text:p>
          </table:table-cell>
          <table:table-cell table:number-columns-repeated="4"/>
        </table:table-row>
        <table:table-row table:style-name="ro1">
          <table:table-cell office:value-type="float" office:value="570.859130859375">
            <text:p>570.8591308594</text:p>
          </table:table-cell>
          <table:table-cell office:value-type="float" office:value="0.0128205">
            <text:p>0.0128205</text:p>
          </table:table-cell>
          <table:table-cell table:number-columns-repeated="4"/>
        </table:table-row>
        <table:table-row table:style-name="ro1">
          <table:table-cell office:value-type="float" office:value="570.977355957031">
            <text:p>570.977355957</text:p>
          </table:table-cell>
          <table:table-cell office:value-type="float" office:value="0.02194632">
            <text:p>0.02194632</text:p>
          </table:table-cell>
          <table:table-cell table:number-columns-repeated="4"/>
        </table:table-row>
        <table:table-row table:style-name="ro1">
          <table:table-cell office:value-type="float" office:value="571.095642089844">
            <text:p>571.0956420898</text:p>
          </table:table-cell>
          <table:table-cell office:value-type="float" office:value="0.009884335">
            <text:p>0.009884335</text:p>
          </table:table-cell>
          <table:table-cell table:number-columns-repeated="4"/>
        </table:table-row>
        <table:table-row table:style-name="ro1">
          <table:table-cell office:value-type="float" office:value="571.213928222656">
            <text:p>571.2139282227</text:p>
          </table:table-cell>
          <table:table-cell office:value-type="float" office:value="0.0202921">
            <text:p>0.0202921</text:p>
          </table:table-cell>
          <table:table-cell table:number-columns-repeated="4"/>
        </table:table-row>
        <table:table-row table:style-name="ro1">
          <table:table-cell office:value-type="float" office:value="571.332153320313">
            <text:p>571.3321533203</text:p>
          </table:table-cell>
          <table:table-cell office:value-type="float" office:value="0.02183584">
            <text:p>0.02183584</text:p>
          </table:table-cell>
          <table:table-cell table:number-columns-repeated="4"/>
        </table:table-row>
        <table:table-row table:style-name="ro1">
          <table:table-cell office:value-type="float" office:value="571.450439453125">
            <text:p>571.4504394531</text:p>
          </table:table-cell>
          <table:table-cell office:value-type="float" office:value="0.02014402">
            <text:p>0.02014402</text:p>
          </table:table-cell>
          <table:table-cell table:number-columns-repeated="4"/>
        </table:table-row>
        <table:table-row table:style-name="ro1">
          <table:table-cell office:value-type="float" office:value="571.568725585938">
            <text:p>571.5687255859</text:p>
          </table:table-cell>
          <table:table-cell office:value-type="float" office:value="0.00838898">
            <text:p>0.00838898</text:p>
          </table:table-cell>
          <table:table-cell table:number-columns-repeated="4"/>
        </table:table-row>
        <table:table-row table:style-name="ro1">
          <table:table-cell office:value-type="float" office:value="571.68701171875">
            <text:p>571.6870117188</text:p>
          </table:table-cell>
          <table:table-cell office:value-type="float" office:value="0.02671532">
            <text:p>0.02671532</text:p>
          </table:table-cell>
          <table:table-cell table:number-columns-repeated="4"/>
        </table:table-row>
        <table:table-row table:style-name="ro1">
          <table:table-cell office:value-type="float" office:value="571.805297851563">
            <text:p>571.8052978516</text:p>
          </table:table-cell>
          <table:table-cell office:value-type="float" office:value="0.01410379">
            <text:p>0.01410379</text:p>
          </table:table-cell>
          <table:table-cell table:number-columns-repeated="4"/>
        </table:table-row>
        <table:table-row table:style-name="ro1">
          <table:table-cell office:value-type="float" office:value="571.923583984375">
            <text:p>571.9235839844</text:p>
          </table:table-cell>
          <table:table-cell office:value-type="float" office:value="0.0401993">
            <text:p>0.0401993</text:p>
          </table:table-cell>
          <table:table-cell table:number-columns-repeated="4"/>
        </table:table-row>
        <table:table-row table:style-name="ro1">
          <table:table-cell office:value-type="float" office:value="572.041870117188">
            <text:p>572.0418701172</text:p>
          </table:table-cell>
          <table:table-cell office:value-type="float" office:value="0.01477915">
            <text:p>0.01477915</text:p>
          </table:table-cell>
          <table:table-cell table:number-columns-repeated="4"/>
        </table:table-row>
        <table:table-row table:style-name="ro1">
          <table:table-cell office:value-type="float" office:value="572.16015625">
            <text:p>572.16015625</text:p>
          </table:table-cell>
          <table:table-cell office:value-type="float" office:value="0.02903982">
            <text:p>0.02903982</text:p>
          </table:table-cell>
          <table:table-cell table:number-columns-repeated="4"/>
        </table:table-row>
        <table:table-row table:style-name="ro1">
          <table:table-cell office:value-type="float" office:value="572.278442382813">
            <text:p>572.2784423828</text:p>
          </table:table-cell>
          <table:table-cell office:value-type="float" office:value="0.01392536">
            <text:p>0.01392536</text:p>
          </table:table-cell>
          <table:table-cell table:number-columns-repeated="4"/>
        </table:table-row>
        <table:table-row table:style-name="ro1">
          <table:table-cell office:value-type="float" office:value="572.396728515625">
            <text:p>572.3967285156</text:p>
          </table:table-cell>
          <table:table-cell office:value-type="float" office:value="0.01281957">
            <text:p>0.01281957</text:p>
          </table:table-cell>
          <table:table-cell table:number-columns-repeated="4"/>
        </table:table-row>
        <table:table-row table:style-name="ro1">
          <table:table-cell office:value-type="float" office:value="572.515014648438">
            <text:p>572.5150146484</text:p>
          </table:table-cell>
          <table:table-cell office:value-type="float" office:value="0.01066309">
            <text:p>0.01066309</text:p>
          </table:table-cell>
          <table:table-cell table:number-columns-repeated="4"/>
        </table:table-row>
        <table:table-row table:style-name="ro1">
          <table:table-cell office:value-type="float" office:value="572.63330078125">
            <text:p>572.6333007813</text:p>
          </table:table-cell>
          <table:table-cell office:value-type="float" office:value="0.01721959">
            <text:p>0.01721959</text:p>
          </table:table-cell>
          <table:table-cell table:number-columns-repeated="4"/>
        </table:table-row>
        <table:table-row table:style-name="ro1">
          <table:table-cell office:value-type="float" office:value="572.751586914063">
            <text:p>572.7515869141</text:p>
          </table:table-cell>
          <table:table-cell office:value-type="float" office:value="0.02364499">
            <text:p>0.02364499</text:p>
          </table:table-cell>
          <table:table-cell table:number-columns-repeated="4"/>
        </table:table-row>
        <table:table-row table:style-name="ro1">
          <table:table-cell office:value-type="float" office:value="572.869934082031">
            <text:p>572.869934082</text:p>
          </table:table-cell>
          <table:table-cell office:value-type="float" office:value="0.01191245">
            <text:p>0.01191245</text:p>
          </table:table-cell>
          <table:table-cell table:number-columns-repeated="4"/>
        </table:table-row>
        <table:table-row table:style-name="ro1">
          <table:table-cell office:value-type="float" office:value="572.988220214844">
            <text:p>572.9882202148</text:p>
          </table:table-cell>
          <table:table-cell office:value-type="float" office:value="0.01141196">
            <text:p>0.01141196</text:p>
          </table:table-cell>
          <table:table-cell table:number-columns-repeated="4"/>
        </table:table-row>
        <table:table-row table:style-name="ro1">
          <table:table-cell office:value-type="float" office:value="573.106506347656">
            <text:p>573.1065063477</text:p>
          </table:table-cell>
          <table:table-cell office:value-type="float" office:value="0.02624724">
            <text:p>0.02624724</text:p>
          </table:table-cell>
          <table:table-cell table:number-columns-repeated="4"/>
        </table:table-row>
        <table:table-row table:style-name="ro1">
          <table:table-cell office:value-type="float" office:value="573.224853515625">
            <text:p>573.2248535156</text:p>
          </table:table-cell>
          <table:table-cell office:value-type="float" office:value="0.01766478">
            <text:p>0.01766478</text:p>
          </table:table-cell>
          <table:table-cell table:number-columns-repeated="4"/>
        </table:table-row>
        <table:table-row table:style-name="ro1">
          <table:table-cell office:value-type="float" office:value="573.343139648438">
            <text:p>573.3431396484</text:p>
          </table:table-cell>
          <table:table-cell office:value-type="float" office:value="0.01853235">
            <text:p>0.01853235</text:p>
          </table:table-cell>
          <table:table-cell table:number-columns-repeated="4"/>
        </table:table-row>
        <table:table-row table:style-name="ro1">
          <table:table-cell office:value-type="float" office:value="573.461486816406">
            <text:p>573.4614868164</text:p>
          </table:table-cell>
          <table:table-cell office:value-type="float" office:value="0.02907996">
            <text:p>0.02907996</text:p>
          </table:table-cell>
          <table:table-cell table:number-columns-repeated="4"/>
        </table:table-row>
        <table:table-row table:style-name="ro1">
          <table:table-cell office:value-type="float" office:value="573.579772949219">
            <text:p>573.5797729492</text:p>
          </table:table-cell>
          <table:table-cell office:value-type="float" office:value="0.01633359">
            <text:p>0.01633359</text:p>
          </table:table-cell>
          <table:table-cell table:number-columns-repeated="4"/>
        </table:table-row>
        <table:table-row table:style-name="ro1">
          <table:table-cell office:value-type="float" office:value="573.698120117188">
            <text:p>573.6981201172</text:p>
          </table:table-cell>
          <table:table-cell office:value-type="float" office:value="0.02219151">
            <text:p>0.02219151</text:p>
          </table:table-cell>
          <table:table-cell table:number-columns-repeated="4"/>
        </table:table-row>
        <table:table-row table:style-name="ro1">
          <table:table-cell office:value-type="float" office:value="573.81640625">
            <text:p>573.81640625</text:p>
          </table:table-cell>
          <table:table-cell office:value-type="float" office:value="0.01407814">
            <text:p>0.01407814</text:p>
          </table:table-cell>
          <table:table-cell table:number-columns-repeated="4"/>
        </table:table-row>
        <table:table-row table:style-name="ro1">
          <table:table-cell office:value-type="float" office:value="573.934753417969">
            <text:p>573.934753418</text:p>
          </table:table-cell>
          <table:table-cell office:value-type="float" office:value="0.01879546">
            <text:p>0.01879546</text:p>
          </table:table-cell>
          <table:table-cell table:number-columns-repeated="4"/>
        </table:table-row>
        <table:table-row table:style-name="ro1">
          <table:table-cell office:value-type="float" office:value="574.053100585938">
            <text:p>574.0531005859</text:p>
          </table:table-cell>
          <table:table-cell office:value-type="float" office:value="0.01545443">
            <text:p>0.01545443</text:p>
          </table:table-cell>
          <table:table-cell table:number-columns-repeated="4"/>
        </table:table-row>
        <table:table-row table:style-name="ro1">
          <table:table-cell office:value-type="float" office:value="574.171447753906">
            <text:p>574.1714477539</text:p>
          </table:table-cell>
          <table:table-cell office:value-type="float" office:value="0.0164851">
            <text:p>0.0164851</text:p>
          </table:table-cell>
          <table:table-cell table:number-columns-repeated="4"/>
        </table:table-row>
        <table:table-row table:style-name="ro1">
          <table:table-cell office:value-type="float" office:value="574.289733886719">
            <text:p>574.2897338867</text:p>
          </table:table-cell>
          <table:table-cell office:value-type="float" office:value="0.01289258">
            <text:p>0.01289258</text:p>
          </table:table-cell>
          <table:table-cell table:number-columns-repeated="4"/>
        </table:table-row>
        <table:table-row table:style-name="ro1">
          <table:table-cell office:value-type="float" office:value="574.408081054688">
            <text:p>574.4080810547</text:p>
          </table:table-cell>
          <table:table-cell office:value-type="float" office:value="0.0233221">
            <text:p>0.0233221</text:p>
          </table:table-cell>
          <table:table-cell table:number-columns-repeated="4"/>
        </table:table-row>
        <table:table-row table:style-name="ro1">
          <table:table-cell office:value-type="float" office:value="574.526428222656">
            <text:p>574.5264282227</text:p>
          </table:table-cell>
          <table:table-cell office:value-type="float" office:value="0.02207859">
            <text:p>0.02207859</text:p>
          </table:table-cell>
          <table:table-cell table:number-columns-repeated="4"/>
        </table:table-row>
        <table:table-row table:style-name="ro1">
          <table:table-cell office:value-type="float" office:value="574.644775390625">
            <text:p>574.6447753906</text:p>
          </table:table-cell>
          <table:table-cell office:value-type="float" office:value="0.02090059">
            <text:p>0.02090059</text:p>
          </table:table-cell>
          <table:table-cell table:number-columns-repeated="4"/>
        </table:table-row>
        <table:table-row table:style-name="ro1">
          <table:table-cell office:value-type="float" office:value="574.763122558594">
            <text:p>574.7631225586</text:p>
          </table:table-cell>
          <table:table-cell office:value-type="float" office:value="0.02458198">
            <text:p>0.02458198</text:p>
          </table:table-cell>
          <table:table-cell table:number-columns-repeated="4"/>
        </table:table-row>
        <table:table-row table:style-name="ro1">
          <table:table-cell office:value-type="float" office:value="574.881469726563">
            <text:p>574.8814697266</text:p>
          </table:table-cell>
          <table:table-cell office:value-type="float" office:value="0.0281585">
            <text:p>0.0281585</text:p>
          </table:table-cell>
          <table:table-cell table:number-columns-repeated="4"/>
        </table:table-row>
        <table:table-row table:style-name="ro1">
          <table:table-cell office:value-type="float" office:value="574.999816894531">
            <text:p>574.9998168945</text:p>
          </table:table-cell>
          <table:table-cell office:value-type="float" office:value="0.01574834">
            <text:p>0.01574834</text:p>
          </table:table-cell>
          <table:table-cell table:number-columns-repeated="4"/>
        </table:table-row>
        <table:table-row table:style-name="ro1">
          <table:table-cell office:value-type="float" office:value="575.1181640625">
            <text:p>575.1181640625</text:p>
          </table:table-cell>
          <table:table-cell office:value-type="float" office:value="0.04306344">
            <text:p>0.04306344</text:p>
          </table:table-cell>
          <table:table-cell table:number-columns-repeated="4"/>
        </table:table-row>
        <table:table-row table:style-name="ro1">
          <table:table-cell office:value-type="float" office:value="575.236572265625">
            <text:p>575.2365722656</text:p>
          </table:table-cell>
          <table:table-cell office:value-type="float" office:value="0.01561351">
            <text:p>0.01561351</text:p>
          </table:table-cell>
          <table:table-cell table:number-columns-repeated="4"/>
        </table:table-row>
        <table:table-row table:style-name="ro1">
          <table:table-cell office:value-type="float" office:value="575.354919433594">
            <text:p>575.3549194336</text:p>
          </table:table-cell>
          <table:table-cell office:value-type="float" office:value="0.03298603">
            <text:p>0.03298603</text:p>
          </table:table-cell>
          <table:table-cell table:number-columns-repeated="4"/>
        </table:table-row>
        <table:table-row table:style-name="ro1">
          <table:table-cell office:value-type="float" office:value="575.473266601563">
            <text:p>575.4732666016</text:p>
          </table:table-cell>
          <table:table-cell office:value-type="float" office:value="0.01485773">
            <text:p>0.01485773</text:p>
          </table:table-cell>
          <table:table-cell table:number-columns-repeated="4"/>
        </table:table-row>
        <table:table-row table:style-name="ro1">
          <table:table-cell office:value-type="float" office:value="575.591613769531">
            <text:p>575.5916137695</text:p>
          </table:table-cell>
          <table:table-cell office:value-type="float" office:value="0.01441893">
            <text:p>0.01441893</text:p>
          </table:table-cell>
          <table:table-cell table:number-columns-repeated="4"/>
        </table:table-row>
        <table:table-row table:style-name="ro1">
          <table:table-cell office:value-type="float" office:value="575.710021972656">
            <text:p>575.7100219727</text:p>
          </table:table-cell>
          <table:table-cell office:value-type="float" office:value="0.01559165">
            <text:p>0.01559165</text:p>
          </table:table-cell>
          <table:table-cell table:number-columns-repeated="4"/>
        </table:table-row>
        <table:table-row table:style-name="ro1">
          <table:table-cell office:value-type="float" office:value="575.828369140625">
            <text:p>575.8283691406</text:p>
          </table:table-cell>
          <table:table-cell office:value-type="float" office:value="0.01658185">
            <text:p>0.01658185</text:p>
          </table:table-cell>
          <table:table-cell table:number-columns-repeated="4"/>
        </table:table-row>
        <table:table-row table:style-name="ro1">
          <table:table-cell office:value-type="float" office:value="575.94677734375">
            <text:p>575.9467773438</text:p>
          </table:table-cell>
          <table:table-cell office:value-type="float" office:value="0.02603434">
            <text:p>0.02603434</text:p>
          </table:table-cell>
          <table:table-cell table:number-columns-repeated="4"/>
        </table:table-row>
        <table:table-row table:style-name="ro1">
          <table:table-cell office:value-type="float" office:value="576.065124511719">
            <text:p>576.0651245117</text:p>
          </table:table-cell>
          <table:table-cell office:value-type="float" office:value="0.02326526">
            <text:p>0.02326526</text:p>
          </table:table-cell>
          <table:table-cell table:number-columns-repeated="4"/>
        </table:table-row>
        <table:table-row table:style-name="ro1">
          <table:table-cell office:value-type="float" office:value="576.183532714844">
            <text:p>576.1835327148</text:p>
          </table:table-cell>
          <table:table-cell office:value-type="float" office:value="0.01439665">
            <text:p>0.01439665</text:p>
          </table:table-cell>
          <table:table-cell table:number-columns-repeated="4"/>
        </table:table-row>
        <table:table-row table:style-name="ro1">
          <table:table-cell office:value-type="float" office:value="576.301879882813">
            <text:p>576.3018798828</text:p>
          </table:table-cell>
          <table:table-cell office:value-type="float" office:value="0.02873886">
            <text:p>0.02873886</text:p>
          </table:table-cell>
          <table:table-cell table:number-columns-repeated="4"/>
        </table:table-row>
        <table:table-row table:style-name="ro1">
          <table:table-cell office:value-type="float" office:value="576.420288085938">
            <text:p>576.4202880859</text:p>
          </table:table-cell>
          <table:table-cell office:value-type="float" office:value="0.03226378">
            <text:p>0.03226378</text:p>
          </table:table-cell>
          <table:table-cell table:number-columns-repeated="4"/>
        </table:table-row>
        <table:table-row table:style-name="ro1">
          <table:table-cell office:value-type="float" office:value="576.538635253906">
            <text:p>576.5386352539</text:p>
          </table:table-cell>
          <table:table-cell office:value-type="float" office:value="0.01860479">
            <text:p>0.01860479</text:p>
          </table:table-cell>
          <table:table-cell table:number-columns-repeated="4"/>
        </table:table-row>
        <table:table-row table:style-name="ro1">
          <table:table-cell office:value-type="float" office:value="576.657043457031">
            <text:p>576.657043457</text:p>
          </table:table-cell>
          <table:table-cell office:value-type="float" office:value="0.03754766">
            <text:p>0.03754766</text:p>
          </table:table-cell>
          <table:table-cell table:number-columns-repeated="4"/>
        </table:table-row>
        <table:table-row table:style-name="ro1">
          <table:table-cell office:value-type="float" office:value="576.775451660156">
            <text:p>576.7754516602</text:p>
          </table:table-cell>
          <table:table-cell office:value-type="float" office:value="0.01333627">
            <text:p>0.01333627</text:p>
          </table:table-cell>
          <table:table-cell table:number-columns-repeated="4"/>
        </table:table-row>
        <table:table-row table:style-name="ro1">
          <table:table-cell office:value-type="float" office:value="576.893859863281">
            <text:p>576.8938598633</text:p>
          </table:table-cell>
          <table:table-cell office:value-type="float" office:value="0.01901605">
            <text:p>0.01901605</text:p>
          </table:table-cell>
          <table:table-cell table:number-columns-repeated="4"/>
        </table:table-row>
        <table:table-row table:style-name="ro1">
          <table:table-cell office:value-type="float" office:value="577.012268066406">
            <text:p>577.0122680664</text:p>
          </table:table-cell>
          <table:table-cell office:value-type="float" office:value="0.03118661">
            <text:p>0.03118661</text:p>
          </table:table-cell>
          <table:table-cell table:number-columns-repeated="4"/>
        </table:table-row>
        <table:table-row table:style-name="ro1">
          <table:table-cell office:value-type="float" office:value="577.130615234375">
            <text:p>577.1306152344</text:p>
          </table:table-cell>
          <table:table-cell office:value-type="float" office:value="0.0240805">
            <text:p>0.0240805</text:p>
          </table:table-cell>
          <table:table-cell table:number-columns-repeated="4"/>
        </table:table-row>
        <table:table-row table:style-name="ro1">
          <table:table-cell office:value-type="float" office:value="577.2490234375">
            <text:p>577.2490234375</text:p>
          </table:table-cell>
          <table:table-cell office:value-type="float" office:value="0.02940422">
            <text:p>0.02940422</text:p>
          </table:table-cell>
          <table:table-cell table:number-columns-repeated="4"/>
        </table:table-row>
        <table:table-row table:style-name="ro1">
          <table:table-cell office:value-type="float" office:value="577.367431640625">
            <text:p>577.3674316406</text:p>
          </table:table-cell>
          <table:table-cell office:value-type="float" office:value="0.01381984">
            <text:p>0.01381984</text:p>
          </table:table-cell>
          <table:table-cell table:number-columns-repeated="4"/>
        </table:table-row>
        <table:table-row table:style-name="ro1">
          <table:table-cell office:value-type="float" office:value="577.48583984375">
            <text:p>577.4858398438</text:p>
          </table:table-cell>
          <table:table-cell office:value-type="float" office:value="0.0286076">
            <text:p>0.0286076</text:p>
          </table:table-cell>
          <table:table-cell table:number-columns-repeated="4"/>
        </table:table-row>
        <table:table-row table:style-name="ro1">
          <table:table-cell office:value-type="float" office:value="577.604248046875">
            <text:p>577.6042480469</text:p>
          </table:table-cell>
          <table:table-cell office:value-type="float" office:value="0.01403624">
            <text:p>0.01403624</text:p>
          </table:table-cell>
          <table:table-cell table:number-columns-repeated="4"/>
        </table:table-row>
        <table:table-row table:style-name="ro1">
          <table:table-cell office:value-type="float" office:value="577.722717285156">
            <text:p>577.7227172852</text:p>
          </table:table-cell>
          <table:table-cell office:value-type="float" office:value="0.0186198">
            <text:p>0.0186198</text:p>
          </table:table-cell>
          <table:table-cell table:number-columns-repeated="4"/>
        </table:table-row>
        <table:table-row table:style-name="ro1">
          <table:table-cell office:value-type="float" office:value="577.841125488281">
            <text:p>577.8411254883</text:p>
          </table:table-cell>
          <table:table-cell office:value-type="float" office:value="0.02230876">
            <text:p>0.02230876</text:p>
          </table:table-cell>
          <table:table-cell table:number-columns-repeated="4"/>
        </table:table-row>
        <table:table-row table:style-name="ro1">
          <table:table-cell office:value-type="float" office:value="577.959533691406">
            <text:p>577.9595336914</text:p>
          </table:table-cell>
          <table:table-cell office:value-type="float" office:value="0.01717451">
            <text:p>0.01717451</text:p>
          </table:table-cell>
          <table:table-cell table:number-columns-repeated="4"/>
        </table:table-row>
        <table:table-row table:style-name="ro1">
          <table:table-cell office:value-type="float" office:value="578.077941894531">
            <text:p>578.0779418945</text:p>
          </table:table-cell>
          <table:table-cell office:value-type="float" office:value="0.03816115">
            <text:p>0.03816115</text:p>
          </table:table-cell>
          <table:table-cell table:number-columns-repeated="4"/>
        </table:table-row>
        <table:table-row table:style-name="ro1">
          <table:table-cell office:value-type="float" office:value="578.196350097656">
            <text:p>578.1963500977</text:p>
          </table:table-cell>
          <table:table-cell office:value-type="float" office:value="0.01798461">
            <text:p>0.01798461</text:p>
          </table:table-cell>
          <table:table-cell table:number-columns-repeated="4"/>
        </table:table-row>
        <table:table-row table:style-name="ro1">
          <table:table-cell office:value-type="float" office:value="578.314819335938">
            <text:p>578.3148193359</text:p>
          </table:table-cell>
          <table:table-cell office:value-type="float" office:value="0.01803209">
            <text:p>0.01803209</text:p>
          </table:table-cell>
          <table:table-cell table:number-columns-repeated="4"/>
        </table:table-row>
        <table:table-row table:style-name="ro1">
          <table:table-cell office:value-type="float" office:value="578.433227539063">
            <text:p>578.4332275391</text:p>
          </table:table-cell>
          <table:table-cell office:value-type="float" office:value="0.0203492">
            <text:p>0.0203492</text:p>
          </table:table-cell>
          <table:table-cell table:number-columns-repeated="4"/>
        </table:table-row>
        <table:table-row table:style-name="ro1">
          <table:table-cell office:value-type="float" office:value="578.551635742188">
            <text:p>578.5516357422</text:p>
          </table:table-cell>
          <table:table-cell office:value-type="float" office:value="0.02161998">
            <text:p>0.02161998</text:p>
          </table:table-cell>
          <table:table-cell table:number-columns-repeated="4"/>
        </table:table-row>
        <table:table-row table:style-name="ro1">
          <table:table-cell office:value-type="float" office:value="578.670104980469">
            <text:p>578.6701049805</text:p>
          </table:table-cell>
          <table:table-cell office:value-type="float" office:value="0.03347567">
            <text:p>0.03347567</text:p>
          </table:table-cell>
          <table:table-cell table:number-columns-repeated="4"/>
        </table:table-row>
        <table:table-row table:style-name="ro1">
          <table:table-cell office:value-type="float" office:value="578.788513183594">
            <text:p>578.7885131836</text:p>
          </table:table-cell>
          <table:table-cell office:value-type="float" office:value="0.05311136">
            <text:p>0.05311136</text:p>
          </table:table-cell>
          <table:table-cell table:number-columns-repeated="4"/>
        </table:table-row>
        <table:table-row table:style-name="ro1">
          <table:table-cell office:value-type="float" office:value="578.906982421875">
            <text:p>578.9069824219</text:p>
          </table:table-cell>
          <table:table-cell office:value-type="float" office:value="0.01369512">
            <text:p>0.01369512</text:p>
          </table:table-cell>
          <table:table-cell table:number-columns-repeated="4"/>
        </table:table-row>
        <table:table-row table:style-name="ro1">
          <table:table-cell office:value-type="float" office:value="579.025451660156">
            <text:p>579.0254516602</text:p>
          </table:table-cell>
          <table:table-cell office:value-type="float" office:value="0.02104568">
            <text:p>0.02104568</text:p>
          </table:table-cell>
          <table:table-cell table:number-columns-repeated="4"/>
        </table:table-row>
        <table:table-row table:style-name="ro1">
          <table:table-cell office:value-type="float" office:value="579.143859863281">
            <text:p>579.1438598633</text:p>
          </table:table-cell>
          <table:table-cell office:value-type="float" office:value="0.02720702">
            <text:p>0.02720702</text:p>
          </table:table-cell>
          <table:table-cell table:number-columns-repeated="4"/>
        </table:table-row>
        <table:table-row table:style-name="ro1">
          <table:table-cell office:value-type="float" office:value="579.262329101563">
            <text:p>579.2623291016</text:p>
          </table:table-cell>
          <table:table-cell office:value-type="float" office:value="0.02101087">
            <text:p>0.02101087</text:p>
          </table:table-cell>
          <table:table-cell table:number-columns-repeated="4"/>
        </table:table-row>
        <table:table-row table:style-name="ro1">
          <table:table-cell office:value-type="float" office:value="579.380798339844">
            <text:p>579.3807983398</text:p>
          </table:table-cell>
          <table:table-cell office:value-type="float" office:value="0.02552911">
            <text:p>0.02552911</text:p>
          </table:table-cell>
          <table:table-cell table:number-columns-repeated="4"/>
        </table:table-row>
        <table:table-row table:style-name="ro1">
          <table:table-cell office:value-type="float" office:value="579.499206542969">
            <text:p>579.499206543</text:p>
          </table:table-cell>
          <table:table-cell office:value-type="float" office:value="0.01955818">
            <text:p>0.01955818</text:p>
          </table:table-cell>
          <table:table-cell table:number-columns-repeated="4"/>
        </table:table-row>
        <table:table-row table:style-name="ro1">
          <table:table-cell office:value-type="float" office:value="579.61767578125">
            <text:p>579.6176757813</text:p>
          </table:table-cell>
          <table:table-cell office:value-type="float" office:value="0.01939353">
            <text:p>0.01939353</text:p>
          </table:table-cell>
          <table:table-cell table:number-columns-repeated="4"/>
        </table:table-row>
        <table:table-row table:style-name="ro1">
          <table:table-cell office:value-type="float" office:value="579.736145019531">
            <text:p>579.7361450195</text:p>
          </table:table-cell>
          <table:table-cell office:value-type="float" office:value="0.02244032">
            <text:p>0.02244032</text:p>
          </table:table-cell>
          <table:table-cell table:number-columns-repeated="4"/>
        </table:table-row>
        <table:table-row table:style-name="ro1">
          <table:table-cell office:value-type="float" office:value="579.854614257813">
            <text:p>579.8546142578</text:p>
          </table:table-cell>
          <table:table-cell office:value-type="float" office:value="0.01547542">
            <text:p>0.01547542</text:p>
          </table:table-cell>
          <table:table-cell table:number-columns-repeated="4"/>
        </table:table-row>
        <table:table-row table:style-name="ro1">
          <table:table-cell office:value-type="float" office:value="579.973083496094">
            <text:p>579.9730834961</text:p>
          </table:table-cell>
          <table:table-cell office:value-type="float" office:value="0.01661958">
            <text:p>0.01661958</text:p>
          </table:table-cell>
          <table:table-cell table:number-columns-repeated="4"/>
        </table:table-row>
        <table:table-row table:style-name="ro1">
          <table:table-cell office:value-type="float" office:value="580.091552734375">
            <text:p>580.0915527344</text:p>
          </table:table-cell>
          <table:table-cell office:value-type="float" office:value="0.02795284">
            <text:p>0.02795284</text:p>
          </table:table-cell>
          <table:table-cell table:number-columns-repeated="4"/>
        </table:table-row>
        <table:table-row table:style-name="ro1">
          <table:table-cell office:value-type="float" office:value="580.210021972656">
            <text:p>580.2100219727</text:p>
          </table:table-cell>
          <table:table-cell office:value-type="float" office:value="0.04015467">
            <text:p>0.04015467</text:p>
          </table:table-cell>
          <table:table-cell table:number-columns-repeated="4"/>
        </table:table-row>
        <table:table-row table:style-name="ro1">
          <table:table-cell office:value-type="float" office:value="580.328491210938">
            <text:p>580.3284912109</text:p>
          </table:table-cell>
          <table:table-cell office:value-type="float" office:value="0.02798992">
            <text:p>0.02798992</text:p>
          </table:table-cell>
          <table:table-cell table:number-columns-repeated="4"/>
        </table:table-row>
        <table:table-row table:style-name="ro1">
          <table:table-cell office:value-type="float" office:value="580.446960449219">
            <text:p>580.4469604492</text:p>
          </table:table-cell>
          <table:table-cell office:value-type="float" office:value="0.02207539">
            <text:p>0.02207539</text:p>
          </table:table-cell>
          <table:table-cell table:number-columns-repeated="4"/>
        </table:table-row>
        <table:table-row table:style-name="ro1">
          <table:table-cell office:value-type="float" office:value="580.5654296875">
            <text:p>580.5654296875</text:p>
          </table:table-cell>
          <table:table-cell office:value-type="float" office:value="0.02157428">
            <text:p>0.02157428</text:p>
          </table:table-cell>
          <table:table-cell table:number-columns-repeated="4"/>
        </table:table-row>
        <table:table-row table:style-name="ro1">
          <table:table-cell office:value-type="float" office:value="580.683898925781">
            <text:p>580.6838989258</text:p>
          </table:table-cell>
          <table:table-cell office:value-type="float" office:value="0.03358595">
            <text:p>0.03358595</text:p>
          </table:table-cell>
          <table:table-cell table:number-columns-repeated="4"/>
        </table:table-row>
        <table:table-row table:style-name="ro1">
          <table:table-cell office:value-type="float" office:value="580.802368164063">
            <text:p>580.8023681641</text:p>
          </table:table-cell>
          <table:table-cell office:value-type="float" office:value="0.02638599">
            <text:p>0.02638599</text:p>
          </table:table-cell>
          <table:table-cell table:number-columns-repeated="4"/>
        </table:table-row>
        <table:table-row table:style-name="ro1">
          <table:table-cell office:value-type="float" office:value="580.9208984375">
            <text:p>580.9208984375</text:p>
          </table:table-cell>
          <table:table-cell office:value-type="float" office:value="0.02373185">
            <text:p>0.02373185</text:p>
          </table:table-cell>
          <table:table-cell table:number-columns-repeated="4"/>
        </table:table-row>
        <table:table-row table:style-name="ro1">
          <table:table-cell office:value-type="float" office:value="581.039367675781">
            <text:p>581.0393676758</text:p>
          </table:table-cell>
          <table:table-cell office:value-type="float" office:value="0.02311346">
            <text:p>0.02311346</text:p>
          </table:table-cell>
          <table:table-cell table:number-columns-repeated="4"/>
        </table:table-row>
        <table:table-row table:style-name="ro1">
          <table:table-cell office:value-type="float" office:value="581.157836914063">
            <text:p>581.1578369141</text:p>
          </table:table-cell>
          <table:table-cell office:value-type="float" office:value="0.03445786">
            <text:p>0.03445786</text:p>
          </table:table-cell>
          <table:table-cell table:number-columns-repeated="4"/>
        </table:table-row>
        <table:table-row table:style-name="ro1">
          <table:table-cell office:value-type="float" office:value="581.2763671875">
            <text:p>581.2763671875</text:p>
          </table:table-cell>
          <table:table-cell office:value-type="float" office:value="0.03855924">
            <text:p>0.03855924</text:p>
          </table:table-cell>
          <table:table-cell table:number-columns-repeated="4"/>
        </table:table-row>
        <table:table-row table:style-name="ro1">
          <table:table-cell office:value-type="float" office:value="581.394836425781">
            <text:p>581.3948364258</text:p>
          </table:table-cell>
          <table:table-cell office:value-type="float" office:value="0.02806571">
            <text:p>0.02806571</text:p>
          </table:table-cell>
          <table:table-cell table:number-columns-repeated="4"/>
        </table:table-row>
        <table:table-row table:style-name="ro1">
          <table:table-cell office:value-type="float" office:value="581.513366699219">
            <text:p>581.5133666992</text:p>
          </table:table-cell>
          <table:table-cell office:value-type="float" office:value="0.0364609">
            <text:p>0.0364609</text:p>
          </table:table-cell>
          <table:table-cell table:number-columns-repeated="4"/>
        </table:table-row>
        <table:table-row table:style-name="ro1">
          <table:table-cell office:value-type="float" office:value="581.6318359375">
            <text:p>581.6318359375</text:p>
          </table:table-cell>
          <table:table-cell office:value-type="float" office:value="0.02251369">
            <text:p>0.02251369</text:p>
          </table:table-cell>
          <table:table-cell table:number-columns-repeated="4"/>
        </table:table-row>
        <table:table-row table:style-name="ro1">
          <table:table-cell office:value-type="float" office:value="581.750366210938">
            <text:p>581.7503662109</text:p>
          </table:table-cell>
          <table:table-cell office:value-type="float" office:value="0.0180562">
            <text:p>0.0180562</text:p>
          </table:table-cell>
          <table:table-cell table:number-columns-repeated="4"/>
        </table:table-row>
        <table:table-row table:style-name="ro1">
          <table:table-cell office:value-type="float" office:value="581.868835449219">
            <text:p>581.8688354492</text:p>
          </table:table-cell>
          <table:table-cell office:value-type="float" office:value="0.02169405">
            <text:p>0.02169405</text:p>
          </table:table-cell>
          <table:table-cell table:number-columns-repeated="4"/>
        </table:table-row>
        <table:table-row table:style-name="ro1">
          <table:table-cell office:value-type="float" office:value="581.987365722656">
            <text:p>581.9873657227</text:p>
          </table:table-cell>
          <table:table-cell office:value-type="float" office:value="0.02374571">
            <text:p>0.02374571</text:p>
          </table:table-cell>
          <table:table-cell table:number-columns-repeated="4"/>
        </table:table-row>
        <table:table-row table:style-name="ro1">
          <table:table-cell office:value-type="float" office:value="582.105895996094">
            <text:p>582.1058959961</text:p>
          </table:table-cell>
          <table:table-cell office:value-type="float" office:value="0.02583844">
            <text:p>0.02583844</text:p>
          </table:table-cell>
          <table:table-cell table:number-columns-repeated="4"/>
        </table:table-row>
        <table:table-row table:style-name="ro1">
          <table:table-cell office:value-type="float" office:value="582.224365234375">
            <text:p>582.2243652344</text:p>
          </table:table-cell>
          <table:table-cell office:value-type="float" office:value="0.02905741">
            <text:p>0.02905741</text:p>
          </table:table-cell>
          <table:table-cell table:number-columns-repeated="4"/>
        </table:table-row>
        <table:table-row table:style-name="ro1">
          <table:table-cell office:value-type="float" office:value="582.342895507813">
            <text:p>582.3428955078</text:p>
          </table:table-cell>
          <table:table-cell office:value-type="float" office:value="0.02267554">
            <text:p>0.02267554</text:p>
          </table:table-cell>
          <table:table-cell table:number-columns-repeated="4"/>
        </table:table-row>
        <table:table-row table:style-name="ro1">
          <table:table-cell office:value-type="float" office:value="582.46142578125">
            <text:p>582.4614257813</text:p>
          </table:table-cell>
          <table:table-cell office:value-type="float" office:value="0.02651654">
            <text:p>0.02651654</text:p>
          </table:table-cell>
          <table:table-cell table:number-columns-repeated="4"/>
        </table:table-row>
        <table:table-row table:style-name="ro1">
          <table:table-cell office:value-type="float" office:value="582.579956054688">
            <text:p>582.5799560547</text:p>
          </table:table-cell>
          <table:table-cell office:value-type="float" office:value="0.0210692">
            <text:p>0.0210692</text:p>
          </table:table-cell>
          <table:table-cell table:number-columns-repeated="4"/>
        </table:table-row>
        <table:table-row table:style-name="ro1">
          <table:table-cell office:value-type="float" office:value="582.698486328125">
            <text:p>582.6984863281</text:p>
          </table:table-cell>
          <table:table-cell office:value-type="float" office:value="0.01819133">
            <text:p>0.01819133</text:p>
          </table:table-cell>
          <table:table-cell table:number-columns-repeated="4"/>
        </table:table-row>
        <table:table-row table:style-name="ro1">
          <table:table-cell office:value-type="float" office:value="582.817016601563">
            <text:p>582.8170166016</text:p>
          </table:table-cell>
          <table:table-cell office:value-type="float" office:value="0.02724257">
            <text:p>0.02724257</text:p>
          </table:table-cell>
          <table:table-cell table:number-columns-repeated="4"/>
        </table:table-row>
        <table:table-row table:style-name="ro1">
          <table:table-cell office:value-type="float" office:value="582.935546875">
            <text:p>582.935546875</text:p>
          </table:table-cell>
          <table:table-cell office:value-type="float" office:value="0.01612533">
            <text:p>0.01612533</text:p>
          </table:table-cell>
          <table:table-cell table:number-columns-repeated="4"/>
        </table:table-row>
        <table:table-row table:style-name="ro1">
          <table:table-cell office:value-type="float" office:value="583.054077148438">
            <text:p>583.0540771484</text:p>
          </table:table-cell>
          <table:table-cell office:value-type="float" office:value="0.02080929">
            <text:p>0.02080929</text:p>
          </table:table-cell>
          <table:table-cell table:number-columns-repeated="4"/>
        </table:table-row>
        <table:table-row table:style-name="ro1">
          <table:table-cell office:value-type="float" office:value="583.172607421875">
            <text:p>583.1726074219</text:p>
          </table:table-cell>
          <table:table-cell office:value-type="float" office:value="0.05438695">
            <text:p>0.05438695</text:p>
          </table:table-cell>
          <table:table-cell table:number-columns-repeated="4"/>
        </table:table-row>
        <table:table-row table:style-name="ro1">
          <table:table-cell office:value-type="float" office:value="583.291137695313">
            <text:p>583.2911376953</text:p>
          </table:table-cell>
          <table:table-cell office:value-type="float" office:value="0.02384249">
            <text:p>0.02384249</text:p>
          </table:table-cell>
          <table:table-cell table:number-columns-repeated="4"/>
        </table:table-row>
        <table:table-row table:style-name="ro1">
          <table:table-cell office:value-type="float" office:value="583.40966796875">
            <text:p>583.4096679688</text:p>
          </table:table-cell>
          <table:table-cell office:value-type="float" office:value="0.01887719">
            <text:p>0.01887719</text:p>
          </table:table-cell>
          <table:table-cell table:number-columns-repeated="4"/>
        </table:table-row>
        <table:table-row table:style-name="ro1">
          <table:table-cell office:value-type="float" office:value="583.528198242188">
            <text:p>583.5281982422</text:p>
          </table:table-cell>
          <table:table-cell office:value-type="float" office:value="0.02535346">
            <text:p>0.02535346</text:p>
          </table:table-cell>
          <table:table-cell table:number-columns-repeated="4"/>
        </table:table-row>
        <table:table-row table:style-name="ro1">
          <table:table-cell office:value-type="float" office:value="583.646789550781">
            <text:p>583.6467895508</text:p>
          </table:table-cell>
          <table:table-cell office:value-type="float" office:value="0.01960813">
            <text:p>0.01960813</text:p>
          </table:table-cell>
          <table:table-cell table:number-columns-repeated="4"/>
        </table:table-row>
        <table:table-row table:style-name="ro1">
          <table:table-cell office:value-type="float" office:value="583.765319824219">
            <text:p>583.7653198242</text:p>
          </table:table-cell>
          <table:table-cell office:value-type="float" office:value="0.01707939">
            <text:p>0.01707939</text:p>
          </table:table-cell>
          <table:table-cell table:number-columns-repeated="4"/>
        </table:table-row>
        <table:table-row table:style-name="ro1">
          <table:table-cell office:value-type="float" office:value="583.883850097656">
            <text:p>583.8838500977</text:p>
          </table:table-cell>
          <table:table-cell office:value-type="float" office:value="0.03214831">
            <text:p>0.03214831</text:p>
          </table:table-cell>
          <table:table-cell table:number-columns-repeated="4"/>
        </table:table-row>
        <table:table-row table:style-name="ro1">
          <table:table-cell office:value-type="float" office:value="584.00244140625">
            <text:p>584.0024414063</text:p>
          </table:table-cell>
          <table:table-cell office:value-type="float" office:value="0.01454058">
            <text:p>0.01454058</text:p>
          </table:table-cell>
          <table:table-cell table:number-columns-repeated="4"/>
        </table:table-row>
        <table:table-row table:style-name="ro1">
          <table:table-cell office:value-type="float" office:value="584.120971679688">
            <text:p>584.1209716797</text:p>
          </table:table-cell>
          <table:table-cell office:value-type="float" office:value="0.03274368">
            <text:p>0.03274368</text:p>
          </table:table-cell>
          <table:table-cell table:number-columns-repeated="4"/>
        </table:table-row>
        <table:table-row table:style-name="ro1">
          <table:table-cell office:value-type="float" office:value="584.239501953125">
            <text:p>584.2395019531</text:p>
          </table:table-cell>
          <table:table-cell office:value-type="float" office:value="0.02604157">
            <text:p>0.02604157</text:p>
          </table:table-cell>
          <table:table-cell table:number-columns-repeated="4"/>
        </table:table-row>
        <table:table-row table:style-name="ro1">
          <table:table-cell office:value-type="float" office:value="584.358093261719">
            <text:p>584.3580932617</text:p>
          </table:table-cell>
          <table:table-cell office:value-type="float" office:value="0.0213048">
            <text:p>0.0213048</text:p>
          </table:table-cell>
          <table:table-cell table:number-columns-repeated="4"/>
        </table:table-row>
        <table:table-row table:style-name="ro1">
          <table:table-cell office:value-type="float" office:value="584.476623535156">
            <text:p>584.4766235352</text:p>
          </table:table-cell>
          <table:table-cell office:value-type="float" office:value="0.02943044">
            <text:p>0.02943044</text:p>
          </table:table-cell>
          <table:table-cell table:number-columns-repeated="4"/>
        </table:table-row>
        <table:table-row table:style-name="ro1">
          <table:table-cell office:value-type="float" office:value="584.59521484375">
            <text:p>584.5952148438</text:p>
          </table:table-cell>
          <table:table-cell office:value-type="float" office:value="0.03273793">
            <text:p>0.03273793</text:p>
          </table:table-cell>
          <table:table-cell table:number-columns-repeated="4"/>
        </table:table-row>
        <table:table-row table:style-name="ro1">
          <table:table-cell office:value-type="float" office:value="584.713806152344">
            <text:p>584.7138061523</text:p>
          </table:table-cell>
          <table:table-cell office:value-type="float" office:value="0.02415641">
            <text:p>0.02415641</text:p>
          </table:table-cell>
          <table:table-cell table:number-columns-repeated="4"/>
        </table:table-row>
        <table:table-row table:style-name="ro1">
          <table:table-cell office:value-type="float" office:value="584.832336425781">
            <text:p>584.8323364258</text:p>
          </table:table-cell>
          <table:table-cell office:value-type="float" office:value="0.02384589">
            <text:p>0.02384589</text:p>
          </table:table-cell>
          <table:table-cell table:number-columns-repeated="4"/>
        </table:table-row>
        <table:table-row table:style-name="ro1">
          <table:table-cell office:value-type="float" office:value="584.950927734375">
            <text:p>584.9509277344</text:p>
          </table:table-cell>
          <table:table-cell office:value-type="float" office:value="0.02194575">
            <text:p>0.02194575</text:p>
          </table:table-cell>
          <table:table-cell table:number-columns-repeated="4"/>
        </table:table-row>
        <table:table-row table:style-name="ro1">
          <table:table-cell office:value-type="float" office:value="585.069519042969">
            <text:p>585.069519043</text:p>
          </table:table-cell>
          <table:table-cell office:value-type="float" office:value="0.01304898">
            <text:p>0.01304898</text:p>
          </table:table-cell>
          <table:table-cell table:number-columns-repeated="4"/>
        </table:table-row>
        <table:table-row table:style-name="ro1">
          <table:table-cell office:value-type="float" office:value="585.188110351563">
            <text:p>585.1881103516</text:p>
          </table:table-cell>
          <table:table-cell office:value-type="float" office:value="0.02864158">
            <text:p>0.02864158</text:p>
          </table:table-cell>
          <table:table-cell table:number-columns-repeated="4"/>
        </table:table-row>
        <table:table-row table:style-name="ro1">
          <table:table-cell office:value-type="float" office:value="585.306640625">
            <text:p>585.306640625</text:p>
          </table:table-cell>
          <table:table-cell office:value-type="float" office:value="0.02977618">
            <text:p>0.02977618</text:p>
          </table:table-cell>
          <table:table-cell table:number-columns-repeated="4"/>
        </table:table-row>
        <table:table-row table:style-name="ro1">
          <table:table-cell office:value-type="float" office:value="585.425231933594">
            <text:p>585.4252319336</text:p>
          </table:table-cell>
          <table:table-cell office:value-type="float" office:value="0.02088783">
            <text:p>0.02088783</text:p>
          </table:table-cell>
          <table:table-cell table:number-columns-repeated="4"/>
        </table:table-row>
        <table:table-row table:style-name="ro1">
          <table:table-cell office:value-type="float" office:value="585.543823242188">
            <text:p>585.5438232422</text:p>
          </table:table-cell>
          <table:table-cell office:value-type="float" office:value="0.0464182">
            <text:p>0.0464182</text:p>
          </table:table-cell>
          <table:table-cell table:number-columns-repeated="4"/>
        </table:table-row>
        <table:table-row table:style-name="ro1">
          <table:table-cell office:value-type="float" office:value="585.662414550781">
            <text:p>585.6624145508</text:p>
          </table:table-cell>
          <table:table-cell office:value-type="float" office:value="0.01448554">
            <text:p>0.01448554</text:p>
          </table:table-cell>
          <table:table-cell table:number-columns-repeated="4"/>
        </table:table-row>
        <table:table-row table:style-name="ro1">
          <table:table-cell office:value-type="float" office:value="585.781005859375">
            <text:p>585.7810058594</text:p>
          </table:table-cell>
          <table:table-cell office:value-type="float" office:value="0.02467149">
            <text:p>0.02467149</text:p>
          </table:table-cell>
          <table:table-cell table:number-columns-repeated="4"/>
        </table:table-row>
        <table:table-row table:style-name="ro1">
          <table:table-cell office:value-type="float" office:value="585.899597167969">
            <text:p>585.899597168</text:p>
          </table:table-cell>
          <table:table-cell office:value-type="float" office:value="0.02905968">
            <text:p>0.02905968</text:p>
          </table:table-cell>
          <table:table-cell table:number-columns-repeated="4"/>
        </table:table-row>
        <table:table-row table:style-name="ro1">
          <table:table-cell office:value-type="float" office:value="586.018188476563">
            <text:p>586.0181884766</text:p>
          </table:table-cell>
          <table:table-cell office:value-type="float" office:value="0.01522723">
            <text:p>0.01522723</text:p>
          </table:table-cell>
          <table:table-cell table:number-columns-repeated="4"/>
        </table:table-row>
        <table:table-row table:style-name="ro1">
          <table:table-cell office:value-type="float" office:value="586.136779785156">
            <text:p>586.1367797852</text:p>
          </table:table-cell>
          <table:table-cell office:value-type="float" office:value="0.01751451">
            <text:p>0.01751451</text:p>
          </table:table-cell>
          <table:table-cell table:number-columns-repeated="4"/>
        </table:table-row>
        <table:table-row table:style-name="ro1">
          <table:table-cell office:value-type="float" office:value="586.255432128906">
            <text:p>586.2554321289</text:p>
          </table:table-cell>
          <table:table-cell office:value-type="float" office:value="0.02533338">
            <text:p>0.02533338</text:p>
          </table:table-cell>
          <table:table-cell table:number-columns-repeated="4"/>
        </table:table-row>
        <table:table-row table:style-name="ro1">
          <table:table-cell office:value-type="float" office:value="586.3740234375">
            <text:p>586.3740234375</text:p>
          </table:table-cell>
          <table:table-cell office:value-type="float" office:value="0.0279655">
            <text:p>0.0279655</text:p>
          </table:table-cell>
          <table:table-cell table:number-columns-repeated="4"/>
        </table:table-row>
        <table:table-row table:style-name="ro1">
          <table:table-cell office:value-type="float" office:value="586.492614746094">
            <text:p>586.4926147461</text:p>
          </table:table-cell>
          <table:table-cell office:value-type="float" office:value="0.02674754">
            <text:p>0.02674754</text:p>
          </table:table-cell>
          <table:table-cell table:number-columns-repeated="4"/>
        </table:table-row>
        <table:table-row table:style-name="ro1">
          <table:table-cell office:value-type="float" office:value="586.611206054688">
            <text:p>586.6112060547</text:p>
          </table:table-cell>
          <table:table-cell office:value-type="float" office:value="0.0359617">
            <text:p>0.0359617</text:p>
          </table:table-cell>
          <table:table-cell table:number-columns-repeated="4"/>
        </table:table-row>
        <table:table-row table:style-name="ro1">
          <table:table-cell office:value-type="float" office:value="586.729858398438">
            <text:p>586.7298583984</text:p>
          </table:table-cell>
          <table:table-cell office:value-type="float" office:value="0.02890382">
            <text:p>0.02890382</text:p>
          </table:table-cell>
          <table:table-cell table:number-columns-repeated="4"/>
        </table:table-row>
        <table:table-row table:style-name="ro1">
          <table:table-cell office:value-type="float" office:value="586.848449707031">
            <text:p>586.848449707</text:p>
          </table:table-cell>
          <table:table-cell office:value-type="float" office:value="0.03354956">
            <text:p>0.03354956</text:p>
          </table:table-cell>
          <table:table-cell table:number-columns-repeated="4"/>
        </table:table-row>
        <table:table-row table:style-name="ro1">
          <table:table-cell office:value-type="float" office:value="586.967041015625">
            <text:p>586.9670410156</text:p>
          </table:table-cell>
          <table:table-cell office:value-type="float" office:value="0.0184334">
            <text:p>0.0184334</text:p>
          </table:table-cell>
          <table:table-cell table:number-columns-repeated="4"/>
        </table:table-row>
        <table:table-row table:style-name="ro1">
          <table:table-cell office:value-type="float" office:value="587.085693359375">
            <text:p>587.0856933594</text:p>
          </table:table-cell>
          <table:table-cell office:value-type="float" office:value="0.02008709">
            <text:p>0.02008709</text:p>
          </table:table-cell>
          <table:table-cell table:number-columns-repeated="4"/>
        </table:table-row>
        <table:table-row table:style-name="ro1">
          <table:table-cell office:value-type="float" office:value="587.204284667969">
            <text:p>587.204284668</text:p>
          </table:table-cell>
          <table:table-cell office:value-type="float" office:value="0.03219749">
            <text:p>0.03219749</text:p>
          </table:table-cell>
          <table:table-cell table:number-columns-repeated="4"/>
        </table:table-row>
        <table:table-row table:style-name="ro1">
          <table:table-cell office:value-type="float" office:value="587.322937011719">
            <text:p>587.3229370117</text:p>
          </table:table-cell>
          <table:table-cell office:value-type="float" office:value="0.02610646">
            <text:p>0.02610646</text:p>
          </table:table-cell>
          <table:table-cell table:number-columns-repeated="4"/>
        </table:table-row>
        <table:table-row table:style-name="ro1">
          <table:table-cell office:value-type="float" office:value="587.441589355469">
            <text:p>587.4415893555</text:p>
          </table:table-cell>
          <table:table-cell office:value-type="float" office:value="0.03305181">
            <text:p>0.03305181</text:p>
          </table:table-cell>
          <table:table-cell table:number-columns-repeated="4"/>
        </table:table-row>
        <table:table-row table:style-name="ro1">
          <table:table-cell office:value-type="float" office:value="587.560180664063">
            <text:p>587.5601806641</text:p>
          </table:table-cell>
          <table:table-cell office:value-type="float" office:value="0.01486064">
            <text:p>0.01486064</text:p>
          </table:table-cell>
          <table:table-cell table:number-columns-repeated="4"/>
        </table:table-row>
        <table:table-row table:style-name="ro1">
          <table:table-cell office:value-type="float" office:value="587.678833007813">
            <text:p>587.6788330078</text:p>
          </table:table-cell>
          <table:table-cell office:value-type="float" office:value="0.02524306">
            <text:p>0.02524306</text:p>
          </table:table-cell>
          <table:table-cell table:number-columns-repeated="4"/>
        </table:table-row>
        <table:table-row table:style-name="ro1">
          <table:table-cell office:value-type="float" office:value="587.797424316406">
            <text:p>587.7974243164</text:p>
          </table:table-cell>
          <table:table-cell office:value-type="float" office:value="0.03101397">
            <text:p>0.03101397</text:p>
          </table:table-cell>
          <table:table-cell table:number-columns-repeated="4"/>
        </table:table-row>
        <table:table-row table:style-name="ro1">
          <table:table-cell office:value-type="float" office:value="587.916076660156">
            <text:p>587.9160766602</text:p>
          </table:table-cell>
          <table:table-cell office:value-type="float" office:value="0.03482605">
            <text:p>0.03482605</text:p>
          </table:table-cell>
          <table:table-cell table:number-columns-repeated="4"/>
        </table:table-row>
        <table:table-row table:style-name="ro1">
          <table:table-cell office:value-type="float" office:value="588.034729003906">
            <text:p>588.0347290039</text:p>
          </table:table-cell>
          <table:table-cell office:value-type="float" office:value="0.02565947">
            <text:p>0.02565947</text:p>
          </table:table-cell>
          <table:table-cell table:number-columns-repeated="4"/>
        </table:table-row>
        <table:table-row table:style-name="ro1">
          <table:table-cell office:value-type="float" office:value="588.153381347656">
            <text:p>588.1533813477</text:p>
          </table:table-cell>
          <table:table-cell office:value-type="float" office:value="0.02652668">
            <text:p>0.02652668</text:p>
          </table:table-cell>
          <table:table-cell table:number-columns-repeated="4"/>
        </table:table-row>
        <table:table-row table:style-name="ro1">
          <table:table-cell office:value-type="float" office:value="588.272033691406">
            <text:p>588.2720336914</text:p>
          </table:table-cell>
          <table:table-cell office:value-type="float" office:value="0.02740292">
            <text:p>0.02740292</text:p>
          </table:table-cell>
          <table:table-cell table:number-columns-repeated="4"/>
        </table:table-row>
        <table:table-row table:style-name="ro1">
          <table:table-cell office:value-type="float" office:value="588.390686035156">
            <text:p>588.3906860352</text:p>
          </table:table-cell>
          <table:table-cell office:value-type="float" office:value="0.03800187">
            <text:p>0.03800187</text:p>
          </table:table-cell>
          <table:table-cell table:number-columns-repeated="4"/>
        </table:table-row>
        <table:table-row table:style-name="ro1">
          <table:table-cell office:value-type="float" office:value="588.509338378906">
            <text:p>588.5093383789</text:p>
          </table:table-cell>
          <table:table-cell office:value-type="float" office:value="0.02415891">
            <text:p>0.02415891</text:p>
          </table:table-cell>
          <table:table-cell table:number-columns-repeated="4"/>
        </table:table-row>
        <table:table-row table:style-name="ro1">
          <table:table-cell office:value-type="float" office:value="588.627990722656">
            <text:p>588.6279907227</text:p>
          </table:table-cell>
          <table:table-cell office:value-type="float" office:value="0.01908563">
            <text:p>0.01908563</text:p>
          </table:table-cell>
          <table:table-cell table:number-columns-repeated="4"/>
        </table:table-row>
        <table:table-row table:style-name="ro1">
          <table:table-cell office:value-type="float" office:value="588.746643066406">
            <text:p>588.7466430664</text:p>
          </table:table-cell>
          <table:table-cell office:value-type="float" office:value="0.01651735">
            <text:p>0.01651735</text:p>
          </table:table-cell>
          <table:table-cell table:number-columns-repeated="4"/>
        </table:table-row>
        <table:table-row table:style-name="ro1">
          <table:table-cell office:value-type="float" office:value="588.865295410156">
            <text:p>588.8652954102</text:p>
          </table:table-cell>
          <table:table-cell office:value-type="float" office:value="0.02271336">
            <text:p>0.02271336</text:p>
          </table:table-cell>
          <table:table-cell table:number-columns-repeated="4"/>
        </table:table-row>
        <table:table-row table:style-name="ro1">
          <table:table-cell office:value-type="float" office:value="588.983947753906">
            <text:p>588.9839477539</text:p>
          </table:table-cell>
          <table:table-cell office:value-type="float" office:value="0.01806302">
            <text:p>0.01806302</text:p>
          </table:table-cell>
          <table:table-cell table:number-columns-repeated="4"/>
        </table:table-row>
        <table:table-row table:style-name="ro1">
          <table:table-cell office:value-type="float" office:value="589.102600097656">
            <text:p>589.1026000977</text:p>
          </table:table-cell>
          <table:table-cell office:value-type="float" office:value="0.03036013">
            <text:p>0.03036013</text:p>
          </table:table-cell>
          <table:table-cell table:number-columns-repeated="4"/>
        </table:table-row>
        <table:table-row table:style-name="ro1">
          <table:table-cell office:value-type="float" office:value="589.221252441406">
            <text:p>589.2212524414</text:p>
          </table:table-cell>
          <table:table-cell office:value-type="float" office:value="0.0151944">
            <text:p>0.0151944</text:p>
          </table:table-cell>
          <table:table-cell table:number-columns-repeated="4"/>
        </table:table-row>
        <table:table-row table:style-name="ro1">
          <table:table-cell office:value-type="float" office:value="589.339904785156">
            <text:p>589.3399047852</text:p>
          </table:table-cell>
          <table:table-cell office:value-type="float" office:value="0.01980762">
            <text:p>0.01980762</text:p>
          </table:table-cell>
          <table:table-cell table:number-columns-repeated="4"/>
        </table:table-row>
        <table:table-row table:style-name="ro1">
          <table:table-cell office:value-type="float" office:value="589.458618164063">
            <text:p>589.4586181641</text:p>
          </table:table-cell>
          <table:table-cell office:value-type="float" office:value="0.01861841">
            <text:p>0.01861841</text:p>
          </table:table-cell>
          <table:table-cell table:number-columns-repeated="4"/>
        </table:table-row>
        <table:table-row table:style-name="ro1">
          <table:table-cell office:value-type="float" office:value="589.577270507813">
            <text:p>589.5772705078</text:p>
          </table:table-cell>
          <table:table-cell office:value-type="float" office:value="0.01348861">
            <text:p>0.01348861</text:p>
          </table:table-cell>
          <table:table-cell table:number-columns-repeated="4"/>
        </table:table-row>
        <table:table-row table:style-name="ro1">
          <table:table-cell office:value-type="float" office:value="589.695922851563">
            <text:p>589.6959228516</text:p>
          </table:table-cell>
          <table:table-cell office:value-type="float" office:value="0.02901945">
            <text:p>0.02901945</text:p>
          </table:table-cell>
          <table:table-cell table:number-columns-repeated="4"/>
        </table:table-row>
        <table:table-row table:style-name="ro1">
          <table:table-cell office:value-type="float" office:value="589.814636230469">
            <text:p>589.8146362305</text:p>
          </table:table-cell>
          <table:table-cell office:value-type="float" office:value="0.01449715">
            <text:p>0.01449715</text:p>
          </table:table-cell>
          <table:table-cell table:number-columns-repeated="4"/>
        </table:table-row>
        <table:table-row table:style-name="ro1">
          <table:table-cell office:value-type="float" office:value="589.933288574219">
            <text:p>589.9332885742</text:p>
          </table:table-cell>
          <table:table-cell office:value-type="float" office:value="0.02256965">
            <text:p>0.02256965</text:p>
          </table:table-cell>
          <table:table-cell table:number-columns-repeated="4"/>
        </table:table-row>
        <table:table-row table:style-name="ro1">
          <table:table-cell office:value-type="float" office:value="590.052001953125">
            <text:p>590.0520019531</text:p>
          </table:table-cell>
          <table:table-cell office:value-type="float" office:value="0.01731732">
            <text:p>0.01731732</text:p>
          </table:table-cell>
          <table:table-cell table:number-columns-repeated="4"/>
        </table:table-row>
        <table:table-row table:style-name="ro1">
          <table:table-cell office:value-type="float" office:value="590.170654296875">
            <text:p>590.1706542969</text:p>
          </table:table-cell>
          <table:table-cell office:value-type="float" office:value="0.02282189">
            <text:p>0.02282189</text:p>
          </table:table-cell>
          <table:table-cell table:number-columns-repeated="4"/>
        </table:table-row>
        <table:table-row table:style-name="ro1">
          <table:table-cell office:value-type="float" office:value="590.289367675781">
            <text:p>590.2893676758</text:p>
          </table:table-cell>
          <table:table-cell office:value-type="float" office:value="0.01334877">
            <text:p>0.01334877</text:p>
          </table:table-cell>
          <table:table-cell table:number-columns-repeated="4"/>
        </table:table-row>
        <table:table-row table:style-name="ro1">
          <table:table-cell office:value-type="float" office:value="590.408020019531">
            <text:p>590.4080200195</text:p>
          </table:table-cell>
          <table:table-cell office:value-type="float" office:value="0.06305735">
            <text:p>0.06305735</text:p>
          </table:table-cell>
          <table:table-cell table:number-columns-repeated="4"/>
        </table:table-row>
        <table:table-row table:style-name="ro1">
          <table:table-cell office:value-type="float" office:value="590.526733398438">
            <text:p>590.5267333984</text:p>
          </table:table-cell>
          <table:table-cell office:value-type="float" office:value="0.02918423">
            <text:p>0.02918423</text:p>
          </table:table-cell>
          <table:table-cell table:number-columns-repeated="4"/>
        </table:table-row>
        <table:table-row table:style-name="ro1">
          <table:table-cell office:value-type="float" office:value="590.645446777344">
            <text:p>590.6454467773</text:p>
          </table:table-cell>
          <table:table-cell office:value-type="float" office:value="0.01546095">
            <text:p>0.01546095</text:p>
          </table:table-cell>
          <table:table-cell table:number-columns-repeated="4"/>
        </table:table-row>
        <table:table-row table:style-name="ro1">
          <table:table-cell office:value-type="float" office:value="590.764099121094">
            <text:p>590.7640991211</text:p>
          </table:table-cell>
          <table:table-cell office:value-type="float" office:value="0.01817361">
            <text:p>0.01817361</text:p>
          </table:table-cell>
          <table:table-cell table:number-columns-repeated="4"/>
        </table:table-row>
        <table:table-row table:style-name="ro1">
          <table:table-cell office:value-type="float" office:value="590.8828125">
            <text:p>590.8828125</text:p>
          </table:table-cell>
          <table:table-cell office:value-type="float" office:value="0.02864543">
            <text:p>0.02864543</text:p>
          </table:table-cell>
          <table:table-cell table:number-columns-repeated="4"/>
        </table:table-row>
        <table:table-row table:style-name="ro1">
          <table:table-cell office:value-type="float" office:value="591.001525878906">
            <text:p>591.0015258789</text:p>
          </table:table-cell>
          <table:table-cell office:value-type="float" office:value="0.03033371">
            <text:p>0.03033371</text:p>
          </table:table-cell>
          <table:table-cell table:number-columns-repeated="4"/>
        </table:table-row>
        <table:table-row table:style-name="ro1">
          <table:table-cell office:value-type="float" office:value="591.120239257813">
            <text:p>591.1202392578</text:p>
          </table:table-cell>
          <table:table-cell office:value-type="float" office:value="0.01550488">
            <text:p>0.01550488</text:p>
          </table:table-cell>
          <table:table-cell table:number-columns-repeated="4"/>
        </table:table-row>
        <table:table-row table:style-name="ro1">
          <table:table-cell office:value-type="float" office:value="591.238891601563">
            <text:p>591.2388916016</text:p>
          </table:table-cell>
          <table:table-cell office:value-type="float" office:value="0.01466001">
            <text:p>0.01466001</text:p>
          </table:table-cell>
          <table:table-cell table:number-columns-repeated="4"/>
        </table:table-row>
        <table:table-row table:style-name="ro1">
          <table:table-cell office:value-type="float" office:value="591.357604980469">
            <text:p>591.3576049805</text:p>
          </table:table-cell>
          <table:table-cell office:value-type="float" office:value="0.02687687">
            <text:p>0.02687687</text:p>
          </table:table-cell>
          <table:table-cell table:number-columns-repeated="4"/>
        </table:table-row>
        <table:table-row table:style-name="ro1">
          <table:table-cell office:value-type="float" office:value="591.476318359375">
            <text:p>591.4763183594</text:p>
          </table:table-cell>
          <table:table-cell office:value-type="float" office:value="0.01734396">
            <text:p>0.01734396</text:p>
          </table:table-cell>
          <table:table-cell table:number-columns-repeated="4"/>
        </table:table-row>
        <table:table-row table:style-name="ro1">
          <table:table-cell office:value-type="float" office:value="591.595031738281">
            <text:p>591.5950317383</text:p>
          </table:table-cell>
          <table:table-cell office:value-type="float" office:value="0.03402841">
            <text:p>0.03402841</text:p>
          </table:table-cell>
          <table:table-cell table:number-columns-repeated="4"/>
        </table:table-row>
        <table:table-row table:style-name="ro1">
          <table:table-cell office:value-type="float" office:value="591.713745117188">
            <text:p>591.7137451172</text:p>
          </table:table-cell>
          <table:table-cell office:value-type="float" office:value="0.02040541">
            <text:p>0.02040541</text:p>
          </table:table-cell>
          <table:table-cell table:number-columns-repeated="4"/>
        </table:table-row>
        <table:table-row table:style-name="ro1">
          <table:table-cell office:value-type="float" office:value="591.832458496094">
            <text:p>591.8324584961</text:p>
          </table:table-cell>
          <table:table-cell office:value-type="float" office:value="0.03389976">
            <text:p>0.03389976</text:p>
          </table:table-cell>
          <table:table-cell table:number-columns-repeated="4"/>
        </table:table-row>
        <table:table-row table:style-name="ro1">
          <table:table-cell office:value-type="float" office:value="591.951232910156">
            <text:p>591.9512329102</text:p>
          </table:table-cell>
          <table:table-cell office:value-type="float" office:value="0.02015917">
            <text:p>0.02015917</text:p>
          </table:table-cell>
          <table:table-cell table:number-columns-repeated="4"/>
        </table:table-row>
        <table:table-row table:style-name="ro1">
          <table:table-cell office:value-type="float" office:value="592.069946289063">
            <text:p>592.0699462891</text:p>
          </table:table-cell>
          <table:table-cell office:value-type="float" office:value="0.02523845">
            <text:p>0.02523845</text:p>
          </table:table-cell>
          <table:table-cell table:number-columns-repeated="4"/>
        </table:table-row>
        <table:table-row table:style-name="ro1">
          <table:table-cell office:value-type="float" office:value="592.188659667969">
            <text:p>592.188659668</text:p>
          </table:table-cell>
          <table:table-cell office:value-type="float" office:value="0.0137069">
            <text:p>0.0137069</text:p>
          </table:table-cell>
          <table:table-cell table:number-columns-repeated="4"/>
        </table:table-row>
        <table:table-row table:style-name="ro1">
          <table:table-cell office:value-type="float" office:value="592.307373046875">
            <text:p>592.3073730469</text:p>
          </table:table-cell>
          <table:table-cell office:value-type="float" office:value="0.01511117">
            <text:p>0.01511117</text:p>
          </table:table-cell>
          <table:table-cell table:number-columns-repeated="4"/>
        </table:table-row>
        <table:table-row table:style-name="ro1">
          <table:table-cell office:value-type="float" office:value="592.426086425781">
            <text:p>592.4260864258</text:p>
          </table:table-cell>
          <table:table-cell office:value-type="float" office:value="0.03947297">
            <text:p>0.03947297</text:p>
          </table:table-cell>
          <table:table-cell table:number-columns-repeated="4"/>
        </table:table-row>
        <table:table-row table:style-name="ro1">
          <table:table-cell office:value-type="float" office:value="592.544860839844">
            <text:p>592.5448608398</text:p>
          </table:table-cell>
          <table:table-cell office:value-type="float" office:value="0.01531957">
            <text:p>0.01531957</text:p>
          </table:table-cell>
          <table:table-cell table:number-columns-repeated="4"/>
        </table:table-row>
        <table:table-row table:style-name="ro1">
          <table:table-cell office:value-type="float" office:value="592.66357421875">
            <text:p>592.6635742188</text:p>
          </table:table-cell>
          <table:table-cell office:value-type="float" office:value="0.01291548">
            <text:p>0.01291548</text:p>
          </table:table-cell>
          <table:table-cell table:number-columns-repeated="4"/>
        </table:table-row>
        <table:table-row table:style-name="ro1">
          <table:table-cell office:value-type="float" office:value="592.782348632813">
            <text:p>592.7823486328</text:p>
          </table:table-cell>
          <table:table-cell office:value-type="float" office:value="0.01270805">
            <text:p>0.01270805</text:p>
          </table:table-cell>
          <table:table-cell table:number-columns-repeated="4"/>
        </table:table-row>
        <table:table-row table:style-name="ro1">
          <table:table-cell office:value-type="float" office:value="592.901062011719">
            <text:p>592.9010620117</text:p>
          </table:table-cell>
          <table:table-cell office:value-type="float" office:value="0.01825881">
            <text:p>0.01825881</text:p>
          </table:table-cell>
          <table:table-cell table:number-columns-repeated="4"/>
        </table:table-row>
        <table:table-row table:style-name="ro1">
          <table:table-cell office:value-type="float" office:value="593.019775390625">
            <text:p>593.0197753906</text:p>
          </table:table-cell>
          <table:table-cell office:value-type="float" office:value="0.0132872">
            <text:p>0.0132872</text:p>
          </table:table-cell>
          <table:table-cell table:number-columns-repeated="4"/>
        </table:table-row>
        <table:table-row table:style-name="ro1">
          <table:table-cell office:value-type="float" office:value="593.138549804688">
            <text:p>593.1385498047</text:p>
          </table:table-cell>
          <table:table-cell office:value-type="float" office:value="0.01029616">
            <text:p>0.01029616</text:p>
          </table:table-cell>
          <table:table-cell table:number-columns-repeated="4"/>
        </table:table-row>
        <table:table-row table:style-name="ro1">
          <table:table-cell office:value-type="float" office:value="593.257263183594">
            <text:p>593.2572631836</text:p>
          </table:table-cell>
          <table:table-cell office:value-type="float" office:value="0.008050467">
            <text:p>0.008050467</text:p>
          </table:table-cell>
          <table:table-cell table:number-columns-repeated="4"/>
        </table:table-row>
        <table:table-row table:style-name="ro1">
          <table:table-cell office:value-type="float" office:value="593.376037597656">
            <text:p>593.3760375977</text:p>
          </table:table-cell>
          <table:table-cell office:value-type="float" office:value="0.006226867">
            <text:p>0.006226867</text:p>
          </table:table-cell>
          <table:table-cell table:number-columns-repeated="4"/>
        </table:table-row>
        <table:table-row table:style-name="ro1">
          <table:table-cell office:value-type="float" office:value="593.494812011719">
            <text:p>593.4948120117</text:p>
          </table:table-cell>
          <table:table-cell office:value-type="float" office:value="0.02387751">
            <text:p>0.02387751</text:p>
          </table:table-cell>
          <table:table-cell table:number-columns-repeated="4"/>
        </table:table-row>
        <table:table-row table:style-name="ro1">
          <table:table-cell office:value-type="float" office:value="593.613525390625">
            <text:p>593.6135253906</text:p>
          </table:table-cell>
          <table:table-cell office:value-type="float" office:value="0.01147623">
            <text:p>0.01147623</text:p>
          </table:table-cell>
          <table:table-cell table:number-columns-repeated="4"/>
        </table:table-row>
        <table:table-row table:style-name="ro1">
          <table:table-cell office:value-type="float" office:value="593.732299804688">
            <text:p>593.7322998047</text:p>
          </table:table-cell>
          <table:table-cell office:value-type="float" office:value="0.01464484">
            <text:p>0.01464484</text:p>
          </table:table-cell>
          <table:table-cell table:number-columns-repeated="4"/>
        </table:table-row>
        <table:table-row table:style-name="ro1">
          <table:table-cell office:value-type="float" office:value="593.85107421875">
            <text:p>593.8510742188</text:p>
          </table:table-cell>
          <table:table-cell office:value-type="float" office:value="0.0158626">
            <text:p>0.0158626</text:p>
          </table:table-cell>
          <table:table-cell table:number-columns-repeated="4"/>
        </table:table-row>
        <table:table-row table:style-name="ro1">
          <table:table-cell office:value-type="float" office:value="593.969848632813">
            <text:p>593.9698486328</text:p>
          </table:table-cell>
          <table:table-cell office:value-type="float" office:value="0.01379484">
            <text:p>0.01379484</text:p>
          </table:table-cell>
          <table:table-cell table:number-columns-repeated="4"/>
        </table:table-row>
        <table:table-row table:style-name="ro1">
          <table:table-cell office:value-type="float" office:value="594.088562011719">
            <text:p>594.0885620117</text:p>
          </table:table-cell>
          <table:table-cell office:value-type="float" office:value="0.0123385">
            <text:p>0.0123385</text:p>
          </table:table-cell>
          <table:table-cell table:number-columns-repeated="4"/>
        </table:table-row>
        <table:table-row table:style-name="ro1">
          <table:table-cell office:value-type="float" office:value="594.207336425781">
            <text:p>594.2073364258</text:p>
          </table:table-cell>
          <table:table-cell office:value-type="float" office:value="0.01584408">
            <text:p>0.01584408</text:p>
          </table:table-cell>
          <table:table-cell table:number-columns-repeated="4"/>
        </table:table-row>
        <table:table-row table:style-name="ro1">
          <table:table-cell office:value-type="float" office:value="594.326110839844">
            <text:p>594.3261108398</text:p>
          </table:table-cell>
          <table:table-cell office:value-type="float" office:value="0.02167474">
            <text:p>0.02167474</text:p>
          </table:table-cell>
          <table:table-cell table:number-columns-repeated="4"/>
        </table:table-row>
        <table:table-row table:style-name="ro1">
          <table:table-cell office:value-type="float" office:value="594.444885253906">
            <text:p>594.4448852539</text:p>
          </table:table-cell>
          <table:table-cell office:value-type="float" office:value="0.01019979">
            <text:p>0.01019979</text:p>
          </table:table-cell>
          <table:table-cell table:number-columns-repeated="4"/>
        </table:table-row>
        <table:table-row table:style-name="ro1">
          <table:table-cell office:value-type="float" office:value="594.563659667969">
            <text:p>594.563659668</text:p>
          </table:table-cell>
          <table:table-cell office:value-type="float" office:value="0.01473024">
            <text:p>0.01473024</text:p>
          </table:table-cell>
          <table:table-cell table:number-columns-repeated="4"/>
        </table:table-row>
        <table:table-row table:style-name="ro1">
          <table:table-cell office:value-type="float" office:value="594.682434082031">
            <text:p>594.682434082</text:p>
          </table:table-cell>
          <table:table-cell office:value-type="float" office:value="0.01955972">
            <text:p>0.01955972</text:p>
          </table:table-cell>
          <table:table-cell table:number-columns-repeated="4"/>
        </table:table-row>
        <table:table-row table:style-name="ro1">
          <table:table-cell office:value-type="float" office:value="594.801208496094">
            <text:p>594.8012084961</text:p>
          </table:table-cell>
          <table:table-cell office:value-type="float" office:value="0.01602711">
            <text:p>0.01602711</text:p>
          </table:table-cell>
          <table:table-cell table:number-columns-repeated="4"/>
        </table:table-row>
        <table:table-row table:style-name="ro1">
          <table:table-cell office:value-type="float" office:value="594.919982910156">
            <text:p>594.9199829102</text:p>
          </table:table-cell>
          <table:table-cell office:value-type="float" office:value="0.01316122">
            <text:p>0.01316122</text:p>
          </table:table-cell>
          <table:table-cell table:number-columns-repeated="4"/>
        </table:table-row>
        <table:table-row table:style-name="ro1">
          <table:table-cell office:value-type="float" office:value="595.038818359375">
            <text:p>595.0388183594</text:p>
          </table:table-cell>
          <table:table-cell office:value-type="float" office:value="0.01829125">
            <text:p>0.01829125</text:p>
          </table:table-cell>
          <table:table-cell table:number-columns-repeated="4"/>
        </table:table-row>
        <table:table-row table:style-name="ro1">
          <table:table-cell office:value-type="float" office:value="595.157592773438">
            <text:p>595.1575927734</text:p>
          </table:table-cell>
          <table:table-cell office:value-type="float" office:value="0.030059">
            <text:p>0.030059</text:p>
          </table:table-cell>
          <table:table-cell table:number-columns-repeated="4"/>
        </table:table-row>
        <table:table-row table:style-name="ro1">
          <table:table-cell office:value-type="float" office:value="595.2763671875">
            <text:p>595.2763671875</text:p>
          </table:table-cell>
          <table:table-cell office:value-type="float" office:value="0.04427752">
            <text:p>0.04427752</text:p>
          </table:table-cell>
          <table:table-cell table:number-columns-repeated="4"/>
        </table:table-row>
        <table:table-row table:style-name="ro1">
          <table:table-cell office:value-type="float" office:value="595.395141601563">
            <text:p>595.3951416016</text:p>
          </table:table-cell>
          <table:table-cell office:value-type="float" office:value="0.01835009">
            <text:p>0.01835009</text:p>
          </table:table-cell>
          <table:table-cell table:number-columns-repeated="4"/>
        </table:table-row>
        <table:table-row table:style-name="ro1">
          <table:table-cell office:value-type="float" office:value="595.513916015625">
            <text:p>595.5139160156</text:p>
          </table:table-cell>
          <table:table-cell office:value-type="float" office:value="0.02809868">
            <text:p>0.02809868</text:p>
          </table:table-cell>
          <table:table-cell table:number-columns-repeated="4"/>
        </table:table-row>
        <table:table-row table:style-name="ro1">
          <table:table-cell office:value-type="float" office:value="595.632751464844">
            <text:p>595.6327514648</text:p>
          </table:table-cell>
          <table:table-cell office:value-type="float" office:value="0.009996756">
            <text:p>0.009996756</text:p>
          </table:table-cell>
          <table:table-cell table:number-columns-repeated="4"/>
        </table:table-row>
        <table:table-row table:style-name="ro1">
          <table:table-cell office:value-type="float" office:value="595.751525878906">
            <text:p>595.7515258789</text:p>
          </table:table-cell>
          <table:table-cell office:value-type="float" office:value="0.01541273">
            <text:p>0.01541273</text:p>
          </table:table-cell>
          <table:table-cell table:number-columns-repeated="4"/>
        </table:table-row>
        <table:table-row table:style-name="ro1">
          <table:table-cell office:value-type="float" office:value="595.870361328125">
            <text:p>595.8703613281</text:p>
          </table:table-cell>
          <table:table-cell office:value-type="float" office:value="0.0133891">
            <text:p>0.0133891</text:p>
          </table:table-cell>
          <table:table-cell table:number-columns-repeated="4"/>
        </table:table-row>
        <table:table-row table:style-name="ro1">
          <table:table-cell office:value-type="float" office:value="595.989135742188">
            <text:p>595.9891357422</text:p>
          </table:table-cell>
          <table:table-cell office:value-type="float" office:value="0.02358138">
            <text:p>0.02358138</text:p>
          </table:table-cell>
          <table:table-cell table:number-columns-repeated="4"/>
        </table:table-row>
        <table:table-row table:style-name="ro1">
          <table:table-cell office:value-type="float" office:value="596.107971191406">
            <text:p>596.1079711914</text:p>
          </table:table-cell>
          <table:table-cell office:value-type="float" office:value="0.01682421">
            <text:p>0.01682421</text:p>
          </table:table-cell>
          <table:table-cell table:number-columns-repeated="4"/>
        </table:table-row>
        <table:table-row table:style-name="ro1">
          <table:table-cell office:value-type="float" office:value="596.226745605469">
            <text:p>596.2267456055</text:p>
          </table:table-cell>
          <table:table-cell office:value-type="float" office:value="0.02095138">
            <text:p>0.02095138</text:p>
          </table:table-cell>
          <table:table-cell table:number-columns-repeated="4"/>
        </table:table-row>
        <table:table-row table:style-name="ro1">
          <table:table-cell office:value-type="float" office:value="596.345581054688">
            <text:p>596.3455810547</text:p>
          </table:table-cell>
          <table:table-cell office:value-type="float" office:value="0.01443573">
            <text:p>0.01443573</text:p>
          </table:table-cell>
          <table:table-cell table:number-columns-repeated="4"/>
        </table:table-row>
        <table:table-row table:style-name="ro1">
          <table:table-cell office:value-type="float" office:value="596.46435546875">
            <text:p>596.4643554688</text:p>
          </table:table-cell>
          <table:table-cell office:value-type="float" office:value="0.0315033">
            <text:p>0.0315033</text:p>
          </table:table-cell>
          <table:table-cell table:number-columns-repeated="4"/>
        </table:table-row>
        <table:table-row table:style-name="ro1">
          <table:table-cell office:value-type="float" office:value="596.583190917969">
            <text:p>596.583190918</text:p>
          </table:table-cell>
          <table:table-cell office:value-type="float" office:value="0.0143443">
            <text:p>0.0143443</text:p>
          </table:table-cell>
          <table:table-cell table:number-columns-repeated="4"/>
        </table:table-row>
        <table:table-row table:style-name="ro1">
          <table:table-cell office:value-type="float" office:value="596.702026367188">
            <text:p>596.7020263672</text:p>
          </table:table-cell>
          <table:table-cell office:value-type="float" office:value="0.01983114">
            <text:p>0.01983114</text:p>
          </table:table-cell>
          <table:table-cell table:number-columns-repeated="4"/>
        </table:table-row>
        <table:table-row table:style-name="ro1">
          <table:table-cell office:value-type="float" office:value="596.82080078125">
            <text:p>596.8208007813</text:p>
          </table:table-cell>
          <table:table-cell office:value-type="float" office:value="0.01622242">
            <text:p>0.01622242</text:p>
          </table:table-cell>
          <table:table-cell table:number-columns-repeated="4"/>
        </table:table-row>
        <table:table-row table:style-name="ro1">
          <table:table-cell office:value-type="float" office:value="596.939636230469">
            <text:p>596.9396362305</text:p>
          </table:table-cell>
          <table:table-cell office:value-type="float" office:value="0.01314775">
            <text:p>0.01314775</text:p>
          </table:table-cell>
          <table:table-cell table:number-columns-repeated="4"/>
        </table:table-row>
        <table:table-row table:style-name="ro1">
          <table:table-cell office:value-type="float" office:value="597.058471679688">
            <text:p>597.0584716797</text:p>
          </table:table-cell>
          <table:table-cell office:value-type="float" office:value="0.01734659">
            <text:p>0.01734659</text:p>
          </table:table-cell>
          <table:table-cell table:number-columns-repeated="4"/>
        </table:table-row>
        <table:table-row table:style-name="ro1">
          <table:table-cell office:value-type="float" office:value="597.177307128906">
            <text:p>597.1773071289</text:p>
          </table:table-cell>
          <table:table-cell office:value-type="float" office:value="0.01466519">
            <text:p>0.01466519</text:p>
          </table:table-cell>
          <table:table-cell table:number-columns-repeated="4"/>
        </table:table-row>
        <table:table-row table:style-name="ro1">
          <table:table-cell office:value-type="float" office:value="597.296142578125">
            <text:p>597.2961425781</text:p>
          </table:table-cell>
          <table:table-cell office:value-type="float" office:value="0.02954448">
            <text:p>0.02954448</text:p>
          </table:table-cell>
          <table:table-cell table:number-columns-repeated="4"/>
        </table:table-row>
        <table:table-row table:style-name="ro1">
          <table:table-cell office:value-type="float" office:value="597.414978027344">
            <text:p>597.4149780273</text:p>
          </table:table-cell>
          <table:table-cell office:value-type="float" office:value="0.0143493">
            <text:p>0.0143493</text:p>
          </table:table-cell>
          <table:table-cell table:number-columns-repeated="4"/>
        </table:table-row>
        <table:table-row table:style-name="ro1">
          <table:table-cell office:value-type="float" office:value="597.533752441406">
            <text:p>597.5337524414</text:p>
          </table:table-cell>
          <table:table-cell office:value-type="float" office:value="0.009194088">
            <text:p>0.009194088</text:p>
          </table:table-cell>
          <table:table-cell table:number-columns-repeated="4"/>
        </table:table-row>
        <table:table-row table:style-name="ro1">
          <table:table-cell office:value-type="float" office:value="597.652587890625">
            <text:p>597.6525878906</text:p>
          </table:table-cell>
          <table:table-cell office:value-type="float" office:value="0.04249223">
            <text:p>0.04249223</text:p>
          </table:table-cell>
          <table:table-cell table:number-columns-repeated="4"/>
        </table:table-row>
        <table:table-row table:style-name="ro1">
          <table:table-cell office:value-type="float" office:value="597.771423339844">
            <text:p>597.7714233398</text:p>
          </table:table-cell>
          <table:table-cell office:value-type="float" office:value="0.01959391">
            <text:p>0.01959391</text:p>
          </table:table-cell>
          <table:table-cell table:number-columns-repeated="4"/>
        </table:table-row>
        <table:table-row table:style-name="ro1">
          <table:table-cell office:value-type="float" office:value="597.890319824219">
            <text:p>597.8903198242</text:p>
          </table:table-cell>
          <table:table-cell office:value-type="float" office:value="0.02316239">
            <text:p>0.02316239</text:p>
          </table:table-cell>
          <table:table-cell table:number-columns-repeated="4"/>
        </table:table-row>
        <table:table-row table:style-name="ro1">
          <table:table-cell office:value-type="float" office:value="598.009155273438">
            <text:p>598.0091552734</text:p>
          </table:table-cell>
          <table:table-cell office:value-type="float" office:value="0.01533452">
            <text:p>0.01533452</text:p>
          </table:table-cell>
          <table:table-cell table:number-columns-repeated="4"/>
        </table:table-row>
        <table:table-row table:style-name="ro1">
          <table:table-cell office:value-type="float" office:value="598.127990722656">
            <text:p>598.1279907227</text:p>
          </table:table-cell>
          <table:table-cell office:value-type="float" office:value="0.01043026">
            <text:p>0.01043026</text:p>
          </table:table-cell>
          <table:table-cell table:number-columns-repeated="4"/>
        </table:table-row>
        <table:table-row table:style-name="ro1">
          <table:table-cell office:value-type="float" office:value="598.246826171875">
            <text:p>598.2468261719</text:p>
          </table:table-cell>
          <table:table-cell office:value-type="float" office:value="0.02425278">
            <text:p>0.02425278</text:p>
          </table:table-cell>
          <table:table-cell table:number-columns-repeated="4"/>
        </table:table-row>
        <table:table-row table:style-name="ro1">
          <table:table-cell office:value-type="float" office:value="598.365661621094">
            <text:p>598.3656616211</text:p>
          </table:table-cell>
          <table:table-cell office:value-type="float" office:value="0.01864774">
            <text:p>0.01864774</text:p>
          </table:table-cell>
          <table:table-cell table:number-columns-repeated="4"/>
        </table:table-row>
        <table:table-row table:style-name="ro1">
          <table:table-cell office:value-type="float" office:value="598.484497070313">
            <text:p>598.4844970703</text:p>
          </table:table-cell>
          <table:table-cell office:value-type="float" office:value="0.01491098">
            <text:p>0.01491098</text:p>
          </table:table-cell>
          <table:table-cell table:number-columns-repeated="4"/>
        </table:table-row>
        <table:table-row table:style-name="ro1">
          <table:table-cell office:value-type="float" office:value="598.603393554688">
            <text:p>598.6033935547</text:p>
          </table:table-cell>
          <table:table-cell office:value-type="float" office:value="0.02366212">
            <text:p>0.02366212</text:p>
          </table:table-cell>
          <table:table-cell table:number-columns-repeated="4"/>
        </table:table-row>
        <table:table-row table:style-name="ro1">
          <table:table-cell office:value-type="float" office:value="598.722229003906">
            <text:p>598.7222290039</text:p>
          </table:table-cell>
          <table:table-cell office:value-type="float" office:value="0.01030602">
            <text:p>0.01030602</text:p>
          </table:table-cell>
          <table:table-cell table:number-columns-repeated="4"/>
        </table:table-row>
        <table:table-row table:style-name="ro1">
          <table:table-cell office:value-type="float" office:value="598.841064453125">
            <text:p>598.8410644531</text:p>
          </table:table-cell>
          <table:table-cell office:value-type="float" office:value="0.01396147">
            <text:p>0.01396147</text:p>
          </table:table-cell>
          <table:table-cell table:number-columns-repeated="4"/>
        </table:table-row>
        <table:table-row table:style-name="ro1">
          <table:table-cell office:value-type="float" office:value="598.9599609375">
            <text:p>598.9599609375</text:p>
          </table:table-cell>
          <table:table-cell office:value-type="float" office:value="0.02729101">
            <text:p>0.02729101</text:p>
          </table:table-cell>
          <table:table-cell table:number-columns-repeated="4"/>
        </table:table-row>
        <table:table-row table:style-name="ro1">
          <table:table-cell office:value-type="float" office:value="599.078796386719">
            <text:p>599.0787963867</text:p>
          </table:table-cell>
          <table:table-cell office:value-type="float" office:value="0.02680553">
            <text:p>0.02680553</text:p>
          </table:table-cell>
          <table:table-cell table:number-columns-repeated="4"/>
        </table:table-row>
        <table:table-row table:style-name="ro1">
          <table:table-cell office:value-type="float" office:value="599.197692871094">
            <text:p>599.1976928711</text:p>
          </table:table-cell>
          <table:table-cell office:value-type="float" office:value="0.01879757">
            <text:p>0.01879757</text:p>
          </table:table-cell>
          <table:table-cell table:number-columns-repeated="4"/>
        </table:table-row>
        <table:table-row table:style-name="ro1">
          <table:table-cell office:value-type="float" office:value="599.316528320313">
            <text:p>599.3165283203</text:p>
          </table:table-cell>
          <table:table-cell office:value-type="float" office:value="0.002777732">
            <text:p>0.002777732</text:p>
          </table:table-cell>
          <table:table-cell table:number-columns-repeated="4"/>
        </table:table-row>
        <table:table-row table:style-name="ro1">
          <table:table-cell office:value-type="float" office:value="599.435424804688">
            <text:p>599.4354248047</text:p>
          </table:table-cell>
          <table:table-cell office:value-type="float" office:value="0.02241419">
            <text:p>0.02241419</text:p>
          </table:table-cell>
          <table:table-cell table:number-columns-repeated="4"/>
        </table:table-row>
        <table:table-row table:style-name="ro1">
          <table:table-cell office:value-type="float" office:value="599.554321289063">
            <text:p>599.5543212891</text:p>
          </table:table-cell>
          <table:table-cell office:value-type="float" office:value="0.008353907">
            <text:p>0.008353907</text:p>
          </table:table-cell>
          <table:table-cell table:number-columns-repeated="4"/>
        </table:table-row>
        <table:table-row table:style-name="ro1">
          <table:table-cell office:value-type="float" office:value="599.673156738281">
            <text:p>599.6731567383</text:p>
          </table:table-cell>
          <table:table-cell office:value-type="float" office:value="0.01253947">
            <text:p>0.01253947</text:p>
          </table:table-cell>
          <table:table-cell table:number-columns-repeated="4"/>
        </table:table-row>
        <table:table-row table:style-name="ro1">
          <table:table-cell office:value-type="float" office:value="599.792053222656">
            <text:p>599.7920532227</text:p>
          </table:table-cell>
          <table:table-cell office:value-type="float" office:value="0.01846514">
            <text:p>0.01846514</text:p>
          </table:table-cell>
          <table:table-cell table:number-columns-repeated="4"/>
        </table:table-row>
        <table:table-row table:style-name="ro1">
          <table:table-cell office:value-type="float" office:value="599.910949707031">
            <text:p>599.910949707</text:p>
          </table:table-cell>
          <table:table-cell office:value-type="float" office:value="0.01992477">
            <text:p>0.01992477</text:p>
          </table:table-cell>
          <table:table-cell table:number-columns-repeated="4"/>
        </table:table-row>
        <table:table-row table:style-name="ro1">
          <table:table-cell office:value-type="float" office:value="600.02978515625">
            <text:p>600.0297851563</text:p>
          </table:table-cell>
          <table:table-cell office:value-type="float" office:value="0.01289506">
            <text:p>0.01289506</text:p>
          </table:table-cell>
          <table:table-cell table:number-columns-repeated="4"/>
        </table:table-row>
        <table:table-row table:style-name="ro1">
          <table:table-cell office:value-type="float" office:value="600.148681640625">
            <text:p>600.1486816406</text:p>
          </table:table-cell>
          <table:table-cell office:value-type="float" office:value="0.02043743">
            <text:p>0.02043743</text:p>
          </table:table-cell>
          <table:table-cell table:number-columns-repeated="4"/>
        </table:table-row>
        <table:table-row table:style-name="ro1">
          <table:table-cell office:value-type="float" office:value="600.267578125">
            <text:p>600.267578125</text:p>
          </table:table-cell>
          <table:table-cell office:value-type="float" office:value="0.01007273">
            <text:p>0.01007273</text:p>
          </table:table-cell>
          <table:table-cell table:number-columns-repeated="4"/>
        </table:table-row>
        <table:table-row table:style-name="ro1">
          <table:table-cell office:value-type="float" office:value="600.386474609375">
            <text:p>600.3864746094</text:p>
          </table:table-cell>
          <table:table-cell office:value-type="float" office:value="0.007447427">
            <text:p>0.007447427</text:p>
          </table:table-cell>
          <table:table-cell table:number-columns-repeated="4"/>
        </table:table-row>
        <table:table-row table:style-name="ro1">
          <table:table-cell office:value-type="float" office:value="600.50537109375">
            <text:p>600.5053710938</text:p>
          </table:table-cell>
          <table:table-cell office:value-type="float" office:value="0.03843553">
            <text:p>0.03843553</text:p>
          </table:table-cell>
          <table:table-cell table:number-columns-repeated="4"/>
        </table:table-row>
        <table:table-row table:style-name="ro1">
          <table:table-cell office:value-type="float" office:value="600.624267578125">
            <text:p>600.6242675781</text:p>
          </table:table-cell>
          <table:table-cell office:value-type="float" office:value="0.006428062">
            <text:p>0.006428062</text:p>
          </table:table-cell>
          <table:table-cell table:number-columns-repeated="4"/>
        </table:table-row>
        <table:table-row table:style-name="ro1">
          <table:table-cell office:value-type="float" office:value="600.7431640625">
            <text:p>600.7431640625</text:p>
          </table:table-cell>
          <table:table-cell office:value-type="float" office:value="0.01245218">
            <text:p>0.01245218</text:p>
          </table:table-cell>
          <table:table-cell table:number-columns-repeated="4"/>
        </table:table-row>
        <table:table-row table:style-name="ro1">
          <table:table-cell office:value-type="float" office:value="600.862060546875">
            <text:p>600.8620605469</text:p>
          </table:table-cell>
          <table:table-cell office:value-type="float" office:value="0.002116386">
            <text:p>0.002116386</text:p>
          </table:table-cell>
          <table:table-cell table:number-columns-repeated="4"/>
        </table:table-row>
        <table:table-row table:style-name="ro1">
          <table:table-cell office:value-type="float" office:value="600.98095703125">
            <text:p>600.9809570313</text:p>
          </table:table-cell>
          <table:table-cell office:value-type="float" office:value="0.01544272">
            <text:p>0.01544272</text:p>
          </table:table-cell>
          <table:table-cell table:number-columns-repeated="4"/>
        </table:table-row>
        <table:table-row table:style-name="ro1">
          <table:table-cell office:value-type="float" office:value="601.099853515625">
            <text:p>601.0998535156</text:p>
          </table:table-cell>
          <table:table-cell office:value-type="float" office:value="0.003376719">
            <text:p>0.003376719</text:p>
          </table:table-cell>
          <table:table-cell table:number-columns-repeated="4"/>
        </table:table-row>
        <table:table-row table:style-name="ro1">
          <table:table-cell office:value-type="float" office:value="601.21875">
            <text:p>601.21875</text:p>
          </table:table-cell>
          <table:table-cell office:value-type="float" office:value="0.01522415">
            <text:p>0.01522415</text:p>
          </table:table-cell>
          <table:table-cell table:number-columns-repeated="4"/>
        </table:table-row>
        <table:table-row table:style-name="ro1">
          <table:table-cell office:value-type="float" office:value="601.337646484375">
            <text:p>601.3376464844</text:p>
          </table:table-cell>
          <table:table-cell office:value-type="float" office:value="0.01559515">
            <text:p>0.01559515</text:p>
          </table:table-cell>
          <table:table-cell table:number-columns-repeated="4"/>
        </table:table-row>
        <table:table-row table:style-name="ro1">
          <table:table-cell office:value-type="float" office:value="601.45654296875">
            <text:p>601.4565429688</text:p>
          </table:table-cell>
          <table:table-cell office:value-type="float" office:value="0.01319575">
            <text:p>0.01319575</text:p>
          </table:table-cell>
          <table:table-cell table:number-columns-repeated="4"/>
        </table:table-row>
        <table:table-row table:style-name="ro1">
          <table:table-cell office:value-type="float" office:value="601.575500488281">
            <text:p>601.5755004883</text:p>
          </table:table-cell>
          <table:table-cell office:value-type="float" office:value="0.009778542">
            <text:p>0.009778542</text:p>
          </table:table-cell>
          <table:table-cell table:number-columns-repeated="4"/>
        </table:table-row>
        <table:table-row table:style-name="ro1">
          <table:table-cell office:value-type="float" office:value="601.694396972656">
            <text:p>601.6943969727</text:p>
          </table:table-cell>
          <table:table-cell office:value-type="float" office:value="0.0132329">
            <text:p>0.0132329</text:p>
          </table:table-cell>
          <table:table-cell table:number-columns-repeated="4"/>
        </table:table-row>
        <table:table-row table:style-name="ro1">
          <table:table-cell office:value-type="float" office:value="601.813293457031">
            <text:p>601.813293457</text:p>
          </table:table-cell>
          <table:table-cell office:value-type="float" office:value="0.01506309">
            <text:p>0.01506309</text:p>
          </table:table-cell>
          <table:table-cell table:number-columns-repeated="4"/>
        </table:table-row>
        <table:table-row table:style-name="ro1">
          <table:table-cell office:value-type="float" office:value="601.932250976563">
            <text:p>601.9322509766</text:p>
          </table:table-cell>
          <table:table-cell office:value-type="float" office:value="0.008385431">
            <text:p>0.008385431</text:p>
          </table:table-cell>
          <table:table-cell table:number-columns-repeated="4"/>
        </table:table-row>
        <table:table-row table:style-name="ro1">
          <table:table-cell office:value-type="float" office:value="602.051147460938">
            <text:p>602.0511474609</text:p>
          </table:table-cell>
          <table:table-cell office:value-type="float" office:value="0.01802858">
            <text:p>0.01802858</text:p>
          </table:table-cell>
          <table:table-cell table:number-columns-repeated="4"/>
        </table:table-row>
        <table:table-row table:style-name="ro1">
          <table:table-cell office:value-type="float" office:value="602.170043945313">
            <text:p>602.1700439453</text:p>
          </table:table-cell>
          <table:table-cell office:value-type="float" office:value="0.02161764">
            <text:p>0.02161764</text:p>
          </table:table-cell>
          <table:table-cell table:number-columns-repeated="4"/>
        </table:table-row>
        <table:table-row table:style-name="ro1">
          <table:table-cell office:value-type="float" office:value="602.289001464844">
            <text:p>602.2890014648</text:p>
          </table:table-cell>
          <table:table-cell office:value-type="float" office:value="0.002618929">
            <text:p>0.002618929</text:p>
          </table:table-cell>
          <table:table-cell table:number-columns-repeated="4"/>
        </table:table-row>
        <table:table-row table:style-name="ro1">
          <table:table-cell office:value-type="float" office:value="602.407897949219">
            <text:p>602.4078979492</text:p>
          </table:table-cell>
          <table:table-cell office:value-type="float" office:value="0.0158758">
            <text:p>0.0158758</text:p>
          </table:table-cell>
          <table:table-cell table:number-columns-repeated="4"/>
        </table:table-row>
        <table:table-row table:style-name="ro1">
          <table:table-cell office:value-type="float" office:value="602.52685546875">
            <text:p>602.5268554688</text:p>
          </table:table-cell>
          <table:table-cell office:value-type="float" office:value="0.0181216">
            <text:p>0.0181216</text:p>
          </table:table-cell>
          <table:table-cell table:number-columns-repeated="4"/>
        </table:table-row>
        <table:table-row table:style-name="ro1">
          <table:table-cell office:value-type="float" office:value="602.645751953125">
            <text:p>602.6457519531</text:p>
          </table:table-cell>
          <table:table-cell office:value-type="float" office:value="0.003157572">
            <text:p>0.003157572</text:p>
          </table:table-cell>
          <table:table-cell table:number-columns-repeated="4"/>
        </table:table-row>
        <table:table-row table:style-name="ro1">
          <table:table-cell office:value-type="float" office:value="602.764709472656">
            <text:p>602.7647094727</text:p>
          </table:table-cell>
          <table:table-cell office:value-type="float" office:value="0.005870128">
            <text:p>0.005870128</text:p>
          </table:table-cell>
          <table:table-cell table:number-columns-repeated="4"/>
        </table:table-row>
        <table:table-row table:style-name="ro1">
          <table:table-cell office:value-type="float" office:value="602.883666992188">
            <text:p>602.8836669922</text:p>
          </table:table-cell>
          <table:table-cell office:value-type="float" office:value="-0.003627207">
            <text:p>-0.003627207</text:p>
          </table:table-cell>
          <table:table-cell table:number-columns-repeated="4"/>
        </table:table-row>
        <table:table-row table:style-name="ro1">
          <table:table-cell office:value-type="float" office:value="603.002563476563">
            <text:p>603.0025634766</text:p>
          </table:table-cell>
          <table:table-cell office:value-type="float" office:value="0.009037096">
            <text:p>0.009037096</text:p>
          </table:table-cell>
          <table:table-cell table:number-columns-repeated="4"/>
        </table:table-row>
        <table:table-row table:style-name="ro1">
          <table:table-cell office:value-type="float" office:value="603.121520996094">
            <text:p>603.1215209961</text:p>
          </table:table-cell>
          <table:table-cell office:value-type="float" office:value="0.01302433">
            <text:p>0.01302433</text:p>
          </table:table-cell>
          <table:table-cell table:number-columns-repeated="4"/>
        </table:table-row>
        <table:table-row table:style-name="ro1">
          <table:table-cell office:value-type="float" office:value="603.240478515625">
            <text:p>603.2404785156</text:p>
          </table:table-cell>
          <table:table-cell office:value-type="float" office:value="0.02013713">
            <text:p>0.02013713</text:p>
          </table:table-cell>
          <table:table-cell table:number-columns-repeated="4"/>
        </table:table-row>
        <table:table-row table:style-name="ro1">
          <table:table-cell office:value-type="float" office:value="603.359436035156">
            <text:p>603.3594360352</text:p>
          </table:table-cell>
          <table:table-cell office:value-type="float" office:value="0.01888143">
            <text:p>0.01888143</text:p>
          </table:table-cell>
          <table:table-cell table:number-columns-repeated="4"/>
        </table:table-row>
        <table:table-row table:style-name="ro1">
          <table:table-cell office:value-type="float" office:value="603.478393554688">
            <text:p>603.4783935547</text:p>
          </table:table-cell>
          <table:table-cell office:value-type="float" office:value="0.01155829">
            <text:p>0.01155829</text:p>
          </table:table-cell>
          <table:table-cell table:number-columns-repeated="4"/>
        </table:table-row>
        <table:table-row table:style-name="ro1">
          <table:table-cell office:value-type="float" office:value="603.597290039063">
            <text:p>603.5972900391</text:p>
          </table:table-cell>
          <table:table-cell office:value-type="float" office:value="0.01086866">
            <text:p>0.01086866</text:p>
          </table:table-cell>
          <table:table-cell table:number-columns-repeated="4"/>
        </table:table-row>
        <table:table-row table:style-name="ro1">
          <table:table-cell office:value-type="float" office:value="603.716247558594">
            <text:p>603.7162475586</text:p>
          </table:table-cell>
          <table:table-cell office:value-type="float" office:value="0.008403859">
            <text:p>0.008403859</text:p>
          </table:table-cell>
          <table:table-cell table:number-columns-repeated="4"/>
        </table:table-row>
        <table:table-row table:style-name="ro1">
          <table:table-cell office:value-type="float" office:value="603.835205078125">
            <text:p>603.8352050781</text:p>
          </table:table-cell>
          <table:table-cell office:value-type="float" office:value="0.002089706">
            <text:p>0.002089706</text:p>
          </table:table-cell>
          <table:table-cell table:number-columns-repeated="4"/>
        </table:table-row>
        <table:table-row table:style-name="ro1">
          <table:table-cell office:value-type="float" office:value="603.954162597656">
            <text:p>603.9541625977</text:p>
          </table:table-cell>
          <table:table-cell office:value-type="float" office:value="0.004203991">
            <text:p>0.004203991</text:p>
          </table:table-cell>
          <table:table-cell table:number-columns-repeated="4"/>
        </table:table-row>
        <table:table-row table:style-name="ro1">
          <table:table-cell office:value-type="float" office:value="604.073120117188">
            <text:p>604.0731201172</text:p>
          </table:table-cell>
          <table:table-cell office:value-type="float" office:value="0.005337066">
            <text:p>0.005337066</text:p>
          </table:table-cell>
          <table:table-cell table:number-columns-repeated="4"/>
        </table:table-row>
        <table:table-row table:style-name="ro1">
          <table:table-cell office:value-type="float" office:value="604.192077636719">
            <text:p>604.1920776367</text:p>
          </table:table-cell>
          <table:table-cell office:value-type="float" office:value="0.002030204">
            <text:p>0.002030204</text:p>
          </table:table-cell>
          <table:table-cell table:number-columns-repeated="4"/>
        </table:table-row>
        <table:table-row table:style-name="ro1">
          <table:table-cell office:value-type="float" office:value="604.31103515625">
            <text:p>604.3110351563</text:p>
          </table:table-cell>
          <table:table-cell office:value-type="float" office:value="0.0261512">
            <text:p>0.0261512</text:p>
          </table:table-cell>
          <table:table-cell table:number-columns-repeated="4"/>
        </table:table-row>
        <table:table-row table:style-name="ro1">
          <table:table-cell office:value-type="float" office:value="604.430053710938">
            <text:p>604.4300537109</text:p>
          </table:table-cell>
          <table:table-cell office:value-type="float" office:value="0.009151911">
            <text:p>0.009151911</text:p>
          </table:table-cell>
          <table:table-cell table:number-columns-repeated="4"/>
        </table:table-row>
        <table:table-row table:style-name="ro1">
          <table:table-cell office:value-type="float" office:value="604.549011230469">
            <text:p>604.5490112305</text:p>
          </table:table-cell>
          <table:table-cell office:value-type="float" office:value="0.006201179">
            <text:p>0.006201179</text:p>
          </table:table-cell>
          <table:table-cell table:number-columns-repeated="4"/>
        </table:table-row>
        <table:table-row table:style-name="ro1">
          <table:table-cell office:value-type="float" office:value="604.66796875">
            <text:p>604.66796875</text:p>
          </table:table-cell>
          <table:table-cell office:value-type="float" office:value="0.008995091">
            <text:p>0.008995091</text:p>
          </table:table-cell>
          <table:table-cell table:number-columns-repeated="4"/>
        </table:table-row>
        <table:table-row table:style-name="ro1">
          <table:table-cell office:value-type="float" office:value="604.786926269531">
            <text:p>604.7869262695</text:p>
          </table:table-cell>
          <table:table-cell office:value-type="float" office:value="0.02197152">
            <text:p>0.02197152</text:p>
          </table:table-cell>
          <table:table-cell table:number-columns-repeated="4"/>
        </table:table-row>
        <table:table-row table:style-name="ro1">
          <table:table-cell office:value-type="float" office:value="604.905883789063">
            <text:p>604.9058837891</text:p>
          </table:table-cell>
          <table:table-cell office:value-type="float" office:value="0.01880963">
            <text:p>0.01880963</text:p>
          </table:table-cell>
          <table:table-cell table:number-columns-repeated="4"/>
        </table:table-row>
        <table:table-row table:style-name="ro1">
          <table:table-cell office:value-type="float" office:value="605.02490234375">
            <text:p>605.0249023438</text:p>
          </table:table-cell>
          <table:table-cell office:value-type="float" office:value="0.007497525">
            <text:p>0.007497525</text:p>
          </table:table-cell>
          <table:table-cell table:number-columns-repeated="4"/>
        </table:table-row>
        <table:table-row table:style-name="ro1">
          <table:table-cell office:value-type="float" office:value="605.143859863281">
            <text:p>605.1438598633</text:p>
          </table:table-cell>
          <table:table-cell office:value-type="float" office:value="0.003346425">
            <text:p>0.003346425</text:p>
          </table:table-cell>
          <table:table-cell table:number-columns-repeated="4"/>
        </table:table-row>
        <table:table-row table:style-name="ro1">
          <table:table-cell office:value-type="float" office:value="605.262817382813">
            <text:p>605.2628173828</text:p>
          </table:table-cell>
          <table:table-cell office:value-type="float" office:value="0.001985683">
            <text:p>0.001985683</text:p>
          </table:table-cell>
          <table:table-cell table:number-columns-repeated="4"/>
        </table:table-row>
        <table:table-row table:style-name="ro1">
          <table:table-cell office:value-type="float" office:value="605.3818359375">
            <text:p>605.3818359375</text:p>
          </table:table-cell>
          <table:table-cell office:value-type="float" office:value="0.01065525">
            <text:p>0.01065525</text:p>
          </table:table-cell>
          <table:table-cell table:number-columns-repeated="4"/>
        </table:table-row>
        <table:table-row table:style-name="ro1">
          <table:table-cell office:value-type="float" office:value="605.500793457031">
            <text:p>605.500793457</text:p>
          </table:table-cell>
          <table:table-cell office:value-type="float" office:value="0.007365531">
            <text:p>0.007365531</text:p>
          </table:table-cell>
          <table:table-cell table:number-columns-repeated="4"/>
        </table:table-row>
        <table:table-row table:style-name="ro1">
          <table:table-cell office:value-type="float" office:value="605.619812011719">
            <text:p>605.6198120117</text:p>
          </table:table-cell>
          <table:table-cell office:value-type="float" office:value="0.01056633">
            <text:p>0.01056633</text:p>
          </table:table-cell>
          <table:table-cell table:number-columns-repeated="4"/>
        </table:table-row>
        <table:table-row table:style-name="ro1">
          <table:table-cell office:value-type="float" office:value="605.73876953125">
            <text:p>605.7387695313</text:p>
          </table:table-cell>
          <table:table-cell office:value-type="float" office:value="0.005008738">
            <text:p>0.005008738</text:p>
          </table:table-cell>
          <table:table-cell table:number-columns-repeated="4"/>
        </table:table-row>
        <table:table-row table:style-name="ro1">
          <table:table-cell office:value-type="float" office:value="605.857788085938">
            <text:p>605.8577880859</text:p>
          </table:table-cell>
          <table:table-cell office:value-type="float" office:value="0.02076978">
            <text:p>0.02076978</text:p>
          </table:table-cell>
          <table:table-cell table:number-columns-repeated="4"/>
        </table:table-row>
        <table:table-row table:style-name="ro1">
          <table:table-cell office:value-type="float" office:value="605.976806640625">
            <text:p>605.9768066406</text:p>
          </table:table-cell>
          <table:table-cell office:value-type="float" office:value="0.02203378">
            <text:p>0.02203378</text:p>
          </table:table-cell>
          <table:table-cell table:number-columns-repeated="4"/>
        </table:table-row>
        <table:table-row table:style-name="ro1">
          <table:table-cell office:value-type="float" office:value="606.095764160156">
            <text:p>606.0957641602</text:p>
          </table:table-cell>
          <table:table-cell office:value-type="float" office:value="0.01228636">
            <text:p>0.01228636</text:p>
          </table:table-cell>
          <table:table-cell table:number-columns-repeated="4"/>
        </table:table-row>
        <table:table-row table:style-name="ro1">
          <table:table-cell office:value-type="float" office:value="606.214782714844">
            <text:p>606.2147827148</text:p>
          </table:table-cell>
          <table:table-cell office:value-type="float" office:value="0.0228504">
            <text:p>0.0228504</text:p>
          </table:table-cell>
          <table:table-cell table:number-columns-repeated="4"/>
        </table:table-row>
        <table:table-row table:style-name="ro1">
          <table:table-cell office:value-type="float" office:value="606.333801269531">
            <text:p>606.3338012695</text:p>
          </table:table-cell>
          <table:table-cell office:value-type="float" office:value="0.003896437">
            <text:p>0.003896437</text:p>
          </table:table-cell>
          <table:table-cell table:number-columns-repeated="4"/>
        </table:table-row>
        <table:table-row table:style-name="ro1">
          <table:table-cell office:value-type="float" office:value="606.452758789063">
            <text:p>606.4527587891</text:p>
          </table:table-cell>
          <table:table-cell office:value-type="float" office:value="0.01785806">
            <text:p>0.01785806</text:p>
          </table:table-cell>
          <table:table-cell table:number-columns-repeated="4"/>
        </table:table-row>
        <table:table-row table:style-name="ro1">
          <table:table-cell office:value-type="float" office:value="606.57177734375">
            <text:p>606.5717773438</text:p>
          </table:table-cell>
          <table:table-cell office:value-type="float" office:value="0.003644071">
            <text:p>0.003644071</text:p>
          </table:table-cell>
          <table:table-cell table:number-columns-repeated="4"/>
        </table:table-row>
        <table:table-row table:style-name="ro1">
          <table:table-cell office:value-type="float" office:value="606.690795898438">
            <text:p>606.6907958984</text:p>
          </table:table-cell>
          <table:table-cell office:value-type="float" office:value="0.01105764">
            <text:p>0.01105764</text:p>
          </table:table-cell>
          <table:table-cell table:number-columns-repeated="4"/>
        </table:table-row>
        <table:table-row table:style-name="ro1">
          <table:table-cell office:value-type="float" office:value="606.809814453125">
            <text:p>606.8098144531</text:p>
          </table:table-cell>
          <table:table-cell office:value-type="float" office:value="0.00271073">
            <text:p>0.00271073</text:p>
          </table:table-cell>
          <table:table-cell table:number-columns-repeated="4"/>
        </table:table-row>
        <table:table-row table:style-name="ro1">
          <table:table-cell office:value-type="float" office:value="606.928833007813">
            <text:p>606.9288330078</text:p>
          </table:table-cell>
          <table:table-cell office:value-type="float" office:value="0.00411624">
            <text:p>0.00411624</text:p>
          </table:table-cell>
          <table:table-cell table:number-columns-repeated="4"/>
        </table:table-row>
        <table:table-row table:style-name="ro1">
          <table:table-cell office:value-type="float" office:value="607.0478515625">
            <text:p>607.0478515625</text:p>
          </table:table-cell>
          <table:table-cell office:value-type="float" office:value="0.001192828">
            <text:p>0.001192828</text:p>
          </table:table-cell>
          <table:table-cell table:number-columns-repeated="4"/>
        </table:table-row>
        <table:table-row table:style-name="ro1">
          <table:table-cell office:value-type="float" office:value="607.166870117188">
            <text:p>607.1668701172</text:p>
          </table:table-cell>
          <table:table-cell office:value-type="float" office:value="0.02857208">
            <text:p>0.02857208</text:p>
          </table:table-cell>
          <table:table-cell table:number-columns-repeated="4"/>
        </table:table-row>
        <table:table-row table:style-name="ro1">
          <table:table-cell office:value-type="float" office:value="607.285888671875">
            <text:p>607.2858886719</text:p>
          </table:table-cell>
          <table:table-cell office:value-type="float" office:value="0.01885969">
            <text:p>0.01885969</text:p>
          </table:table-cell>
          <table:table-cell table:number-columns-repeated="4"/>
        </table:table-row>
        <table:table-row table:style-name="ro1">
          <table:table-cell office:value-type="float" office:value="607.404907226563">
            <text:p>607.4049072266</text:p>
          </table:table-cell>
          <table:table-cell office:value-type="float" office:value="0.01258291">
            <text:p>0.01258291</text:p>
          </table:table-cell>
          <table:table-cell table:number-columns-repeated="4"/>
        </table:table-row>
        <table:table-row table:style-name="ro1">
          <table:table-cell office:value-type="float" office:value="607.52392578125">
            <text:p>607.5239257813</text:p>
          </table:table-cell>
          <table:table-cell office:value-type="float" office:value="0.0107781">
            <text:p>0.0107781</text:p>
          </table:table-cell>
          <table:table-cell table:number-columns-repeated="4"/>
        </table:table-row>
        <table:table-row table:style-name="ro1">
          <table:table-cell office:value-type="float" office:value="607.642944335938">
            <text:p>607.6429443359</text:p>
          </table:table-cell>
          <table:table-cell office:value-type="float" office:value="0.01668952">
            <text:p>0.01668952</text:p>
          </table:table-cell>
          <table:table-cell table:number-columns-repeated="4"/>
        </table:table-row>
        <table:table-row table:style-name="ro1">
          <table:table-cell office:value-type="float" office:value="607.761962890625">
            <text:p>607.7619628906</text:p>
          </table:table-cell>
          <table:table-cell office:value-type="float" office:value="0.03122672">
            <text:p>0.03122672</text:p>
          </table:table-cell>
          <table:table-cell table:number-columns-repeated="4"/>
        </table:table-row>
        <table:table-row table:style-name="ro1">
          <table:table-cell office:value-type="float" office:value="607.880981445313">
            <text:p>607.8809814453</text:p>
          </table:table-cell>
          <table:table-cell office:value-type="float" office:value="0.01881845">
            <text:p>0.01881845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0.003342316">
            <text:p>0.003342316</text:p>
          </table:table-cell>
          <table:table-cell table:number-columns-repeated="4"/>
        </table:table-row>
        <table:table-row table:style-name="ro1">
          <table:table-cell office:value-type="float" office:value="608.119079589844">
            <text:p>608.1190795898</text:p>
          </table:table-cell>
          <table:table-cell office:value-type="float" office:value="0.008695438">
            <text:p>0.008695438</text:p>
          </table:table-cell>
          <table:table-cell table:number-columns-repeated="4"/>
        </table:table-row>
        <table:table-row table:style-name="ro1">
          <table:table-cell office:value-type="float" office:value="608.238098144531">
            <text:p>608.2380981445</text:p>
          </table:table-cell>
          <table:table-cell office:value-type="float" office:value="0.007721105">
            <text:p>0.007721105</text:p>
          </table:table-cell>
          <table:table-cell table:number-columns-repeated="4"/>
        </table:table-row>
        <table:table-row table:style-name="ro1">
          <table:table-cell office:value-type="float" office:value="608.357116699219">
            <text:p>608.3571166992</text:p>
          </table:table-cell>
          <table:table-cell office:value-type="float" office:value="0.005285034">
            <text:p>0.005285034</text:p>
          </table:table-cell>
          <table:table-cell table:number-columns-repeated="4"/>
        </table:table-row>
        <table:table-row table:style-name="ro1">
          <table:table-cell office:value-type="float" office:value="608.476196289063">
            <text:p>608.4761962891</text:p>
          </table:table-cell>
          <table:table-cell office:value-type="float" office:value="0.014593">
            <text:p>0.014593</text:p>
          </table:table-cell>
          <table:table-cell table:number-columns-repeated="4"/>
        </table:table-row>
        <table:table-row table:style-name="ro1">
          <table:table-cell office:value-type="float" office:value="608.59521484375">
            <text:p>608.5952148438</text:p>
          </table:table-cell>
          <table:table-cell office:value-type="float" office:value="0.02407438">
            <text:p>0.02407438</text:p>
          </table:table-cell>
          <table:table-cell table:number-columns-repeated="4"/>
        </table:table-row>
        <table:table-row table:style-name="ro1">
          <table:table-cell office:value-type="float" office:value="608.714233398438">
            <text:p>608.7142333984</text:p>
          </table:table-cell>
          <table:table-cell office:value-type="float" office:value="0.01257083">
            <text:p>0.01257083</text:p>
          </table:table-cell>
          <table:table-cell table:number-columns-repeated="4"/>
        </table:table-row>
        <table:table-row table:style-name="ro1">
          <table:table-cell office:value-type="float" office:value="608.833312988281">
            <text:p>608.8333129883</text:p>
          </table:table-cell>
          <table:table-cell office:value-type="float" office:value="0.01221362">
            <text:p>0.01221362</text:p>
          </table:table-cell>
          <table:table-cell table:number-columns-repeated="4"/>
        </table:table-row>
        <table:table-row table:style-name="ro1">
          <table:table-cell office:value-type="float" office:value="608.952331542969">
            <text:p>608.952331543</text:p>
          </table:table-cell>
          <table:table-cell office:value-type="float" office:value="-0.0008841245">
            <text:p>-0.0008841245</text:p>
          </table:table-cell>
          <table:table-cell table:number-columns-repeated="4"/>
        </table:table-row>
        <table:table-row table:style-name="ro1">
          <table:table-cell office:value-type="float" office:value="609.071411132813">
            <text:p>609.0714111328</text:p>
          </table:table-cell>
          <table:table-cell office:value-type="float" office:value="0.002865122">
            <text:p>0.002865122</text:p>
          </table:table-cell>
          <table:table-cell table:number-columns-repeated="4"/>
        </table:table-row>
        <table:table-row table:style-name="ro1">
          <table:table-cell office:value-type="float" office:value="609.1904296875">
            <text:p>609.1904296875</text:p>
          </table:table-cell>
          <table:table-cell office:value-type="float" office:value="0.0003250018">
            <text:p>0.0003250018</text:p>
          </table:table-cell>
          <table:table-cell table:number-columns-repeated="4"/>
        </table:table-row>
        <table:table-row table:style-name="ro1">
          <table:table-cell office:value-type="float" office:value="609.309509277344">
            <text:p>609.3095092773</text:p>
          </table:table-cell>
          <table:table-cell office:value-type="float" office:value="0.02320705">
            <text:p>0.02320705</text:p>
          </table:table-cell>
          <table:table-cell table:number-columns-repeated="4"/>
        </table:table-row>
        <table:table-row table:style-name="ro1">
          <table:table-cell office:value-type="float" office:value="609.428588867188">
            <text:p>609.4285888672</text:p>
          </table:table-cell>
          <table:table-cell office:value-type="float" office:value="0.01232891">
            <text:p>0.01232891</text:p>
          </table:table-cell>
          <table:table-cell table:number-columns-repeated="4"/>
        </table:table-row>
        <table:table-row table:style-name="ro1">
          <table:table-cell office:value-type="float" office:value="609.547607421875">
            <text:p>609.5476074219</text:p>
          </table:table-cell>
          <table:table-cell office:value-type="float" office:value="0.01221494">
            <text:p>0.01221494</text:p>
          </table:table-cell>
          <table:table-cell table:number-columns-repeated="4"/>
        </table:table-row>
        <table:table-row table:style-name="ro1">
          <table:table-cell office:value-type="float" office:value="609.666687011719">
            <text:p>609.6666870117</text:p>
          </table:table-cell>
          <table:table-cell office:value-type="float" office:value="0.007954939">
            <text:p>0.007954939</text:p>
          </table:table-cell>
          <table:table-cell table:number-columns-repeated="4"/>
        </table:table-row>
        <table:table-row table:style-name="ro1">
          <table:table-cell office:value-type="float" office:value="609.785766601563">
            <text:p>609.7857666016</text:p>
          </table:table-cell>
          <table:table-cell office:value-type="float" office:value="0.007368553">
            <text:p>0.007368553</text:p>
          </table:table-cell>
          <table:table-cell table:number-columns-repeated="4"/>
        </table:table-row>
        <table:table-row table:style-name="ro1">
          <table:table-cell office:value-type="float" office:value="609.904846191406">
            <text:p>609.9048461914</text:p>
          </table:table-cell>
          <table:table-cell office:value-type="float" office:value="0.01070909">
            <text:p>0.01070909</text:p>
          </table:table-cell>
          <table:table-cell table:number-columns-repeated="4"/>
        </table:table-row>
        <table:table-row table:style-name="ro1">
          <table:table-cell office:value-type="float" office:value="610.023864746094">
            <text:p>610.0238647461</text:p>
          </table:table-cell>
          <table:table-cell office:value-type="float" office:value="0.005766384">
            <text:p>0.005766384</text:p>
          </table:table-cell>
          <table:table-cell table:number-columns-repeated="4"/>
        </table:table-row>
        <table:table-row table:style-name="ro1">
          <table:table-cell office:value-type="float" office:value="610.142944335938">
            <text:p>610.1429443359</text:p>
          </table:table-cell>
          <table:table-cell office:value-type="float" office:value="0.005879075">
            <text:p>0.005879075</text:p>
          </table:table-cell>
          <table:table-cell table:number-columns-repeated="4"/>
        </table:table-row>
        <table:table-row table:style-name="ro1">
          <table:table-cell office:value-type="float" office:value="610.262023925781">
            <text:p>610.2620239258</text:p>
          </table:table-cell>
          <table:table-cell office:value-type="float" office:value="0.02719131">
            <text:p>0.02719131</text:p>
          </table:table-cell>
          <table:table-cell table:number-columns-repeated="4"/>
        </table:table-row>
        <table:table-row table:style-name="ro1">
          <table:table-cell office:value-type="float" office:value="610.381103515625">
            <text:p>610.3811035156</text:p>
          </table:table-cell>
          <table:table-cell office:value-type="float" office:value="0.01257193">
            <text:p>0.01257193</text:p>
          </table:table-cell>
          <table:table-cell table:number-columns-repeated="4"/>
        </table:table-row>
        <table:table-row table:style-name="ro1">
          <table:table-cell office:value-type="float" office:value="610.500183105469">
            <text:p>610.5001831055</text:p>
          </table:table-cell>
          <table:table-cell office:value-type="float" office:value="0.009023766">
            <text:p>0.009023766</text:p>
          </table:table-cell>
          <table:table-cell table:number-columns-repeated="4"/>
        </table:table-row>
        <table:table-row table:style-name="ro1">
          <table:table-cell office:value-type="float" office:value="610.619262695313">
            <text:p>610.6192626953</text:p>
          </table:table-cell>
          <table:table-cell office:value-type="float" office:value="0.002861069">
            <text:p>0.002861069</text:p>
          </table:table-cell>
          <table:table-cell table:number-columns-repeated="4"/>
        </table:table-row>
        <table:table-row table:style-name="ro1">
          <table:table-cell office:value-type="float" office:value="610.738342285156">
            <text:p>610.7383422852</text:p>
          </table:table-cell>
          <table:table-cell office:value-type="float" office:value="0.01159703">
            <text:p>0.01159703</text:p>
          </table:table-cell>
          <table:table-cell table:number-columns-repeated="4"/>
        </table:table-row>
        <table:table-row table:style-name="ro1">
          <table:table-cell office:value-type="float" office:value="610.857421875">
            <text:p>610.857421875</text:p>
          </table:table-cell>
          <table:table-cell office:value-type="float" office:value="0.004302974">
            <text:p>0.004302974</text:p>
          </table:table-cell>
          <table:table-cell table:number-columns-repeated="4"/>
        </table:table-row>
        <table:table-row table:style-name="ro1">
          <table:table-cell office:value-type="float" office:value="610.976501464844">
            <text:p>610.9765014648</text:p>
          </table:table-cell>
          <table:table-cell office:value-type="float" office:value="0.01600209">
            <text:p>0.01600209</text:p>
          </table:table-cell>
          <table:table-cell table:number-columns-repeated="4"/>
        </table:table-row>
        <table:table-row table:style-name="ro1">
          <table:table-cell office:value-type="float" office:value="611.095581054688">
            <text:p>611.0955810547</text:p>
          </table:table-cell>
          <table:table-cell office:value-type="float" office:value="0.01048555">
            <text:p>0.01048555</text:p>
          </table:table-cell>
          <table:table-cell table:number-columns-repeated="4"/>
        </table:table-row>
        <table:table-row table:style-name="ro1">
          <table:table-cell office:value-type="float" office:value="611.214660644531">
            <text:p>611.2146606445</text:p>
          </table:table-cell>
          <table:table-cell office:value-type="float" office:value="0.006793716">
            <text:p>0.006793716</text:p>
          </table:table-cell>
          <table:table-cell table:number-columns-repeated="4"/>
        </table:table-row>
        <table:table-row table:style-name="ro1">
          <table:table-cell office:value-type="float" office:value="611.333801269531">
            <text:p>611.3338012695</text:p>
          </table:table-cell>
          <table:table-cell office:value-type="float" office:value="0.004320162">
            <text:p>0.004320162</text:p>
          </table:table-cell>
          <table:table-cell table:number-columns-repeated="4"/>
        </table:table-row>
        <table:table-row table:style-name="ro1">
          <table:table-cell office:value-type="float" office:value="611.452880859375">
            <text:p>611.4528808594</text:p>
          </table:table-cell>
          <table:table-cell office:value-type="float" office:value="-0.003175234">
            <text:p>-0.003175234</text:p>
          </table:table-cell>
          <table:table-cell table:number-columns-repeated="4"/>
        </table:table-row>
        <table:table-row table:style-name="ro1">
          <table:table-cell office:value-type="float" office:value="611.571960449219">
            <text:p>611.5719604492</text:p>
          </table:table-cell>
          <table:table-cell office:value-type="float" office:value="0.0118364">
            <text:p>0.0118364</text:p>
          </table:table-cell>
          <table:table-cell table:number-columns-repeated="4"/>
        </table:table-row>
        <table:table-row table:style-name="ro1">
          <table:table-cell office:value-type="float" office:value="611.691040039063">
            <text:p>611.6910400391</text:p>
          </table:table-cell>
          <table:table-cell office:value-type="float" office:value="0.0108403">
            <text:p>0.0108403</text:p>
          </table:table-cell>
          <table:table-cell table:number-columns-repeated="4"/>
        </table:table-row>
        <table:table-row table:style-name="ro1">
          <table:table-cell office:value-type="float" office:value="611.810180664063">
            <text:p>611.8101806641</text:p>
          </table:table-cell>
          <table:table-cell office:value-type="float" office:value="0.009379155">
            <text:p>0.009379155</text:p>
          </table:table-cell>
          <table:table-cell table:number-columns-repeated="4"/>
        </table:table-row>
        <table:table-row table:style-name="ro1">
          <table:table-cell office:value-type="float" office:value="611.929260253906">
            <text:p>611.9292602539</text:p>
          </table:table-cell>
          <table:table-cell office:value-type="float" office:value="0.009611339">
            <text:p>0.009611339</text:p>
          </table:table-cell>
          <table:table-cell table:number-columns-repeated="4"/>
        </table:table-row>
        <table:table-row table:style-name="ro1">
          <table:table-cell office:value-type="float" office:value="612.048400878906">
            <text:p>612.0484008789</text:p>
          </table:table-cell>
          <table:table-cell office:value-type="float" office:value="0.01206155">
            <text:p>0.01206155</text:p>
          </table:table-cell>
          <table:table-cell table:number-columns-repeated="4"/>
        </table:table-row>
        <table:table-row table:style-name="ro1">
          <table:table-cell office:value-type="float" office:value="612.16748046875">
            <text:p>612.1674804688</text:p>
          </table:table-cell>
          <table:table-cell office:value-type="float" office:value="0.003963841">
            <text:p>0.003963841</text:p>
          </table:table-cell>
          <table:table-cell table:number-columns-repeated="4"/>
        </table:table-row>
        <table:table-row table:style-name="ro1">
          <table:table-cell office:value-type="float" office:value="612.286560058594">
            <text:p>612.2865600586</text:p>
          </table:table-cell>
          <table:table-cell office:value-type="float" office:value="0.01745655">
            <text:p>0.01745655</text:p>
          </table:table-cell>
          <table:table-cell table:number-columns-repeated="4"/>
        </table:table-row>
        <table:table-row table:style-name="ro1">
          <table:table-cell office:value-type="float" office:value="612.405700683594">
            <text:p>612.4057006836</text:p>
          </table:table-cell>
          <table:table-cell office:value-type="float" office:value="0.01855553">
            <text:p>0.01855553</text:p>
          </table:table-cell>
          <table:table-cell table:number-columns-repeated="4"/>
        </table:table-row>
        <table:table-row table:style-name="ro1">
          <table:table-cell office:value-type="float" office:value="612.524780273438">
            <text:p>612.5247802734</text:p>
          </table:table-cell>
          <table:table-cell office:value-type="float" office:value="0.006919138">
            <text:p>0.006919138</text:p>
          </table:table-cell>
          <table:table-cell table:number-columns-repeated="4"/>
        </table:table-row>
        <table:table-row table:style-name="ro1">
          <table:table-cell office:value-type="float" office:value="612.643920898438">
            <text:p>612.6439208984</text:p>
          </table:table-cell>
          <table:table-cell office:value-type="string">
            <text:p>2.451742E-06</text:p>
          </table:table-cell>
          <table:table-cell table:number-columns-repeated="4"/>
        </table:table-row>
        <table:table-row table:style-name="ro1">
          <table:table-cell office:value-type="float" office:value="612.763061523438">
            <text:p>612.7630615234</text:p>
          </table:table-cell>
          <table:table-cell office:value-type="float" office:value="0.02063857">
            <text:p>0.02063857</text:p>
          </table:table-cell>
          <table:table-cell table:number-columns-repeated="4"/>
        </table:table-row>
        <table:table-row table:style-name="ro1">
          <table:table-cell office:value-type="float" office:value="612.882141113281">
            <text:p>612.8821411133</text:p>
          </table:table-cell>
          <table:table-cell office:value-type="float" office:value="0.002652083">
            <text:p>0.002652083</text:p>
          </table:table-cell>
          <table:table-cell table:number-columns-repeated="4"/>
        </table:table-row>
        <table:table-row table:style-name="ro1">
          <table:table-cell office:value-type="float" office:value="613.001281738281">
            <text:p>613.0012817383</text:p>
          </table:table-cell>
          <table:table-cell office:value-type="float" office:value="0.0101662">
            <text:p>0.0101662</text:p>
          </table:table-cell>
          <table:table-cell table:number-columns-repeated="4"/>
        </table:table-row>
        <table:table-row table:style-name="ro1">
          <table:table-cell office:value-type="float" office:value="613.120422363281">
            <text:p>613.1204223633</text:p>
          </table:table-cell>
          <table:table-cell office:value-type="float" office:value="0.005027059">
            <text:p>0.005027059</text:p>
          </table:table-cell>
          <table:table-cell table:number-columns-repeated="4"/>
        </table:table-row>
        <table:table-row table:style-name="ro1">
          <table:table-cell office:value-type="float" office:value="613.239501953125">
            <text:p>613.2395019531</text:p>
          </table:table-cell>
          <table:table-cell office:value-type="float" office:value="0.009158476">
            <text:p>0.009158476</text:p>
          </table:table-cell>
          <table:table-cell table:number-columns-repeated="4"/>
        </table:table-row>
        <table:table-row table:style-name="ro1">
          <table:table-cell office:value-type="float" office:value="613.358642578125">
            <text:p>613.3586425781</text:p>
          </table:table-cell>
          <table:table-cell office:value-type="float" office:value="0.01304212">
            <text:p>0.01304212</text:p>
          </table:table-cell>
          <table:table-cell table:number-columns-repeated="4"/>
        </table:table-row>
        <table:table-row table:style-name="ro1">
          <table:table-cell office:value-type="float" office:value="613.477783203125">
            <text:p>613.4777832031</text:p>
          </table:table-cell>
          <table:table-cell office:value-type="float" office:value="0.002234333">
            <text:p>0.002234333</text:p>
          </table:table-cell>
          <table:table-cell table:number-columns-repeated="4"/>
        </table:table-row>
        <table:table-row table:style-name="ro1">
          <table:table-cell office:value-type="float" office:value="613.596923828125">
            <text:p>613.5969238281</text:p>
          </table:table-cell>
          <table:table-cell office:value-type="float" office:value="-0.002517856">
            <text:p>-0.002517856</text:p>
          </table:table-cell>
          <table:table-cell table:number-columns-repeated="4"/>
        </table:table-row>
        <table:table-row table:style-name="ro1">
          <table:table-cell office:value-type="float" office:value="613.716064453125">
            <text:p>613.7160644531</text:p>
          </table:table-cell>
          <table:table-cell office:value-type="float" office:value="0.002544544">
            <text:p>0.002544544</text:p>
          </table:table-cell>
          <table:table-cell table:number-columns-repeated="4"/>
        </table:table-row>
        <table:table-row table:style-name="ro1">
          <table:table-cell office:value-type="float" office:value="613.835205078125">
            <text:p>613.8352050781</text:p>
          </table:table-cell>
          <table:table-cell office:value-type="float" office:value="0.0005391316">
            <text:p>0.0005391316</text:p>
          </table:table-cell>
          <table:table-cell table:number-columns-repeated="4"/>
        </table:table-row>
        <table:table-row table:style-name="ro1">
          <table:table-cell office:value-type="float" office:value="613.954345703125">
            <text:p>613.9543457031</text:p>
          </table:table-cell>
          <table:table-cell office:value-type="float" office:value="-0.003898174">
            <text:p>-0.003898174</text:p>
          </table:table-cell>
          <table:table-cell table:number-columns-repeated="4"/>
        </table:table-row>
        <table:table-row table:style-name="ro1">
          <table:table-cell office:value-type="float" office:value="614.073486328125">
            <text:p>614.0734863281</text:p>
          </table:table-cell>
          <table:table-cell office:value-type="float" office:value="0.003500358">
            <text:p>0.003500358</text:p>
          </table:table-cell>
          <table:table-cell table:number-columns-repeated="4"/>
        </table:table-row>
        <table:table-row table:style-name="ro1">
          <table:table-cell office:value-type="float" office:value="614.192626953125">
            <text:p>614.1926269531</text:p>
          </table:table-cell>
          <table:table-cell office:value-type="float" office:value="0.02502969">
            <text:p>0.02502969</text:p>
          </table:table-cell>
          <table:table-cell table:number-columns-repeated="4"/>
        </table:table-row>
        <table:table-row table:style-name="ro1">
          <table:table-cell office:value-type="float" office:value="614.311767578125">
            <text:p>614.3117675781</text:p>
          </table:table-cell>
          <table:table-cell office:value-type="float" office:value="0.001221552">
            <text:p>0.001221552</text:p>
          </table:table-cell>
          <table:table-cell table:number-columns-repeated="4"/>
        </table:table-row>
        <table:table-row table:style-name="ro1">
          <table:table-cell office:value-type="float" office:value="614.430908203125">
            <text:p>614.4309082031</text:p>
          </table:table-cell>
          <table:table-cell office:value-type="float" office:value="0.00142929">
            <text:p>0.00142929</text:p>
          </table:table-cell>
          <table:table-cell table:number-columns-repeated="4"/>
        </table:table-row>
        <table:table-row table:style-name="ro1">
          <table:table-cell office:value-type="float" office:value="614.550048828125">
            <text:p>614.5500488281</text:p>
          </table:table-cell>
          <table:table-cell office:value-type="float" office:value="0.001424288">
            <text:p>0.001424288</text:p>
          </table:table-cell>
          <table:table-cell table:number-columns-repeated="4"/>
        </table:table-row>
        <table:table-row table:style-name="ro1">
          <table:table-cell office:value-type="float" office:value="614.669189453125">
            <text:p>614.6691894531</text:p>
          </table:table-cell>
          <table:table-cell office:value-type="float" office:value="0.01456974">
            <text:p>0.01456974</text:p>
          </table:table-cell>
          <table:table-cell table:number-columns-repeated="4"/>
        </table:table-row>
        <table:table-row table:style-name="ro1">
          <table:table-cell office:value-type="float" office:value="614.788330078125">
            <text:p>614.7883300781</text:p>
          </table:table-cell>
          <table:table-cell office:value-type="float" office:value="0.003596322">
            <text:p>0.003596322</text:p>
          </table:table-cell>
          <table:table-cell table:number-columns-repeated="4"/>
        </table:table-row>
        <table:table-row table:style-name="ro1">
          <table:table-cell office:value-type="float" office:value="614.907531738281">
            <text:p>614.9075317383</text:p>
          </table:table-cell>
          <table:table-cell office:value-type="float" office:value="0.009943278">
            <text:p>0.009943278</text:p>
          </table:table-cell>
          <table:table-cell table:number-columns-repeated="4"/>
        </table:table-row>
        <table:table-row table:style-name="ro1">
          <table:table-cell office:value-type="float" office:value="615.026672363281">
            <text:p>615.0266723633</text:p>
          </table:table-cell>
          <table:table-cell office:value-type="float" office:value="0.007803592">
            <text:p>0.007803592</text:p>
          </table:table-cell>
          <table:table-cell table:number-columns-repeated="4"/>
        </table:table-row>
        <table:table-row table:style-name="ro1">
          <table:table-cell office:value-type="float" office:value="615.145812988281">
            <text:p>615.1458129883</text:p>
          </table:table-cell>
          <table:table-cell office:value-type="float" office:value="0.03530751">
            <text:p>0.03530751</text:p>
          </table:table-cell>
          <table:table-cell table:number-columns-repeated="4"/>
        </table:table-row>
        <table:table-row table:style-name="ro1">
          <table:table-cell office:value-type="float" office:value="615.264953613281">
            <text:p>615.2649536133</text:p>
          </table:table-cell>
          <table:table-cell office:value-type="float" office:value="0.01088182">
            <text:p>0.01088182</text:p>
          </table:table-cell>
          <table:table-cell table:number-columns-repeated="4"/>
        </table:table-row>
        <table:table-row table:style-name="ro1">
          <table:table-cell office:value-type="float" office:value="615.384155273438">
            <text:p>615.3841552734</text:p>
          </table:table-cell>
          <table:table-cell office:value-type="float" office:value="0.01101465">
            <text:p>0.01101465</text:p>
          </table:table-cell>
          <table:table-cell table:number-columns-repeated="4"/>
        </table:table-row>
        <table:table-row table:style-name="ro1">
          <table:table-cell office:value-type="float" office:value="615.503295898438">
            <text:p>615.5032958984</text:p>
          </table:table-cell>
          <table:table-cell office:value-type="float" office:value="0.003050503">
            <text:p>0.003050503</text:p>
          </table:table-cell>
          <table:table-cell table:number-columns-repeated="4"/>
        </table:table-row>
        <table:table-row table:style-name="ro1">
          <table:table-cell office:value-type="float" office:value="615.622497558594">
            <text:p>615.6224975586</text:p>
          </table:table-cell>
          <table:table-cell office:value-type="float" office:value="0.01656264">
            <text:p>0.01656264</text:p>
          </table:table-cell>
          <table:table-cell table:number-columns-repeated="4"/>
        </table:table-row>
        <table:table-row table:style-name="ro1">
          <table:table-cell office:value-type="float" office:value="615.741638183594">
            <text:p>615.7416381836</text:p>
          </table:table-cell>
          <table:table-cell office:value-type="float" office:value="0.003644179">
            <text:p>0.003644179</text:p>
          </table:table-cell>
          <table:table-cell table:number-columns-repeated="4"/>
        </table:table-row>
        <table:table-row table:style-name="ro1">
          <table:table-cell office:value-type="float" office:value="615.86083984375">
            <text:p>615.8608398438</text:p>
          </table:table-cell>
          <table:table-cell office:value-type="float" office:value="0.007417641">
            <text:p>0.007417641</text:p>
          </table:table-cell>
          <table:table-cell table:number-columns-repeated="4"/>
        </table:table-row>
        <table:table-row table:style-name="ro1">
          <table:table-cell office:value-type="float" office:value="615.97998046875">
            <text:p>615.9799804688</text:p>
          </table:table-cell>
          <table:table-cell office:value-type="float" office:value="0.003135571">
            <text:p>0.003135571</text:p>
          </table:table-cell>
          <table:table-cell table:number-columns-repeated="4"/>
        </table:table-row>
        <table:table-row table:style-name="ro1">
          <table:table-cell office:value-type="float" office:value="616.099182128906">
            <text:p>616.0991821289</text:p>
          </table:table-cell>
          <table:table-cell office:value-type="float" office:value="0.007392317">
            <text:p>0.007392317</text:p>
          </table:table-cell>
          <table:table-cell table:number-columns-repeated="4"/>
        </table:table-row>
        <table:table-row table:style-name="ro1">
          <table:table-cell office:value-type="float" office:value="616.218322753906">
            <text:p>616.2183227539</text:p>
          </table:table-cell>
          <table:table-cell office:value-type="float" office:value="0.01452163">
            <text:p>0.01452163</text:p>
          </table:table-cell>
          <table:table-cell table:number-columns-repeated="4"/>
        </table:table-row>
        <table:table-row table:style-name="ro1">
          <table:table-cell office:value-type="float" office:value="616.337524414063">
            <text:p>616.3375244141</text:p>
          </table:table-cell>
          <table:table-cell office:value-type="float" office:value="0.001723972">
            <text:p>0.001723972</text:p>
          </table:table-cell>
          <table:table-cell table:number-columns-repeated="4"/>
        </table:table-row>
        <table:table-row table:style-name="ro1">
          <table:table-cell office:value-type="float" office:value="616.456726074219">
            <text:p>616.4567260742</text:p>
          </table:table-cell>
          <table:table-cell office:value-type="float" office:value="0.02224019">
            <text:p>0.02224019</text:p>
          </table:table-cell>
          <table:table-cell table:number-columns-repeated="4"/>
        </table:table-row>
        <table:table-row table:style-name="ro1">
          <table:table-cell office:value-type="float" office:value="616.575866699219">
            <text:p>616.5758666992</text:p>
          </table:table-cell>
          <table:table-cell office:value-type="float" office:value="0.002499697">
            <text:p>0.002499697</text:p>
          </table:table-cell>
          <table:table-cell table:number-columns-repeated="4"/>
        </table:table-row>
        <table:table-row table:style-name="ro1">
          <table:table-cell office:value-type="float" office:value="616.695068359375">
            <text:p>616.6950683594</text:p>
          </table:table-cell>
          <table:table-cell office:value-type="float" office:value="-0.002543737">
            <text:p>-0.002543737</text:p>
          </table:table-cell>
          <table:table-cell table:number-columns-repeated="4"/>
        </table:table-row>
        <table:table-row table:style-name="ro1">
          <table:table-cell office:value-type="float" office:value="616.814270019531">
            <text:p>616.8142700195</text:p>
          </table:table-cell>
          <table:table-cell office:value-type="float" office:value="0.00301748">
            <text:p>0.00301748</text:p>
          </table:table-cell>
          <table:table-cell table:number-columns-repeated="4"/>
        </table:table-row>
        <table:table-row table:style-name="ro1">
          <table:table-cell office:value-type="float" office:value="616.933471679688">
            <text:p>616.9334716797</text:p>
          </table:table-cell>
          <table:table-cell office:value-type="float" office:value="0.009023149">
            <text:p>0.009023149</text:p>
          </table:table-cell>
          <table:table-cell table:number-columns-repeated="4"/>
        </table:table-row>
        <table:table-row table:style-name="ro1">
          <table:table-cell office:value-type="float" office:value="617.052612304688">
            <text:p>617.0526123047</text:p>
          </table:table-cell>
          <table:table-cell office:value-type="float" office:value="0.005802298">
            <text:p>0.005802298</text:p>
          </table:table-cell>
          <table:table-cell table:number-columns-repeated="4"/>
        </table:table-row>
        <table:table-row table:style-name="ro1">
          <table:table-cell office:value-type="float" office:value="617.171813964844">
            <text:p>617.1718139648</text:p>
          </table:table-cell>
          <table:table-cell office:value-type="float" office:value="0.01653524">
            <text:p>0.01653524</text:p>
          </table:table-cell>
          <table:table-cell table:number-columns-repeated="4"/>
        </table:table-row>
        <table:table-row table:style-name="ro1">
          <table:table-cell office:value-type="float" office:value="617.291015625">
            <text:p>617.291015625</text:p>
          </table:table-cell>
          <table:table-cell office:value-type="float" office:value="0.001846915">
            <text:p>0.001846915</text:p>
          </table:table-cell>
          <table:table-cell table:number-columns-repeated="4"/>
        </table:table-row>
        <table:table-row table:style-name="ro1">
          <table:table-cell office:value-type="float" office:value="617.410217285156">
            <text:p>617.4102172852</text:p>
          </table:table-cell>
          <table:table-cell office:value-type="float" office:value="0.007408302">
            <text:p>0.007408302</text:p>
          </table:table-cell>
          <table:table-cell table:number-columns-repeated="4"/>
        </table:table-row>
        <table:table-row table:style-name="ro1">
          <table:table-cell office:value-type="float" office:value="617.529418945313">
            <text:p>617.5294189453</text:p>
          </table:table-cell>
          <table:table-cell office:value-type="float" office:value="0.01502447">
            <text:p>0.01502447</text:p>
          </table:table-cell>
          <table:table-cell table:number-columns-repeated="4"/>
        </table:table-row>
        <table:table-row table:style-name="ro1">
          <table:table-cell office:value-type="float" office:value="617.648620605469">
            <text:p>617.6486206055</text:p>
          </table:table-cell>
          <table:table-cell office:value-type="float" office:value="0.005534281">
            <text:p>0.005534281</text:p>
          </table:table-cell>
          <table:table-cell table:number-columns-repeated="4"/>
        </table:table-row>
        <table:table-row table:style-name="ro1">
          <table:table-cell office:value-type="float" office:value="617.767822265625">
            <text:p>617.7678222656</text:p>
          </table:table-cell>
          <table:table-cell office:value-type="float" office:value="0.03192843">
            <text:p>0.03192843</text:p>
          </table:table-cell>
          <table:table-cell table:number-columns-repeated="4"/>
        </table:table-row>
        <table:table-row table:style-name="ro1">
          <table:table-cell office:value-type="float" office:value="617.887023925781">
            <text:p>617.8870239258</text:p>
          </table:table-cell>
          <table:table-cell office:value-type="float" office:value="0.01263075">
            <text:p>0.01263075</text:p>
          </table:table-cell>
          <table:table-cell table:number-columns-repeated="4"/>
        </table:table-row>
        <table:table-row table:style-name="ro1">
          <table:table-cell office:value-type="float" office:value="618.006225585938">
            <text:p>618.0062255859</text:p>
          </table:table-cell>
          <table:table-cell office:value-type="float" office:value="0.004789466">
            <text:p>0.004789466</text:p>
          </table:table-cell>
          <table:table-cell table:number-columns-repeated="4"/>
        </table:table-row>
        <table:table-row table:style-name="ro1">
          <table:table-cell office:value-type="float" office:value="618.125427246094">
            <text:p>618.1254272461</text:p>
          </table:table-cell>
          <table:table-cell office:value-type="float" office:value="0.01086251">
            <text:p>0.01086251</text:p>
          </table:table-cell>
          <table:table-cell table:number-columns-repeated="4"/>
        </table:table-row>
        <table:table-row table:style-name="ro1">
          <table:table-cell office:value-type="float" office:value="618.24462890625">
            <text:p>618.2446289063</text:p>
          </table:table-cell>
          <table:table-cell office:value-type="float" office:value="0.01516368">
            <text:p>0.01516368</text:p>
          </table:table-cell>
          <table:table-cell table:number-columns-repeated="4"/>
        </table:table-row>
        <table:table-row table:style-name="ro1">
          <table:table-cell office:value-type="float" office:value="618.363891601563">
            <text:p>618.3638916016</text:p>
          </table:table-cell>
          <table:table-cell office:value-type="float" office:value="0.01526215">
            <text:p>0.01526215</text:p>
          </table:table-cell>
          <table:table-cell table:number-columns-repeated="4"/>
        </table:table-row>
        <table:table-row table:style-name="ro1">
          <table:table-cell office:value-type="float" office:value="618.483093261719">
            <text:p>618.4830932617</text:p>
          </table:table-cell>
          <table:table-cell office:value-type="float" office:value="0.004265926">
            <text:p>0.004265926</text:p>
          </table:table-cell>
          <table:table-cell table:number-columns-repeated="4"/>
        </table:table-row>
        <table:table-row table:style-name="ro1">
          <table:table-cell office:value-type="float" office:value="618.602294921875">
            <text:p>618.6022949219</text:p>
          </table:table-cell>
          <table:table-cell office:value-type="float" office:value="0.01013429">
            <text:p>0.01013429</text:p>
          </table:table-cell>
          <table:table-cell table:number-columns-repeated="4"/>
        </table:table-row>
        <table:table-row table:style-name="ro1">
          <table:table-cell office:value-type="float" office:value="618.721496582031">
            <text:p>618.721496582</text:p>
          </table:table-cell>
          <table:table-cell office:value-type="float" office:value="0.02410127">
            <text:p>0.02410127</text:p>
          </table:table-cell>
          <table:table-cell table:number-columns-repeated="4"/>
        </table:table-row>
        <table:table-row table:style-name="ro1">
          <table:table-cell office:value-type="float" office:value="618.840759277344">
            <text:p>618.8407592773</text:p>
          </table:table-cell>
          <table:table-cell office:value-type="float" office:value="0.001974171">
            <text:p>0.001974171</text:p>
          </table:table-cell>
          <table:table-cell table:number-columns-repeated="4"/>
        </table:table-row>
        <table:table-row table:style-name="ro1">
          <table:table-cell office:value-type="float" office:value="618.9599609375">
            <text:p>618.9599609375</text:p>
          </table:table-cell>
          <table:table-cell office:value-type="float" office:value="0.01551779">
            <text:p>0.01551779</text:p>
          </table:table-cell>
          <table:table-cell table:number-columns-repeated="4"/>
        </table:table-row>
        <table:table-row table:style-name="ro1">
          <table:table-cell office:value-type="float" office:value="619.079162597656">
            <text:p>619.0791625977</text:p>
          </table:table-cell>
          <table:table-cell office:value-type="float" office:value="-0.001997558">
            <text:p>-0.001997558</text:p>
          </table:table-cell>
          <table:table-cell table:number-columns-repeated="4"/>
        </table:table-row>
        <table:table-row table:style-name="ro1">
          <table:table-cell office:value-type="float" office:value="619.198425292969">
            <text:p>619.198425293</text:p>
          </table:table-cell>
          <table:table-cell office:value-type="float" office:value="0.02187228">
            <text:p>0.02187228</text:p>
          </table:table-cell>
          <table:table-cell table:number-columns-repeated="4"/>
        </table:table-row>
        <table:table-row table:style-name="ro1">
          <table:table-cell office:value-type="float" office:value="619.317626953125">
            <text:p>619.3176269531</text:p>
          </table:table-cell>
          <table:table-cell office:value-type="float" office:value="0.003642086">
            <text:p>0.003642086</text:p>
          </table:table-cell>
          <table:table-cell table:number-columns-repeated="4"/>
        </table:table-row>
        <table:table-row table:style-name="ro1">
          <table:table-cell office:value-type="float" office:value="619.436889648438">
            <text:p>619.4368896484</text:p>
          </table:table-cell>
          <table:table-cell office:value-type="float" office:value="0.01509599">
            <text:p>0.01509599</text:p>
          </table:table-cell>
          <table:table-cell table:number-columns-repeated="4"/>
        </table:table-row>
        <table:table-row table:style-name="ro1">
          <table:table-cell office:value-type="float" office:value="619.556091308594">
            <text:p>619.5560913086</text:p>
          </table:table-cell>
          <table:table-cell office:value-type="float" office:value="0.008908766">
            <text:p>0.008908766</text:p>
          </table:table-cell>
          <table:table-cell table:number-columns-repeated="4"/>
        </table:table-row>
        <table:table-row table:style-name="ro1">
          <table:table-cell office:value-type="float" office:value="619.675354003906">
            <text:p>619.6753540039</text:p>
          </table:table-cell>
          <table:table-cell office:value-type="float" office:value="0.002557795">
            <text:p>0.002557795</text:p>
          </table:table-cell>
          <table:table-cell table:number-columns-repeated="4"/>
        </table:table-row>
        <table:table-row table:style-name="ro1">
          <table:table-cell office:value-type="float" office:value="619.794616699219">
            <text:p>619.7946166992</text:p>
          </table:table-cell>
          <table:table-cell office:value-type="float" office:value="0.009874426">
            <text:p>0.009874426</text:p>
          </table:table-cell>
          <table:table-cell table:number-columns-repeated="4"/>
        </table:table-row>
        <table:table-row table:style-name="ro1">
          <table:table-cell office:value-type="float" office:value="619.913818359375">
            <text:p>619.9138183594</text:p>
          </table:table-cell>
          <table:table-cell office:value-type="float" office:value="-0.002570753">
            <text:p>-0.002570753</text:p>
          </table:table-cell>
          <table:table-cell table:number-columns-repeated="4"/>
        </table:table-row>
        <table:table-row table:style-name="ro1">
          <table:table-cell office:value-type="float" office:value="620.033081054688">
            <text:p>620.0330810547</text:p>
          </table:table-cell>
          <table:table-cell office:value-type="float" office:value="0.02683536">
            <text:p>0.02683536</text:p>
          </table:table-cell>
          <table:table-cell table:number-columns-repeated="4"/>
        </table:table-row>
        <table:table-row table:style-name="ro1">
          <table:table-cell office:value-type="float" office:value="620.152282714844">
            <text:p>620.1522827148</text:p>
          </table:table-cell>
          <table:table-cell office:value-type="float" office:value="0.01262682">
            <text:p>0.01262682</text:p>
          </table:table-cell>
          <table:table-cell table:number-columns-repeated="4"/>
        </table:table-row>
        <table:table-row table:style-name="ro1">
          <table:table-cell office:value-type="float" office:value="620.271545410156">
            <text:p>620.2715454102</text:p>
          </table:table-cell>
          <table:table-cell office:value-type="float" office:value="0.01075243">
            <text:p>0.01075243</text:p>
          </table:table-cell>
          <table:table-cell table:number-columns-repeated="4"/>
        </table:table-row>
        <table:table-row table:style-name="ro1">
          <table:table-cell office:value-type="float" office:value="620.390808105469">
            <text:p>620.3908081055</text:p>
          </table:table-cell>
          <table:table-cell office:value-type="float" office:value="-0.0007540382">
            <text:p>-0.0007540382</text:p>
          </table:table-cell>
          <table:table-cell table:number-columns-repeated="4"/>
        </table:table-row>
        <table:table-row table:style-name="ro1">
          <table:table-cell office:value-type="float" office:value="620.510070800781">
            <text:p>620.5100708008</text:p>
          </table:table-cell>
          <table:table-cell office:value-type="float" office:value="0.004609094">
            <text:p>0.004609094</text:p>
          </table:table-cell>
          <table:table-cell table:number-columns-repeated="4"/>
        </table:table-row>
        <table:table-row table:style-name="ro1">
          <table:table-cell office:value-type="float" office:value="620.629333496094">
            <text:p>620.6293334961</text:p>
          </table:table-cell>
          <table:table-cell office:value-type="float" office:value="0.003220962">
            <text:p>0.003220962</text:p>
          </table:table-cell>
          <table:table-cell table:number-columns-repeated="4"/>
        </table:table-row>
        <table:table-row table:style-name="ro1">
          <table:table-cell office:value-type="float" office:value="620.74853515625">
            <text:p>620.7485351563</text:p>
          </table:table-cell>
          <table:table-cell office:value-type="float" office:value="-0.004038558">
            <text:p>-0.004038558</text:p>
          </table:table-cell>
          <table:table-cell table:number-columns-repeated="4"/>
        </table:table-row>
        <table:table-row table:style-name="ro1">
          <table:table-cell office:value-type="float" office:value="620.867797851563">
            <text:p>620.8677978516</text:p>
          </table:table-cell>
          <table:table-cell office:value-type="float" office:value="0.03423138">
            <text:p>0.03423138</text:p>
          </table:table-cell>
          <table:table-cell table:number-columns-repeated="4"/>
        </table:table-row>
        <table:table-row table:style-name="ro1">
          <table:table-cell office:value-type="float" office:value="620.987060546875">
            <text:p>620.9870605469</text:p>
          </table:table-cell>
          <table:table-cell office:value-type="float" office:value="0.002074184">
            <text:p>0.002074184</text:p>
          </table:table-cell>
          <table:table-cell table:number-columns-repeated="4"/>
        </table:table-row>
        <table:table-row table:style-name="ro1">
          <table:table-cell office:value-type="float" office:value="621.106323242188">
            <text:p>621.1063232422</text:p>
          </table:table-cell>
          <table:table-cell office:value-type="float" office:value="0.002641811">
            <text:p>0.002641811</text:p>
          </table:table-cell>
          <table:table-cell table:number-columns-repeated="4"/>
        </table:table-row>
        <table:table-row table:style-name="ro1">
          <table:table-cell office:value-type="float" office:value="621.2255859375">
            <text:p>621.2255859375</text:p>
          </table:table-cell>
          <table:table-cell office:value-type="float" office:value="0.007559452">
            <text:p>0.007559452</text:p>
          </table:table-cell>
          <table:table-cell table:number-columns-repeated="4"/>
        </table:table-row>
        <table:table-row table:style-name="ro1">
          <table:table-cell office:value-type="float" office:value="621.344848632813">
            <text:p>621.3448486328</text:p>
          </table:table-cell>
          <table:table-cell office:value-type="float" office:value="-0.00112982">
            <text:p>-0.00112982</text:p>
          </table:table-cell>
          <table:table-cell table:number-columns-repeated="4"/>
        </table:table-row>
        <table:table-row table:style-name="ro1">
          <table:table-cell office:value-type="float" office:value="621.464111328125">
            <text:p>621.4641113281</text:p>
          </table:table-cell>
          <table:table-cell office:value-type="float" office:value="0.001987824">
            <text:p>0.001987824</text:p>
          </table:table-cell>
          <table:table-cell table:number-columns-repeated="4"/>
        </table:table-row>
        <table:table-row table:style-name="ro1">
          <table:table-cell office:value-type="float" office:value="621.583374023438">
            <text:p>621.5833740234</text:p>
          </table:table-cell>
          <table:table-cell office:value-type="float" office:value="0.02975914">
            <text:p>0.02975914</text:p>
          </table:table-cell>
          <table:table-cell table:number-columns-repeated="4"/>
        </table:table-row>
        <table:table-row table:style-name="ro1">
          <table:table-cell office:value-type="float" office:value="621.70263671875">
            <text:p>621.7026367188</text:p>
          </table:table-cell>
          <table:table-cell office:value-type="float" office:value="0.008262529">
            <text:p>0.008262529</text:p>
          </table:table-cell>
          <table:table-cell table:number-columns-repeated="4"/>
        </table:table-row>
        <table:table-row table:style-name="ro1">
          <table:table-cell office:value-type="float" office:value="621.821899414063">
            <text:p>621.8218994141</text:p>
          </table:table-cell>
          <table:table-cell office:value-type="float" office:value="0.03569268">
            <text:p>0.03569268</text:p>
          </table:table-cell>
          <table:table-cell table:number-columns-repeated="4"/>
        </table:table-row>
        <table:table-row table:style-name="ro1">
          <table:table-cell office:value-type="float" office:value="621.941223144531">
            <text:p>621.9412231445</text:p>
          </table:table-cell>
          <table:table-cell office:value-type="float" office:value="-0.003333829">
            <text:p>-0.003333829</text:p>
          </table:table-cell>
          <table:table-cell table:number-columns-repeated="4"/>
        </table:table-row>
        <table:table-row table:style-name="ro1">
          <table:table-cell office:value-type="float" office:value="622.060485839844">
            <text:p>622.0604858398</text:p>
          </table:table-cell>
          <table:table-cell office:value-type="float" office:value="0.01731689">
            <text:p>0.01731689</text:p>
          </table:table-cell>
          <table:table-cell table:number-columns-repeated="4"/>
        </table:table-row>
        <table:table-row table:style-name="ro1">
          <table:table-cell office:value-type="float" office:value="622.179748535156">
            <text:p>622.1797485352</text:p>
          </table:table-cell>
          <table:table-cell office:value-type="float" office:value="0.02003003">
            <text:p>0.02003003</text:p>
          </table:table-cell>
          <table:table-cell table:number-columns-repeated="4"/>
        </table:table-row>
        <table:table-row table:style-name="ro1">
          <table:table-cell office:value-type="float" office:value="622.299011230469">
            <text:p>622.2990112305</text:p>
          </table:table-cell>
          <table:table-cell office:value-type="float" office:value="0.002368427">
            <text:p>0.002368427</text:p>
          </table:table-cell>
          <table:table-cell table:number-columns-repeated="4"/>
        </table:table-row>
        <table:table-row table:style-name="ro1">
          <table:table-cell office:value-type="float" office:value="622.418334960938">
            <text:p>622.4183349609</text:p>
          </table:table-cell>
          <table:table-cell office:value-type="float" office:value="0.004563001">
            <text:p>0.004563001</text:p>
          </table:table-cell>
          <table:table-cell table:number-columns-repeated="4"/>
        </table:table-row>
        <table:table-row table:style-name="ro1">
          <table:table-cell office:value-type="float" office:value="622.53759765625">
            <text:p>622.5375976563</text:p>
          </table:table-cell>
          <table:table-cell office:value-type="float" office:value="0.004141034">
            <text:p>0.004141034</text:p>
          </table:table-cell>
          <table:table-cell table:number-columns-repeated="4"/>
        </table:table-row>
        <table:table-row table:style-name="ro1">
          <table:table-cell office:value-type="float" office:value="622.656860351563">
            <text:p>622.6568603516</text:p>
          </table:table-cell>
          <table:table-cell office:value-type="float" office:value="0.0005424015">
            <text:p>0.0005424015</text:p>
          </table:table-cell>
          <table:table-cell table:number-columns-repeated="4"/>
        </table:table-row>
        <table:table-row table:style-name="ro1">
          <table:table-cell office:value-type="float" office:value="622.776184082031">
            <text:p>622.776184082</text:p>
          </table:table-cell>
          <table:table-cell office:value-type="float" office:value="0.00795739">
            <text:p>0.00795739</text:p>
          </table:table-cell>
          <table:table-cell table:number-columns-repeated="4"/>
        </table:table-row>
        <table:table-row table:style-name="ro1">
          <table:table-cell office:value-type="float" office:value="622.895446777344">
            <text:p>622.8954467773</text:p>
          </table:table-cell>
          <table:table-cell office:value-type="float" office:value="0.009216988">
            <text:p>0.009216988</text:p>
          </table:table-cell>
          <table:table-cell table:number-columns-repeated="4"/>
        </table:table-row>
        <table:table-row table:style-name="ro1">
          <table:table-cell office:value-type="float" office:value="623.014709472656">
            <text:p>623.0147094727</text:p>
          </table:table-cell>
          <table:table-cell office:value-type="float" office:value="0.005563794">
            <text:p>0.005563794</text:p>
          </table:table-cell>
          <table:table-cell table:number-columns-repeated="4"/>
        </table:table-row>
        <table:table-row table:style-name="ro1">
          <table:table-cell office:value-type="float" office:value="623.134033203125">
            <text:p>623.1340332031</text:p>
          </table:table-cell>
          <table:table-cell office:value-type="float" office:value="-0.003251888">
            <text:p>-0.003251888</text:p>
          </table:table-cell>
          <table:table-cell table:number-columns-repeated="4"/>
        </table:table-row>
        <table:table-row table:style-name="ro1">
          <table:table-cell office:value-type="float" office:value="623.253295898438">
            <text:p>623.2532958984</text:p>
          </table:table-cell>
          <table:table-cell office:value-type="float" office:value="0.0009999718">
            <text:p>0.0009999718</text:p>
          </table:table-cell>
          <table:table-cell table:number-columns-repeated="4"/>
        </table:table-row>
        <table:table-row table:style-name="ro1">
          <table:table-cell office:value-type="float" office:value="623.372619628906">
            <text:p>623.3726196289</text:p>
          </table:table-cell>
          <table:table-cell office:value-type="float" office:value="0.01195749">
            <text:p>0.01195749</text:p>
          </table:table-cell>
          <table:table-cell table:number-columns-repeated="4"/>
        </table:table-row>
        <table:table-row table:style-name="ro1">
          <table:table-cell office:value-type="float" office:value="623.491943359375">
            <text:p>623.4919433594</text:p>
          </table:table-cell>
          <table:table-cell office:value-type="float" office:value="0.006492928">
            <text:p>0.006492928</text:p>
          </table:table-cell>
          <table:table-cell table:number-columns-repeated="4"/>
        </table:table-row>
        <table:table-row table:style-name="ro1">
          <table:table-cell office:value-type="float" office:value="623.611206054688">
            <text:p>623.6112060547</text:p>
          </table:table-cell>
          <table:table-cell office:value-type="string">
            <text:p>8.556671E-05</text:p>
          </table:table-cell>
          <table:table-cell table:number-columns-repeated="4"/>
        </table:table-row>
        <table:table-row table:style-name="ro1">
          <table:table-cell office:value-type="float" office:value="623.730529785156">
            <text:p>623.7305297852</text:p>
          </table:table-cell>
          <table:table-cell office:value-type="float" office:value="0.007836119">
            <text:p>0.007836119</text:p>
          </table:table-cell>
          <table:table-cell table:number-columns-repeated="4"/>
        </table:table-row>
        <table:table-row table:style-name="ro1">
          <table:table-cell office:value-type="float" office:value="623.849853515625">
            <text:p>623.8498535156</text:p>
          </table:table-cell>
          <table:table-cell office:value-type="float" office:value="0.005557021">
            <text:p>0.005557021</text:p>
          </table:table-cell>
          <table:table-cell table:number-columns-repeated="4"/>
        </table:table-row>
        <table:table-row table:style-name="ro1">
          <table:table-cell office:value-type="float" office:value="623.969116210938">
            <text:p>623.9691162109</text:p>
          </table:table-cell>
          <table:table-cell office:value-type="float" office:value="0.004857031">
            <text:p>0.004857031</text:p>
          </table:table-cell>
          <table:table-cell table:number-columns-repeated="4"/>
        </table:table-row>
        <table:table-row table:style-name="ro1">
          <table:table-cell office:value-type="float" office:value="624.088439941406">
            <text:p>624.0884399414</text:p>
          </table:table-cell>
          <table:table-cell office:value-type="float" office:value="-0.00447818">
            <text:p>-0.00447818</text:p>
          </table:table-cell>
          <table:table-cell table:number-columns-repeated="4"/>
        </table:table-row>
        <table:table-row table:style-name="ro1">
          <table:table-cell office:value-type="float" office:value="624.207763671875">
            <text:p>624.2077636719</text:p>
          </table:table-cell>
          <table:table-cell office:value-type="float" office:value="-0.003747386">
            <text:p>-0.003747386</text:p>
          </table:table-cell>
          <table:table-cell table:number-columns-repeated="4"/>
        </table:table-row>
        <table:table-row table:style-name="ro1">
          <table:table-cell office:value-type="float" office:value="624.327087402344">
            <text:p>624.3270874023</text:p>
          </table:table-cell>
          <table:table-cell office:value-type="float" office:value="0.004625101">
            <text:p>0.004625101</text:p>
          </table:table-cell>
          <table:table-cell table:number-columns-repeated="4"/>
        </table:table-row>
        <table:table-row table:style-name="ro1">
          <table:table-cell office:value-type="float" office:value="624.446350097656">
            <text:p>624.4463500977</text:p>
          </table:table-cell>
          <table:table-cell office:value-type="float" office:value="0.02201101">
            <text:p>0.02201101</text:p>
          </table:table-cell>
          <table:table-cell table:number-columns-repeated="4"/>
        </table:table-row>
        <table:table-row table:style-name="ro1">
          <table:table-cell office:value-type="float" office:value="624.565673828125">
            <text:p>624.5656738281</text:p>
          </table:table-cell>
          <table:table-cell office:value-type="float" office:value="0.01161147">
            <text:p>0.01161147</text:p>
          </table:table-cell>
          <table:table-cell table:number-columns-repeated="4"/>
        </table:table-row>
        <table:table-row table:style-name="ro1">
          <table:table-cell office:value-type="float" office:value="624.684997558594">
            <text:p>624.6849975586</text:p>
          </table:table-cell>
          <table:table-cell office:value-type="float" office:value="0.006904491">
            <text:p>0.006904491</text:p>
          </table:table-cell>
          <table:table-cell table:number-columns-repeated="4"/>
        </table:table-row>
        <table:table-row table:style-name="ro1">
          <table:table-cell office:value-type="float" office:value="624.804321289063">
            <text:p>624.8043212891</text:p>
          </table:table-cell>
          <table:table-cell office:value-type="float" office:value="0.004741134">
            <text:p>0.004741134</text:p>
          </table:table-cell>
          <table:table-cell table:number-columns-repeated="4"/>
        </table:table-row>
        <table:table-row table:style-name="ro1">
          <table:table-cell office:value-type="float" office:value="624.923645019531">
            <text:p>624.9236450195</text:p>
          </table:table-cell>
          <table:table-cell office:value-type="float" office:value="0.01007673">
            <text:p>0.01007673</text:p>
          </table:table-cell>
          <table:table-cell table:number-columns-repeated="4"/>
        </table:table-row>
        <table:table-row table:style-name="ro1">
          <table:table-cell office:value-type="float" office:value="625.04296875">
            <text:p>625.04296875</text:p>
          </table:table-cell>
          <table:table-cell office:value-type="float" office:value="-0.004012845">
            <text:p>-0.004012845</text:p>
          </table:table-cell>
          <table:table-cell table:number-columns-repeated="4"/>
        </table:table-row>
        <table:table-row table:style-name="ro1">
          <table:table-cell office:value-type="float" office:value="625.162292480469">
            <text:p>625.1622924805</text:p>
          </table:table-cell>
          <table:table-cell office:value-type="float" office:value="0.002877917">
            <text:p>0.002877917</text:p>
          </table:table-cell>
          <table:table-cell table:number-columns-repeated="4"/>
        </table:table-row>
        <table:table-row table:style-name="ro1">
          <table:table-cell office:value-type="float" office:value="625.281616210938">
            <text:p>625.2816162109</text:p>
          </table:table-cell>
          <table:table-cell office:value-type="float" office:value="0.01054992">
            <text:p>0.01054992</text:p>
          </table:table-cell>
          <table:table-cell table:number-columns-repeated="4"/>
        </table:table-row>
        <table:table-row table:style-name="ro1">
          <table:table-cell office:value-type="float" office:value="625.400939941406">
            <text:p>625.4009399414</text:p>
          </table:table-cell>
          <table:table-cell office:value-type="float" office:value="0.003963486">
            <text:p>0.003963486</text:p>
          </table:table-cell>
          <table:table-cell table:number-columns-repeated="4"/>
        </table:table-row>
        <table:table-row table:style-name="ro1">
          <table:table-cell office:value-type="float" office:value="625.520263671875">
            <text:p>625.5202636719</text:p>
          </table:table-cell>
          <table:table-cell office:value-type="float" office:value="0.001874409">
            <text:p>0.001874409</text:p>
          </table:table-cell>
          <table:table-cell table:number-columns-repeated="4"/>
        </table:table-row>
        <table:table-row table:style-name="ro1">
          <table:table-cell office:value-type="float" office:value="625.639587402344">
            <text:p>625.6395874023</text:p>
          </table:table-cell>
          <table:table-cell office:value-type="float" office:value="0.008802793">
            <text:p>0.008802793</text:p>
          </table:table-cell>
          <table:table-cell table:number-columns-repeated="4"/>
        </table:table-row>
        <table:table-row table:style-name="ro1">
          <table:table-cell office:value-type="float" office:value="625.758911132813">
            <text:p>625.7589111328</text:p>
          </table:table-cell>
          <table:table-cell office:value-type="float" office:value="0.01112228">
            <text:p>0.01112228</text:p>
          </table:table-cell>
          <table:table-cell table:number-columns-repeated="4"/>
        </table:table-row>
        <table:table-row table:style-name="ro1">
          <table:table-cell office:value-type="float" office:value="625.878295898438">
            <text:p>625.8782958984</text:p>
          </table:table-cell>
          <table:table-cell office:value-type="string">
            <text:p>3.782652E-05</text:p>
          </table:table-cell>
          <table:table-cell table:number-columns-repeated="4"/>
        </table:table-row>
        <table:table-row table:style-name="ro1">
          <table:table-cell office:value-type="float" office:value="625.997619628906">
            <text:p>625.9976196289</text:p>
          </table:table-cell>
          <table:table-cell office:value-type="float" office:value="-0.001838242">
            <text:p>-0.001838242</text:p>
          </table:table-cell>
          <table:table-cell table:number-columns-repeated="4"/>
        </table:table-row>
        <table:table-row table:style-name="ro1">
          <table:table-cell office:value-type="float" office:value="626.116943359375">
            <text:p>626.1169433594</text:p>
          </table:table-cell>
          <table:table-cell office:value-type="float" office:value="0.008852796">
            <text:p>0.008852796</text:p>
          </table:table-cell>
          <table:table-cell table:number-columns-repeated="4"/>
        </table:table-row>
        <table:table-row table:style-name="ro1">
          <table:table-cell office:value-type="float" office:value="626.236267089844">
            <text:p>626.2362670898</text:p>
          </table:table-cell>
          <table:table-cell office:value-type="float" office:value="0.01138782">
            <text:p>0.01138782</text:p>
          </table:table-cell>
          <table:table-cell table:number-columns-repeated="4"/>
        </table:table-row>
        <table:table-row table:style-name="ro1">
          <table:table-cell office:value-type="float" office:value="626.355651855469">
            <text:p>626.3556518555</text:p>
          </table:table-cell>
          <table:table-cell office:value-type="float" office:value="0.02566564">
            <text:p>0.02566564</text:p>
          </table:table-cell>
          <table:table-cell table:number-columns-repeated="4"/>
        </table:table-row>
        <table:table-row table:style-name="ro1">
          <table:table-cell office:value-type="float" office:value="626.474975585938">
            <text:p>626.4749755859</text:p>
          </table:table-cell>
          <table:table-cell office:value-type="float" office:value="-0.003008415">
            <text:p>-0.003008415</text:p>
          </table:table-cell>
          <table:table-cell table:number-columns-repeated="4"/>
        </table:table-row>
        <table:table-row table:style-name="ro1">
          <table:table-cell office:value-type="float" office:value="626.594360351563">
            <text:p>626.5943603516</text:p>
          </table:table-cell>
          <table:table-cell office:value-type="float" office:value="0.02020443">
            <text:p>0.02020443</text:p>
          </table:table-cell>
          <table:table-cell table:number-columns-repeated="4"/>
        </table:table-row>
        <table:table-row table:style-name="ro1">
          <table:table-cell office:value-type="float" office:value="626.713684082031">
            <text:p>626.713684082</text:p>
          </table:table-cell>
          <table:table-cell office:value-type="float" office:value="0.004371739">
            <text:p>0.004371739</text:p>
          </table:table-cell>
          <table:table-cell table:number-columns-repeated="4"/>
        </table:table-row>
        <table:table-row table:style-name="ro1">
          <table:table-cell office:value-type="float" office:value="626.8330078125">
            <text:p>626.8330078125</text:p>
          </table:table-cell>
          <table:table-cell office:value-type="float" office:value="0.02149351">
            <text:p>0.02149351</text:p>
          </table:table-cell>
          <table:table-cell table:number-columns-repeated="4"/>
        </table:table-row>
        <table:table-row table:style-name="ro1">
          <table:table-cell office:value-type="float" office:value="626.952392578125">
            <text:p>626.9523925781</text:p>
          </table:table-cell>
          <table:table-cell office:value-type="float" office:value="0.01095495">
            <text:p>0.01095495</text:p>
          </table:table-cell>
          <table:table-cell table:number-columns-repeated="4"/>
        </table:table-row>
        <table:table-row table:style-name="ro1">
          <table:table-cell office:value-type="float" office:value="627.071716308594">
            <text:p>627.0717163086</text:p>
          </table:table-cell>
          <table:table-cell office:value-type="float" office:value="0.0148623">
            <text:p>0.0148623</text:p>
          </table:table-cell>
          <table:table-cell table:number-columns-repeated="4"/>
        </table:table-row>
        <table:table-row table:style-name="ro1">
          <table:table-cell office:value-type="float" office:value="627.191101074219">
            <text:p>627.1911010742</text:p>
          </table:table-cell>
          <table:table-cell office:value-type="float" office:value="0.01804084">
            <text:p>0.01804084</text:p>
          </table:table-cell>
          <table:table-cell table:number-columns-repeated="4"/>
        </table:table-row>
        <table:table-row table:style-name="ro1">
          <table:table-cell office:value-type="float" office:value="627.310424804688">
            <text:p>627.3104248047</text:p>
          </table:table-cell>
          <table:table-cell office:value-type="float" office:value="0.00626323">
            <text:p>0.00626323</text:p>
          </table:table-cell>
          <table:table-cell table:number-columns-repeated="4"/>
        </table:table-row>
        <table:table-row table:style-name="ro1">
          <table:table-cell office:value-type="float" office:value="627.429809570313">
            <text:p>627.4298095703</text:p>
          </table:table-cell>
          <table:table-cell office:value-type="float" office:value="-0.003862808">
            <text:p>-0.003862808</text:p>
          </table:table-cell>
          <table:table-cell table:number-columns-repeated="4"/>
        </table:table-row>
        <table:table-row table:style-name="ro1">
          <table:table-cell office:value-type="float" office:value="627.549194335938">
            <text:p>627.5491943359</text:p>
          </table:table-cell>
          <table:table-cell office:value-type="float" office:value="-0.0005163118">
            <text:p>-0.0005163118</text:p>
          </table:table-cell>
          <table:table-cell table:number-columns-repeated="4"/>
        </table:table-row>
        <table:table-row table:style-name="ro1">
          <table:table-cell office:value-type="float" office:value="627.668518066406">
            <text:p>627.6685180664</text:p>
          </table:table-cell>
          <table:table-cell office:value-type="float" office:value="0.01520169">
            <text:p>0.01520169</text:p>
          </table:table-cell>
          <table:table-cell table:number-columns-repeated="4"/>
        </table:table-row>
        <table:table-row table:style-name="ro1">
          <table:table-cell office:value-type="float" office:value="627.787902832031">
            <text:p>627.787902832</text:p>
          </table:table-cell>
          <table:table-cell office:value-type="float" office:value="0.01231965">
            <text:p>0.01231965</text:p>
          </table:table-cell>
          <table:table-cell table:number-columns-repeated="4"/>
        </table:table-row>
        <table:table-row table:style-name="ro1">
          <table:table-cell office:value-type="float" office:value="627.907287597656">
            <text:p>627.9072875977</text:p>
          </table:table-cell>
          <table:table-cell office:value-type="float" office:value="0.002605802">
            <text:p>0.002605802</text:p>
          </table:table-cell>
          <table:table-cell table:number-columns-repeated="4"/>
        </table:table-row>
        <table:table-row table:style-name="ro1">
          <table:table-cell office:value-type="float" office:value="628.026672363281">
            <text:p>628.0266723633</text:p>
          </table:table-cell>
          <table:table-cell office:value-type="float" office:value="-0.0004992938">
            <text:p>-0.0004992938</text:p>
          </table:table-cell>
          <table:table-cell table:number-columns-repeated="4"/>
        </table:table-row>
        <table:table-row table:style-name="ro1">
          <table:table-cell office:value-type="float" office:value="628.14599609375">
            <text:p>628.1459960938</text:p>
          </table:table-cell>
          <table:table-cell office:value-type="float" office:value="-0.00216926">
            <text:p>-0.00216926</text:p>
          </table:table-cell>
          <table:table-cell table:number-columns-repeated="4"/>
        </table:table-row>
        <table:table-row table:style-name="ro1">
          <table:table-cell office:value-type="float" office:value="628.265380859375">
            <text:p>628.2653808594</text:p>
          </table:table-cell>
          <table:table-cell office:value-type="float" office:value="0.01344499">
            <text:p>0.01344499</text:p>
          </table:table-cell>
          <table:table-cell table:number-columns-repeated="4"/>
        </table:table-row>
        <table:table-row table:style-name="ro1">
          <table:table-cell office:value-type="float" office:value="628.384765625">
            <text:p>628.384765625</text:p>
          </table:table-cell>
          <table:table-cell office:value-type="float" office:value="0.0178567">
            <text:p>0.0178567</text:p>
          </table:table-cell>
          <table:table-cell table:number-columns-repeated="4"/>
        </table:table-row>
        <table:table-row table:style-name="ro1">
          <table:table-cell office:value-type="float" office:value="628.504150390625">
            <text:p>628.5041503906</text:p>
          </table:table-cell>
          <table:table-cell office:value-type="float" office:value="-0.004492704">
            <text:p>-0.004492704</text:p>
          </table:table-cell>
          <table:table-cell table:number-columns-repeated="4"/>
        </table:table-row>
        <table:table-row table:style-name="ro1">
          <table:table-cell office:value-type="float" office:value="628.62353515625">
            <text:p>628.6235351563</text:p>
          </table:table-cell>
          <table:table-cell office:value-type="float" office:value="0.009016016">
            <text:p>0.009016016</text:p>
          </table:table-cell>
          <table:table-cell table:number-columns-repeated="4"/>
        </table:table-row>
        <table:table-row table:style-name="ro1">
          <table:table-cell office:value-type="float" office:value="628.742919921875">
            <text:p>628.7429199219</text:p>
          </table:table-cell>
          <table:table-cell office:value-type="float" office:value="-0.002859136">
            <text:p>-0.002859136</text:p>
          </table:table-cell>
          <table:table-cell table:number-columns-repeated="4"/>
        </table:table-row>
        <table:table-row table:style-name="ro1">
          <table:table-cell office:value-type="float" office:value="628.8623046875">
            <text:p>628.8623046875</text:p>
          </table:table-cell>
          <table:table-cell office:value-type="float" office:value="0.001210804">
            <text:p>0.001210804</text:p>
          </table:table-cell>
          <table:table-cell table:number-columns-repeated="4"/>
        </table:table-row>
        <table:table-row table:style-name="ro1">
          <table:table-cell office:value-type="float" office:value="628.981689453125">
            <text:p>628.9816894531</text:p>
          </table:table-cell>
          <table:table-cell office:value-type="string">
            <text:p>-8.26648E-05</text:p>
          </table:table-cell>
          <table:table-cell table:number-columns-repeated="4"/>
        </table:table-row>
        <table:table-row table:style-name="ro1">
          <table:table-cell office:value-type="float" office:value="629.10107421875">
            <text:p>629.1010742188</text:p>
          </table:table-cell>
          <table:table-cell office:value-type="float" office:value="-0.001118495">
            <text:p>-0.001118495</text:p>
          </table:table-cell>
          <table:table-cell table:number-columns-repeated="4"/>
        </table:table-row>
        <table:table-row table:style-name="ro1">
          <table:table-cell office:value-type="float" office:value="629.220458984375">
            <text:p>629.2204589844</text:p>
          </table:table-cell>
          <table:table-cell office:value-type="float" office:value="0.02657971">
            <text:p>0.02657971</text:p>
          </table:table-cell>
          <table:table-cell table:number-columns-repeated="4"/>
        </table:table-row>
        <table:table-row table:style-name="ro1">
          <table:table-cell office:value-type="float" office:value="629.33984375">
            <text:p>629.33984375</text:p>
          </table:table-cell>
          <table:table-cell office:value-type="float" office:value="0.01572917">
            <text:p>0.01572917</text:p>
          </table:table-cell>
          <table:table-cell table:number-columns-repeated="4"/>
        </table:table-row>
        <table:table-row table:style-name="ro1">
          <table:table-cell office:value-type="float" office:value="629.459228515625">
            <text:p>629.4592285156</text:p>
          </table:table-cell>
          <table:table-cell office:value-type="float" office:value="0.01578159">
            <text:p>0.01578159</text:p>
          </table:table-cell>
          <table:table-cell table:number-columns-repeated="4"/>
        </table:table-row>
        <table:table-row table:style-name="ro1">
          <table:table-cell office:value-type="float" office:value="629.57861328125">
            <text:p>629.5786132813</text:p>
          </table:table-cell>
          <table:table-cell office:value-type="float" office:value="-0.002548148">
            <text:p>-0.002548148</text:p>
          </table:table-cell>
          <table:table-cell table:number-columns-repeated="4"/>
        </table:table-row>
        <table:table-row table:style-name="ro1">
          <table:table-cell office:value-type="float" office:value="629.697998046875">
            <text:p>629.6979980469</text:p>
          </table:table-cell>
          <table:table-cell office:value-type="float" office:value="0.001827674">
            <text:p>0.001827674</text:p>
          </table:table-cell>
          <table:table-cell table:number-columns-repeated="4"/>
        </table:table-row>
        <table:table-row table:style-name="ro1">
          <table:table-cell office:value-type="float" office:value="629.8173828125">
            <text:p>629.8173828125</text:p>
          </table:table-cell>
          <table:table-cell office:value-type="float" office:value="0.005844427">
            <text:p>0.005844427</text:p>
          </table:table-cell>
          <table:table-cell table:number-columns-repeated="4"/>
        </table:table-row>
        <table:table-row table:style-name="ro1">
          <table:table-cell office:value-type="float" office:value="629.936828613281">
            <text:p>629.9368286133</text:p>
          </table:table-cell>
          <table:table-cell office:value-type="float" office:value="0.03608244">
            <text:p>0.03608244</text:p>
          </table:table-cell>
          <table:table-cell table:number-columns-repeated="4"/>
        </table:table-row>
        <table:table-row table:style-name="ro1">
          <table:table-cell office:value-type="float" office:value="630.056213378906">
            <text:p>630.0562133789</text:p>
          </table:table-cell>
          <table:table-cell office:value-type="float" office:value="0.01795529">
            <text:p>0.01795529</text:p>
          </table:table-cell>
          <table:table-cell table:number-columns-repeated="4"/>
        </table:table-row>
        <table:table-row table:style-name="ro1">
          <table:table-cell office:value-type="float" office:value="630.175598144531">
            <text:p>630.1755981445</text:p>
          </table:table-cell>
          <table:table-cell office:value-type="float" office:value="0.0168272">
            <text:p>0.0168272</text:p>
          </table:table-cell>
          <table:table-cell table:number-columns-repeated="4"/>
        </table:table-row>
        <table:table-row table:style-name="ro1">
          <table:table-cell office:value-type="float" office:value="630.295043945313">
            <text:p>630.2950439453</text:p>
          </table:table-cell>
          <table:table-cell office:value-type="float" office:value="-0.0003654341">
            <text:p>-0.0003654341</text:p>
          </table:table-cell>
          <table:table-cell table:number-columns-repeated="4"/>
        </table:table-row>
        <table:table-row table:style-name="ro1">
          <table:table-cell office:value-type="float" office:value="630.414428710938">
            <text:p>630.4144287109</text:p>
          </table:table-cell>
          <table:table-cell office:value-type="float" office:value="0.01290179">
            <text:p>0.01290179</text:p>
          </table:table-cell>
          <table:table-cell table:number-columns-repeated="4"/>
        </table:table-row>
        <table:table-row table:style-name="ro1">
          <table:table-cell office:value-type="float" office:value="630.533813476563">
            <text:p>630.5338134766</text:p>
          </table:table-cell>
          <table:table-cell office:value-type="float" office:value="0.004447341">
            <text:p>0.004447341</text:p>
          </table:table-cell>
          <table:table-cell table:number-columns-repeated="4"/>
        </table:table-row>
        <table:table-row table:style-name="ro1">
          <table:table-cell office:value-type="float" office:value="630.653259277344">
            <text:p>630.6532592773</text:p>
          </table:table-cell>
          <table:table-cell office:value-type="float" office:value="-0.002003669">
            <text:p>-0.002003669</text:p>
          </table:table-cell>
          <table:table-cell table:number-columns-repeated="4"/>
        </table:table-row>
        <table:table-row table:style-name="ro1">
          <table:table-cell office:value-type="float" office:value="630.772644042969">
            <text:p>630.772644043</text:p>
          </table:table-cell>
          <table:table-cell office:value-type="float" office:value="0.003526428">
            <text:p>0.003526428</text:p>
          </table:table-cell>
          <table:table-cell table:number-columns-repeated="4"/>
        </table:table-row>
        <table:table-row table:style-name="ro1">
          <table:table-cell office:value-type="float" office:value="630.89208984375">
            <text:p>630.8920898438</text:p>
          </table:table-cell>
          <table:table-cell office:value-type="float" office:value="0.009534079">
            <text:p>0.009534079</text:p>
          </table:table-cell>
          <table:table-cell table:number-columns-repeated="4"/>
        </table:table-row>
        <table:table-row table:style-name="ro1">
          <table:table-cell office:value-type="float" office:value="631.011474609375">
            <text:p>631.0114746094</text:p>
          </table:table-cell>
          <table:table-cell office:value-type="float" office:value="0.01636776">
            <text:p>0.01636776</text:p>
          </table:table-cell>
          <table:table-cell table:number-columns-repeated="4"/>
        </table:table-row>
        <table:table-row table:style-name="ro1">
          <table:table-cell office:value-type="float" office:value="631.130920410156">
            <text:p>631.1309204102</text:p>
          </table:table-cell>
          <table:table-cell office:value-type="float" office:value="0.005117208">
            <text:p>0.005117208</text:p>
          </table:table-cell>
          <table:table-cell table:number-columns-repeated="4"/>
        </table:table-row>
        <table:table-row table:style-name="ro1">
          <table:table-cell office:value-type="float" office:value="631.250305175781">
            <text:p>631.2503051758</text:p>
          </table:table-cell>
          <table:table-cell office:value-type="float" office:value="0.004168564">
            <text:p>0.004168564</text:p>
          </table:table-cell>
          <table:table-cell table:number-columns-repeated="4"/>
        </table:table-row>
        <table:table-row table:style-name="ro1">
          <table:table-cell office:value-type="float" office:value="631.369750976563">
            <text:p>631.3697509766</text:p>
          </table:table-cell>
          <table:table-cell office:value-type="float" office:value="0.01221604">
            <text:p>0.01221604</text:p>
          </table:table-cell>
          <table:table-cell table:number-columns-repeated="4"/>
        </table:table-row>
        <table:table-row table:style-name="ro1">
          <table:table-cell office:value-type="float" office:value="631.489135742188">
            <text:p>631.4891357422</text:p>
          </table:table-cell>
          <table:table-cell office:value-type="float" office:value="0.01785927">
            <text:p>0.01785927</text:p>
          </table:table-cell>
          <table:table-cell table:number-columns-repeated="4"/>
        </table:table-row>
        <table:table-row table:style-name="ro1">
          <table:table-cell office:value-type="float" office:value="631.608581542969">
            <text:p>631.608581543</text:p>
          </table:table-cell>
          <table:table-cell office:value-type="float" office:value="-0.0007074351">
            <text:p>-0.0007074351</text:p>
          </table:table-cell>
          <table:table-cell table:number-columns-repeated="4"/>
        </table:table-row>
        <table:table-row table:style-name="ro1">
          <table:table-cell office:value-type="float" office:value="631.72802734375">
            <text:p>631.7280273438</text:p>
          </table:table-cell>
          <table:table-cell office:value-type="float" office:value="0.01347928">
            <text:p>0.01347928</text:p>
          </table:table-cell>
          <table:table-cell table:number-columns-repeated="4"/>
        </table:table-row>
        <table:table-row table:style-name="ro1">
          <table:table-cell office:value-type="float" office:value="631.847412109375">
            <text:p>631.8474121094</text:p>
          </table:table-cell>
          <table:table-cell office:value-type="float" office:value="0.002800243">
            <text:p>0.002800243</text:p>
          </table:table-cell>
          <table:table-cell table:number-columns-repeated="4"/>
        </table:table-row>
        <table:table-row table:style-name="ro1">
          <table:table-cell office:value-type="float" office:value="631.966857910156">
            <text:p>631.9668579102</text:p>
          </table:table-cell>
          <table:table-cell office:value-type="float" office:value="0.02173628">
            <text:p>0.02173628</text:p>
          </table:table-cell>
          <table:table-cell table:number-columns-repeated="4"/>
        </table:table-row>
        <table:table-row table:style-name="ro1">
          <table:table-cell office:value-type="float" office:value="632.086303710938">
            <text:p>632.0863037109</text:p>
          </table:table-cell>
          <table:table-cell office:value-type="float" office:value="-0.003233019">
            <text:p>-0.003233019</text:p>
          </table:table-cell>
          <table:table-cell table:number-columns-repeated="4"/>
        </table:table-row>
        <table:table-row table:style-name="ro1">
          <table:table-cell office:value-type="float" office:value="632.205749511719">
            <text:p>632.2057495117</text:p>
          </table:table-cell>
          <table:table-cell office:value-type="float" office:value="0.005546873">
            <text:p>0.005546873</text:p>
          </table:table-cell>
          <table:table-cell table:number-columns-repeated="4"/>
        </table:table-row>
        <table:table-row table:style-name="ro1">
          <table:table-cell office:value-type="float" office:value="632.3251953125">
            <text:p>632.3251953125</text:p>
          </table:table-cell>
          <table:table-cell office:value-type="float" office:value="0.004920365">
            <text:p>0.004920365</text:p>
          </table:table-cell>
          <table:table-cell table:number-columns-repeated="4"/>
        </table:table-row>
        <table:table-row table:style-name="ro1">
          <table:table-cell office:value-type="float" office:value="632.444580078125">
            <text:p>632.4445800781</text:p>
          </table:table-cell>
          <table:table-cell office:value-type="float" office:value="0.01627766">
            <text:p>0.01627766</text:p>
          </table:table-cell>
          <table:table-cell table:number-columns-repeated="4"/>
        </table:table-row>
        <table:table-row table:style-name="ro1">
          <table:table-cell office:value-type="float" office:value="632.564025878906">
            <text:p>632.5640258789</text:p>
          </table:table-cell>
          <table:table-cell office:value-type="float" office:value="0.004266558">
            <text:p>0.004266558</text:p>
          </table:table-cell>
          <table:table-cell table:number-columns-repeated="4"/>
        </table:table-row>
        <table:table-row table:style-name="ro1">
          <table:table-cell office:value-type="float" office:value="632.683471679688">
            <text:p>632.6834716797</text:p>
          </table:table-cell>
          <table:table-cell office:value-type="float" office:value="0.006782142">
            <text:p>0.006782142</text:p>
          </table:table-cell>
          <table:table-cell table:number-columns-repeated="4"/>
        </table:table-row>
        <table:table-row table:style-name="ro1">
          <table:table-cell office:value-type="float" office:value="632.802917480469">
            <text:p>632.8029174805</text:p>
          </table:table-cell>
          <table:table-cell office:value-type="float" office:value="0.001656695">
            <text:p>0.001656695</text:p>
          </table:table-cell>
          <table:table-cell table:number-columns-repeated="4"/>
        </table:table-row>
        <table:table-row table:style-name="ro1">
          <table:table-cell office:value-type="float" office:value="632.92236328125">
            <text:p>632.9223632813</text:p>
          </table:table-cell>
          <table:table-cell office:value-type="float" office:value="-0.002698708">
            <text:p>-0.002698708</text:p>
          </table:table-cell>
          <table:table-cell table:number-columns-repeated="4"/>
        </table:table-row>
        <table:table-row table:style-name="ro1">
          <table:table-cell office:value-type="float" office:value="633.041809082031">
            <text:p>633.041809082</text:p>
          </table:table-cell>
          <table:table-cell office:value-type="float" office:value="0.01307217">
            <text:p>0.01307217</text:p>
          </table:table-cell>
          <table:table-cell table:number-columns-repeated="4"/>
        </table:table-row>
        <table:table-row table:style-name="ro1">
          <table:table-cell office:value-type="float" office:value="633.161254882813">
            <text:p>633.1612548828</text:p>
          </table:table-cell>
          <table:table-cell office:value-type="float" office:value="0.03833222">
            <text:p>0.03833222</text:p>
          </table:table-cell>
          <table:table-cell table:number-columns-repeated="4"/>
        </table:table-row>
        <table:table-row table:style-name="ro1">
          <table:table-cell office:value-type="float" office:value="633.280700683594">
            <text:p>633.2807006836</text:p>
          </table:table-cell>
          <table:table-cell office:value-type="float" office:value="-0.001888902">
            <text:p>-0.001888902</text:p>
          </table:table-cell>
          <table:table-cell table:number-columns-repeated="4"/>
        </table:table-row>
        <table:table-row table:style-name="ro1">
          <table:table-cell office:value-type="float" office:value="633.400146484375">
            <text:p>633.4001464844</text:p>
          </table:table-cell>
          <table:table-cell office:value-type="float" office:value="0.003329019">
            <text:p>0.003329019</text:p>
          </table:table-cell>
          <table:table-cell table:number-columns-repeated="4"/>
        </table:table-row>
        <table:table-row table:style-name="ro1">
          <table:table-cell office:value-type="float" office:value="633.519592285156">
            <text:p>633.5195922852</text:p>
          </table:table-cell>
          <table:table-cell office:value-type="float" office:value="0.0001172139">
            <text:p>0.0001172139</text:p>
          </table:table-cell>
          <table:table-cell table:number-columns-repeated="4"/>
        </table:table-row>
        <table:table-row table:style-name="ro1">
          <table:table-cell office:value-type="float" office:value="633.639038085938">
            <text:p>633.6390380859</text:p>
          </table:table-cell>
          <table:table-cell office:value-type="float" office:value="0.01536573">
            <text:p>0.01536573</text:p>
          </table:table-cell>
          <table:table-cell table:number-columns-repeated="4"/>
        </table:table-row>
        <table:table-row table:style-name="ro1">
          <table:table-cell office:value-type="float" office:value="633.758544921875">
            <text:p>633.7585449219</text:p>
          </table:table-cell>
          <table:table-cell office:value-type="float" office:value="-0.004610096">
            <text:p>-0.004610096</text:p>
          </table:table-cell>
          <table:table-cell table:number-columns-repeated="4"/>
        </table:table-row>
        <table:table-row table:style-name="ro1">
          <table:table-cell office:value-type="float" office:value="633.877990722656">
            <text:p>633.8779907227</text:p>
          </table:table-cell>
          <table:table-cell office:value-type="float" office:value="0.004595901">
            <text:p>0.004595901</text:p>
          </table:table-cell>
          <table:table-cell table:number-columns-repeated="4"/>
        </table:table-row>
        <table:table-row table:style-name="ro1">
          <table:table-cell office:value-type="float" office:value="633.997436523438">
            <text:p>633.9974365234</text:p>
          </table:table-cell>
          <table:table-cell office:value-type="float" office:value="0.002069234">
            <text:p>0.002069234</text:p>
          </table:table-cell>
          <table:table-cell table:number-columns-repeated="4"/>
        </table:table-row>
        <table:table-row table:style-name="ro1">
          <table:table-cell office:value-type="float" office:value="634.116882324219">
            <text:p>634.1168823242</text:p>
          </table:table-cell>
          <table:table-cell office:value-type="float" office:value="-0.002344663">
            <text:p>-0.002344663</text:p>
          </table:table-cell>
          <table:table-cell table:number-columns-repeated="4"/>
        </table:table-row>
        <table:table-row table:style-name="ro1">
          <table:table-cell office:value-type="float" office:value="634.236389160156">
            <text:p>634.2363891602</text:p>
          </table:table-cell>
          <table:table-cell office:value-type="float" office:value="-0.001824404">
            <text:p>-0.001824404</text:p>
          </table:table-cell>
          <table:table-cell table:number-columns-repeated="4"/>
        </table:table-row>
        <table:table-row table:style-name="ro1">
          <table:table-cell office:value-type="float" office:value="634.355834960938">
            <text:p>634.3558349609</text:p>
          </table:table-cell>
          <table:table-cell office:value-type="float" office:value="0.005302879">
            <text:p>0.005302879</text:p>
          </table:table-cell>
          <table:table-cell table:number-columns-repeated="4"/>
        </table:table-row>
        <table:table-row table:style-name="ro1">
          <table:table-cell office:value-type="float" office:value="634.475280761719">
            <text:p>634.4752807617</text:p>
          </table:table-cell>
          <table:table-cell office:value-type="float" office:value="0.0005940629">
            <text:p>0.0005940629</text:p>
          </table:table-cell>
          <table:table-cell table:number-columns-repeated="4"/>
        </table:table-row>
        <table:table-row table:style-name="ro1">
          <table:table-cell office:value-type="float" office:value="634.594787597656">
            <text:p>634.5947875977</text:p>
          </table:table-cell>
          <table:table-cell office:value-type="float" office:value="0.0267755">
            <text:p>0.0267755</text:p>
          </table:table-cell>
          <table:table-cell table:number-columns-repeated="4"/>
        </table:table-row>
        <table:table-row table:style-name="ro1">
          <table:table-cell office:value-type="float" office:value="634.714233398438">
            <text:p>634.7142333984</text:p>
          </table:table-cell>
          <table:table-cell office:value-type="float" office:value="-0.001230927">
            <text:p>-0.001230927</text:p>
          </table:table-cell>
          <table:table-cell table:number-columns-repeated="4"/>
        </table:table-row>
        <table:table-row table:style-name="ro1">
          <table:table-cell office:value-type="float" office:value="634.833679199219">
            <text:p>634.8336791992</text:p>
          </table:table-cell>
          <table:table-cell office:value-type="float" office:value="-0.003088692">
            <text:p>-0.003088692</text:p>
          </table:table-cell>
          <table:table-cell table:number-columns-repeated="4"/>
        </table:table-row>
        <table:table-row table:style-name="ro1">
          <table:table-cell office:value-type="float" office:value="634.953186035156">
            <text:p>634.9531860352</text:p>
          </table:table-cell>
          <table:table-cell office:value-type="float" office:value="0.009961602">
            <text:p>0.009961602</text:p>
          </table:table-cell>
          <table:table-cell table:number-columns-repeated="4"/>
        </table:table-row>
        <table:table-row table:style-name="ro1">
          <table:table-cell office:value-type="float" office:value="635.072631835938">
            <text:p>635.0726318359</text:p>
          </table:table-cell>
          <table:table-cell office:value-type="float" office:value="0.01271476">
            <text:p>0.01271476</text:p>
          </table:table-cell>
          <table:table-cell table:number-columns-repeated="4"/>
        </table:table-row>
        <table:table-row table:style-name="ro1">
          <table:table-cell office:value-type="float" office:value="635.192138671875">
            <text:p>635.1921386719</text:p>
          </table:table-cell>
          <table:table-cell office:value-type="float" office:value="0.002974624">
            <text:p>0.002974624</text:p>
          </table:table-cell>
          <table:table-cell table:number-columns-repeated="4"/>
        </table:table-row>
        <table:table-row table:style-name="ro1">
          <table:table-cell office:value-type="float" office:value="635.311584472656">
            <text:p>635.3115844727</text:p>
          </table:table-cell>
          <table:table-cell office:value-type="float" office:value="-0.007654584">
            <text:p>-0.007654584</text:p>
          </table:table-cell>
          <table:table-cell table:number-columns-repeated="4"/>
        </table:table-row>
        <table:table-row table:style-name="ro1">
          <table:table-cell office:value-type="float" office:value="635.431091308594">
            <text:p>635.4310913086</text:p>
          </table:table-cell>
          <table:table-cell office:value-type="float" office:value="0.02314332">
            <text:p>0.02314332</text:p>
          </table:table-cell>
          <table:table-cell table:number-columns-repeated="4"/>
        </table:table-row>
        <table:table-row table:style-name="ro1">
          <table:table-cell office:value-type="float" office:value="635.550598144531">
            <text:p>635.5505981445</text:p>
          </table:table-cell>
          <table:table-cell office:value-type="float" office:value="0.01127749">
            <text:p>0.01127749</text:p>
          </table:table-cell>
          <table:table-cell table:number-columns-repeated="4"/>
        </table:table-row>
        <table:table-row table:style-name="ro1">
          <table:table-cell office:value-type="float" office:value="635.670043945313">
            <text:p>635.6700439453</text:p>
          </table:table-cell>
          <table:table-cell office:value-type="float" office:value="-0.003423996">
            <text:p>-0.003423996</text:p>
          </table:table-cell>
          <table:table-cell table:number-columns-repeated="4"/>
        </table:table-row>
        <table:table-row table:style-name="ro1">
          <table:table-cell office:value-type="float" office:value="635.78955078125">
            <text:p>635.7895507813</text:p>
          </table:table-cell>
          <table:table-cell office:value-type="float" office:value="0.00516477">
            <text:p>0.00516477</text:p>
          </table:table-cell>
          <table:table-cell table:number-columns-repeated="4"/>
        </table:table-row>
        <table:table-row table:style-name="ro1">
          <table:table-cell office:value-type="float" office:value="635.909057617188">
            <text:p>635.9090576172</text:p>
          </table:table-cell>
          <table:table-cell office:value-type="float" office:value="0.004064666">
            <text:p>0.004064666</text:p>
          </table:table-cell>
          <table:table-cell table:number-columns-repeated="4"/>
        </table:table-row>
        <table:table-row table:style-name="ro1">
          <table:table-cell office:value-type="float" office:value="636.028503417969">
            <text:p>636.028503418</text:p>
          </table:table-cell>
          <table:table-cell office:value-type="float" office:value="-0.002437302">
            <text:p>-0.002437302</text:p>
          </table:table-cell>
          <table:table-cell table:number-columns-repeated="4"/>
        </table:table-row>
        <table:table-row table:style-name="ro1">
          <table:table-cell office:value-type="float" office:value="636.148010253906">
            <text:p>636.1480102539</text:p>
          </table:table-cell>
          <table:table-cell office:value-type="float" office:value="-0.001519879">
            <text:p>-0.001519879</text:p>
          </table:table-cell>
          <table:table-cell table:number-columns-repeated="4"/>
        </table:table-row>
        <table:table-row table:style-name="ro1">
          <table:table-cell office:value-type="float" office:value="636.267517089844">
            <text:p>636.2675170898</text:p>
          </table:table-cell>
          <table:table-cell office:value-type="float" office:value="0.01473564">
            <text:p>0.01473564</text:p>
          </table:table-cell>
          <table:table-cell table:number-columns-repeated="4"/>
        </table:table-row>
        <table:table-row table:style-name="ro1">
          <table:table-cell office:value-type="float" office:value="636.387023925781">
            <text:p>636.3870239258</text:p>
          </table:table-cell>
          <table:table-cell office:value-type="float" office:value="0.01511226">
            <text:p>0.01511226</text:p>
          </table:table-cell>
          <table:table-cell table:number-columns-repeated="4"/>
        </table:table-row>
        <table:table-row table:style-name="ro1">
          <table:table-cell office:value-type="float" office:value="636.506469726563">
            <text:p>636.5064697266</text:p>
          </table:table-cell>
          <table:table-cell office:value-type="float" office:value="0.005528125">
            <text:p>0.005528125</text:p>
          </table:table-cell>
          <table:table-cell table:number-columns-repeated="4"/>
        </table:table-row>
        <table:table-row table:style-name="ro1">
          <table:table-cell office:value-type="float" office:value="636.6259765625">
            <text:p>636.6259765625</text:p>
          </table:table-cell>
          <table:table-cell office:value-type="float" office:value="0.01502762">
            <text:p>0.01502762</text:p>
          </table:table-cell>
          <table:table-cell table:number-columns-repeated="4"/>
        </table:table-row>
        <table:table-row table:style-name="ro1">
          <table:table-cell office:value-type="float" office:value="636.745483398438">
            <text:p>636.7454833984</text:p>
          </table:table-cell>
          <table:table-cell office:value-type="float" office:value="-0.003510471">
            <text:p>-0.003510471</text:p>
          </table:table-cell>
          <table:table-cell table:number-columns-repeated="4"/>
        </table:table-row>
        <table:table-row table:style-name="ro1">
          <table:table-cell office:value-type="float" office:value="636.864990234375">
            <text:p>636.8649902344</text:p>
          </table:table-cell>
          <table:table-cell office:value-type="float" office:value="0.002122488">
            <text:p>0.002122488</text:p>
          </table:table-cell>
          <table:table-cell table:number-columns-repeated="4"/>
        </table:table-row>
        <table:table-row table:style-name="ro1">
          <table:table-cell office:value-type="float" office:value="636.984497070313">
            <text:p>636.9844970703</text:p>
          </table:table-cell>
          <table:table-cell office:value-type="float" office:value="-0.003705847">
            <text:p>-0.003705847</text:p>
          </table:table-cell>
          <table:table-cell table:number-columns-repeated="4"/>
        </table:table-row>
        <table:table-row table:style-name="ro1">
          <table:table-cell office:value-type="float" office:value="637.10400390625">
            <text:p>637.1040039063</text:p>
          </table:table-cell>
          <table:table-cell office:value-type="float" office:value="-0.004111958">
            <text:p>-0.004111958</text:p>
          </table:table-cell>
          <table:table-cell table:number-columns-repeated="4"/>
        </table:table-row>
        <table:table-row table:style-name="ro1">
          <table:table-cell office:value-type="float" office:value="637.223510742188">
            <text:p>637.2235107422</text:p>
          </table:table-cell>
          <table:table-cell office:value-type="float" office:value="0.006708776">
            <text:p>0.006708776</text:p>
          </table:table-cell>
          <table:table-cell table:number-columns-repeated="4"/>
        </table:table-row>
        <table:table-row table:style-name="ro1">
          <table:table-cell office:value-type="float" office:value="637.343017578125">
            <text:p>637.3430175781</text:p>
          </table:table-cell>
          <table:table-cell office:value-type="float" office:value="0.01647231">
            <text:p>0.01647231</text:p>
          </table:table-cell>
          <table:table-cell table:number-columns-repeated="4"/>
        </table:table-row>
        <table:table-row table:style-name="ro1">
          <table:table-cell office:value-type="float" office:value="637.462524414063">
            <text:p>637.4625244141</text:p>
          </table:table-cell>
          <table:table-cell office:value-type="float" office:value="-0.004082148">
            <text:p>-0.004082148</text:p>
          </table:table-cell>
          <table:table-cell table:number-columns-repeated="4"/>
        </table:table-row>
        <table:table-row table:style-name="ro1">
          <table:table-cell office:value-type="float" office:value="637.58203125">
            <text:p>637.58203125</text:p>
          </table:table-cell>
          <table:table-cell office:value-type="float" office:value="0.02704417">
            <text:p>0.02704417</text:p>
          </table:table-cell>
          <table:table-cell table:number-columns-repeated="4"/>
        </table:table-row>
        <table:table-row table:style-name="ro1">
          <table:table-cell office:value-type="float" office:value="637.701538085938">
            <text:p>637.7015380859</text:p>
          </table:table-cell>
          <table:table-cell office:value-type="float" office:value="0.004926876">
            <text:p>0.004926876</text:p>
          </table:table-cell>
          <table:table-cell table:number-columns-repeated="4"/>
        </table:table-row>
        <table:table-row table:style-name="ro1">
          <table:table-cell office:value-type="float" office:value="637.821044921875">
            <text:p>637.8210449219</text:p>
          </table:table-cell>
          <table:table-cell office:value-type="float" office:value="0.0008945704">
            <text:p>0.0008945704</text:p>
          </table:table-cell>
          <table:table-cell table:number-columns-repeated="4"/>
        </table:table-row>
        <table:table-row table:style-name="ro1">
          <table:table-cell office:value-type="float" office:value="637.940551757813">
            <text:p>637.9405517578</text:p>
          </table:table-cell>
          <table:table-cell office:value-type="float" office:value="-0.005782234">
            <text:p>-0.005782234</text:p>
          </table:table-cell>
          <table:table-cell table:number-columns-repeated="4"/>
        </table:table-row>
        <table:table-row table:style-name="ro1">
          <table:table-cell office:value-type="float" office:value="638.060119628906">
            <text:p>638.0601196289</text:p>
          </table:table-cell>
          <table:table-cell office:value-type="float" office:value="-0.006290091">
            <text:p>-0.006290091</text:p>
          </table:table-cell>
          <table:table-cell table:number-columns-repeated="4"/>
        </table:table-row>
        <table:table-row table:style-name="ro1">
          <table:table-cell office:value-type="float" office:value="638.179626464844">
            <text:p>638.1796264648</text:p>
          </table:table-cell>
          <table:table-cell office:value-type="float" office:value="-0.002698458">
            <text:p>-0.002698458</text:p>
          </table:table-cell>
          <table:table-cell table:number-columns-repeated="4"/>
        </table:table-row>
        <table:table-row table:style-name="ro1">
          <table:table-cell office:value-type="float" office:value="638.299133300781">
            <text:p>638.2991333008</text:p>
          </table:table-cell>
          <table:table-cell office:value-type="float" office:value="0.01520624">
            <text:p>0.01520624</text:p>
          </table:table-cell>
          <table:table-cell table:number-columns-repeated="4"/>
        </table:table-row>
        <table:table-row table:style-name="ro1">
          <table:table-cell office:value-type="float" office:value="638.418640136719">
            <text:p>638.4186401367</text:p>
          </table:table-cell>
          <table:table-cell office:value-type="float" office:value="0.01977334">
            <text:p>0.01977334</text:p>
          </table:table-cell>
          <table:table-cell table:number-columns-repeated="4"/>
        </table:table-row>
        <table:table-row table:style-name="ro1">
          <table:table-cell office:value-type="float" office:value="638.538208007813">
            <text:p>638.5382080078</text:p>
          </table:table-cell>
          <table:table-cell office:value-type="float" office:value="-0.0003096749">
            <text:p>-0.0003096749</text:p>
          </table:table-cell>
          <table:table-cell table:number-columns-repeated="4"/>
        </table:table-row>
        <table:table-row table:style-name="ro1">
          <table:table-cell office:value-type="float" office:value="638.65771484375">
            <text:p>638.6577148438</text:p>
          </table:table-cell>
          <table:table-cell office:value-type="float" office:value="0.0001713569">
            <text:p>0.0001713569</text:p>
          </table:table-cell>
          <table:table-cell table:number-columns-repeated="4"/>
        </table:table-row>
        <table:table-row table:style-name="ro1">
          <table:table-cell office:value-type="float" office:value="638.777221679688">
            <text:p>638.7772216797</text:p>
          </table:table-cell>
          <table:table-cell office:value-type="float" office:value="-0.003658947">
            <text:p>-0.003658947</text:p>
          </table:table-cell>
          <table:table-cell table:number-columns-repeated="4"/>
        </table:table-row>
        <table:table-row table:style-name="ro1">
          <table:table-cell office:value-type="float" office:value="638.896789550781">
            <text:p>638.8967895508</text:p>
          </table:table-cell>
          <table:table-cell office:value-type="float" office:value="0.01727777">
            <text:p>0.01727777</text:p>
          </table:table-cell>
          <table:table-cell table:number-columns-repeated="4"/>
        </table:table-row>
        <table:table-row table:style-name="ro1">
          <table:table-cell office:value-type="float" office:value="639.016296386719">
            <text:p>639.0162963867</text:p>
          </table:table-cell>
          <table:table-cell office:value-type="float" office:value="0.005501568">
            <text:p>0.005501568</text:p>
          </table:table-cell>
          <table:table-cell table:number-columns-repeated="4"/>
        </table:table-row>
        <table:table-row table:style-name="ro1">
          <table:table-cell office:value-type="float" office:value="639.135864257813">
            <text:p>639.1358642578</text:p>
          </table:table-cell>
          <table:table-cell office:value-type="float" office:value="-0.007629033">
            <text:p>-0.007629033</text:p>
          </table:table-cell>
          <table:table-cell table:number-columns-repeated="4"/>
        </table:table-row>
        <table:table-row table:style-name="ro1">
          <table:table-cell office:value-type="float" office:value="639.25537109375">
            <text:p>639.2553710938</text:p>
          </table:table-cell>
          <table:table-cell office:value-type="float" office:value="-0.0004155795">
            <text:p>-0.0004155795</text:p>
          </table:table-cell>
          <table:table-cell table:number-columns-repeated="4"/>
        </table:table-row>
        <table:table-row table:style-name="ro1">
          <table:table-cell office:value-type="float" office:value="639.374938964844">
            <text:p>639.3749389648</text:p>
          </table:table-cell>
          <table:table-cell office:value-type="float" office:value="0.005357565">
            <text:p>0.005357565</text:p>
          </table:table-cell>
          <table:table-cell table:number-columns-repeated="4"/>
        </table:table-row>
        <table:table-row table:style-name="ro1">
          <table:table-cell office:value-type="float" office:value="639.494445800781">
            <text:p>639.4944458008</text:p>
          </table:table-cell>
          <table:table-cell office:value-type="float" office:value="-0.0006624287">
            <text:p>-0.0006624287</text:p>
          </table:table-cell>
          <table:table-cell table:number-columns-repeated="4"/>
        </table:table-row>
        <table:table-row table:style-name="ro1">
          <table:table-cell office:value-type="float" office:value="639.614013671875">
            <text:p>639.6140136719</text:p>
          </table:table-cell>
          <table:table-cell office:value-type="float" office:value="0.0007648529">
            <text:p>0.0007648529</text:p>
          </table:table-cell>
          <table:table-cell table:number-columns-repeated="4"/>
        </table:table-row>
        <table:table-row table:style-name="ro1">
          <table:table-cell office:value-type="float" office:value="639.733520507813">
            <text:p>639.7335205078</text:p>
          </table:table-cell>
          <table:table-cell office:value-type="float" office:value="0.01792308">
            <text:p>0.01792308</text:p>
          </table:table-cell>
          <table:table-cell table:number-columns-repeated="4"/>
        </table:table-row>
        <table:table-row table:style-name="ro1">
          <table:table-cell office:value-type="float" office:value="639.853088378906">
            <text:p>639.8530883789</text:p>
          </table:table-cell>
          <table:table-cell office:value-type="float" office:value="-0.003436655">
            <text:p>-0.003436655</text:p>
          </table:table-cell>
          <table:table-cell table:number-columns-repeated="4"/>
        </table:table-row>
        <table:table-row table:style-name="ro1">
          <table:table-cell office:value-type="float" office:value="639.972595214844">
            <text:p>639.9725952148</text:p>
          </table:table-cell>
          <table:table-cell office:value-type="float" office:value="0.01721922">
            <text:p>0.01721922</text:p>
          </table:table-cell>
          <table:table-cell table:number-columns-repeated="4"/>
        </table:table-row>
        <table:table-row table:style-name="ro1">
          <table:table-cell office:value-type="float" office:value="640.092163085938">
            <text:p>640.0921630859</text:p>
          </table:table-cell>
          <table:table-cell office:value-type="float" office:value="-0.002692307">
            <text:p>-0.002692307</text:p>
          </table:table-cell>
          <table:table-cell table:number-columns-repeated="4"/>
        </table:table-row>
        <table:table-row table:style-name="ro1">
          <table:table-cell office:value-type="float" office:value="640.211730957031">
            <text:p>640.211730957</text:p>
          </table:table-cell>
          <table:table-cell office:value-type="float" office:value="0.01404409">
            <text:p>0.01404409</text:p>
          </table:table-cell>
          <table:table-cell table:number-columns-repeated="4"/>
        </table:table-row>
        <table:table-row table:style-name="ro1">
          <table:table-cell office:value-type="float" office:value="640.331237792969">
            <text:p>640.331237793</text:p>
          </table:table-cell>
          <table:table-cell office:value-type="float" office:value="0.002888764">
            <text:p>0.002888764</text:p>
          </table:table-cell>
          <table:table-cell table:number-columns-repeated="4"/>
        </table:table-row>
        <table:table-row table:style-name="ro1">
          <table:table-cell office:value-type="float" office:value="640.450805664063">
            <text:p>640.4508056641</text:p>
          </table:table-cell>
          <table:table-cell office:value-type="float" office:value="-0.004231535">
            <text:p>-0.004231535</text:p>
          </table:table-cell>
          <table:table-cell table:number-columns-repeated="4"/>
        </table:table-row>
        <table:table-row table:style-name="ro1">
          <table:table-cell office:value-type="float" office:value="640.570373535156">
            <text:p>640.5703735352</text:p>
          </table:table-cell>
          <table:table-cell office:value-type="float" office:value="0.01107558">
            <text:p>0.01107558</text:p>
          </table:table-cell>
          <table:table-cell table:number-columns-repeated="4"/>
        </table:table-row>
        <table:table-row table:style-name="ro1">
          <table:table-cell office:value-type="float" office:value="640.68994140625">
            <text:p>640.6899414063</text:p>
          </table:table-cell>
          <table:table-cell office:value-type="float" office:value="0.01065434">
            <text:p>0.01065434</text:p>
          </table:table-cell>
          <table:table-cell table:number-columns-repeated="4"/>
        </table:table-row>
        <table:table-row table:style-name="ro1">
          <table:table-cell office:value-type="float" office:value="640.809509277344">
            <text:p>640.8095092773</text:p>
          </table:table-cell>
          <table:table-cell office:value-type="float" office:value="-0.002911478">
            <text:p>-0.002911478</text:p>
          </table:table-cell>
          <table:table-cell table:number-columns-repeated="4"/>
        </table:table-row>
        <table:table-row table:style-name="ro1">
          <table:table-cell office:value-type="float" office:value="640.929016113281">
            <text:p>640.9290161133</text:p>
          </table:table-cell>
          <table:table-cell office:value-type="float" office:value="-0.007884222">
            <text:p>-0.007884222</text:p>
          </table:table-cell>
          <table:table-cell table:number-columns-repeated="4"/>
        </table:table-row>
        <table:table-row table:style-name="ro1">
          <table:table-cell office:value-type="float" office:value="641.048583984375">
            <text:p>641.0485839844</text:p>
          </table:table-cell>
          <table:table-cell office:value-type="float" office:value="-0.0085771">
            <text:p>-0.0085771</text:p>
          </table:table-cell>
          <table:table-cell table:number-columns-repeated="4"/>
        </table:table-row>
        <table:table-row table:style-name="ro1">
          <table:table-cell office:value-type="float" office:value="641.168151855469">
            <text:p>641.1681518555</text:p>
          </table:table-cell>
          <table:table-cell office:value-type="float" office:value="-0.002331274">
            <text:p>-0.002331274</text:p>
          </table:table-cell>
          <table:table-cell table:number-columns-repeated="4"/>
        </table:table-row>
        <table:table-row table:style-name="ro1">
          <table:table-cell office:value-type="float" office:value="641.287719726563">
            <text:p>641.2877197266</text:p>
          </table:table-cell>
          <table:table-cell office:value-type="float" office:value="-0.0009107589">
            <text:p>-0.0009107589</text:p>
          </table:table-cell>
          <table:table-cell table:number-columns-repeated="4"/>
        </table:table-row>
        <table:table-row table:style-name="ro1">
          <table:table-cell office:value-type="float" office:value="641.407287597656">
            <text:p>641.4072875977</text:p>
          </table:table-cell>
          <table:table-cell office:value-type="float" office:value="0.005581583">
            <text:p>0.005581583</text:p>
          </table:table-cell>
          <table:table-cell table:number-columns-repeated="4"/>
        </table:table-row>
        <table:table-row table:style-name="ro1">
          <table:table-cell office:value-type="float" office:value="641.52685546875">
            <text:p>641.5268554688</text:p>
          </table:table-cell>
          <table:table-cell office:value-type="float" office:value="0.01103135">
            <text:p>0.01103135</text:p>
          </table:table-cell>
          <table:table-cell table:number-columns-repeated="4"/>
        </table:table-row>
        <table:table-row table:style-name="ro1">
          <table:table-cell office:value-type="float" office:value="641.646423339844">
            <text:p>641.6464233398</text:p>
          </table:table-cell>
          <table:table-cell office:value-type="float" office:value="0.001583465">
            <text:p>0.001583465</text:p>
          </table:table-cell>
          <table:table-cell table:number-columns-repeated="4"/>
        </table:table-row>
        <table:table-row table:style-name="ro1">
          <table:table-cell office:value-type="float" office:value="641.765991210938">
            <text:p>641.7659912109</text:p>
          </table:table-cell>
          <table:table-cell office:value-type="float" office:value="-0.003943501">
            <text:p>-0.003943501</text:p>
          </table:table-cell>
          <table:table-cell table:number-columns-repeated="4"/>
        </table:table-row>
        <table:table-row table:style-name="ro1">
          <table:table-cell office:value-type="float" office:value="641.885559082031">
            <text:p>641.885559082</text:p>
          </table:table-cell>
          <table:table-cell office:value-type="float" office:value="0.007052871">
            <text:p>0.007052871</text:p>
          </table:table-cell>
          <table:table-cell table:number-columns-repeated="4"/>
        </table:table-row>
        <table:table-row table:style-name="ro1">
          <table:table-cell office:value-type="float" office:value="642.005126953125">
            <text:p>642.0051269531</text:p>
          </table:table-cell>
          <table:table-cell office:value-type="float" office:value="-0.0001013589">
            <text:p>-0.0001013589</text:p>
          </table:table-cell>
          <table:table-cell table:number-columns-repeated="4"/>
        </table:table-row>
        <table:table-row table:style-name="ro1">
          <table:table-cell office:value-type="float" office:value="642.124694824219">
            <text:p>642.1246948242</text:p>
          </table:table-cell>
          <table:table-cell office:value-type="float" office:value="0.003371771">
            <text:p>0.003371771</text:p>
          </table:table-cell>
          <table:table-cell table:number-columns-repeated="4"/>
        </table:table-row>
        <table:table-row table:style-name="ro1">
          <table:table-cell office:value-type="float" office:value="642.244262695313">
            <text:p>642.2442626953</text:p>
          </table:table-cell>
          <table:table-cell office:value-type="float" office:value="-0.001764286">
            <text:p>-0.001764286</text:p>
          </table:table-cell>
          <table:table-cell table:number-columns-repeated="4"/>
        </table:table-row>
        <table:table-row table:style-name="ro1">
          <table:table-cell office:value-type="float" office:value="642.363891601563">
            <text:p>642.3638916016</text:p>
          </table:table-cell>
          <table:table-cell office:value-type="float" office:value="-0.004304958">
            <text:p>-0.004304958</text:p>
          </table:table-cell>
          <table:table-cell table:number-columns-repeated="4"/>
        </table:table-row>
        <table:table-row table:style-name="ro1">
          <table:table-cell office:value-type="float" office:value="642.483459472656">
            <text:p>642.4834594727</text:p>
          </table:table-cell>
          <table:table-cell office:value-type="float" office:value="-0.001744789">
            <text:p>-0.001744789</text:p>
          </table:table-cell>
          <table:table-cell table:number-columns-repeated="4"/>
        </table:table-row>
        <table:table-row table:style-name="ro1">
          <table:table-cell office:value-type="float" office:value="642.60302734375">
            <text:p>642.6030273438</text:p>
          </table:table-cell>
          <table:table-cell office:value-type="float" office:value="0.01116807">
            <text:p>0.01116807</text:p>
          </table:table-cell>
          <table:table-cell table:number-columns-repeated="4"/>
        </table:table-row>
        <table:table-row table:style-name="ro1">
          <table:table-cell office:value-type="float" office:value="642.722595214844">
            <text:p>642.7225952148</text:p>
          </table:table-cell>
          <table:table-cell office:value-type="float" office:value="-0.00620447">
            <text:p>-0.00620447</text:p>
          </table:table-cell>
          <table:table-cell table:number-columns-repeated="4"/>
        </table:table-row>
        <table:table-row table:style-name="ro1">
          <table:table-cell office:value-type="float" office:value="642.842163085938">
            <text:p>642.8421630859</text:p>
          </table:table-cell>
          <table:table-cell office:value-type="float" office:value="-0.002545894">
            <text:p>-0.002545894</text:p>
          </table:table-cell>
          <table:table-cell table:number-columns-repeated="4"/>
        </table:table-row>
        <table:table-row table:style-name="ro1">
          <table:table-cell office:value-type="float" office:value="642.961791992188">
            <text:p>642.9617919922</text:p>
          </table:table-cell>
          <table:table-cell office:value-type="float" office:value="0.000480745">
            <text:p>0.000480745</text:p>
          </table:table-cell>
          <table:table-cell table:number-columns-repeated="4"/>
        </table:table-row>
        <table:table-row table:style-name="ro1">
          <table:table-cell office:value-type="float" office:value="643.081359863281">
            <text:p>643.0813598633</text:p>
          </table:table-cell>
          <table:table-cell office:value-type="float" office:value="0.01053871">
            <text:p>0.01053871</text:p>
          </table:table-cell>
          <table:table-cell table:number-columns-repeated="4"/>
        </table:table-row>
        <table:table-row table:style-name="ro1">
          <table:table-cell office:value-type="float" office:value="643.200927734375">
            <text:p>643.2009277344</text:p>
          </table:table-cell>
          <table:table-cell office:value-type="float" office:value="0.004979719">
            <text:p>0.004979719</text:p>
          </table:table-cell>
          <table:table-cell table:number-columns-repeated="4"/>
        </table:table-row>
        <table:table-row table:style-name="ro1">
          <table:table-cell office:value-type="float" office:value="643.320556640625">
            <text:p>643.3205566406</text:p>
          </table:table-cell>
          <table:table-cell office:value-type="float" office:value="0.002326251">
            <text:p>0.002326251</text:p>
          </table:table-cell>
          <table:table-cell table:number-columns-repeated="4"/>
        </table:table-row>
        <table:table-row table:style-name="ro1">
          <table:table-cell office:value-type="float" office:value="643.440124511719">
            <text:p>643.4401245117</text:p>
          </table:table-cell>
          <table:table-cell office:value-type="float" office:value="0.01367654">
            <text:p>0.01367654</text:p>
          </table:table-cell>
          <table:table-cell table:number-columns-repeated="4"/>
        </table:table-row>
        <table:table-row table:style-name="ro1">
          <table:table-cell office:value-type="float" office:value="643.559753417969">
            <text:p>643.559753418</text:p>
          </table:table-cell>
          <table:table-cell office:value-type="float" office:value="0.01165969">
            <text:p>0.01165969</text:p>
          </table:table-cell>
          <table:table-cell table:number-columns-repeated="4"/>
        </table:table-row>
        <table:table-row table:style-name="ro1">
          <table:table-cell office:value-type="float" office:value="643.679321289063">
            <text:p>643.6793212891</text:p>
          </table:table-cell>
          <table:table-cell office:value-type="float" office:value="0.007589224">
            <text:p>0.007589224</text:p>
          </table:table-cell>
          <table:table-cell table:number-columns-repeated="4"/>
        </table:table-row>
        <table:table-row table:style-name="ro1">
          <table:table-cell office:value-type="float" office:value="643.798950195313">
            <text:p>643.7989501953</text:p>
          </table:table-cell>
          <table:table-cell office:value-type="float" office:value="0.003949154">
            <text:p>0.003949154</text:p>
          </table:table-cell>
          <table:table-cell table:number-columns-repeated="4"/>
        </table:table-row>
        <table:table-row table:style-name="ro1">
          <table:table-cell office:value-type="float" office:value="643.918518066406">
            <text:p>643.9185180664</text:p>
          </table:table-cell>
          <table:table-cell office:value-type="float" office:value="0.001080307">
            <text:p>0.001080307</text:p>
          </table:table-cell>
          <table:table-cell table:number-columns-repeated="4"/>
        </table:table-row>
        <table:table-row table:style-name="ro1">
          <table:table-cell office:value-type="float" office:value="644.038146972656">
            <text:p>644.0381469727</text:p>
          </table:table-cell>
          <table:table-cell office:value-type="float" office:value="0.02147637">
            <text:p>0.02147637</text:p>
          </table:table-cell>
          <table:table-cell table:number-columns-repeated="4"/>
        </table:table-row>
        <table:table-row table:style-name="ro1">
          <table:table-cell office:value-type="float" office:value="644.15771484375">
            <text:p>644.1577148438</text:p>
          </table:table-cell>
          <table:table-cell office:value-type="float" office:value="-0.004388231">
            <text:p>-0.004388231</text:p>
          </table:table-cell>
          <table:table-cell table:number-columns-repeated="4"/>
        </table:table-row>
        <table:table-row table:style-name="ro1">
          <table:table-cell office:value-type="float" office:value="644.27734375">
            <text:p>644.27734375</text:p>
          </table:table-cell>
          <table:table-cell office:value-type="float" office:value="-0.003902622">
            <text:p>-0.003902622</text:p>
          </table:table-cell>
          <table:table-cell table:number-columns-repeated="4"/>
        </table:table-row>
        <table:table-row table:style-name="ro1">
          <table:table-cell office:value-type="float" office:value="644.396911621094">
            <text:p>644.3969116211</text:p>
          </table:table-cell>
          <table:table-cell office:value-type="float" office:value="-0.0006843189">
            <text:p>-0.0006843189</text:p>
          </table:table-cell>
          <table:table-cell table:number-columns-repeated="4"/>
        </table:table-row>
        <table:table-row table:style-name="ro1">
          <table:table-cell office:value-type="float" office:value="644.516540527344">
            <text:p>644.5165405273</text:p>
          </table:table-cell>
          <table:table-cell office:value-type="float" office:value="-0.001008747">
            <text:p>-0.001008747</text:p>
          </table:table-cell>
          <table:table-cell table:number-columns-repeated="4"/>
        </table:table-row>
        <table:table-row table:style-name="ro1">
          <table:table-cell office:value-type="float" office:value="644.636169433594">
            <text:p>644.6361694336</text:p>
          </table:table-cell>
          <table:table-cell office:value-type="float" office:value="-0.00248392">
            <text:p>-0.00248392</text:p>
          </table:table-cell>
          <table:table-cell table:number-columns-repeated="4"/>
        </table:table-row>
        <table:table-row table:style-name="ro1">
          <table:table-cell office:value-type="float" office:value="644.755737304688">
            <text:p>644.7557373047</text:p>
          </table:table-cell>
          <table:table-cell office:value-type="float" office:value="-0.003019765">
            <text:p>-0.003019765</text:p>
          </table:table-cell>
          <table:table-cell table:number-columns-repeated="4"/>
        </table:table-row>
        <table:table-row table:style-name="ro1">
          <table:table-cell office:value-type="float" office:value="644.875366210938">
            <text:p>644.8753662109</text:p>
          </table:table-cell>
          <table:table-cell office:value-type="float" office:value="0.008500794">
            <text:p>0.008500794</text:p>
          </table:table-cell>
          <table:table-cell table:number-columns-repeated="4"/>
        </table:table-row>
        <table:table-row table:style-name="ro1">
          <table:table-cell office:value-type="float" office:value="644.994995117188">
            <text:p>644.9949951172</text:p>
          </table:table-cell>
          <table:table-cell office:value-type="float" office:value="0.008801144">
            <text:p>0.008801144</text:p>
          </table:table-cell>
          <table:table-cell table:number-columns-repeated="4"/>
        </table:table-row>
        <table:table-row table:style-name="ro1">
          <table:table-cell office:value-type="float" office:value="645.114562988281">
            <text:p>645.1145629883</text:p>
          </table:table-cell>
          <table:table-cell office:value-type="float" office:value="0.01260272">
            <text:p>0.01260272</text:p>
          </table:table-cell>
          <table:table-cell table:number-columns-repeated="4"/>
        </table:table-row>
        <table:table-row table:style-name="ro1">
          <table:table-cell office:value-type="float" office:value="645.234191894531">
            <text:p>645.2341918945</text:p>
          </table:table-cell>
          <table:table-cell office:value-type="float" office:value="0.01065356">
            <text:p>0.01065356</text:p>
          </table:table-cell>
          <table:table-cell table:number-columns-repeated="4"/>
        </table:table-row>
        <table:table-row table:style-name="ro1">
          <table:table-cell office:value-type="float" office:value="645.353820800781">
            <text:p>645.3538208008</text:p>
          </table:table-cell>
          <table:table-cell office:value-type="float" office:value="0.001658455">
            <text:p>0.001658455</text:p>
          </table:table-cell>
          <table:table-cell table:number-columns-repeated="4"/>
        </table:table-row>
        <table:table-row table:style-name="ro1">
          <table:table-cell office:value-type="float" office:value="645.473449707031">
            <text:p>645.473449707</text:p>
          </table:table-cell>
          <table:table-cell office:value-type="float" office:value="-0.00327142">
            <text:p>-0.00327142</text:p>
          </table:table-cell>
          <table:table-cell table:number-columns-repeated="4"/>
        </table:table-row>
        <table:table-row table:style-name="ro1">
          <table:table-cell office:value-type="float" office:value="645.593078613281">
            <text:p>645.5930786133</text:p>
          </table:table-cell>
          <table:table-cell office:value-type="float" office:value="0.002245702">
            <text:p>0.002245702</text:p>
          </table:table-cell>
          <table:table-cell table:number-columns-repeated="4"/>
        </table:table-row>
        <table:table-row table:style-name="ro1">
          <table:table-cell office:value-type="float" office:value="645.712707519531">
            <text:p>645.7127075195</text:p>
          </table:table-cell>
          <table:table-cell office:value-type="float" office:value="-0.0007722695">
            <text:p>-0.0007722695</text:p>
          </table:table-cell>
          <table:table-cell table:number-columns-repeated="4"/>
        </table:table-row>
        <table:table-row table:style-name="ro1">
          <table:table-cell office:value-type="float" office:value="645.832336425781">
            <text:p>645.8323364258</text:p>
          </table:table-cell>
          <table:table-cell office:value-type="float" office:value="-0.003524985">
            <text:p>-0.003524985</text:p>
          </table:table-cell>
          <table:table-cell table:number-columns-repeated="4"/>
        </table:table-row>
        <table:table-row table:style-name="ro1">
          <table:table-cell office:value-type="float" office:value="645.951965332031">
            <text:p>645.951965332</text:p>
          </table:table-cell>
          <table:table-cell office:value-type="float" office:value="0.001621702">
            <text:p>0.001621702</text:p>
          </table:table-cell>
          <table:table-cell table:number-columns-repeated="4"/>
        </table:table-row>
        <table:table-row table:style-name="ro1">
          <table:table-cell office:value-type="float" office:value="646.071533203125">
            <text:p>646.0715332031</text:p>
          </table:table-cell>
          <table:table-cell office:value-type="float" office:value="0.0001499503">
            <text:p>0.0001499503</text:p>
          </table:table-cell>
          <table:table-cell table:number-columns-repeated="4"/>
        </table:table-row>
        <table:table-row table:style-name="ro1">
          <table:table-cell office:value-type="float" office:value="646.191162109375">
            <text:p>646.1911621094</text:p>
          </table:table-cell>
          <table:table-cell office:value-type="float" office:value="-0.005902319">
            <text:p>-0.005902319</text:p>
          </table:table-cell>
          <table:table-cell table:number-columns-repeated="4"/>
        </table:table-row>
        <table:table-row table:style-name="ro1">
          <table:table-cell office:value-type="float" office:value="646.310852050781">
            <text:p>646.3108520508</text:p>
          </table:table-cell>
          <table:table-cell office:value-type="float" office:value="0.01053103">
            <text:p>0.01053103</text:p>
          </table:table-cell>
          <table:table-cell table:number-columns-repeated="4"/>
        </table:table-row>
        <table:table-row table:style-name="ro1">
          <table:table-cell office:value-type="float" office:value="646.430480957031">
            <text:p>646.430480957</text:p>
          </table:table-cell>
          <table:table-cell office:value-type="float" office:value="0.004002211">
            <text:p>0.004002211</text:p>
          </table:table-cell>
          <table:table-cell table:number-columns-repeated="4"/>
        </table:table-row>
        <table:table-row table:style-name="ro1">
          <table:table-cell office:value-type="float" office:value="646.550109863281">
            <text:p>646.5501098633</text:p>
          </table:table-cell>
          <table:table-cell office:value-type="float" office:value="0.01351902">
            <text:p>0.01351902</text:p>
          </table:table-cell>
          <table:table-cell table:number-columns-repeated="4"/>
        </table:table-row>
        <table:table-row table:style-name="ro1">
          <table:table-cell office:value-type="float" office:value="646.669738769531">
            <text:p>646.6697387695</text:p>
          </table:table-cell>
          <table:table-cell office:value-type="float" office:value="-0.000745676">
            <text:p>-0.000745676</text:p>
          </table:table-cell>
          <table:table-cell table:number-columns-repeated="4"/>
        </table:table-row>
        <table:table-row table:style-name="ro1">
          <table:table-cell office:value-type="float" office:value="646.789367675781">
            <text:p>646.7893676758</text:p>
          </table:table-cell>
          <table:table-cell office:value-type="float" office:value="0.007360765">
            <text:p>0.007360765</text:p>
          </table:table-cell>
          <table:table-cell table:number-columns-repeated="4"/>
        </table:table-row>
        <table:table-row table:style-name="ro1">
          <table:table-cell office:value-type="float" office:value="646.908996582031">
            <text:p>646.908996582</text:p>
          </table:table-cell>
          <table:table-cell office:value-type="float" office:value="0.02714826">
            <text:p>0.02714826</text:p>
          </table:table-cell>
          <table:table-cell table:number-columns-repeated="4"/>
        </table:table-row>
        <table:table-row table:style-name="ro1">
          <table:table-cell office:value-type="float" office:value="647.028625488281">
            <text:p>647.0286254883</text:p>
          </table:table-cell>
          <table:table-cell office:value-type="float" office:value="0.007078524">
            <text:p>0.007078524</text:p>
          </table:table-cell>
          <table:table-cell table:number-columns-repeated="4"/>
        </table:table-row>
        <table:table-row table:style-name="ro1">
          <table:table-cell office:value-type="float" office:value="647.148254394531">
            <text:p>647.1482543945</text:p>
          </table:table-cell>
          <table:table-cell office:value-type="float" office:value="-0.0001159974">
            <text:p>-0.0001159974</text:p>
          </table:table-cell>
          <table:table-cell table:number-columns-repeated="4"/>
        </table:table-row>
        <table:table-row table:style-name="ro1">
          <table:table-cell office:value-type="float" office:value="647.267944335938">
            <text:p>647.2679443359</text:p>
          </table:table-cell>
          <table:table-cell office:value-type="float" office:value="-0.0004275982">
            <text:p>-0.0004275982</text:p>
          </table:table-cell>
          <table:table-cell table:number-columns-repeated="4"/>
        </table:table-row>
        <table:table-row table:style-name="ro1">
          <table:table-cell office:value-type="float" office:value="647.387573242188">
            <text:p>647.3875732422</text:p>
          </table:table-cell>
          <table:table-cell office:value-type="float" office:value="0.006968528">
            <text:p>0.006968528</text:p>
          </table:table-cell>
          <table:table-cell table:number-columns-repeated="4"/>
        </table:table-row>
        <table:table-row table:style-name="ro1">
          <table:table-cell office:value-type="float" office:value="647.507202148438">
            <text:p>647.5072021484</text:p>
          </table:table-cell>
          <table:table-cell office:value-type="float" office:value="-0.001625259">
            <text:p>-0.001625259</text:p>
          </table:table-cell>
          <table:table-cell table:number-columns-repeated="4"/>
        </table:table-row>
        <table:table-row table:style-name="ro1">
          <table:table-cell office:value-type="float" office:value="647.626831054688">
            <text:p>647.6268310547</text:p>
          </table:table-cell>
          <table:table-cell office:value-type="float" office:value="0.004911608">
            <text:p>0.004911608</text:p>
          </table:table-cell>
          <table:table-cell table:number-columns-repeated="4"/>
        </table:table-row>
        <table:table-row table:style-name="ro1">
          <table:table-cell office:value-type="float" office:value="647.746520996094">
            <text:p>647.7465209961</text:p>
          </table:table-cell>
          <table:table-cell office:value-type="float" office:value="0.02892393">
            <text:p>0.02892393</text:p>
          </table:table-cell>
          <table:table-cell table:number-columns-repeated="4"/>
        </table:table-row>
        <table:table-row table:style-name="ro1">
          <table:table-cell office:value-type="float" office:value="647.866149902344">
            <text:p>647.8661499023</text:p>
          </table:table-cell>
          <table:table-cell office:value-type="float" office:value="-0.005157663">
            <text:p>-0.005157663</text:p>
          </table:table-cell>
          <table:table-cell table:number-columns-repeated="4"/>
        </table:table-row>
        <table:table-row table:style-name="ro1">
          <table:table-cell office:value-type="float" office:value="647.985778808594">
            <text:p>647.9857788086</text:p>
          </table:table-cell>
          <table:table-cell office:value-type="float" office:value="0.02635702">
            <text:p>0.02635702</text:p>
          </table:table-cell>
          <table:table-cell table:number-columns-repeated="4"/>
        </table:table-row>
        <table:table-row table:style-name="ro1">
          <table:table-cell office:value-type="float" office:value="648.10546875">
            <text:p>648.10546875</text:p>
          </table:table-cell>
          <table:table-cell office:value-type="float" office:value="-0.005472901">
            <text:p>-0.005472901</text:p>
          </table:table-cell>
          <table:table-cell table:number-columns-repeated="4"/>
        </table:table-row>
        <table:table-row table:style-name="ro1">
          <table:table-cell office:value-type="float" office:value="648.22509765625">
            <text:p>648.2250976563</text:p>
          </table:table-cell>
          <table:table-cell office:value-type="float" office:value="0.02235772">
            <text:p>0.02235772</text:p>
          </table:table-cell>
          <table:table-cell table:number-columns-repeated="4"/>
        </table:table-row>
        <table:table-row table:style-name="ro1">
          <table:table-cell office:value-type="float" office:value="648.344787597656">
            <text:p>648.3447875977</text:p>
          </table:table-cell>
          <table:table-cell office:value-type="float" office:value="0.01031237">
            <text:p>0.01031237</text:p>
          </table:table-cell>
          <table:table-cell table:number-columns-repeated="4"/>
        </table:table-row>
        <table:table-row table:style-name="ro1">
          <table:table-cell office:value-type="float" office:value="648.464416503906">
            <text:p>648.4644165039</text:p>
          </table:table-cell>
          <table:table-cell office:value-type="float" office:value="0.001044071">
            <text:p>0.001044071</text:p>
          </table:table-cell>
          <table:table-cell table:number-columns-repeated="4"/>
        </table:table-row>
        <table:table-row table:style-name="ro1">
          <table:table-cell office:value-type="float" office:value="648.584106445313">
            <text:p>648.5841064453</text:p>
          </table:table-cell>
          <table:table-cell office:value-type="float" office:value="0.005226035">
            <text:p>0.005226035</text:p>
          </table:table-cell>
          <table:table-cell table:number-columns-repeated="4"/>
        </table:table-row>
        <table:table-row table:style-name="ro1">
          <table:table-cell office:value-type="float" office:value="648.703735351563">
            <text:p>648.7037353516</text:p>
          </table:table-cell>
          <table:table-cell office:value-type="float" office:value="0.002701448">
            <text:p>0.002701448</text:p>
          </table:table-cell>
          <table:table-cell table:number-columns-repeated="4"/>
        </table:table-row>
        <table:table-row table:style-name="ro1">
          <table:table-cell office:value-type="float" office:value="648.823425292969">
            <text:p>648.823425293</text:p>
          </table:table-cell>
          <table:table-cell office:value-type="float" office:value="-0.008715181">
            <text:p>-0.008715181</text:p>
          </table:table-cell>
          <table:table-cell table:number-columns-repeated="4"/>
        </table:table-row>
        <table:table-row table:style-name="ro1">
          <table:table-cell office:value-type="float" office:value="648.943054199219">
            <text:p>648.9430541992</text:p>
          </table:table-cell>
          <table:table-cell office:value-type="float" office:value="-0.001958142">
            <text:p>-0.001958142</text:p>
          </table:table-cell>
          <table:table-cell table:number-columns-repeated="4"/>
        </table:table-row>
        <table:table-row table:style-name="ro1">
          <table:table-cell office:value-type="float" office:value="649.062744140625">
            <text:p>649.0627441406</text:p>
          </table:table-cell>
          <table:table-cell office:value-type="float" office:value="0.0004050424">
            <text:p>0.0004050424</text:p>
          </table:table-cell>
          <table:table-cell table:number-columns-repeated="4"/>
        </table:table-row>
        <table:table-row table:style-name="ro1">
          <table:table-cell office:value-type="float" office:value="649.182434082031">
            <text:p>649.182434082</text:p>
          </table:table-cell>
          <table:table-cell office:value-type="float" office:value="0.00223485">
            <text:p>0.00223485</text:p>
          </table:table-cell>
          <table:table-cell table:number-columns-repeated="4"/>
        </table:table-row>
        <table:table-row table:style-name="ro1">
          <table:table-cell office:value-type="float" office:value="649.302062988281">
            <text:p>649.3020629883</text:p>
          </table:table-cell>
          <table:table-cell office:value-type="float" office:value="0.006802391">
            <text:p>0.006802391</text:p>
          </table:table-cell>
          <table:table-cell table:number-columns-repeated="4"/>
        </table:table-row>
        <table:table-row table:style-name="ro1">
          <table:table-cell office:value-type="float" office:value="649.421752929688">
            <text:p>649.4217529297</text:p>
          </table:table-cell>
          <table:table-cell office:value-type="float" office:value="-0.007203636">
            <text:p>-0.007203636</text:p>
          </table:table-cell>
          <table:table-cell table:number-columns-repeated="4"/>
        </table:table-row>
        <table:table-row table:style-name="ro1">
          <table:table-cell office:value-type="float" office:value="649.541442871094">
            <text:p>649.5414428711</text:p>
          </table:table-cell>
          <table:table-cell office:value-type="float" office:value="-0.001955209">
            <text:p>-0.001955209</text:p>
          </table:table-cell>
          <table:table-cell table:number-columns-repeated="4"/>
        </table:table-row>
        <table:table-row table:style-name="ro1">
          <table:table-cell office:value-type="float" office:value="649.661071777344">
            <text:p>649.6610717773</text:p>
          </table:table-cell>
          <table:table-cell office:value-type="float" office:value="0.01911967">
            <text:p>0.01911967</text:p>
          </table:table-cell>
          <table:table-cell table:number-columns-repeated="4"/>
        </table:table-row>
        <table:table-row table:style-name="ro1">
          <table:table-cell office:value-type="float" office:value="649.78076171875">
            <text:p>649.7807617188</text:p>
          </table:table-cell>
          <table:table-cell office:value-type="float" office:value="0.005784376">
            <text:p>0.005784376</text:p>
          </table:table-cell>
          <table:table-cell table:number-columns-repeated="4"/>
        </table:table-row>
        <table:table-row table:style-name="ro1">
          <table:table-cell office:value-type="float" office:value="649.900451660156">
            <text:p>649.9004516602</text:p>
          </table:table-cell>
          <table:table-cell office:value-type="float" office:value="0.006190426">
            <text:p>0.006190426</text:p>
          </table:table-cell>
          <table:table-cell table:number-columns-repeated="4"/>
        </table:table-row>
        <table:table-row table:style-name="ro1">
          <table:table-cell office:value-type="float" office:value="650.020141601563">
            <text:p>650.0201416016</text:p>
          </table:table-cell>
          <table:table-cell office:value-type="float" office:value="-0.003197125">
            <text:p>-0.003197125</text:p>
          </table:table-cell>
          <table:table-cell table:number-columns-repeated="4"/>
        </table:table-row>
        <table:table-row table:style-name="ro1">
          <table:table-cell office:value-type="float" office:value="650.139770507813">
            <text:p>650.1397705078</text:p>
          </table:table-cell>
          <table:table-cell office:value-type="float" office:value="-0.007022438">
            <text:p>-0.007022438</text:p>
          </table:table-cell>
          <table:table-cell table:number-columns-repeated="4"/>
        </table:table-row>
        <table:table-row table:style-name="ro1">
          <table:table-cell office:value-type="float" office:value="650.259460449219">
            <text:p>650.2594604492</text:p>
          </table:table-cell>
          <table:table-cell office:value-type="float" office:value="-0.005423923">
            <text:p>-0.005423923</text:p>
          </table:table-cell>
          <table:table-cell table:number-columns-repeated="4"/>
        </table:table-row>
        <table:table-row table:style-name="ro1">
          <table:table-cell office:value-type="float" office:value="650.379150390625">
            <text:p>650.3791503906</text:p>
          </table:table-cell>
          <table:table-cell office:value-type="float" office:value="0.001526982">
            <text:p>0.001526982</text:p>
          </table:table-cell>
          <table:table-cell table:number-columns-repeated="4"/>
        </table:table-row>
        <table:table-row table:style-name="ro1">
          <table:table-cell office:value-type="float" office:value="650.498840332031">
            <text:p>650.498840332</text:p>
          </table:table-cell>
          <table:table-cell office:value-type="float" office:value="-0.001732252">
            <text:p>-0.001732252</text:p>
          </table:table-cell>
          <table:table-cell table:number-columns-repeated="4"/>
        </table:table-row>
        <table:table-row table:style-name="ro1">
          <table:table-cell office:value-type="float" office:value="650.618530273438">
            <text:p>650.6185302734</text:p>
          </table:table-cell>
          <table:table-cell office:value-type="float" office:value="0.005960555">
            <text:p>0.005960555</text:p>
          </table:table-cell>
          <table:table-cell table:number-columns-repeated="4"/>
        </table:table-row>
        <table:table-row table:style-name="ro1">
          <table:table-cell office:value-type="float" office:value="650.738220214844">
            <text:p>650.7382202148</text:p>
          </table:table-cell>
          <table:table-cell office:value-type="float" office:value="-0.0001766199">
            <text:p>-0.0001766199</text:p>
          </table:table-cell>
          <table:table-cell table:number-columns-repeated="4"/>
        </table:table-row>
        <table:table-row table:style-name="ro1">
          <table:table-cell office:value-type="float" office:value="650.85791015625">
            <text:p>650.8579101563</text:p>
          </table:table-cell>
          <table:table-cell office:value-type="float" office:value="0.009014093">
            <text:p>0.009014093</text:p>
          </table:table-cell>
          <table:table-cell table:number-columns-repeated="4"/>
        </table:table-row>
        <table:table-row table:style-name="ro1">
          <table:table-cell office:value-type="float" office:value="650.977600097656">
            <text:p>650.9776000977</text:p>
          </table:table-cell>
          <table:table-cell office:value-type="float" office:value="0.01103865">
            <text:p>0.01103865</text:p>
          </table:table-cell>
          <table:table-cell table:number-columns-repeated="4"/>
        </table:table-row>
        <table:table-row table:style-name="ro1">
          <table:table-cell office:value-type="float" office:value="651.097290039063">
            <text:p>651.0972900391</text:p>
          </table:table-cell>
          <table:table-cell office:value-type="float" office:value="0.002293675">
            <text:p>0.002293675</text:p>
          </table:table-cell>
          <table:table-cell table:number-columns-repeated="4"/>
        </table:table-row>
        <table:table-row table:style-name="ro1">
          <table:table-cell office:value-type="float" office:value="651.216979980469">
            <text:p>651.2169799805</text:p>
          </table:table-cell>
          <table:table-cell office:value-type="float" office:value="0.01253172">
            <text:p>0.01253172</text:p>
          </table:table-cell>
          <table:table-cell table:number-columns-repeated="4"/>
        </table:table-row>
        <table:table-row table:style-name="ro1">
          <table:table-cell office:value-type="float" office:value="651.336669921875">
            <text:p>651.3366699219</text:p>
          </table:table-cell>
          <table:table-cell office:value-type="float" office:value="0.000946636">
            <text:p>0.000946636</text:p>
          </table:table-cell>
          <table:table-cell table:number-columns-repeated="4"/>
        </table:table-row>
        <table:table-row table:style-name="ro1">
          <table:table-cell office:value-type="float" office:value="651.456359863281">
            <text:p>651.4563598633</text:p>
          </table:table-cell>
          <table:table-cell office:value-type="float" office:value="0.0009460535">
            <text:p>0.0009460535</text:p>
          </table:table-cell>
          <table:table-cell table:number-columns-repeated="4"/>
        </table:table-row>
        <table:table-row table:style-name="ro1">
          <table:table-cell office:value-type="float" office:value="651.576049804688">
            <text:p>651.5760498047</text:p>
          </table:table-cell>
          <table:table-cell office:value-type="float" office:value="-0.002323769">
            <text:p>-0.002323769</text:p>
          </table:table-cell>
          <table:table-cell table:number-columns-repeated="4"/>
        </table:table-row>
        <table:table-row table:style-name="ro1">
          <table:table-cell office:value-type="float" office:value="651.695739746094">
            <text:p>651.6957397461</text:p>
          </table:table-cell>
          <table:table-cell office:value-type="float" office:value="0.007116602">
            <text:p>0.007116602</text:p>
          </table:table-cell>
          <table:table-cell table:number-columns-repeated="4"/>
        </table:table-row>
        <table:table-row table:style-name="ro1">
          <table:table-cell office:value-type="float" office:value="651.8154296875">
            <text:p>651.8154296875</text:p>
          </table:table-cell>
          <table:table-cell office:value-type="float" office:value="-0.001172855">
            <text:p>-0.001172855</text:p>
          </table:table-cell>
          <table:table-cell table:number-columns-repeated="4"/>
        </table:table-row>
        <table:table-row table:style-name="ro1">
          <table:table-cell office:value-type="float" office:value="651.935180664063">
            <text:p>651.9351806641</text:p>
          </table:table-cell>
          <table:table-cell office:value-type="float" office:value="-0.005744781">
            <text:p>-0.005744781</text:p>
          </table:table-cell>
          <table:table-cell table:number-columns-repeated="4"/>
        </table:table-row>
        <table:table-row table:style-name="ro1">
          <table:table-cell office:value-type="float" office:value="652.054870605469">
            <text:p>652.0548706055</text:p>
          </table:table-cell>
          <table:table-cell office:value-type="float" office:value="0.003592106">
            <text:p>0.003592106</text:p>
          </table:table-cell>
          <table:table-cell table:number-columns-repeated="4"/>
        </table:table-row>
        <table:table-row table:style-name="ro1">
          <table:table-cell office:value-type="float" office:value="652.174560546875">
            <text:p>652.1745605469</text:p>
          </table:table-cell>
          <table:table-cell office:value-type="float" office:value="-0.001751142">
            <text:p>-0.001751142</text:p>
          </table:table-cell>
          <table:table-cell table:number-columns-repeated="4"/>
        </table:table-row>
        <table:table-row table:style-name="ro1">
          <table:table-cell office:value-type="float" office:value="652.294250488281">
            <text:p>652.2942504883</text:p>
          </table:table-cell>
          <table:table-cell office:value-type="float" office:value="-0.001398333">
            <text:p>-0.001398333</text:p>
          </table:table-cell>
          <table:table-cell table:number-columns-repeated="4"/>
        </table:table-row>
        <table:table-row table:style-name="ro1">
          <table:table-cell office:value-type="float" office:value="652.414001464844">
            <text:p>652.4140014648</text:p>
          </table:table-cell>
          <table:table-cell office:value-type="float" office:value="0.004521523">
            <text:p>0.004521523</text:p>
          </table:table-cell>
          <table:table-cell table:number-columns-repeated="4"/>
        </table:table-row>
        <table:table-row table:style-name="ro1">
          <table:table-cell office:value-type="float" office:value="652.53369140625">
            <text:p>652.5336914063</text:p>
          </table:table-cell>
          <table:table-cell office:value-type="float" office:value="-0.006095146">
            <text:p>-0.006095146</text:p>
          </table:table-cell>
          <table:table-cell table:number-columns-repeated="4"/>
        </table:table-row>
        <table:table-row table:style-name="ro1">
          <table:table-cell office:value-type="float" office:value="652.653381347656">
            <text:p>652.6533813477</text:p>
          </table:table-cell>
          <table:table-cell office:value-type="float" office:value="0.001067607">
            <text:p>0.001067607</text:p>
          </table:table-cell>
          <table:table-cell table:number-columns-repeated="4"/>
        </table:table-row>
        <table:table-row table:style-name="ro1">
          <table:table-cell office:value-type="float" office:value="652.773071289063">
            <text:p>652.7730712891</text:p>
          </table:table-cell>
          <table:table-cell office:value-type="float" office:value="-0.006917321">
            <text:p>-0.006917321</text:p>
          </table:table-cell>
          <table:table-cell table:number-columns-repeated="4"/>
        </table:table-row>
        <table:table-row table:style-name="ro1">
          <table:table-cell office:value-type="float" office:value="652.892822265625">
            <text:p>652.8928222656</text:p>
          </table:table-cell>
          <table:table-cell office:value-type="float" office:value="0.00706401">
            <text:p>0.00706401</text:p>
          </table:table-cell>
          <table:table-cell table:number-columns-repeated="4"/>
        </table:table-row>
        <table:table-row table:style-name="ro1">
          <table:table-cell office:value-type="float" office:value="653.012512207031">
            <text:p>653.012512207</text:p>
          </table:table-cell>
          <table:table-cell office:value-type="float" office:value="-0.003724789">
            <text:p>-0.003724789</text:p>
          </table:table-cell>
          <table:table-cell table:number-columns-repeated="4"/>
        </table:table-row>
        <table:table-row table:style-name="ro1">
          <table:table-cell office:value-type="float" office:value="653.132263183594">
            <text:p>653.1322631836</text:p>
          </table:table-cell>
          <table:table-cell office:value-type="float" office:value="0.005335403">
            <text:p>0.005335403</text:p>
          </table:table-cell>
          <table:table-cell table:number-columns-repeated="4"/>
        </table:table-row>
        <table:table-row table:style-name="ro1">
          <table:table-cell office:value-type="float" office:value="653.251953125">
            <text:p>653.251953125</text:p>
          </table:table-cell>
          <table:table-cell office:value-type="float" office:value="-0.004495563">
            <text:p>-0.004495563</text:p>
          </table:table-cell>
          <table:table-cell table:number-columns-repeated="4"/>
        </table:table-row>
        <table:table-row table:style-name="ro1">
          <table:table-cell office:value-type="float" office:value="653.371704101563">
            <text:p>653.3717041016</text:p>
          </table:table-cell>
          <table:table-cell office:value-type="float" office:value="0.003990612">
            <text:p>0.003990612</text:p>
          </table:table-cell>
          <table:table-cell table:number-columns-repeated="4"/>
        </table:table-row>
        <table:table-row table:style-name="ro1">
          <table:table-cell office:value-type="float" office:value="653.491394042969">
            <text:p>653.491394043</text:p>
          </table:table-cell>
          <table:table-cell office:value-type="float" office:value="0.01957794">
            <text:p>0.01957794</text:p>
          </table:table-cell>
          <table:table-cell table:number-columns-repeated="4"/>
        </table:table-row>
        <table:table-row table:style-name="ro1">
          <table:table-cell office:value-type="float" office:value="653.611145019531">
            <text:p>653.6111450195</text:p>
          </table:table-cell>
          <table:table-cell office:value-type="float" office:value="0.005185043">
            <text:p>0.005185043</text:p>
          </table:table-cell>
          <table:table-cell table:number-columns-repeated="4"/>
        </table:table-row>
        <table:table-row table:style-name="ro1">
          <table:table-cell office:value-type="float" office:value="653.730834960938">
            <text:p>653.7308349609</text:p>
          </table:table-cell>
          <table:table-cell office:value-type="float" office:value="0.02385694">
            <text:p>0.02385694</text:p>
          </table:table-cell>
          <table:table-cell table:number-columns-repeated="4"/>
        </table:table-row>
        <table:table-row table:style-name="ro1">
          <table:table-cell office:value-type="float" office:value="653.8505859375">
            <text:p>653.8505859375</text:p>
          </table:table-cell>
          <table:table-cell office:value-type="float" office:value="0.004717229">
            <text:p>0.004717229</text:p>
          </table:table-cell>
          <table:table-cell table:number-columns-repeated="4"/>
        </table:table-row>
        <table:table-row table:style-name="ro1">
          <table:table-cell office:value-type="float" office:value="653.970275878906">
            <text:p>653.9702758789</text:p>
          </table:table-cell>
          <table:table-cell office:value-type="float" office:value="0.01801332">
            <text:p>0.01801332</text:p>
          </table:table-cell>
          <table:table-cell table:number-columns-repeated="4"/>
        </table:table-row>
        <table:table-row table:style-name="ro1">
          <table:table-cell office:value-type="float" office:value="654.090026855469">
            <text:p>654.0900268555</text:p>
          </table:table-cell>
          <table:table-cell office:value-type="float" office:value="-0.006366109">
            <text:p>-0.006366109</text:p>
          </table:table-cell>
          <table:table-cell table:number-columns-repeated="4"/>
        </table:table-row>
        <table:table-row table:style-name="ro1">
          <table:table-cell office:value-type="float" office:value="654.209716796875">
            <text:p>654.2097167969</text:p>
          </table:table-cell>
          <table:table-cell office:value-type="float" office:value="-0.003675169">
            <text:p>-0.003675169</text:p>
          </table:table-cell>
          <table:table-cell table:number-columns-repeated="4"/>
        </table:table-row>
        <table:table-row table:style-name="ro1">
          <table:table-cell office:value-type="float" office:value="654.329467773438">
            <text:p>654.3294677734</text:p>
          </table:table-cell>
          <table:table-cell office:value-type="float" office:value="-0.01202293">
            <text:p>-0.01202293</text:p>
          </table:table-cell>
          <table:table-cell table:number-columns-repeated="4"/>
        </table:table-row>
        <table:table-row table:style-name="ro1">
          <table:table-cell office:value-type="float" office:value="654.44921875">
            <text:p>654.44921875</text:p>
          </table:table-cell>
          <table:table-cell office:value-type="float" office:value="0.008361468">
            <text:p>0.008361468</text:p>
          </table:table-cell>
          <table:table-cell table:number-columns-repeated="4"/>
        </table:table-row>
        <table:table-row table:style-name="ro1">
          <table:table-cell office:value-type="float" office:value="654.568969726563">
            <text:p>654.5689697266</text:p>
          </table:table-cell>
          <table:table-cell office:value-type="float" office:value="-0.003884767">
            <text:p>-0.003884767</text:p>
          </table:table-cell>
          <table:table-cell table:number-columns-repeated="4"/>
        </table:table-row>
        <table:table-row table:style-name="ro1">
          <table:table-cell office:value-type="float" office:value="654.688659667969">
            <text:p>654.688659668</text:p>
          </table:table-cell>
          <table:table-cell office:value-type="float" office:value="0.007068644">
            <text:p>0.007068644</text:p>
          </table:table-cell>
          <table:table-cell table:number-columns-repeated="4"/>
        </table:table-row>
        <table:table-row table:style-name="ro1">
          <table:table-cell office:value-type="float" office:value="654.808410644531">
            <text:p>654.8084106445</text:p>
          </table:table-cell>
          <table:table-cell office:value-type="float" office:value="0.0005073598">
            <text:p>0.0005073598</text:p>
          </table:table-cell>
          <table:table-cell table:number-columns-repeated="4"/>
        </table:table-row>
        <table:table-row table:style-name="ro1">
          <table:table-cell office:value-type="float" office:value="654.928161621094">
            <text:p>654.9281616211</text:p>
          </table:table-cell>
          <table:table-cell office:value-type="float" office:value="-0.0007038256">
            <text:p>-0.0007038256</text:p>
          </table:table-cell>
          <table:table-cell table:number-columns-repeated="4"/>
        </table:table-row>
        <table:table-row table:style-name="ro1">
          <table:table-cell office:value-type="float" office:value="655.047912597656">
            <text:p>655.0479125977</text:p>
          </table:table-cell>
          <table:table-cell office:value-type="float" office:value="0.01838209">
            <text:p>0.01838209</text:p>
          </table:table-cell>
          <table:table-cell table:number-columns-repeated="4"/>
        </table:table-row>
        <table:table-row table:style-name="ro1">
          <table:table-cell office:value-type="float" office:value="655.167602539063">
            <text:p>655.1676025391</text:p>
          </table:table-cell>
          <table:table-cell office:value-type="float" office:value="-0.0002235119">
            <text:p>-0.0002235119</text:p>
          </table:table-cell>
          <table:table-cell table:number-columns-repeated="4"/>
        </table:table-row>
        <table:table-row table:style-name="ro1">
          <table:table-cell office:value-type="float" office:value="655.287353515625">
            <text:p>655.2873535156</text:p>
          </table:table-cell>
          <table:table-cell office:value-type="float" office:value="0.01046119">
            <text:p>0.01046119</text:p>
          </table:table-cell>
          <table:table-cell table:number-columns-repeated="4"/>
        </table:table-row>
        <table:table-row table:style-name="ro1">
          <table:table-cell office:value-type="float" office:value="655.407104492188">
            <text:p>655.4071044922</text:p>
          </table:table-cell>
          <table:table-cell office:value-type="float" office:value="-0.008311636">
            <text:p>-0.008311636</text:p>
          </table:table-cell>
          <table:table-cell table:number-columns-repeated="4"/>
        </table:table-row>
        <table:table-row table:style-name="ro1">
          <table:table-cell office:value-type="float" office:value="655.52685546875">
            <text:p>655.5268554688</text:p>
          </table:table-cell>
          <table:table-cell office:value-type="float" office:value="0.001683329">
            <text:p>0.001683329</text:p>
          </table:table-cell>
          <table:table-cell table:number-columns-repeated="4"/>
        </table:table-row>
        <table:table-row table:style-name="ro1">
          <table:table-cell office:value-type="float" office:value="655.646606445313">
            <text:p>655.6466064453</text:p>
          </table:table-cell>
          <table:table-cell office:value-type="float" office:value="-0.009718755">
            <text:p>-0.009718755</text:p>
          </table:table-cell>
          <table:table-cell table:number-columns-repeated="4"/>
        </table:table-row>
        <table:table-row table:style-name="ro1">
          <table:table-cell office:value-type="float" office:value="655.766357421875">
            <text:p>655.7663574219</text:p>
          </table:table-cell>
          <table:table-cell office:value-type="float" office:value="0.001828351">
            <text:p>0.001828351</text:p>
          </table:table-cell>
          <table:table-cell table:number-columns-repeated="4"/>
        </table:table-row>
        <table:table-row table:style-name="ro1">
          <table:table-cell office:value-type="float" office:value="655.886108398438">
            <text:p>655.8861083984</text:p>
          </table:table-cell>
          <table:table-cell office:value-type="float" office:value="-0.00815648">
            <text:p>-0.00815648</text:p>
          </table:table-cell>
          <table:table-cell table:number-columns-repeated="4"/>
        </table:table-row>
        <table:table-row table:style-name="ro1">
          <table:table-cell office:value-type="float" office:value="656.005859375">
            <text:p>656.005859375</text:p>
          </table:table-cell>
          <table:table-cell office:value-type="float" office:value="-0.01033911">
            <text:p>-0.01033911</text:p>
          </table:table-cell>
          <table:table-cell table:number-columns-repeated="4"/>
        </table:table-row>
        <table:table-row table:style-name="ro1">
          <table:table-cell office:value-type="float" office:value="656.125610351563">
            <text:p>656.1256103516</text:p>
          </table:table-cell>
          <table:table-cell office:value-type="float" office:value="0.002241095">
            <text:p>0.002241095</text:p>
          </table:table-cell>
          <table:table-cell table:number-columns-repeated="4"/>
        </table:table-row>
        <table:table-row table:style-name="ro1">
          <table:table-cell office:value-type="float" office:value="656.245361328125">
            <text:p>656.2453613281</text:p>
          </table:table-cell>
          <table:table-cell office:value-type="float" office:value="-0.002485774">
            <text:p>-0.002485774</text:p>
          </table:table-cell>
          <table:table-cell table:number-columns-repeated="4"/>
        </table:table-row>
        <table:table-row table:style-name="ro1">
          <table:table-cell office:value-type="float" office:value="656.365112304688">
            <text:p>656.3651123047</text:p>
          </table:table-cell>
          <table:table-cell office:value-type="float" office:value="0.0165264">
            <text:p>0.0165264</text:p>
          </table:table-cell>
          <table:table-cell table:number-columns-repeated="4"/>
        </table:table-row>
        <table:table-row table:style-name="ro1">
          <table:table-cell office:value-type="float" office:value="656.48486328125">
            <text:p>656.4848632813</text:p>
          </table:table-cell>
          <table:table-cell office:value-type="float" office:value="-0.002073888">
            <text:p>-0.002073888</text:p>
          </table:table-cell>
          <table:table-cell table:number-columns-repeated="4"/>
        </table:table-row>
        <table:table-row table:style-name="ro1">
          <table:table-cell office:value-type="float" office:value="656.604614257813">
            <text:p>656.6046142578</text:p>
          </table:table-cell>
          <table:table-cell office:value-type="float" office:value="0.00241895">
            <text:p>0.00241895</text:p>
          </table:table-cell>
          <table:table-cell table:number-columns-repeated="4"/>
        </table:table-row>
        <table:table-row table:style-name="ro1">
          <table:table-cell office:value-type="float" office:value="656.724365234375">
            <text:p>656.7243652344</text:p>
          </table:table-cell>
          <table:table-cell office:value-type="float" office:value="0.01962326">
            <text:p>0.01962326</text:p>
          </table:table-cell>
          <table:table-cell table:number-columns-repeated="4"/>
        </table:table-row>
        <table:table-row table:style-name="ro1">
          <table:table-cell office:value-type="float" office:value="656.844116210938">
            <text:p>656.8441162109</text:p>
          </table:table-cell>
          <table:table-cell office:value-type="float" office:value="0.001355273">
            <text:p>0.001355273</text:p>
          </table:table-cell>
          <table:table-cell table:number-columns-repeated="4"/>
        </table:table-row>
        <table:table-row table:style-name="ro1">
          <table:table-cell office:value-type="float" office:value="656.9638671875">
            <text:p>656.9638671875</text:p>
          </table:table-cell>
          <table:table-cell office:value-type="float" office:value="-0.001755424">
            <text:p>-0.001755424</text:p>
          </table:table-cell>
          <table:table-cell table:number-columns-repeated="4"/>
        </table:table-row>
        <table:table-row table:style-name="ro1">
          <table:table-cell office:value-type="float" office:value="657.083679199219">
            <text:p>657.0836791992</text:p>
          </table:table-cell>
          <table:table-cell office:value-type="float" office:value="0.003914101">
            <text:p>0.003914101</text:p>
          </table:table-cell>
          <table:table-cell table:number-columns-repeated="4"/>
        </table:table-row>
        <table:table-row table:style-name="ro1">
          <table:table-cell office:value-type="float" office:value="657.203430175781">
            <text:p>657.2034301758</text:p>
          </table:table-cell>
          <table:table-cell office:value-type="float" office:value="-0.003680764">
            <text:p>-0.003680764</text:p>
          </table:table-cell>
          <table:table-cell table:number-columns-repeated="4"/>
        </table:table-row>
        <table:table-row table:style-name="ro1">
          <table:table-cell office:value-type="float" office:value="657.323181152344">
            <text:p>657.3231811523</text:p>
          </table:table-cell>
          <table:table-cell office:value-type="float" office:value="0.01570501">
            <text:p>0.01570501</text:p>
          </table:table-cell>
          <table:table-cell table:number-columns-repeated="4"/>
        </table:table-row>
        <table:table-row table:style-name="ro1">
          <table:table-cell office:value-type="float" office:value="657.442932128906">
            <text:p>657.4429321289</text:p>
          </table:table-cell>
          <table:table-cell office:value-type="float" office:value="0.009525825">
            <text:p>0.009525825</text:p>
          </table:table-cell>
          <table:table-cell table:number-columns-repeated="4"/>
        </table:table-row>
        <table:table-row table:style-name="ro1">
          <table:table-cell office:value-type="float" office:value="657.562744140625">
            <text:p>657.5627441406</text:p>
          </table:table-cell>
          <table:table-cell office:value-type="float" office:value="0.005308683">
            <text:p>0.005308683</text:p>
          </table:table-cell>
          <table:table-cell table:number-columns-repeated="4"/>
        </table:table-row>
        <table:table-row table:style-name="ro1">
          <table:table-cell office:value-type="float" office:value="657.682495117188">
            <text:p>657.6824951172</text:p>
          </table:table-cell>
          <table:table-cell office:value-type="float" office:value="0.01649876">
            <text:p>0.01649876</text:p>
          </table:table-cell>
          <table:table-cell table:number-columns-repeated="4"/>
        </table:table-row>
        <table:table-row table:style-name="ro1">
          <table:table-cell office:value-type="float" office:value="657.80224609375">
            <text:p>657.8022460938</text:p>
          </table:table-cell>
          <table:table-cell office:value-type="float" office:value="0.008420316">
            <text:p>0.008420316</text:p>
          </table:table-cell>
          <table:table-cell table:number-columns-repeated="4"/>
        </table:table-row>
        <table:table-row table:style-name="ro1">
          <table:table-cell office:value-type="float" office:value="657.921997070313">
            <text:p>657.9219970703</text:p>
          </table:table-cell>
          <table:table-cell office:value-type="float" office:value="-0.005975451">
            <text:p>-0.005975451</text:p>
          </table:table-cell>
          <table:table-cell table:number-columns-repeated="4"/>
        </table:table-row>
        <table:table-row table:style-name="ro1">
          <table:table-cell office:value-type="float" office:value="658.041809082031">
            <text:p>658.041809082</text:p>
          </table:table-cell>
          <table:table-cell office:value-type="float" office:value="-0.003800791">
            <text:p>-0.003800791</text:p>
          </table:table-cell>
          <table:table-cell table:number-columns-repeated="4"/>
        </table:table-row>
        <table:table-row table:style-name="ro1">
          <table:table-cell office:value-type="float" office:value="658.161560058594">
            <text:p>658.1615600586</text:p>
          </table:table-cell>
          <table:table-cell office:value-type="float" office:value="-0.008139701">
            <text:p>-0.008139701</text:p>
          </table:table-cell>
          <table:table-cell table:number-columns-repeated="4"/>
        </table:table-row>
        <table:table-row table:style-name="ro1">
          <table:table-cell office:value-type="float" office:value="658.281372070313">
            <text:p>658.2813720703</text:p>
          </table:table-cell>
          <table:table-cell office:value-type="float" office:value="0.01476755">
            <text:p>0.01476755</text:p>
          </table:table-cell>
          <table:table-cell table:number-columns-repeated="4"/>
        </table:table-row>
        <table:table-row table:style-name="ro1">
          <table:table-cell office:value-type="float" office:value="658.401123046875">
            <text:p>658.4011230469</text:p>
          </table:table-cell>
          <table:table-cell office:value-type="float" office:value="0.03106951">
            <text:p>0.03106951</text:p>
          </table:table-cell>
          <table:table-cell table:number-columns-repeated="4"/>
        </table:table-row>
        <table:table-row table:style-name="ro1">
          <table:table-cell office:value-type="float" office:value="658.520935058594">
            <text:p>658.5209350586</text:p>
          </table:table-cell>
          <table:table-cell office:value-type="float" office:value="-0.003904947">
            <text:p>-0.003904947</text:p>
          </table:table-cell>
          <table:table-cell table:number-columns-repeated="4"/>
        </table:table-row>
        <table:table-row table:style-name="ro1">
          <table:table-cell office:value-type="float" office:value="658.640686035156">
            <text:p>658.6406860352</text:p>
          </table:table-cell>
          <table:table-cell office:value-type="float" office:value="-0.005812788">
            <text:p>-0.005812788</text:p>
          </table:table-cell>
          <table:table-cell table:number-columns-repeated="4"/>
        </table:table-row>
        <table:table-row table:style-name="ro1">
          <table:table-cell office:value-type="float" office:value="658.760437011719">
            <text:p>658.7604370117</text:p>
          </table:table-cell>
          <table:table-cell office:value-type="float" office:value="-0.001228384">
            <text:p>-0.001228384</text:p>
          </table:table-cell>
          <table:table-cell table:number-columns-repeated="4"/>
        </table:table-row>
        <table:table-row table:style-name="ro1">
          <table:table-cell office:value-type="float" office:value="658.880249023438">
            <text:p>658.8802490234</text:p>
          </table:table-cell>
          <table:table-cell office:value-type="float" office:value="-0.006517091">
            <text:p>-0.006517091</text:p>
          </table:table-cell>
          <table:table-cell table:number-columns-repeated="4"/>
        </table:table-row>
        <table:table-row table:style-name="ro1">
          <table:table-cell office:value-type="float" office:value="659.000061035156">
            <text:p>659.0000610352</text:p>
          </table:table-cell>
          <table:table-cell office:value-type="float" office:value="-0.003143149">
            <text:p>-0.003143149</text:p>
          </table:table-cell>
          <table:table-cell table:number-columns-repeated="4"/>
        </table:table-row>
        <table:table-row table:style-name="ro1">
          <table:table-cell office:value-type="float" office:value="659.119812011719">
            <text:p>659.1198120117</text:p>
          </table:table-cell>
          <table:table-cell office:value-type="float" office:value="-0.006892288">
            <text:p>-0.006892288</text:p>
          </table:table-cell>
          <table:table-cell table:number-columns-repeated="4"/>
        </table:table-row>
        <table:table-row table:style-name="ro1">
          <table:table-cell office:value-type="float" office:value="659.239624023438">
            <text:p>659.2396240234</text:p>
          </table:table-cell>
          <table:table-cell office:value-type="float" office:value="0.00548214">
            <text:p>0.00548214</text:p>
          </table:table-cell>
          <table:table-cell table:number-columns-repeated="4"/>
        </table:table-row>
        <table:table-row table:style-name="ro1">
          <table:table-cell office:value-type="float" office:value="659.359375">
            <text:p>659.359375</text:p>
          </table:table-cell>
          <table:table-cell office:value-type="float" office:value="0.004296086">
            <text:p>0.004296086</text:p>
          </table:table-cell>
          <table:table-cell table:number-columns-repeated="4"/>
        </table:table-row>
        <table:table-row table:style-name="ro1">
          <table:table-cell office:value-type="float" office:value="659.479187011719">
            <text:p>659.4791870117</text:p>
          </table:table-cell>
          <table:table-cell office:value-type="float" office:value="0.001924036">
            <text:p>0.001924036</text:p>
          </table:table-cell>
          <table:table-cell table:number-columns-repeated="4"/>
        </table:table-row>
        <table:table-row table:style-name="ro1">
          <table:table-cell office:value-type="float" office:value="659.598999023438">
            <text:p>659.5989990234</text:p>
          </table:table-cell>
          <table:table-cell office:value-type="float" office:value="0.002087465">
            <text:p>0.002087465</text:p>
          </table:table-cell>
          <table:table-cell table:number-columns-repeated="4"/>
        </table:table-row>
        <table:table-row table:style-name="ro1">
          <table:table-cell office:value-type="float" office:value="659.71875">
            <text:p>659.71875</text:p>
          </table:table-cell>
          <table:table-cell office:value-type="float" office:value="0.004051721">
            <text:p>0.004051721</text:p>
          </table:table-cell>
          <table:table-cell table:number-columns-repeated="4"/>
        </table:table-row>
        <table:table-row table:style-name="ro1">
          <table:table-cell office:value-type="float" office:value="659.838562011719">
            <text:p>659.8385620117</text:p>
          </table:table-cell>
          <table:table-cell office:value-type="float" office:value="-0.006589915">
            <text:p>-0.006589915</text:p>
          </table:table-cell>
          <table:table-cell table:number-columns-repeated="4"/>
        </table:table-row>
        <table:table-row table:style-name="ro1">
          <table:table-cell office:value-type="float" office:value="659.958374023438">
            <text:p>659.9583740234</text:p>
          </table:table-cell>
          <table:table-cell office:value-type="float" office:value="-0.002542848">
            <text:p>-0.002542848</text:p>
          </table:table-cell>
          <table:table-cell table:number-columns-repeated="4"/>
        </table:table-row>
        <table:table-row table:style-name="ro1">
          <table:table-cell office:value-type="float" office:value="660.078125">
            <text:p>660.078125</text:p>
          </table:table-cell>
          <table:table-cell office:value-type="float" office:value="-0.00792969">
            <text:p>-0.00792969</text:p>
          </table:table-cell>
          <table:table-cell table:number-columns-repeated="4"/>
        </table:table-row>
        <table:table-row table:style-name="ro1">
          <table:table-cell office:value-type="float" office:value="660.197937011719">
            <text:p>660.1979370117</text:p>
          </table:table-cell>
          <table:table-cell office:value-type="float" office:value="0.006251895">
            <text:p>0.006251895</text:p>
          </table:table-cell>
          <table:table-cell table:number-columns-repeated="4"/>
        </table:table-row>
        <table:table-row table:style-name="ro1">
          <table:table-cell office:value-type="float" office:value="660.317749023438">
            <text:p>660.3177490234</text:p>
          </table:table-cell>
          <table:table-cell office:value-type="float" office:value="0.002762864">
            <text:p>0.002762864</text:p>
          </table:table-cell>
          <table:table-cell table:number-columns-repeated="4"/>
        </table:table-row>
        <table:table-row table:style-name="ro1">
          <table:table-cell office:value-type="float" office:value="660.437561035156">
            <text:p>660.4375610352</text:p>
          </table:table-cell>
          <table:table-cell office:value-type="float" office:value="0.01529136">
            <text:p>0.01529136</text:p>
          </table:table-cell>
          <table:table-cell table:number-columns-repeated="4"/>
        </table:table-row>
        <table:table-row table:style-name="ro1">
          <table:table-cell office:value-type="float" office:value="660.557373046875">
            <text:p>660.5573730469</text:p>
          </table:table-cell>
          <table:table-cell office:value-type="float" office:value="-0.01098717">
            <text:p>-0.01098717</text:p>
          </table:table-cell>
          <table:table-cell table:number-columns-repeated="4"/>
        </table:table-row>
        <table:table-row table:style-name="ro1">
          <table:table-cell office:value-type="float" office:value="660.677124023438">
            <text:p>660.6771240234</text:p>
          </table:table-cell>
          <table:table-cell office:value-type="float" office:value="-0.006757346">
            <text:p>-0.006757346</text:p>
          </table:table-cell>
          <table:table-cell table:number-columns-repeated="4"/>
        </table:table-row>
        <table:table-row table:style-name="ro1">
          <table:table-cell office:value-type="float" office:value="660.796936035156">
            <text:p>660.7969360352</text:p>
          </table:table-cell>
          <table:table-cell office:value-type="float" office:value="-0.00142329">
            <text:p>-0.00142329</text:p>
          </table:table-cell>
          <table:table-cell table:number-columns-repeated="4"/>
        </table:table-row>
        <table:table-row table:style-name="ro1">
          <table:table-cell office:value-type="float" office:value="660.916748046875">
            <text:p>660.9167480469</text:p>
          </table:table-cell>
          <table:table-cell office:value-type="float" office:value="-0.009752787">
            <text:p>-0.009752787</text:p>
          </table:table-cell>
          <table:table-cell table:number-columns-repeated="4"/>
        </table:table-row>
        <table:table-row table:style-name="ro1">
          <table:table-cell office:value-type="float" office:value="661.036560058594">
            <text:p>661.0365600586</text:p>
          </table:table-cell>
          <table:table-cell office:value-type="float" office:value="0.004032441">
            <text:p>0.004032441</text:p>
          </table:table-cell>
          <table:table-cell table:number-columns-repeated="4"/>
        </table:table-row>
        <table:table-row table:style-name="ro1">
          <table:table-cell office:value-type="float" office:value="661.156372070313">
            <text:p>661.1563720703</text:p>
          </table:table-cell>
          <table:table-cell office:value-type="float" office:value="0.005128266">
            <text:p>0.005128266</text:p>
          </table:table-cell>
          <table:table-cell table:number-columns-repeated="4"/>
        </table:table-row>
        <table:table-row table:style-name="ro1">
          <table:table-cell office:value-type="float" office:value="661.276184082031">
            <text:p>661.276184082</text:p>
          </table:table-cell>
          <table:table-cell office:value-type="float" office:value="-0.001012249">
            <text:p>-0.001012249</text:p>
          </table:table-cell>
          <table:table-cell table:number-columns-repeated="4"/>
        </table:table-row>
        <table:table-row table:style-name="ro1">
          <table:table-cell office:value-type="float" office:value="661.39599609375">
            <text:p>661.3959960938</text:p>
          </table:table-cell>
          <table:table-cell office:value-type="float" office:value="0.0008735593">
            <text:p>0.0008735593</text:p>
          </table:table-cell>
          <table:table-cell table:number-columns-repeated="4"/>
        </table:table-row>
        <table:table-row table:style-name="ro1">
          <table:table-cell office:value-type="float" office:value="661.515808105469">
            <text:p>661.5158081055</text:p>
          </table:table-cell>
          <table:table-cell office:value-type="float" office:value="0.01130677">
            <text:p>0.01130677</text:p>
          </table:table-cell>
          <table:table-cell table:number-columns-repeated="4"/>
        </table:table-row>
        <table:table-row table:style-name="ro1">
          <table:table-cell office:value-type="float" office:value="661.635620117188">
            <text:p>661.6356201172</text:p>
          </table:table-cell>
          <table:table-cell office:value-type="float" office:value="-0.003054559">
            <text:p>-0.003054559</text:p>
          </table:table-cell>
          <table:table-cell table:number-columns-repeated="4"/>
        </table:table-row>
        <table:table-row table:style-name="ro1">
          <table:table-cell office:value-type="float" office:value="661.755432128906">
            <text:p>661.7554321289</text:p>
          </table:table-cell>
          <table:table-cell office:value-type="float" office:value="0.004936344">
            <text:p>0.004936344</text:p>
          </table:table-cell>
          <table:table-cell table:number-columns-repeated="4"/>
        </table:table-row>
        <table:table-row table:style-name="ro1">
          <table:table-cell office:value-type="float" office:value="661.875244140625">
            <text:p>661.8752441406</text:p>
          </table:table-cell>
          <table:table-cell office:value-type="float" office:value="0.01030722">
            <text:p>0.01030722</text:p>
          </table:table-cell>
          <table:table-cell table:number-columns-repeated="4"/>
        </table:table-row>
        <table:table-row table:style-name="ro1">
          <table:table-cell office:value-type="float" office:value="661.995056152344">
            <text:p>661.9950561523</text:p>
          </table:table-cell>
          <table:table-cell office:value-type="float" office:value="0.002734483">
            <text:p>0.002734483</text:p>
          </table:table-cell>
          <table:table-cell table:number-columns-repeated="4"/>
        </table:table-row>
        <table:table-row table:style-name="ro1">
          <table:table-cell office:value-type="float" office:value="662.114868164063">
            <text:p>662.1148681641</text:p>
          </table:table-cell>
          <table:table-cell office:value-type="float" office:value="-0.002460798">
            <text:p>-0.002460798</text:p>
          </table:table-cell>
          <table:table-cell table:number-columns-repeated="4"/>
        </table:table-row>
        <table:table-row table:style-name="ro1">
          <table:table-cell office:value-type="float" office:value="662.234680175781">
            <text:p>662.2346801758</text:p>
          </table:table-cell>
          <table:table-cell office:value-type="float" office:value="-0.005274433">
            <text:p>-0.005274433</text:p>
          </table:table-cell>
          <table:table-cell table:number-columns-repeated="4"/>
        </table:table-row>
        <table:table-row table:style-name="ro1">
          <table:table-cell office:value-type="float" office:value="662.354553222656">
            <text:p>662.3545532227</text:p>
          </table:table-cell>
          <table:table-cell office:value-type="float" office:value="-0.005323344">
            <text:p>-0.005323344</text:p>
          </table:table-cell>
          <table:table-cell table:number-columns-repeated="4"/>
        </table:table-row>
        <table:table-row table:style-name="ro1">
          <table:table-cell office:value-type="float" office:value="662.474365234375">
            <text:p>662.4743652344</text:p>
          </table:table-cell>
          <table:table-cell office:value-type="float" office:value="-0.0008486711">
            <text:p>-0.0008486711</text:p>
          </table:table-cell>
          <table:table-cell table:number-columns-repeated="4"/>
        </table:table-row>
        <table:table-row table:style-name="ro1">
          <table:table-cell office:value-type="float" office:value="662.594177246094">
            <text:p>662.5941772461</text:p>
          </table:table-cell>
          <table:table-cell office:value-type="float" office:value="0.002014594">
            <text:p>0.002014594</text:p>
          </table:table-cell>
          <table:table-cell table:number-columns-repeated="4"/>
        </table:table-row>
        <table:table-row table:style-name="ro1">
          <table:table-cell office:value-type="float" office:value="662.713989257813">
            <text:p>662.7139892578</text:p>
          </table:table-cell>
          <table:table-cell office:value-type="float" office:value="0.006618525">
            <text:p>0.006618525</text:p>
          </table:table-cell>
          <table:table-cell table:number-columns-repeated="4"/>
        </table:table-row>
        <table:table-row table:style-name="ro1">
          <table:table-cell office:value-type="float" office:value="662.833801269531">
            <text:p>662.8338012695</text:p>
          </table:table-cell>
          <table:table-cell office:value-type="float" office:value="-0.009439715">
            <text:p>-0.009439715</text:p>
          </table:table-cell>
          <table:table-cell table:number-columns-repeated="4"/>
        </table:table-row>
        <table:table-row table:style-name="ro1">
          <table:table-cell office:value-type="float" office:value="662.953674316406">
            <text:p>662.9536743164</text:p>
          </table:table-cell>
          <table:table-cell office:value-type="float" office:value="-0.003446416">
            <text:p>-0.003446416</text:p>
          </table:table-cell>
          <table:table-cell table:number-columns-repeated="4"/>
        </table:table-row>
        <table:table-row table:style-name="ro1">
          <table:table-cell office:value-type="float" office:value="663.073486328125">
            <text:p>663.0734863281</text:p>
          </table:table-cell>
          <table:table-cell office:value-type="float" office:value="-0.001911501">
            <text:p>-0.001911501</text:p>
          </table:table-cell>
          <table:table-cell table:number-columns-repeated="4"/>
        </table:table-row>
        <table:table-row table:style-name="ro1">
          <table:table-cell office:value-type="float" office:value="663.193298339844">
            <text:p>663.1932983398</text:p>
          </table:table-cell>
          <table:table-cell office:value-type="float" office:value="-0.001374864">
            <text:p>-0.001374864</text:p>
          </table:table-cell>
          <table:table-cell table:number-columns-repeated="4"/>
        </table:table-row>
        <table:table-row table:style-name="ro1">
          <table:table-cell office:value-type="float" office:value="663.313110351563">
            <text:p>663.3131103516</text:p>
          </table:table-cell>
          <table:table-cell office:value-type="float" office:value="0.001109533">
            <text:p>0.001109533</text:p>
          </table:table-cell>
          <table:table-cell table:number-columns-repeated="4"/>
        </table:table-row>
        <table:table-row table:style-name="ro1">
          <table:table-cell office:value-type="float" office:value="663.432983398438">
            <text:p>663.4329833984</text:p>
          </table:table-cell>
          <table:table-cell office:value-type="float" office:value="-0.0009113282">
            <text:p>-0.0009113282</text:p>
          </table:table-cell>
          <table:table-cell table:number-columns-repeated="4"/>
        </table:table-row>
        <table:table-row table:style-name="ro1">
          <table:table-cell office:value-type="float" office:value="663.552795410156">
            <text:p>663.5527954102</text:p>
          </table:table-cell>
          <table:table-cell office:value-type="float" office:value="0.002413901">
            <text:p>0.002413901</text:p>
          </table:table-cell>
          <table:table-cell table:number-columns-repeated="4"/>
        </table:table-row>
        <table:table-row table:style-name="ro1">
          <table:table-cell office:value-type="float" office:value="663.672668457031">
            <text:p>663.672668457</text:p>
          </table:table-cell>
          <table:table-cell office:value-type="float" office:value="-0.0007088789">
            <text:p>-0.0007088789</text:p>
          </table:table-cell>
          <table:table-cell table:number-columns-repeated="4"/>
        </table:table-row>
        <table:table-row table:style-name="ro1">
          <table:table-cell office:value-type="float" office:value="663.79248046875">
            <text:p>663.7924804688</text:p>
          </table:table-cell>
          <table:table-cell office:value-type="float" office:value="0.001932491">
            <text:p>0.001932491</text:p>
          </table:table-cell>
          <table:table-cell table:number-columns-repeated="4"/>
        </table:table-row>
        <table:table-row table:style-name="ro1">
          <table:table-cell office:value-type="float" office:value="663.912292480469">
            <text:p>663.9122924805</text:p>
          </table:table-cell>
          <table:table-cell office:value-type="string">
            <text:p>2.268858E-05</text:p>
          </table:table-cell>
          <table:table-cell table:number-columns-repeated="4"/>
        </table:table-row>
        <table:table-row table:style-name="ro1">
          <table:table-cell office:value-type="float" office:value="664.032165527344">
            <text:p>664.0321655273</text:p>
          </table:table-cell>
          <table:table-cell office:value-type="float" office:value="0.004589454">
            <text:p>0.004589454</text:p>
          </table:table-cell>
          <table:table-cell table:number-columns-repeated="4"/>
        </table:table-row>
        <table:table-row table:style-name="ro1">
          <table:table-cell office:value-type="float" office:value="664.151977539063">
            <text:p>664.1519775391</text:p>
          </table:table-cell>
          <table:table-cell office:value-type="float" office:value="-0.0002608005">
            <text:p>-0.0002608005</text:p>
          </table:table-cell>
          <table:table-cell table:number-columns-repeated="4"/>
        </table:table-row>
        <table:table-row table:style-name="ro1">
          <table:table-cell office:value-type="float" office:value="664.271850585938">
            <text:p>664.2718505859</text:p>
          </table:table-cell>
          <table:table-cell office:value-type="float" office:value="-0.00713217">
            <text:p>-0.00713217</text:p>
          </table:table-cell>
          <table:table-cell table:number-columns-repeated="4"/>
        </table:table-row>
        <table:table-row table:style-name="ro1">
          <table:table-cell office:value-type="float" office:value="664.391662597656">
            <text:p>664.3916625977</text:p>
          </table:table-cell>
          <table:table-cell office:value-type="float" office:value="-0.00091665">
            <text:p>-0.00091665</text:p>
          </table:table-cell>
          <table:table-cell table:number-columns-repeated="4"/>
        </table:table-row>
        <table:table-row table:style-name="ro1">
          <table:table-cell office:value-type="float" office:value="664.511535644531">
            <text:p>664.5115356445</text:p>
          </table:table-cell>
          <table:table-cell office:value-type="float" office:value="0.004601344">
            <text:p>0.004601344</text:p>
          </table:table-cell>
          <table:table-cell table:number-columns-repeated="4"/>
        </table:table-row>
        <table:table-row table:style-name="ro1">
          <table:table-cell office:value-type="float" office:value="664.63134765625">
            <text:p>664.6313476563</text:p>
          </table:table-cell>
          <table:table-cell office:value-type="float" office:value="-0.001734036">
            <text:p>-0.001734036</text:p>
          </table:table-cell>
          <table:table-cell table:number-columns-repeated="4"/>
        </table:table-row>
        <table:table-row table:style-name="ro1">
          <table:table-cell office:value-type="float" office:value="664.751220703125">
            <text:p>664.7512207031</text:p>
          </table:table-cell>
          <table:table-cell office:value-type="float" office:value="-0.007999957">
            <text:p>-0.007999957</text:p>
          </table:table-cell>
          <table:table-cell table:number-columns-repeated="4"/>
        </table:table-row>
        <table:table-row table:style-name="ro1">
          <table:table-cell office:value-type="float" office:value="664.87109375">
            <text:p>664.87109375</text:p>
          </table:table-cell>
          <table:table-cell office:value-type="float" office:value="0.005355991">
            <text:p>0.005355991</text:p>
          </table:table-cell>
          <table:table-cell table:number-columns-repeated="4"/>
        </table:table-row>
        <table:table-row table:style-name="ro1">
          <table:table-cell office:value-type="float" office:value="664.990905761719">
            <text:p>664.9909057617</text:p>
          </table:table-cell>
          <table:table-cell office:value-type="float" office:value="0.006110932">
            <text:p>0.006110932</text:p>
          </table:table-cell>
          <table:table-cell table:number-columns-repeated="4"/>
        </table:table-row>
        <table:table-row table:style-name="ro1">
          <table:table-cell office:value-type="float" office:value="665.110778808594">
            <text:p>665.1107788086</text:p>
          </table:table-cell>
          <table:table-cell office:value-type="float" office:value="-0.001803587">
            <text:p>-0.001803587</text:p>
          </table:table-cell>
          <table:table-cell table:number-columns-repeated="4"/>
        </table:table-row>
        <table:table-row table:style-name="ro1">
          <table:table-cell office:value-type="float" office:value="665.230590820313">
            <text:p>665.2305908203</text:p>
          </table:table-cell>
          <table:table-cell office:value-type="float" office:value="0.006308377">
            <text:p>0.006308377</text:p>
          </table:table-cell>
          <table:table-cell table:number-columns-repeated="4"/>
        </table:table-row>
        <table:table-row table:style-name="ro1">
          <table:table-cell office:value-type="float" office:value="665.350463867188">
            <text:p>665.3504638672</text:p>
          </table:table-cell>
          <table:table-cell office:value-type="float" office:value="-0.008345726">
            <text:p>-0.008345726</text:p>
          </table:table-cell>
          <table:table-cell table:number-columns-repeated="4"/>
        </table:table-row>
        <table:table-row table:style-name="ro1">
          <table:table-cell office:value-type="float" office:value="665.470336914063">
            <text:p>665.4703369141</text:p>
          </table:table-cell>
          <table:table-cell office:value-type="float" office:value="0.01352502">
            <text:p>0.01352502</text:p>
          </table:table-cell>
          <table:table-cell table:number-columns-repeated="4"/>
        </table:table-row>
        <table:table-row table:style-name="ro1">
          <table:table-cell office:value-type="float" office:value="665.590148925781">
            <text:p>665.5901489258</text:p>
          </table:table-cell>
          <table:table-cell office:value-type="float" office:value="0.008724253">
            <text:p>0.008724253</text:p>
          </table:table-cell>
          <table:table-cell table:number-columns-repeated="4"/>
        </table:table-row>
        <table:table-row table:style-name="ro1">
          <table:table-cell office:value-type="float" office:value="665.710021972656">
            <text:p>665.7100219727</text:p>
          </table:table-cell>
          <table:table-cell office:value-type="float" office:value="0.0002415836">
            <text:p>0.0002415836</text:p>
          </table:table-cell>
          <table:table-cell table:number-columns-repeated="4"/>
        </table:table-row>
        <table:table-row table:style-name="ro1">
          <table:table-cell office:value-type="float" office:value="665.829895019531">
            <text:p>665.8298950195</text:p>
          </table:table-cell>
          <table:table-cell office:value-type="float" office:value="-0.005179127">
            <text:p>-0.005179127</text:p>
          </table:table-cell>
          <table:table-cell table:number-columns-repeated="4"/>
        </table:table-row>
        <table:table-row table:style-name="ro1">
          <table:table-cell office:value-type="float" office:value="665.949768066406">
            <text:p>665.9497680664</text:p>
          </table:table-cell>
          <table:table-cell office:value-type="float" office:value="0.01542372">
            <text:p>0.01542372</text:p>
          </table:table-cell>
          <table:table-cell table:number-columns-repeated="4"/>
        </table:table-row>
        <table:table-row table:style-name="ro1">
          <table:table-cell office:value-type="float" office:value="666.069580078125">
            <text:p>666.0695800781</text:p>
          </table:table-cell>
          <table:table-cell office:value-type="float" office:value="-0.006098511">
            <text:p>-0.006098511</text:p>
          </table:table-cell>
          <table:table-cell table:number-columns-repeated="4"/>
        </table:table-row>
        <table:table-row table:style-name="ro1">
          <table:table-cell office:value-type="float" office:value="666.189453125">
            <text:p>666.189453125</text:p>
          </table:table-cell>
          <table:table-cell office:value-type="float" office:value="0.01819851">
            <text:p>0.01819851</text:p>
          </table:table-cell>
          <table:table-cell table:number-columns-repeated="4"/>
        </table:table-row>
        <table:table-row table:style-name="ro1">
          <table:table-cell office:value-type="float" office:value="666.309326171875">
            <text:p>666.3093261719</text:p>
          </table:table-cell>
          <table:table-cell office:value-type="float" office:value="-0.003402918">
            <text:p>-0.003402918</text:p>
          </table:table-cell>
          <table:table-cell table:number-columns-repeated="4"/>
        </table:table-row>
        <table:table-row table:style-name="ro1">
          <table:table-cell office:value-type="float" office:value="666.42919921875">
            <text:p>666.4291992188</text:p>
          </table:table-cell>
          <table:table-cell office:value-type="float" office:value="0.008276424">
            <text:p>0.008276424</text:p>
          </table:table-cell>
          <table:table-cell table:number-columns-repeated="4"/>
        </table:table-row>
        <table:table-row table:style-name="ro1">
          <table:table-cell office:value-type="float" office:value="666.549072265625">
            <text:p>666.5490722656</text:p>
          </table:table-cell>
          <table:table-cell office:value-type="float" office:value="0.00776046">
            <text:p>0.00776046</text:p>
          </table:table-cell>
          <table:table-cell table:number-columns-repeated="4"/>
        </table:table-row>
        <table:table-row table:style-name="ro1">
          <table:table-cell office:value-type="float" office:value="666.6689453125">
            <text:p>666.6689453125</text:p>
          </table:table-cell>
          <table:table-cell office:value-type="float" office:value="0.0005662547">
            <text:p>0.0005662547</text:p>
          </table:table-cell>
          <table:table-cell table:number-columns-repeated="4"/>
        </table:table-row>
        <table:table-row table:style-name="ro1">
          <table:table-cell office:value-type="float" office:value="666.788818359375">
            <text:p>666.7888183594</text:p>
          </table:table-cell>
          <table:table-cell office:value-type="float" office:value="0.000337159">
            <text:p>0.000337159</text:p>
          </table:table-cell>
          <table:table-cell table:number-columns-repeated="4"/>
        </table:table-row>
        <table:table-row table:style-name="ro1">
          <table:table-cell office:value-type="float" office:value="666.90869140625">
            <text:p>666.9086914063</text:p>
          </table:table-cell>
          <table:table-cell office:value-type="float" office:value="-0.004466649">
            <text:p>-0.004466649</text:p>
          </table:table-cell>
          <table:table-cell table:number-columns-repeated="4"/>
        </table:table-row>
        <table:table-row table:style-name="ro1">
          <table:table-cell office:value-type="float" office:value="667.028564453125">
            <text:p>667.0285644531</text:p>
          </table:table-cell>
          <table:table-cell office:value-type="float" office:value="0.002265425">
            <text:p>0.002265425</text:p>
          </table:table-cell>
          <table:table-cell table:number-columns-repeated="4"/>
        </table:table-row>
        <table:table-row table:style-name="ro1">
          <table:table-cell office:value-type="float" office:value="667.1484375">
            <text:p>667.1484375</text:p>
          </table:table-cell>
          <table:table-cell office:value-type="float" office:value="0.002279571">
            <text:p>0.002279571</text:p>
          </table:table-cell>
          <table:table-cell table:number-columns-repeated="4"/>
        </table:table-row>
        <table:table-row table:style-name="ro1">
          <table:table-cell office:value-type="float" office:value="667.268310546875">
            <text:p>667.2683105469</text:p>
          </table:table-cell>
          <table:table-cell office:value-type="float" office:value="0.0006815857">
            <text:p>0.0006815857</text:p>
          </table:table-cell>
          <table:table-cell table:number-columns-repeated="4"/>
        </table:table-row>
        <table:table-row table:style-name="ro1">
          <table:table-cell office:value-type="float" office:value="667.38818359375">
            <text:p>667.3881835938</text:p>
          </table:table-cell>
          <table:table-cell office:value-type="float" office:value="0.008431074">
            <text:p>0.008431074</text:p>
          </table:table-cell>
          <table:table-cell table:number-columns-repeated="4"/>
        </table:table-row>
        <table:table-row table:style-name="ro1">
          <table:table-cell office:value-type="float" office:value="667.508056640625">
            <text:p>667.5080566406</text:p>
          </table:table-cell>
          <table:table-cell office:value-type="float" office:value="-0.004874736">
            <text:p>-0.004874736</text:p>
          </table:table-cell>
          <table:table-cell table:number-columns-repeated="4"/>
        </table:table-row>
        <table:table-row table:style-name="ro1">
          <table:table-cell office:value-type="float" office:value="667.6279296875">
            <text:p>667.6279296875</text:p>
          </table:table-cell>
          <table:table-cell office:value-type="float" office:value="-0.006839002">
            <text:p>-0.006839002</text:p>
          </table:table-cell>
          <table:table-cell table:number-columns-repeated="4"/>
        </table:table-row>
        <table:table-row table:style-name="ro1">
          <table:table-cell office:value-type="float" office:value="667.747802734375">
            <text:p>667.7478027344</text:p>
          </table:table-cell>
          <table:table-cell office:value-type="float" office:value="-0.006430139">
            <text:p>-0.006430139</text:p>
          </table:table-cell>
          <table:table-cell table:number-columns-repeated="4"/>
        </table:table-row>
        <table:table-row table:style-name="ro1">
          <table:table-cell office:value-type="float" office:value="667.86767578125">
            <text:p>667.8676757813</text:p>
          </table:table-cell>
          <table:table-cell office:value-type="float" office:value="-0.01344361">
            <text:p>-0.01344361</text:p>
          </table:table-cell>
          <table:table-cell table:number-columns-repeated="4"/>
        </table:table-row>
        <table:table-row table:style-name="ro1">
          <table:table-cell office:value-type="float" office:value="667.987548828125">
            <text:p>667.9875488281</text:p>
          </table:table-cell>
          <table:table-cell office:value-type="float" office:value="0.005813934">
            <text:p>0.005813934</text:p>
          </table:table-cell>
          <table:table-cell table:number-columns-repeated="4"/>
        </table:table-row>
        <table:table-row table:style-name="ro1">
          <table:table-cell office:value-type="float" office:value="668.107421875">
            <text:p>668.107421875</text:p>
          </table:table-cell>
          <table:table-cell office:value-type="float" office:value="-0.01161091">
            <text:p>-0.01161091</text:p>
          </table:table-cell>
          <table:table-cell table:number-columns-repeated="4"/>
        </table:table-row>
        <table:table-row table:style-name="ro1">
          <table:table-cell office:value-type="float" office:value="668.227294921875">
            <text:p>668.2272949219</text:p>
          </table:table-cell>
          <table:table-cell office:value-type="string">
            <text:p>5.155312E-05</text:p>
          </table:table-cell>
          <table:table-cell table:number-columns-repeated="4"/>
        </table:table-row>
        <table:table-row table:style-name="ro1">
          <table:table-cell office:value-type="float" office:value="668.34716796875">
            <text:p>668.3471679688</text:p>
          </table:table-cell>
          <table:table-cell office:value-type="float" office:value="0.00523892">
            <text:p>0.00523892</text:p>
          </table:table-cell>
          <table:table-cell table:number-columns-repeated="4"/>
        </table:table-row>
        <table:table-row table:style-name="ro1">
          <table:table-cell office:value-type="float" office:value="668.467102050781">
            <text:p>668.4671020508</text:p>
          </table:table-cell>
          <table:table-cell office:value-type="float" office:value="0.0003536598">
            <text:p>0.0003536598</text:p>
          </table:table-cell>
          <table:table-cell table:number-columns-repeated="4"/>
        </table:table-row>
        <table:table-row table:style-name="ro1">
          <table:table-cell office:value-type="float" office:value="668.586975097656">
            <text:p>668.5869750977</text:p>
          </table:table-cell>
          <table:table-cell office:value-type="float" office:value="-0.002190942">
            <text:p>-0.002190942</text:p>
          </table:table-cell>
          <table:table-cell table:number-columns-repeated="4"/>
        </table:table-row>
        <table:table-row table:style-name="ro1">
          <table:table-cell office:value-type="float" office:value="668.706848144531">
            <text:p>668.7068481445</text:p>
          </table:table-cell>
          <table:table-cell office:value-type="float" office:value="-0.001825592">
            <text:p>-0.001825592</text:p>
          </table:table-cell>
          <table:table-cell table:number-columns-repeated="4"/>
        </table:table-row>
        <table:table-row table:style-name="ro1">
          <table:table-cell office:value-type="float" office:value="668.826721191406">
            <text:p>668.8267211914</text:p>
          </table:table-cell>
          <table:table-cell office:value-type="float" office:value="-0.002570548">
            <text:p>-0.002570548</text:p>
          </table:table-cell>
          <table:table-cell table:number-columns-repeated="4"/>
        </table:table-row>
        <table:table-row table:style-name="ro1">
          <table:table-cell office:value-type="float" office:value="668.946594238281">
            <text:p>668.9465942383</text:p>
          </table:table-cell>
          <table:table-cell office:value-type="float" office:value="0.006585503">
            <text:p>0.006585503</text:p>
          </table:table-cell>
          <table:table-cell table:number-columns-repeated="4"/>
        </table:table-row>
        <table:table-row table:style-name="ro1">
          <table:table-cell office:value-type="float" office:value="669.066528320313">
            <text:p>669.0665283203</text:p>
          </table:table-cell>
          <table:table-cell office:value-type="float" office:value="0.002358148">
            <text:p>0.002358148</text:p>
          </table:table-cell>
          <table:table-cell table:number-columns-repeated="4"/>
        </table:table-row>
        <table:table-row table:style-name="ro1">
          <table:table-cell office:value-type="float" office:value="669.186401367188">
            <text:p>669.1864013672</text:p>
          </table:table-cell>
          <table:table-cell office:value-type="float" office:value="-0.007394173">
            <text:p>-0.007394173</text:p>
          </table:table-cell>
          <table:table-cell table:number-columns-repeated="4"/>
        </table:table-row>
        <table:table-row table:style-name="ro1">
          <table:table-cell office:value-type="float" office:value="669.306274414063">
            <text:p>669.3062744141</text:p>
          </table:table-cell>
          <table:table-cell office:value-type="float" office:value="0.01283471">
            <text:p>0.01283471</text:p>
          </table:table-cell>
          <table:table-cell table:number-columns-repeated="4"/>
        </table:table-row>
        <table:table-row table:style-name="ro1">
          <table:table-cell office:value-type="float" office:value="669.426208496094">
            <text:p>669.4262084961</text:p>
          </table:table-cell>
          <table:table-cell office:value-type="float" office:value="0.003399528">
            <text:p>0.003399528</text:p>
          </table:table-cell>
          <table:table-cell table:number-columns-repeated="4"/>
        </table:table-row>
        <table:table-row table:style-name="ro1">
          <table:table-cell office:value-type="float" office:value="669.546081542969">
            <text:p>669.546081543</text:p>
          </table:table-cell>
          <table:table-cell office:value-type="float" office:value="-0.005740819">
            <text:p>-0.005740819</text:p>
          </table:table-cell>
          <table:table-cell table:number-columns-repeated="4"/>
        </table:table-row>
        <table:table-row table:style-name="ro1">
          <table:table-cell office:value-type="float" office:value="669.665954589844">
            <text:p>669.6659545898</text:p>
          </table:table-cell>
          <table:table-cell office:value-type="float" office:value="-0.006477827">
            <text:p>-0.006477827</text:p>
          </table:table-cell>
          <table:table-cell table:number-columns-repeated="4"/>
        </table:table-row>
        <table:table-row table:style-name="ro1">
          <table:table-cell office:value-type="float" office:value="669.785888671875">
            <text:p>669.7858886719</text:p>
          </table:table-cell>
          <table:table-cell office:value-type="float" office:value="0.0005366358">
            <text:p>0.0005366358</text:p>
          </table:table-cell>
          <table:table-cell table:number-columns-repeated="4"/>
        </table:table-row>
        <table:table-row table:style-name="ro1">
          <table:table-cell office:value-type="float" office:value="669.90576171875">
            <text:p>669.9057617188</text:p>
          </table:table-cell>
          <table:table-cell office:value-type="float" office:value="-0.0009653653">
            <text:p>-0.0009653653</text:p>
          </table:table-cell>
          <table:table-cell table:number-columns-repeated="4"/>
        </table:table-row>
        <table:table-row table:style-name="ro1">
          <table:table-cell office:value-type="float" office:value="670.025695800781">
            <text:p>670.0256958008</text:p>
          </table:table-cell>
          <table:table-cell office:value-type="float" office:value="-0.007968275">
            <text:p>-0.007968275</text:p>
          </table:table-cell>
          <table:table-cell table:number-columns-repeated="4"/>
        </table:table-row>
        <table:table-row table:style-name="ro1">
          <table:table-cell office:value-type="float" office:value="670.145568847656">
            <text:p>670.1455688477</text:p>
          </table:table-cell>
          <table:table-cell office:value-type="float" office:value="0.01337495">
            <text:p>0.01337495</text:p>
          </table:table-cell>
          <table:table-cell table:number-columns-repeated="4"/>
        </table:table-row>
        <table:table-row table:style-name="ro1">
          <table:table-cell office:value-type="float" office:value="670.265502929688">
            <text:p>670.2655029297</text:p>
          </table:table-cell>
          <table:table-cell office:value-type="float" office:value="0.00346455">
            <text:p>0.00346455</text:p>
          </table:table-cell>
          <table:table-cell table:number-columns-repeated="4"/>
        </table:table-row>
        <table:table-row table:style-name="ro1">
          <table:table-cell office:value-type="float" office:value="670.385375976563">
            <text:p>670.3853759766</text:p>
          </table:table-cell>
          <table:table-cell office:value-type="float" office:value="0.01195823">
            <text:p>0.01195823</text:p>
          </table:table-cell>
          <table:table-cell table:number-columns-repeated="4"/>
        </table:table-row>
        <table:table-row table:style-name="ro1">
          <table:table-cell office:value-type="float" office:value="670.505310058594">
            <text:p>670.5053100586</text:p>
          </table:table-cell>
          <table:table-cell office:value-type="float" office:value="0.003988802">
            <text:p>0.003988802</text:p>
          </table:table-cell>
          <table:table-cell table:number-columns-repeated="4"/>
        </table:table-row>
        <table:table-row table:style-name="ro1">
          <table:table-cell office:value-type="float" office:value="670.625183105469">
            <text:p>670.6251831055</text:p>
          </table:table-cell>
          <table:table-cell office:value-type="float" office:value="0.006460385">
            <text:p>0.006460385</text:p>
          </table:table-cell>
          <table:table-cell table:number-columns-repeated="4"/>
        </table:table-row>
        <table:table-row table:style-name="ro1">
          <table:table-cell office:value-type="float" office:value="670.7451171875">
            <text:p>670.7451171875</text:p>
          </table:table-cell>
          <table:table-cell office:value-type="float" office:value="-0.0001883619">
            <text:p>-0.0001883619</text:p>
          </table:table-cell>
          <table:table-cell table:number-columns-repeated="4"/>
        </table:table-row>
        <table:table-row table:style-name="ro1">
          <table:table-cell office:value-type="float" office:value="670.864990234375">
            <text:p>670.8649902344</text:p>
          </table:table-cell>
          <table:table-cell office:value-type="float" office:value="0.01011638">
            <text:p>0.01011638</text:p>
          </table:table-cell>
          <table:table-cell table:number-columns-repeated="4"/>
        </table:table-row>
        <table:table-row table:style-name="ro1">
          <table:table-cell office:value-type="float" office:value="670.984924316406">
            <text:p>670.9849243164</text:p>
          </table:table-cell>
          <table:table-cell office:value-type="float" office:value="0.007985319">
            <text:p>0.007985319</text:p>
          </table:table-cell>
          <table:table-cell table:number-columns-repeated="4"/>
        </table:table-row>
        <table:table-row table:style-name="ro1">
          <table:table-cell office:value-type="float" office:value="671.104858398438">
            <text:p>671.1048583984</text:p>
          </table:table-cell>
          <table:table-cell office:value-type="float" office:value="-0.006764987">
            <text:p>-0.006764987</text:p>
          </table:table-cell>
          <table:table-cell table:number-columns-repeated="4"/>
        </table:table-row>
        <table:table-row table:style-name="ro1">
          <table:table-cell office:value-type="float" office:value="671.224731445313">
            <text:p>671.2247314453</text:p>
          </table:table-cell>
          <table:table-cell office:value-type="float" office:value="0.001379957">
            <text:p>0.001379957</text:p>
          </table:table-cell>
          <table:table-cell table:number-columns-repeated="4"/>
        </table:table-row>
        <table:table-row table:style-name="ro1">
          <table:table-cell office:value-type="float" office:value="671.344665527344">
            <text:p>671.3446655273</text:p>
          </table:table-cell>
          <table:table-cell office:value-type="float" office:value="0.007437945">
            <text:p>0.007437945</text:p>
          </table:table-cell>
          <table:table-cell table:number-columns-repeated="4"/>
        </table:table-row>
        <table:table-row table:style-name="ro1">
          <table:table-cell office:value-type="float" office:value="671.464599609375">
            <text:p>671.4645996094</text:p>
          </table:table-cell>
          <table:table-cell office:value-type="float" office:value="-0.009395333">
            <text:p>-0.009395333</text:p>
          </table:table-cell>
          <table:table-cell table:number-columns-repeated="4"/>
        </table:table-row>
        <table:table-row table:style-name="ro1">
          <table:table-cell office:value-type="float" office:value="671.58447265625">
            <text:p>671.5844726563</text:p>
          </table:table-cell>
          <table:table-cell office:value-type="float" office:value="-0.004224089">
            <text:p>-0.004224089</text:p>
          </table:table-cell>
          <table:table-cell table:number-columns-repeated="4"/>
        </table:table-row>
        <table:table-row table:style-name="ro1">
          <table:table-cell office:value-type="float" office:value="671.704406738281">
            <text:p>671.7044067383</text:p>
          </table:table-cell>
          <table:table-cell office:value-type="float" office:value="0.008636829">
            <text:p>0.008636829</text:p>
          </table:table-cell>
          <table:table-cell table:number-columns-repeated="4"/>
        </table:table-row>
        <table:table-row table:style-name="ro1">
          <table:table-cell office:value-type="float" office:value="671.824340820313">
            <text:p>671.8243408203</text:p>
          </table:table-cell>
          <table:table-cell office:value-type="float" office:value="-0.001136244">
            <text:p>-0.001136244</text:p>
          </table:table-cell>
          <table:table-cell table:number-columns-repeated="4"/>
        </table:table-row>
        <table:table-row table:style-name="ro1">
          <table:table-cell office:value-type="float" office:value="671.944213867188">
            <text:p>671.9442138672</text:p>
          </table:table-cell>
          <table:table-cell office:value-type="float" office:value="-0.001826507">
            <text:p>-0.001826507</text:p>
          </table:table-cell>
          <table:table-cell table:number-columns-repeated="4"/>
        </table:table-row>
        <table:table-row table:style-name="ro1">
          <table:table-cell office:value-type="float" office:value="672.064147949219">
            <text:p>672.0641479492</text:p>
          </table:table-cell>
          <table:table-cell office:value-type="float" office:value="-0.004307741">
            <text:p>-0.004307741</text:p>
          </table:table-cell>
          <table:table-cell table:number-columns-repeated="4"/>
        </table:table-row>
        <table:table-row table:style-name="ro1">
          <table:table-cell office:value-type="float" office:value="672.18408203125">
            <text:p>672.1840820313</text:p>
          </table:table-cell>
          <table:table-cell office:value-type="float" office:value="-0.003129573">
            <text:p>-0.003129573</text:p>
          </table:table-cell>
          <table:table-cell table:number-columns-repeated="4"/>
        </table:table-row>
        <table:table-row table:style-name="ro1">
          <table:table-cell office:value-type="float" office:value="672.304016113281">
            <text:p>672.3040161133</text:p>
          </table:table-cell>
          <table:table-cell office:value-type="float" office:value="-0.006604888">
            <text:p>-0.006604888</text:p>
          </table:table-cell>
          <table:table-cell table:number-columns-repeated="4"/>
        </table:table-row>
        <table:table-row table:style-name="ro1">
          <table:table-cell office:value-type="float" office:value="672.423950195313">
            <text:p>672.4239501953</text:p>
          </table:table-cell>
          <table:table-cell office:value-type="float" office:value="-0.01035397">
            <text:p>-0.01035397</text:p>
          </table:table-cell>
          <table:table-cell table:number-columns-repeated="4"/>
        </table:table-row>
        <table:table-row table:style-name="ro1">
          <table:table-cell office:value-type="float" office:value="672.543823242188">
            <text:p>672.5438232422</text:p>
          </table:table-cell>
          <table:table-cell office:value-type="float" office:value="-0.007257154">
            <text:p>-0.007257154</text:p>
          </table:table-cell>
          <table:table-cell table:number-columns-repeated="4"/>
        </table:table-row>
        <table:table-row table:style-name="ro1">
          <table:table-cell office:value-type="float" office:value="672.663757324219">
            <text:p>672.6637573242</text:p>
          </table:table-cell>
          <table:table-cell office:value-type="float" office:value="0.003801237">
            <text:p>0.003801237</text:p>
          </table:table-cell>
          <table:table-cell table:number-columns-repeated="4"/>
        </table:table-row>
        <table:table-row table:style-name="ro1">
          <table:table-cell office:value-type="float" office:value="672.78369140625">
            <text:p>672.7836914063</text:p>
          </table:table-cell>
          <table:table-cell office:value-type="float" office:value="0.001556483">
            <text:p>0.001556483</text:p>
          </table:table-cell>
          <table:table-cell table:number-columns-repeated="4"/>
        </table:table-row>
        <table:table-row table:style-name="ro1">
          <table:table-cell office:value-type="float" office:value="672.903625488281">
            <text:p>672.9036254883</text:p>
          </table:table-cell>
          <table:table-cell office:value-type="float" office:value="0.01451294">
            <text:p>0.01451294</text:p>
          </table:table-cell>
          <table:table-cell table:number-columns-repeated="4"/>
        </table:table-row>
        <table:table-row table:style-name="ro1">
          <table:table-cell office:value-type="float" office:value="673.023559570313">
            <text:p>673.0235595703</text:p>
          </table:table-cell>
          <table:table-cell office:value-type="float" office:value="0.009901622">
            <text:p>0.009901622</text:p>
          </table:table-cell>
          <table:table-cell table:number-columns-repeated="4"/>
        </table:table-row>
        <table:table-row table:style-name="ro1">
          <table:table-cell office:value-type="float" office:value="673.143493652344">
            <text:p>673.1434936523</text:p>
          </table:table-cell>
          <table:table-cell office:value-type="float" office:value="0.002640004">
            <text:p>0.002640004</text:p>
          </table:table-cell>
          <table:table-cell table:number-columns-repeated="4"/>
        </table:table-row>
        <table:table-row table:style-name="ro1">
          <table:table-cell office:value-type="float" office:value="673.263427734375">
            <text:p>673.2634277344</text:p>
          </table:table-cell>
          <table:table-cell office:value-type="float" office:value="-0.01137184">
            <text:p>-0.01137184</text:p>
          </table:table-cell>
          <table:table-cell table:number-columns-repeated="4"/>
        </table:table-row>
        <table:table-row table:style-name="ro1">
          <table:table-cell office:value-type="float" office:value="673.383361816406">
            <text:p>673.3833618164</text:p>
          </table:table-cell>
          <table:table-cell office:value-type="float" office:value="0.01947961">
            <text:p>0.01947961</text:p>
          </table:table-cell>
          <table:table-cell table:number-columns-repeated="4"/>
        </table:table-row>
        <table:table-row table:style-name="ro1">
          <table:table-cell office:value-type="float" office:value="673.503295898438">
            <text:p>673.5032958984</text:p>
          </table:table-cell>
          <table:table-cell office:value-type="float" office:value="-0.01077003">
            <text:p>-0.01077003</text:p>
          </table:table-cell>
          <table:table-cell table:number-columns-repeated="4"/>
        </table:table-row>
        <table:table-row table:style-name="ro1">
          <table:table-cell office:value-type="float" office:value="673.623229980469">
            <text:p>673.6232299805</text:p>
          </table:table-cell>
          <table:table-cell office:value-type="float" office:value="-0.003884181">
            <text:p>-0.003884181</text:p>
          </table:table-cell>
          <table:table-cell table:number-columns-repeated="4"/>
        </table:table-row>
        <table:table-row table:style-name="ro1">
          <table:table-cell office:value-type="float" office:value="673.7431640625">
            <text:p>673.7431640625</text:p>
          </table:table-cell>
          <table:table-cell office:value-type="float" office:value="-0.003668711">
            <text:p>-0.003668711</text:p>
          </table:table-cell>
          <table:table-cell table:number-columns-repeated="4"/>
        </table:table-row>
        <table:table-row table:style-name="ro1">
          <table:table-cell office:value-type="float" office:value="673.863098144531">
            <text:p>673.8630981445</text:p>
          </table:table-cell>
          <table:table-cell office:value-type="float" office:value="0.00169183">
            <text:p>0.00169183</text:p>
          </table:table-cell>
          <table:table-cell table:number-columns-repeated="4"/>
        </table:table-row>
        <table:table-row table:style-name="ro1">
          <table:table-cell office:value-type="float" office:value="673.983032226563">
            <text:p>673.9830322266</text:p>
          </table:table-cell>
          <table:table-cell office:value-type="float" office:value="-0.003139333">
            <text:p>-0.003139333</text:p>
          </table:table-cell>
          <table:table-cell table:number-columns-repeated="4"/>
        </table:table-row>
        <table:table-row table:style-name="ro1">
          <table:table-cell office:value-type="float" office:value="674.102966308594">
            <text:p>674.1029663086</text:p>
          </table:table-cell>
          <table:table-cell office:value-type="float" office:value="0.005889064">
            <text:p>0.005889064</text:p>
          </table:table-cell>
          <table:table-cell table:number-columns-repeated="4"/>
        </table:table-row>
        <table:table-row table:style-name="ro1">
          <table:table-cell office:value-type="float" office:value="674.222900390625">
            <text:p>674.2229003906</text:p>
          </table:table-cell>
          <table:table-cell office:value-type="float" office:value="-0.008799053">
            <text:p>-0.008799053</text:p>
          </table:table-cell>
          <table:table-cell table:number-columns-repeated="4"/>
        </table:table-row>
        <table:table-row table:style-name="ro1">
          <table:table-cell office:value-type="float" office:value="674.342834472656">
            <text:p>674.3428344727</text:p>
          </table:table-cell>
          <table:table-cell office:value-type="float" office:value="-0.0100439">
            <text:p>-0.0100439</text:p>
          </table:table-cell>
          <table:table-cell table:number-columns-repeated="4"/>
        </table:table-row>
        <table:table-row table:style-name="ro1">
          <table:table-cell office:value-type="float" office:value="674.462768554688">
            <text:p>674.4627685547</text:p>
          </table:table-cell>
          <table:table-cell office:value-type="float" office:value="0.0005506533">
            <text:p>0.0005506533</text:p>
          </table:table-cell>
          <table:table-cell table:number-columns-repeated="4"/>
        </table:table-row>
        <table:table-row table:style-name="ro1">
          <table:table-cell office:value-type="float" office:value="674.582702636719">
            <text:p>674.5827026367</text:p>
          </table:table-cell>
          <table:table-cell office:value-type="float" office:value="0.001676705">
            <text:p>0.001676705</text:p>
          </table:table-cell>
          <table:table-cell table:number-columns-repeated="4"/>
        </table:table-row>
        <table:table-row table:style-name="ro1">
          <table:table-cell office:value-type="float" office:value="674.702697753906">
            <text:p>674.7026977539</text:p>
          </table:table-cell>
          <table:table-cell office:value-type="float" office:value="0.006523455">
            <text:p>0.006523455</text:p>
          </table:table-cell>
          <table:table-cell table:number-columns-repeated="4"/>
        </table:table-row>
        <table:table-row table:style-name="ro1">
          <table:table-cell office:value-type="float" office:value="674.822631835938">
            <text:p>674.8226318359</text:p>
          </table:table-cell>
          <table:table-cell office:value-type="float" office:value="-0.004440729">
            <text:p>-0.004440729</text:p>
          </table:table-cell>
          <table:table-cell table:number-columns-repeated="4"/>
        </table:table-row>
        <table:table-row table:style-name="ro1">
          <table:table-cell office:value-type="float" office:value="674.942565917969">
            <text:p>674.942565918</text:p>
          </table:table-cell>
          <table:table-cell office:value-type="float" office:value="0.01111261">
            <text:p>0.01111261</text:p>
          </table:table-cell>
          <table:table-cell table:number-columns-repeated="4"/>
        </table:table-row>
        <table:table-row table:style-name="ro1">
          <table:table-cell office:value-type="float" office:value="675.0625">
            <text:p>675.0625</text:p>
          </table:table-cell>
          <table:table-cell office:value-type="float" office:value="-0.00664251">
            <text:p>-0.00664251</text:p>
          </table:table-cell>
          <table:table-cell table:number-columns-repeated="4"/>
        </table:table-row>
        <table:table-row table:style-name="ro1">
          <table:table-cell office:value-type="float" office:value="675.182495117188">
            <text:p>675.1824951172</text:p>
          </table:table-cell>
          <table:table-cell office:value-type="float" office:value="-0.004491401">
            <text:p>-0.004491401</text:p>
          </table:table-cell>
          <table:table-cell table:number-columns-repeated="4"/>
        </table:table-row>
        <table:table-row table:style-name="ro1">
          <table:table-cell office:value-type="float" office:value="675.302429199219">
            <text:p>675.3024291992</text:p>
          </table:table-cell>
          <table:table-cell office:value-type="float" office:value="0.003954547">
            <text:p>0.003954547</text:p>
          </table:table-cell>
          <table:table-cell table:number-columns-repeated="4"/>
        </table:table-row>
        <table:table-row table:style-name="ro1">
          <table:table-cell office:value-type="float" office:value="675.42236328125">
            <text:p>675.4223632813</text:p>
          </table:table-cell>
          <table:table-cell office:value-type="float" office:value="0.01280694">
            <text:p>0.01280694</text:p>
          </table:table-cell>
          <table:table-cell table:number-columns-repeated="4"/>
        </table:table-row>
        <table:table-row table:style-name="ro1">
          <table:table-cell office:value-type="float" office:value="675.542297363281">
            <text:p>675.5422973633</text:p>
          </table:table-cell>
          <table:table-cell office:value-type="float" office:value="0.01054338">
            <text:p>0.01054338</text:p>
          </table:table-cell>
          <table:table-cell table:number-columns-repeated="4"/>
        </table:table-row>
        <table:table-row table:style-name="ro1">
          <table:table-cell office:value-type="float" office:value="675.662292480469">
            <text:p>675.6622924805</text:p>
          </table:table-cell>
          <table:table-cell office:value-type="float" office:value="0.004839284">
            <text:p>0.004839284</text:p>
          </table:table-cell>
          <table:table-cell table:number-columns-repeated="4"/>
        </table:table-row>
        <table:table-row table:style-name="ro1">
          <table:table-cell office:value-type="float" office:value="675.7822265625">
            <text:p>675.7822265625</text:p>
          </table:table-cell>
          <table:table-cell office:value-type="float" office:value="0.006359243">
            <text:p>0.006359243</text:p>
          </table:table-cell>
          <table:table-cell table:number-columns-repeated="4"/>
        </table:table-row>
        <table:table-row table:style-name="ro1">
          <table:table-cell office:value-type="float" office:value="675.902160644531">
            <text:p>675.9021606445</text:p>
          </table:table-cell>
          <table:table-cell office:value-type="float" office:value="-0.009598278">
            <text:p>-0.009598278</text:p>
          </table:table-cell>
          <table:table-cell table:number-columns-repeated="4"/>
        </table:table-row>
        <table:table-row table:style-name="ro1">
          <table:table-cell office:value-type="float" office:value="676.022155761719">
            <text:p>676.0221557617</text:p>
          </table:table-cell>
          <table:table-cell office:value-type="float" office:value="0.006465103">
            <text:p>0.006465103</text:p>
          </table:table-cell>
          <table:table-cell table:number-columns-repeated="4"/>
        </table:table-row>
        <table:table-row table:style-name="ro1">
          <table:table-cell office:value-type="float" office:value="676.14208984375">
            <text:p>676.1420898438</text:p>
          </table:table-cell>
          <table:table-cell office:value-type="float" office:value="-0.001077625">
            <text:p>-0.001077625</text:p>
          </table:table-cell>
          <table:table-cell table:number-columns-repeated="4"/>
        </table:table-row>
        <table:table-row table:style-name="ro1">
          <table:table-cell office:value-type="float" office:value="676.262023925781">
            <text:p>676.2620239258</text:p>
          </table:table-cell>
          <table:table-cell office:value-type="float" office:value="-0.008914578">
            <text:p>-0.008914578</text:p>
          </table:table-cell>
          <table:table-cell table:number-columns-repeated="4"/>
        </table:table-row>
        <table:table-row table:style-name="ro1">
          <table:table-cell office:value-type="float" office:value="676.382019042969">
            <text:p>676.382019043</text:p>
          </table:table-cell>
          <table:table-cell office:value-type="float" office:value="0.00827105">
            <text:p>0.00827105</text:p>
          </table:table-cell>
          <table:table-cell table:number-columns-repeated="4"/>
        </table:table-row>
        <table:table-row table:style-name="ro1">
          <table:table-cell office:value-type="float" office:value="676.501953125">
            <text:p>676.501953125</text:p>
          </table:table-cell>
          <table:table-cell office:value-type="float" office:value="-0.0008805179">
            <text:p>-0.0008805179</text:p>
          </table:table-cell>
          <table:table-cell table:number-columns-repeated="4"/>
        </table:table-row>
        <table:table-row table:style-name="ro1">
          <table:table-cell office:value-type="float" office:value="676.621948242188">
            <text:p>676.6219482422</text:p>
          </table:table-cell>
          <table:table-cell office:value-type="float" office:value="-0.008967735">
            <text:p>-0.008967735</text:p>
          </table:table-cell>
          <table:table-cell table:number-columns-repeated="4"/>
        </table:table-row>
        <table:table-row table:style-name="ro1">
          <table:table-cell office:value-type="float" office:value="676.741882324219">
            <text:p>676.7418823242</text:p>
          </table:table-cell>
          <table:table-cell office:value-type="float" office:value="-0.01302377">
            <text:p>-0.01302377</text:p>
          </table:table-cell>
          <table:table-cell table:number-columns-repeated="4"/>
        </table:table-row>
        <table:table-row table:style-name="ro1">
          <table:table-cell office:value-type="float" office:value="676.861877441406">
            <text:p>676.8618774414</text:p>
          </table:table-cell>
          <table:table-cell office:value-type="float" office:value="-0.003469179">
            <text:p>-0.003469179</text:p>
          </table:table-cell>
          <table:table-cell table:number-columns-repeated="4"/>
        </table:table-row>
        <table:table-row table:style-name="ro1">
          <table:table-cell office:value-type="float" office:value="676.981811523438">
            <text:p>676.9818115234</text:p>
          </table:table-cell>
          <table:table-cell office:value-type="float" office:value="0.00151481">
            <text:p>0.00151481</text:p>
          </table:table-cell>
          <table:table-cell table:number-columns-repeated="4"/>
        </table:table-row>
        <table:table-row table:style-name="ro1">
          <table:table-cell office:value-type="float" office:value="677.101806640625">
            <text:p>677.1018066406</text:p>
          </table:table-cell>
          <table:table-cell office:value-type="float" office:value="-0.0002100907">
            <text:p>-0.0002100907</text:p>
          </table:table-cell>
          <table:table-cell table:number-columns-repeated="4"/>
        </table:table-row>
        <table:table-row table:style-name="ro1">
          <table:table-cell office:value-type="float" office:value="677.221740722656">
            <text:p>677.2217407227</text:p>
          </table:table-cell>
          <table:table-cell office:value-type="float" office:value="-0.005753289">
            <text:p>-0.005753289</text:p>
          </table:table-cell>
          <table:table-cell table:number-columns-repeated="4"/>
        </table:table-row>
        <table:table-row table:style-name="ro1">
          <table:table-cell office:value-type="float" office:value="677.341735839844">
            <text:p>677.3417358398</text:p>
          </table:table-cell>
          <table:table-cell office:value-type="float" office:value="0.008308152">
            <text:p>0.008308152</text:p>
          </table:table-cell>
          <table:table-cell table:number-columns-repeated="4"/>
        </table:table-row>
        <table:table-row table:style-name="ro1">
          <table:table-cell office:value-type="float" office:value="677.461669921875">
            <text:p>677.4616699219</text:p>
          </table:table-cell>
          <table:table-cell office:value-type="float" office:value="-0.003612897">
            <text:p>-0.003612897</text:p>
          </table:table-cell>
          <table:table-cell table:number-columns-repeated="4"/>
        </table:table-row>
        <table:table-row table:style-name="ro1">
          <table:table-cell office:value-type="float" office:value="677.581665039063">
            <text:p>677.5816650391</text:p>
          </table:table-cell>
          <table:table-cell office:value-type="float" office:value="0.00365717">
            <text:p>0.00365717</text:p>
          </table:table-cell>
          <table:table-cell table:number-columns-repeated="4"/>
        </table:table-row>
        <table:table-row table:style-name="ro1">
          <table:table-cell office:value-type="float" office:value="677.70166015625">
            <text:p>677.7016601563</text:p>
          </table:table-cell>
          <table:table-cell office:value-type="float" office:value="-0.004470595">
            <text:p>-0.004470595</text:p>
          </table:table-cell>
          <table:table-cell table:number-columns-repeated="4"/>
        </table:table-row>
        <table:table-row table:style-name="ro1">
          <table:table-cell office:value-type="float" office:value="677.821594238281">
            <text:p>677.8215942383</text:p>
          </table:table-cell>
          <table:table-cell office:value-type="float" office:value="0.004012888">
            <text:p>0.004012888</text:p>
          </table:table-cell>
          <table:table-cell table:number-columns-repeated="4"/>
        </table:table-row>
        <table:table-row table:style-name="ro1">
          <table:table-cell office:value-type="float" office:value="677.941589355469">
            <text:p>677.9415893555</text:p>
          </table:table-cell>
          <table:table-cell office:value-type="float" office:value="0.0003470405">
            <text:p>0.0003470405</text:p>
          </table:table-cell>
          <table:table-cell table:number-columns-repeated="4"/>
        </table:table-row>
        <table:table-row table:style-name="ro1">
          <table:table-cell office:value-type="float" office:value="678.061584472656">
            <text:p>678.0615844727</text:p>
          </table:table-cell>
          <table:table-cell office:value-type="float" office:value="-0.002684016">
            <text:p>-0.002684016</text:p>
          </table:table-cell>
          <table:table-cell table:number-columns-repeated="4"/>
        </table:table-row>
        <table:table-row table:style-name="ro1">
          <table:table-cell office:value-type="float" office:value="678.181518554688">
            <text:p>678.1815185547</text:p>
          </table:table-cell>
          <table:table-cell office:value-type="float" office:value="-0.003467252">
            <text:p>-0.003467252</text:p>
          </table:table-cell>
          <table:table-cell table:number-columns-repeated="4"/>
        </table:table-row>
        <table:table-row table:style-name="ro1">
          <table:table-cell office:value-type="float" office:value="678.301513671875">
            <text:p>678.3015136719</text:p>
          </table:table-cell>
          <table:table-cell office:value-type="float" office:value="0.001036144">
            <text:p>0.001036144</text:p>
          </table:table-cell>
          <table:table-cell table:number-columns-repeated="4"/>
        </table:table-row>
        <table:table-row table:style-name="ro1">
          <table:table-cell office:value-type="float" office:value="678.421508789063">
            <text:p>678.4215087891</text:p>
          </table:table-cell>
          <table:table-cell office:value-type="float" office:value="-0.006388956">
            <text:p>-0.006388956</text:p>
          </table:table-cell>
          <table:table-cell table:number-columns-repeated="4"/>
        </table:table-row>
        <table:table-row table:style-name="ro1">
          <table:table-cell office:value-type="float" office:value="678.541442871094">
            <text:p>678.5414428711</text:p>
          </table:table-cell>
          <table:table-cell office:value-type="float" office:value="0.01591286">
            <text:p>0.01591286</text:p>
          </table:table-cell>
          <table:table-cell table:number-columns-repeated="4"/>
        </table:table-row>
        <table:table-row table:style-name="ro1">
          <table:table-cell office:value-type="float" office:value="678.661437988281">
            <text:p>678.6614379883</text:p>
          </table:table-cell>
          <table:table-cell office:value-type="float" office:value="-0.002416316">
            <text:p>-0.002416316</text:p>
          </table:table-cell>
          <table:table-cell table:number-columns-repeated="4"/>
        </table:table-row>
        <table:table-row table:style-name="ro1">
          <table:table-cell office:value-type="float" office:value="678.781433105469">
            <text:p>678.7814331055</text:p>
          </table:table-cell>
          <table:table-cell office:value-type="float" office:value="0.001971718">
            <text:p>0.001971718</text:p>
          </table:table-cell>
          <table:table-cell table:number-columns-repeated="4"/>
        </table:table-row>
        <table:table-row table:style-name="ro1">
          <table:table-cell office:value-type="float" office:value="678.901428222656">
            <text:p>678.9014282227</text:p>
          </table:table-cell>
          <table:table-cell office:value-type="float" office:value="0.003816707">
            <text:p>0.003816707</text:p>
          </table:table-cell>
          <table:table-cell table:number-columns-repeated="4"/>
        </table:table-row>
        <table:table-row table:style-name="ro1">
          <table:table-cell office:value-type="float" office:value="679.021362304688">
            <text:p>679.0213623047</text:p>
          </table:table-cell>
          <table:table-cell office:value-type="float" office:value="0.002524822">
            <text:p>0.002524822</text:p>
          </table:table-cell>
          <table:table-cell table:number-columns-repeated="4"/>
        </table:table-row>
        <table:table-row table:style-name="ro1">
          <table:table-cell office:value-type="float" office:value="679.141357421875">
            <text:p>679.1413574219</text:p>
          </table:table-cell>
          <table:table-cell office:value-type="float" office:value="-0.0007467153">
            <text:p>-0.0007467153</text:p>
          </table:table-cell>
          <table:table-cell table:number-columns-repeated="4"/>
        </table:table-row>
        <table:table-row table:style-name="ro1">
          <table:table-cell office:value-type="float" office:value="679.261352539063">
            <text:p>679.2613525391</text:p>
          </table:table-cell>
          <table:table-cell office:value-type="float" office:value="0.006367675">
            <text:p>0.006367675</text:p>
          </table:table-cell>
          <table:table-cell table:number-columns-repeated="4"/>
        </table:table-row>
        <table:table-row table:style-name="ro1">
          <table:table-cell office:value-type="float" office:value="679.38134765625">
            <text:p>679.3813476563</text:p>
          </table:table-cell>
          <table:table-cell office:value-type="float" office:value="0.008045745">
            <text:p>0.008045745</text:p>
          </table:table-cell>
          <table:table-cell table:number-columns-repeated="4"/>
        </table:table-row>
        <table:table-row table:style-name="ro1">
          <table:table-cell office:value-type="float" office:value="679.501342773438">
            <text:p>679.5013427734</text:p>
          </table:table-cell>
          <table:table-cell office:value-type="float" office:value="-0.004975183">
            <text:p>-0.004975183</text:p>
          </table:table-cell>
          <table:table-cell table:number-columns-repeated="4"/>
        </table:table-row>
        <table:table-row table:style-name="ro1">
          <table:table-cell office:value-type="float" office:value="679.621337890625">
            <text:p>679.6213378906</text:p>
          </table:table-cell>
          <table:table-cell office:value-type="float" office:value="0.004921405">
            <text:p>0.004921405</text:p>
          </table:table-cell>
          <table:table-cell table:number-columns-repeated="4"/>
        </table:table-row>
        <table:table-row table:style-name="ro1">
          <table:table-cell office:value-type="float" office:value="679.741333007813">
            <text:p>679.7413330078</text:p>
          </table:table-cell>
          <table:table-cell office:value-type="float" office:value="-0.0002524562">
            <text:p>-0.0002524562</text:p>
          </table:table-cell>
          <table:table-cell table:number-columns-repeated="4"/>
        </table:table-row>
        <table:table-row table:style-name="ro1">
          <table:table-cell office:value-type="float" office:value="679.861267089844">
            <text:p>679.8612670898</text:p>
          </table:table-cell>
          <table:table-cell office:value-type="float" office:value="0.002687402">
            <text:p>0.002687402</text:p>
          </table:table-cell>
          <table:table-cell table:number-columns-repeated="4"/>
        </table:table-row>
        <table:table-row table:style-name="ro1">
          <table:table-cell office:value-type="float" office:value="679.981262207031">
            <text:p>679.981262207</text:p>
          </table:table-cell>
          <table:table-cell office:value-type="float" office:value="-0.002396428">
            <text:p>-0.002396428</text:p>
          </table:table-cell>
          <table:table-cell table:number-columns-repeated="4"/>
        </table:table-row>
        <table:table-row table:style-name="ro1">
          <table:table-cell office:value-type="float" office:value="680.101257324219">
            <text:p>680.1012573242</text:p>
          </table:table-cell>
          <table:table-cell office:value-type="float" office:value="-0.006039623">
            <text:p>-0.006039623</text:p>
          </table:table-cell>
          <table:table-cell table:number-columns-repeated="4"/>
        </table:table-row>
        <table:table-row table:style-name="ro1">
          <table:table-cell office:value-type="float" office:value="680.221252441406">
            <text:p>680.2212524414</text:p>
          </table:table-cell>
          <table:table-cell office:value-type="float" office:value="0.008679239">
            <text:p>0.008679239</text:p>
          </table:table-cell>
          <table:table-cell table:number-columns-repeated="4"/>
        </table:table-row>
        <table:table-row table:style-name="ro1">
          <table:table-cell office:value-type="float" office:value="680.341247558594">
            <text:p>680.3412475586</text:p>
          </table:table-cell>
          <table:table-cell office:value-type="float" office:value="-0.004996565">
            <text:p>-0.004996565</text:p>
          </table:table-cell>
          <table:table-cell table:number-columns-repeated="4"/>
        </table:table-row>
        <table:table-row table:style-name="ro1">
          <table:table-cell office:value-type="float" office:value="680.461242675781">
            <text:p>680.4612426758</text:p>
          </table:table-cell>
          <table:table-cell office:value-type="float" office:value="-0.004653232">
            <text:p>-0.004653232</text:p>
          </table:table-cell>
          <table:table-cell table:number-columns-repeated="4"/>
        </table:table-row>
        <table:table-row table:style-name="ro1">
          <table:table-cell office:value-type="float" office:value="680.581237792969">
            <text:p>680.581237793</text:p>
          </table:table-cell>
          <table:table-cell office:value-type="float" office:value="-0.002630655">
            <text:p>-0.002630655</text:p>
          </table:table-cell>
          <table:table-cell table:number-columns-repeated="4"/>
        </table:table-row>
        <table:table-row table:style-name="ro1">
          <table:table-cell office:value-type="float" office:value="680.701232910156">
            <text:p>680.7012329102</text:p>
          </table:table-cell>
          <table:table-cell office:value-type="float" office:value="0.001826974">
            <text:p>0.001826974</text:p>
          </table:table-cell>
          <table:table-cell table:number-columns-repeated="4"/>
        </table:table-row>
        <table:table-row table:style-name="ro1">
          <table:table-cell office:value-type="float" office:value="680.821228027344">
            <text:p>680.8212280273</text:p>
          </table:table-cell>
          <table:table-cell office:value-type="float" office:value="0.001755837">
            <text:p>0.001755837</text:p>
          </table:table-cell>
          <table:table-cell table:number-columns-repeated="4"/>
        </table:table-row>
        <table:table-row table:style-name="ro1">
          <table:table-cell office:value-type="float" office:value="680.941223144531">
            <text:p>680.9412231445</text:p>
          </table:table-cell>
          <table:table-cell office:value-type="float" office:value="-0.001545848">
            <text:p>-0.001545848</text:p>
          </table:table-cell>
          <table:table-cell table:number-columns-repeated="4"/>
        </table:table-row>
        <table:table-row table:style-name="ro1">
          <table:table-cell office:value-type="float" office:value="681.061218261719">
            <text:p>681.0612182617</text:p>
          </table:table-cell>
          <table:table-cell office:value-type="float" office:value="-0.003300952">
            <text:p>-0.003300952</text:p>
          </table:table-cell>
          <table:table-cell table:number-columns-repeated="4"/>
        </table:table-row>
        <table:table-row table:style-name="ro1">
          <table:table-cell office:value-type="float" office:value="681.181274414063">
            <text:p>681.1812744141</text:p>
          </table:table-cell>
          <table:table-cell office:value-type="float" office:value="-0.003440456">
            <text:p>-0.003440456</text:p>
          </table:table-cell>
          <table:table-cell table:number-columns-repeated="4"/>
        </table:table-row>
        <table:table-row table:style-name="ro1">
          <table:table-cell office:value-type="float" office:value="681.30126953125">
            <text:p>681.3012695313</text:p>
          </table:table-cell>
          <table:table-cell office:value-type="float" office:value="0.001521521">
            <text:p>0.001521521</text:p>
          </table:table-cell>
          <table:table-cell table:number-columns-repeated="4"/>
        </table:table-row>
        <table:table-row table:style-name="ro1">
          <table:table-cell office:value-type="float" office:value="681.421264648438">
            <text:p>681.4212646484</text:p>
          </table:table-cell>
          <table:table-cell office:value-type="float" office:value="0.004282545">
            <text:p>0.004282545</text:p>
          </table:table-cell>
          <table:table-cell table:number-columns-repeated="4"/>
        </table:table-row>
        <table:table-row table:style-name="ro1">
          <table:table-cell office:value-type="float" office:value="681.541259765625">
            <text:p>681.5412597656</text:p>
          </table:table-cell>
          <table:table-cell office:value-type="float" office:value="-0.0119039">
            <text:p>-0.0119039</text:p>
          </table:table-cell>
          <table:table-cell table:number-columns-repeated="4"/>
        </table:table-row>
        <table:table-row table:style-name="ro1">
          <table:table-cell office:value-type="float" office:value="681.661254882813">
            <text:p>681.6612548828</text:p>
          </table:table-cell>
          <table:table-cell office:value-type="float" office:value="0.000112806">
            <text:p>0.000112806</text:p>
          </table:table-cell>
          <table:table-cell table:number-columns-repeated="4"/>
        </table:table-row>
        <table:table-row table:style-name="ro1">
          <table:table-cell office:value-type="float" office:value="681.78125">
            <text:p>681.78125</text:p>
          </table:table-cell>
          <table:table-cell office:value-type="float" office:value="-0.007294075">
            <text:p>-0.007294075</text:p>
          </table:table-cell>
          <table:table-cell table:number-columns-repeated="4"/>
        </table:table-row>
        <table:table-row table:style-name="ro1">
          <table:table-cell office:value-type="float" office:value="681.901245117188">
            <text:p>681.9012451172</text:p>
          </table:table-cell>
          <table:table-cell office:value-type="float" office:value="0.00151229">
            <text:p>0.00151229</text:p>
          </table:table-cell>
          <table:table-cell table:number-columns-repeated="4"/>
        </table:table-row>
        <table:table-row table:style-name="ro1">
          <table:table-cell office:value-type="float" office:value="682.021301269531">
            <text:p>682.0213012695</text:p>
          </table:table-cell>
          <table:table-cell office:value-type="float" office:value="-0.003354351">
            <text:p>-0.003354351</text:p>
          </table:table-cell>
          <table:table-cell table:number-columns-repeated="4"/>
        </table:table-row>
        <table:table-row table:style-name="ro1">
          <table:table-cell office:value-type="float" office:value="682.141296386719">
            <text:p>682.1412963867</text:p>
          </table:table-cell>
          <table:table-cell office:value-type="float" office:value="-0.005888394">
            <text:p>-0.005888394</text:p>
          </table:table-cell>
          <table:table-cell table:number-columns-repeated="4"/>
        </table:table-row>
        <table:table-row table:style-name="ro1">
          <table:table-cell office:value-type="float" office:value="682.261291503906">
            <text:p>682.2612915039</text:p>
          </table:table-cell>
          <table:table-cell office:value-type="float" office:value="-0.005537485">
            <text:p>-0.005537485</text:p>
          </table:table-cell>
          <table:table-cell table:number-columns-repeated="4"/>
        </table:table-row>
        <table:table-row table:style-name="ro1">
          <table:table-cell office:value-type="float" office:value="682.381286621094">
            <text:p>682.3812866211</text:p>
          </table:table-cell>
          <table:table-cell office:value-type="float" office:value="-0.001829081">
            <text:p>-0.001829081</text:p>
          </table:table-cell>
          <table:table-cell table:number-columns-repeated="4"/>
        </table:table-row>
        <table:table-row table:style-name="ro1">
          <table:table-cell office:value-type="float" office:value="682.501342773438">
            <text:p>682.5013427734</text:p>
          </table:table-cell>
          <table:table-cell office:value-type="float" office:value="0.001822946">
            <text:p>0.001822946</text:p>
          </table:table-cell>
          <table:table-cell table:number-columns-repeated="4"/>
        </table:table-row>
        <table:table-row table:style-name="ro1">
          <table:table-cell office:value-type="float" office:value="682.621337890625">
            <text:p>682.6213378906</text:p>
          </table:table-cell>
          <table:table-cell office:value-type="float" office:value="-0.002912038">
            <text:p>-0.002912038</text:p>
          </table:table-cell>
          <table:table-cell table:number-columns-repeated="4"/>
        </table:table-row>
        <table:table-row table:style-name="ro1">
          <table:table-cell office:value-type="float" office:value="682.741333007813">
            <text:p>682.7413330078</text:p>
          </table:table-cell>
          <table:table-cell office:value-type="float" office:value="-0.005185266">
            <text:p>-0.005185266</text:p>
          </table:table-cell>
          <table:table-cell table:number-columns-repeated="4"/>
        </table:table-row>
        <table:table-row table:style-name="ro1">
          <table:table-cell office:value-type="float" office:value="682.861389160156">
            <text:p>682.8613891602</text:p>
          </table:table-cell>
          <table:table-cell office:value-type="float" office:value="-0.001948585">
            <text:p>-0.001948585</text:p>
          </table:table-cell>
          <table:table-cell table:number-columns-repeated="4"/>
        </table:table-row>
        <table:table-row table:style-name="ro1">
          <table:table-cell office:value-type="float" office:value="682.981384277344">
            <text:p>682.9813842773</text:p>
          </table:table-cell>
          <table:table-cell office:value-type="float" office:value="0.0002547288">
            <text:p>0.0002547288</text:p>
          </table:table-cell>
          <table:table-cell table:number-columns-repeated="4"/>
        </table:table-row>
        <table:table-row table:style-name="ro1">
          <table:table-cell office:value-type="float" office:value="683.101379394531">
            <text:p>683.1013793945</text:p>
          </table:table-cell>
          <table:table-cell office:value-type="float" office:value="-0.008708003">
            <text:p>-0.008708003</text:p>
          </table:table-cell>
          <table:table-cell table:number-columns-repeated="4"/>
        </table:table-row>
        <table:table-row table:style-name="ro1">
          <table:table-cell office:value-type="float" office:value="683.221435546875">
            <text:p>683.2214355469</text:p>
          </table:table-cell>
          <table:table-cell office:value-type="float" office:value="-0.002451923">
            <text:p>-0.002451923</text:p>
          </table:table-cell>
          <table:table-cell table:number-columns-repeated="4"/>
        </table:table-row>
        <table:table-row table:style-name="ro1">
          <table:table-cell office:value-type="float" office:value="683.341430664063">
            <text:p>683.3414306641</text:p>
          </table:table-cell>
          <table:table-cell office:value-type="float" office:value="-0.01142815">
            <text:p>-0.01142815</text:p>
          </table:table-cell>
          <table:table-cell table:number-columns-repeated="4"/>
        </table:table-row>
        <table:table-row table:style-name="ro1">
          <table:table-cell office:value-type="float" office:value="683.46142578125">
            <text:p>683.4614257813</text:p>
          </table:table-cell>
          <table:table-cell office:value-type="float" office:value="-0.009100841">
            <text:p>-0.009100841</text:p>
          </table:table-cell>
          <table:table-cell table:number-columns-repeated="4"/>
        </table:table-row>
        <table:table-row table:style-name="ro1">
          <table:table-cell office:value-type="float" office:value="683.581481933594">
            <text:p>683.5814819336</text:p>
          </table:table-cell>
          <table:table-cell office:value-type="float" office:value="-0.006018262">
            <text:p>-0.006018262</text:p>
          </table:table-cell>
          <table:table-cell table:number-columns-repeated="4"/>
        </table:table-row>
        <table:table-row table:style-name="ro1">
          <table:table-cell office:value-type="float" office:value="683.701477050781">
            <text:p>683.7014770508</text:p>
          </table:table-cell>
          <table:table-cell office:value-type="float" office:value="-0.003379966">
            <text:p>-0.003379966</text:p>
          </table:table-cell>
          <table:table-cell table:number-columns-repeated="4"/>
        </table:table-row>
        <table:table-row table:style-name="ro1">
          <table:table-cell office:value-type="float" office:value="683.821533203125">
            <text:p>683.8215332031</text:p>
          </table:table-cell>
          <table:table-cell office:value-type="float" office:value="-0.006564335">
            <text:p>-0.006564335</text:p>
          </table:table-cell>
          <table:table-cell table:number-columns-repeated="4"/>
        </table:table-row>
        <table:table-row table:style-name="ro1">
          <table:table-cell office:value-type="float" office:value="683.941528320313">
            <text:p>683.9415283203</text:p>
          </table:table-cell>
          <table:table-cell office:value-type="float" office:value="-0.007142405">
            <text:p>-0.007142405</text:p>
          </table:table-cell>
          <table:table-cell table:number-columns-repeated="4"/>
        </table:table-row>
        <table:table-row table:style-name="ro1">
          <table:table-cell office:value-type="float" office:value="684.061584472656">
            <text:p>684.0615844727</text:p>
          </table:table-cell>
          <table:table-cell office:value-type="float" office:value="0.003757597">
            <text:p>0.003757597</text:p>
          </table:table-cell>
          <table:table-cell table:number-columns-repeated="4"/>
        </table:table-row>
        <table:table-row table:style-name="ro1">
          <table:table-cell office:value-type="float" office:value="684.181579589844">
            <text:p>684.1815795898</text:p>
          </table:table-cell>
          <table:table-cell office:value-type="float" office:value="-0.01240839">
            <text:p>-0.01240839</text:p>
          </table:table-cell>
          <table:table-cell table:number-columns-repeated="4"/>
        </table:table-row>
        <table:table-row table:style-name="ro1">
          <table:table-cell office:value-type="float" office:value="684.301635742188">
            <text:p>684.3016357422</text:p>
          </table:table-cell>
          <table:table-cell office:value-type="float" office:value="-0.005934113">
            <text:p>-0.005934113</text:p>
          </table:table-cell>
          <table:table-cell table:number-columns-repeated="4"/>
        </table:table-row>
        <table:table-row table:style-name="ro1">
          <table:table-cell office:value-type="float" office:value="684.421630859375">
            <text:p>684.4216308594</text:p>
          </table:table-cell>
          <table:table-cell office:value-type="float" office:value="-0.008946336">
            <text:p>-0.008946336</text:p>
          </table:table-cell>
          <table:table-cell table:number-columns-repeated="4"/>
        </table:table-row>
        <table:table-row table:style-name="ro1">
          <table:table-cell office:value-type="float" office:value="684.541687011719">
            <text:p>684.5416870117</text:p>
          </table:table-cell>
          <table:table-cell office:value-type="float" office:value="0.004433057">
            <text:p>0.004433057</text:p>
          </table:table-cell>
          <table:table-cell table:number-columns-repeated="4"/>
        </table:table-row>
        <table:table-row table:style-name="ro1">
          <table:table-cell office:value-type="float" office:value="684.661682128906">
            <text:p>684.6616821289</text:p>
          </table:table-cell>
          <table:table-cell office:value-type="float" office:value="-0.006353692">
            <text:p>-0.006353692</text:p>
          </table:table-cell>
          <table:table-cell table:number-columns-repeated="4"/>
        </table:table-row>
        <table:table-row table:style-name="ro1">
          <table:table-cell office:value-type="float" office:value="684.78173828125">
            <text:p>684.7817382813</text:p>
          </table:table-cell>
          <table:table-cell office:value-type="float" office:value="0.007254958">
            <text:p>0.007254958</text:p>
          </table:table-cell>
          <table:table-cell table:number-columns-repeated="4"/>
        </table:table-row>
        <table:table-row table:style-name="ro1">
          <table:table-cell office:value-type="float" office:value="684.901733398438">
            <text:p>684.9017333984</text:p>
          </table:table-cell>
          <table:table-cell office:value-type="float" office:value="0.008054675">
            <text:p>0.008054675</text:p>
          </table:table-cell>
          <table:table-cell table:number-columns-repeated="4"/>
        </table:table-row>
        <table:table-row table:style-name="ro1">
          <table:table-cell office:value-type="float" office:value="685.021789550781">
            <text:p>685.0217895508</text:p>
          </table:table-cell>
          <table:table-cell office:value-type="float" office:value="-0.005183618">
            <text:p>-0.005183618</text:p>
          </table:table-cell>
          <table:table-cell table:number-columns-repeated="4"/>
        </table:table-row>
        <table:table-row table:style-name="ro1">
          <table:table-cell office:value-type="float" office:value="685.141784667969">
            <text:p>685.141784668</text:p>
          </table:table-cell>
          <table:table-cell office:value-type="float" office:value="-0.000275157">
            <text:p>-0.000275157</text:p>
          </table:table-cell>
          <table:table-cell table:number-columns-repeated="4"/>
        </table:table-row>
        <table:table-row table:style-name="ro1">
          <table:table-cell office:value-type="float" office:value="685.261840820313">
            <text:p>685.2618408203</text:p>
          </table:table-cell>
          <table:table-cell office:value-type="float" office:value="0.009129366">
            <text:p>0.009129366</text:p>
          </table:table-cell>
          <table:table-cell table:number-columns-repeated="4"/>
        </table:table-row>
        <table:table-row table:style-name="ro1">
          <table:table-cell office:value-type="float" office:value="685.381896972656">
            <text:p>685.3818969727</text:p>
          </table:table-cell>
          <table:table-cell office:value-type="float" office:value="0.001762889">
            <text:p>0.001762889</text:p>
          </table:table-cell>
          <table:table-cell table:number-columns-repeated="4"/>
        </table:table-row>
        <table:table-row table:style-name="ro1">
          <table:table-cell office:value-type="float" office:value="685.501892089844">
            <text:p>685.5018920898</text:p>
          </table:table-cell>
          <table:table-cell office:value-type="float" office:value="-0.005149159">
            <text:p>-0.005149159</text:p>
          </table:table-cell>
          <table:table-cell table:number-columns-repeated="4"/>
        </table:table-row>
        <table:table-row table:style-name="ro1">
          <table:table-cell office:value-type="float" office:value="685.621948242188">
            <text:p>685.6219482422</text:p>
          </table:table-cell>
          <table:table-cell office:value-type="float" office:value="0.01129103">
            <text:p>0.01129103</text:p>
          </table:table-cell>
          <table:table-cell table:number-columns-repeated="4"/>
        </table:table-row>
        <table:table-row table:style-name="ro1">
          <table:table-cell office:value-type="float" office:value="685.742004394531">
            <text:p>685.7420043945</text:p>
          </table:table-cell>
          <table:table-cell office:value-type="float" office:value="-0.001262349">
            <text:p>-0.001262349</text:p>
          </table:table-cell>
          <table:table-cell table:number-columns-repeated="4"/>
        </table:table-row>
        <table:table-row table:style-name="ro1">
          <table:table-cell office:value-type="float" office:value="685.861999511719">
            <text:p>685.8619995117</text:p>
          </table:table-cell>
          <table:table-cell office:value-type="float" office:value="-0.0008719841">
            <text:p>-0.0008719841</text:p>
          </table:table-cell>
          <table:table-cell table:number-columns-repeated="4"/>
        </table:table-row>
        <table:table-row table:style-name="ro1">
          <table:table-cell office:value-type="float" office:value="685.982055664063">
            <text:p>685.9820556641</text:p>
          </table:table-cell>
          <table:table-cell office:value-type="float" office:value="-0.004423195">
            <text:p>-0.004423195</text:p>
          </table:table-cell>
          <table:table-cell table:number-columns-repeated="4"/>
        </table:table-row>
        <table:table-row table:style-name="ro1">
          <table:table-cell office:value-type="float" office:value="686.102111816406">
            <text:p>686.1021118164</text:p>
          </table:table-cell>
          <table:table-cell office:value-type="float" office:value="0.001565848">
            <text:p>0.001565848</text:p>
          </table:table-cell>
          <table:table-cell table:number-columns-repeated="4"/>
        </table:table-row>
        <table:table-row table:style-name="ro1">
          <table:table-cell office:value-type="float" office:value="686.22216796875">
            <text:p>686.2221679688</text:p>
          </table:table-cell>
          <table:table-cell office:value-type="float" office:value="-0.009202777">
            <text:p>-0.009202777</text:p>
          </table:table-cell>
          <table:table-cell table:number-columns-repeated="4"/>
        </table:table-row>
        <table:table-row table:style-name="ro1">
          <table:table-cell office:value-type="float" office:value="686.342163085938">
            <text:p>686.3421630859</text:p>
          </table:table-cell>
          <table:table-cell office:value-type="float" office:value="-0.007924693">
            <text:p>-0.007924693</text:p>
          </table:table-cell>
          <table:table-cell table:number-columns-repeated="4"/>
        </table:table-row>
        <table:table-row table:style-name="ro1">
          <table:table-cell office:value-type="float" office:value="686.462219238281">
            <text:p>686.4622192383</text:p>
          </table:table-cell>
          <table:table-cell office:value-type="float" office:value="0.0008977633">
            <text:p>0.0008977633</text:p>
          </table:table-cell>
          <table:table-cell table:number-columns-repeated="4"/>
        </table:table-row>
        <table:table-row table:style-name="ro1">
          <table:table-cell office:value-type="float" office:value="686.582275390625">
            <text:p>686.5822753906</text:p>
          </table:table-cell>
          <table:table-cell office:value-type="float" office:value="-0.001844576">
            <text:p>-0.001844576</text:p>
          </table:table-cell>
          <table:table-cell table:number-columns-repeated="4"/>
        </table:table-row>
        <table:table-row table:style-name="ro1">
          <table:table-cell office:value-type="float" office:value="686.702331542969">
            <text:p>686.702331543</text:p>
          </table:table-cell>
          <table:table-cell office:value-type="float" office:value="0.001561358">
            <text:p>0.001561358</text:p>
          </table:table-cell>
          <table:table-cell table:number-columns-repeated="4"/>
        </table:table-row>
        <table:table-row table:style-name="ro1">
          <table:table-cell office:value-type="float" office:value="686.822387695313">
            <text:p>686.8223876953</text:p>
          </table:table-cell>
          <table:table-cell office:value-type="float" office:value="-0.002934812">
            <text:p>-0.002934812</text:p>
          </table:table-cell>
          <table:table-cell table:number-columns-repeated="4"/>
        </table:table-row>
        <table:table-row table:style-name="ro1">
          <table:table-cell office:value-type="float" office:value="686.9423828125">
            <text:p>686.9423828125</text:p>
          </table:table-cell>
          <table:table-cell office:value-type="float" office:value="0.00713462">
            <text:p>0.00713462</text:p>
          </table:table-cell>
          <table:table-cell table:number-columns-repeated="4"/>
        </table:table-row>
        <table:table-row table:style-name="ro1">
          <table:table-cell office:value-type="float" office:value="687.062438964844">
            <text:p>687.0624389648</text:p>
          </table:table-cell>
          <table:table-cell office:value-type="float" office:value="0.002332858">
            <text:p>0.002332858</text:p>
          </table:table-cell>
          <table:table-cell table:number-columns-repeated="4"/>
        </table:table-row>
        <table:table-row table:style-name="ro1">
          <table:table-cell office:value-type="float" office:value="687.182495117188">
            <text:p>687.1824951172</text:p>
          </table:table-cell>
          <table:table-cell office:value-type="float" office:value="-0.01085252">
            <text:p>-0.01085252</text:p>
          </table:table-cell>
          <table:table-cell table:number-columns-repeated="4"/>
        </table:table-row>
        <table:table-row table:style-name="ro1">
          <table:table-cell office:value-type="float" office:value="687.302551269531">
            <text:p>687.3025512695</text:p>
          </table:table-cell>
          <table:table-cell office:value-type="float" office:value="0.0005155723">
            <text:p>0.0005155723</text:p>
          </table:table-cell>
          <table:table-cell table:number-columns-repeated="4"/>
        </table:table-row>
        <table:table-row table:style-name="ro1">
          <table:table-cell office:value-type="float" office:value="687.422607421875">
            <text:p>687.4226074219</text:p>
          </table:table-cell>
          <table:table-cell office:value-type="float" office:value="-0.008294358">
            <text:p>-0.008294358</text:p>
          </table:table-cell>
          <table:table-cell table:number-columns-repeated="4"/>
        </table:table-row>
        <table:table-row table:style-name="ro1">
          <table:table-cell office:value-type="float" office:value="687.542663574219">
            <text:p>687.5426635742</text:p>
          </table:table-cell>
          <table:table-cell office:value-type="float" office:value="-0.0103922">
            <text:p>-0.0103922</text:p>
          </table:table-cell>
          <table:table-cell table:number-columns-repeated="4"/>
        </table:table-row>
        <table:table-row table:style-name="ro1">
          <table:table-cell office:value-type="float" office:value="687.662719726563">
            <text:p>687.6627197266</text:p>
          </table:table-cell>
          <table:table-cell office:value-type="float" office:value="0.01040956">
            <text:p>0.01040956</text:p>
          </table:table-cell>
          <table:table-cell table:number-columns-repeated="4"/>
        </table:table-row>
        <table:table-row table:style-name="ro1">
          <table:table-cell office:value-type="float" office:value="687.782775878906">
            <text:p>687.7827758789</text:p>
          </table:table-cell>
          <table:table-cell office:value-type="float" office:value="-0.002491453">
            <text:p>-0.002491453</text:p>
          </table:table-cell>
          <table:table-cell table:number-columns-repeated="4"/>
        </table:table-row>
        <table:table-row table:style-name="ro1">
          <table:table-cell office:value-type="float" office:value="687.90283203125">
            <text:p>687.9028320313</text:p>
          </table:table-cell>
          <table:table-cell office:value-type="float" office:value="0.001557277">
            <text:p>0.001557277</text:p>
          </table:table-cell>
          <table:table-cell table:number-columns-repeated="4"/>
        </table:table-row>
        <table:table-row table:style-name="ro1">
          <table:table-cell office:value-type="float" office:value="688.022888183594">
            <text:p>688.0228881836</text:p>
          </table:table-cell>
          <table:table-cell office:value-type="float" office:value="0.007715176">
            <text:p>0.007715176</text:p>
          </table:table-cell>
          <table:table-cell table:number-columns-repeated="4"/>
        </table:table-row>
        <table:table-row table:style-name="ro1">
          <table:table-cell office:value-type="float" office:value="688.142944335938">
            <text:p>688.1429443359</text:p>
          </table:table-cell>
          <table:table-cell office:value-type="float" office:value="0.003271975">
            <text:p>0.003271975</text:p>
          </table:table-cell>
          <table:table-cell table:number-columns-repeated="4"/>
        </table:table-row>
        <table:table-row table:style-name="ro1">
          <table:table-cell office:value-type="float" office:value="688.263000488281">
            <text:p>688.2630004883</text:p>
          </table:table-cell>
          <table:table-cell office:value-type="float" office:value="-0.006263632">
            <text:p>-0.006263632</text:p>
          </table:table-cell>
          <table:table-cell table:number-columns-repeated="4"/>
        </table:table-row>
        <table:table-row table:style-name="ro1">
          <table:table-cell office:value-type="float" office:value="688.383056640625">
            <text:p>688.3830566406</text:p>
          </table:table-cell>
          <table:table-cell office:value-type="float" office:value="-0.003516452">
            <text:p>-0.003516452</text:p>
          </table:table-cell>
          <table:table-cell table:number-columns-repeated="4"/>
        </table:table-row>
        <table:table-row table:style-name="ro1">
          <table:table-cell office:value-type="float" office:value="688.503112792969">
            <text:p>688.503112793</text:p>
          </table:table-cell>
          <table:table-cell office:value-type="float" office:value="-0.006511063">
            <text:p>-0.006511063</text:p>
          </table:table-cell>
          <table:table-cell table:number-columns-repeated="4"/>
        </table:table-row>
        <table:table-row table:style-name="ro1">
          <table:table-cell office:value-type="float" office:value="688.623168945313">
            <text:p>688.6231689453</text:p>
          </table:table-cell>
          <table:table-cell office:value-type="float" office:value="-0.007545265">
            <text:p>-0.007545265</text:p>
          </table:table-cell>
          <table:table-cell table:number-columns-repeated="4"/>
        </table:table-row>
        <table:table-row table:style-name="ro1">
          <table:table-cell office:value-type="float" office:value="688.743225097656">
            <text:p>688.7432250977</text:p>
          </table:table-cell>
          <table:table-cell office:value-type="float" office:value="-0.005232542">
            <text:p>-0.005232542</text:p>
          </table:table-cell>
          <table:table-cell table:number-columns-repeated="4"/>
        </table:table-row>
        <table:table-row table:style-name="ro1">
          <table:table-cell office:value-type="float" office:value="688.86328125">
            <text:p>688.86328125</text:p>
          </table:table-cell>
          <table:table-cell office:value-type="float" office:value="-0.004347247">
            <text:p>-0.004347247</text:p>
          </table:table-cell>
          <table:table-cell table:number-columns-repeated="4"/>
        </table:table-row>
        <table:table-row table:style-name="ro1">
          <table:table-cell office:value-type="float" office:value="688.983337402344">
            <text:p>688.9833374023</text:p>
          </table:table-cell>
          <table:table-cell office:value-type="float" office:value="-0.004732625">
            <text:p>-0.004732625</text:p>
          </table:table-cell>
          <table:table-cell table:number-columns-repeated="4"/>
        </table:table-row>
        <table:table-row table:style-name="ro1">
          <table:table-cell office:value-type="float" office:value="689.103393554688">
            <text:p>689.1033935547</text:p>
          </table:table-cell>
          <table:table-cell office:value-type="float" office:value="-0.00048563">
            <text:p>-0.00048563</text:p>
          </table:table-cell>
          <table:table-cell table:number-columns-repeated="4"/>
        </table:table-row>
        <table:table-row table:style-name="ro1">
          <table:table-cell office:value-type="float" office:value="689.223449707031">
            <text:p>689.223449707</text:p>
          </table:table-cell>
          <table:table-cell office:value-type="float" office:value="-0.001520489">
            <text:p>-0.001520489</text:p>
          </table:table-cell>
          <table:table-cell table:number-columns-repeated="4"/>
        </table:table-row>
        <table:table-row table:style-name="ro1">
          <table:table-cell office:value-type="float" office:value="689.343505859375">
            <text:p>689.3435058594</text:p>
          </table:table-cell>
          <table:table-cell office:value-type="float" office:value="0.01644383">
            <text:p>0.01644383</text:p>
          </table:table-cell>
          <table:table-cell table:number-columns-repeated="4"/>
        </table:table-row>
        <table:table-row table:style-name="ro1">
          <table:table-cell office:value-type="float" office:value="689.463562011719">
            <text:p>689.4635620117</text:p>
          </table:table-cell>
          <table:table-cell office:value-type="float" office:value="0.003600281">
            <text:p>0.003600281</text:p>
          </table:table-cell>
          <table:table-cell table:number-columns-repeated="4"/>
        </table:table-row>
        <table:table-row table:style-name="ro1">
          <table:table-cell office:value-type="float" office:value="689.583679199219">
            <text:p>689.5836791992</text:p>
          </table:table-cell>
          <table:table-cell office:value-type="float" office:value="0.005194919">
            <text:p>0.005194919</text:p>
          </table:table-cell>
          <table:table-cell table:number-columns-repeated="4"/>
        </table:table-row>
        <table:table-row table:style-name="ro1">
          <table:table-cell office:value-type="float" office:value="689.703735351563">
            <text:p>689.7037353516</text:p>
          </table:table-cell>
          <table:table-cell office:value-type="float" office:value="0.003739642">
            <text:p>0.003739642</text:p>
          </table:table-cell>
          <table:table-cell table:number-columns-repeated="4"/>
        </table:table-row>
        <table:table-row table:style-name="ro1">
          <table:table-cell office:value-type="float" office:value="689.823791503906">
            <text:p>689.8237915039</text:p>
          </table:table-cell>
          <table:table-cell office:value-type="float" office:value="-0.005303037">
            <text:p>-0.005303037</text:p>
          </table:table-cell>
          <table:table-cell table:number-columns-repeated="4"/>
        </table:table-row>
        <table:table-row table:style-name="ro1">
          <table:table-cell office:value-type="float" office:value="689.94384765625">
            <text:p>689.9438476563</text:p>
          </table:table-cell>
          <table:table-cell office:value-type="float" office:value="-0.005093976">
            <text:p>-0.005093976</text:p>
          </table:table-cell>
          <table:table-cell table:number-columns-repeated="4"/>
        </table:table-row>
        <table:table-row table:style-name="ro1">
          <table:table-cell office:value-type="float" office:value="690.063903808594">
            <text:p>690.0639038086</text:p>
          </table:table-cell>
          <table:table-cell office:value-type="float" office:value="0.00337468">
            <text:p>0.00337468</text:p>
          </table:table-cell>
          <table:table-cell table:number-columns-repeated="4"/>
        </table:table-row>
        <table:table-row table:style-name="ro1">
          <table:table-cell office:value-type="float" office:value="690.184020996094">
            <text:p>690.1840209961</text:p>
          </table:table-cell>
          <table:table-cell office:value-type="float" office:value="0.0001282319">
            <text:p>0.0001282319</text:p>
          </table:table-cell>
          <table:table-cell table:number-columns-repeated="4"/>
        </table:table-row>
        <table:table-row table:style-name="ro1">
          <table:table-cell office:value-type="float" office:value="690.304077148438">
            <text:p>690.3040771484</text:p>
          </table:table-cell>
          <table:table-cell office:value-type="float" office:value="-0.001606471">
            <text:p>-0.001606471</text:p>
          </table:table-cell>
          <table:table-cell table:number-columns-repeated="4"/>
        </table:table-row>
        <table:table-row table:style-name="ro1">
          <table:table-cell office:value-type="float" office:value="690.424133300781">
            <text:p>690.4241333008</text:p>
          </table:table-cell>
          <table:table-cell office:value-type="float" office:value="0.001910459">
            <text:p>0.001910459</text:p>
          </table:table-cell>
          <table:table-cell table:number-columns-repeated="4"/>
        </table:table-row>
        <table:table-row table:style-name="ro1">
          <table:table-cell office:value-type="float" office:value="690.544189453125">
            <text:p>690.5441894531</text:p>
          </table:table-cell>
          <table:table-cell office:value-type="float" office:value="0.0215692">
            <text:p>0.0215692</text:p>
          </table:table-cell>
          <table:table-cell table:number-columns-repeated="4"/>
        </table:table-row>
        <table:table-row table:style-name="ro1">
          <table:table-cell office:value-type="float" office:value="690.664306640625">
            <text:p>690.6643066406</text:p>
          </table:table-cell>
          <table:table-cell office:value-type="float" office:value="-0.008254167">
            <text:p>-0.008254167</text:p>
          </table:table-cell>
          <table:table-cell table:number-columns-repeated="4"/>
        </table:table-row>
        <table:table-row table:style-name="ro1">
          <table:table-cell office:value-type="float" office:value="690.784362792969">
            <text:p>690.784362793</text:p>
          </table:table-cell>
          <table:table-cell office:value-type="float" office:value="-0.001027967">
            <text:p>-0.001027967</text:p>
          </table:table-cell>
          <table:table-cell table:number-columns-repeated="4"/>
        </table:table-row>
        <table:table-row table:style-name="ro1">
          <table:table-cell office:value-type="float" office:value="690.904418945313">
            <text:p>690.9044189453</text:p>
          </table:table-cell>
          <table:table-cell office:value-type="float" office:value="0.04135571">
            <text:p>0.04135571</text:p>
          </table:table-cell>
          <table:table-cell table:number-columns-repeated="4"/>
        </table:table-row>
        <table:table-row table:style-name="ro1">
          <table:table-cell office:value-type="float" office:value="691.024475097656">
            <text:p>691.0244750977</text:p>
          </table:table-cell>
          <table:table-cell office:value-type="float" office:value="0.001666647">
            <text:p>0.001666647</text:p>
          </table:table-cell>
          <table:table-cell table:number-columns-repeated="4"/>
        </table:table-row>
        <table:table-row table:style-name="ro1">
          <table:table-cell office:value-type="float" office:value="691.144592285156">
            <text:p>691.1445922852</text:p>
          </table:table-cell>
          <table:table-cell office:value-type="float" office:value="0.002598171">
            <text:p>0.002598171</text:p>
          </table:table-cell>
          <table:table-cell table:number-columns-repeated="4"/>
        </table:table-row>
        <table:table-row table:style-name="ro1">
          <table:table-cell office:value-type="float" office:value="691.2646484375">
            <text:p>691.2646484375</text:p>
          </table:table-cell>
          <table:table-cell office:value-type="float" office:value="-0.00300793">
            <text:p>-0.00300793</text:p>
          </table:table-cell>
          <table:table-cell table:number-columns-repeated="4"/>
        </table:table-row>
        <table:table-row table:style-name="ro1">
          <table:table-cell office:value-type="float" office:value="691.384765625">
            <text:p>691.384765625</text:p>
          </table:table-cell>
          <table:table-cell office:value-type="float" office:value="0.01145179">
            <text:p>0.01145179</text:p>
          </table:table-cell>
          <table:table-cell table:number-columns-repeated="4"/>
        </table:table-row>
        <table:table-row table:style-name="ro1">
          <table:table-cell office:value-type="float" office:value="691.504821777344">
            <text:p>691.5048217773</text:p>
          </table:table-cell>
          <table:table-cell office:value-type="float" office:value="0.002034003">
            <text:p>0.002034003</text:p>
          </table:table-cell>
          <table:table-cell table:number-columns-repeated="4"/>
        </table:table-row>
        <table:table-row table:style-name="ro1">
          <table:table-cell office:value-type="float" office:value="691.624877929688">
            <text:p>691.6248779297</text:p>
          </table:table-cell>
          <table:table-cell office:value-type="float" office:value="-0.01072018">
            <text:p>-0.01072018</text:p>
          </table:table-cell>
          <table:table-cell table:number-columns-repeated="4"/>
        </table:table-row>
        <table:table-row table:style-name="ro1">
          <table:table-cell office:value-type="float" office:value="691.744995117188">
            <text:p>691.7449951172</text:p>
          </table:table-cell>
          <table:table-cell office:value-type="float" office:value="0.009189672">
            <text:p>0.009189672</text:p>
          </table:table-cell>
          <table:table-cell table:number-columns-repeated="4"/>
        </table:table-row>
        <table:table-row table:style-name="ro1">
          <table:table-cell office:value-type="float" office:value="691.865051269531">
            <text:p>691.8650512695</text:p>
          </table:table-cell>
          <table:table-cell office:value-type="float" office:value="-0.007595073">
            <text:p>-0.007595073</text:p>
          </table:table-cell>
          <table:table-cell table:number-columns-repeated="4"/>
        </table:table-row>
        <table:table-row table:style-name="ro1">
          <table:table-cell office:value-type="float" office:value="691.985168457031">
            <text:p>691.985168457</text:p>
          </table:table-cell>
          <table:table-cell office:value-type="float" office:value="-0.006489578">
            <text:p>-0.006489578</text:p>
          </table:table-cell>
          <table:table-cell table:number-columns-repeated="4"/>
        </table:table-row>
        <table:table-row table:style-name="ro1">
          <table:table-cell office:value-type="float" office:value="692.105224609375">
            <text:p>692.1052246094</text:p>
          </table:table-cell>
          <table:table-cell office:value-type="float" office:value="0.008052743">
            <text:p>0.008052743</text:p>
          </table:table-cell>
          <table:table-cell table:number-columns-repeated="4"/>
        </table:table-row>
        <table:table-row table:style-name="ro1">
          <table:table-cell office:value-type="float" office:value="692.225280761719">
            <text:p>692.2252807617</text:p>
          </table:table-cell>
          <table:table-cell office:value-type="float" office:value="0.002510065">
            <text:p>0.002510065</text:p>
          </table:table-cell>
          <table:table-cell table:number-columns-repeated="4"/>
        </table:table-row>
        <table:table-row table:style-name="ro1">
          <table:table-cell office:value-type="float" office:value="692.345397949219">
            <text:p>692.3453979492</text:p>
          </table:table-cell>
          <table:table-cell office:value-type="float" office:value="0.01199284">
            <text:p>0.01199284</text:p>
          </table:table-cell>
          <table:table-cell table:number-columns-repeated="4"/>
        </table:table-row>
        <table:table-row table:style-name="ro1">
          <table:table-cell office:value-type="float" office:value="692.465454101563">
            <text:p>692.4654541016</text:p>
          </table:table-cell>
          <table:table-cell office:value-type="float" office:value="0.00324632">
            <text:p>0.00324632</text:p>
          </table:table-cell>
          <table:table-cell table:number-columns-repeated="4"/>
        </table:table-row>
        <table:table-row table:style-name="ro1">
          <table:table-cell office:value-type="float" office:value="692.585571289063">
            <text:p>692.5855712891</text:p>
          </table:table-cell>
          <table:table-cell office:value-type="float" office:value="0.004826519">
            <text:p>0.004826519</text:p>
          </table:table-cell>
          <table:table-cell table:number-columns-repeated="4"/>
        </table:table-row>
        <table:table-row table:style-name="ro1">
          <table:table-cell office:value-type="float" office:value="692.705627441406">
            <text:p>692.7056274414</text:p>
          </table:table-cell>
          <table:table-cell office:value-type="float" office:value="-0.001016868">
            <text:p>-0.001016868</text:p>
          </table:table-cell>
          <table:table-cell table:number-columns-repeated="4"/>
        </table:table-row>
        <table:table-row table:style-name="ro1">
          <table:table-cell office:value-type="float" office:value="692.825744628906">
            <text:p>692.8257446289</text:p>
          </table:table-cell>
          <table:table-cell office:value-type="float" office:value="0.001602348">
            <text:p>0.001602348</text:p>
          </table:table-cell>
          <table:table-cell table:number-columns-repeated="4"/>
        </table:table-row>
        <table:table-row table:style-name="ro1">
          <table:table-cell office:value-type="float" office:value="692.94580078125">
            <text:p>692.9458007813</text:p>
          </table:table-cell>
          <table:table-cell office:value-type="float" office:value="-0.001087322">
            <text:p>-0.001087322</text:p>
          </table:table-cell>
          <table:table-cell table:number-columns-repeated="4"/>
        </table:table-row>
        <table:table-row table:style-name="ro1">
          <table:table-cell office:value-type="float" office:value="693.06591796875">
            <text:p>693.0659179688</text:p>
          </table:table-cell>
          <table:table-cell office:value-type="float" office:value="-0.0006905451">
            <text:p>-0.0006905451</text:p>
          </table:table-cell>
          <table:table-cell table:number-columns-repeated="4"/>
        </table:table-row>
        <table:table-row table:style-name="ro1">
          <table:table-cell office:value-type="float" office:value="693.18603515625">
            <text:p>693.1860351563</text:p>
          </table:table-cell>
          <table:table-cell office:value-type="float" office:value="-0.009147349">
            <text:p>-0.009147349</text:p>
          </table:table-cell>
          <table:table-cell table:number-columns-repeated="4"/>
        </table:table-row>
        <table:table-row table:style-name="ro1">
          <table:table-cell office:value-type="float" office:value="693.306091308594">
            <text:p>693.3060913086</text:p>
          </table:table-cell>
          <table:table-cell office:value-type="float" office:value="-0.006843613">
            <text:p>-0.006843613</text:p>
          </table:table-cell>
          <table:table-cell table:number-columns-repeated="4"/>
        </table:table-row>
        <table:table-row table:style-name="ro1">
          <table:table-cell office:value-type="float" office:value="693.426208496094">
            <text:p>693.4262084961</text:p>
          </table:table-cell>
          <table:table-cell office:value-type="float" office:value="-0.01269868">
            <text:p>-0.01269868</text:p>
          </table:table-cell>
          <table:table-cell table:number-columns-repeated="4"/>
        </table:table-row>
        <table:table-row table:style-name="ro1">
          <table:table-cell office:value-type="float" office:value="693.546264648438">
            <text:p>693.5462646484</text:p>
          </table:table-cell>
          <table:table-cell office:value-type="float" office:value="-0.002022807">
            <text:p>-0.002022807</text:p>
          </table:table-cell>
          <table:table-cell table:number-columns-repeated="4"/>
        </table:table-row>
        <table:table-row table:style-name="ro1">
          <table:table-cell office:value-type="float" office:value="693.666381835938">
            <text:p>693.6663818359</text:p>
          </table:table-cell>
          <table:table-cell office:value-type="float" office:value="-0.005552317">
            <text:p>-0.005552317</text:p>
          </table:table-cell>
          <table:table-cell table:number-columns-repeated="4"/>
        </table:table-row>
        <table:table-row table:style-name="ro1">
          <table:table-cell office:value-type="float" office:value="693.786499023438">
            <text:p>693.7864990234</text:p>
          </table:table-cell>
          <table:table-cell office:value-type="float" office:value="0.01167812">
            <text:p>0.01167812</text:p>
          </table:table-cell>
          <table:table-cell table:number-columns-repeated="4"/>
        </table:table-row>
        <table:table-row table:style-name="ro1">
          <table:table-cell office:value-type="float" office:value="693.906555175781">
            <text:p>693.9065551758</text:p>
          </table:table-cell>
          <table:table-cell office:value-type="float" office:value="-0.008433348">
            <text:p>-0.008433348</text:p>
          </table:table-cell>
          <table:table-cell table:number-columns-repeated="4"/>
        </table:table-row>
        <table:table-row table:style-name="ro1">
          <table:table-cell office:value-type="float" office:value="694.026672363281">
            <text:p>694.0266723633</text:p>
          </table:table-cell>
          <table:table-cell office:value-type="float" office:value="-0.002002806">
            <text:p>-0.002002806</text:p>
          </table:table-cell>
          <table:table-cell table:number-columns-repeated="4"/>
        </table:table-row>
        <table:table-row table:style-name="ro1">
          <table:table-cell office:value-type="float" office:value="694.146728515625">
            <text:p>694.1467285156</text:p>
          </table:table-cell>
          <table:table-cell office:value-type="float" office:value="-0.001521334">
            <text:p>-0.001521334</text:p>
          </table:table-cell>
          <table:table-cell table:number-columns-repeated="4"/>
        </table:table-row>
        <table:table-row table:style-name="ro1">
          <table:table-cell office:value-type="float" office:value="694.266845703125">
            <text:p>694.2668457031</text:p>
          </table:table-cell>
          <table:table-cell office:value-type="float" office:value="-0.001576384">
            <text:p>-0.001576384</text:p>
          </table:table-cell>
          <table:table-cell table:number-columns-repeated="4"/>
        </table:table-row>
        <table:table-row table:style-name="ro1">
          <table:table-cell office:value-type="float" office:value="694.386962890625">
            <text:p>694.3869628906</text:p>
          </table:table-cell>
          <table:table-cell office:value-type="float" office:value="-0.001818592">
            <text:p>-0.001818592</text:p>
          </table:table-cell>
          <table:table-cell table:number-columns-repeated="4"/>
        </table:table-row>
        <table:table-row table:style-name="ro1">
          <table:table-cell office:value-type="float" office:value="694.507080078125">
            <text:p>694.5070800781</text:p>
          </table:table-cell>
          <table:table-cell office:value-type="float" office:value="0.008263862">
            <text:p>0.008263862</text:p>
          </table:table-cell>
          <table:table-cell table:number-columns-repeated="4"/>
        </table:table-row>
        <table:table-row table:style-name="ro1">
          <table:table-cell office:value-type="float" office:value="694.627136230469">
            <text:p>694.6271362305</text:p>
          </table:table-cell>
          <table:table-cell office:value-type="float" office:value="-0.002448546">
            <text:p>-0.002448546</text:p>
          </table:table-cell>
          <table:table-cell table:number-columns-repeated="4"/>
        </table:table-row>
        <table:table-row table:style-name="ro1">
          <table:table-cell office:value-type="float" office:value="694.747253417969">
            <text:p>694.747253418</text:p>
          </table:table-cell>
          <table:table-cell office:value-type="float" office:value="-0.004756493">
            <text:p>-0.004756493</text:p>
          </table:table-cell>
          <table:table-cell table:number-columns-repeated="4"/>
        </table:table-row>
        <table:table-row table:style-name="ro1">
          <table:table-cell office:value-type="float" office:value="694.867370605469">
            <text:p>694.8673706055</text:p>
          </table:table-cell>
          <table:table-cell office:value-type="float" office:value="-0.01160159">
            <text:p>-0.01160159</text:p>
          </table:table-cell>
          <table:table-cell table:number-columns-repeated="4"/>
        </table:table-row>
        <table:table-row table:style-name="ro1">
          <table:table-cell office:value-type="float" office:value="694.987426757813">
            <text:p>694.9874267578</text:p>
          </table:table-cell>
          <table:table-cell office:value-type="float" office:value="-0.00124983">
            <text:p>-0.00124983</text:p>
          </table:table-cell>
          <table:table-cell table:number-columns-repeated="4"/>
        </table:table-row>
        <table:table-row table:style-name="ro1">
          <table:table-cell office:value-type="float" office:value="695.107543945313">
            <text:p>695.1075439453</text:p>
          </table:table-cell>
          <table:table-cell office:value-type="float" office:value="0.001322265">
            <text:p>0.001322265</text:p>
          </table:table-cell>
          <table:table-cell table:number-columns-repeated="4"/>
        </table:table-row>
        <table:table-row table:style-name="ro1">
          <table:table-cell office:value-type="float" office:value="695.227661132813">
            <text:p>695.2276611328</text:p>
          </table:table-cell>
          <table:table-cell office:value-type="float" office:value="0.002702159">
            <text:p>0.002702159</text:p>
          </table:table-cell>
          <table:table-cell table:number-columns-repeated="4"/>
        </table:table-row>
        <table:table-row table:style-name="ro1">
          <table:table-cell office:value-type="float" office:value="695.347778320313">
            <text:p>695.3477783203</text:p>
          </table:table-cell>
          <table:table-cell office:value-type="float" office:value="-0.007125502">
            <text:p>-0.007125502</text:p>
          </table:table-cell>
          <table:table-cell table:number-columns-repeated="4"/>
        </table:table-row>
        <table:table-row table:style-name="ro1">
          <table:table-cell office:value-type="float" office:value="695.467895507813">
            <text:p>695.4678955078</text:p>
          </table:table-cell>
          <table:table-cell office:value-type="float" office:value="-0.009878996">
            <text:p>-0.009878996</text:p>
          </table:table-cell>
          <table:table-cell table:number-columns-repeated="4"/>
        </table:table-row>
        <table:table-row table:style-name="ro1">
          <table:table-cell office:value-type="float" office:value="695.587951660156">
            <text:p>695.5879516602</text:p>
          </table:table-cell>
          <table:table-cell office:value-type="float" office:value="0.008594262">
            <text:p>0.008594262</text:p>
          </table:table-cell>
          <table:table-cell table:number-columns-repeated="4"/>
        </table:table-row>
        <table:table-row table:style-name="ro1">
          <table:table-cell office:value-type="float" office:value="695.708068847656">
            <text:p>695.7080688477</text:p>
          </table:table-cell>
          <table:table-cell office:value-type="float" office:value="0.001694304">
            <text:p>0.001694304</text:p>
          </table:table-cell>
          <table:table-cell table:number-columns-repeated="4"/>
        </table:table-row>
        <table:table-row table:style-name="ro1">
          <table:table-cell office:value-type="float" office:value="695.828186035156">
            <text:p>695.8281860352</text:p>
          </table:table-cell>
          <table:table-cell office:value-type="float" office:value="-0.004322668">
            <text:p>-0.004322668</text:p>
          </table:table-cell>
          <table:table-cell table:number-columns-repeated="4"/>
        </table:table-row>
        <table:table-row table:style-name="ro1">
          <table:table-cell office:value-type="float" office:value="695.948303222656">
            <text:p>695.9483032227</text:p>
          </table:table-cell>
          <table:table-cell office:value-type="float" office:value="-0.002329711">
            <text:p>-0.002329711</text:p>
          </table:table-cell>
          <table:table-cell table:number-columns-repeated="4"/>
        </table:table-row>
        <table:table-row table:style-name="ro1">
          <table:table-cell office:value-type="float" office:value="696.068420410156">
            <text:p>696.0684204102</text:p>
          </table:table-cell>
          <table:table-cell office:value-type="float" office:value="-0.007788897">
            <text:p>-0.007788897</text:p>
          </table:table-cell>
          <table:table-cell table:number-columns-repeated="4"/>
        </table:table-row>
        <table:table-row table:style-name="ro1">
          <table:table-cell office:value-type="float" office:value="696.188537597656">
            <text:p>696.1885375977</text:p>
          </table:table-cell>
          <table:table-cell office:value-type="float" office:value="0.02504553">
            <text:p>0.02504553</text:p>
          </table:table-cell>
          <table:table-cell table:number-columns-repeated="4"/>
        </table:table-row>
        <table:table-row table:style-name="ro1">
          <table:table-cell office:value-type="float" office:value="696.308654785156">
            <text:p>696.3086547852</text:p>
          </table:table-cell>
          <table:table-cell office:value-type="float" office:value="-0.008849152">
            <text:p>-0.008849152</text:p>
          </table:table-cell>
          <table:table-cell table:number-columns-repeated="4"/>
        </table:table-row>
        <table:table-row table:style-name="ro1">
          <table:table-cell office:value-type="float" office:value="696.428771972656">
            <text:p>696.4287719727</text:p>
          </table:table-cell>
          <table:table-cell office:value-type="float" office:value="0.01275769">
            <text:p>0.01275769</text:p>
          </table:table-cell>
          <table:table-cell table:number-columns-repeated="4"/>
        </table:table-row>
        <table:table-row table:style-name="ro1">
          <table:table-cell office:value-type="float" office:value="696.548828125">
            <text:p>696.548828125</text:p>
          </table:table-cell>
          <table:table-cell office:value-type="float" office:value="-0.007444355">
            <text:p>-0.007444355</text:p>
          </table:table-cell>
          <table:table-cell table:number-columns-repeated="4"/>
        </table:table-row>
        <table:table-row table:style-name="ro1">
          <table:table-cell office:value-type="float" office:value="696.6689453125">
            <text:p>696.6689453125</text:p>
          </table:table-cell>
          <table:table-cell office:value-type="float" office:value="-0.00651006">
            <text:p>-0.00651006</text:p>
          </table:table-cell>
          <table:table-cell table:number-columns-repeated="4"/>
        </table:table-row>
        <table:table-row table:style-name="ro1">
          <table:table-cell office:value-type="float" office:value="696.7890625">
            <text:p>696.7890625</text:p>
          </table:table-cell>
          <table:table-cell office:value-type="float" office:value="-0.009802379">
            <text:p>-0.009802379</text:p>
          </table:table-cell>
          <table:table-cell table:number-columns-repeated="4"/>
        </table:table-row>
        <table:table-row table:style-name="ro1">
          <table:table-cell office:value-type="float" office:value="696.9091796875">
            <text:p>696.9091796875</text:p>
          </table:table-cell>
          <table:table-cell office:value-type="float" office:value="-0.008982324">
            <text:p>-0.008982324</text:p>
          </table:table-cell>
          <table:table-cell table:number-columns-repeated="4"/>
        </table:table-row>
        <table:table-row table:style-name="ro1">
          <table:table-cell office:value-type="float" office:value="697.029296875">
            <text:p>697.029296875</text:p>
          </table:table-cell>
          <table:table-cell office:value-type="float" office:value="-0.0131293">
            <text:p>-0.0131293</text:p>
          </table:table-cell>
          <table:table-cell table:number-columns-repeated="4"/>
        </table:table-row>
        <table:table-row table:style-name="ro1">
          <table:table-cell office:value-type="float" office:value="697.1494140625">
            <text:p>697.1494140625</text:p>
          </table:table-cell>
          <table:table-cell office:value-type="float" office:value="0.007261369">
            <text:p>0.007261369</text:p>
          </table:table-cell>
          <table:table-cell table:number-columns-repeated="4"/>
        </table:table-row>
        <table:table-row table:style-name="ro1">
          <table:table-cell office:value-type="float" office:value="697.26953125">
            <text:p>697.26953125</text:p>
          </table:table-cell>
          <table:table-cell office:value-type="float" office:value="0.002983697">
            <text:p>0.002983697</text:p>
          </table:table-cell>
          <table:table-cell table:number-columns-repeated="4"/>
        </table:table-row>
        <table:table-row table:style-name="ro1">
          <table:table-cell office:value-type="float" office:value="697.3896484375">
            <text:p>697.3896484375</text:p>
          </table:table-cell>
          <table:table-cell office:value-type="float" office:value="-0.008260603">
            <text:p>-0.008260603</text:p>
          </table:table-cell>
          <table:table-cell table:number-columns-repeated="4"/>
        </table:table-row>
        <table:table-row table:style-name="ro1">
          <table:table-cell office:value-type="float" office:value="697.509765625">
            <text:p>697.509765625</text:p>
          </table:table-cell>
          <table:table-cell office:value-type="float" office:value="0.0002833083">
            <text:p>0.0002833083</text:p>
          </table:table-cell>
          <table:table-cell table:number-columns-repeated="4"/>
        </table:table-row>
        <table:table-row table:style-name="ro1">
          <table:table-cell office:value-type="float" office:value="697.6298828125">
            <text:p>697.6298828125</text:p>
          </table:table-cell>
          <table:table-cell office:value-type="float" office:value="-0.006927943">
            <text:p>-0.006927943</text:p>
          </table:table-cell>
          <table:table-cell table:number-columns-repeated="4"/>
        </table:table-row>
        <table:table-row table:style-name="ro1">
          <table:table-cell office:value-type="float" office:value="697.75">
            <text:p>697.75</text:p>
          </table:table-cell>
          <table:table-cell office:value-type="float" office:value="0.02629779">
            <text:p>0.02629779</text:p>
          </table:table-cell>
          <table:table-cell table:number-columns-repeated="4"/>
        </table:table-row>
        <table:table-row table:style-name="ro1">
          <table:table-cell office:value-type="float" office:value="697.8701171875">
            <text:p>697.8701171875</text:p>
          </table:table-cell>
          <table:table-cell office:value-type="float" office:value="0.005768067">
            <text:p>0.005768067</text:p>
          </table:table-cell>
          <table:table-cell table:number-columns-repeated="4"/>
        </table:table-row>
        <table:table-row table:style-name="ro1">
          <table:table-cell office:value-type="float" office:value="697.990234375">
            <text:p>697.990234375</text:p>
          </table:table-cell>
          <table:table-cell office:value-type="float" office:value="0.01282597">
            <text:p>0.01282597</text:p>
          </table:table-cell>
          <table:table-cell table:number-columns-repeated="4"/>
        </table:table-row>
        <table:table-row table:style-name="ro1">
          <table:table-cell office:value-type="float" office:value="698.1103515625">
            <text:p>698.1103515625</text:p>
          </table:table-cell>
          <table:table-cell office:value-type="float" office:value="0.001247213">
            <text:p>0.001247213</text:p>
          </table:table-cell>
          <table:table-cell table:number-columns-repeated="4"/>
        </table:table-row>
        <table:table-row table:style-name="ro1">
          <table:table-cell office:value-type="float" office:value="698.23046875">
            <text:p>698.23046875</text:p>
          </table:table-cell>
          <table:table-cell office:value-type="float" office:value="-0.01007026">
            <text:p>-0.01007026</text:p>
          </table:table-cell>
          <table:table-cell table:number-columns-repeated="4"/>
        </table:table-row>
        <table:table-row table:style-name="ro1">
          <table:table-cell office:value-type="float" office:value="698.350646972656">
            <text:p>698.3506469727</text:p>
          </table:table-cell>
          <table:table-cell office:value-type="float" office:value="-0.005115109">
            <text:p>-0.005115109</text:p>
          </table:table-cell>
          <table:table-cell table:number-columns-repeated="4"/>
        </table:table-row>
        <table:table-row table:style-name="ro1">
          <table:table-cell office:value-type="float" office:value="698.470764160156">
            <text:p>698.4707641602</text:p>
          </table:table-cell>
          <table:table-cell office:value-type="float" office:value="0.002672553">
            <text:p>0.002672553</text:p>
          </table:table-cell>
          <table:table-cell table:number-columns-repeated="4"/>
        </table:table-row>
        <table:table-row table:style-name="ro1">
          <table:table-cell office:value-type="float" office:value="698.590881347656">
            <text:p>698.5908813477</text:p>
          </table:table-cell>
          <table:table-cell office:value-type="float" office:value="0.001869976">
            <text:p>0.001869976</text:p>
          </table:table-cell>
          <table:table-cell table:number-columns-repeated="4"/>
        </table:table-row>
        <table:table-row table:style-name="ro1">
          <table:table-cell office:value-type="float" office:value="698.710998535156">
            <text:p>698.7109985352</text:p>
          </table:table-cell>
          <table:table-cell office:value-type="float" office:value="0.02501151">
            <text:p>0.02501151</text:p>
          </table:table-cell>
          <table:table-cell table:number-columns-repeated="4"/>
        </table:table-row>
        <table:table-row table:style-name="ro1">
          <table:table-cell office:value-type="float" office:value="698.831115722656">
            <text:p>698.8311157227</text:p>
          </table:table-cell>
          <table:table-cell office:value-type="float" office:value="-0.00169398">
            <text:p>-0.00169398</text:p>
          </table:table-cell>
          <table:table-cell table:number-columns-repeated="4"/>
        </table:table-row>
        <table:table-row table:style-name="ro1">
          <table:table-cell office:value-type="float" office:value="698.951232910156">
            <text:p>698.9512329102</text:p>
          </table:table-cell>
          <table:table-cell office:value-type="float" office:value="-0.0009200377">
            <text:p>-0.0009200377</text:p>
          </table:table-cell>
          <table:table-cell table:number-columns-repeated="4"/>
        </table:table-row>
        <table:table-row table:style-name="ro1">
          <table:table-cell office:value-type="float" office:value="699.071350097656">
            <text:p>699.0713500977</text:p>
          </table:table-cell>
          <table:table-cell office:value-type="float" office:value="0.005660117">
            <text:p>0.005660117</text:p>
          </table:table-cell>
          <table:table-cell table:number-columns-repeated="4"/>
        </table:table-row>
        <table:table-row table:style-name="ro1">
          <table:table-cell office:value-type="float" office:value="699.191528320313">
            <text:p>699.1915283203</text:p>
          </table:table-cell>
          <table:table-cell office:value-type="float" office:value="-0.001158094">
            <text:p>-0.001158094</text:p>
          </table:table-cell>
          <table:table-cell table:number-columns-repeated="4"/>
        </table:table-row>
        <table:table-row table:style-name="ro1">
          <table:table-cell office:value-type="float" office:value="699.311645507813">
            <text:p>699.3116455078</text:p>
          </table:table-cell>
          <table:table-cell office:value-type="float" office:value="0.0008808241">
            <text:p>0.0008808241</text:p>
          </table:table-cell>
          <table:table-cell table:number-columns-repeated="4"/>
        </table:table-row>
        <table:table-row table:style-name="ro1">
          <table:table-cell office:value-type="float" office:value="699.431762695313">
            <text:p>699.4317626953</text:p>
          </table:table-cell>
          <table:table-cell office:value-type="float" office:value="0.00447885">
            <text:p>0.00447885</text:p>
          </table:table-cell>
          <table:table-cell table:number-columns-repeated="4"/>
        </table:table-row>
        <table:table-row table:style-name="ro1">
          <table:table-cell office:value-type="float" office:value="699.551879882813">
            <text:p>699.5518798828</text:p>
          </table:table-cell>
          <table:table-cell office:value-type="float" office:value="0.01082431">
            <text:p>0.01082431</text:p>
          </table:table-cell>
          <table:table-cell table:number-columns-repeated="4"/>
        </table:table-row>
        <table:table-row table:style-name="ro1">
          <table:table-cell office:value-type="float" office:value="699.671997070313">
            <text:p>699.6719970703</text:p>
          </table:table-cell>
          <table:table-cell office:value-type="float" office:value="-0.001941289">
            <text:p>-0.001941289</text:p>
          </table:table-cell>
          <table:table-cell table:number-columns-repeated="4"/>
        </table:table-row>
        <table:table-row table:style-name="ro1">
          <table:table-cell office:value-type="float" office:value="699.792175292969">
            <text:p>699.792175293</text:p>
          </table:table-cell>
          <table:table-cell office:value-type="float" office:value="-0.003676947">
            <text:p>-0.003676947</text:p>
          </table:table-cell>
          <table:table-cell table:number-columns-repeated="4"/>
        </table:table-row>
        <table:table-row table:style-name="ro1">
          <table:table-cell office:value-type="float" office:value="699.912292480469">
            <text:p>699.9122924805</text:p>
          </table:table-cell>
          <table:table-cell office:value-type="float" office:value="0.02612434">
            <text:p>0.02612434</text:p>
          </table:table-cell>
          <table:table-cell table:number-columns-repeated="4"/>
        </table:table-row>
        <table:table-row table:style-name="ro1">
          <table:table-cell office:value-type="float" office:value="700.032409667969">
            <text:p>700.032409668</text:p>
          </table:table-cell>
          <table:table-cell office:value-type="float" office:value="0.01075441">
            <text:p>0.01075441</text:p>
          </table:table-cell>
          <table:table-cell table:number-columns-repeated="4"/>
        </table:table-row>
        <table:table-row table:style-name="ro1">
          <table:table-cell office:value-type="float" office:value="700.152526855469">
            <text:p>700.1525268555</text:p>
          </table:table-cell>
          <table:table-cell office:value-type="float" office:value="0.0005026435">
            <text:p>0.0005026435</text:p>
          </table:table-cell>
          <table:table-cell table:number-columns-repeated="4"/>
        </table:table-row>
        <table:table-row table:style-name="ro1">
          <table:table-cell office:value-type="float" office:value="700.272705078125">
            <text:p>700.2727050781</text:p>
          </table:table-cell>
          <table:table-cell office:value-type="float" office:value="-0.002692452">
            <text:p>-0.002692452</text:p>
          </table:table-cell>
          <table:table-cell table:number-columns-repeated="4"/>
        </table:table-row>
        <table:table-row table:style-name="ro1">
          <table:table-cell office:value-type="float" office:value="700.392822265625">
            <text:p>700.3928222656</text:p>
          </table:table-cell>
          <table:table-cell office:value-type="float" office:value="0.001883175">
            <text:p>0.001883175</text:p>
          </table:table-cell>
          <table:table-cell table:number-columns-repeated="4"/>
        </table:table-row>
        <table:table-row table:style-name="ro1">
          <table:table-cell office:value-type="float" office:value="700.512939453125">
            <text:p>700.5129394531</text:p>
          </table:table-cell>
          <table:table-cell office:value-type="float" office:value="0.01038859">
            <text:p>0.01038859</text:p>
          </table:table-cell>
          <table:table-cell table:number-columns-repeated="4"/>
        </table:table-row>
        <table:table-row table:style-name="ro1">
          <table:table-cell office:value-type="float" office:value="700.633117675781">
            <text:p>700.6331176758</text:p>
          </table:table-cell>
          <table:table-cell office:value-type="float" office:value="0.0003808994">
            <text:p>0.0003808994</text:p>
          </table:table-cell>
          <table:table-cell table:number-columns-repeated="4"/>
        </table:table-row>
        <table:table-row table:style-name="ro1">
          <table:table-cell office:value-type="float" office:value="700.753234863281">
            <text:p>700.7532348633</text:p>
          </table:table-cell>
          <table:table-cell office:value-type="float" office:value="0.0001683015">
            <text:p>0.0001683015</text:p>
          </table:table-cell>
          <table:table-cell table:number-columns-repeated="4"/>
        </table:table-row>
        <table:table-row table:style-name="ro1">
          <table:table-cell office:value-type="float" office:value="700.873352050781">
            <text:p>700.8733520508</text:p>
          </table:table-cell>
          <table:table-cell office:value-type="float" office:value="-0.007411547">
            <text:p>-0.007411547</text:p>
          </table:table-cell>
          <table:table-cell table:number-columns-repeated="4"/>
        </table:table-row>
        <table:table-row table:style-name="ro1">
          <table:table-cell office:value-type="float" office:value="700.993530273438">
            <text:p>700.9935302734</text:p>
          </table:table-cell>
          <table:table-cell office:value-type="float" office:value="-0.004036697">
            <text:p>-0.004036697</text:p>
          </table:table-cell>
          <table:table-cell table:number-columns-repeated="4"/>
        </table:table-row>
        <table:table-row table:style-name="ro1">
          <table:table-cell office:value-type="float" office:value="701.113647460938">
            <text:p>701.1136474609</text:p>
          </table:table-cell>
          <table:table-cell office:value-type="float" office:value="0.002936625">
            <text:p>0.002936625</text:p>
          </table:table-cell>
          <table:table-cell table:number-columns-repeated="4"/>
        </table:table-row>
        <table:table-row table:style-name="ro1">
          <table:table-cell office:value-type="float" office:value="701.233764648438">
            <text:p>701.2337646484</text:p>
          </table:table-cell>
          <table:table-cell office:value-type="float" office:value="-0.00544906">
            <text:p>-0.00544906</text:p>
          </table:table-cell>
          <table:table-cell table:number-columns-repeated="4"/>
        </table:table-row>
        <table:table-row table:style-name="ro1">
          <table:table-cell office:value-type="float" office:value="701.353942871094">
            <text:p>701.3539428711</text:p>
          </table:table-cell>
          <table:table-cell office:value-type="float" office:value="0.01476594">
            <text:p>0.01476594</text:p>
          </table:table-cell>
          <table:table-cell table:number-columns-repeated="4"/>
        </table:table-row>
        <table:table-row table:style-name="ro1">
          <table:table-cell office:value-type="float" office:value="701.474060058594">
            <text:p>701.4740600586</text:p>
          </table:table-cell>
          <table:table-cell office:value-type="float" office:value="0.005810441">
            <text:p>0.005810441</text:p>
          </table:table-cell>
          <table:table-cell table:number-columns-repeated="4"/>
        </table:table-row>
        <table:table-row table:style-name="ro1">
          <table:table-cell office:value-type="float" office:value="701.594177246094">
            <text:p>701.5941772461</text:p>
          </table:table-cell>
          <table:table-cell office:value-type="float" office:value="-0.005742726">
            <text:p>-0.005742726</text:p>
          </table:table-cell>
          <table:table-cell table:number-columns-repeated="4"/>
        </table:table-row>
        <table:table-row table:style-name="ro1">
          <table:table-cell office:value-type="float" office:value="701.71435546875">
            <text:p>701.7143554688</text:p>
          </table:table-cell>
          <table:table-cell office:value-type="float" office:value="0.004915532">
            <text:p>0.004915532</text:p>
          </table:table-cell>
          <table:table-cell table:number-columns-repeated="4"/>
        </table:table-row>
        <table:table-row table:style-name="ro1">
          <table:table-cell office:value-type="float" office:value="701.83447265625">
            <text:p>701.8344726563</text:p>
          </table:table-cell>
          <table:table-cell office:value-type="float" office:value="-0.01069412">
            <text:p>-0.01069412</text:p>
          </table:table-cell>
          <table:table-cell table:number-columns-repeated="4"/>
        </table:table-row>
        <table:table-row table:style-name="ro1">
          <table:table-cell office:value-type="float" office:value="701.954650878906">
            <text:p>701.9546508789</text:p>
          </table:table-cell>
          <table:table-cell office:value-type="float" office:value="-0.006181581">
            <text:p>-0.006181581</text:p>
          </table:table-cell>
          <table:table-cell table:number-columns-repeated="4"/>
        </table:table-row>
        <table:table-row table:style-name="ro1">
          <table:table-cell office:value-type="float" office:value="702.074768066406">
            <text:p>702.0747680664</text:p>
          </table:table-cell>
          <table:table-cell office:value-type="float" office:value="0.005442209">
            <text:p>0.005442209</text:p>
          </table:table-cell>
          <table:table-cell table:number-columns-repeated="4"/>
        </table:table-row>
        <table:table-row table:style-name="ro1">
          <table:table-cell office:value-type="float" office:value="702.194946289063">
            <text:p>702.1949462891</text:p>
          </table:table-cell>
          <table:table-cell office:value-type="float" office:value="0.01004315">
            <text:p>0.01004315</text:p>
          </table:table-cell>
          <table:table-cell table:number-columns-repeated="4"/>
        </table:table-row>
        <table:table-row table:style-name="ro1">
          <table:table-cell office:value-type="float" office:value="702.315063476563">
            <text:p>702.3150634766</text:p>
          </table:table-cell>
          <table:table-cell office:value-type="float" office:value="-0.006047157">
            <text:p>-0.006047157</text:p>
          </table:table-cell>
          <table:table-cell table:number-columns-repeated="4"/>
        </table:table-row>
        <table:table-row table:style-name="ro1">
          <table:table-cell office:value-type="float" office:value="702.435241699219">
            <text:p>702.4352416992</text:p>
          </table:table-cell>
          <table:table-cell office:value-type="float" office:value="-0.00627084">
            <text:p>-0.00627084</text:p>
          </table:table-cell>
          <table:table-cell table:number-columns-repeated="4"/>
        </table:table-row>
        <table:table-row table:style-name="ro1">
          <table:table-cell office:value-type="float" office:value="702.555358886719">
            <text:p>702.5553588867</text:p>
          </table:table-cell>
          <table:table-cell office:value-type="float" office:value="0.008347129">
            <text:p>0.008347129</text:p>
          </table:table-cell>
          <table:table-cell table:number-columns-repeated="4"/>
        </table:table-row>
        <table:table-row table:style-name="ro1">
          <table:table-cell office:value-type="float" office:value="702.675537109375">
            <text:p>702.6755371094</text:p>
          </table:table-cell>
          <table:table-cell office:value-type="float" office:value="0.01687378">
            <text:p>0.01687378</text:p>
          </table:table-cell>
          <table:table-cell table:number-columns-repeated="4"/>
        </table:table-row>
        <table:table-row table:style-name="ro1">
          <table:table-cell office:value-type="float" office:value="702.795654296875">
            <text:p>702.7956542969</text:p>
          </table:table-cell>
          <table:table-cell office:value-type="float" office:value="-0.002359747">
            <text:p>-0.002359747</text:p>
          </table:table-cell>
          <table:table-cell table:number-columns-repeated="4"/>
        </table:table-row>
        <table:table-row table:style-name="ro1">
          <table:table-cell office:value-type="float" office:value="702.915832519531">
            <text:p>702.9158325195</text:p>
          </table:table-cell>
          <table:table-cell office:value-type="float" office:value="0.0007028703">
            <text:p>0.0007028703</text:p>
          </table:table-cell>
          <table:table-cell table:number-columns-repeated="4"/>
        </table:table-row>
        <table:table-row table:style-name="ro1">
          <table:table-cell office:value-type="float" office:value="703.035949707031">
            <text:p>703.035949707</text:p>
          </table:table-cell>
          <table:table-cell office:value-type="float" office:value="-0.004227722">
            <text:p>-0.004227722</text:p>
          </table:table-cell>
          <table:table-cell table:number-columns-repeated="4"/>
        </table:table-row>
        <table:table-row table:style-name="ro1">
          <table:table-cell office:value-type="float" office:value="703.156127929688">
            <text:p>703.1561279297</text:p>
          </table:table-cell>
          <table:table-cell office:value-type="float" office:value="-0.002464217">
            <text:p>-0.002464217</text:p>
          </table:table-cell>
          <table:table-cell table:number-columns-repeated="4"/>
        </table:table-row>
        <table:table-row table:style-name="ro1">
          <table:table-cell office:value-type="float" office:value="703.276245117188">
            <text:p>703.2762451172</text:p>
          </table:table-cell>
          <table:table-cell office:value-type="float" office:value="-0.003193505">
            <text:p>-0.003193505</text:p>
          </table:table-cell>
          <table:table-cell table:number-columns-repeated="4"/>
        </table:table-row>
        <table:table-row table:style-name="ro1">
          <table:table-cell office:value-type="float" office:value="703.396423339844">
            <text:p>703.3964233398</text:p>
          </table:table-cell>
          <table:table-cell office:value-type="float" office:value="-0.006839217">
            <text:p>-0.006839217</text:p>
          </table:table-cell>
          <table:table-cell table:number-columns-repeated="4"/>
        </table:table-row>
        <table:table-row table:style-name="ro1">
          <table:table-cell office:value-type="float" office:value="703.516540527344">
            <text:p>703.5165405273</text:p>
          </table:table-cell>
          <table:table-cell office:value-type="string">
            <text:p>-7.983681E-05</text:p>
          </table:table-cell>
          <table:table-cell table:number-columns-repeated="4"/>
        </table:table-row>
        <table:table-row table:style-name="ro1">
          <table:table-cell office:value-type="float" office:value="703.63671875">
            <text:p>703.63671875</text:p>
          </table:table-cell>
          <table:table-cell office:value-type="float" office:value="0.0121902">
            <text:p>0.0121902</text:p>
          </table:table-cell>
          <table:table-cell table:number-columns-repeated="4"/>
        </table:table-row>
        <table:table-row table:style-name="ro1">
          <table:table-cell office:value-type="float" office:value="703.756896972656">
            <text:p>703.7568969727</text:p>
          </table:table-cell>
          <table:table-cell office:value-type="float" office:value="-0.0108734">
            <text:p>-0.0108734</text:p>
          </table:table-cell>
          <table:table-cell table:number-columns-repeated="4"/>
        </table:table-row>
        <table:table-row table:style-name="ro1">
          <table:table-cell office:value-type="float" office:value="703.877014160156">
            <text:p>703.8770141602</text:p>
          </table:table-cell>
          <table:table-cell office:value-type="float" office:value="0.006299515">
            <text:p>0.006299515</text:p>
          </table:table-cell>
          <table:table-cell table:number-columns-repeated="4"/>
        </table:table-row>
        <table:table-row table:style-name="ro1">
          <table:table-cell office:value-type="float" office:value="703.997192382813">
            <text:p>703.9971923828</text:p>
          </table:table-cell>
          <table:table-cell office:value-type="float" office:value="-0.00570807">
            <text:p>-0.00570807</text:p>
          </table:table-cell>
          <table:table-cell table:number-columns-repeated="4"/>
        </table:table-row>
        <table:table-row table:style-name="ro1">
          <table:table-cell office:value-type="float" office:value="704.117309570313">
            <text:p>704.1173095703</text:p>
          </table:table-cell>
          <table:table-cell office:value-type="float" office:value="-0.002925327">
            <text:p>-0.002925327</text:p>
          </table:table-cell>
          <table:table-cell table:number-columns-repeated="4"/>
        </table:table-row>
        <table:table-row table:style-name="ro1">
          <table:table-cell office:value-type="float" office:value="704.237487792969">
            <text:p>704.237487793</text:p>
          </table:table-cell>
          <table:table-cell office:value-type="float" office:value="-0.006076985">
            <text:p>-0.006076985</text:p>
          </table:table-cell>
          <table:table-cell table:number-columns-repeated="4"/>
        </table:table-row>
        <table:table-row table:style-name="ro1">
          <table:table-cell office:value-type="float" office:value="704.357666015625">
            <text:p>704.3576660156</text:p>
          </table:table-cell>
          <table:table-cell office:value-type="float" office:value="-0.0070829">
            <text:p>-0.0070829</text:p>
          </table:table-cell>
          <table:table-cell table:number-columns-repeated="4"/>
        </table:table-row>
        <table:table-row table:style-name="ro1">
          <table:table-cell office:value-type="float" office:value="704.477783203125">
            <text:p>704.4777832031</text:p>
          </table:table-cell>
          <table:table-cell office:value-type="float" office:value="0.0102375">
            <text:p>0.0102375</text:p>
          </table:table-cell>
          <table:table-cell table:number-columns-repeated="4"/>
        </table:table-row>
        <table:table-row table:style-name="ro1">
          <table:table-cell office:value-type="float" office:value="704.597961425781">
            <text:p>704.5979614258</text:p>
          </table:table-cell>
          <table:table-cell office:value-type="float" office:value="-0.005591057">
            <text:p>-0.005591057</text:p>
          </table:table-cell>
          <table:table-cell table:number-columns-repeated="4"/>
        </table:table-row>
        <table:table-row table:style-name="ro1">
          <table:table-cell office:value-type="float" office:value="704.718139648438">
            <text:p>704.7181396484</text:p>
          </table:table-cell>
          <table:table-cell office:value-type="float" office:value="-0.008087924">
            <text:p>-0.008087924</text:p>
          </table:table-cell>
          <table:table-cell table:number-columns-repeated="4"/>
        </table:table-row>
        <table:table-row table:style-name="ro1">
          <table:table-cell office:value-type="float" office:value="704.838256835938">
            <text:p>704.8382568359</text:p>
          </table:table-cell>
          <table:table-cell office:value-type="float" office:value="-0.01046689">
            <text:p>-0.01046689</text:p>
          </table:table-cell>
          <table:table-cell table:number-columns-repeated="4"/>
        </table:table-row>
        <table:table-row table:style-name="ro1">
          <table:table-cell office:value-type="float" office:value="704.958435058594">
            <text:p>704.9584350586</text:p>
          </table:table-cell>
          <table:table-cell office:value-type="float" office:value="-0.00924729">
            <text:p>-0.00924729</text:p>
          </table:table-cell>
          <table:table-cell table:number-columns-repeated="4"/>
        </table:table-row>
        <table:table-row table:style-name="ro1">
          <table:table-cell office:value-type="float" office:value="705.07861328125">
            <text:p>705.0786132813</text:p>
          </table:table-cell>
          <table:table-cell office:value-type="float" office:value="0.001135561">
            <text:p>0.001135561</text:p>
          </table:table-cell>
          <table:table-cell table:number-columns-repeated="4"/>
        </table:table-row>
        <table:table-row table:style-name="ro1">
          <table:table-cell office:value-type="float" office:value="705.19873046875">
            <text:p>705.1987304688</text:p>
          </table:table-cell>
          <table:table-cell office:value-type="float" office:value="-0.0001364364">
            <text:p>-0.0001364364</text:p>
          </table:table-cell>
          <table:table-cell table:number-columns-repeated="4"/>
        </table:table-row>
        <table:table-row table:style-name="ro1">
          <table:table-cell office:value-type="float" office:value="705.318908691406">
            <text:p>705.3189086914</text:p>
          </table:table-cell>
          <table:table-cell office:value-type="float" office:value="-0.005343573">
            <text:p>-0.005343573</text:p>
          </table:table-cell>
          <table:table-cell table:number-columns-repeated="4"/>
        </table:table-row>
        <table:table-row table:style-name="ro1">
          <table:table-cell office:value-type="float" office:value="705.439086914063">
            <text:p>705.4390869141</text:p>
          </table:table-cell>
          <table:table-cell office:value-type="float" office:value="0.01091625">
            <text:p>0.01091625</text:p>
          </table:table-cell>
          <table:table-cell table:number-columns-repeated="4"/>
        </table:table-row>
        <table:table-row table:style-name="ro1">
          <table:table-cell office:value-type="float" office:value="705.559265136719">
            <text:p>705.5592651367</text:p>
          </table:table-cell>
          <table:table-cell office:value-type="float" office:value="-0.003003832">
            <text:p>-0.003003832</text:p>
          </table:table-cell>
          <table:table-cell table:number-columns-repeated="4"/>
        </table:table-row>
        <table:table-row table:style-name="ro1">
          <table:table-cell office:value-type="float" office:value="705.679382324219">
            <text:p>705.6793823242</text:p>
          </table:table-cell>
          <table:table-cell office:value-type="float" office:value="0.001551465">
            <text:p>0.001551465</text:p>
          </table:table-cell>
          <table:table-cell table:number-columns-repeated="4"/>
        </table:table-row>
        <table:table-row table:style-name="ro1">
          <table:table-cell office:value-type="float" office:value="705.799560546875">
            <text:p>705.7995605469</text:p>
          </table:table-cell>
          <table:table-cell office:value-type="float" office:value="0.01332777">
            <text:p>0.01332777</text:p>
          </table:table-cell>
          <table:table-cell table:number-columns-repeated="4"/>
        </table:table-row>
        <table:table-row table:style-name="ro1">
          <table:table-cell office:value-type="float" office:value="705.919738769531">
            <text:p>705.9197387695</text:p>
          </table:table-cell>
          <table:table-cell office:value-type="float" office:value="-0.003367312">
            <text:p>-0.003367312</text:p>
          </table:table-cell>
          <table:table-cell table:number-columns-repeated="4"/>
        </table:table-row>
        <table:table-row table:style-name="ro1">
          <table:table-cell office:value-type="float" office:value="706.039916992188">
            <text:p>706.0399169922</text:p>
          </table:table-cell>
          <table:table-cell office:value-type="float" office:value="-0.003328738">
            <text:p>-0.003328738</text:p>
          </table:table-cell>
          <table:table-cell table:number-columns-repeated="4"/>
        </table:table-row>
        <table:table-row table:style-name="ro1">
          <table:table-cell office:value-type="float" office:value="706.160034179688">
            <text:p>706.1600341797</text:p>
          </table:table-cell>
          <table:table-cell office:value-type="float" office:value="0.01957286">
            <text:p>0.01957286</text:p>
          </table:table-cell>
          <table:table-cell table:number-columns-repeated="4"/>
        </table:table-row>
        <table:table-row table:style-name="ro1">
          <table:table-cell office:value-type="float" office:value="706.280212402344">
            <text:p>706.2802124023</text:p>
          </table:table-cell>
          <table:table-cell office:value-type="float" office:value="-0.001863217">
            <text:p>-0.001863217</text:p>
          </table:table-cell>
          <table:table-cell table:number-columns-repeated="4"/>
        </table:table-row>
        <table:table-row table:style-name="ro1">
          <table:table-cell office:value-type="float" office:value="706.400390625">
            <text:p>706.400390625</text:p>
          </table:table-cell>
          <table:table-cell office:value-type="float" office:value="0.002901664">
            <text:p>0.002901664</text:p>
          </table:table-cell>
          <table:table-cell table:number-columns-repeated="4"/>
        </table:table-row>
        <table:table-row table:style-name="ro1">
          <table:table-cell office:value-type="float" office:value="706.520568847656">
            <text:p>706.5205688477</text:p>
          </table:table-cell>
          <table:table-cell office:value-type="float" office:value="0.00458804">
            <text:p>0.00458804</text:p>
          </table:table-cell>
          <table:table-cell table:number-columns-repeated="4"/>
        </table:table-row>
        <table:table-row table:style-name="ro1">
          <table:table-cell office:value-type="float" office:value="706.640747070313">
            <text:p>706.6407470703</text:p>
          </table:table-cell>
          <table:table-cell office:value-type="float" office:value="-0.005098816">
            <text:p>-0.005098816</text:p>
          </table:table-cell>
          <table:table-cell table:number-columns-repeated="4"/>
        </table:table-row>
        <table:table-row table:style-name="ro1">
          <table:table-cell office:value-type="float" office:value="706.760925292969">
            <text:p>706.760925293</text:p>
          </table:table-cell>
          <table:table-cell office:value-type="float" office:value="0.008174012">
            <text:p>0.008174012</text:p>
          </table:table-cell>
          <table:table-cell table:number-columns-repeated="4"/>
        </table:table-row>
        <table:table-row table:style-name="ro1">
          <table:table-cell office:value-type="float" office:value="706.881042480469">
            <text:p>706.8810424805</text:p>
          </table:table-cell>
          <table:table-cell office:value-type="string">
            <text:p>3.409636E-05</text:p>
          </table:table-cell>
          <table:table-cell table:number-columns-repeated="4"/>
        </table:table-row>
        <table:table-row table:style-name="ro1">
          <table:table-cell office:value-type="float" office:value="707.001220703125">
            <text:p>707.0012207031</text:p>
          </table:table-cell>
          <table:table-cell office:value-type="float" office:value="-0.009529613">
            <text:p>-0.009529613</text:p>
          </table:table-cell>
          <table:table-cell table:number-columns-repeated="4"/>
        </table:table-row>
        <table:table-row table:style-name="ro1">
          <table:table-cell office:value-type="float" office:value="707.121398925781">
            <text:p>707.1213989258</text:p>
          </table:table-cell>
          <table:table-cell office:value-type="float" office:value="-0.01136013">
            <text:p>-0.01136013</text:p>
          </table:table-cell>
          <table:table-cell table:number-columns-repeated="4"/>
        </table:table-row>
        <table:table-row table:style-name="ro1">
          <table:table-cell office:value-type="float" office:value="707.241577148438">
            <text:p>707.2415771484</text:p>
          </table:table-cell>
          <table:table-cell office:value-type="float" office:value="0.00187173">
            <text:p>0.00187173</text:p>
          </table:table-cell>
          <table:table-cell table:number-columns-repeated="4"/>
        </table:table-row>
        <table:table-row table:style-name="ro1">
          <table:table-cell office:value-type="float" office:value="707.361755371094">
            <text:p>707.3617553711</text:p>
          </table:table-cell>
          <table:table-cell office:value-type="float" office:value="0.003579202">
            <text:p>0.003579202</text:p>
          </table:table-cell>
          <table:table-cell table:number-columns-repeated="4"/>
        </table:table-row>
        <table:table-row table:style-name="ro1">
          <table:table-cell office:value-type="float" office:value="707.48193359375">
            <text:p>707.4819335938</text:p>
          </table:table-cell>
          <table:table-cell office:value-type="float" office:value="0.003913992">
            <text:p>0.003913992</text:p>
          </table:table-cell>
          <table:table-cell table:number-columns-repeated="4"/>
        </table:table-row>
        <table:table-row table:style-name="ro1">
          <table:table-cell office:value-type="float" office:value="707.602111816406">
            <text:p>707.6021118164</text:p>
          </table:table-cell>
          <table:table-cell office:value-type="float" office:value="-0.007954606">
            <text:p>-0.007954606</text:p>
          </table:table-cell>
          <table:table-cell table:number-columns-repeated="4"/>
        </table:table-row>
        <table:table-row table:style-name="ro1">
          <table:table-cell office:value-type="float" office:value="707.722290039063">
            <text:p>707.7222900391</text:p>
          </table:table-cell>
          <table:table-cell office:value-type="float" office:value="0.001905392">
            <text:p>0.001905392</text:p>
          </table:table-cell>
          <table:table-cell table:number-columns-repeated="4"/>
        </table:table-row>
        <table:table-row table:style-name="ro1">
          <table:table-cell office:value-type="float" office:value="707.842468261719">
            <text:p>707.8424682617</text:p>
          </table:table-cell>
          <table:table-cell office:value-type="float" office:value="0.003905534">
            <text:p>0.003905534</text:p>
          </table:table-cell>
          <table:table-cell table:number-columns-repeated="4"/>
        </table:table-row>
        <table:table-row table:style-name="ro1">
          <table:table-cell office:value-type="float" office:value="707.962646484375">
            <text:p>707.9626464844</text:p>
          </table:table-cell>
          <table:table-cell office:value-type="float" office:value="0.008043281">
            <text:p>0.008043281</text:p>
          </table:table-cell>
          <table:table-cell table:number-columns-repeated="4"/>
        </table:table-row>
        <table:table-row table:style-name="ro1">
          <table:table-cell office:value-type="float" office:value="708.082763671875">
            <text:p>708.0827636719</text:p>
          </table:table-cell>
          <table:table-cell office:value-type="float" office:value="-0.003356783">
            <text:p>-0.003356783</text:p>
          </table:table-cell>
          <table:table-cell table:number-columns-repeated="4"/>
        </table:table-row>
        <table:table-row table:style-name="ro1">
          <table:table-cell office:value-type="float" office:value="708.202941894531">
            <text:p>708.2029418945</text:p>
          </table:table-cell>
          <table:table-cell office:value-type="float" office:value="0.002195793">
            <text:p>0.002195793</text:p>
          </table:table-cell>
          <table:table-cell table:number-columns-repeated="4"/>
        </table:table-row>
        <table:table-row table:style-name="ro1">
          <table:table-cell office:value-type="float" office:value="708.323120117188">
            <text:p>708.3231201172</text:p>
          </table:table-cell>
          <table:table-cell office:value-type="float" office:value="0.003917172">
            <text:p>0.003917172</text:p>
          </table:table-cell>
          <table:table-cell table:number-columns-repeated="4"/>
        </table:table-row>
        <table:table-row table:style-name="ro1">
          <table:table-cell office:value-type="float" office:value="708.443298339844">
            <text:p>708.4432983398</text:p>
          </table:table-cell>
          <table:table-cell office:value-type="float" office:value="-0.004943904">
            <text:p>-0.004943904</text:p>
          </table:table-cell>
          <table:table-cell table:number-columns-repeated="4"/>
        </table:table-row>
        <table:table-row table:style-name="ro1">
          <table:table-cell office:value-type="float" office:value="708.5634765625">
            <text:p>708.5634765625</text:p>
          </table:table-cell>
          <table:table-cell office:value-type="float" office:value="-0.003561051">
            <text:p>-0.003561051</text:p>
          </table:table-cell>
          <table:table-cell table:number-columns-repeated="4"/>
        </table:table-row>
        <table:table-row table:style-name="ro1">
          <table:table-cell office:value-type="float" office:value="708.683654785156">
            <text:p>708.6836547852</text:p>
          </table:table-cell>
          <table:table-cell office:value-type="float" office:value="-0.004727773">
            <text:p>-0.004727773</text:p>
          </table:table-cell>
          <table:table-cell table:number-columns-repeated="4"/>
        </table:table-row>
        <table:table-row table:style-name="ro1">
          <table:table-cell office:value-type="float" office:value="708.803833007813">
            <text:p>708.8038330078</text:p>
          </table:table-cell>
          <table:table-cell office:value-type="float" office:value="0.01205756">
            <text:p>0.01205756</text:p>
          </table:table-cell>
          <table:table-cell table:number-columns-repeated="4"/>
        </table:table-row>
        <table:table-row table:style-name="ro1">
          <table:table-cell office:value-type="float" office:value="708.924011230469">
            <text:p>708.9240112305</text:p>
          </table:table-cell>
          <table:table-cell office:value-type="float" office:value="-0.01092023">
            <text:p>-0.01092023</text:p>
          </table:table-cell>
          <table:table-cell table:number-columns-repeated="4"/>
        </table:table-row>
        <table:table-row table:style-name="ro1">
          <table:table-cell office:value-type="float" office:value="709.044189453125">
            <text:p>709.0441894531</text:p>
          </table:table-cell>
          <table:table-cell office:value-type="float" office:value="-0.002906256">
            <text:p>-0.002906256</text:p>
          </table:table-cell>
          <table:table-cell table:number-columns-repeated="4"/>
        </table:table-row>
        <table:table-row table:style-name="ro1">
          <table:table-cell office:value-type="float" office:value="709.164367675781">
            <text:p>709.1643676758</text:p>
          </table:table-cell>
          <table:table-cell office:value-type="float" office:value="0.001296105">
            <text:p>0.001296105</text:p>
          </table:table-cell>
          <table:table-cell table:number-columns-repeated="4"/>
        </table:table-row>
        <table:table-row table:style-name="ro1">
          <table:table-cell office:value-type="float" office:value="709.284545898438">
            <text:p>709.2845458984</text:p>
          </table:table-cell>
          <table:table-cell office:value-type="float" office:value="0.001333781">
            <text:p>0.001333781</text:p>
          </table:table-cell>
          <table:table-cell table:number-columns-repeated="4"/>
        </table:table-row>
        <table:table-row table:style-name="ro1">
          <table:table-cell office:value-type="float" office:value="709.404724121094">
            <text:p>709.4047241211</text:p>
          </table:table-cell>
          <table:table-cell office:value-type="float" office:value="0.0001736891">
            <text:p>0.0001736891</text:p>
          </table:table-cell>
          <table:table-cell table:number-columns-repeated="4"/>
        </table:table-row>
        <table:table-row table:style-name="ro1">
          <table:table-cell office:value-type="float" office:value="709.52490234375">
            <text:p>709.5249023438</text:p>
          </table:table-cell>
          <table:table-cell office:value-type="float" office:value="-0.0062666">
            <text:p>-0.0062666</text:p>
          </table:table-cell>
          <table:table-cell table:number-columns-repeated="4"/>
        </table:table-row>
        <table:table-row table:style-name="ro1">
          <table:table-cell office:value-type="float" office:value="709.645141601563">
            <text:p>709.6451416016</text:p>
          </table:table-cell>
          <table:table-cell office:value-type="float" office:value="-0.007109209">
            <text:p>-0.007109209</text:p>
          </table:table-cell>
          <table:table-cell table:number-columns-repeated="4"/>
        </table:table-row>
        <table:table-row table:style-name="ro1">
          <table:table-cell office:value-type="float" office:value="709.765319824219">
            <text:p>709.7653198242</text:p>
          </table:table-cell>
          <table:table-cell office:value-type="float" office:value="0.001294479">
            <text:p>0.001294479</text:p>
          </table:table-cell>
          <table:table-cell table:number-columns-repeated="4"/>
        </table:table-row>
        <table:table-row table:style-name="ro1">
          <table:table-cell office:value-type="float" office:value="709.885498046875">
            <text:p>709.8854980469</text:p>
          </table:table-cell>
          <table:table-cell office:value-type="float" office:value="-0.002718847">
            <text:p>-0.002718847</text:p>
          </table:table-cell>
          <table:table-cell table:number-columns-repeated="4"/>
        </table:table-row>
        <table:table-row table:style-name="ro1">
          <table:table-cell office:value-type="float" office:value="710.005676269531">
            <text:p>710.0056762695</text:p>
          </table:table-cell>
          <table:table-cell office:value-type="float" office:value="-0.00243435">
            <text:p>-0.00243435</text:p>
          </table:table-cell>
          <table:table-cell table:number-columns-repeated="4"/>
        </table:table-row>
        <table:table-row table:style-name="ro1">
          <table:table-cell office:value-type="float" office:value="710.125854492188">
            <text:p>710.1258544922</text:p>
          </table:table-cell>
          <table:table-cell office:value-type="float" office:value="0.00612215">
            <text:p>0.00612215</text:p>
          </table:table-cell>
          <table:table-cell table:number-columns-repeated="4"/>
        </table:table-row>
        <table:table-row table:style-name="ro1">
          <table:table-cell office:value-type="float" office:value="710.246032714844">
            <text:p>710.2460327148</text:p>
          </table:table-cell>
          <table:table-cell office:value-type="string">
            <text:p>-3.929327E-05</text:p>
          </table:table-cell>
          <table:table-cell table:number-columns-repeated="4"/>
        </table:table-row>
        <table:table-row table:style-name="ro1">
          <table:table-cell office:value-type="float" office:value="710.3662109375">
            <text:p>710.3662109375</text:p>
          </table:table-cell>
          <table:table-cell office:value-type="float" office:value="-0.009252496">
            <text:p>-0.009252496</text:p>
          </table:table-cell>
          <table:table-cell table:number-columns-repeated="4"/>
        </table:table-row>
        <table:table-row table:style-name="ro1">
          <table:table-cell office:value-type="float" office:value="710.486389160156">
            <text:p>710.4863891602</text:p>
          </table:table-cell>
          <table:table-cell office:value-type="float" office:value="0.008872642">
            <text:p>0.008872642</text:p>
          </table:table-cell>
          <table:table-cell table:number-columns-repeated="4"/>
        </table:table-row>
        <table:table-row table:style-name="ro1">
          <table:table-cell office:value-type="float" office:value="710.606567382813">
            <text:p>710.6065673828</text:p>
          </table:table-cell>
          <table:table-cell office:value-type="float" office:value="-0.002537293">
            <text:p>-0.002537293</text:p>
          </table:table-cell>
          <table:table-cell table:number-columns-repeated="4"/>
        </table:table-row>
        <table:table-row table:style-name="ro1">
          <table:table-cell office:value-type="float" office:value="710.726745605469">
            <text:p>710.7267456055</text:p>
          </table:table-cell>
          <table:table-cell office:value-type="float" office:value="-0.008040189">
            <text:p>-0.008040189</text:p>
          </table:table-cell>
          <table:table-cell table:number-columns-repeated="4"/>
        </table:table-row>
        <table:table-row table:style-name="ro1">
          <table:table-cell office:value-type="float" office:value="710.846984863281">
            <text:p>710.8469848633</text:p>
          </table:table-cell>
          <table:table-cell office:value-type="float" office:value="0.00132561">
            <text:p>0.00132561</text:p>
          </table:table-cell>
          <table:table-cell table:number-columns-repeated="4"/>
        </table:table-row>
        <table:table-row table:style-name="ro1">
          <table:table-cell office:value-type="float" office:value="710.967163085938">
            <text:p>710.9671630859</text:p>
          </table:table-cell>
          <table:table-cell office:value-type="float" office:value="-0.001285629">
            <text:p>-0.001285629</text:p>
          </table:table-cell>
          <table:table-cell table:number-columns-repeated="4"/>
        </table:table-row>
        <table:table-row table:style-name="ro1">
          <table:table-cell office:value-type="float" office:value="711.087341308594">
            <text:p>711.0873413086</text:p>
          </table:table-cell>
          <table:table-cell office:value-type="float" office:value="-0.0001261152">
            <text:p>-0.0001261152</text:p>
          </table:table-cell>
          <table:table-cell table:number-columns-repeated="4"/>
        </table:table-row>
        <table:table-row table:style-name="ro1">
          <table:table-cell office:value-type="float" office:value="711.20751953125">
            <text:p>711.2075195313</text:p>
          </table:table-cell>
          <table:table-cell office:value-type="float" office:value="-0.01058645">
            <text:p>-0.01058645</text:p>
          </table:table-cell>
          <table:table-cell table:number-columns-repeated="4"/>
        </table:table-row>
        <table:table-row table:style-name="ro1">
          <table:table-cell office:value-type="float" office:value="711.327697753906">
            <text:p>711.3276977539</text:p>
          </table:table-cell>
          <table:table-cell office:value-type="float" office:value="-0.009084742">
            <text:p>-0.009084742</text:p>
          </table:table-cell>
          <table:table-cell table:number-columns-repeated="4"/>
        </table:table-row>
        <table:table-row table:style-name="ro1">
          <table:table-cell office:value-type="float" office:value="711.447875976563">
            <text:p>711.4478759766</text:p>
          </table:table-cell>
          <table:table-cell office:value-type="float" office:value="0.00297193">
            <text:p>0.00297193</text:p>
          </table:table-cell>
          <table:table-cell table:number-columns-repeated="4"/>
        </table:table-row>
        <table:table-row table:style-name="ro1">
          <table:table-cell office:value-type="float" office:value="711.568115234375">
            <text:p>711.5681152344</text:p>
          </table:table-cell>
          <table:table-cell office:value-type="float" office:value="-0.004686319">
            <text:p>-0.004686319</text:p>
          </table:table-cell>
          <table:table-cell table:number-columns-repeated="4"/>
        </table:table-row>
        <table:table-row table:style-name="ro1">
          <table:table-cell office:value-type="float" office:value="711.688293457031">
            <text:p>711.688293457</text:p>
          </table:table-cell>
          <table:table-cell office:value-type="float" office:value="0.01308344">
            <text:p>0.01308344</text:p>
          </table:table-cell>
          <table:table-cell table:number-columns-repeated="4"/>
        </table:table-row>
        <table:table-row table:style-name="ro1">
          <table:table-cell office:value-type="float" office:value="711.808471679688">
            <text:p>711.8084716797</text:p>
          </table:table-cell>
          <table:table-cell office:value-type="float" office:value="-0.009604197">
            <text:p>-0.009604197</text:p>
          </table:table-cell>
          <table:table-cell table:number-columns-repeated="4"/>
        </table:table-row>
        <table:table-row table:style-name="ro1">
          <table:table-cell office:value-type="float" office:value="711.928649902344">
            <text:p>711.9286499023</text:p>
          </table:table-cell>
          <table:table-cell office:value-type="float" office:value="-0.004858013">
            <text:p>-0.004858013</text:p>
          </table:table-cell>
          <table:table-cell table:number-columns-repeated="4"/>
        </table:table-row>
        <table:table-row table:style-name="ro1">
          <table:table-cell office:value-type="float" office:value="712.048889160156">
            <text:p>712.0488891602</text:p>
          </table:table-cell>
          <table:table-cell office:value-type="float" office:value="-0.001078805">
            <text:p>-0.001078805</text:p>
          </table:table-cell>
          <table:table-cell table:number-columns-repeated="4"/>
        </table:table-row>
        <table:table-row table:style-name="ro1">
          <table:table-cell office:value-type="float" office:value="712.169067382813">
            <text:p>712.1690673828</text:p>
          </table:table-cell>
          <table:table-cell office:value-type="float" office:value="0.007738488">
            <text:p>0.007738488</text:p>
          </table:table-cell>
          <table:table-cell table:number-columns-repeated="4"/>
        </table:table-row>
        <table:table-row table:style-name="ro1">
          <table:table-cell office:value-type="float" office:value="712.289245605469">
            <text:p>712.2892456055</text:p>
          </table:table-cell>
          <table:table-cell office:value-type="float" office:value="0.003944362">
            <text:p>0.003944362</text:p>
          </table:table-cell>
          <table:table-cell table:number-columns-repeated="4"/>
        </table:table-row>
        <table:table-row table:style-name="ro1">
          <table:table-cell office:value-type="float" office:value="712.409423828125">
            <text:p>712.4094238281</text:p>
          </table:table-cell>
          <table:table-cell office:value-type="float" office:value="-0.007865828">
            <text:p>-0.007865828</text:p>
          </table:table-cell>
          <table:table-cell table:number-columns-repeated="4"/>
        </table:table-row>
        <table:table-row table:style-name="ro1">
          <table:table-cell office:value-type="float" office:value="712.529663085938">
            <text:p>712.5296630859</text:p>
          </table:table-cell>
          <table:table-cell office:value-type="float" office:value="0.007516222">
            <text:p>0.007516222</text:p>
          </table:table-cell>
          <table:table-cell table:number-columns-repeated="4"/>
        </table:table-row>
        <table:table-row table:style-name="ro1">
          <table:table-cell office:value-type="float" office:value="712.649841308594">
            <text:p>712.6498413086</text:p>
          </table:table-cell>
          <table:table-cell office:value-type="float" office:value="-0.006328824">
            <text:p>-0.006328824</text:p>
          </table:table-cell>
          <table:table-cell table:number-columns-repeated="4"/>
        </table:table-row>
        <table:table-row table:style-name="ro1">
          <table:table-cell office:value-type="float" office:value="712.77001953125">
            <text:p>712.7700195313</text:p>
          </table:table-cell>
          <table:table-cell office:value-type="float" office:value="-0.01082599">
            <text:p>-0.01082599</text:p>
          </table:table-cell>
          <table:table-cell table:number-columns-repeated="4"/>
        </table:table-row>
        <table:table-row table:style-name="ro1">
          <table:table-cell office:value-type="float" office:value="712.890197753906">
            <text:p>712.8901977539</text:p>
          </table:table-cell>
          <table:table-cell office:value-type="float" office:value="-0.005296331">
            <text:p>-0.005296331</text:p>
          </table:table-cell>
          <table:table-cell table:number-columns-repeated="4"/>
        </table:table-row>
        <table:table-row table:style-name="ro1">
          <table:table-cell office:value-type="float" office:value="713.010437011719">
            <text:p>713.0104370117</text:p>
          </table:table-cell>
          <table:table-cell office:value-type="float" office:value="0.01814304">
            <text:p>0.01814304</text:p>
          </table:table-cell>
          <table:table-cell table:number-columns-repeated="4"/>
        </table:table-row>
        <table:table-row table:style-name="ro1">
          <table:table-cell office:value-type="float" office:value="713.130615234375">
            <text:p>713.1306152344</text:p>
          </table:table-cell>
          <table:table-cell office:value-type="float" office:value="0.01715759">
            <text:p>0.01715759</text:p>
          </table:table-cell>
          <table:table-cell table:number-columns-repeated="4"/>
        </table:table-row>
        <table:table-row table:style-name="ro1">
          <table:table-cell office:value-type="float" office:value="713.250793457031">
            <text:p>713.250793457</text:p>
          </table:table-cell>
          <table:table-cell office:value-type="float" office:value="0.01629872">
            <text:p>0.01629872</text:p>
          </table:table-cell>
          <table:table-cell table:number-columns-repeated="4"/>
        </table:table-row>
        <table:table-row table:style-name="ro1">
          <table:table-cell office:value-type="float" office:value="713.371032714844">
            <text:p>713.3710327148</text:p>
          </table:table-cell>
          <table:table-cell office:value-type="float" office:value="-0.01148183">
            <text:p>-0.01148183</text:p>
          </table:table-cell>
          <table:table-cell table:number-columns-repeated="4"/>
        </table:table-row>
        <table:table-row table:style-name="ro1">
          <table:table-cell office:value-type="float" office:value="713.4912109375">
            <text:p>713.4912109375</text:p>
          </table:table-cell>
          <table:table-cell office:value-type="float" office:value="-0.00125294">
            <text:p>-0.00125294</text:p>
          </table:table-cell>
          <table:table-cell table:number-columns-repeated="4"/>
        </table:table-row>
        <table:table-row table:style-name="ro1">
          <table:table-cell office:value-type="float" office:value="713.611389160156">
            <text:p>713.6113891602</text:p>
          </table:table-cell>
          <table:table-cell office:value-type="float" office:value="0.003443052">
            <text:p>0.003443052</text:p>
          </table:table-cell>
          <table:table-cell table:number-columns-repeated="4"/>
        </table:table-row>
        <table:table-row table:style-name="ro1">
          <table:table-cell office:value-type="float" office:value="713.731628417969">
            <text:p>713.731628418</text:p>
          </table:table-cell>
          <table:table-cell office:value-type="float" office:value="0.003892601">
            <text:p>0.003892601</text:p>
          </table:table-cell>
          <table:table-cell table:number-columns-repeated="4"/>
        </table:table-row>
        <table:table-row table:style-name="ro1">
          <table:table-cell office:value-type="float" office:value="713.851806640625">
            <text:p>713.8518066406</text:p>
          </table:table-cell>
          <table:table-cell office:value-type="float" office:value="-0.008719914">
            <text:p>-0.008719914</text:p>
          </table:table-cell>
          <table:table-cell table:number-columns-repeated="4"/>
        </table:table-row>
        <table:table-row table:style-name="ro1">
          <table:table-cell office:value-type="float" office:value="713.971984863281">
            <text:p>713.9719848633</text:p>
          </table:table-cell>
          <table:table-cell office:value-type="float" office:value="-0.0008898601">
            <text:p>-0.0008898601</text:p>
          </table:table-cell>
          <table:table-cell table:number-columns-repeated="4"/>
        </table:table-row>
        <table:table-row table:style-name="ro1">
          <table:table-cell office:value-type="float" office:value="714.092224121094">
            <text:p>714.0922241211</text:p>
          </table:table-cell>
          <table:table-cell office:value-type="float" office:value="-0.0120066">
            <text:p>-0.0120066</text:p>
          </table:table-cell>
          <table:table-cell table:number-columns-repeated="4"/>
        </table:table-row>
        <table:table-row table:style-name="ro1">
          <table:table-cell office:value-type="float" office:value="714.21240234375">
            <text:p>714.2124023438</text:p>
          </table:table-cell>
          <table:table-cell office:value-type="float" office:value="0.009651252">
            <text:p>0.009651252</text:p>
          </table:table-cell>
          <table:table-cell table:number-columns-repeated="4"/>
        </table:table-row>
        <table:table-row table:style-name="ro1">
          <table:table-cell office:value-type="float" office:value="714.332580566406">
            <text:p>714.3325805664</text:p>
          </table:table-cell>
          <table:table-cell office:value-type="float" office:value="0.00432006">
            <text:p>0.00432006</text:p>
          </table:table-cell>
          <table:table-cell table:number-columns-repeated="4"/>
        </table:table-row>
        <table:table-row table:style-name="ro1">
          <table:table-cell office:value-type="float" office:value="714.452819824219">
            <text:p>714.4528198242</text:p>
          </table:table-cell>
          <table:table-cell office:value-type="float" office:value="-0.0008529884">
            <text:p>-0.0008529884</text:p>
          </table:table-cell>
          <table:table-cell table:number-columns-repeated="4"/>
        </table:table-row>
        <table:table-row table:style-name="ro1">
          <table:table-cell office:value-type="float" office:value="714.572998046875">
            <text:p>714.5729980469</text:p>
          </table:table-cell>
          <table:table-cell office:value-type="float" office:value="0.004649546">
            <text:p>0.004649546</text:p>
          </table:table-cell>
          <table:table-cell table:number-columns-repeated="4"/>
        </table:table-row>
        <table:table-row table:style-name="ro1">
          <table:table-cell office:value-type="float" office:value="714.693237304688">
            <text:p>714.6932373047</text:p>
          </table:table-cell>
          <table:table-cell office:value-type="float" office:value="0.01396362">
            <text:p>0.01396362</text:p>
          </table:table-cell>
          <table:table-cell table:number-columns-repeated="4"/>
        </table:table-row>
        <table:table-row table:style-name="ro1">
          <table:table-cell office:value-type="float" office:value="714.813415527344">
            <text:p>714.8134155273</text:p>
          </table:table-cell>
          <table:table-cell office:value-type="float" office:value="-0.004023918">
            <text:p>-0.004023918</text:p>
          </table:table-cell>
          <table:table-cell table:number-columns-repeated="4"/>
        </table:table-row>
        <table:table-row table:style-name="ro1">
          <table:table-cell office:value-type="float" office:value="714.93359375">
            <text:p>714.93359375</text:p>
          </table:table-cell>
          <table:table-cell office:value-type="float" office:value="0.004096895">
            <text:p>0.004096895</text:p>
          </table:table-cell>
          <table:table-cell table:number-columns-repeated="4"/>
        </table:table-row>
        <table:table-row table:style-name="ro1">
          <table:table-cell office:value-type="float" office:value="715.053833007813">
            <text:p>715.0538330078</text:p>
          </table:table-cell>
          <table:table-cell office:value-type="float" office:value="0.002407159">
            <text:p>0.002407159</text:p>
          </table:table-cell>
          <table:table-cell table:number-columns-repeated="4"/>
        </table:table-row>
        <table:table-row table:style-name="ro1">
          <table:table-cell office:value-type="float" office:value="715.174011230469">
            <text:p>715.1740112305</text:p>
          </table:table-cell>
          <table:table-cell office:value-type="float" office:value="0.003598304">
            <text:p>0.003598304</text:p>
          </table:table-cell>
          <table:table-cell table:number-columns-repeated="4"/>
        </table:table-row>
        <table:table-row table:style-name="ro1">
          <table:table-cell office:value-type="float" office:value="715.294250488281">
            <text:p>715.2942504883</text:p>
          </table:table-cell>
          <table:table-cell office:value-type="float" office:value="-0.01066207">
            <text:p>-0.01066207</text:p>
          </table:table-cell>
          <table:table-cell table:number-columns-repeated="4"/>
        </table:table-row>
        <table:table-row table:style-name="ro1">
          <table:table-cell office:value-type="float" office:value="715.414428710938">
            <text:p>715.4144287109</text:p>
          </table:table-cell>
          <table:table-cell office:value-type="float" office:value="-0.00429156">
            <text:p>-0.00429156</text:p>
          </table:table-cell>
          <table:table-cell table:number-columns-repeated="4"/>
        </table:table-row>
        <table:table-row table:style-name="ro1">
          <table:table-cell office:value-type="float" office:value="715.53466796875">
            <text:p>715.5346679688</text:p>
          </table:table-cell>
          <table:table-cell office:value-type="float" office:value="-0.0001738334">
            <text:p>-0.0001738334</text:p>
          </table:table-cell>
          <table:table-cell table:number-columns-repeated="4"/>
        </table:table-row>
        <table:table-row table:style-name="ro1">
          <table:table-cell office:value-type="float" office:value="715.654846191406">
            <text:p>715.6548461914</text:p>
          </table:table-cell>
          <table:table-cell office:value-type="float" office:value="-0.008384756">
            <text:p>-0.008384756</text:p>
          </table:table-cell>
          <table:table-cell table:number-columns-repeated="4"/>
        </table:table-row>
        <table:table-row table:style-name="ro1">
          <table:table-cell office:value-type="float" office:value="715.775024414063">
            <text:p>715.7750244141</text:p>
          </table:table-cell>
          <table:table-cell office:value-type="float" office:value="0.001756823">
            <text:p>0.001756823</text:p>
          </table:table-cell>
          <table:table-cell table:number-columns-repeated="4"/>
        </table:table-row>
        <table:table-row table:style-name="ro1">
          <table:table-cell office:value-type="float" office:value="715.895263671875">
            <text:p>715.8952636719</text:p>
          </table:table-cell>
          <table:table-cell office:value-type="float" office:value="-0.003128252">
            <text:p>-0.003128252</text:p>
          </table:table-cell>
          <table:table-cell table:number-columns-repeated="4"/>
        </table:table-row>
        <table:table-row table:style-name="ro1">
          <table:table-cell office:value-type="float" office:value="716.015441894531">
            <text:p>716.0154418945</text:p>
          </table:table-cell>
          <table:table-cell office:value-type="float" office:value="-0.006835237">
            <text:p>-0.006835237</text:p>
          </table:table-cell>
          <table:table-cell table:number-columns-repeated="4"/>
        </table:table-row>
        <table:table-row table:style-name="ro1">
          <table:table-cell office:value-type="float" office:value="716.135681152344">
            <text:p>716.1356811523</text:p>
          </table:table-cell>
          <table:table-cell office:value-type="float" office:value="-0.00159474">
            <text:p>-0.00159474</text:p>
          </table:table-cell>
          <table:table-cell table:number-columns-repeated="4"/>
        </table:table-row>
        <table:table-row table:style-name="ro1">
          <table:table-cell office:value-type="float" office:value="716.255859375">
            <text:p>716.255859375</text:p>
          </table:table-cell>
          <table:table-cell office:value-type="float" office:value="-0.009772574">
            <text:p>-0.009772574</text:p>
          </table:table-cell>
          <table:table-cell table:number-columns-repeated="4"/>
        </table:table-row>
        <table:table-row table:style-name="ro1">
          <table:table-cell office:value-type="float" office:value="716.376098632813">
            <text:p>716.3760986328</text:p>
          </table:table-cell>
          <table:table-cell office:value-type="float" office:value="-0.01156753">
            <text:p>-0.01156753</text:p>
          </table:table-cell>
          <table:table-cell table:number-columns-repeated="4"/>
        </table:table-row>
        <table:table-row table:style-name="ro1">
          <table:table-cell office:value-type="float" office:value="716.496276855469">
            <text:p>716.4962768555</text:p>
          </table:table-cell>
          <table:table-cell office:value-type="float" office:value="0.004767626">
            <text:p>0.004767626</text:p>
          </table:table-cell>
          <table:table-cell table:number-columns-repeated="4"/>
        </table:table-row>
        <table:table-row table:style-name="ro1">
          <table:table-cell office:value-type="float" office:value="716.616516113281">
            <text:p>716.6165161133</text:p>
          </table:table-cell>
          <table:table-cell office:value-type="float" office:value="0.0008031724">
            <text:p>0.0008031724</text:p>
          </table:table-cell>
          <table:table-cell table:number-columns-repeated="4"/>
        </table:table-row>
        <table:table-row table:style-name="ro1">
          <table:table-cell office:value-type="float" office:value="716.736694335938">
            <text:p>716.7366943359</text:p>
          </table:table-cell>
          <table:table-cell office:value-type="float" office:value="0.0002237484">
            <text:p>0.0002237484</text:p>
          </table:table-cell>
          <table:table-cell table:number-columns-repeated="4"/>
        </table:table-row>
        <table:table-row table:style-name="ro1">
          <table:table-cell office:value-type="float" office:value="716.85693359375">
            <text:p>716.8569335938</text:p>
          </table:table-cell>
          <table:table-cell office:value-type="float" office:value="-0.0002469834">
            <text:p>-0.0002469834</text:p>
          </table:table-cell>
          <table:table-cell table:number-columns-repeated="4"/>
        </table:table-row>
        <table:table-row table:style-name="ro1">
          <table:table-cell office:value-type="float" office:value="716.977172851563">
            <text:p>716.9771728516</text:p>
          </table:table-cell>
          <table:table-cell office:value-type="float" office:value="0.0004246739">
            <text:p>0.0004246739</text:p>
          </table:table-cell>
          <table:table-cell table:number-columns-repeated="4"/>
        </table:table-row>
        <table:table-row table:style-name="ro1">
          <table:table-cell office:value-type="float" office:value="717.097351074219">
            <text:p>717.0973510742</text:p>
          </table:table-cell>
          <table:table-cell office:value-type="float" office:value="0.005471865">
            <text:p>0.005471865</text:p>
          </table:table-cell>
          <table:table-cell table:number-columns-repeated="4"/>
        </table:table-row>
        <table:table-row table:style-name="ro1">
          <table:table-cell office:value-type="float" office:value="717.217590332031">
            <text:p>717.217590332</text:p>
          </table:table-cell>
          <table:table-cell office:value-type="float" office:value="-0.006583596">
            <text:p>-0.006583596</text:p>
          </table:table-cell>
          <table:table-cell table:number-columns-repeated="4"/>
        </table:table-row>
        <table:table-row table:style-name="ro1">
          <table:table-cell office:value-type="float" office:value="717.337768554688">
            <text:p>717.3377685547</text:p>
          </table:table-cell>
          <table:table-cell office:value-type="float" office:value="-0.01097505">
            <text:p>-0.01097505</text:p>
          </table:table-cell>
          <table:table-cell table:number-columns-repeated="4"/>
        </table:table-row>
        <table:table-row table:style-name="ro1">
          <table:table-cell office:value-type="float" office:value="717.4580078125">
            <text:p>717.4580078125</text:p>
          </table:table-cell>
          <table:table-cell office:value-type="float" office:value="0.0008311846">
            <text:p>0.0008311846</text:p>
          </table:table-cell>
          <table:table-cell table:number-columns-repeated="4"/>
        </table:table-row>
        <table:table-row table:style-name="ro1">
          <table:table-cell office:value-type="float" office:value="717.578186035156">
            <text:p>717.5781860352</text:p>
          </table:table-cell>
          <table:table-cell office:value-type="float" office:value="-0.0007846949">
            <text:p>-0.0007846949</text:p>
          </table:table-cell>
          <table:table-cell table:number-columns-repeated="4"/>
        </table:table-row>
        <table:table-row table:style-name="ro1">
          <table:table-cell office:value-type="float" office:value="717.698425292969">
            <text:p>717.698425293</text:p>
          </table:table-cell>
          <table:table-cell office:value-type="float" office:value="-0.0007126475">
            <text:p>-0.0007126475</text:p>
          </table:table-cell>
          <table:table-cell table:number-columns-repeated="4"/>
        </table:table-row>
        <table:table-row table:style-name="ro1">
          <table:table-cell office:value-type="float" office:value="717.818603515625">
            <text:p>717.8186035156</text:p>
          </table:table-cell>
          <table:table-cell office:value-type="float" office:value="-0.0002408794">
            <text:p>-0.0002408794</text:p>
          </table:table-cell>
          <table:table-cell table:number-columns-repeated="4"/>
        </table:table-row>
        <table:table-row table:style-name="ro1">
          <table:table-cell office:value-type="float" office:value="717.938842773438">
            <text:p>717.9388427734</text:p>
          </table:table-cell>
          <table:table-cell office:value-type="float" office:value="-0.003431071">
            <text:p>-0.003431071</text:p>
          </table:table-cell>
          <table:table-cell table:number-columns-repeated="4"/>
        </table:table-row>
        <table:table-row table:style-name="ro1">
          <table:table-cell office:value-type="float" office:value="718.05908203125">
            <text:p>718.0590820313</text:p>
          </table:table-cell>
          <table:table-cell office:value-type="float" office:value="0.0004937571">
            <text:p>0.0004937571</text:p>
          </table:table-cell>
          <table:table-cell table:number-columns-repeated="4"/>
        </table:table-row>
        <table:table-row table:style-name="ro1">
          <table:table-cell office:value-type="float" office:value="718.179260253906">
            <text:p>718.1792602539</text:p>
          </table:table-cell>
          <table:table-cell office:value-type="float" office:value="-0.007123902">
            <text:p>-0.007123902</text:p>
          </table:table-cell>
          <table:table-cell table:number-columns-repeated="4"/>
        </table:table-row>
        <table:table-row table:style-name="ro1">
          <table:table-cell office:value-type="float" office:value="718.299499511719">
            <text:p>718.2994995117</text:p>
          </table:table-cell>
          <table:table-cell office:value-type="float" office:value="0.004325842">
            <text:p>0.004325842</text:p>
          </table:table-cell>
          <table:table-cell table:number-columns-repeated="4"/>
        </table:table-row>
        <table:table-row table:style-name="ro1">
          <table:table-cell office:value-type="float" office:value="718.419677734375">
            <text:p>718.4196777344</text:p>
          </table:table-cell>
          <table:table-cell office:value-type="float" office:value="-0.002957789">
            <text:p>-0.002957789</text:p>
          </table:table-cell>
          <table:table-cell table:number-columns-repeated="4"/>
        </table:table-row>
        <table:table-row table:style-name="ro1">
          <table:table-cell office:value-type="float" office:value="718.539916992188">
            <text:p>718.5399169922</text:p>
          </table:table-cell>
          <table:table-cell office:value-type="float" office:value="-0.003631531">
            <text:p>-0.003631531</text:p>
          </table:table-cell>
          <table:table-cell table:number-columns-repeated="4"/>
        </table:table-row>
        <table:table-row table:style-name="ro1">
          <table:table-cell office:value-type="float" office:value="718.66015625">
            <text:p>718.66015625</text:p>
          </table:table-cell>
          <table:table-cell office:value-type="float" office:value="0.0006862363">
            <text:p>0.0006862363</text:p>
          </table:table-cell>
          <table:table-cell table:number-columns-repeated="4"/>
        </table:table-row>
        <table:table-row table:style-name="ro1">
          <table:table-cell office:value-type="float" office:value="718.780334472656">
            <text:p>718.7803344727</text:p>
          </table:table-cell>
          <table:table-cell office:value-type="float" office:value="-0.003565185">
            <text:p>-0.003565185</text:p>
          </table:table-cell>
          <table:table-cell table:number-columns-repeated="4"/>
        </table:table-row>
        <table:table-row table:style-name="ro1">
          <table:table-cell office:value-type="float" office:value="718.900573730469">
            <text:p>718.9005737305</text:p>
          </table:table-cell>
          <table:table-cell office:value-type="float" office:value="0.0006546063">
            <text:p>0.0006546063</text:p>
          </table:table-cell>
          <table:table-cell table:number-columns-repeated="4"/>
        </table:table-row>
        <table:table-row table:style-name="ro1">
          <table:table-cell office:value-type="float" office:value="719.020812988281">
            <text:p>719.0208129883</text:p>
          </table:table-cell>
          <table:table-cell office:value-type="float" office:value="0.004428744">
            <text:p>0.004428744</text:p>
          </table:table-cell>
          <table:table-cell table:number-columns-repeated="4"/>
        </table:table-row>
        <table:table-row table:style-name="ro1">
          <table:table-cell office:value-type="float" office:value="719.140991210938">
            <text:p>719.1409912109</text:p>
          </table:table-cell>
          <table:table-cell office:value-type="float" office:value="0.00757295">
            <text:p>0.00757295</text:p>
          </table:table-cell>
          <table:table-cell table:number-columns-repeated="4"/>
        </table:table-row>
        <table:table-row table:style-name="ro1">
          <table:table-cell office:value-type="float" office:value="719.26123046875">
            <text:p>719.2612304688</text:p>
          </table:table-cell>
          <table:table-cell office:value-type="float" office:value="-0.001224846">
            <text:p>-0.001224846</text:p>
          </table:table-cell>
          <table:table-cell table:number-columns-repeated="4"/>
        </table:table-row>
        <table:table-row table:style-name="ro1">
          <table:table-cell office:value-type="float" office:value="719.381469726563">
            <text:p>719.3814697266</text:p>
          </table:table-cell>
          <table:table-cell office:value-type="float" office:value="-0.005378382">
            <text:p>-0.005378382</text:p>
          </table:table-cell>
          <table:table-cell table:number-columns-repeated="4"/>
        </table:table-row>
        <table:table-row table:style-name="ro1">
          <table:table-cell office:value-type="float" office:value="719.501647949219">
            <text:p>719.5016479492</text:p>
          </table:table-cell>
          <table:table-cell office:value-type="float" office:value="0.009275562">
            <text:p>0.009275562</text:p>
          </table:table-cell>
          <table:table-cell table:number-columns-repeated="4"/>
        </table:table-row>
        <table:table-row table:style-name="ro1">
          <table:table-cell office:value-type="float" office:value="719.621887207031">
            <text:p>719.621887207</text:p>
          </table:table-cell>
          <table:table-cell office:value-type="float" office:value="-0.003860317">
            <text:p>-0.003860317</text:p>
          </table:table-cell>
          <table:table-cell table:number-columns-repeated="4"/>
        </table:table-row>
        <table:table-row table:style-name="ro1">
          <table:table-cell office:value-type="float" office:value="719.742126464844">
            <text:p>719.7421264648</text:p>
          </table:table-cell>
          <table:table-cell office:value-type="float" office:value="-0.009792524">
            <text:p>-0.009792524</text:p>
          </table:table-cell>
          <table:table-cell table:number-columns-repeated="4"/>
        </table:table-row>
        <table:table-row table:style-name="ro1">
          <table:table-cell office:value-type="float" office:value="719.8623046875">
            <text:p>719.8623046875</text:p>
          </table:table-cell>
          <table:table-cell office:value-type="float" office:value="-0.01040356">
            <text:p>-0.01040356</text:p>
          </table:table-cell>
          <table:table-cell table:number-columns-repeated="4"/>
        </table:table-row>
        <table:table-row table:style-name="ro1">
          <table:table-cell office:value-type="float" office:value="719.982543945313">
            <text:p>719.9825439453</text:p>
          </table:table-cell>
          <table:table-cell office:value-type="float" office:value="0.003672092">
            <text:p>0.003672092</text:p>
          </table:table-cell>
          <table:table-cell table:number-columns-repeated="4"/>
        </table:table-row>
        <table:table-row table:style-name="ro1">
          <table:table-cell office:value-type="float" office:value="720.102783203125">
            <text:p>720.1027832031</text:p>
          </table:table-cell>
          <table:table-cell office:value-type="float" office:value="-0.007490266">
            <text:p>-0.007490266</text:p>
          </table:table-cell>
          <table:table-cell table:number-columns-repeated="4"/>
        </table:table-row>
        <table:table-row table:style-name="ro1">
          <table:table-cell office:value-type="float" office:value="720.222961425781">
            <text:p>720.2229614258</text:p>
          </table:table-cell>
          <table:table-cell office:value-type="float" office:value="0.009118738">
            <text:p>0.009118738</text:p>
          </table:table-cell>
          <table:table-cell table:number-columns-repeated="4"/>
        </table:table-row>
        <table:table-row table:style-name="ro1">
          <table:table-cell office:value-type="float" office:value="720.343200683594">
            <text:p>720.3432006836</text:p>
          </table:table-cell>
          <table:table-cell office:value-type="float" office:value="-0.01138261">
            <text:p>-0.01138261</text:p>
          </table:table-cell>
          <table:table-cell table:number-columns-repeated="4"/>
        </table:table-row>
        <table:table-row table:style-name="ro1">
          <table:table-cell office:value-type="float" office:value="720.463439941406">
            <text:p>720.4634399414</text:p>
          </table:table-cell>
          <table:table-cell office:value-type="float" office:value="0.0003065919">
            <text:p>0.0003065919</text:p>
          </table:table-cell>
          <table:table-cell table:number-columns-repeated="4"/>
        </table:table-row>
        <table:table-row table:style-name="ro1">
          <table:table-cell office:value-type="float" office:value="720.583679199219">
            <text:p>720.5836791992</text:p>
          </table:table-cell>
          <table:table-cell office:value-type="float" office:value="0.02346498">
            <text:p>0.02346498</text:p>
          </table:table-cell>
          <table:table-cell table:number-columns-repeated="4"/>
        </table:table-row>
        <table:table-row table:style-name="ro1">
          <table:table-cell office:value-type="float" office:value="720.703857421875">
            <text:p>720.7038574219</text:p>
          </table:table-cell>
          <table:table-cell office:value-type="float" office:value="0.0003310621">
            <text:p>0.0003310621</text:p>
          </table:table-cell>
          <table:table-cell table:number-columns-repeated="4"/>
        </table:table-row>
        <table:table-row table:style-name="ro1">
          <table:table-cell office:value-type="float" office:value="720.824096679688">
            <text:p>720.8240966797</text:p>
          </table:table-cell>
          <table:table-cell office:value-type="string">
            <text:p>8.698044E-05</text:p>
          </table:table-cell>
          <table:table-cell table:number-columns-repeated="4"/>
        </table:table-row>
        <table:table-row table:style-name="ro1">
          <table:table-cell office:value-type="float" office:value="720.9443359375">
            <text:p>720.9443359375</text:p>
          </table:table-cell>
          <table:table-cell office:value-type="float" office:value="0.005299927">
            <text:p>0.005299927</text:p>
          </table:table-cell>
          <table:table-cell table:number-columns-repeated="4"/>
        </table:table-row>
        <table:table-row table:style-name="ro1">
          <table:table-cell office:value-type="float" office:value="721.064575195313">
            <text:p>721.0645751953</text:p>
          </table:table-cell>
          <table:table-cell office:value-type="float" office:value="0.004674824">
            <text:p>0.004674824</text:p>
          </table:table-cell>
          <table:table-cell table:number-columns-repeated="4"/>
        </table:table-row>
        <table:table-row table:style-name="ro1">
          <table:table-cell office:value-type="float" office:value="721.184753417969">
            <text:p>721.184753418</text:p>
          </table:table-cell>
          <table:table-cell office:value-type="float" office:value="-0.004890274">
            <text:p>-0.004890274</text:p>
          </table:table-cell>
          <table:table-cell table:number-columns-repeated="4"/>
        </table:table-row>
        <table:table-row table:style-name="ro1">
          <table:table-cell office:value-type="float" office:value="721.304992675781">
            <text:p>721.3049926758</text:p>
          </table:table-cell>
          <table:table-cell office:value-type="float" office:value="0.001376727">
            <text:p>0.001376727</text:p>
          </table:table-cell>
          <table:table-cell table:number-columns-repeated="4"/>
        </table:table-row>
        <table:table-row table:style-name="ro1">
          <table:table-cell office:value-type="float" office:value="721.425231933594">
            <text:p>721.4252319336</text:p>
          </table:table-cell>
          <table:table-cell office:value-type="float" office:value="0.001406418">
            <text:p>0.001406418</text:p>
          </table:table-cell>
          <table:table-cell table:number-columns-repeated="4"/>
        </table:table-row>
        <table:table-row table:style-name="ro1">
          <table:table-cell office:value-type="float" office:value="721.545471191406">
            <text:p>721.5454711914</text:p>
          </table:table-cell>
          <table:table-cell office:value-type="float" office:value="0.01834446">
            <text:p>0.01834446</text:p>
          </table:table-cell>
          <table:table-cell table:number-columns-repeated="4"/>
        </table:table-row>
        <table:table-row table:style-name="ro1">
          <table:table-cell office:value-type="float" office:value="721.665649414063">
            <text:p>721.6656494141</text:p>
          </table:table-cell>
          <table:table-cell office:value-type="float" office:value="-0.01028585">
            <text:p>-0.01028585</text:p>
          </table:table-cell>
          <table:table-cell table:number-columns-repeated="4"/>
        </table:table-row>
        <table:table-row table:style-name="ro1">
          <table:table-cell office:value-type="float" office:value="721.785888671875">
            <text:p>721.7858886719</text:p>
          </table:table-cell>
          <table:table-cell office:value-type="float" office:value="0.01791875">
            <text:p>0.01791875</text:p>
          </table:table-cell>
          <table:table-cell table:number-columns-repeated="4"/>
        </table:table-row>
        <table:table-row table:style-name="ro1">
          <table:table-cell office:value-type="float" office:value="721.906127929688">
            <text:p>721.9061279297</text:p>
          </table:table-cell>
          <table:table-cell office:value-type="float" office:value="-0.003213027">
            <text:p>-0.003213027</text:p>
          </table:table-cell>
          <table:table-cell table:number-columns-repeated="4"/>
        </table:table-row>
        <table:table-row table:style-name="ro1">
          <table:table-cell office:value-type="float" office:value="722.0263671875">
            <text:p>722.0263671875</text:p>
          </table:table-cell>
          <table:table-cell office:value-type="float" office:value="-0.007915369">
            <text:p>-0.007915369</text:p>
          </table:table-cell>
          <table:table-cell table:number-columns-repeated="4"/>
        </table:table-row>
        <table:table-row table:style-name="ro1">
          <table:table-cell office:value-type="float" office:value="722.146606445313">
            <text:p>722.1466064453</text:p>
          </table:table-cell>
          <table:table-cell office:value-type="float" office:value="0.01521553">
            <text:p>0.01521553</text:p>
          </table:table-cell>
          <table:table-cell table:number-columns-repeated="4"/>
        </table:table-row>
        <table:table-row table:style-name="ro1">
          <table:table-cell office:value-type="float" office:value="722.266784667969">
            <text:p>722.266784668</text:p>
          </table:table-cell>
          <table:table-cell office:value-type="float" office:value="-0.003840372">
            <text:p>-0.003840372</text:p>
          </table:table-cell>
          <table:table-cell table:number-columns-repeated="4"/>
        </table:table-row>
        <table:table-row table:style-name="ro1">
          <table:table-cell office:value-type="float" office:value="722.387023925781">
            <text:p>722.3870239258</text:p>
          </table:table-cell>
          <table:table-cell office:value-type="float" office:value="-0.009029108">
            <text:p>-0.009029108</text:p>
          </table:table-cell>
          <table:table-cell table:number-columns-repeated="4"/>
        </table:table-row>
        <table:table-row table:style-name="ro1">
          <table:table-cell office:value-type="float" office:value="722.507263183594">
            <text:p>722.5072631836</text:p>
          </table:table-cell>
          <table:table-cell office:value-type="float" office:value="-0.01092367">
            <text:p>-0.01092367</text:p>
          </table:table-cell>
          <table:table-cell table:number-columns-repeated="4"/>
        </table:table-row>
        <table:table-row table:style-name="ro1">
          <table:table-cell office:value-type="float" office:value="722.627502441406">
            <text:p>722.6275024414</text:p>
          </table:table-cell>
          <table:table-cell office:value-type="float" office:value="-0.007576936">
            <text:p>-0.007576936</text:p>
          </table:table-cell>
          <table:table-cell table:number-columns-repeated="4"/>
        </table:table-row>
        <table:table-row table:style-name="ro1">
          <table:table-cell office:value-type="float" office:value="722.747741699219">
            <text:p>722.7477416992</text:p>
          </table:table-cell>
          <table:table-cell office:value-type="float" office:value="0.002300308">
            <text:p>0.002300308</text:p>
          </table:table-cell>
          <table:table-cell table:number-columns-repeated="4"/>
        </table:table-row>
        <table:table-row table:style-name="ro1">
          <table:table-cell office:value-type="float" office:value="722.867980957031">
            <text:p>722.867980957</text:p>
          </table:table-cell>
          <table:table-cell office:value-type="float" office:value="-0.01015377">
            <text:p>-0.01015377</text:p>
          </table:table-cell>
          <table:table-cell table:number-columns-repeated="4"/>
        </table:table-row>
        <table:table-row table:style-name="ro1">
          <table:table-cell office:value-type="float" office:value="722.988159179688">
            <text:p>722.9881591797</text:p>
          </table:table-cell>
          <table:table-cell office:value-type="float" office:value="0.0006999783">
            <text:p>0.0006999783</text:p>
          </table:table-cell>
          <table:table-cell table:number-columns-repeated="4"/>
        </table:table-row>
        <table:table-row table:style-name="ro1">
          <table:table-cell office:value-type="float" office:value="723.1083984375">
            <text:p>723.1083984375</text:p>
          </table:table-cell>
          <table:table-cell office:value-type="float" office:value="0.003084229">
            <text:p>0.003084229</text:p>
          </table:table-cell>
          <table:table-cell table:number-columns-repeated="4"/>
        </table:table-row>
        <table:table-row table:style-name="ro1">
          <table:table-cell office:value-type="float" office:value="723.228637695313">
            <text:p>723.2286376953</text:p>
          </table:table-cell>
          <table:table-cell office:value-type="float" office:value="0.01759773">
            <text:p>0.01759773</text:p>
          </table:table-cell>
          <table:table-cell table:number-columns-repeated="4"/>
        </table:table-row>
        <table:table-row table:style-name="ro1">
          <table:table-cell office:value-type="float" office:value="723.348876953125">
            <text:p>723.3488769531</text:p>
          </table:table-cell>
          <table:table-cell office:value-type="float" office:value="0.0001274139">
            <text:p>0.0001274139</text:p>
          </table:table-cell>
          <table:table-cell table:number-columns-repeated="4"/>
        </table:table-row>
        <table:table-row table:style-name="ro1">
          <table:table-cell office:value-type="float" office:value="723.469116210938">
            <text:p>723.4691162109</text:p>
          </table:table-cell>
          <table:table-cell office:value-type="float" office:value="-0.005939547">
            <text:p>-0.005939547</text:p>
          </table:table-cell>
          <table:table-cell table:number-columns-repeated="4"/>
        </table:table-row>
        <table:table-row table:style-name="ro1">
          <table:table-cell office:value-type="float" office:value="723.58935546875">
            <text:p>723.5893554688</text:p>
          </table:table-cell>
          <table:table-cell office:value-type="float" office:value="0.0009281379">
            <text:p>0.0009281379</text:p>
          </table:table-cell>
          <table:table-cell table:number-columns-repeated="4"/>
        </table:table-row>
        <table:table-row table:style-name="ro1">
          <table:table-cell office:value-type="float" office:value="723.709594726563">
            <text:p>723.7095947266</text:p>
          </table:table-cell>
          <table:table-cell office:value-type="float" office:value="-0.006640574">
            <text:p>-0.006640574</text:p>
          </table:table-cell>
          <table:table-cell table:number-columns-repeated="4"/>
        </table:table-row>
        <table:table-row table:style-name="ro1">
          <table:table-cell office:value-type="float" office:value="723.829772949219">
            <text:p>723.8297729492</text:p>
          </table:table-cell>
          <table:table-cell office:value-type="float" office:value="-0.00670647">
            <text:p>-0.00670647</text:p>
          </table:table-cell>
          <table:table-cell table:number-columns-repeated="4"/>
        </table:table-row>
        <table:table-row table:style-name="ro1">
          <table:table-cell office:value-type="float" office:value="723.950012207031">
            <text:p>723.950012207</text:p>
          </table:table-cell>
          <table:table-cell office:value-type="float" office:value="0.002751492">
            <text:p>0.002751492</text:p>
          </table:table-cell>
          <table:table-cell table:number-columns-repeated="4"/>
        </table:table-row>
        <table:table-row table:style-name="ro1">
          <table:table-cell office:value-type="float" office:value="724.070251464844">
            <text:p>724.0702514648</text:p>
          </table:table-cell>
          <table:table-cell office:value-type="float" office:value="-0.0003610818">
            <text:p>-0.0003610818</text:p>
          </table:table-cell>
          <table:table-cell table:number-columns-repeated="4"/>
        </table:table-row>
        <table:table-row table:style-name="ro1">
          <table:table-cell office:value-type="float" office:value="724.190490722656">
            <text:p>724.1904907227</text:p>
          </table:table-cell>
          <table:table-cell office:value-type="float" office:value="-0.01341699">
            <text:p>-0.01341699</text:p>
          </table:table-cell>
          <table:table-cell table:number-columns-repeated="4"/>
        </table:table-row>
        <table:table-row table:style-name="ro1">
          <table:table-cell office:value-type="float" office:value="724.310729980469">
            <text:p>724.3107299805</text:p>
          </table:table-cell>
          <table:table-cell office:value-type="float" office:value="-0.008633696">
            <text:p>-0.008633696</text:p>
          </table:table-cell>
          <table:table-cell table:number-columns-repeated="4"/>
        </table:table-row>
        <table:table-row table:style-name="ro1">
          <table:table-cell office:value-type="float" office:value="724.430969238281">
            <text:p>724.4309692383</text:p>
          </table:table-cell>
          <table:table-cell office:value-type="float" office:value="-0.009262803">
            <text:p>-0.009262803</text:p>
          </table:table-cell>
          <table:table-cell table:number-columns-repeated="4"/>
        </table:table-row>
        <table:table-row table:style-name="ro1">
          <table:table-cell office:value-type="float" office:value="724.551208496094">
            <text:p>724.5512084961</text:p>
          </table:table-cell>
          <table:table-cell office:value-type="float" office:value="-0.01220157">
            <text:p>-0.01220157</text:p>
          </table:table-cell>
          <table:table-cell table:number-columns-repeated="4"/>
        </table:table-row>
        <table:table-row table:style-name="ro1">
          <table:table-cell office:value-type="float" office:value="724.671447753906">
            <text:p>724.6714477539</text:p>
          </table:table-cell>
          <table:table-cell office:value-type="float" office:value="0.005648097">
            <text:p>0.005648097</text:p>
          </table:table-cell>
          <table:table-cell table:number-columns-repeated="4"/>
        </table:table-row>
        <table:table-row table:style-name="ro1">
          <table:table-cell office:value-type="float" office:value="724.791687011719">
            <text:p>724.7916870117</text:p>
          </table:table-cell>
          <table:table-cell office:value-type="float" office:value="-0.01052458">
            <text:p>-0.01052458</text:p>
          </table:table-cell>
          <table:table-cell table:number-columns-repeated="4"/>
        </table:table-row>
        <table:table-row table:style-name="ro1">
          <table:table-cell office:value-type="float" office:value="724.911865234375">
            <text:p>724.9118652344</text:p>
          </table:table-cell>
          <table:table-cell office:value-type="float" office:value="-0.009964285">
            <text:p>-0.009964285</text:p>
          </table:table-cell>
          <table:table-cell table:number-columns-repeated="4"/>
        </table:table-row>
        <table:table-row table:style-name="ro1">
          <table:table-cell office:value-type="float" office:value="725.032104492188">
            <text:p>725.0321044922</text:p>
          </table:table-cell>
          <table:table-cell office:value-type="float" office:value="0.001433979">
            <text:p>0.001433979</text:p>
          </table:table-cell>
          <table:table-cell table:number-columns-repeated="4"/>
        </table:table-row>
        <table:table-row table:style-name="ro1">
          <table:table-cell office:value-type="float" office:value="725.15234375">
            <text:p>725.15234375</text:p>
          </table:table-cell>
          <table:table-cell office:value-type="float" office:value="-0.008024926">
            <text:p>-0.008024926</text:p>
          </table:table-cell>
          <table:table-cell table:number-columns-repeated="4"/>
        </table:table-row>
        <table:table-row table:style-name="ro1">
          <table:table-cell office:value-type="float" office:value="725.272583007813">
            <text:p>725.2725830078</text:p>
          </table:table-cell>
          <table:table-cell office:value-type="float" office:value="-0.009084483">
            <text:p>-0.009084483</text:p>
          </table:table-cell>
          <table:table-cell table:number-columns-repeated="4"/>
        </table:table-row>
        <table:table-row table:style-name="ro1">
          <table:table-cell office:value-type="float" office:value="725.392822265625">
            <text:p>725.3928222656</text:p>
          </table:table-cell>
          <table:table-cell office:value-type="float" office:value="0.0271724">
            <text:p>0.0271724</text:p>
          </table:table-cell>
          <table:table-cell table:number-columns-repeated="4"/>
        </table:table-row>
        <table:table-row table:style-name="ro1">
          <table:table-cell office:value-type="float" office:value="725.513061523438">
            <text:p>725.5130615234</text:p>
          </table:table-cell>
          <table:table-cell office:value-type="float" office:value="-0.002749609">
            <text:p>-0.002749609</text:p>
          </table:table-cell>
          <table:table-cell table:number-columns-repeated="4"/>
        </table:table-row>
        <table:table-row table:style-name="ro1">
          <table:table-cell office:value-type="float" office:value="725.63330078125">
            <text:p>725.6333007813</text:p>
          </table:table-cell>
          <table:table-cell office:value-type="float" office:value="-0.001908425">
            <text:p>-0.001908425</text:p>
          </table:table-cell>
          <table:table-cell table:number-columns-repeated="4"/>
        </table:table-row>
        <table:table-row table:style-name="ro1">
          <table:table-cell office:value-type="float" office:value="725.753540039063">
            <text:p>725.7535400391</text:p>
          </table:table-cell>
          <table:table-cell office:value-type="float" office:value="-0.007498351">
            <text:p>-0.007498351</text:p>
          </table:table-cell>
          <table:table-cell table:number-columns-repeated="4"/>
        </table:table-row>
        <table:table-row table:style-name="ro1">
          <table:table-cell office:value-type="float" office:value="725.873779296875">
            <text:p>725.8737792969</text:p>
          </table:table-cell>
          <table:table-cell office:value-type="float" office:value="0.001697218">
            <text:p>0.001697218</text:p>
          </table:table-cell>
          <table:table-cell table:number-columns-repeated="4"/>
        </table:table-row>
        <table:table-row table:style-name="ro1">
          <table:table-cell office:value-type="float" office:value="725.994018554688">
            <text:p>725.9940185547</text:p>
          </table:table-cell>
          <table:table-cell office:value-type="float" office:value="-0.00283082">
            <text:p>-0.00283082</text:p>
          </table:table-cell>
          <table:table-cell table:number-columns-repeated="4"/>
        </table:table-row>
        <table:table-row table:style-name="ro1">
          <table:table-cell office:value-type="float" office:value="726.1142578125">
            <text:p>726.1142578125</text:p>
          </table:table-cell>
          <table:table-cell office:value-type="float" office:value="0.0003820487">
            <text:p>0.0003820487</text:p>
          </table:table-cell>
          <table:table-cell table:number-columns-repeated="4"/>
        </table:table-row>
        <table:table-row table:style-name="ro1">
          <table:table-cell office:value-type="float" office:value="726.234497070313">
            <text:p>726.2344970703</text:p>
          </table:table-cell>
          <table:table-cell office:value-type="float" office:value="-0.003486377">
            <text:p>-0.003486377</text:p>
          </table:table-cell>
          <table:table-cell table:number-columns-repeated="4"/>
        </table:table-row>
        <table:table-row table:style-name="ro1">
          <table:table-cell office:value-type="float" office:value="726.354736328125">
            <text:p>726.3547363281</text:p>
          </table:table-cell>
          <table:table-cell office:value-type="float" office:value="0.008811962">
            <text:p>0.008811962</text:p>
          </table:table-cell>
          <table:table-cell table:number-columns-repeated="4"/>
        </table:table-row>
        <table:table-row table:style-name="ro1">
          <table:table-cell office:value-type="float" office:value="726.474975585938">
            <text:p>726.4749755859</text:p>
          </table:table-cell>
          <table:table-cell office:value-type="float" office:value="-0.001173919">
            <text:p>-0.001173919</text:p>
          </table:table-cell>
          <table:table-cell table:number-columns-repeated="4"/>
        </table:table-row>
        <table:table-row table:style-name="ro1">
          <table:table-cell office:value-type="float" office:value="726.59521484375">
            <text:p>726.5952148438</text:p>
          </table:table-cell>
          <table:table-cell office:value-type="float" office:value="-0.0001981912">
            <text:p>-0.0001981912</text:p>
          </table:table-cell>
          <table:table-cell table:number-columns-repeated="4"/>
        </table:table-row>
        <table:table-row table:style-name="ro1">
          <table:table-cell office:value-type="float" office:value="726.715454101563">
            <text:p>726.7154541016</text:p>
          </table:table-cell>
          <table:table-cell office:value-type="float" office:value="-0.005068622">
            <text:p>-0.005068622</text:p>
          </table:table-cell>
          <table:table-cell table:number-columns-repeated="4"/>
        </table:table-row>
        <table:table-row table:style-name="ro1">
          <table:table-cell office:value-type="float" office:value="726.835693359375">
            <text:p>726.8356933594</text:p>
          </table:table-cell>
          <table:table-cell office:value-type="float" office:value="-0.006001346">
            <text:p>-0.006001346</text:p>
          </table:table-cell>
          <table:table-cell table:number-columns-repeated="4"/>
        </table:table-row>
        <table:table-row table:style-name="ro1">
          <table:table-cell office:value-type="float" office:value="726.955932617188">
            <text:p>726.9559326172</text:p>
          </table:table-cell>
          <table:table-cell office:value-type="float" office:value="-0.01249822">
            <text:p>-0.01249822</text:p>
          </table:table-cell>
          <table:table-cell table:number-columns-repeated="4"/>
        </table:table-row>
        <table:table-row table:style-name="ro1">
          <table:table-cell office:value-type="float" office:value="727.076171875">
            <text:p>727.076171875</text:p>
          </table:table-cell>
          <table:table-cell office:value-type="float" office:value="0.00430293">
            <text:p>0.00430293</text:p>
          </table:table-cell>
          <table:table-cell table:number-columns-repeated="4"/>
        </table:table-row>
        <table:table-row table:style-name="ro1">
          <table:table-cell office:value-type="float" office:value="727.196411132813">
            <text:p>727.1964111328</text:p>
          </table:table-cell>
          <table:table-cell office:value-type="float" office:value="-0.002798461">
            <text:p>-0.002798461</text:p>
          </table:table-cell>
          <table:table-cell table:number-columns-repeated="4"/>
        </table:table-row>
        <table:table-row table:style-name="ro1">
          <table:table-cell office:value-type="float" office:value="727.316650390625">
            <text:p>727.3166503906</text:p>
          </table:table-cell>
          <table:table-cell office:value-type="float" office:value="0.01153564">
            <text:p>0.01153564</text:p>
          </table:table-cell>
          <table:table-cell table:number-columns-repeated="4"/>
        </table:table-row>
        <table:table-row table:style-name="ro1">
          <table:table-cell office:value-type="float" office:value="727.436889648438">
            <text:p>727.4368896484</text:p>
          </table:table-cell>
          <table:table-cell office:value-type="float" office:value="-0.002539162">
            <text:p>-0.002539162</text:p>
          </table:table-cell>
          <table:table-cell table:number-columns-repeated="4"/>
        </table:table-row>
        <table:table-row table:style-name="ro1">
          <table:table-cell office:value-type="float" office:value="727.55712890625">
            <text:p>727.5571289063</text:p>
          </table:table-cell>
          <table:table-cell office:value-type="float" office:value="-0.0008371508">
            <text:p>-0.0008371508</text:p>
          </table:table-cell>
          <table:table-cell table:number-columns-repeated="4"/>
        </table:table-row>
        <table:table-row table:style-name="ro1">
          <table:table-cell office:value-type="float" office:value="727.677368164063">
            <text:p>727.6773681641</text:p>
          </table:table-cell>
          <table:table-cell office:value-type="float" office:value="-0.003304046">
            <text:p>-0.003304046</text:p>
          </table:table-cell>
          <table:table-cell table:number-columns-repeated="4"/>
        </table:table-row>
        <table:table-row table:style-name="ro1">
          <table:table-cell office:value-type="float" office:value="727.797607421875">
            <text:p>727.7976074219</text:p>
          </table:table-cell>
          <table:table-cell office:value-type="float" office:value="-0.009540192">
            <text:p>-0.009540192</text:p>
          </table:table-cell>
          <table:table-cell table:number-columns-repeated="4"/>
        </table:table-row>
        <table:table-row table:style-name="ro1">
          <table:table-cell office:value-type="float" office:value="727.917846679688">
            <text:p>727.9178466797</text:p>
          </table:table-cell>
          <table:table-cell office:value-type="float" office:value="-0.0133308">
            <text:p>-0.0133308</text:p>
          </table:table-cell>
          <table:table-cell table:number-columns-repeated="4"/>
        </table:table-row>
        <table:table-row table:style-name="ro1">
          <table:table-cell office:value-type="float" office:value="728.0380859375">
            <text:p>728.0380859375</text:p>
          </table:table-cell>
          <table:table-cell office:value-type="float" office:value="0.001114488">
            <text:p>0.001114488</text:p>
          </table:table-cell>
          <table:table-cell table:number-columns-repeated="4"/>
        </table:table-row>
        <table:table-row table:style-name="ro1">
          <table:table-cell office:value-type="float" office:value="728.158325195313">
            <text:p>728.1583251953</text:p>
          </table:table-cell>
          <table:table-cell office:value-type="float" office:value="-0.01198481">
            <text:p>-0.01198481</text:p>
          </table:table-cell>
          <table:table-cell table:number-columns-repeated="4"/>
        </table:table-row>
        <table:table-row table:style-name="ro1">
          <table:table-cell office:value-type="float" office:value="728.278564453125">
            <text:p>728.2785644531</text:p>
          </table:table-cell>
          <table:table-cell office:value-type="float" office:value="-0.005658489">
            <text:p>-0.005658489</text:p>
          </table:table-cell>
          <table:table-cell table:number-columns-repeated="4"/>
        </table:table-row>
        <table:table-row table:style-name="ro1">
          <table:table-cell office:value-type="float" office:value="728.398803710938">
            <text:p>728.3988037109</text:p>
          </table:table-cell>
          <table:table-cell office:value-type="float" office:value="-0.009883872">
            <text:p>-0.009883872</text:p>
          </table:table-cell>
          <table:table-cell table:number-columns-repeated="4"/>
        </table:table-row>
        <table:table-row table:style-name="ro1">
          <table:table-cell office:value-type="float" office:value="728.51904296875">
            <text:p>728.5190429688</text:p>
          </table:table-cell>
          <table:table-cell office:value-type="float" office:value="0.005233797">
            <text:p>0.005233797</text:p>
          </table:table-cell>
          <table:table-cell table:number-columns-repeated="4"/>
        </table:table-row>
        <table:table-row table:style-name="ro1">
          <table:table-cell office:value-type="float" office:value="728.639282226563">
            <text:p>728.6392822266</text:p>
          </table:table-cell>
          <table:table-cell office:value-type="float" office:value="-0.01033108">
            <text:p>-0.01033108</text:p>
          </table:table-cell>
          <table:table-cell table:number-columns-repeated="4"/>
        </table:table-row>
        <table:table-row table:style-name="ro1">
          <table:table-cell office:value-type="float" office:value="728.759521484375">
            <text:p>728.7595214844</text:p>
          </table:table-cell>
          <table:table-cell office:value-type="float" office:value="-0.0001406877">
            <text:p>-0.0001406877</text:p>
          </table:table-cell>
          <table:table-cell table:number-columns-repeated="4"/>
        </table:table-row>
        <table:table-row table:style-name="ro1">
          <table:table-cell office:value-type="float" office:value="728.879760742188">
            <text:p>728.8797607422</text:p>
          </table:table-cell>
          <table:table-cell office:value-type="float" office:value="0.002040586">
            <text:p>0.002040586</text:p>
          </table:table-cell>
          <table:table-cell table:number-columns-repeated="4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-0.008777603">
            <text:p>-0.008777603</text:p>
          </table:table-cell>
          <table:table-cell table:number-columns-repeated="4"/>
        </table:table-row>
        <table:table-row table:style-name="ro1">
          <table:table-cell office:value-type="float" office:value="729.120239257813">
            <text:p>729.1202392578</text:p>
          </table:table-cell>
          <table:table-cell office:value-type="float" office:value="-0.0002341749">
            <text:p>-0.0002341749</text:p>
          </table:table-cell>
          <table:table-cell table:number-columns-repeated="4"/>
        </table:table-row>
        <table:table-row table:style-name="ro1">
          <table:table-cell office:value-type="float" office:value="729.240478515625">
            <text:p>729.2404785156</text:p>
          </table:table-cell>
          <table:table-cell office:value-type="float" office:value="0.008357267">
            <text:p>0.008357267</text:p>
          </table:table-cell>
          <table:table-cell table:number-columns-repeated="4"/>
        </table:table-row>
        <table:table-row table:style-name="ro1">
          <table:table-cell office:value-type="float" office:value="729.360778808594">
            <text:p>729.3607788086</text:p>
          </table:table-cell>
          <table:table-cell office:value-type="float" office:value="0.001746456">
            <text:p>0.001746456</text:p>
          </table:table-cell>
          <table:table-cell table:number-columns-repeated="4"/>
        </table:table-row>
        <table:table-row table:style-name="ro1">
          <table:table-cell office:value-type="float" office:value="729.481018066406">
            <text:p>729.4810180664</text:p>
          </table:table-cell>
          <table:table-cell office:value-type="float" office:value="-0.001568165">
            <text:p>-0.001568165</text:p>
          </table:table-cell>
          <table:table-cell table:number-columns-repeated="4"/>
        </table:table-row>
        <table:table-row table:style-name="ro1">
          <table:table-cell office:value-type="float" office:value="729.601257324219">
            <text:p>729.6012573242</text:p>
          </table:table-cell>
          <table:table-cell office:value-type="float" office:value="0.005712986">
            <text:p>0.005712986</text:p>
          </table:table-cell>
          <table:table-cell table:number-columns-repeated="4"/>
        </table:table-row>
        <table:table-row table:style-name="ro1">
          <table:table-cell office:value-type="float" office:value="729.721496582031">
            <text:p>729.721496582</text:p>
          </table:table-cell>
          <table:table-cell office:value-type="float" office:value="0.02483187">
            <text:p>0.02483187</text:p>
          </table:table-cell>
          <table:table-cell table:number-columns-repeated="4"/>
        </table:table-row>
        <table:table-row table:style-name="ro1">
          <table:table-cell office:value-type="float" office:value="729.841735839844">
            <text:p>729.8417358398</text:p>
          </table:table-cell>
          <table:table-cell office:value-type="float" office:value="-0.008050601">
            <text:p>-0.008050601</text:p>
          </table:table-cell>
          <table:table-cell table:number-columns-repeated="4"/>
        </table:table-row>
        <table:table-row table:style-name="ro1">
          <table:table-cell office:value-type="float" office:value="729.961975097656">
            <text:p>729.9619750977</text:p>
          </table:table-cell>
          <table:table-cell office:value-type="float" office:value="-0.009660354">
            <text:p>-0.009660354</text:p>
          </table:table-cell>
          <table:table-cell table:number-columns-repeated="4"/>
        </table:table-row>
        <table:table-row table:style-name="ro1">
          <table:table-cell office:value-type="float" office:value="730.082214355469">
            <text:p>730.0822143555</text:p>
          </table:table-cell>
          <table:table-cell office:value-type="float" office:value="0.01139741">
            <text:p>0.01139741</text:p>
          </table:table-cell>
          <table:table-cell table:number-columns-repeated="4"/>
        </table:table-row>
        <table:table-row table:style-name="ro1">
          <table:table-cell office:value-type="float" office:value="730.202453613281">
            <text:p>730.2024536133</text:p>
          </table:table-cell>
          <table:table-cell office:value-type="float" office:value="0.004776701">
            <text:p>0.004776701</text:p>
          </table:table-cell>
          <table:table-cell table:number-columns-repeated="4"/>
        </table:table-row>
        <table:table-row table:style-name="ro1">
          <table:table-cell office:value-type="float" office:value="730.322692871094">
            <text:p>730.3226928711</text:p>
          </table:table-cell>
          <table:table-cell office:value-type="float" office:value="-0.002779967">
            <text:p>-0.002779967</text:p>
          </table:table-cell>
          <table:table-cell table:number-columns-repeated="4"/>
        </table:table-row>
        <table:table-row table:style-name="ro1">
          <table:table-cell office:value-type="float" office:value="730.442932128906">
            <text:p>730.4429321289</text:p>
          </table:table-cell>
          <table:table-cell office:value-type="float" office:value="0.002171355">
            <text:p>0.002171355</text:p>
          </table:table-cell>
          <table:table-cell table:number-columns-repeated="4"/>
        </table:table-row>
        <table:table-row table:style-name="ro1">
          <table:table-cell office:value-type="float" office:value="730.563171386719">
            <text:p>730.5631713867</text:p>
          </table:table-cell>
          <table:table-cell office:value-type="float" office:value="0.00561429">
            <text:p>0.00561429</text:p>
          </table:table-cell>
          <table:table-cell table:number-columns-repeated="4"/>
        </table:table-row>
        <table:table-row table:style-name="ro1">
          <table:table-cell office:value-type="float" office:value="730.683471679688">
            <text:p>730.6834716797</text:p>
          </table:table-cell>
          <table:table-cell office:value-type="float" office:value="-0.00209873">
            <text:p>-0.00209873</text:p>
          </table:table-cell>
          <table:table-cell table:number-columns-repeated="4"/>
        </table:table-row>
        <table:table-row table:style-name="ro1">
          <table:table-cell office:value-type="float" office:value="730.8037109375">
            <text:p>730.8037109375</text:p>
          </table:table-cell>
          <table:table-cell office:value-type="float" office:value="0.01236567">
            <text:p>0.01236567</text:p>
          </table:table-cell>
          <table:table-cell table:number-columns-repeated="4"/>
        </table:table-row>
        <table:table-row table:style-name="ro1">
          <table:table-cell office:value-type="float" office:value="730.923950195313">
            <text:p>730.9239501953</text:p>
          </table:table-cell>
          <table:table-cell office:value-type="float" office:value="0.005522665">
            <text:p>0.005522665</text:p>
          </table:table-cell>
          <table:table-cell table:number-columns-repeated="4"/>
        </table:table-row>
        <table:table-row table:style-name="ro1">
          <table:table-cell office:value-type="float" office:value="731.044189453125">
            <text:p>731.0441894531</text:p>
          </table:table-cell>
          <table:table-cell office:value-type="float" office:value="0.01441305">
            <text:p>0.01441305</text:p>
          </table:table-cell>
          <table:table-cell table:number-columns-repeated="4"/>
        </table:table-row>
        <table:table-row table:style-name="ro1">
          <table:table-cell office:value-type="float" office:value="731.164428710938">
            <text:p>731.1644287109</text:p>
          </table:table-cell>
          <table:table-cell office:value-type="float" office:value="-0.006473608">
            <text:p>-0.006473608</text:p>
          </table:table-cell>
          <table:table-cell table:number-columns-repeated="4"/>
        </table:table-row>
        <table:table-row table:style-name="ro1">
          <table:table-cell office:value-type="float" office:value="731.28466796875">
            <text:p>731.2846679688</text:p>
          </table:table-cell>
          <table:table-cell office:value-type="string">
            <text:p>-8.751686E-05</text:p>
          </table:table-cell>
          <table:table-cell table:number-columns-repeated="4"/>
        </table:table-row>
        <table:table-row table:style-name="ro1">
          <table:table-cell office:value-type="float" office:value="731.404907226563">
            <text:p>731.4049072266</text:p>
          </table:table-cell>
          <table:table-cell office:value-type="float" office:value="-0.008891174">
            <text:p>-0.008891174</text:p>
          </table:table-cell>
          <table:table-cell table:number-columns-repeated="4"/>
        </table:table-row>
        <table:table-row table:style-name="ro1">
          <table:table-cell office:value-type="float" office:value="731.525146484375">
            <text:p>731.5251464844</text:p>
          </table:table-cell>
          <table:table-cell office:value-type="float" office:value="-0.004203844">
            <text:p>-0.004203844</text:p>
          </table:table-cell>
          <table:table-cell table:number-columns-repeated="4"/>
        </table:table-row>
        <table:table-row table:style-name="ro1">
          <table:table-cell office:value-type="float" office:value="731.645446777344">
            <text:p>731.6454467773</text:p>
          </table:table-cell>
          <table:table-cell office:value-type="float" office:value="0.007397819">
            <text:p>0.007397819</text:p>
          </table:table-cell>
          <table:table-cell table:number-columns-repeated="4"/>
        </table:table-row>
        <table:table-row table:style-name="ro1">
          <table:table-cell office:value-type="float" office:value="731.765686035156">
            <text:p>731.7656860352</text:p>
          </table:table-cell>
          <table:table-cell office:value-type="float" office:value="0.007361745">
            <text:p>0.007361745</text:p>
          </table:table-cell>
          <table:table-cell table:number-columns-repeated="4"/>
        </table:table-row>
        <table:table-row table:style-name="ro1">
          <table:table-cell office:value-type="float" office:value="731.885925292969">
            <text:p>731.885925293</text:p>
          </table:table-cell>
          <table:table-cell office:value-type="float" office:value="0.004549225">
            <text:p>0.004549225</text:p>
          </table:table-cell>
          <table:table-cell table:number-columns-repeated="4"/>
        </table:table-row>
        <table:table-row table:style-name="ro1">
          <table:table-cell office:value-type="float" office:value="732.006164550781">
            <text:p>732.0061645508</text:p>
          </table:table-cell>
          <table:table-cell office:value-type="float" office:value="-0.003898795">
            <text:p>-0.003898795</text:p>
          </table:table-cell>
          <table:table-cell table:number-columns-repeated="4"/>
        </table:table-row>
        <table:table-row table:style-name="ro1">
          <table:table-cell office:value-type="float" office:value="732.126403808594">
            <text:p>732.1264038086</text:p>
          </table:table-cell>
          <table:table-cell office:value-type="float" office:value="0.01803953">
            <text:p>0.01803953</text:p>
          </table:table-cell>
          <table:table-cell table:number-columns-repeated="4"/>
        </table:table-row>
        <table:table-row table:style-name="ro1">
          <table:table-cell office:value-type="float" office:value="732.246643066406">
            <text:p>732.2466430664</text:p>
          </table:table-cell>
          <table:table-cell office:value-type="float" office:value="-0.005436138">
            <text:p>-0.005436138</text:p>
          </table:table-cell>
          <table:table-cell table:number-columns-repeated="4"/>
        </table:table-row>
        <table:table-row table:style-name="ro1">
          <table:table-cell office:value-type="float" office:value="732.366882324219">
            <text:p>732.3668823242</text:p>
          </table:table-cell>
          <table:table-cell office:value-type="float" office:value="-0.007034209">
            <text:p>-0.007034209</text:p>
          </table:table-cell>
          <table:table-cell table:number-columns-repeated="4"/>
        </table:table-row>
        <table:table-row table:style-name="ro1">
          <table:table-cell office:value-type="float" office:value="732.487182617188">
            <text:p>732.4871826172</text:p>
          </table:table-cell>
          <table:table-cell office:value-type="float" office:value="-0.006944219">
            <text:p>-0.006944219</text:p>
          </table:table-cell>
          <table:table-cell table:number-columns-repeated="4"/>
        </table:table-row>
        <table:table-row table:style-name="ro1">
          <table:table-cell office:value-type="float" office:value="732.607421875">
            <text:p>732.607421875</text:p>
          </table:table-cell>
          <table:table-cell office:value-type="float" office:value="-0.002267088">
            <text:p>-0.002267088</text:p>
          </table:table-cell>
          <table:table-cell table:number-columns-repeated="4"/>
        </table:table-row>
        <table:table-row table:style-name="ro1">
          <table:table-cell office:value-type="float" office:value="732.727661132813">
            <text:p>732.7276611328</text:p>
          </table:table-cell>
          <table:table-cell office:value-type="float" office:value="0.003792865">
            <text:p>0.003792865</text:p>
          </table:table-cell>
          <table:table-cell table:number-columns-repeated="4"/>
        </table:table-row>
        <table:table-row table:style-name="ro1">
          <table:table-cell office:value-type="float" office:value="732.847900390625">
            <text:p>732.8479003906</text:p>
          </table:table-cell>
          <table:table-cell office:value-type="float" office:value="-0.004131202">
            <text:p>-0.004131202</text:p>
          </table:table-cell>
          <table:table-cell table:number-columns-repeated="4"/>
        </table:table-row>
        <table:table-row table:style-name="ro1">
          <table:table-cell office:value-type="float" office:value="732.968139648438">
            <text:p>732.9681396484</text:p>
          </table:table-cell>
          <table:table-cell office:value-type="float" office:value="-0.002922907">
            <text:p>-0.002922907</text:p>
          </table:table-cell>
          <table:table-cell table:number-columns-repeated="4"/>
        </table:table-row>
        <table:table-row table:style-name="ro1">
          <table:table-cell office:value-type="float" office:value="733.08837890625">
            <text:p>733.0883789063</text:p>
          </table:table-cell>
          <table:table-cell office:value-type="float" office:value="-0.006360619">
            <text:p>-0.006360619</text:p>
          </table:table-cell>
          <table:table-cell table:number-columns-repeated="4"/>
        </table:table-row>
        <table:table-row table:style-name="ro1">
          <table:table-cell office:value-type="float" office:value="733.208679199219">
            <text:p>733.2086791992</text:p>
          </table:table-cell>
          <table:table-cell office:value-type="float" office:value="-0.009119394">
            <text:p>-0.009119394</text:p>
          </table:table-cell>
          <table:table-cell table:number-columns-repeated="4"/>
        </table:table-row>
        <table:table-row table:style-name="ro1">
          <table:table-cell office:value-type="float" office:value="733.328918457031">
            <text:p>733.328918457</text:p>
          </table:table-cell>
          <table:table-cell office:value-type="float" office:value="-0.004744295">
            <text:p>-0.004744295</text:p>
          </table:table-cell>
          <table:table-cell table:number-columns-repeated="4"/>
        </table:table-row>
        <table:table-row table:style-name="ro1">
          <table:table-cell office:value-type="float" office:value="733.449157714844">
            <text:p>733.4491577148</text:p>
          </table:table-cell>
          <table:table-cell office:value-type="float" office:value="-0.001889729">
            <text:p>-0.001889729</text:p>
          </table:table-cell>
          <table:table-cell table:number-columns-repeated="4"/>
        </table:table-row>
        <table:table-row table:style-name="ro1">
          <table:table-cell office:value-type="float" office:value="733.569396972656">
            <text:p>733.5693969727</text:p>
          </table:table-cell>
          <table:table-cell office:value-type="float" office:value="0.001559336">
            <text:p>0.001559336</text:p>
          </table:table-cell>
          <table:table-cell table:number-columns-repeated="4"/>
        </table:table-row>
        <table:table-row table:style-name="ro1">
          <table:table-cell office:value-type="float" office:value="733.689636230469">
            <text:p>733.6896362305</text:p>
          </table:table-cell>
          <table:table-cell office:value-type="float" office:value="-0.003374959">
            <text:p>-0.003374959</text:p>
          </table:table-cell>
          <table:table-cell table:number-columns-repeated="4"/>
        </table:table-row>
        <table:table-row table:style-name="ro1">
          <table:table-cell office:value-type="float" office:value="733.809936523438">
            <text:p>733.8099365234</text:p>
          </table:table-cell>
          <table:table-cell office:value-type="float" office:value="-0.001844049">
            <text:p>-0.001844049</text:p>
          </table:table-cell>
          <table:table-cell table:number-columns-repeated="4"/>
        </table:table-row>
        <table:table-row table:style-name="ro1">
          <table:table-cell office:value-type="float" office:value="733.93017578125">
            <text:p>733.9301757813</text:p>
          </table:table-cell>
          <table:table-cell office:value-type="float" office:value="0.006152297">
            <text:p>0.006152297</text:p>
          </table:table-cell>
          <table:table-cell table:number-columns-repeated="4"/>
        </table:table-row>
        <table:table-row table:style-name="ro1">
          <table:table-cell office:value-type="float" office:value="734.050415039063">
            <text:p>734.0504150391</text:p>
          </table:table-cell>
          <table:table-cell office:value-type="float" office:value="-0.0003750961">
            <text:p>-0.0003750961</text:p>
          </table:table-cell>
          <table:table-cell table:number-columns-repeated="4"/>
        </table:table-row>
        <table:table-row table:style-name="ro1">
          <table:table-cell office:value-type="float" office:value="734.170654296875">
            <text:p>734.1706542969</text:p>
          </table:table-cell>
          <table:table-cell office:value-type="float" office:value="0.005821737">
            <text:p>0.005821737</text:p>
          </table:table-cell>
          <table:table-cell table:number-columns-repeated="4"/>
        </table:table-row>
        <table:table-row table:style-name="ro1">
          <table:table-cell office:value-type="float" office:value="734.290893554688">
            <text:p>734.2908935547</text:p>
          </table:table-cell>
          <table:table-cell office:value-type="float" office:value="-0.008186108">
            <text:p>-0.008186108</text:p>
          </table:table-cell>
          <table:table-cell table:number-columns-repeated="4"/>
        </table:table-row>
        <table:table-row table:style-name="ro1">
          <table:table-cell office:value-type="float" office:value="734.4111328125">
            <text:p>734.4111328125</text:p>
          </table:table-cell>
          <table:table-cell office:value-type="float" office:value="-0.01017121">
            <text:p>-0.01017121</text:p>
          </table:table-cell>
          <table:table-cell table:number-columns-repeated="4"/>
        </table:table-row>
        <table:table-row table:style-name="ro1">
          <table:table-cell office:value-type="float" office:value="734.531433105469">
            <text:p>734.5314331055</text:p>
          </table:table-cell>
          <table:table-cell office:value-type="float" office:value="-0.003233237">
            <text:p>-0.003233237</text:p>
          </table:table-cell>
          <table:table-cell table:number-columns-repeated="4"/>
        </table:table-row>
        <table:table-row table:style-name="ro1">
          <table:table-cell office:value-type="float" office:value="734.651672363281">
            <text:p>734.6516723633</text:p>
          </table:table-cell>
          <table:table-cell office:value-type="float" office:value="0.005697584">
            <text:p>0.005697584</text:p>
          </table:table-cell>
          <table:table-cell table:number-columns-repeated="4"/>
        </table:table-row>
        <table:table-row table:style-name="ro1">
          <table:table-cell office:value-type="float" office:value="734.771911621094">
            <text:p>734.7719116211</text:p>
          </table:table-cell>
          <table:table-cell office:value-type="float" office:value="-0.0006496643">
            <text:p>-0.0006496643</text:p>
          </table:table-cell>
          <table:table-cell table:number-columns-repeated="4"/>
        </table:table-row>
        <table:table-row table:style-name="ro1">
          <table:table-cell office:value-type="float" office:value="734.892150878906">
            <text:p>734.8921508789</text:p>
          </table:table-cell>
          <table:table-cell office:value-type="float" office:value="-0.009156136">
            <text:p>-0.009156136</text:p>
          </table:table-cell>
          <table:table-cell table:number-columns-repeated="4"/>
        </table:table-row>
        <table:table-row table:style-name="ro1">
          <table:table-cell office:value-type="float" office:value="735.012451171875">
            <text:p>735.0124511719</text:p>
          </table:table-cell>
          <table:table-cell office:value-type="float" office:value="-0.008205848">
            <text:p>-0.008205848</text:p>
          </table:table-cell>
          <table:table-cell table:number-columns-repeated="4"/>
        </table:table-row>
        <table:table-row table:style-name="ro1">
          <table:table-cell office:value-type="float" office:value="735.132690429688">
            <text:p>735.1326904297</text:p>
          </table:table-cell>
          <table:table-cell office:value-type="float" office:value="-0.001687542">
            <text:p>-0.001687542</text:p>
          </table:table-cell>
          <table:table-cell table:number-columns-repeated="4"/>
        </table:table-row>
        <table:table-row table:style-name="ro1">
          <table:table-cell office:value-type="float" office:value="735.2529296875">
            <text:p>735.2529296875</text:p>
          </table:table-cell>
          <table:table-cell office:value-type="float" office:value="0.01937302">
            <text:p>0.01937302</text:p>
          </table:table-cell>
          <table:table-cell table:number-columns-repeated="4"/>
        </table:table-row>
        <table:table-row table:style-name="ro1">
          <table:table-cell office:value-type="float" office:value="735.373168945313">
            <text:p>735.3731689453</text:p>
          </table:table-cell>
          <table:table-cell office:value-type="float" office:value="0.003215992">
            <text:p>0.003215992</text:p>
          </table:table-cell>
          <table:table-cell table:number-columns-repeated="4"/>
        </table:table-row>
        <table:table-row table:style-name="ro1">
          <table:table-cell office:value-type="float" office:value="735.493408203125">
            <text:p>735.4934082031</text:p>
          </table:table-cell>
          <table:table-cell office:value-type="float" office:value="-0.001727242">
            <text:p>-0.001727242</text:p>
          </table:table-cell>
          <table:table-cell table:number-columns-repeated="4"/>
        </table:table-row>
        <table:table-row table:style-name="ro1">
          <table:table-cell office:value-type="float" office:value="735.613708496094">
            <text:p>735.6137084961</text:p>
          </table:table-cell>
          <table:table-cell office:value-type="float" office:value="0.003556361">
            <text:p>0.003556361</text:p>
          </table:table-cell>
          <table:table-cell table:number-columns-repeated="4"/>
        </table:table-row>
        <table:table-row table:style-name="ro1">
          <table:table-cell office:value-type="float" office:value="735.733947753906">
            <text:p>735.7339477539</text:p>
          </table:table-cell>
          <table:table-cell office:value-type="float" office:value="0.005553383">
            <text:p>0.005553383</text:p>
          </table:table-cell>
          <table:table-cell table:number-columns-repeated="4"/>
        </table:table-row>
        <table:table-row table:style-name="ro1">
          <table:table-cell office:value-type="float" office:value="735.854187011719">
            <text:p>735.8541870117</text:p>
          </table:table-cell>
          <table:table-cell office:value-type="float" office:value="0.008327662">
            <text:p>0.008327662</text:p>
          </table:table-cell>
          <table:table-cell table:number-columns-repeated="4"/>
        </table:table-row>
        <table:table-row table:style-name="ro1">
          <table:table-cell office:value-type="float" office:value="735.974426269531">
            <text:p>735.9744262695</text:p>
          </table:table-cell>
          <table:table-cell office:value-type="float" office:value="0.001981626">
            <text:p>0.001981626</text:p>
          </table:table-cell>
          <table:table-cell table:number-columns-repeated="4"/>
        </table:table-row>
        <table:table-row table:style-name="ro1">
          <table:table-cell office:value-type="float" office:value="736.094665527344">
            <text:p>736.0946655273</text:p>
          </table:table-cell>
          <table:table-cell office:value-type="float" office:value="0.002577468">
            <text:p>0.002577468</text:p>
          </table:table-cell>
          <table:table-cell table:number-columns-repeated="4"/>
        </table:table-row>
        <table:table-row table:style-name="ro1">
          <table:table-cell office:value-type="float" office:value="736.214965820313">
            <text:p>736.2149658203</text:p>
          </table:table-cell>
          <table:table-cell office:value-type="float" office:value="-0.006576474">
            <text:p>-0.006576474</text:p>
          </table:table-cell>
          <table:table-cell table:number-columns-repeated="4"/>
        </table:table-row>
        <table:table-row table:style-name="ro1">
          <table:table-cell office:value-type="float" office:value="736.335205078125">
            <text:p>736.3352050781</text:p>
          </table:table-cell>
          <table:table-cell office:value-type="float" office:value="-0.0001582879">
            <text:p>-0.0001582879</text:p>
          </table:table-cell>
          <table:table-cell table:number-columns-repeated="4"/>
        </table:table-row>
        <table:table-row table:style-name="ro1">
          <table:table-cell office:value-type="float" office:value="736.455444335938">
            <text:p>736.4554443359</text:p>
          </table:table-cell>
          <table:table-cell office:value-type="float" office:value="0.004794262">
            <text:p>0.004794262</text:p>
          </table:table-cell>
          <table:table-cell table:number-columns-repeated="4"/>
        </table:table-row>
        <table:table-row table:style-name="ro1">
          <table:table-cell office:value-type="float" office:value="736.57568359375">
            <text:p>736.5756835938</text:p>
          </table:table-cell>
          <table:table-cell office:value-type="float" office:value="0.002786946">
            <text:p>0.002786946</text:p>
          </table:table-cell>
          <table:table-cell table:number-columns-repeated="4"/>
        </table:table-row>
        <table:table-row table:style-name="ro1">
          <table:table-cell office:value-type="float" office:value="736.695983886719">
            <text:p>736.6959838867</text:p>
          </table:table-cell>
          <table:table-cell office:value-type="float" office:value="0.01221534">
            <text:p>0.01221534</text:p>
          </table:table-cell>
          <table:table-cell table:number-columns-repeated="4"/>
        </table:table-row>
        <table:table-row table:style-name="ro1">
          <table:table-cell office:value-type="float" office:value="736.816223144531">
            <text:p>736.8162231445</text:p>
          </table:table-cell>
          <table:table-cell office:value-type="float" office:value="0.007786917">
            <text:p>0.007786917</text:p>
          </table:table-cell>
          <table:table-cell table:number-columns-repeated="4"/>
        </table:table-row>
        <table:table-row table:style-name="ro1">
          <table:table-cell office:value-type="float" office:value="736.936462402344">
            <text:p>736.9364624023</text:p>
          </table:table-cell>
          <table:table-cell office:value-type="float" office:value="0.01191976">
            <text:p>0.01191976</text:p>
          </table:table-cell>
          <table:table-cell table:number-columns-repeated="4"/>
        </table:table-row>
        <table:table-row table:style-name="ro1">
          <table:table-cell office:value-type="float" office:value="737.056701660156">
            <text:p>737.0567016602</text:p>
          </table:table-cell>
          <table:table-cell office:value-type="float" office:value="-0.002015991">
            <text:p>-0.002015991</text:p>
          </table:table-cell>
          <table:table-cell table:number-columns-repeated="4"/>
        </table:table-row>
        <table:table-row table:style-name="ro1">
          <table:table-cell office:value-type="float" office:value="737.177001953125">
            <text:p>737.1770019531</text:p>
          </table:table-cell>
          <table:table-cell office:value-type="float" office:value="0.004646985">
            <text:p>0.004646985</text:p>
          </table:table-cell>
          <table:table-cell table:number-columns-repeated="4"/>
        </table:table-row>
        <table:table-row table:style-name="ro1">
          <table:table-cell office:value-type="float" office:value="737.297241210938">
            <text:p>737.2972412109</text:p>
          </table:table-cell>
          <table:table-cell office:value-type="float" office:value="0.006282838">
            <text:p>0.006282838</text:p>
          </table:table-cell>
          <table:table-cell table:number-columns-repeated="4"/>
        </table:table-row>
        <table:table-row table:style-name="ro1">
          <table:table-cell office:value-type="float" office:value="737.41748046875">
            <text:p>737.4174804688</text:p>
          </table:table-cell>
          <table:table-cell office:value-type="float" office:value="0.002975118">
            <text:p>0.002975118</text:p>
          </table:table-cell>
          <table:table-cell table:number-columns-repeated="4"/>
        </table:table-row>
        <table:table-row table:style-name="ro1">
          <table:table-cell office:value-type="float" office:value="737.537719726563">
            <text:p>737.5377197266</text:p>
          </table:table-cell>
          <table:table-cell office:value-type="float" office:value="0.002132043">
            <text:p>0.002132043</text:p>
          </table:table-cell>
          <table:table-cell table:number-columns-repeated="4"/>
        </table:table-row>
        <table:table-row table:style-name="ro1">
          <table:table-cell office:value-type="float" office:value="737.658020019531">
            <text:p>737.6580200195</text:p>
          </table:table-cell>
          <table:table-cell office:value-type="float" office:value="-0.009304726">
            <text:p>-0.009304726</text:p>
          </table:table-cell>
          <table:table-cell table:number-columns-repeated="4"/>
        </table:table-row>
        <table:table-row table:style-name="ro1">
          <table:table-cell office:value-type="float" office:value="737.778259277344">
            <text:p>737.7782592773</text:p>
          </table:table-cell>
          <table:table-cell office:value-type="float" office:value="0.005092471">
            <text:p>0.005092471</text:p>
          </table:table-cell>
          <table:table-cell table:number-columns-repeated="4"/>
        </table:table-row>
        <table:table-row table:style-name="ro1">
          <table:table-cell office:value-type="float" office:value="737.898498535156">
            <text:p>737.8984985352</text:p>
          </table:table-cell>
          <table:table-cell office:value-type="float" office:value="0.001268498">
            <text:p>0.001268498</text:p>
          </table:table-cell>
          <table:table-cell table:number-columns-repeated="4"/>
        </table:table-row>
        <table:table-row table:style-name="ro1">
          <table:table-cell office:value-type="float" office:value="738.018737792969">
            <text:p>738.018737793</text:p>
          </table:table-cell>
          <table:table-cell office:value-type="float" office:value="0.004390442">
            <text:p>0.004390442</text:p>
          </table:table-cell>
          <table:table-cell table:number-columns-repeated="4"/>
        </table:table-row>
        <table:table-row table:style-name="ro1">
          <table:table-cell office:value-type="float" office:value="738.139038085938">
            <text:p>738.1390380859</text:p>
          </table:table-cell>
          <table:table-cell office:value-type="float" office:value="0.004100404">
            <text:p>0.004100404</text:p>
          </table:table-cell>
          <table:table-cell table:number-columns-repeated="4"/>
        </table:table-row>
        <table:table-row table:style-name="ro1">
          <table:table-cell office:value-type="float" office:value="738.25927734375">
            <text:p>738.2592773438</text:p>
          </table:table-cell>
          <table:table-cell office:value-type="float" office:value="-0.002507671">
            <text:p>-0.002507671</text:p>
          </table:table-cell>
          <table:table-cell table:number-columns-repeated="4"/>
        </table:table-row>
        <table:table-row table:style-name="ro1">
          <table:table-cell office:value-type="float" office:value="738.379516601563">
            <text:p>738.3795166016</text:p>
          </table:table-cell>
          <table:table-cell office:value-type="float" office:value="0.01600073">
            <text:p>0.01600073</text:p>
          </table:table-cell>
          <table:table-cell table:number-columns-repeated="4"/>
        </table:table-row>
        <table:table-row table:style-name="ro1">
          <table:table-cell office:value-type="float" office:value="738.499755859375">
            <text:p>738.4997558594</text:p>
          </table:table-cell>
          <table:table-cell office:value-type="float" office:value="0.004755205">
            <text:p>0.004755205</text:p>
          </table:table-cell>
          <table:table-cell table:number-columns-repeated="4"/>
        </table:table-row>
        <table:table-row table:style-name="ro1">
          <table:table-cell office:value-type="float" office:value="738.620056152344">
            <text:p>738.6200561523</text:p>
          </table:table-cell>
          <table:table-cell office:value-type="float" office:value="-0.005544273">
            <text:p>-0.005544273</text:p>
          </table:table-cell>
          <table:table-cell table:number-columns-repeated="4"/>
        </table:table-row>
        <table:table-row table:style-name="ro1">
          <table:table-cell office:value-type="float" office:value="738.740295410156">
            <text:p>738.7402954102</text:p>
          </table:table-cell>
          <table:table-cell office:value-type="float" office:value="-0.001800725">
            <text:p>-0.001800725</text:p>
          </table:table-cell>
          <table:table-cell table:number-columns-repeated="4"/>
        </table:table-row>
        <table:table-row table:style-name="ro1">
          <table:table-cell office:value-type="float" office:value="738.860534667969">
            <text:p>738.860534668</text:p>
          </table:table-cell>
          <table:table-cell office:value-type="float" office:value="-0.007070417">
            <text:p>-0.007070417</text:p>
          </table:table-cell>
          <table:table-cell table:number-columns-repeated="4"/>
        </table:table-row>
        <table:table-row table:style-name="ro1">
          <table:table-cell office:value-type="float" office:value="738.980773925781">
            <text:p>738.9807739258</text:p>
          </table:table-cell>
          <table:table-cell office:value-type="float" office:value="0.01223478">
            <text:p>0.01223478</text:p>
          </table:table-cell>
          <table:table-cell table:number-columns-repeated="4"/>
        </table:table-row>
        <table:table-row table:style-name="ro1">
          <table:table-cell office:value-type="float" office:value="739.10107421875">
            <text:p>739.1010742188</text:p>
          </table:table-cell>
          <table:table-cell office:value-type="float" office:value="-0.003577496">
            <text:p>-0.003577496</text:p>
          </table:table-cell>
          <table:table-cell table:number-columns-repeated="4"/>
        </table:table-row>
        <table:table-row table:style-name="ro1">
          <table:table-cell office:value-type="float" office:value="739.221313476563">
            <text:p>739.2213134766</text:p>
          </table:table-cell>
          <table:table-cell office:value-type="float" office:value="0.00774039">
            <text:p>0.00774039</text:p>
          </table:table-cell>
          <table:table-cell table:number-columns-repeated="4"/>
        </table:table-row>
        <table:table-row table:style-name="ro1">
          <table:table-cell office:value-type="float" office:value="739.341552734375">
            <text:p>739.3415527344</text:p>
          </table:table-cell>
          <table:table-cell office:value-type="float" office:value="-0.0002107702">
            <text:p>-0.0002107702</text:p>
          </table:table-cell>
          <table:table-cell table:number-columns-repeated="4"/>
        </table:table-row>
        <table:table-row table:style-name="ro1">
          <table:table-cell office:value-type="float" office:value="739.461791992188">
            <text:p>739.4617919922</text:p>
          </table:table-cell>
          <table:table-cell office:value-type="string">
            <text:p>-2.811523E-05</text:p>
          </table:table-cell>
          <table:table-cell table:number-columns-repeated="4"/>
        </table:table-row>
        <table:table-row table:style-name="ro1">
          <table:table-cell office:value-type="float" office:value="739.582092285156">
            <text:p>739.5820922852</text:p>
          </table:table-cell>
          <table:table-cell office:value-type="float" office:value="-0.004979913">
            <text:p>-0.004979913</text:p>
          </table:table-cell>
          <table:table-cell table:number-columns-repeated="4"/>
        </table:table-row>
        <table:table-row table:style-name="ro1">
          <table:table-cell office:value-type="float" office:value="739.702331542969">
            <text:p>739.702331543</text:p>
          </table:table-cell>
          <table:table-cell office:value-type="float" office:value="-0.01127071">
            <text:p>-0.01127071</text:p>
          </table:table-cell>
          <table:table-cell table:number-columns-repeated="4"/>
        </table:table-row>
        <table:table-row table:style-name="ro1">
          <table:table-cell office:value-type="float" office:value="739.822570800781">
            <text:p>739.8225708008</text:p>
          </table:table-cell>
          <table:table-cell office:value-type="float" office:value="-0.004090992">
            <text:p>-0.004090992</text:p>
          </table:table-cell>
          <table:table-cell table:number-columns-repeated="4"/>
        </table:table-row>
        <table:table-row table:style-name="ro1">
          <table:table-cell office:value-type="float" office:value="739.942810058594">
            <text:p>739.9428100586</text:p>
          </table:table-cell>
          <table:table-cell office:value-type="float" office:value="-0.0113537">
            <text:p>-0.0113537</text:p>
          </table:table-cell>
          <table:table-cell table:number-columns-repeated="4"/>
        </table:table-row>
        <table:table-row table:style-name="ro1">
          <table:table-cell office:value-type="float" office:value="740.063110351563">
            <text:p>740.0631103516</text:p>
          </table:table-cell>
          <table:table-cell office:value-type="float" office:value="-0.005569329">
            <text:p>-0.005569329</text:p>
          </table:table-cell>
          <table:table-cell table:number-columns-repeated="4"/>
        </table:table-row>
        <table:table-row table:style-name="ro1">
          <table:table-cell office:value-type="float" office:value="740.183349609375">
            <text:p>740.1833496094</text:p>
          </table:table-cell>
          <table:table-cell office:value-type="float" office:value="-0.004157092">
            <text:p>-0.004157092</text:p>
          </table:table-cell>
          <table:table-cell table:number-columns-repeated="4"/>
        </table:table-row>
        <table:table-row table:style-name="ro1">
          <table:table-cell office:value-type="float" office:value="740.303588867188">
            <text:p>740.3035888672</text:p>
          </table:table-cell>
          <table:table-cell office:value-type="float" office:value="-0.002277307">
            <text:p>-0.002277307</text:p>
          </table:table-cell>
          <table:table-cell table:number-columns-repeated="4"/>
        </table:table-row>
        <table:table-row table:style-name="ro1">
          <table:table-cell office:value-type="float" office:value="740.423889160156">
            <text:p>740.4238891602</text:p>
          </table:table-cell>
          <table:table-cell office:value-type="float" office:value="0.009273239">
            <text:p>0.009273239</text:p>
          </table:table-cell>
          <table:table-cell table:number-columns-repeated="4"/>
        </table:table-row>
        <table:table-row table:style-name="ro1">
          <table:table-cell office:value-type="float" office:value="740.544128417969">
            <text:p>740.544128418</text:p>
          </table:table-cell>
          <table:table-cell office:value-type="float" office:value="0.01414009">
            <text:p>0.01414009</text:p>
          </table:table-cell>
          <table:table-cell table:number-columns-repeated="4"/>
        </table:table-row>
        <table:table-row table:style-name="ro1">
          <table:table-cell office:value-type="float" office:value="740.664367675781">
            <text:p>740.6643676758</text:p>
          </table:table-cell>
          <table:table-cell office:value-type="float" office:value="-0.009240786">
            <text:p>-0.009240786</text:p>
          </table:table-cell>
          <table:table-cell table:number-columns-repeated="4"/>
        </table:table-row>
        <table:table-row table:style-name="ro1">
          <table:table-cell office:value-type="float" office:value="740.784606933594">
            <text:p>740.7846069336</text:p>
          </table:table-cell>
          <table:table-cell office:value-type="float" office:value="0.008067625">
            <text:p>0.008067625</text:p>
          </table:table-cell>
          <table:table-cell table:number-columns-repeated="4"/>
        </table:table-row>
        <table:table-row table:style-name="ro1">
          <table:table-cell office:value-type="float" office:value="740.904907226563">
            <text:p>740.9049072266</text:p>
          </table:table-cell>
          <table:table-cell office:value-type="float" office:value="0.0001618248">
            <text:p>0.0001618248</text:p>
          </table:table-cell>
          <table:table-cell table:number-columns-repeated="4"/>
        </table:table-row>
        <table:table-row table:style-name="ro1">
          <table:table-cell office:value-type="float" office:value="741.025146484375">
            <text:p>741.0251464844</text:p>
          </table:table-cell>
          <table:table-cell office:value-type="float" office:value="-0.008044597">
            <text:p>-0.008044597</text:p>
          </table:table-cell>
          <table:table-cell table:number-columns-repeated="4"/>
        </table:table-row>
        <table:table-row table:style-name="ro1">
          <table:table-cell office:value-type="float" office:value="741.145385742188">
            <text:p>741.1453857422</text:p>
          </table:table-cell>
          <table:table-cell office:value-type="float" office:value="-0.006233589">
            <text:p>-0.006233589</text:p>
          </table:table-cell>
          <table:table-cell table:number-columns-repeated="4"/>
        </table:table-row>
        <table:table-row table:style-name="ro1">
          <table:table-cell office:value-type="float" office:value="741.265625">
            <text:p>741.265625</text:p>
          </table:table-cell>
          <table:table-cell office:value-type="float" office:value="0.02448891">
            <text:p>0.02448891</text:p>
          </table:table-cell>
          <table:table-cell table:number-columns-repeated="4"/>
        </table:table-row>
        <table:table-row table:style-name="ro1">
          <table:table-cell office:value-type="float" office:value="741.385925292969">
            <text:p>741.385925293</text:p>
          </table:table-cell>
          <table:table-cell office:value-type="float" office:value="-0.007603536">
            <text:p>-0.007603536</text:p>
          </table:table-cell>
          <table:table-cell table:number-columns-repeated="4"/>
        </table:table-row>
        <table:table-row table:style-name="ro1">
          <table:table-cell office:value-type="float" office:value="741.506164550781">
            <text:p>741.5061645508</text:p>
          </table:table-cell>
          <table:table-cell office:value-type="float" office:value="-0.0005487578">
            <text:p>-0.0005487578</text:p>
          </table:table-cell>
          <table:table-cell table:number-columns-repeated="4"/>
        </table:table-row>
        <table:table-row table:style-name="ro1">
          <table:table-cell office:value-type="float" office:value="741.626403808594">
            <text:p>741.6264038086</text:p>
          </table:table-cell>
          <table:table-cell office:value-type="float" office:value="0.009978903">
            <text:p>0.009978903</text:p>
          </table:table-cell>
          <table:table-cell table:number-columns-repeated="4"/>
        </table:table-row>
        <table:table-row table:style-name="ro1">
          <table:table-cell office:value-type="float" office:value="741.746704101563">
            <text:p>741.7467041016</text:p>
          </table:table-cell>
          <table:table-cell office:value-type="float" office:value="-0.0009998402">
            <text:p>-0.0009998402</text:p>
          </table:table-cell>
          <table:table-cell table:number-columns-repeated="4"/>
        </table:table-row>
        <table:table-row table:style-name="ro1">
          <table:table-cell office:value-type="float" office:value="741.866943359375">
            <text:p>741.8669433594</text:p>
          </table:table-cell>
          <table:table-cell office:value-type="float" office:value="0.01906606">
            <text:p>0.01906606</text:p>
          </table:table-cell>
          <table:table-cell table:number-columns-repeated="4"/>
        </table:table-row>
        <table:table-row table:style-name="ro1">
          <table:table-cell office:value-type="float" office:value="741.987182617188">
            <text:p>741.9871826172</text:p>
          </table:table-cell>
          <table:table-cell office:value-type="float" office:value="-0.003990329">
            <text:p>-0.003990329</text:p>
          </table:table-cell>
          <table:table-cell table:number-columns-repeated="4"/>
        </table:table-row>
        <table:table-row table:style-name="ro1">
          <table:table-cell office:value-type="float" office:value="742.107421875">
            <text:p>742.107421875</text:p>
          </table:table-cell>
          <table:table-cell office:value-type="float" office:value="0.005675144">
            <text:p>0.005675144</text:p>
          </table:table-cell>
          <table:table-cell table:number-columns-repeated="4"/>
        </table:table-row>
        <table:table-row table:style-name="ro1">
          <table:table-cell office:value-type="float" office:value="742.227722167969">
            <text:p>742.227722168</text:p>
          </table:table-cell>
          <table:table-cell office:value-type="float" office:value="0.007566161">
            <text:p>0.007566161</text:p>
          </table:table-cell>
          <table:table-cell table:number-columns-repeated="4"/>
        </table:table-row>
        <table:table-row table:style-name="ro1">
          <table:table-cell office:value-type="float" office:value="742.347961425781">
            <text:p>742.3479614258</text:p>
          </table:table-cell>
          <table:table-cell office:value-type="float" office:value="0.001958368">
            <text:p>0.001958368</text:p>
          </table:table-cell>
          <table:table-cell table:number-columns-repeated="4"/>
        </table:table-row>
        <table:table-row table:style-name="ro1">
          <table:table-cell office:value-type="float" office:value="742.468200683594">
            <text:p>742.4682006836</text:p>
          </table:table-cell>
          <table:table-cell office:value-type="float" office:value="-0.007165482">
            <text:p>-0.007165482</text:p>
          </table:table-cell>
          <table:table-cell table:number-columns-repeated="4"/>
        </table:table-row>
        <table:table-row table:style-name="ro1">
          <table:table-cell office:value-type="float" office:value="742.588439941406">
            <text:p>742.5884399414</text:p>
          </table:table-cell>
          <table:table-cell office:value-type="float" office:value="-0.001095809">
            <text:p>-0.001095809</text:p>
          </table:table-cell>
          <table:table-cell table:number-columns-repeated="4"/>
        </table:table-row>
        <table:table-row table:style-name="ro1">
          <table:table-cell office:value-type="float" office:value="742.708740234375">
            <text:p>742.7087402344</text:p>
          </table:table-cell>
          <table:table-cell office:value-type="float" office:value="-0.002571366">
            <text:p>-0.002571366</text:p>
          </table:table-cell>
          <table:table-cell table:number-columns-repeated="4"/>
        </table:table-row>
        <table:table-row table:style-name="ro1">
          <table:table-cell office:value-type="float" office:value="742.828979492188">
            <text:p>742.8289794922</text:p>
          </table:table-cell>
          <table:table-cell office:value-type="float" office:value="-0.004683041">
            <text:p>-0.004683041</text:p>
          </table:table-cell>
          <table:table-cell table:number-columns-repeated="4"/>
        </table:table-row>
        <table:table-row table:style-name="ro1">
          <table:table-cell office:value-type="float" office:value="742.94921875">
            <text:p>742.94921875</text:p>
          </table:table-cell>
          <table:table-cell office:value-type="float" office:value="0.004198">
            <text:p>0.004198</text:p>
          </table:table-cell>
          <table:table-cell table:number-columns-repeated="4"/>
        </table:table-row>
        <table:table-row table:style-name="ro1">
          <table:table-cell office:value-type="float" office:value="743.069519042969">
            <text:p>743.069519043</text:p>
          </table:table-cell>
          <table:table-cell office:value-type="float" office:value="0.01330531">
            <text:p>0.01330531</text:p>
          </table:table-cell>
          <table:table-cell table:number-columns-repeated="4"/>
        </table:table-row>
        <table:table-row table:style-name="ro1">
          <table:table-cell office:value-type="float" office:value="743.189758300781">
            <text:p>743.1897583008</text:p>
          </table:table-cell>
          <table:table-cell office:value-type="float" office:value="0.0001039733">
            <text:p>0.0001039733</text:p>
          </table:table-cell>
          <table:table-cell table:number-columns-repeated="4"/>
        </table:table-row>
        <table:table-row table:style-name="ro1">
          <table:table-cell office:value-type="float" office:value="743.309997558594">
            <text:p>743.3099975586</text:p>
          </table:table-cell>
          <table:table-cell office:value-type="float" office:value="-0.0117304">
            <text:p>-0.0117304</text:p>
          </table:table-cell>
          <table:table-cell table:number-columns-repeated="4"/>
        </table:table-row>
        <table:table-row table:style-name="ro1">
          <table:table-cell office:value-type="float" office:value="743.430236816406">
            <text:p>743.4302368164</text:p>
          </table:table-cell>
          <table:table-cell office:value-type="float" office:value="0.002884467">
            <text:p>0.002884467</text:p>
          </table:table-cell>
          <table:table-cell table:number-columns-repeated="4"/>
        </table:table-row>
        <table:table-row table:style-name="ro1">
          <table:table-cell office:value-type="float" office:value="743.550537109375">
            <text:p>743.5505371094</text:p>
          </table:table-cell>
          <table:table-cell office:value-type="float" office:value="-0.009619131">
            <text:p>-0.009619131</text:p>
          </table:table-cell>
          <table:table-cell table:number-columns-repeated="4"/>
        </table:table-row>
        <table:table-row table:style-name="ro1">
          <table:table-cell office:value-type="float" office:value="743.670776367188">
            <text:p>743.6707763672</text:p>
          </table:table-cell>
          <table:table-cell office:value-type="float" office:value="-0.007639721">
            <text:p>-0.007639721</text:p>
          </table:table-cell>
          <table:table-cell table:number-columns-repeated="4"/>
        </table:table-row>
        <table:table-row table:style-name="ro1">
          <table:table-cell office:value-type="float" office:value="743.791015625">
            <text:p>743.791015625</text:p>
          </table:table-cell>
          <table:table-cell office:value-type="float" office:value="-0.007924575">
            <text:p>-0.007924575</text:p>
          </table:table-cell>
          <table:table-cell table:number-columns-repeated="4"/>
        </table:table-row>
        <table:table-row table:style-name="ro1">
          <table:table-cell office:value-type="float" office:value="743.911254882813">
            <text:p>743.9112548828</text:p>
          </table:table-cell>
          <table:table-cell office:value-type="float" office:value="0.03345027">
            <text:p>0.03345027</text:p>
          </table:table-cell>
          <table:table-cell table:number-columns-repeated="4"/>
        </table:table-row>
        <table:table-row table:style-name="ro1">
          <table:table-cell office:value-type="float" office:value="744.031555175781">
            <text:p>744.0315551758</text:p>
          </table:table-cell>
          <table:table-cell office:value-type="float" office:value="-0.008642629">
            <text:p>-0.008642629</text:p>
          </table:table-cell>
          <table:table-cell table:number-columns-repeated="4"/>
        </table:table-row>
        <table:table-row table:style-name="ro1">
          <table:table-cell office:value-type="float" office:value="744.151794433594">
            <text:p>744.1517944336</text:p>
          </table:table-cell>
          <table:table-cell office:value-type="float" office:value="-0.06017993">
            <text:p>-0.06017993</text:p>
          </table:table-cell>
          <table:table-cell table:number-columns-repeated="4"/>
        </table:table-row>
        <table:table-row table:style-name="ro1">
          <table:table-cell office:value-type="float" office:value="744.272033691406">
            <text:p>744.2720336914</text:p>
          </table:table-cell>
          <table:table-cell office:value-type="float" office:value="-0.06122516">
            <text:p>-0.06122516</text:p>
          </table:table-cell>
          <table:table-cell table:number-columns-repeated="4"/>
        </table:table-row>
        <table:table-row table:style-name="ro1">
          <table:table-cell office:value-type="float" office:value="744.392333984375">
            <text:p>744.3923339844</text:p>
          </table:table-cell>
          <table:table-cell office:value-type="float" office:value="-0.06361131">
            <text:p>-0.06361131</text:p>
          </table:table-cell>
          <table:table-cell table:number-columns-repeated="4"/>
        </table:table-row>
        <table:table-row table:style-name="ro1">
          <table:table-cell office:value-type="float" office:value="744.512573242188">
            <text:p>744.5125732422</text:p>
          </table:table-cell>
          <table:table-cell office:value-type="float" office:value="-0.06356826">
            <text:p>-0.06356826</text:p>
          </table:table-cell>
          <table:table-cell table:number-columns-repeated="4"/>
        </table:table-row>
        <table:table-row table:style-name="ro1">
          <table:table-cell office:value-type="float" office:value="744.6328125">
            <text:p>744.6328125</text:p>
          </table:table-cell>
          <table:table-cell office:value-type="float" office:value="-0.06405681">
            <text:p>-0.06405681</text:p>
          </table:table-cell>
          <table:table-cell table:number-columns-repeated="4"/>
        </table:table-row>
        <table:table-row table:style-name="ro1">
          <table:table-cell office:value-type="float" office:value="744.753051757813">
            <text:p>744.7530517578</text:p>
          </table:table-cell>
          <table:table-cell office:value-type="float" office:value="-0.06395926">
            <text:p>-0.0639592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9">06/29/2026</text:date>, <text:time>12:5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29T12:04:29.74</meta:creation-date>
    <dc:date>2026-06-29T12:54:49.75</dc:date>
    <meta:editing-duration>PT7M20S</meta:editing-duration>
    <meta:editing-cycles>1</meta:editing-cycles>
    <meta:generator>OpenOffice/4.1.10$Win32 OpenOffice.org_project/4110m2$Build-9807</meta:generator>
    <meta:document-statistic meta:table-count="3" meta:cell-count="72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93cm" svg:y="4.188cm" style:legend-expansion="high" chart:style-name="ch2"/>
        <chart:plot-area chart:style-name="ch3" table:cell-range-address="Sheet1.A1:Sheet1.B3649" chart:data-source-has-labels="row" svg:x="0.77cm" svg:y="0.855cm" svg:width="11.983cm" svg:height="7.545cm">
          <chartooo:coordinate-region svg:x="1.788cm" svg:y="1.067cm" svg:width="10.685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649" chart:label-cell-address="Sheet1.B1:Sheet1.B1" chart:class="chart:scatter">
            <chart:domain table:cell-range-address="Sheet1.A2:Sheet1.A3649"/>
            <chart:data-point chart:repeated="36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[Intensity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.5908203125">
                <text:p>321.5908203125</text:p>
                <draw:g>
                  <svg:desc>Sheet1.A2:Sheet1.A3649</svg:desc>
                </draw:g>
              </table:table-cell>
              <table:table-cell office:value-type="float" office:value="0.007389942">
                <text:p>0.007389942</text:p>
                <draw:g>
                  <svg:desc>Sheet1.B2:Sheet1.B36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1.698333740234">
                <text:p>321.698333740234</text:p>
              </table:table-cell>
              <table:table-cell office:value-type="float" office:value="0.001467245">
                <text:p>0.001467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.805877685547">
                <text:p>321.805877685547</text:p>
              </table:table-cell>
              <table:table-cell office:value-type="float" office:value="0.002952607">
                <text:p>0.002952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1.913421630859">
                <text:p>321.913421630859</text:p>
              </table:table-cell>
              <table:table-cell office:value-type="float" office:value="0.0135094">
                <text:p>0.0135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2.020965576172">
                <text:p>322.020965576172</text:p>
              </table:table-cell>
              <table:table-cell office:value-type="float" office:value="0.009140628">
                <text:p>0.0091406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.128540039063">
                <text:p>322.128540039063</text:p>
              </table:table-cell>
              <table:table-cell office:value-type="float" office:value="0.004829726">
                <text:p>0.004829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2.236083984375">
                <text:p>322.236083984375</text:p>
              </table:table-cell>
              <table:table-cell office:value-type="float" office:value="0.01768567">
                <text:p>0.017685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.343658447266">
                <text:p>322.343658447266</text:p>
              </table:table-cell>
              <table:table-cell office:value-type="float" office:value="-0.001519775">
                <text:p>-0.001519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2.451232910156">
                <text:p>322.451232910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2.558837890625">
                <text:p>322.558837890625</text:p>
              </table:table-cell>
              <table:table-cell office:value-type="float" office:value="0.006631892">
                <text:p>0.0066318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2.666412353516">
                <text:p>322.666412353516</text:p>
              </table:table-cell>
              <table:table-cell office:value-type="float" office:value="0.01035947">
                <text:p>0.01035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.774017333984">
                <text:p>322.774017333984</text:p>
              </table:table-cell>
              <table:table-cell office:value-type="float" office:value="0.01323275">
                <text:p>0.01323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2.881622314453">
                <text:p>322.881622314453</text:p>
              </table:table-cell>
              <table:table-cell office:value-type="float" office:value="-0.002651266">
                <text:p>-0.002651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2.989227294922">
                <text:p>322.989227294922</text:p>
              </table:table-cell>
              <table:table-cell office:value-type="float" office:value="0.002524267">
                <text:p>0.0025242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.096862792969">
                <text:p>323.096862792969</text:p>
              </table:table-cell>
              <table:table-cell office:value-type="float" office:value="0.0004155988">
                <text:p>0.0004155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3.204498291016">
                <text:p>323.204498291016</text:p>
              </table:table-cell>
              <table:table-cell office:value-type="float" office:value="0.007684221">
                <text:p>0.007684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3.312133789063">
                <text:p>323.312133789063</text:p>
              </table:table-cell>
              <table:table-cell office:value-type="float" office:value="-0.002970457">
                <text:p>-0.0029704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3.419769287109">
                <text:p>323.419769287109</text:p>
              </table:table-cell>
              <table:table-cell office:value-type="float" office:value="0.0028403">
                <text:p>0.0028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3.527404785156">
                <text:p>323.527404785156</text:p>
              </table:table-cell>
              <table:table-cell office:value-type="float" office:value="0.04304658">
                <text:p>0.043046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.635070800781">
                <text:p>323.635070800781</text:p>
              </table:table-cell>
              <table:table-cell office:value-type="float" office:value="-0.008047348">
                <text:p>-0.0080473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3.742736816406">
                <text:p>323.742736816406</text:p>
              </table:table-cell>
              <table:table-cell office:value-type="float" office:value="-0.003929882">
                <text:p>-0.0039298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3.850402832031">
                <text:p>323.850402832031</text:p>
              </table:table-cell>
              <table:table-cell office:value-type="float" office:value="0.01121777">
                <text:p>0.011217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.958068847656">
                <text:p>323.958068847656</text:p>
              </table:table-cell>
              <table:table-cell office:value-type="float" office:value="0.01874221">
                <text:p>0.018742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4.065765380859">
                <text:p>324.065765380859</text:p>
              </table:table-cell>
              <table:table-cell office:value-type="float" office:value="-0.001899137">
                <text:p>-0.0018991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.173461914063">
                <text:p>324.173461914063</text:p>
              </table:table-cell>
              <table:table-cell office:value-type="float" office:value="-0.006122179">
                <text:p>-0.0061221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4.281158447266">
                <text:p>324.281158447266</text:p>
              </table:table-cell>
              <table:table-cell office:value-type="float" office:value="0.004633333">
                <text:p>0.0046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.388854980469">
                <text:p>324.388854980469</text:p>
              </table:table-cell>
              <table:table-cell office:value-type="float" office:value="-0.004448547">
                <text:p>-0.0044485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4.496551513672">
                <text:p>324.496551513672</text:p>
              </table:table-cell>
              <table:table-cell office:value-type="float" office:value="0.00250237">
                <text:p>0.002502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4.604278564453">
                <text:p>324.604278564453</text:p>
              </table:table-cell>
              <table:table-cell office:value-type="float" office:value="0.009683485">
                <text:p>0.0096834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.712005615234">
                <text:p>324.712005615234</text:p>
              </table:table-cell>
              <table:table-cell office:value-type="float" office:value="0.004101159">
                <text:p>0.004101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4.819732666016">
                <text:p>324.819732666016</text:p>
              </table:table-cell>
              <table:table-cell office:value-type="float" office:value="0.001411476">
                <text:p>0.0014114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4.927490234375">
                <text:p>324.927490234375</text:p>
              </table:table-cell>
              <table:table-cell office:value-type="float" office:value="0.02012357">
                <text:p>0.020123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5.035217285156">
                <text:p>325.035217285156</text:p>
              </table:table-cell>
              <table:table-cell office:value-type="float" office:value="-0.009387941">
                <text:p>-0.0093879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.142974853516">
                <text:p>325.142974853516</text:p>
              </table:table-cell>
              <table:table-cell office:value-type="float" office:value="0.001870475">
                <text:p>0.0018704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5.250732421875">
                <text:p>325.250732421875</text:p>
              </table:table-cell>
              <table:table-cell office:value-type="float" office:value="0.0004673724">
                <text:p>0.0004673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5.358489990234">
                <text:p>325.358489990234</text:p>
              </table:table-cell>
              <table:table-cell office:value-type="float" office:value="-0.004286614">
                <text:p>-0.0042866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5.466278076172">
                <text:p>325.466278076172</text:p>
              </table:table-cell>
              <table:table-cell office:value-type="float" office:value="0.002010032">
                <text:p>0.0020100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5.574066162109">
                <text:p>325.574066162109</text:p>
              </table:table-cell>
              <table:table-cell office:value-type="float" office:value="0.004993493">
                <text:p>0.0049934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5.681854248047">
                <text:p>325.681854248047</text:p>
              </table:table-cell>
              <table:table-cell office:value-type="float" office:value="0.00399382">
                <text:p>0.003993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5.789642333984">
                <text:p>325.789642333984</text:p>
              </table:table-cell>
              <table:table-cell office:value-type="float" office:value="0.005955778">
                <text:p>0.0059557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5.897430419922">
                <text:p>325.897430419922</text:p>
              </table:table-cell>
              <table:table-cell office:value-type="float" office:value="0.002894027">
                <text:p>0.0028940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6.005249023438">
                <text:p>326.005249023438</text:p>
              </table:table-cell>
              <table:table-cell office:value-type="float" office:value="0.000194122">
                <text:p>0.0001941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6.113067626953">
                <text:p>326.113067626953</text:p>
              </table:table-cell>
              <table:table-cell office:value-type="float" office:value="0.007540032">
                <text:p>0.0075400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6.220886230469">
                <text:p>326.220886230469</text:p>
              </table:table-cell>
              <table:table-cell office:value-type="float" office:value="0.01842519">
                <text:p>0.018425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.328704833984">
                <text:p>326.328704833984</text:p>
              </table:table-cell>
              <table:table-cell office:value-type="float" office:value="-0.004551829">
                <text:p>-0.0045518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6.436553955078">
                <text:p>326.436553955078</text:p>
              </table:table-cell>
              <table:table-cell office:value-type="float" office:value="0.0101626">
                <text:p>0.01016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6.544403076172">
                <text:p>326.544403076172</text:p>
              </table:table-cell>
              <table:table-cell office:value-type="float" office:value="0.02583031">
                <text:p>0.025830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6.652252197266">
                <text:p>326.652252197266</text:p>
              </table:table-cell>
              <table:table-cell office:value-type="float" office:value="0.01934786">
                <text:p>0.019347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6.760101318359">
                <text:p>326.760101318359</text:p>
              </table:table-cell>
              <table:table-cell office:value-type="float" office:value="0.005619124">
                <text:p>0.0056191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6.867950439453">
                <text:p>326.867950439453</text:p>
              </table:table-cell>
              <table:table-cell office:value-type="float" office:value="0.01050773">
                <text:p>0.010507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6.975830078125">
                <text:p>326.975830078125</text:p>
              </table:table-cell>
              <table:table-cell office:value-type="float" office:value="0.003617068">
                <text:p>0.0036170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.083709716797">
                <text:p>327.083709716797</text:p>
              </table:table-cell>
              <table:table-cell office:value-type="float" office:value="0.007344233">
                <text:p>0.0073442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7.191589355469">
                <text:p>327.191589355469</text:p>
              </table:table-cell>
              <table:table-cell office:value-type="float" office:value="-0.001629738">
                <text:p>-0.0016297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.299499511719">
                <text:p>327.299499511719</text:p>
              </table:table-cell>
              <table:table-cell office:value-type="float" office:value="0.00487369">
                <text:p>0.004873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407379150391">
                <text:p>327.407379150391</text:p>
              </table:table-cell>
              <table:table-cell office:value-type="float" office:value="0.02140358">
                <text:p>0.021403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.515289306641">
                <text:p>327.515289306641</text:p>
              </table:table-cell>
              <table:table-cell office:value-type="float" office:value="-0.003061289">
                <text:p>-0.003061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7.623199462891">
                <text:p>327.623199462891</text:p>
              </table:table-cell>
              <table:table-cell office:value-type="float" office:value="0.01017511">
                <text:p>0.010175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7.731109619141">
                <text:p>327.731109619141</text:p>
              </table:table-cell>
              <table:table-cell office:value-type="float" office:value="-0.004016445">
                <text:p>-0.0040164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7.839050292969">
                <text:p>327.839050292969</text:p>
              </table:table-cell>
              <table:table-cell office:value-type="float" office:value="-0.008553262">
                <text:p>-0.0085532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7.946990966797">
                <text:p>327.946990966797</text:p>
              </table:table-cell>
              <table:table-cell office:value-type="float" office:value="-0.001378888">
                <text:p>-0.0013788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8.054931640625">
                <text:p>328.054931640625</text:p>
              </table:table-cell>
              <table:table-cell office:value-type="float" office:value="0.004023732">
                <text:p>0.0040237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8.162872314453">
                <text:p>328.162872314453</text:p>
              </table:table-cell>
              <table:table-cell office:value-type="float" office:value="0.006968047">
                <text:p>0.0069680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8.270812988281">
                <text:p>328.270812988281</text:p>
              </table:table-cell>
              <table:table-cell office:value-type="float" office:value="-0.003743216">
                <text:p>-0.0037432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8.378784179688">
                <text:p>328.378784179688</text:p>
              </table:table-cell>
              <table:table-cell office:value-type="float" office:value="-0.002111235">
                <text:p>-0.0021112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.486755371094">
                <text:p>328.486755371094</text:p>
              </table:table-cell>
              <table:table-cell office:value-type="float" office:value="-0.009776313">
                <text:p>-0.009776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8.5947265625">
                <text:p>328.5947265625</text:p>
              </table:table-cell>
              <table:table-cell office:value-type="float" office:value="0.002567664">
                <text:p>0.0025676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8.702697753906">
                <text:p>328.702697753906</text:p>
              </table:table-cell>
              <table:table-cell office:value-type="float" office:value="0.02457961">
                <text:p>0.024579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8.810699462891">
                <text:p>328.810699462891</text:p>
              </table:table-cell>
              <table:table-cell office:value-type="float" office:value="0.001779334">
                <text:p>0.0017793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.918670654297">
                <text:p>328.918670654297</text:p>
              </table:table-cell>
              <table:table-cell office:value-type="float" office:value="0.009056792">
                <text:p>0.0090567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9.026672363281">
                <text:p>329.026672363281</text:p>
              </table:table-cell>
              <table:table-cell office:value-type="float" office:value="0.009018494">
                <text:p>0.0090184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9.134704589844">
                <text:p>329.134704589844</text:p>
              </table:table-cell>
              <table:table-cell office:value-type="float" office:value="0.01791959">
                <text:p>0.017919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9.242706298828">
                <text:p>329.242706298828</text:p>
              </table:table-cell>
              <table:table-cell office:value-type="float" office:value="-0.002703521">
                <text:p>-0.0027035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9.350738525391">
                <text:p>329.350738525391</text:p>
              </table:table-cell>
              <table:table-cell office:value-type="float" office:value="-0.003598753">
                <text:p>-0.0035987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9.458770751953">
                <text:p>329.458770751953</text:p>
              </table:table-cell>
              <table:table-cell office:value-type="float" office:value="0.0006884856">
                <text:p>0.00068848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9.566802978516">
                <text:p>329.566802978516</text:p>
              </table:table-cell>
              <table:table-cell office:value-type="float" office:value="0.002976625">
                <text:p>0.002976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9.674835205078">
                <text:p>329.674835205078</text:p>
              </table:table-cell>
              <table:table-cell office:value-type="float" office:value="-0.003100872">
                <text:p>-0.0031008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9.782897949219">
                <text:p>329.782897949219</text:p>
              </table:table-cell>
              <table:table-cell office:value-type="float" office:value="0.008332026">
                <text:p>0.0083320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9.890960693359">
                <text:p>329.890960693359</text:p>
              </table:table-cell>
              <table:table-cell office:value-type="float" office:value="0.0449557">
                <text:p>0.04495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9.9990234375">
                <text:p>329.9990234375</text:p>
              </table:table-cell>
              <table:table-cell office:value-type="float" office:value="0.0011936">
                <text:p>0.00119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0.107086181641">
                <text:p>330.107086181641</text:p>
              </table:table-cell>
              <table:table-cell office:value-type="float" office:value="0.001556425">
                <text:p>0.001556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0.215148925781">
                <text:p>330.215148925781</text:p>
              </table:table-cell>
              <table:table-cell office:value-type="float" office:value="-0.008268685">
                <text:p>-0.0082686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0.3232421875">
                <text:p>330.3232421875</text:p>
              </table:table-cell>
              <table:table-cell office:value-type="float" office:value="0.01787354">
                <text:p>0.017873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0.431335449219">
                <text:p>330.431335449219</text:p>
              </table:table-cell>
              <table:table-cell office:value-type="float" office:value="0.009585041">
                <text:p>0.0095850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.539428710938">
                <text:p>330.539428710938</text:p>
              </table:table-cell>
              <table:table-cell office:value-type="float" office:value="0.009385821">
                <text:p>0.0093858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0.647521972656">
                <text:p>330.647521972656</text:p>
              </table:table-cell>
              <table:table-cell office:value-type="float" office:value="-0.003827769">
                <text:p>-0.0038277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0.755645751953">
                <text:p>330.755645751953</text:p>
              </table:table-cell>
              <table:table-cell office:value-type="float" office:value="0.004977195">
                <text:p>0.0049771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0.86376953125">
                <text:p>330.86376953125</text:p>
              </table:table-cell>
              <table:table-cell office:value-type="float" office:value="0.01757599">
                <text:p>0.017575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0.971893310547">
                <text:p>330.971893310547</text:p>
              </table:table-cell>
              <table:table-cell office:value-type="float" office:value="0.0122018">
                <text:p>0.01220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1.080017089844">
                <text:p>331.080017089844</text:p>
              </table:table-cell>
              <table:table-cell office:value-type="float" office:value="0.03239081">
                <text:p>0.032390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.188171386719">
                <text:p>331.188171386719</text:p>
              </table:table-cell>
              <table:table-cell office:value-type="float" office:value="0.01079708">
                <text:p>0.010797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1.296295166016">
                <text:p>331.296295166016</text:p>
              </table:table-cell>
              <table:table-cell office:value-type="float" office:value="0.02202209">
                <text:p>0.02202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1.404449462891">
                <text:p>331.404449462891</text:p>
              </table:table-cell>
              <table:table-cell office:value-type="float" office:value="-0.004563924">
                <text:p>-0.0045639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1.512603759766">
                <text:p>331.512603759766</text:p>
              </table:table-cell>
              <table:table-cell office:value-type="float" office:value="-0.004639504">
                <text:p>-0.0046395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.620788574219">
                <text:p>331.620788574219</text:p>
              </table:table-cell>
              <table:table-cell office:value-type="float" office:value="0.003077274">
                <text:p>0.0030772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1.728942871094">
                <text:p>331.728942871094</text:p>
              </table:table-cell>
              <table:table-cell office:value-type="float" office:value="0.009654647">
                <text:p>0.0096546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1.837127685547">
                <text:p>331.837127685547</text:p>
              </table:table-cell>
              <table:table-cell office:value-type="float" office:value="-0.00118685">
                <text:p>-0.001186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1.9453125">
                <text:p>331.9453125</text:p>
              </table:table-cell>
              <table:table-cell office:value-type="float" office:value="-0.004382763">
                <text:p>-0.004382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.053527832031">
                <text:p>332.053527832031</text:p>
              </table:table-cell>
              <table:table-cell office:value-type="float" office:value="0.006970658">
                <text:p>0.0069706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2.161712646484">
                <text:p>332.161712646484</text:p>
              </table:table-cell>
              <table:table-cell office:value-type="float" office:value="-0.001532188">
                <text:p>-0.0015321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2.269927978516">
                <text:p>332.269927978516</text:p>
              </table:table-cell>
              <table:table-cell office:value-type="float" office:value="-0.0107077">
                <text:p>-0.01070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2.378143310547">
                <text:p>332.378143310547</text:p>
              </table:table-cell>
              <table:table-cell office:value-type="float" office:value="-0.00410079">
                <text:p>-0.004100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2.486358642578">
                <text:p>332.486358642578</text:p>
              </table:table-cell>
              <table:table-cell office:value-type="float" office:value="0.02142365">
                <text:p>0.021423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2.594573974609">
                <text:p>332.594573974609</text:p>
              </table:table-cell>
              <table:table-cell office:value-type="float" office:value="0.01412937">
                <text:p>0.014129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2.702819824219">
                <text:p>332.702819824219</text:p>
              </table:table-cell>
              <table:table-cell office:value-type="float" office:value="0.004612266">
                <text:p>0.0046122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2.811065673828">
                <text:p>332.811065673828</text:p>
              </table:table-cell>
              <table:table-cell office:value-type="float" office:value="-0.009095413">
                <text:p>-0.0090954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2.919311523438">
                <text:p>332.919311523438</text:p>
              </table:table-cell>
              <table:table-cell office:value-type="float" office:value="-0.0005173422">
                <text:p>-0.00051734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3.027557373047">
                <text:p>333.027557373047</text:p>
              </table:table-cell>
              <table:table-cell office:value-type="float" office:value="-0.0004950201">
                <text:p>-0.00049502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3.135833740234">
                <text:p>333.135833740234</text:p>
              </table:table-cell>
              <table:table-cell office:value-type="float" office:value="0.005879029">
                <text:p>0.0058790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3.244079589844">
                <text:p>333.244079589844</text:p>
              </table:table-cell>
              <table:table-cell office:value-type="float" office:value="0.05444449">
                <text:p>0.054444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3.352355957031">
                <text:p>333.352355957031</text:p>
              </table:table-cell>
              <table:table-cell office:value-type="float" office:value="-0.002643463">
                <text:p>-0.0026434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3.460662841797">
                <text:p>333.460662841797</text:p>
              </table:table-cell>
              <table:table-cell office:value-type="float" office:value="0.001506797">
                <text:p>0.0015067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3.568939208984">
                <text:p>333.568939208984</text:p>
              </table:table-cell>
              <table:table-cell office:value-type="float" office:value="0.001415882">
                <text:p>0.0014158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3.67724609375">
                <text:p>333.67724609375</text:p>
              </table:table-cell>
              <table:table-cell office:value-type="float" office:value="-0.007164698">
                <text:p>-0.0071646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3.785552978516">
                <text:p>333.785552978516</text:p>
              </table:table-cell>
              <table:table-cell office:value-type="float" office:value="0.008303972">
                <text:p>0.0083039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3.893859863281">
                <text:p>333.893859863281</text:p>
              </table:table-cell>
              <table:table-cell office:value-type="float" office:value="0.0026207">
                <text:p>0.00262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4.002166748047">
                <text:p>334.002166748047</text:p>
              </table:table-cell>
              <table:table-cell office:value-type="float" office:value="-0.01227095">
                <text:p>-0.012270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4.110473632813">
                <text:p>334.110473632813</text:p>
              </table:table-cell>
              <table:table-cell office:value-type="float" office:value="-0.000519939">
                <text:p>-0.0005199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4.218811035156">
                <text:p>334.218811035156</text:p>
              </table:table-cell>
              <table:table-cell office:value-type="float" office:value="0.004611041">
                <text:p>0.0046110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4.3271484375">
                <text:p>334.3271484375</text:p>
              </table:table-cell>
              <table:table-cell office:value-type="float" office:value="-0.001157039">
                <text:p>-0.0011570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4.435485839844">
                <text:p>334.43548583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4.543853759766">
                <text:p>334.543853759766</text:p>
              </table:table-cell>
              <table:table-cell office:value-type="float" office:value="-0.006859106">
                <text:p>-0.0068591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4.652191162109">
                <text:p>334.652191162109</text:p>
              </table:table-cell>
              <table:table-cell office:value-type="float" office:value="0.01634275">
                <text:p>0.016342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4.760559082031">
                <text:p>334.760559082031</text:p>
              </table:table-cell>
              <table:table-cell office:value-type="float" office:value="-0.00123223">
                <text:p>-0.001232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4.868927001953">
                <text:p>334.868927001953</text:p>
              </table:table-cell>
              <table:table-cell office:value-type="float" office:value="0.00908942">
                <text:p>0.009089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4.977325439453">
                <text:p>334.977325439453</text:p>
              </table:table-cell>
              <table:table-cell office:value-type="float" office:value="0.00777895">
                <text:p>0.007778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5.085693359375">
                <text:p>335.085693359375</text:p>
              </table:table-cell>
              <table:table-cell office:value-type="float" office:value="0.009205553">
                <text:p>0.0092055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5.194091796875">
                <text:p>335.194091796875</text:p>
              </table:table-cell>
              <table:table-cell office:value-type="float" office:value="-0.0005635486">
                <text:p>-0.00056354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5.302490234375">
                <text:p>335.302490234375</text:p>
              </table:table-cell>
              <table:table-cell office:value-type="float" office:value="0.01849741">
                <text:p>0.018497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5.410888671875">
                <text:p>335.410888671875</text:p>
              </table:table-cell>
              <table:table-cell office:value-type="float" office:value="0.007517579">
                <text:p>0.0075175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5.519287109375">
                <text:p>335.519287109375</text:p>
              </table:table-cell>
              <table:table-cell office:value-type="float" office:value="0.03330297">
                <text:p>0.033302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5.627716064453">
                <text:p>335.627716064453</text:p>
              </table:table-cell>
              <table:table-cell office:value-type="float" office:value="0.009066387">
                <text:p>0.0090663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5.736145019531">
                <text:p>335.736145019531</text:p>
              </table:table-cell>
              <table:table-cell office:value-type="float" office:value="0.007582984">
                <text:p>0.0075829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5.844573974609">
                <text:p>335.844573974609</text:p>
              </table:table-cell>
              <table:table-cell office:value-type="float" office:value="-0.001752158">
                <text:p>-0.0017521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.953002929688">
                <text:p>335.953002929688</text:p>
              </table:table-cell>
              <table:table-cell office:value-type="float" office:value="0.01004134">
                <text:p>0.010041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6.061462402344">
                <text:p>336.061462402344</text:p>
              </table:table-cell>
              <table:table-cell office:value-type="float" office:value="0.02159502">
                <text:p>0.021595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6.169891357422">
                <text:p>336.169891357422</text:p>
              </table:table-cell>
              <table:table-cell office:value-type="float" office:value="-0.006240402">
                <text:p>-0.0062404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6.278350830078">
                <text:p>336.278350830078</text:p>
              </table:table-cell>
              <table:table-cell office:value-type="float" office:value="0.002867558">
                <text:p>0.0028675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6.386840820313">
                <text:p>336.386840820313</text:p>
              </table:table-cell>
              <table:table-cell office:value-type="float" office:value="0.01809709">
                <text:p>0.018097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6.495300292969">
                <text:p>336.495300292969</text:p>
              </table:table-cell>
              <table:table-cell office:value-type="float" office:value="0.003758768">
                <text:p>0.0037587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6.603790283203">
                <text:p>336.603790283203</text:p>
              </table:table-cell>
              <table:table-cell office:value-type="float" office:value="-0.005723219">
                <text:p>-0.0057232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6.712249755859">
                <text:p>336.712249755859</text:p>
              </table:table-cell>
              <table:table-cell office:value-type="float" office:value="-0.002784151">
                <text:p>-0.0027841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6.820770263672">
                <text:p>336.820770263672</text:p>
              </table:table-cell>
              <table:table-cell office:value-type="float" office:value="-0.002178235">
                <text:p>-0.0021782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6.929260253906">
                <text:p>336.929260253906</text:p>
              </table:table-cell>
              <table:table-cell office:value-type="float" office:value="0.001821347">
                <text:p>0.0018213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7.037750244141">
                <text:p>337.037750244141</text:p>
              </table:table-cell>
              <table:table-cell office:value-type="float" office:value="-0.007766557">
                <text:p>-0.0077665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7.146270751953">
                <text:p>337.146270751953</text:p>
              </table:table-cell>
              <table:table-cell office:value-type="float" office:value="-0.009949448">
                <text:p>-0.0099494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7.254791259766">
                <text:p>337.254791259766</text:p>
              </table:table-cell>
              <table:table-cell office:value-type="float" office:value="0.02676895">
                <text:p>0.026768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7.363311767578">
                <text:p>337.363311767578</text:p>
              </table:table-cell>
              <table:table-cell office:value-type="float" office:value="0.000610485">
                <text:p>0.0006104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7.471862792969">
                <text:p>337.471862792969</text:p>
              </table:table-cell>
              <table:table-cell office:value-type="float" office:value="0.00384069">
                <text:p>0.003840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7.580383300781">
                <text:p>337.580383300781</text:p>
              </table:table-cell>
              <table:table-cell office:value-type="float" office:value="-0.004208211">
                <text:p>-0.0042082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7.688934326172">
                <text:p>337.688934326172</text:p>
              </table:table-cell>
              <table:table-cell office:value-type="float" office:value="-0.001987321">
                <text:p>-0.0019873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7.797485351563">
                <text:p>337.797485351563</text:p>
              </table:table-cell>
              <table:table-cell office:value-type="float" office:value="-0.003915923">
                <text:p>-0.0039159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7.906036376953">
                <text:p>337.906036376953</text:p>
              </table:table-cell>
              <table:table-cell office:value-type="float" office:value="-0.004057954">
                <text:p>-0.0040579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8.014617919922">
                <text:p>338.014617919922</text:p>
              </table:table-cell>
              <table:table-cell office:value-type="float" office:value="-0.003064738">
                <text:p>-0.0030647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8.123168945313">
                <text:p>338.123168945313</text:p>
              </table:table-cell>
              <table:table-cell office:value-type="float" office:value="0.01395726">
                <text:p>0.013957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8.231750488281">
                <text:p>338.231750488281</text:p>
              </table:table-cell>
              <table:table-cell office:value-type="float" office:value="0.01142208">
                <text:p>0.011422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8.340362548828">
                <text:p>338.340362548828</text:p>
              </table:table-cell>
              <table:table-cell office:value-type="float" office:value="-0.003342322">
                <text:p>-0.0033423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8.448944091797">
                <text:p>338.448944091797</text:p>
              </table:table-cell>
              <table:table-cell office:value-type="float" office:value="0.02771114">
                <text:p>0.027711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8.557525634766">
                <text:p>338.557525634766</text:p>
              </table:table-cell>
              <table:table-cell office:value-type="float" office:value="0.005780423">
                <text:p>0.0057804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8.666137695313">
                <text:p>338.666137695313</text:p>
              </table:table-cell>
              <table:table-cell office:value-type="float" office:value="0.01274143">
                <text:p>0.012741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8.774749755859">
                <text:p>338.774749755859</text:p>
              </table:table-cell>
              <table:table-cell office:value-type="float" office:value="-0.005441449">
                <text:p>-0.0054414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8.883392333984">
                <text:p>338.883392333984</text:p>
              </table:table-cell>
              <table:table-cell office:value-type="float" office:value="-0.003833945">
                <text:p>-0.0038339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8.992004394531">
                <text:p>338.992004394531</text:p>
              </table:table-cell>
              <table:table-cell office:value-type="float" office:value="0.004372723">
                <text:p>0.0043727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9.100646972656">
                <text:p>339.100646972656</text:p>
              </table:table-cell>
              <table:table-cell office:value-type="float" office:value="0.009756417">
                <text:p>0.0097564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9.209289550781">
                <text:p>339.209289550781</text:p>
              </table:table-cell>
              <table:table-cell office:value-type="float" office:value="-0.006398049">
                <text:p>-0.0063980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9.317932128906">
                <text:p>339.317932128906</text:p>
              </table:table-cell>
              <table:table-cell office:value-type="float" office:value="0.01022647">
                <text:p>0.010226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9.426574707031">
                <text:p>339.426574707031</text:p>
              </table:table-cell>
              <table:table-cell office:value-type="float" office:value="0.002673184">
                <text:p>0.0026731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9.535247802734">
                <text:p>339.535247802734</text:p>
              </table:table-cell>
              <table:table-cell office:value-type="float" office:value="0.011356">
                <text:p>0.0113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9.643890380859">
                <text:p>339.643890380859</text:p>
              </table:table-cell>
              <table:table-cell office:value-type="float" office:value="0.003845691">
                <text:p>0.0038456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9.752563476563">
                <text:p>339.752563476563</text:p>
              </table:table-cell>
              <table:table-cell office:value-type="float" office:value="0.003825187">
                <text:p>0.0038251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.861267089844">
                <text:p>339.861267089844</text:p>
              </table:table-cell>
              <table:table-cell office:value-type="float" office:value="0.000914744">
                <text:p>0.0009147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9.969940185547">
                <text:p>339.969940185547</text:p>
              </table:table-cell>
              <table:table-cell office:value-type="float" office:value="0.01834023">
                <text:p>0.018340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0.078643798828">
                <text:p>340.078643798828</text:p>
              </table:table-cell>
              <table:table-cell office:value-type="float" office:value="0.002700691">
                <text:p>0.0027006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0.187347412109">
                <text:p>340.187347412109</text:p>
              </table:table-cell>
              <table:table-cell office:value-type="float" office:value="0.01953">
                <text:p>0.019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0.296051025391">
                <text:p>340.296051025391</text:p>
              </table:table-cell>
              <table:table-cell office:value-type="float" office:value="0.006781118">
                <text:p>0.0067811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0.404754638672">
                <text:p>340.404754638672</text:p>
              </table:table-cell>
              <table:table-cell office:value-type="float" office:value="0.01005209">
                <text:p>0.010052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.513488769531">
                <text:p>340.513488769531</text:p>
              </table:table-cell>
              <table:table-cell office:value-type="float" office:value="-0.008872601">
                <text:p>-0.0088726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0.622192382813">
                <text:p>340.622192382813</text:p>
              </table:table-cell>
              <table:table-cell office:value-type="float" office:value="0.01936174">
                <text:p>0.019361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0.730926513672">
                <text:p>340.730926513672</text:p>
              </table:table-cell>
              <table:table-cell office:value-type="float" office:value="0.01783326">
                <text:p>0.017833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0.839660644531">
                <text:p>340.839660644531</text:p>
              </table:table-cell>
              <table:table-cell office:value-type="float" office:value="0.01610129">
                <text:p>0.016101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0.948425292969">
                <text:p>340.948425292969</text:p>
              </table:table-cell>
              <table:table-cell office:value-type="float" office:value="-0.004993203">
                <text:p>-0.0049932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1.057159423828">
                <text:p>341.057159423828</text:p>
              </table:table-cell>
              <table:table-cell office:value-type="float" office:value="-0.0006344151">
                <text:p>-0.00063441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1.165924072266">
                <text:p>341.165924072266</text:p>
              </table:table-cell>
              <table:table-cell office:value-type="float" office:value="-0.003315707">
                <text:p>-0.0033157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1.274688720703">
                <text:p>341.274688720703</text:p>
              </table:table-cell>
              <table:table-cell office:value-type="float" office:value="-0.00409147">
                <text:p>-0.004091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1.383483886719">
                <text:p>341.383483886719</text:p>
              </table:table-cell>
              <table:table-cell office:value-type="float" office:value="0.01670926">
                <text:p>0.016709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1.492248535156">
                <text:p>341.492248535156</text:p>
              </table:table-cell>
              <table:table-cell office:value-type="float" office:value="0.005392701">
                <text:p>0.0053927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1.601043701172">
                <text:p>341.601043701172</text:p>
              </table:table-cell>
              <table:table-cell office:value-type="float" office:value="0.02565711">
                <text:p>0.025657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1.709838867188">
                <text:p>341.709838867188</text:p>
              </table:table-cell>
              <table:table-cell office:value-type="float" office:value="0.02247977">
                <text:p>0.022479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1.818634033203">
                <text:p>341.818634033203</text:p>
              </table:table-cell>
              <table:table-cell office:value-type="float" office:value="0.01603413">
                <text:p>0.016034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1.927429199219">
                <text:p>341.927429199219</text:p>
              </table:table-cell>
              <table:table-cell office:value-type="float" office:value="-0.002863381">
                <text:p>-0.0028633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2.036254882813">
                <text:p>342.036254882813</text:p>
              </table:table-cell>
              <table:table-cell office:value-type="float" office:value="-0.003856553">
                <text:p>-0.0038565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.145080566406">
                <text:p>342.145080566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2.25390625">
                <text:p>342.25390625</text:p>
              </table:table-cell>
              <table:table-cell office:value-type="float" office:value="0.01086032">
                <text:p>0.010860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2.362731933594">
                <text:p>342.362731933594</text:p>
              </table:table-cell>
              <table:table-cell office:value-type="float" office:value="0.005084153">
                <text:p>0.0050841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2.471557617188">
                <text:p>342.471557617188</text:p>
              </table:table-cell>
              <table:table-cell office:value-type="float" office:value="-0.001295825">
                <text:p>-0.0012958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2.580413818359">
                <text:p>342.580413818359</text:p>
              </table:table-cell>
              <table:table-cell office:value-type="float" office:value="0.0123319">
                <text:p>0.01233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2.689270019531">
                <text:p>342.689270019531</text:p>
              </table:table-cell>
              <table:table-cell office:value-type="float" office:value="-0.004852014">
                <text:p>-0.0048520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2.798126220703">
                <text:p>342.798126220703</text:p>
              </table:table-cell>
              <table:table-cell office:value-type="float" office:value="0.007764582">
                <text:p>0.0077645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2.906982421875">
                <text:p>342.906982421875</text:p>
              </table:table-cell>
              <table:table-cell office:value-type="float" office:value="0.01687169">
                <text:p>0.016871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3.015869140625">
                <text:p>343.015869140625</text:p>
              </table:table-cell>
              <table:table-cell office:value-type="float" office:value="0.01398803">
                <text:p>0.013988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3.124755859375">
                <text:p>343.124755859375</text:p>
              </table:table-cell>
              <table:table-cell office:value-type="float" office:value="-0.003748186">
                <text:p>-0.0037481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3.233642578125">
                <text:p>343.233642578125</text:p>
              </table:table-cell>
              <table:table-cell office:value-type="float" office:value="-0.008463713">
                <text:p>-0.0084637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3.342529296875">
                <text:p>343.342529296875</text:p>
              </table:table-cell>
              <table:table-cell office:value-type="float" office:value="0.00930139">
                <text:p>0.009301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3.451416015625">
                <text:p>343.451416015625</text:p>
              </table:table-cell>
              <table:table-cell office:value-type="float" office:value="0.0008683359">
                <text:p>0.00086833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3.560333251953">
                <text:p>343.560333251953</text:p>
              </table:table-cell>
              <table:table-cell office:value-type="float" office:value="-0.003622347">
                <text:p>-0.0036223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3.669250488281">
                <text:p>343.669250488281</text:p>
              </table:table-cell>
              <table:table-cell office:value-type="float" office:value="-0.00472965">
                <text:p>-0.004729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3.778167724609">
                <text:p>343.778167724609</text:p>
              </table:table-cell>
              <table:table-cell office:value-type="float" office:value="0.001313301">
                <text:p>0.0013133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3.887084960938">
                <text:p>343.887084960938</text:p>
              </table:table-cell>
              <table:table-cell office:value-type="float" office:value="0.004737688">
                <text:p>0.0047376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3.996032714844">
                <text:p>343.996032714844</text:p>
              </table:table-cell>
              <table:table-cell office:value-type="float" office:value="-0.00914552">
                <text:p>-0.009145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4.104949951172">
                <text:p>344.104949951172</text:p>
              </table:table-cell>
              <table:table-cell office:value-type="float" office:value="0.01173625">
                <text:p>0.011736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4.213897705078">
                <text:p>344.213897705078</text:p>
              </table:table-cell>
              <table:table-cell office:value-type="float" office:value="-0.003591526">
                <text:p>-0.0035915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4.322845458984">
                <text:p>344.322845458984</text:p>
              </table:table-cell>
              <table:table-cell office:value-type="float" office:value="0.005863679">
                <text:p>0.0058636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4.431823730469">
                <text:p>344.431823730469</text:p>
              </table:table-cell>
              <table:table-cell office:value-type="float" office:value="-0.004589058">
                <text:p>-0.0045890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4.540771484375">
                <text:p>344.540771484375</text:p>
              </table:table-cell>
              <table:table-cell office:value-type="float" office:value="-0.000172201">
                <text:p>-0.0001722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4.649749755859">
                <text:p>344.649749755859</text:p>
              </table:table-cell>
              <table:table-cell office:value-type="float" office:value="-0.001066068">
                <text:p>-0.0010660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4.758728027344">
                <text:p>344.758728027344</text:p>
              </table:table-cell>
              <table:table-cell office:value-type="float" office:value="-0.000650095">
                <text:p>-0.0006500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4.867706298828">
                <text:p>344.867706298828</text:p>
              </table:table-cell>
              <table:table-cell office:value-type="float" office:value="0.007173341">
                <text:p>0.0071733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4.976715087891">
                <text:p>344.976715087891</text:p>
              </table:table-cell>
              <table:table-cell office:value-type="float" office:value="0.01246131">
                <text:p>0.012461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5.085723876953">
                <text:p>345.085723876953</text:p>
              </table:table-cell>
              <table:table-cell office:value-type="float" office:value="-0.002455279">
                <text:p>-0.0024552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5.194702148438">
                <text:p>345.194702148438</text:p>
              </table:table-cell>
              <table:table-cell office:value-type="float" office:value="0.001180184">
                <text:p>0.0011801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5.303741455078">
                <text:p>345.303741455078</text:p>
              </table:table-cell>
              <table:table-cell office:value-type="float" office:value="0.02593255">
                <text:p>0.025932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5.412750244141">
                <text:p>345.412750244141</text:p>
              </table:table-cell>
              <table:table-cell office:value-type="float" office:value="-0.008131742">
                <text:p>-0.0081317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5.521759033203">
                <text:p>345.521759033203</text:p>
              </table:table-cell>
              <table:table-cell office:value-type="float" office:value="-0.005888058">
                <text:p>-0.0058880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5.630798339844">
                <text:p>345.630798339844</text:p>
              </table:table-cell>
              <table:table-cell office:value-type="float" office:value="0.003170025">
                <text:p>0.0031700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5.739837646484">
                <text:p>345.739837646484</text:p>
              </table:table-cell>
              <table:table-cell office:value-type="float" office:value="-0.001661021">
                <text:p>-0.0016610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.848876953125">
                <text:p>345.848876953125</text:p>
              </table:table-cell>
              <table:table-cell office:value-type="float" office:value="0.01216763">
                <text:p>0.012167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5.957946777344">
                <text:p>345.957946777344</text:p>
              </table:table-cell>
              <table:table-cell office:value-type="float" office:value="0.01316724">
                <text:p>0.013167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6.066986083984">
                <text:p>346.066986083984</text:p>
              </table:table-cell>
              <table:table-cell office:value-type="float" office:value="-0.002377728">
                <text:p>-0.0023777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6.176055908203">
                <text:p>346.176055908203</text:p>
              </table:table-cell>
              <table:table-cell office:value-type="float" office:value="-0.003578552">
                <text:p>-0.0035785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6.285125732422">
                <text:p>346.285125732422</text:p>
              </table:table-cell>
              <table:table-cell office:value-type="float" office:value="-0.005670476">
                <text:p>-0.0056704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6.394195556641">
                <text:p>346.394195556641</text:p>
              </table:table-cell>
              <table:table-cell office:value-type="float" office:value="0.002377783">
                <text:p>0.0023777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6.503295898438">
                <text:p>346.503295898438</text:p>
              </table:table-cell>
              <table:table-cell office:value-type="float" office:value="-0.003058136">
                <text:p>-0.0030581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6.612365722656">
                <text:p>346.612365722656</text:p>
              </table:table-cell>
              <table:table-cell office:value-type="float" office:value="-0.00421227">
                <text:p>-0.004212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6.721466064453">
                <text:p>346.721466064453</text:p>
              </table:table-cell>
              <table:table-cell office:value-type="float" office:value="0.001294601">
                <text:p>0.0012946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6.83056640625">
                <text:p>346.83056640625</text:p>
              </table:table-cell>
              <table:table-cell office:value-type="float" office:value="0.01209687">
                <text:p>0.012096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6.939697265625">
                <text:p>346.939697265625</text:p>
              </table:table-cell>
              <table:table-cell office:value-type="float" office:value="0.03294386">
                <text:p>0.032943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7.048797607422">
                <text:p>347.048797607422</text:p>
              </table:table-cell>
              <table:table-cell office:value-type="float" office:value="-0.01041888">
                <text:p>-0.010418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7.157928466797">
                <text:p>347.157928466797</text:p>
              </table:table-cell>
              <table:table-cell office:value-type="float" office:value="-0.009216577">
                <text:p>-0.0092165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7.267059326172">
                <text:p>347.267059326172</text:p>
              </table:table-cell>
              <table:table-cell office:value-type="float" office:value="0.003662059">
                <text:p>0.0036620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7.376190185547">
                <text:p>347.376190185547</text:p>
              </table:table-cell>
              <table:table-cell office:value-type="float" office:value="-0.0031543">
                <text:p>-0.00315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7.4853515625">
                <text:p>347.4853515625</text:p>
              </table:table-cell>
              <table:table-cell office:value-type="float" office:value="0.005884662">
                <text:p>0.0058846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7.594482421875">
                <text:p>347.594482421875</text:p>
              </table:table-cell>
              <table:table-cell office:value-type="float" office:value="-0.0139939">
                <text:p>-0.01399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7.703643798828">
                <text:p>347.703643798828</text:p>
              </table:table-cell>
              <table:table-cell office:value-type="float" office:value="0.00370709">
                <text:p>0.003707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7.812805175781">
                <text:p>347.812805175781</text:p>
              </table:table-cell>
              <table:table-cell office:value-type="float" office:value="-0.002814739">
                <text:p>-0.0028147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7.921966552734">
                <text:p>347.921966552734</text:p>
              </table:table-cell>
              <table:table-cell office:value-type="float" office:value="0.002225375">
                <text:p>0.0022253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8.031158447266">
                <text:p>348.031158447266</text:p>
              </table:table-cell>
              <table:table-cell office:value-type="float" office:value="0.00773779">
                <text:p>0.007737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8.140319824219">
                <text:p>348.140319824219</text:p>
              </table:table-cell>
              <table:table-cell office:value-type="float" office:value="0.0007251935">
                <text:p>0.00072519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8.24951171875">
                <text:p>348.24951171875</text:p>
              </table:table-cell>
              <table:table-cell office:value-type="float" office:value="0.01364448">
                <text:p>0.013644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8.358703613281">
                <text:p>348.358703613281</text:p>
              </table:table-cell>
              <table:table-cell office:value-type="float" office:value="-0.009857673">
                <text:p>-0.0098576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8.467926025391">
                <text:p>348.467926025391</text:p>
              </table:table-cell>
              <table:table-cell office:value-type="float" office:value="-0.0005193047">
                <text:p>-0.00051930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8.577117919922">
                <text:p>348.577117919922</text:p>
              </table:table-cell>
              <table:table-cell office:value-type="float" office:value="-0.002439462">
                <text:p>-0.0024394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8.686340332031">
                <text:p>348.686340332031</text:p>
              </table:table-cell>
              <table:table-cell office:value-type="float" office:value="0.02241722">
                <text:p>0.022417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8.795562744141">
                <text:p>348.795562744141</text:p>
              </table:table-cell>
              <table:table-cell office:value-type="float" office:value="-0.0004716374">
                <text:p>-0.00047163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8.90478515625">
                <text:p>348.90478515625</text:p>
              </table:table-cell>
              <table:table-cell office:value-type="float" office:value="0.00506539">
                <text:p>0.005065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9.014038085938">
                <text:p>349.014038085938</text:p>
              </table:table-cell>
              <table:table-cell office:value-type="float" office:value="0.000529697">
                <text:p>0.0005296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9.123260498047">
                <text:p>349.123260498047</text:p>
              </table:table-cell>
              <table:table-cell office:value-type="float" office:value="0.01160809">
                <text:p>0.011608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9.232513427734">
                <text:p>349.232513427734</text:p>
              </table:table-cell>
              <table:table-cell office:value-type="float" office:value="-0.009790742">
                <text:p>-0.0097907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9.341766357422">
                <text:p>349.341766357422</text:p>
              </table:table-cell>
              <table:table-cell office:value-type="float" office:value="-0.01082264">
                <text:p>-0.010822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9.451019287109">
                <text:p>349.451019287109</text:p>
              </table:table-cell>
              <table:table-cell office:value-type="float" office:value="0.01013522">
                <text:p>0.010135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9.560302734375">
                <text:p>349.560302734375</text:p>
              </table:table-cell>
              <table:table-cell office:value-type="float" office:value="0.002953525">
                <text:p>0.0029535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9.669586181641">
                <text:p>349.669586181641</text:p>
              </table:table-cell>
              <table:table-cell office:value-type="float" office:value="-0.007606929">
                <text:p>-0.0076069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9.778839111328">
                <text:p>349.778839111328</text:p>
              </table:table-cell>
              <table:table-cell office:value-type="float" office:value="-0.00521013">
                <text:p>-0.005210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9.888153076172">
                <text:p>349.888153076172</text:p>
              </table:table-cell>
              <table:table-cell office:value-type="float" office:value="0.01505024">
                <text:p>0.015050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9.997436523438">
                <text:p>349.997436523438</text:p>
              </table:table-cell>
              <table:table-cell office:value-type="float" office:value="0.01126092">
                <text:p>0.011260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0.106719970703">
                <text:p>350.106719970703</text:p>
              </table:table-cell>
              <table:table-cell office:value-type="float" office:value="0.01046502">
                <text:p>0.010465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0.216033935547">
                <text:p>350.216033935547</text:p>
              </table:table-cell>
              <table:table-cell office:value-type="float" office:value="-0.008898764">
                <text:p>-0.0088987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0.325347900391">
                <text:p>350.325347900391</text:p>
              </table:table-cell>
              <table:table-cell office:value-type="float" office:value="-0.002573405">
                <text:p>-0.0025734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0.434661865234">
                <text:p>350.434661865234</text:p>
              </table:table-cell>
              <table:table-cell office:value-type="float" office:value="0.004413533">
                <text:p>0.0044135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0.544006347656">
                <text:p>350.544006347656</text:p>
              </table:table-cell>
              <table:table-cell office:value-type="float" office:value="0.003342028">
                <text:p>0.0033420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0.6533203125">
                <text:p>350.6533203125</text:p>
              </table:table-cell>
              <table:table-cell office:value-type="float" office:value="0.005232882">
                <text:p>0.0052328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0.762664794922">
                <text:p>350.762664794922</text:p>
              </table:table-cell>
              <table:table-cell office:value-type="float" office:value="0.004532626">
                <text:p>0.0045326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0.872009277344">
                <text:p>350.872009277344</text:p>
              </table:table-cell>
              <table:table-cell office:value-type="float" office:value="0.01493654">
                <text:p>0.014936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0.981353759766">
                <text:p>350.981353759766</text:p>
              </table:table-cell>
              <table:table-cell office:value-type="float" office:value="-0.01185334">
                <text:p>-0.011853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1.090728759766">
                <text:p>351.090728759766</text:p>
              </table:table-cell>
              <table:table-cell office:value-type="float" office:value="0.004044461">
                <text:p>0.0040444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1.200073242188">
                <text:p>351.200073242188</text:p>
              </table:table-cell>
              <table:table-cell office:value-type="float" office:value="0.002320279">
                <text:p>0.0023202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1.309448242188">
                <text:p>351.309448242188</text:p>
              </table:table-cell>
              <table:table-cell office:value-type="float" office:value="0.0124245">
                <text:p>0.01242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1.418823242188">
                <text:p>351.418823242188</text:p>
              </table:table-cell>
              <table:table-cell office:value-type="float" office:value="0.01008872">
                <text:p>0.010088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1.528228759766">
                <text:p>351.528228759766</text:p>
              </table:table-cell>
              <table:table-cell office:value-type="float" office:value="-0.01075889">
                <text:p>-0.010758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1.637603759766">
                <text:p>351.637603759766</text:p>
              </table:table-cell>
              <table:table-cell office:value-type="float" office:value="0.01113063">
                <text:p>0.011130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1.747009277344">
                <text:p>351.747009277344</text:p>
              </table:table-cell>
              <table:table-cell office:value-type="float" office:value="0.001292304">
                <text:p>0.0012923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1.856414794922">
                <text:p>351.856414794922</text:p>
              </table:table-cell>
              <table:table-cell office:value-type="float" office:value="-0.01064545">
                <text:p>-0.010645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1.9658203125">
                <text:p>351.9658203125</text:p>
              </table:table-cell>
              <table:table-cell office:value-type="float" office:value="0.001030273">
                <text:p>0.0010302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2.075225830078">
                <text:p>352.075225830078</text:p>
              </table:table-cell>
              <table:table-cell office:value-type="float" office:value="-0.0009054642">
                <text:p>-0.00090546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2.184661865234">
                <text:p>352.184661865234</text:p>
              </table:table-cell>
              <table:table-cell office:value-type="float" office:value="0.002306258">
                <text:p>0.0023062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2.294097900391">
                <text:p>352.294097900391</text:p>
              </table:table-cell>
              <table:table-cell office:value-type="float" office:value="0.005033282">
                <text:p>0.0050332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2.403533935547">
                <text:p>352.403533935547</text:p>
              </table:table-cell>
              <table:table-cell office:value-type="float" office:value="-0.002287335">
                <text:p>-0.0022873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2.512969970703">
                <text:p>352.512969970703</text:p>
              </table:table-cell>
              <table:table-cell office:value-type="float" office:value="0.001423844">
                <text:p>0.0014238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2.622406005859">
                <text:p>352.622406005859</text:p>
              </table:table-cell>
              <table:table-cell office:value-type="float" office:value="0.01870041">
                <text:p>0.018700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2.731872558594">
                <text:p>352.731872558594</text:p>
              </table:table-cell>
              <table:table-cell office:value-type="float" office:value="-0.005946096">
                <text:p>-0.0059460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2.841339111328">
                <text:p>352.841339111328</text:p>
              </table:table-cell>
              <table:table-cell office:value-type="float" office:value="-0.008445486">
                <text:p>-0.0084454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2.950805664063">
                <text:p>352.950805664063</text:p>
              </table:table-cell>
              <table:table-cell office:value-type="float" office:value="0.01748694">
                <text:p>0.017486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3.060272216797">
                <text:p>353.060272216797</text:p>
              </table:table-cell>
              <table:table-cell office:value-type="float" office:value="0.01204906">
                <text:p>0.012049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3.169738769531">
                <text:p>353.169738769531</text:p>
              </table:table-cell>
              <table:table-cell office:value-type="float" office:value="-0.001545594">
                <text:p>-0.0015455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3.279235839844">
                <text:p>353.279235839844</text:p>
              </table:table-cell>
              <table:table-cell office:value-type="float" office:value="-0.003188599">
                <text:p>-0.0031885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3.388732910156">
                <text:p>353.388732910156</text:p>
              </table:table-cell>
              <table:table-cell office:value-type="float" office:value="0.004909072">
                <text:p>0.0049090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3.498229980469">
                <text:p>353.498229980469</text:p>
              </table:table-cell>
              <table:table-cell office:value-type="float" office:value="0.005574966">
                <text:p>0.0055749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3.607727050781">
                <text:p>353.607727050781</text:p>
              </table:table-cell>
              <table:table-cell office:value-type="float" office:value="0.009820592">
                <text:p>0.0098205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3.717254638672">
                <text:p>353.717254638672</text:p>
              </table:table-cell>
              <table:table-cell office:value-type="float" office:value="-0.002110586">
                <text:p>-0.0021105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3.826782226563">
                <text:p>353.826782226563</text:p>
              </table:table-cell>
              <table:table-cell office:value-type="float" office:value="-0.005314691">
                <text:p>-0.0053146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3.936309814453">
                <text:p>353.936309814453</text:p>
              </table:table-cell>
              <table:table-cell office:value-type="float" office:value="0.01690953">
                <text:p>0.016909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4.045837402344">
                <text:p>354.045837402344</text:p>
              </table:table-cell>
              <table:table-cell office:value-type="float" office:value="-0.005585921">
                <text:p>-0.0055859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4.155364990234">
                <text:p>354.155364990234</text:p>
              </table:table-cell>
              <table:table-cell office:value-type="float" office:value="0.004932749">
                <text:p>0.0049327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4.264923095703">
                <text:p>354.264923095703</text:p>
              </table:table-cell>
              <table:table-cell office:value-type="float" office:value="0.002168159">
                <text:p>0.0021681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4.374481201172">
                <text:p>354.374481201172</text:p>
              </table:table-cell>
              <table:table-cell office:value-type="float" office:value="0.004847276">
                <text:p>0.0048472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4.484039306641">
                <text:p>354.484039306641</text:p>
              </table:table-cell>
              <table:table-cell office:value-type="float" office:value="0.004025134">
                <text:p>0.0040251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4.593597412109">
                <text:p>354.593597412109</text:p>
              </table:table-cell>
              <table:table-cell office:value-type="float" office:value="0.004446202">
                <text:p>0.0044462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4.703155517578">
                <text:p>354.703155517578</text:p>
              </table:table-cell>
              <table:table-cell office:value-type="float" office:value="0.0011699">
                <text:p>0.00116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4.812744140625">
                <text:p>354.812744140625</text:p>
              </table:table-cell>
              <table:table-cell office:value-type="float" office:value="0.0120892">
                <text:p>0.01208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4.922332763672">
                <text:p>354.922332763672</text:p>
              </table:table-cell>
              <table:table-cell office:value-type="float" office:value="0.001284551">
                <text:p>0.0012845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5.031921386719">
                <text:p>355.031921386719</text:p>
              </table:table-cell>
              <table:table-cell office:value-type="float" office:value="0.00820969">
                <text:p>0.008209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5.141510009766">
                <text:p>355.141510009766</text:p>
              </table:table-cell>
              <table:table-cell office:value-type="float" office:value="-0.002572999">
                <text:p>-0.0025729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5.251129150391">
                <text:p>355.251129150391</text:p>
              </table:table-cell>
              <table:table-cell office:value-type="float" office:value="0.004018117">
                <text:p>0.0040181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5.360717773438">
                <text:p>355.360717773438</text:p>
              </table:table-cell>
              <table:table-cell office:value-type="float" office:value="0.00445599">
                <text:p>0.004455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5.470336914063">
                <text:p>355.470336914063</text:p>
              </table:table-cell>
              <table:table-cell office:value-type="float" office:value="-0.001036365">
                <text:p>-0.0010363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5.579956054688">
                <text:p>355.579956054688</text:p>
              </table:table-cell>
              <table:table-cell office:value-type="float" office:value="0.01038802">
                <text:p>0.010388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5.689605712891">
                <text:p>355.689605712891</text:p>
              </table:table-cell>
              <table:table-cell office:value-type="float" office:value="0.0143124">
                <text:p>0.01431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5.799224853516">
                <text:p>355.799224853516</text:p>
              </table:table-cell>
              <table:table-cell office:value-type="float" office:value="0.01607268">
                <text:p>0.016072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5.908874511719">
                <text:p>355.908874511719</text:p>
              </table:table-cell>
              <table:table-cell office:value-type="float" office:value="-0.007744267">
                <text:p>-0.0077442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6.018524169922">
                <text:p>356.018524169922</text:p>
              </table:table-cell>
              <table:table-cell office:value-type="float" office:value="0.01113691">
                <text:p>0.011136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6.128173828125">
                <text:p>356.128173828125</text:p>
              </table:table-cell>
              <table:table-cell office:value-type="float" office:value="-0.003537613">
                <text:p>-0.0035376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6.237823486328">
                <text:p>356.237823486328</text:p>
              </table:table-cell>
              <table:table-cell office:value-type="float" office:value="-0.006003255">
                <text:p>-0.0060032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6.347503662109">
                <text:p>356.347503662109</text:p>
              </table:table-cell>
              <table:table-cell office:value-type="float" office:value="0.003358704">
                <text:p>0.0033587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6.457183837891">
                <text:p>356.457183837891</text:p>
              </table:table-cell>
              <table:table-cell office:value-type="float" office:value="0.002854171">
                <text:p>0.0028541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6.566864013672">
                <text:p>356.566864013672</text:p>
              </table:table-cell>
              <table:table-cell office:value-type="float" office:value="-0.0006454486">
                <text:p>-0.00064544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6.676544189453">
                <text:p>356.676544189453</text:p>
              </table:table-cell>
              <table:table-cell office:value-type="float" office:value="-0.007061844">
                <text:p>-0.0070618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6.786224365234">
                <text:p>356.786224365234</text:p>
              </table:table-cell>
              <table:table-cell office:value-type="float" office:value="-0.006481905">
                <text:p>-0.0064819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6.895935058594">
                <text:p>356.895935058594</text:p>
              </table:table-cell>
              <table:table-cell office:value-type="float" office:value="-0.008035676">
                <text:p>-0.0080356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7.005645751953">
                <text:p>357.005645751953</text:p>
              </table:table-cell>
              <table:table-cell office:value-type="float" office:value="-0.01014268">
                <text:p>-0.010142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7.115356445313">
                <text:p>357.115356445313</text:p>
              </table:table-cell>
              <table:table-cell office:value-type="float" office:value="0.0002479123">
                <text:p>0.00024791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7.225067138672">
                <text:p>357.225067138672</text:p>
              </table:table-cell>
              <table:table-cell office:value-type="float" office:value="0.004864878">
                <text:p>0.0048648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7.334777832031">
                <text:p>357.334777832031</text:p>
              </table:table-cell>
              <table:table-cell office:value-type="float" office:value="0.003639338">
                <text:p>0.0036393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7.444519042969">
                <text:p>357.444519042969</text:p>
              </table:table-cell>
              <table:table-cell office:value-type="float" office:value="0.007506101">
                <text:p>0.0075061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7.554260253906">
                <text:p>357.554260253906</text:p>
              </table:table-cell>
              <table:table-cell office:value-type="float" office:value="-0.004377684">
                <text:p>-0.0043776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7.664001464844">
                <text:p>357.664001464844</text:p>
              </table:table-cell>
              <table:table-cell office:value-type="float" office:value="-0.001699563">
                <text:p>-0.0016995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7.773742675781">
                <text:p>357.773742675781</text:p>
              </table:table-cell>
              <table:table-cell office:value-type="float" office:value="0.01636735">
                <text:p>0.016367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7.883514404297">
                <text:p>357.883514404297</text:p>
              </table:table-cell>
              <table:table-cell office:value-type="float" office:value="0.001042108">
                <text:p>0.0010421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7.993286132813">
                <text:p>357.993286132813</text:p>
              </table:table-cell>
              <table:table-cell office:value-type="float" office:value="-0.002602261">
                <text:p>-0.0026022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8.10302734375">
                <text:p>358.10302734375</text:p>
              </table:table-cell>
              <table:table-cell office:value-type="float" office:value="0.01142557">
                <text:p>0.011425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8.212829589844">
                <text:p>358.212829589844</text:p>
              </table:table-cell>
              <table:table-cell office:value-type="float" office:value="0.01138442">
                <text:p>0.011384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8.322601318359">
                <text:p>358.322601318359</text:p>
              </table:table-cell>
              <table:table-cell office:value-type="float" office:value="0.001095768">
                <text:p>0.0010957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8.432373046875">
                <text:p>358.432373046875</text:p>
              </table:table-cell>
              <table:table-cell office:value-type="float" office:value="0.008347369">
                <text:p>0.0083473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8.542175292969">
                <text:p>358.542175292969</text:p>
              </table:table-cell>
              <table:table-cell office:value-type="float" office:value="-0.00713049">
                <text:p>-0.0071304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8.651977539063">
                <text:p>358.651977539063</text:p>
              </table:table-cell>
              <table:table-cell office:value-type="float" office:value="0.001450981">
                <text:p>0.00145098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8.761779785156">
                <text:p>358.761779785156</text:p>
              </table:table-cell>
              <table:table-cell office:value-type="float" office:value="0.009972098">
                <text:p>0.0099720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8.871612548828">
                <text:p>358.871612548828</text:p>
              </table:table-cell>
              <table:table-cell office:value-type="float" office:value="-0.006607178">
                <text:p>-0.0066071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8.981414794922">
                <text:p>358.981414794922</text:p>
              </table:table-cell>
              <table:table-cell office:value-type="float" office:value="0.002666613">
                <text:p>0.0026666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9.091247558594">
                <text:p>359.091247558594</text:p>
              </table:table-cell>
              <table:table-cell office:value-type="float" office:value="0.01629177">
                <text:p>0.016291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9.201080322266">
                <text:p>359.201080322266</text:p>
              </table:table-cell>
              <table:table-cell office:value-type="float" office:value="0.005325551">
                <text:p>0.0053255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9.310913085938">
                <text:p>359.310913085938</text:p>
              </table:table-cell>
              <table:table-cell office:value-type="float" office:value="0.001468644">
                <text:p>0.0014686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9.420776367188">
                <text:p>359.420776367188</text:p>
              </table:table-cell>
              <table:table-cell office:value-type="float" office:value="-0.01117733">
                <text:p>-0.011177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9.530609130859">
                <text:p>359.530609130859</text:p>
              </table:table-cell>
              <table:table-cell office:value-type="float" office:value="0.01282179">
                <text:p>0.012821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9.640472412109">
                <text:p>359.640472412109</text:p>
              </table:table-cell>
              <table:table-cell office:value-type="float" office:value="-0.0009544237">
                <text:p>-0.00095442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9.750335693359">
                <text:p>359.750335693359</text:p>
              </table:table-cell>
              <table:table-cell office:value-type="float" office:value="-0.002126674">
                <text:p>-0.0021266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9.860198974609">
                <text:p>359.860198974609</text:p>
              </table:table-cell>
              <table:table-cell office:value-type="float" office:value="-0.0002116489">
                <text:p>-0.00021164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9.970092773438">
                <text:p>359.970092773438</text:p>
              </table:table-cell>
              <table:table-cell office:value-type="float" office:value="0.006428164">
                <text:p>0.0064281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0.079986572266">
                <text:p>360.079986572266</text:p>
              </table:table-cell>
              <table:table-cell office:value-type="float" office:value="-0.007283772">
                <text:p>-0.0072837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0.189849853516">
                <text:p>360.189849853516</text:p>
              </table:table-cell>
              <table:table-cell office:value-type="float" office:value="0.01427326">
                <text:p>0.014273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0.299743652344">
                <text:p>360.299743652344</text:p>
              </table:table-cell>
              <table:table-cell office:value-type="float" office:value="0.01243207">
                <text:p>0.012432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0.40966796875">
                <text:p>360.40966796875</text:p>
              </table:table-cell>
              <table:table-cell office:value-type="float" office:value="0.01070786">
                <text:p>0.010707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.519561767578">
                <text:p>360.519561767578</text:p>
              </table:table-cell>
              <table:table-cell office:value-type="float" office:value="0.002713604">
                <text:p>0.0027136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.629486083984">
                <text:p>360.629486083984</text:p>
              </table:table-cell>
              <table:table-cell office:value-type="float" office:value="0.004098756">
                <text:p>0.0040987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.739410400391">
                <text:p>360.739410400391</text:p>
              </table:table-cell>
              <table:table-cell office:value-type="float" office:value="-0.003737794">
                <text:p>-0.0037377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0.849334716797">
                <text:p>360.849334716797</text:p>
              </table:table-cell>
              <table:table-cell office:value-type="float" office:value="0.006593763">
                <text:p>0.0065937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0.959259033203">
                <text:p>360.959259033203</text:p>
              </table:table-cell>
              <table:table-cell office:value-type="float" office:value="-0.009805617">
                <text:p>-0.0098056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1.069213867188">
                <text:p>361.069213867188</text:p>
              </table:table-cell>
              <table:table-cell office:value-type="float" office:value="0.00024249">
                <text:p>0.000242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1.179168701172">
                <text:p>361.179168701172</text:p>
              </table:table-cell>
              <table:table-cell office:value-type="float" office:value="0.0002508913">
                <text:p>0.00025089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1.289093017578">
                <text:p>361.289093017578</text:p>
              </table:table-cell>
              <table:table-cell office:value-type="float" office:value="0.001548224">
                <text:p>0.0015482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1.399078369141">
                <text:p>361.399078369141</text:p>
              </table:table-cell>
              <table:table-cell office:value-type="float" office:value="0.002496335">
                <text:p>0.00249633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1.509033203125">
                <text:p>361.509033203125</text:p>
              </table:table-cell>
              <table:table-cell office:value-type="float" office:value="-0.007405356">
                <text:p>-0.00740535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1.619018554688">
                <text:p>361.619018554688</text:p>
              </table:table-cell>
              <table:table-cell office:value-type="float" office:value="-0.00642295">
                <text:p>-0.006422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1.728973388672">
                <text:p>361.728973388672</text:p>
              </table:table-cell>
              <table:table-cell office:value-type="float" office:value="0.009110228">
                <text:p>0.0091102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.838958740234">
                <text:p>361.838958740234</text:p>
              </table:table-cell>
              <table:table-cell office:value-type="float" office:value="0.002336264">
                <text:p>0.0023362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1.948944091797">
                <text:p>361.948944091797</text:p>
              </table:table-cell>
              <table:table-cell office:value-type="float" office:value="-0.001090556">
                <text:p>-0.0010905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2.058959960938">
                <text:p>362.058959960938</text:p>
              </table:table-cell>
              <table:table-cell office:value-type="float" office:value="-0.001862248">
                <text:p>-0.0018622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2.1689453125">
                <text:p>362.1689453125</text:p>
              </table:table-cell>
              <table:table-cell office:value-type="float" office:value="0.002803589">
                <text:p>0.0028035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2.278961181641">
                <text:p>362.278961181641</text:p>
              </table:table-cell>
              <table:table-cell office:value-type="float" office:value="0.01988892">
                <text:p>0.019888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2.388977050781">
                <text:p>362.388977050781</text:p>
              </table:table-cell>
              <table:table-cell office:value-type="float" office:value="0.01114325">
                <text:p>0.011143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2.498992919922">
                <text:p>362.498992919922</text:p>
              </table:table-cell>
              <table:table-cell office:value-type="float" office:value="-0.002561392">
                <text:p>-0.0025613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2.609039306641">
                <text:p>362.609039306641</text:p>
              </table:table-cell>
              <table:table-cell office:value-type="float" office:value="-0.002931198">
                <text:p>-0.0029311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2.719055175781">
                <text:p>362.719055175781</text:p>
              </table:table-cell>
              <table:table-cell office:value-type="float" office:value="0.00848437">
                <text:p>0.0084843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2.8291015625">
                <text:p>362.8291015625</text:p>
              </table:table-cell>
              <table:table-cell office:value-type="float" office:value="0.01323318">
                <text:p>0.013233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2.939147949219">
                <text:p>362.939147949219</text:p>
              </table:table-cell>
              <table:table-cell office:value-type="float" office:value="0.0009383573">
                <text:p>0.00093835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3.049224853516">
                <text:p>363.049224853516</text:p>
              </table:table-cell>
              <table:table-cell office:value-type="float" office:value="-0.001535007">
                <text:p>-0.0015350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3.159271240234">
                <text:p>363.159271240234</text:p>
              </table:table-cell>
              <table:table-cell office:value-type="float" office:value="-0.001834354">
                <text:p>-0.0018343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3.269348144531">
                <text:p>363.269348144531</text:p>
              </table:table-cell>
              <table:table-cell office:value-type="float" office:value="0.006078003">
                <text:p>0.0060780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3.37939453125">
                <text:p>363.37939453125</text:p>
              </table:table-cell>
              <table:table-cell office:value-type="float" office:value="0.005918184">
                <text:p>0.0059181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3.489501953125">
                <text:p>363.489501953125</text:p>
              </table:table-cell>
              <table:table-cell office:value-type="float" office:value="-0.007204379">
                <text:p>-0.0072043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3.599578857422">
                <text:p>363.599578857422</text:p>
              </table:table-cell>
              <table:table-cell office:value-type="float" office:value="0.01503372">
                <text:p>0.015033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3.709655761719">
                <text:p>363.709655761719</text:p>
              </table:table-cell>
              <table:table-cell office:value-type="float" office:value="0.008717465">
                <text:p>0.0087174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3.819763183594">
                <text:p>363.819763183594</text:p>
              </table:table-cell>
              <table:table-cell office:value-type="float" office:value="0.005474493">
                <text:p>0.00547449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3.929870605469">
                <text:p>363.929870605469</text:p>
              </table:table-cell>
              <table:table-cell office:value-type="float" office:value="-0.007077928">
                <text:p>-0.0070779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4.039978027344">
                <text:p>364.039978027344</text:p>
              </table:table-cell>
              <table:table-cell office:value-type="float" office:value="-0.008164409">
                <text:p>-0.0081644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4.150085449219">
                <text:p>364.150085449219</text:p>
              </table:table-cell>
              <table:table-cell office:value-type="float" office:value="-0.005636892">
                <text:p>-0.0056368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4.260223388672">
                <text:p>364.260223388672</text:p>
              </table:table-cell>
              <table:table-cell office:value-type="float" office:value="-0.003258416">
                <text:p>-0.0032584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4.370330810547">
                <text:p>364.370330810547</text:p>
              </table:table-cell>
              <table:table-cell office:value-type="float" office:value="-0.005858401">
                <text:p>-0.0058584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4.48046875">
                <text:p>364.48046875</text:p>
              </table:table-cell>
              <table:table-cell office:value-type="float" office:value="0.007917246">
                <text:p>0.0079172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4.590606689453">
                <text:p>364.590606689453</text:p>
              </table:table-cell>
              <table:table-cell office:value-type="float" office:value="0.01049086">
                <text:p>0.010490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4.700775146484">
                <text:p>364.700775146484</text:p>
              </table:table-cell>
              <table:table-cell office:value-type="float" office:value="0.003212336">
                <text:p>0.0032123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4.810913085938">
                <text:p>364.810913085938</text:p>
              </table:table-cell>
              <table:table-cell office:value-type="float" office:value="0.01421823">
                <text:p>0.014218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4.921081542969">
                <text:p>364.921081542969</text:p>
              </table:table-cell>
              <table:table-cell office:value-type="float" office:value="-0.004779904">
                <text:p>-0.0047799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5.03125">
                <text:p>365.03125</text:p>
              </table:table-cell>
              <table:table-cell office:value-type="float" office:value="-0.007111852">
                <text:p>-0.0071118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5.141418457031">
                <text:p>365.141418457031</text:p>
              </table:table-cell>
              <table:table-cell office:value-type="float" office:value="-0.009821082">
                <text:p>-0.0098210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5.251586914063">
                <text:p>365.251586914063</text:p>
              </table:table-cell>
              <table:table-cell office:value-type="float" office:value="0.0101711">
                <text:p>0.01017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5.361785888672">
                <text:p>365.361785888672</text:p>
              </table:table-cell>
              <table:table-cell office:value-type="float" office:value="0.03086484">
                <text:p>0.030864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5.471984863281">
                <text:p>365.471984863281</text:p>
              </table:table-cell>
              <table:table-cell office:value-type="float" office:value="0.004689635">
                <text:p>0.00468963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5.582183837891">
                <text:p>365.582183837891</text:p>
              </table:table-cell>
              <table:table-cell office:value-type="float" office:value="0.007664592">
                <text:p>0.0076645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5.6923828125">
                <text:p>365.6923828125</text:p>
              </table:table-cell>
              <table:table-cell office:value-type="float" office:value="0.009097733">
                <text:p>0.0090977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5.802581787109">
                <text:p>365.802581787109</text:p>
              </table:table-cell>
              <table:table-cell office:value-type="float" office:value="-0.001381823">
                <text:p>-0.0013818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5.912811279297">
                <text:p>365.912811279297</text:p>
              </table:table-cell>
              <table:table-cell office:value-type="float" office:value="0.01064568">
                <text:p>0.010645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6.023010253906">
                <text:p>366.023010253906</text:p>
              </table:table-cell>
              <table:table-cell office:value-type="float" office:value="0.003264504">
                <text:p>0.0032645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6.133239746094">
                <text:p>366.133239746094</text:p>
              </table:table-cell>
              <table:table-cell office:value-type="float" office:value="0.004831836">
                <text:p>0.0048318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6.243499755859">
                <text:p>366.243499755859</text:p>
              </table:table-cell>
              <table:table-cell office:value-type="float" office:value="-0.002769185">
                <text:p>-0.0027691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6.353729248047">
                <text:p>366.353729248047</text:p>
              </table:table-cell>
              <table:table-cell office:value-type="float" office:value="-0.0004867367">
                <text:p>-0.00048673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6.463989257813">
                <text:p>366.463989257813</text:p>
              </table:table-cell>
              <table:table-cell office:value-type="float" office:value="-0.001365135">
                <text:p>-0.00136513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6.57421875">
                <text:p>366.57421875</text:p>
              </table:table-cell>
              <table:table-cell office:value-type="float" office:value="0.00136017">
                <text:p>0.001360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6.684478759766">
                <text:p>366.684478759766</text:p>
              </table:table-cell>
              <table:table-cell office:value-type="float" office:value="-0.002211847">
                <text:p>-0.00221184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6.794738769531">
                <text:p>366.794738769531</text:p>
              </table:table-cell>
              <table:table-cell office:value-type="float" office:value="0.01123231">
                <text:p>0.0112323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6.905029296875">
                <text:p>366.905029296875</text:p>
              </table:table-cell>
              <table:table-cell office:value-type="float" office:value="-0.003792112">
                <text:p>-0.0037921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7.015289306641">
                <text:p>367.015289306641</text:p>
              </table:table-cell>
              <table:table-cell office:value-type="float" office:value="0.0001919636">
                <text:p>0.00019196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7.125579833984">
                <text:p>367.125579833984</text:p>
              </table:table-cell>
              <table:table-cell office:value-type="float" office:value="0.0133206">
                <text:p>0.01332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7.235870361328">
                <text:p>367.235870361328</text:p>
              </table:table-cell>
              <table:table-cell office:value-type="float" office:value="0.01660561">
                <text:p>0.016605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7.346160888672">
                <text:p>367.346160888672</text:p>
              </table:table-cell>
              <table:table-cell office:value-type="float" office:value="0.02184327">
                <text:p>0.021843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7.456481933594">
                <text:p>367.456481933594</text:p>
              </table:table-cell>
              <table:table-cell office:value-type="float" office:value="0.01036163">
                <text:p>0.010361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7.566772460938">
                <text:p>367.566772460938</text:p>
              </table:table-cell>
              <table:table-cell office:value-type="float" office:value="-0.006913464">
                <text:p>-0.0069134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7.677093505859">
                <text:p>367.677093505859</text:p>
              </table:table-cell>
              <table:table-cell office:value-type="float" office:value="-0.004096526">
                <text:p>-0.0040965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7.787414550781">
                <text:p>367.787414550781</text:p>
              </table:table-cell>
              <table:table-cell office:value-type="float" office:value="-0.009203822">
                <text:p>-0.0092038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7.897766113281">
                <text:p>367.897766113281</text:p>
              </table:table-cell>
              <table:table-cell office:value-type="float" office:value="-0.009987789">
                <text:p>-0.0099877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8.008087158203">
                <text:p>368.008087158203</text:p>
              </table:table-cell>
              <table:table-cell office:value-type="float" office:value="-0.0003250159">
                <text:p>-0.000325015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8.118438720703">
                <text:p>368.118438720703</text:p>
              </table:table-cell>
              <table:table-cell office:value-type="float" office:value="-0.003691561">
                <text:p>-0.00369156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8.228759765625">
                <text:p>368.228759765625</text:p>
              </table:table-cell>
              <table:table-cell office:value-type="float" office:value="0.0004435812">
                <text:p>0.00044358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8.339111328125">
                <text:p>368.339111328125</text:p>
              </table:table-cell>
              <table:table-cell office:value-type="float" office:value="-0.002151862">
                <text:p>-0.0021518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8.449493408203">
                <text:p>368.449493408203</text:p>
              </table:table-cell>
              <table:table-cell office:value-type="float" office:value="0.002527472">
                <text:p>0.00252747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8.559844970703">
                <text:p>368.559844970703</text:p>
              </table:table-cell>
              <table:table-cell office:value-type="float" office:value="0.009320688">
                <text:p>0.00932068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8.670227050781">
                <text:p>368.670227050781</text:p>
              </table:table-cell>
              <table:table-cell office:value-type="float" office:value="-0.007904004">
                <text:p>-0.0079040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8.780609130859">
                <text:p>368.780609130859</text:p>
              </table:table-cell>
              <table:table-cell office:value-type="float" office:value="-0.003922881">
                <text:p>-0.00392288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8.890991210938">
                <text:p>368.890991210938</text:p>
              </table:table-cell>
              <table:table-cell office:value-type="float" office:value="-0.01128764">
                <text:p>-0.011287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9.001373291016">
                <text:p>369.001373291016</text:p>
              </table:table-cell>
              <table:table-cell office:value-type="float" office:value="-0.0007862239">
                <text:p>-0.000786223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9.111755371094">
                <text:p>369.111755371094</text:p>
              </table:table-cell>
              <table:table-cell office:value-type="float" office:value="-0.01001591">
                <text:p>-0.010015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9.22216796875">
                <text:p>369.22216796875</text:p>
              </table:table-cell>
              <table:table-cell office:value-type="float" office:value="-0.009689054">
                <text:p>-0.00968905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9.332580566406">
                <text:p>369.332580566406</text:p>
              </table:table-cell>
              <table:table-cell office:value-type="float" office:value="-0.009411246">
                <text:p>-0.0094112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9.442993164063">
                <text:p>369.442993164063</text:p>
              </table:table-cell>
              <table:table-cell office:value-type="float" office:value="-0.0009194672">
                <text:p>-0.00091946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9.553405761719">
                <text:p>369.553405761719</text:p>
              </table:table-cell>
              <table:table-cell office:value-type="float" office:value="0.003894236">
                <text:p>0.00389423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9.663848876953">
                <text:p>369.663848876953</text:p>
              </table:table-cell>
              <table:table-cell office:value-type="float" office:value="0.007198146">
                <text:p>0.0071981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9.774261474609">
                <text:p>369.774261474609</text:p>
              </table:table-cell>
              <table:table-cell office:value-type="float" office:value="-0.005211465">
                <text:p>-0.0052114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9.884704589844">
                <text:p>369.884704589844</text:p>
              </table:table-cell>
              <table:table-cell office:value-type="float" office:value="0.002058969">
                <text:p>0.0020589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9.995147705078">
                <text:p>369.995147705078</text:p>
              </table:table-cell>
              <table:table-cell office:value-type="float" office:value="-0.006745848">
                <text:p>-0.0067458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0.105621337891">
                <text:p>370.105621337891</text:p>
              </table:table-cell>
              <table:table-cell office:value-type="float" office:value="0.009692758">
                <text:p>0.0096927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0.216064453125">
                <text:p>370.216064453125</text:p>
              </table:table-cell>
              <table:table-cell office:value-type="float" office:value="0.007441593">
                <text:p>0.00744159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0.326538085938">
                <text:p>370.326538085938</text:p>
              </table:table-cell>
              <table:table-cell office:value-type="float" office:value="0.02122342">
                <text:p>0.021223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0.43701171875">
                <text:p>370.43701171875</text:p>
              </table:table-cell>
              <table:table-cell office:value-type="float" office:value="0.01259444">
                <text:p>0.012594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0.547485351563">
                <text:p>370.547485351563</text:p>
              </table:table-cell>
              <table:table-cell office:value-type="float" office:value="0.002545411">
                <text:p>0.0025454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0.657958984375">
                <text:p>370.657958984375</text:p>
              </table:table-cell>
              <table:table-cell office:value-type="float" office:value="-0.00489737">
                <text:p>-0.004897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0.768432617188">
                <text:p>370.768432617188</text:p>
              </table:table-cell>
              <table:table-cell office:value-type="float" office:value="-0.01144497">
                <text:p>-0.011444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0.878936767578">
                <text:p>370.878936767578</text:p>
              </table:table-cell>
              <table:table-cell office:value-type="float" office:value="0.006987816">
                <text:p>0.0069878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0.989440917969">
                <text:p>370.989440917969</text:p>
              </table:table-cell>
              <table:table-cell office:value-type="float" office:value="-0.007635429">
                <text:p>-0.0076354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1.099945068359">
                <text:p>371.099945068359</text:p>
              </table:table-cell>
              <table:table-cell office:value-type="float" office:value="0.004432999">
                <text:p>0.0044329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1.21044921875">
                <text:p>371.21044921875</text:p>
              </table:table-cell>
              <table:table-cell office:value-type="float" office:value="-0.007024441">
                <text:p>-0.0070244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1.320983886719">
                <text:p>371.320983886719</text:p>
              </table:table-cell>
              <table:table-cell office:value-type="float" office:value="-0.006029067">
                <text:p>-0.0060290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1.431488037109">
                <text:p>371.431488037109</text:p>
              </table:table-cell>
              <table:table-cell office:value-type="float" office:value="0.001269652">
                <text:p>0.0012696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1.542022705078">
                <text:p>371.542022705078</text:p>
              </table:table-cell>
              <table:table-cell office:value-type="float" office:value="0.01392638">
                <text:p>0.013926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1.652557373047">
                <text:p>371.652557373047</text:p>
              </table:table-cell>
              <table:table-cell office:value-type="float" office:value="-0.008631798">
                <text:p>-0.00863179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1.763122558594">
                <text:p>371.763122558594</text:p>
              </table:table-cell>
              <table:table-cell office:value-type="float" office:value="-0.006098285">
                <text:p>-0.0060982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1.873657226563">
                <text:p>371.873657226563</text:p>
              </table:table-cell>
              <table:table-cell office:value-type="float" office:value="-0.009243961">
                <text:p>-0.0092439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1.984222412109">
                <text:p>371.984222412109</text:p>
              </table:table-cell>
              <table:table-cell office:value-type="float" office:value="0.003523804">
                <text:p>0.00352380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2.094787597656">
                <text:p>372.094787597656</text:p>
              </table:table-cell>
              <table:table-cell office:value-type="float" office:value="-0.005757268">
                <text:p>-0.00575726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2.205352783203">
                <text:p>372.205352783203</text:p>
              </table:table-cell>
              <table:table-cell office:value-type="float" office:value="-0.007241902">
                <text:p>-0.0072419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2.31591796875">
                <text:p>372.31591796875</text:p>
              </table:table-cell>
              <table:table-cell office:value-type="float" office:value="-0.00682804">
                <text:p>-0.006828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2.426513671875">
                <text:p>372.426513671875</text:p>
              </table:table-cell>
              <table:table-cell office:value-type="float" office:value="-0.001082888">
                <text:p>-0.00108288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2.537078857422">
                <text:p>372.537078857422</text:p>
              </table:table-cell>
              <table:table-cell office:value-type="float" office:value="0.002092197">
                <text:p>0.0020921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2.647674560547">
                <text:p>372.647674560547</text:p>
              </table:table-cell>
              <table:table-cell office:value-type="float" office:value="-0.01163982">
                <text:p>-0.011639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2.758270263672">
                <text:p>372.758270263672</text:p>
              </table:table-cell>
              <table:table-cell office:value-type="float" office:value="0.0002884872">
                <text:p>0.00028848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2.868896484375">
                <text:p>372.868896484375</text:p>
              </table:table-cell>
              <table:table-cell office:value-type="float" office:value="0.006365945">
                <text:p>0.00636594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2.9794921875">
                <text:p>372.9794921875</text:p>
              </table:table-cell>
              <table:table-cell office:value-type="float" office:value="-0.01159057">
                <text:p>-0.0115905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3.090118408203">
                <text:p>373.090118408203</text:p>
              </table:table-cell>
              <table:table-cell office:value-type="float" office:value="-0.001551456">
                <text:p>-0.0015514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3.200744628906">
                <text:p>373.200744628906</text:p>
              </table:table-cell>
              <table:table-cell office:value-type="float" office:value="0.03260845">
                <text:p>0.0326084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3.311370849609">
                <text:p>373.311370849609</text:p>
              </table:table-cell>
              <table:table-cell office:value-type="float" office:value="-0.001677549">
                <text:p>-0.0016775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3.421997070313">
                <text:p>373.421997070313</text:p>
              </table:table-cell>
              <table:table-cell office:value-type="float" office:value="0.0007302728">
                <text:p>0.00073027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3.532623291016">
                <text:p>373.532623291016</text:p>
              </table:table-cell>
              <table:table-cell office:value-type="float" office:value="-0.007825529">
                <text:p>-0.0078255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3.643280029297">
                <text:p>373.643280029297</text:p>
              </table:table-cell>
              <table:table-cell office:value-type="float" office:value="0.01151795">
                <text:p>0.011517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3.753936767578">
                <text:p>373.753936767578</text:p>
              </table:table-cell>
              <table:table-cell office:value-type="float" office:value="0.005790776">
                <text:p>0.0057907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3.864593505859">
                <text:p>373.864593505859</text:p>
              </table:table-cell>
              <table:table-cell office:value-type="float" office:value="-0.006120686">
                <text:p>-0.00612068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3.975250244141">
                <text:p>373.975250244141</text:p>
              </table:table-cell>
              <table:table-cell office:value-type="float" office:value="-0.0005906642">
                <text:p>-0.00059066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4.0859375">
                <text:p>374.0859375</text:p>
              </table:table-cell>
              <table:table-cell office:value-type="float" office:value="-0.006317093">
                <text:p>-0.0063170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4.196624755859">
                <text:p>374.196624755859</text:p>
              </table:table-cell>
              <table:table-cell office:value-type="float" office:value="-0.009902274">
                <text:p>-0.0099022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74.307281494141">
                <text:p>374.307281494141</text:p>
              </table:table-cell>
              <table:table-cell office:value-type="float" office:value="-0.003643788">
                <text:p>-0.0036437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74.417999267578">
                <text:p>374.417999267578</text:p>
              </table:table-cell>
              <table:table-cell office:value-type="float" office:value="-0.005959874">
                <text:p>-0.00595987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4.528686523438">
                <text:p>374.528686523438</text:p>
              </table:table-cell>
              <table:table-cell office:value-type="float" office:value="0.006467945">
                <text:p>0.0064679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4.639373779297">
                <text:p>374.639373779297</text:p>
              </table:table-cell>
              <table:table-cell office:value-type="float" office:value="0.008978395">
                <text:p>0.0089783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4.750091552734">
                <text:p>374.750091552734</text:p>
              </table:table-cell>
              <table:table-cell office:value-type="float" office:value="-0.005878839">
                <text:p>-0.00587883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4.860809326172">
                <text:p>374.860809326172</text:p>
              </table:table-cell>
              <table:table-cell office:value-type="float" office:value="-0.002434835">
                <text:p>-0.0024348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4.971527099609">
                <text:p>374.971527099609</text:p>
              </table:table-cell>
              <table:table-cell office:value-type="float" office:value="-0.001621557">
                <text:p>-0.00162155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5.082244873047">
                <text:p>375.082244873047</text:p>
              </table:table-cell>
              <table:table-cell office:value-type="float" office:value="-0.001662372">
                <text:p>-0.00166237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5.192993164063">
                <text:p>375.192993164063</text:p>
              </table:table-cell>
              <table:table-cell office:value-type="float" office:value="-0.004776609">
                <text:p>-0.00477660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5.3037109375">
                <text:p>375.3037109375</text:p>
              </table:table-cell>
              <table:table-cell office:value-type="float" office:value="-0.009134137">
                <text:p>-0.00913413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5.414459228516">
                <text:p>375.414459228516</text:p>
              </table:table-cell>
              <table:table-cell office:value-type="float" office:value="0.003091736">
                <text:p>0.00309173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5.525207519531">
                <text:p>375.525207519531</text:p>
              </table:table-cell>
              <table:table-cell office:value-type="float" office:value="-0.002531192">
                <text:p>-0.0025311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5.635986328125">
                <text:p>375.635986328125</text:p>
              </table:table-cell>
              <table:table-cell office:value-type="float" office:value="0.007419442">
                <text:p>0.0074194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5.746734619141">
                <text:p>375.746734619141</text:p>
              </table:table-cell>
              <table:table-cell office:value-type="float" office:value="-0.001483373">
                <text:p>-0.00148337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5.857513427734">
                <text:p>375.857513427734</text:p>
              </table:table-cell>
              <table:table-cell office:value-type="float" office:value="-0.004541572">
                <text:p>-0.00454157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5.968292236328">
                <text:p>375.968292236328</text:p>
              </table:table-cell>
              <table:table-cell office:value-type="float" office:value="-0.003228355">
                <text:p>-0.0032283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6.079071044922">
                <text:p>376.079071044922</text:p>
              </table:table-cell>
              <table:table-cell office:value-type="float" office:value="-0.007549627">
                <text:p>-0.00754962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6.189849853516">
                <text:p>376.189849853516</text:p>
              </table:table-cell>
              <table:table-cell office:value-type="float" office:value="0.0004397737">
                <text:p>0.00043977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6.300628662109">
                <text:p>376.300628662109</text:p>
              </table:table-cell>
              <table:table-cell office:value-type="float" office:value="-0.003453854">
                <text:p>-0.00345385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6.411437988281">
                <text:p>376.411437988281</text:p>
              </table:table-cell>
              <table:table-cell office:value-type="float" office:value="-0.01222286">
                <text:p>-0.0122228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6.522247314453">
                <text:p>376.522247314453</text:p>
              </table:table-cell>
              <table:table-cell office:value-type="float" office:value="-0.001434075">
                <text:p>-0.0014340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6.633056640625">
                <text:p>376.633056640625</text:p>
              </table:table-cell>
              <table:table-cell office:value-type="float" office:value="-0.002938747">
                <text:p>-0.0029387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6.743865966797">
                <text:p>376.743865966797</text:p>
              </table:table-cell>
              <table:table-cell office:value-type="float" office:value="0.001161572">
                <text:p>0.00116157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6.854705810547">
                <text:p>376.854705810547</text:p>
              </table:table-cell>
              <table:table-cell office:value-type="float" office:value="0.01375044">
                <text:p>0.0137504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76.965515136719">
                <text:p>376.965515136719</text:p>
              </table:table-cell>
              <table:table-cell office:value-type="float" office:value="0.01664385">
                <text:p>0.016643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77.076354980469">
                <text:p>377.076354980469</text:p>
              </table:table-cell>
              <table:table-cell office:value-type="float" office:value="-0.005779823">
                <text:p>-0.0057798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77.187194824219">
                <text:p>377.187194824219</text:p>
              </table:table-cell>
              <table:table-cell office:value-type="float" office:value="0.003852087">
                <text:p>0.00385208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77.298034667969">
                <text:p>377.298034667969</text:p>
              </table:table-cell>
              <table:table-cell office:value-type="float" office:value="-0.008053797">
                <text:p>-0.0080537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77.408905029297">
                <text:p>377.408905029297</text:p>
              </table:table-cell>
              <table:table-cell office:value-type="float" office:value="0.006776168">
                <text:p>0.00677616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77.519744873047">
                <text:p>377.519744873047</text:p>
              </table:table-cell>
              <table:table-cell office:value-type="float" office:value="-0.005166039">
                <text:p>-0.0051660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77.630615234375">
                <text:p>377.630615234375</text:p>
              </table:table-cell>
              <table:table-cell office:value-type="float" office:value="0.002306406">
                <text:p>0.0023064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7.741485595703">
                <text:p>377.741485595703</text:p>
              </table:table-cell>
              <table:table-cell office:value-type="float" office:value="-0.006368214">
                <text:p>-0.0063682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77.852355957031">
                <text:p>377.852355957031</text:p>
              </table:table-cell>
              <table:table-cell office:value-type="float" office:value="-0.007543106">
                <text:p>-0.00754310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77.963256835938">
                <text:p>377.963256835938</text:p>
              </table:table-cell>
              <table:table-cell office:value-type="float" office:value="-0.004452776">
                <text:p>-0.00445277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78.074157714844">
                <text:p>378.074157714844</text:p>
              </table:table-cell>
              <table:table-cell office:value-type="float" office:value="0.01217547">
                <text:p>0.012175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78.185028076172">
                <text:p>378.185028076172</text:p>
              </table:table-cell>
              <table:table-cell office:value-type="float" office:value="0.009848211">
                <text:p>0.00984821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78.295928955078">
                <text:p>378.295928955078</text:p>
              </table:table-cell>
              <table:table-cell office:value-type="float" office:value="-0.007936152">
                <text:p>-0.00793615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78.406860351563">
                <text:p>378.406860351563</text:p>
              </table:table-cell>
              <table:table-cell office:value-type="float" office:value="-0.001290454">
                <text:p>-0.00129045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78.517761230469">
                <text:p>378.517761230469</text:p>
              </table:table-cell>
              <table:table-cell office:value-type="float" office:value="0.004789454">
                <text:p>0.00478945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78.628692626953">
                <text:p>378.628692626953</text:p>
              </table:table-cell>
              <table:table-cell office:value-type="float" office:value="0.0003829707">
                <text:p>0.000382970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78.739593505859">
                <text:p>378.739593505859</text:p>
              </table:table-cell>
              <table:table-cell office:value-type="float" office:value="0.001313594">
                <text:p>0.00131359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8.850524902344">
                <text:p>378.850524902344</text:p>
              </table:table-cell>
              <table:table-cell office:value-type="float" office:value="0.002268119">
                <text:p>0.0022681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78.961486816406">
                <text:p>378.961486816406</text:p>
              </table:table-cell>
              <table:table-cell office:value-type="float" office:value="0.004021931">
                <text:p>0.00402193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9.072418212891">
                <text:p>379.072418212891</text:p>
              </table:table-cell>
              <table:table-cell office:value-type="float" office:value="0.01023366">
                <text:p>0.0102336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9.183380126953">
                <text:p>379.183380126953</text:p>
              </table:table-cell>
              <table:table-cell office:value-type="float" office:value="-0.007459956">
                <text:p>-0.0074599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9.294311523438">
                <text:p>379.294311523438</text:p>
              </table:table-cell>
              <table:table-cell office:value-type="float" office:value="0.006752587">
                <text:p>0.0067525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9.4052734375">
                <text:p>379.4052734375</text:p>
              </table:table-cell>
              <table:table-cell office:value-type="float" office:value="-0.01180441">
                <text:p>-0.011804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9.516235351563">
                <text:p>379.516235351563</text:p>
              </table:table-cell>
              <table:table-cell office:value-type="float" office:value="-0.007968501">
                <text:p>-0.00796850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79.627227783203">
                <text:p>379.627227783203</text:p>
              </table:table-cell>
              <table:table-cell office:value-type="float" office:value="-0.003251367">
                <text:p>-0.0032513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9.738189697266">
                <text:p>379.738189697266</text:p>
              </table:table-cell>
              <table:table-cell office:value-type="float" office:value="0.01206361">
                <text:p>0.0120636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9.849182128906">
                <text:p>379.849182128906</text:p>
              </table:table-cell>
              <table:table-cell office:value-type="float" office:value="-0.006462904">
                <text:p>-0.0064629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9.960174560547">
                <text:p>379.960174560547</text:p>
              </table:table-cell>
              <table:table-cell office:value-type="float" office:value="-0.003639932">
                <text:p>-0.00363993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80.071166992188">
                <text:p>380.071166992188</text:p>
              </table:table-cell>
              <table:table-cell office:value-type="float" office:value="-0.006950368">
                <text:p>-0.00695036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80.182189941406">
                <text:p>380.182189941406</text:p>
              </table:table-cell>
              <table:table-cell office:value-type="float" office:value="0.01135036">
                <text:p>0.011350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0.293182373047">
                <text:p>380.293182373047</text:p>
              </table:table-cell>
              <table:table-cell office:value-type="float" office:value="0.006578128">
                <text:p>0.0065781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80.404205322266">
                <text:p>380.404205322266</text:p>
              </table:table-cell>
              <table:table-cell office:value-type="float" office:value="-0.01361022">
                <text:p>-0.0136102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0.515228271484">
                <text:p>380.515228271484</text:p>
              </table:table-cell>
              <table:table-cell office:value-type="float" office:value="-0.009264532">
                <text:p>-0.0092645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0.626251220703">
                <text:p>380.626251220703</text:p>
              </table:table-cell>
              <table:table-cell office:value-type="float" office:value="-0.002635258">
                <text:p>-0.00263525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0.737274169922">
                <text:p>380.737274169922</text:p>
              </table:table-cell>
              <table:table-cell office:value-type="float" office:value="-0.01109903">
                <text:p>-0.0110990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0.848327636719">
                <text:p>380.848327636719</text:p>
              </table:table-cell>
              <table:table-cell office:value-type="float" office:value="0.01558885">
                <text:p>0.0155888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0.959381103516">
                <text:p>380.959381103516</text:p>
              </table:table-cell>
              <table:table-cell office:value-type="float" office:value="-0.001430285">
                <text:p>-0.00143028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81.070404052734">
                <text:p>381.070404052734</text:p>
              </table:table-cell>
              <table:table-cell office:value-type="float" office:value="-0.00614948">
                <text:p>-0.0061494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81.181488037109">
                <text:p>381.181488037109</text:p>
              </table:table-cell>
              <table:table-cell office:value-type="float" office:value="0.001244277">
                <text:p>0.00124427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1.292541503906">
                <text:p>381.292541503906</text:p>
              </table:table-cell>
              <table:table-cell office:value-type="float" office:value="-0.005479129">
                <text:p>-0.00547912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81.403594970703">
                <text:p>381.403594970703</text:p>
              </table:table-cell>
              <table:table-cell office:value-type="float" office:value="0.01142749">
                <text:p>0.0114274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81.514678955078">
                <text:p>381.514678955078</text:p>
              </table:table-cell>
              <table:table-cell office:value-type="float" office:value="0.0104973">
                <text:p>0.010497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81.625762939453">
                <text:p>381.625762939453</text:p>
              </table:table-cell>
              <table:table-cell office:value-type="float" office:value="0.01283908">
                <text:p>0.0128390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1.736846923828">
                <text:p>381.736846923828</text:p>
              </table:table-cell>
              <table:table-cell office:value-type="float" office:value="0.01058896">
                <text:p>0.0105889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1.847930908203">
                <text:p>381.847930908203</text:p>
              </table:table-cell>
              <table:table-cell office:value-type="float" office:value="-0.006819086">
                <text:p>-0.00681908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81.959045410156">
                <text:p>381.959045410156</text:p>
              </table:table-cell>
              <table:table-cell office:value-type="float" office:value="0.009414451">
                <text:p>0.00941445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82.070129394531">
                <text:p>382.070129394531</text:p>
              </table:table-cell>
              <table:table-cell office:value-type="float" office:value="0.0008534902">
                <text:p>0.000853490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82.181243896484">
                <text:p>382.181243896484</text:p>
              </table:table-cell>
              <table:table-cell office:value-type="float" office:value="0.00497543">
                <text:p>0.0049754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82.292358398438">
                <text:p>382.292358398438</text:p>
              </table:table-cell>
              <table:table-cell office:value-type="float" office:value="-0.005519375">
                <text:p>-0.0055193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82.403503417969">
                <text:p>382.403503417969</text:p>
              </table:table-cell>
              <table:table-cell office:value-type="float" office:value="0.004083221">
                <text:p>0.00408322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82.514617919922">
                <text:p>382.514617919922</text:p>
              </table:table-cell>
              <table:table-cell office:value-type="float" office:value="0.01674681">
                <text:p>0.0167468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82.625762939453">
                <text:p>382.625762939453</text:p>
              </table:table-cell>
              <table:table-cell office:value-type="float" office:value="-0.004390446">
                <text:p>-0.0043904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82.736907958984">
                <text:p>382.736907958984</text:p>
              </table:table-cell>
              <table:table-cell office:value-type="float" office:value="0.007497733">
                <text:p>0.0074977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82.848052978516">
                <text:p>382.848052978516</text:p>
              </table:table-cell>
              <table:table-cell office:value-type="float" office:value="0.003129203">
                <text:p>0.0031292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82.959197998047">
                <text:p>382.959197998047</text:p>
              </table:table-cell>
              <table:table-cell office:value-type="float" office:value="0.00888674">
                <text:p>0.0088867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83.070343017578">
                <text:p>383.070343017578</text:p>
              </table:table-cell>
              <table:table-cell office:value-type="float" office:value="0.003767248">
                <text:p>0.0037672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3.181518554688">
                <text:p>383.181518554688</text:p>
              </table:table-cell>
              <table:table-cell office:value-type="float" office:value="0.01386142">
                <text:p>0.013861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83.292694091797">
                <text:p>383.292694091797</text:p>
              </table:table-cell>
              <table:table-cell office:value-type="float" office:value="0.00330754">
                <text:p>0.0033075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83.403869628906">
                <text:p>383.403869628906</text:p>
              </table:table-cell>
              <table:table-cell office:value-type="float" office:value="-0.001992112">
                <text:p>-0.00199211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83.515045166016">
                <text:p>383.515045166016</text:p>
              </table:table-cell>
              <table:table-cell office:value-type="float" office:value="-0.002037402">
                <text:p>-0.00203740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83.626220703125">
                <text:p>383.626220703125</text:p>
              </table:table-cell>
              <table:table-cell office:value-type="float" office:value="0.01216936">
                <text:p>0.0121693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83.737426757813">
                <text:p>383.737426757813</text:p>
              </table:table-cell>
              <table:table-cell office:value-type="float" office:value="0.01467805">
                <text:p>0.014678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3.8486328125">
                <text:p>383.8486328125</text:p>
              </table:table-cell>
              <table:table-cell office:value-type="float" office:value="-0.0002931136">
                <text:p>-0.000293113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3.959838867188">
                <text:p>383.959838867188</text:p>
              </table:table-cell>
              <table:table-cell office:value-type="float" office:value="-0.001344333">
                <text:p>-0.0013443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84.071044921875">
                <text:p>384.071044921875</text:p>
              </table:table-cell>
              <table:table-cell office:value-type="float" office:value="-0.009813991">
                <text:p>-0.00981399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84.182250976563">
                <text:p>384.182250976563</text:p>
              </table:table-cell>
              <table:table-cell office:value-type="float" office:value="0.0119473">
                <text:p>0.011947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84.293487548828">
                <text:p>384.293487548828</text:p>
              </table:table-cell>
              <table:table-cell office:value-type="float" office:value="-0.008897616">
                <text:p>-0.0088976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84.404693603516">
                <text:p>384.404693603516</text:p>
              </table:table-cell>
              <table:table-cell office:value-type="float" office:value="0.01181759">
                <text:p>0.0118175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84.515930175781">
                <text:p>384.515930175781</text:p>
              </table:table-cell>
              <table:table-cell office:value-type="float" office:value="0.01227586">
                <text:p>0.0122758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4.627197265625">
                <text:p>384.627197265625</text:p>
              </table:table-cell>
              <table:table-cell office:value-type="float" office:value="-0.01013604">
                <text:p>-0.0101360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84.738433837891">
                <text:p>384.738433837891</text:p>
              </table:table-cell>
              <table:table-cell office:value-type="float" office:value="-0.00504035">
                <text:p>-0.0050403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4.849670410156">
                <text:p>384.849670410156</text:p>
              </table:table-cell>
              <table:table-cell office:value-type="float" office:value="0.01818477">
                <text:p>0.0181847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4.9609375">
                <text:p>384.9609375</text:p>
              </table:table-cell>
              <table:table-cell office:value-type="float" office:value="0.01371462">
                <text:p>0.0137146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85.072204589844">
                <text:p>385.072204589844</text:p>
              </table:table-cell>
              <table:table-cell office:value-type="float" office:value="-0.00687898">
                <text:p>-0.0068789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85.183471679688">
                <text:p>385.183471679688</text:p>
              </table:table-cell>
              <table:table-cell office:value-type="float" office:value="0.01526393">
                <text:p>0.0152639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85.294738769531">
                <text:p>385.294738769531</text:p>
              </table:table-cell>
              <table:table-cell office:value-type="float" office:value="0.008417744">
                <text:p>0.00841774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5.406036376953">
                <text:p>385.406036376953</text:p>
              </table:table-cell>
              <table:table-cell office:value-type="float" office:value="-0.003699752">
                <text:p>-0.00369975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85.517333984375">
                <text:p>385.517333984375</text:p>
              </table:table-cell>
              <table:table-cell office:value-type="float" office:value="0.003978269">
                <text:p>0.00397826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85.628601074219">
                <text:p>385.628601074219</text:p>
              </table:table-cell>
              <table:table-cell office:value-type="float" office:value="-0.004355424">
                <text:p>-0.00435542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85.739898681641">
                <text:p>385.739898681641</text:p>
              </table:table-cell>
              <table:table-cell office:value-type="float" office:value="-0.009384851">
                <text:p>-0.00938485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5.851226806641">
                <text:p>385.851226806641</text:p>
              </table:table-cell>
              <table:table-cell office:value-type="float" office:value="0.01239854">
                <text:p>0.0123985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5.962524414063">
                <text:p>385.962524414063</text:p>
              </table:table-cell>
              <table:table-cell office:value-type="float" office:value="-0.003759502">
                <text:p>-0.00375950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6.073852539063">
                <text:p>386.073852539063</text:p>
              </table:table-cell>
              <table:table-cell office:value-type="float" office:value="0.01395449">
                <text:p>0.0139544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6.185180664063">
                <text:p>386.18518066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6.296508789063">
                <text:p>386.296508789063</text:p>
              </table:table-cell>
              <table:table-cell office:value-type="float" office:value="0.007621645">
                <text:p>0.00762164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6.407836914063">
                <text:p>386.407836914063</text:p>
              </table:table-cell>
              <table:table-cell office:value-type="float" office:value="0.002285439">
                <text:p>0.00228543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6.519165039063">
                <text:p>386.519165039063</text:p>
              </table:table-cell>
              <table:table-cell office:value-type="float" office:value="0.002735665">
                <text:p>0.00273566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6.630523681641">
                <text:p>386.630523681641</text:p>
              </table:table-cell>
              <table:table-cell office:value-type="float" office:value="0.002943159">
                <text:p>0.00294315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6.741882324219">
                <text:p>386.741882324219</text:p>
              </table:table-cell>
              <table:table-cell office:value-type="float" office:value="-0.0003017488">
                <text:p>-0.000301748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6.853240966797">
                <text:p>386.853240966797</text:p>
              </table:table-cell>
              <table:table-cell office:value-type="float" office:value="-0.003753548">
                <text:p>-0.00375354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6.964599609375">
                <text:p>386.964599609375</text:p>
              </table:table-cell>
              <table:table-cell office:value-type="float" office:value="-0.005925657">
                <text:p>-0.00592565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7.075958251953">
                <text:p>387.075958251953</text:p>
              </table:table-cell>
              <table:table-cell office:value-type="float" office:value="0.0081857">
                <text:p>0.008185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7.187347412109">
                <text:p>387.187347412109</text:p>
              </table:table-cell>
              <table:table-cell office:value-type="float" office:value="-0.006099233">
                <text:p>-0.0060992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7.298736572266">
                <text:p>387.298736572266</text:p>
              </table:table-cell>
              <table:table-cell office:value-type="float" office:value="0.01519048">
                <text:p>0.0151904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7.410095214844">
                <text:p>387.410095214844</text:p>
              </table:table-cell>
              <table:table-cell office:value-type="float" office:value="0.004799596">
                <text:p>0.00479959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7.521514892578">
                <text:p>387.521514892578</text:p>
              </table:table-cell>
              <table:table-cell office:value-type="float" office:value="-0.0009012736">
                <text:p>-0.000901273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87.632904052734">
                <text:p>387.632904052734</text:p>
              </table:table-cell>
              <table:table-cell office:value-type="float" office:value="0.0006317886">
                <text:p>0.00063178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87.744293212891">
                <text:p>387.744293212891</text:p>
              </table:table-cell>
              <table:table-cell office:value-type="float" office:value="0.0141557">
                <text:p>0.014155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87.855712890625">
                <text:p>387.855712890625</text:p>
              </table:table-cell>
              <table:table-cell office:value-type="float" office:value="0.002929705">
                <text:p>0.00292970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87.967132568359">
                <text:p>387.967132568359</text:p>
              </table:table-cell>
              <table:table-cell office:value-type="float" office:value="0.004705147">
                <text:p>0.00470514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88.078552246094">
                <text:p>388.078552246094</text:p>
              </table:table-cell>
              <table:table-cell office:value-type="float" office:value="0.001353142">
                <text:p>0.00135314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88.189971923828">
                <text:p>388.189971923828</text:p>
              </table:table-cell>
              <table:table-cell office:value-type="float" office:value="0.0006638222">
                <text:p>0.000663822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88.301422119141">
                <text:p>388.301422119141</text:p>
              </table:table-cell>
              <table:table-cell office:value-type="float" office:value="-0.005065608">
                <text:p>-0.0050656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88.412872314453">
                <text:p>388.412872314453</text:p>
              </table:table-cell>
              <table:table-cell office:value-type="float" office:value="-0.008613306">
                <text:p>-0.00861330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88.524291992188">
                <text:p>388.524291992188</text:p>
              </table:table-cell>
              <table:table-cell office:value-type="float" office:value="0.006411649">
                <text:p>0.00641164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8.635772705078">
                <text:p>388.635772705078</text:p>
              </table:table-cell>
              <table:table-cell office:value-type="float" office:value="0.00447786">
                <text:p>0.0044778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88.747222900391">
                <text:p>388.747222900391</text:p>
              </table:table-cell>
              <table:table-cell office:value-type="float" office:value="-0.001672599">
                <text:p>-0.00167259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8.858673095703">
                <text:p>388.858673095703</text:p>
              </table:table-cell>
              <table:table-cell office:value-type="float" office:value="-0.009373079">
                <text:p>-0.00937307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8.970153808594">
                <text:p>388.970153808594</text:p>
              </table:table-cell>
              <table:table-cell office:value-type="float" office:value="0.002124142">
                <text:p>0.00212414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9.081634521484">
                <text:p>389.081634521484</text:p>
              </table:table-cell>
              <table:table-cell office:value-type="float" office:value="-0.002518456">
                <text:p>-0.0025184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89.193115234375">
                <text:p>389.193115234375</text:p>
              </table:table-cell>
              <table:table-cell office:value-type="float" office:value="0.0004690608">
                <text:p>0.00046906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89.304595947266">
                <text:p>389.304595947266</text:p>
              </table:table-cell>
              <table:table-cell office:value-type="float" office:value="-0.002205119">
                <text:p>-0.00220511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9.416076660156">
                <text:p>389.416076660156</text:p>
              </table:table-cell>
              <table:table-cell office:value-type="float" office:value="0.00359391">
                <text:p>0.0035939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9.527587890625">
                <text:p>389.527587890625</text:p>
              </table:table-cell>
              <table:table-cell office:value-type="float" office:value="-0.003162294">
                <text:p>-0.00316229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89.639099121094">
                <text:p>389.639099121094</text:p>
              </table:table-cell>
              <table:table-cell office:value-type="float" office:value="0.0146093">
                <text:p>0.014609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89.750610351563">
                <text:p>389.750610351563</text:p>
              </table:table-cell>
              <table:table-cell office:value-type="float" office:value="-0.003518627">
                <text:p>-0.00351862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89.862121582031">
                <text:p>389.862121582031</text:p>
              </table:table-cell>
              <table:table-cell office:value-type="float" office:value="-0.004140439">
                <text:p>-0.00414043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89.9736328125">
                <text:p>389.9736328125</text:p>
              </table:table-cell>
              <table:table-cell office:value-type="float" office:value="-0.002462953">
                <text:p>-0.00246295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90.085174560547">
                <text:p>390.085174560547</text:p>
              </table:table-cell>
              <table:table-cell office:value-type="float" office:value="-0.003344008">
                <text:p>-0.00334400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90.196685791016">
                <text:p>390.196685791016</text:p>
              </table:table-cell>
              <table:table-cell office:value-type="float" office:value="0.01467158">
                <text:p>0.0146715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90.308227539063">
                <text:p>390.308227539063</text:p>
              </table:table-cell>
              <table:table-cell office:value-type="float" office:value="-0.0007962032">
                <text:p>-0.00079620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90.419769287109">
                <text:p>390.419769287109</text:p>
              </table:table-cell>
              <table:table-cell office:value-type="float" office:value="-0.0001198491">
                <text:p>-0.00011984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90.531341552734">
                <text:p>390.531341552734</text:p>
              </table:table-cell>
              <table:table-cell office:value-type="float" office:value="0.00154321">
                <text:p>0.0015432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90.642883300781">
                <text:p>390.642883300781</text:p>
              </table:table-cell>
              <table:table-cell office:value-type="float" office:value="-0.004614714">
                <text:p>-0.00461471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90.754455566406">
                <text:p>390.754455566406</text:p>
              </table:table-cell>
              <table:table-cell office:value-type="float" office:value="0.01454072">
                <text:p>0.0145407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0.866027832031">
                <text:p>390.866027832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0.977600097656">
                <text:p>390.977600097656</text:p>
              </table:table-cell>
              <table:table-cell office:value-type="float" office:value="-0.0004354332">
                <text:p>-0.000435433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91.089172363281">
                <text:p>391.089172363281</text:p>
              </table:table-cell>
              <table:table-cell office:value-type="float" office:value="-0.007383076">
                <text:p>-0.00738307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91.200744628906">
                <text:p>391.200744628906</text:p>
              </table:table-cell>
              <table:table-cell office:value-type="float" office:value="0.01728223">
                <text:p>0.0172822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1.312347412109">
                <text:p>391.312347412109</text:p>
              </table:table-cell>
              <table:table-cell office:value-type="float" office:value="-0.002118485">
                <text:p>-0.00211848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91.423950195313">
                <text:p>391.423950195313</text:p>
              </table:table-cell>
              <table:table-cell office:value-type="float" office:value="0.01287675">
                <text:p>0.012876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91.535552978516">
                <text:p>391.535552978516</text:p>
              </table:table-cell>
              <table:table-cell office:value-type="float" office:value="-0.01022927">
                <text:p>-0.0102292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91.647155761719">
                <text:p>391.647155761719</text:p>
              </table:table-cell>
              <table:table-cell office:value-type="float" office:value="0.00384869">
                <text:p>0.0038486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91.758758544922">
                <text:p>391.758758544922</text:p>
              </table:table-cell>
              <table:table-cell office:value-type="float" office:value="-0.01021748">
                <text:p>-0.0102174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91.870391845703">
                <text:p>391.870391845703</text:p>
              </table:table-cell>
              <table:table-cell office:value-type="float" office:value="0.01261685">
                <text:p>0.0126168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91.982025146484">
                <text:p>391.982025146484</text:p>
              </table:table-cell>
              <table:table-cell office:value-type="float" office:value="0.002375296">
                <text:p>0.00237529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92.093658447266">
                <text:p>392.093658447266</text:p>
              </table:table-cell>
              <table:table-cell office:value-type="float" office:value="-0.009060538">
                <text:p>-0.00906053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92.205291748047">
                <text:p>392.205291748047</text:p>
              </table:table-cell>
              <table:table-cell office:value-type="float" office:value="-0.0008861387">
                <text:p>-0.000886138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92.316925048828">
                <text:p>392.316925048828</text:p>
              </table:table-cell>
              <table:table-cell office:value-type="float" office:value="0.01702654">
                <text:p>0.0170265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2.428558349609">
                <text:p>392.428558349609</text:p>
              </table:table-cell>
              <table:table-cell office:value-type="float" office:value="0.01210119">
                <text:p>0.0121011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92.540222167969">
                <text:p>392.540222167969</text:p>
              </table:table-cell>
              <table:table-cell office:value-type="float" office:value="-0.004840761">
                <text:p>-0.00484076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92.651885986328">
                <text:p>392.651885986328</text:p>
              </table:table-cell>
              <table:table-cell office:value-type="float" office:value="-0.00922903">
                <text:p>-0.0092290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92.763549804688">
                <text:p>392.763549804688</text:p>
              </table:table-cell>
              <table:table-cell office:value-type="float" office:value="-0.001466417">
                <text:p>-0.00146641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92.875213623047">
                <text:p>392.875213623047</text:p>
              </table:table-cell>
              <table:table-cell office:value-type="float" office:value="-0.001000075">
                <text:p>-0.0010000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92.986907958984">
                <text:p>392.986907958984</text:p>
              </table:table-cell>
              <table:table-cell office:value-type="float" office:value="0.003742097">
                <text:p>0.0037420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3.098602294922">
                <text:p>393.098602294922</text:p>
              </table:table-cell>
              <table:table-cell office:value-type="float" office:value="0.01472213">
                <text:p>0.0147221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3.210266113281">
                <text:p>393.210266113281</text:p>
              </table:table-cell>
              <table:table-cell office:value-type="float" office:value="-0.004792956">
                <text:p>-0.00479295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93.321960449219">
                <text:p>393.321960449219</text:p>
              </table:table-cell>
              <table:table-cell office:value-type="float" office:value="-0.003235079">
                <text:p>-0.00323507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3.433685302734">
                <text:p>393.433685302734</text:p>
              </table:table-cell>
              <table:table-cell office:value-type="float" office:value="-0.006699661">
                <text:p>-0.00669966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3.545379638672">
                <text:p>393.545379638672</text:p>
              </table:table-cell>
              <table:table-cell office:value-type="float" office:value="-0.01050174">
                <text:p>-0.010501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3.657104492188">
                <text:p>393.657104492188</text:p>
              </table:table-cell>
              <table:table-cell office:value-type="float" office:value="0.0009251167">
                <text:p>0.000925116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3.768798828125">
                <text:p>393.768798828125</text:p>
              </table:table-cell>
              <table:table-cell office:value-type="float" office:value="-0.006905654">
                <text:p>-0.00690565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93.880523681641">
                <text:p>393.880523681641</text:p>
              </table:table-cell>
              <table:table-cell office:value-type="float" office:value="0.01322583">
                <text:p>0.0132258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93.992248535156">
                <text:p>393.992248535156</text:p>
              </table:table-cell>
              <table:table-cell office:value-type="float" office:value="0.02354866">
                <text:p>0.0235486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94.10400390625">
                <text:p>394.10400390625</text:p>
              </table:table-cell>
              <table:table-cell office:value-type="float" office:value="-0.007252138">
                <text:p>-0.00725213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94.215728759766">
                <text:p>394.215728759766</text:p>
              </table:table-cell>
              <table:table-cell office:value-type="float" office:value="0.001620305">
                <text:p>0.0016203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94.327484130859">
                <text:p>394.327484130859</text:p>
              </table:table-cell>
              <table:table-cell office:value-type="float" office:value="0.005961653">
                <text:p>0.00596165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4.439239501953">
                <text:p>394.439239501953</text:p>
              </table:table-cell>
              <table:table-cell office:value-type="float" office:value="-0.001833039">
                <text:p>-0.00183303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4.550994873047">
                <text:p>394.550994873047</text:p>
              </table:table-cell>
              <table:table-cell office:value-type="float" office:value="-0.008436098">
                <text:p>-0.00843609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94.662750244141">
                <text:p>394.662750244141</text:p>
              </table:table-cell>
              <table:table-cell office:value-type="float" office:value="0.003502536">
                <text:p>0.00350253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94.774536132813">
                <text:p>394.774536132813</text:p>
              </table:table-cell>
              <table:table-cell office:value-type="float" office:value="-0.003978101">
                <text:p>-0.00397810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94.886291503906">
                <text:p>394.886291503906</text:p>
              </table:table-cell>
              <table:table-cell office:value-type="float" office:value="0.007545869">
                <text:p>0.00754586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4.998077392578">
                <text:p>394.998077392578</text:p>
              </table:table-cell>
              <table:table-cell office:value-type="float" office:value="-0.004235778">
                <text:p>-0.00423577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95.10986328125">
                <text:p>395.10986328125</text:p>
              </table:table-cell>
              <table:table-cell office:value-type="float" office:value="0.0101316">
                <text:p>0.010131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5.221649169922">
                <text:p>395.221649169922</text:p>
              </table:table-cell>
              <table:table-cell office:value-type="float" office:value="-0.003916468">
                <text:p>-0.00391646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95.333465576172">
                <text:p>395.333465576172</text:p>
              </table:table-cell>
              <table:table-cell office:value-type="float" office:value="-0.009190084">
                <text:p>-0.00919008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95.445251464844">
                <text:p>395.445251464844</text:p>
              </table:table-cell>
              <table:table-cell office:value-type="float" office:value="-0.003386212">
                <text:p>-0.00338621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5.557067871094">
                <text:p>395.557067871094</text:p>
              </table:table-cell>
              <table:table-cell office:value-type="float" office:value="-0.007523664">
                <text:p>-0.00752366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5.668884277344">
                <text:p>395.668884277344</text:p>
              </table:table-cell>
              <table:table-cell office:value-type="float" office:value="0.04747699">
                <text:p>0.0474769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95.780700683594">
                <text:p>395.780700683594</text:p>
              </table:table-cell>
              <table:table-cell office:value-type="float" office:value="-0.004414401">
                <text:p>-0.00441440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95.892547607422">
                <text:p>395.892547607422</text:p>
              </table:table-cell>
              <table:table-cell office:value-type="float" office:value="0.003120668">
                <text:p>0.00312066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96.004364013672">
                <text:p>396.004364013672</text:p>
              </table:table-cell>
              <table:table-cell office:value-type="float" office:value="0.00220665">
                <text:p>0.0022066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6.1162109375">
                <text:p>396.1162109375</text:p>
              </table:table-cell>
              <table:table-cell office:value-type="float" office:value="0.05101816">
                <text:p>0.051018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96.228057861328">
                <text:p>396.228057861328</text:p>
              </table:table-cell>
              <table:table-cell office:value-type="float" office:value="-0.001548551">
                <text:p>-0.00154855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6.339904785156">
                <text:p>396.339904785156</text:p>
              </table:table-cell>
              <table:table-cell office:value-type="float" office:value="-0.001668771">
                <text:p>-0.00166877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96.451751708984">
                <text:p>396.451751708984</text:p>
              </table:table-cell>
              <table:table-cell office:value-type="float" office:value="-0.00536308">
                <text:p>-0.0053630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96.563629150391">
                <text:p>396.563629150391</text:p>
              </table:table-cell>
              <table:table-cell office:value-type="float" office:value="-0.008864581">
                <text:p>-0.00886458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6.675476074219">
                <text:p>396.675476074219</text:p>
              </table:table-cell>
              <table:table-cell office:value-type="float" office:value="-0.004018947">
                <text:p>-0.00401894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96.787353515625">
                <text:p>396.787353515625</text:p>
              </table:table-cell>
              <table:table-cell office:value-type="float" office:value="0.01311566">
                <text:p>0.0131156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96.899230957031">
                <text:p>396.899230957031</text:p>
              </table:table-cell>
              <table:table-cell office:value-type="float" office:value="-0.005280325">
                <text:p>-0.0052803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97.011108398438">
                <text:p>397.011108398438</text:p>
              </table:table-cell>
              <table:table-cell office:value-type="float" office:value="0.0005674674">
                <text:p>0.000567467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7.123016357422">
                <text:p>397.123016357422</text:p>
              </table:table-cell>
              <table:table-cell office:value-type="float" office:value="-0.005157115">
                <text:p>-0.00515711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97.234893798828">
                <text:p>397.234893798828</text:p>
              </table:table-cell>
              <table:table-cell office:value-type="float" office:value="0.0053641">
                <text:p>0.005364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97.346801757813">
                <text:p>397.346801757813</text:p>
              </table:table-cell>
              <table:table-cell office:value-type="float" office:value="0.002525869">
                <text:p>0.00252586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97.458709716797">
                <text:p>397.458709716797</text:p>
              </table:table-cell>
              <table:table-cell office:value-type="float" office:value="-0.003175183">
                <text:p>-0.00317518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97.570617675781">
                <text:p>397.570617675781</text:p>
              </table:table-cell>
              <table:table-cell office:value-type="float" office:value="0.005692258">
                <text:p>0.00569225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97.682525634766">
                <text:p>397.682525634766</text:p>
              </table:table-cell>
              <table:table-cell office:value-type="float" office:value="-0.003982089">
                <text:p>-0.00398208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7.794464111328">
                <text:p>397.794464111328</text:p>
              </table:table-cell>
              <table:table-cell office:value-type="float" office:value="0.002501332">
                <text:p>0.00250133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7.906402587891">
                <text:p>397.906402587891</text:p>
              </table:table-cell>
              <table:table-cell office:value-type="float" office:value="0.0009207895">
                <text:p>0.000920789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8.018310546875">
                <text:p>398.018310546875</text:p>
              </table:table-cell>
              <table:table-cell office:value-type="float" office:value="0.005881796">
                <text:p>0.00588179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8.130249023438">
                <text:p>398.130249023438</text:p>
              </table:table-cell>
              <table:table-cell office:value-type="float" office:value="-0.003218646">
                <text:p>-0.00321864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8.242218017578">
                <text:p>398.242218017578</text:p>
              </table:table-cell>
              <table:table-cell office:value-type="float" office:value="-0.004773479">
                <text:p>-0.00477347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8.354156494141">
                <text:p>398.354156494141</text:p>
              </table:table-cell>
              <table:table-cell office:value-type="float" office:value="-0.003282453">
                <text:p>-0.00328245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98.466125488281">
                <text:p>398.466125488281</text:p>
              </table:table-cell>
              <table:table-cell office:value-type="float" office:value="-0.001791312">
                <text:p>-0.0017913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98.578094482422">
                <text:p>398.578094482422</text:p>
              </table:table-cell>
              <table:table-cell office:value-type="float" office:value="-0.001875834">
                <text:p>-0.00187583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98.690063476563">
                <text:p>398.690063476563</text:p>
              </table:table-cell>
              <table:table-cell office:value-type="float" office:value="-0.00756342">
                <text:p>-0.0075634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98.802032470703">
                <text:p>398.802032470703</text:p>
              </table:table-cell>
              <table:table-cell office:value-type="float" office:value="-0.006325537">
                <text:p>-0.00632553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98.914001464844">
                <text:p>398.914001464844</text:p>
              </table:table-cell>
              <table:table-cell office:value-type="float" office:value="-0.00490001">
                <text:p>-0.004900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99.026000976563">
                <text:p>399.026000976563</text:p>
              </table:table-cell>
              <table:table-cell office:value-type="float" office:value="0.02248574">
                <text:p>0.0224857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99.137969970703">
                <text:p>399.137969970703</text:p>
              </table:table-cell>
              <table:table-cell office:value-type="float" office:value="-0.003797016">
                <text:p>-0.0037970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99.249969482422">
                <text:p>399.249969482422</text:p>
              </table:table-cell>
              <table:table-cell office:value-type="float" office:value="0.01713434">
                <text:p>0.0171343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99.361968994141">
                <text:p>399.361968994141</text:p>
              </table:table-cell>
              <table:table-cell office:value-type="float" office:value="-0.005198224">
                <text:p>-0.0051982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99.473999023438">
                <text:p>399.473999023438</text:p>
              </table:table-cell>
              <table:table-cell office:value-type="float" office:value="0.008648579">
                <text:p>0.00864857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99.585998535156">
                <text:p>399.585998535156</text:p>
              </table:table-cell>
              <table:table-cell office:value-type="float" office:value="-0.0008001596">
                <text:p>-0.000800159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99.698028564453">
                <text:p>399.698028564453</text:p>
              </table:table-cell>
              <table:table-cell office:value-type="float" office:value="-0.002673468">
                <text:p>-0.00267346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99.81005859375">
                <text:p>399.81005859375</text:p>
              </table:table-cell>
              <table:table-cell office:value-type="float" office:value="-0.007100711">
                <text:p>-0.0071007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99.922088623047">
                <text:p>399.922088623047</text:p>
              </table:table-cell>
              <table:table-cell office:value-type="float" office:value="-0.003403381">
                <text:p>-0.00340338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0.034118652344">
                <text:p>400.034118652344</text:p>
              </table:table-cell>
              <table:table-cell office:value-type="float" office:value="-0.006844314">
                <text:p>-0.00684431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0.146148681641">
                <text:p>400.146148681641</text:p>
              </table:table-cell>
              <table:table-cell office:value-type="float" office:value="-0.0006648538">
                <text:p>-0.000664853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0.258209228516">
                <text:p>400.258209228516</text:p>
              </table:table-cell>
              <table:table-cell office:value-type="float" office:value="-0.0035933">
                <text:p>-0.003593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00.370269775391">
                <text:p>400.370269775391</text:p>
              </table:table-cell>
              <table:table-cell office:value-type="float" office:value="0.002244878">
                <text:p>0.00224487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00.482330322266">
                <text:p>400.482330322266</text:p>
              </table:table-cell>
              <table:table-cell office:value-type="float" office:value="-0.003013011">
                <text:p>-0.00301301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00.594390869141">
                <text:p>400.594390869141</text:p>
              </table:table-cell>
              <table:table-cell office:value-type="float" office:value="0.006167931">
                <text:p>0.00616793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00.706451416016">
                <text:p>400.706451416016</text:p>
              </table:table-cell>
              <table:table-cell office:value-type="float" office:value="-0.004713777">
                <text:p>-0.00471377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00.818511962891">
                <text:p>400.818511962891</text:p>
              </table:table-cell>
              <table:table-cell office:value-type="float" office:value="0.007022446">
                <text:p>0.00702244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00.930603027344">
                <text:p>400.930603027344</text:p>
              </table:table-cell>
              <table:table-cell office:value-type="float" office:value="0.006815197">
                <text:p>0.00681519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01.042694091797">
                <text:p>401.042694091797</text:p>
              </table:table-cell>
              <table:table-cell office:value-type="float" office:value="-0.001622118">
                <text:p>-0.00162211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01.15478515625">
                <text:p>401.15478515625</text:p>
              </table:table-cell>
              <table:table-cell office:value-type="float" office:value="0.004349187">
                <text:p>0.00434918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01.266876220703">
                <text:p>401.266876220703</text:p>
              </table:table-cell>
              <table:table-cell office:value-type="float" office:value="0.003777184">
                <text:p>0.00377718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01.378997802734">
                <text:p>401.378997802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01.491088867188">
                <text:p>401.491088867188</text:p>
              </table:table-cell>
              <table:table-cell office:value-type="float" office:value="-0.002256269">
                <text:p>-0.00225626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01.603210449219">
                <text:p>401.603210449219</text:p>
              </table:table-cell>
              <table:table-cell office:value-type="float" office:value="-0.001766174">
                <text:p>-0.00176617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01.71533203125">
                <text:p>401.71533203125</text:p>
              </table:table-cell>
              <table:table-cell office:value-type="float" office:value="-0.003724026">
                <text:p>-0.00372402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1.827453613281">
                <text:p>401.827453613281</text:p>
              </table:table-cell>
              <table:table-cell office:value-type="float" office:value="0.001824243">
                <text:p>0.00182424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01.939605712891">
                <text:p>401.939605712891</text:p>
              </table:table-cell>
              <table:table-cell office:value-type="float" office:value="0.00180006">
                <text:p>0.0018000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02.051727294922">
                <text:p>402.051727294922</text:p>
              </table:table-cell>
              <table:table-cell office:value-type="float" office:value="-0.00637651">
                <text:p>-0.0063765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02.163879394531">
                <text:p>402.163879394531</text:p>
              </table:table-cell>
              <table:table-cell office:value-type="float" office:value="0.01137072">
                <text:p>0.0113707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02.276031494141">
                <text:p>402.276031494141</text:p>
              </table:table-cell>
              <table:table-cell office:value-type="float" office:value="-0.002973034">
                <text:p>-0.00297303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02.38818359375">
                <text:p>402.38818359375</text:p>
              </table:table-cell>
              <table:table-cell office:value-type="float" office:value="-0.001636764">
                <text:p>-0.00163676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2.500335693359">
                <text:p>402.500335693359</text:p>
              </table:table-cell>
              <table:table-cell office:value-type="float" office:value="-0.0002378966">
                <text:p>-0.000237896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02.612487792969">
                <text:p>402.612487792969</text:p>
              </table:table-cell>
              <table:table-cell office:value-type="float" office:value="0.006377168">
                <text:p>0.00637716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02.724670410156">
                <text:p>402.724670410156</text:p>
              </table:table-cell>
              <table:table-cell office:value-type="float" office:value="0.005430566">
                <text:p>0.00543056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02.836853027344">
                <text:p>402.836853027344</text:p>
              </table:table-cell>
              <table:table-cell office:value-type="float" office:value="0.003576145">
                <text:p>0.00357614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02.949035644531">
                <text:p>402.949035644531</text:p>
              </table:table-cell>
              <table:table-cell office:value-type="float" office:value="0.01379569">
                <text:p>0.0137956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03.061218261719">
                <text:p>403.061218261719</text:p>
              </table:table-cell>
              <table:table-cell office:value-type="float" office:value="0.001703843">
                <text:p>0.00170384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03.173400878906">
                <text:p>403.173400878906</text:p>
              </table:table-cell>
              <table:table-cell office:value-type="float" office:value="0.01220961">
                <text:p>0.0122096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03.285614013672">
                <text:p>403.285614013672</text:p>
              </table:table-cell>
              <table:table-cell office:value-type="float" office:value="-0.002059844">
                <text:p>-0.00205984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03.397827148438">
                <text:p>403.397827148438</text:p>
              </table:table-cell>
              <table:table-cell office:value-type="float" office:value="-0.007102965">
                <text:p>-0.00710296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03.510040283203">
                <text:p>403.510040283203</text:p>
              </table:table-cell>
              <table:table-cell office:value-type="float" office:value="0.001698328">
                <text:p>0.00169832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03.622253417969">
                <text:p>403.622253417969</text:p>
              </table:table-cell>
              <table:table-cell office:value-type="float" office:value="-0.008298472">
                <text:p>-0.00829847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3.734466552734">
                <text:p>403.734466552734</text:p>
              </table:table-cell>
              <table:table-cell office:value-type="float" office:value="0.001771753">
                <text:p>0.00177175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03.8466796875">
                <text:p>403.8466796875</text:p>
              </table:table-cell>
              <table:table-cell office:value-type="float" office:value="-0.002910332">
                <text:p>-0.00291033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03.958923339844">
                <text:p>403.958923339844</text:p>
              </table:table-cell>
              <table:table-cell office:value-type="float" office:value="-0.001534963">
                <text:p>-0.00153496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04.071166992188">
                <text:p>404.071166992188</text:p>
              </table:table-cell>
              <table:table-cell office:value-type="float" office:value="-0.001303525">
                <text:p>-0.0013035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04.183410644531">
                <text:p>404.183410644531</text:p>
              </table:table-cell>
              <table:table-cell office:value-type="float" office:value="-0.009881848">
                <text:p>-0.00988184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04.295654296875">
                <text:p>404.295654296875</text:p>
              </table:table-cell>
              <table:table-cell office:value-type="float" office:value="0.01020919">
                <text:p>0.0102091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04.407897949219">
                <text:p>404.407897949219</text:p>
              </table:table-cell>
              <table:table-cell office:value-type="float" office:value="-0.01077463">
                <text:p>-0.0107746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04.520172119141">
                <text:p>404.520172119141</text:p>
              </table:table-cell>
              <table:table-cell office:value-type="float" office:value="0.004578633">
                <text:p>0.00457863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04.632446289063">
                <text:p>404.632446289063</text:p>
              </table:table-cell>
              <table:table-cell office:value-type="float" office:value="0.005169075">
                <text:p>0.0051690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04.744689941406">
                <text:p>404.744689941406</text:p>
              </table:table-cell>
              <table:table-cell office:value-type="float" office:value="0.004475663">
                <text:p>0.00447566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04.856994628906">
                <text:p>404.856994628906</text:p>
              </table:table-cell>
              <table:table-cell office:value-type="float" office:value="-0.009857737">
                <text:p>-0.00985773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04.969268798828">
                <text:p>404.969268798828</text:p>
              </table:table-cell>
              <table:table-cell office:value-type="float" office:value="0.002827793">
                <text:p>0.00282779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05.08154296875">
                <text:p>405.08154296875</text:p>
              </table:table-cell>
              <table:table-cell office:value-type="float" office:value="0.01462576">
                <text:p>0.0146257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5.19384765625">
                <text:p>405.19384765625</text:p>
              </table:table-cell>
              <table:table-cell office:value-type="float" office:value="-0.006115757">
                <text:p>-0.00611575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5.30615234375">
                <text:p>405.306152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5.41845703125">
                <text:p>405.41845703125</text:p>
              </table:table-cell>
              <table:table-cell office:value-type="float" office:value="-0.0004217975">
                <text:p>-0.000421797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05.53076171875">
                <text:p>405.53076171875</text:p>
              </table:table-cell>
              <table:table-cell office:value-type="float" office:value="0.009818374">
                <text:p>0.00981837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05.64306640625">
                <text:p>405.64306640625</text:p>
              </table:table-cell>
              <table:table-cell office:value-type="float" office:value="-0.003810995">
                <text:p>-0.00381099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5.755401611328">
                <text:p>405.755401611328</text:p>
              </table:table-cell>
              <table:table-cell office:value-type="float" office:value="-0.002881553">
                <text:p>-0.00288155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05.867706298828">
                <text:p>405.867706298828</text:p>
              </table:table-cell>
              <table:table-cell office:value-type="float" office:value="-0.004194655">
                <text:p>-0.00419465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5.980041503906">
                <text:p>405.980041503906</text:p>
              </table:table-cell>
              <table:table-cell office:value-type="float" office:value="0.01797592">
                <text:p>0.0179759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6.092376708984">
                <text:p>406.092376708984</text:p>
              </table:table-cell>
              <table:table-cell office:value-type="float" office:value="-0.008335699">
                <text:p>-0.00833569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6.204742431641">
                <text:p>406.204742431641</text:p>
              </table:table-cell>
              <table:table-cell office:value-type="float" office:value="0.006907581">
                <text:p>0.00690758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06.317077636719">
                <text:p>406.317077636719</text:p>
              </table:table-cell>
              <table:table-cell office:value-type="float" office:value="0.0001820605">
                <text:p>0.000182060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06.429443359375">
                <text:p>406.429443359375</text:p>
              </table:table-cell>
              <table:table-cell office:value-type="float" office:value="-0.007727366">
                <text:p>-0.00772736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06.541809082031">
                <text:p>406.541809082031</text:p>
              </table:table-cell>
              <table:table-cell office:value-type="float" office:value="0.0003439099">
                <text:p>0.000343909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06.654174804688">
                <text:p>406.654174804688</text:p>
              </table:table-cell>
              <table:table-cell office:value-type="float" office:value="-0.007320527">
                <text:p>-0.00732052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06.766540527344">
                <text:p>406.766540527344</text:p>
              </table:table-cell>
              <table:table-cell office:value-type="float" office:value="-0.009025524">
                <text:p>-0.00902552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6.87890625">
                <text:p>406.87890625</text:p>
              </table:table-cell>
              <table:table-cell office:value-type="float" office:value="-0.005727544">
                <text:p>-0.00572754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06.991302490234">
                <text:p>406.991302490234</text:p>
              </table:table-cell>
              <table:table-cell office:value-type="float" office:value="0.0008205281">
                <text:p>0.000820528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7.103668212891">
                <text:p>407.103668212891</text:p>
              </table:table-cell>
              <table:table-cell office:value-type="float" office:value="-0.005614146">
                <text:p>-0.00561414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7.216064453125">
                <text:p>407.216064453125</text:p>
              </table:table-cell>
              <table:table-cell office:value-type="float" office:value="0.01792471">
                <text:p>0.0179247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7.328460693359">
                <text:p>407.328460693359</text:p>
              </table:table-cell>
              <table:table-cell office:value-type="float" office:value="0.003306279">
                <text:p>0.00330627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7.440887451172">
                <text:p>407.440887451172</text:p>
              </table:table-cell>
              <table:table-cell office:value-type="float" office:value="-0.00276176">
                <text:p>-0.0027617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7.553283691406">
                <text:p>407.553283691406</text:p>
              </table:table-cell>
              <table:table-cell office:value-type="float" office:value="0.008667987">
                <text:p>0.00866798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07.665710449219">
                <text:p>407.665710449219</text:p>
              </table:table-cell>
              <table:table-cell office:value-type="float" office:value="-0.004060698">
                <text:p>-0.00406069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07.778106689453">
                <text:p>407.778106689453</text:p>
              </table:table-cell>
              <table:table-cell office:value-type="float" office:value="0.01424109">
                <text:p>0.0142410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7.890533447266">
                <text:p>407.890533447266</text:p>
              </table:table-cell>
              <table:table-cell office:value-type="float" office:value="0.005586747">
                <text:p>0.00558674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8.002990722656">
                <text:p>408.002990722656</text:p>
              </table:table-cell>
              <table:table-cell office:value-type="float" office:value="0.009023538">
                <text:p>0.00902353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08.115417480469">
                <text:p>408.115417480469</text:p>
              </table:table-cell>
              <table:table-cell office:value-type="float" office:value="0.003296986">
                <text:p>0.0032969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8.227844238281">
                <text:p>408.227844238281</text:p>
              </table:table-cell>
              <table:table-cell office:value-type="float" office:value="0.02144731">
                <text:p>0.0214473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08.340301513672">
                <text:p>408.340301513672</text:p>
              </table:table-cell>
              <table:table-cell office:value-type="float" office:value="-0.01259705">
                <text:p>-0.012597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8.452758789063">
                <text:p>408.452758789063</text:p>
              </table:table-cell>
              <table:table-cell office:value-type="float" office:value="-0.00261665">
                <text:p>-0.0026166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8.565216064453">
                <text:p>408.565216064453</text:p>
              </table:table-cell>
              <table:table-cell office:value-type="float" office:value="-0.006040527">
                <text:p>-0.00604052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08.677673339844">
                <text:p>408.677673339844</text:p>
              </table:table-cell>
              <table:table-cell office:value-type="float" office:value="-0.002194641">
                <text:p>-0.00219464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8.790161132813">
                <text:p>408.790161132813</text:p>
              </table:table-cell>
              <table:table-cell office:value-type="float" office:value="-0.004726573">
                <text:p>-0.00472657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08.902618408203">
                <text:p>408.902618408203</text:p>
              </table:table-cell>
              <table:table-cell office:value-type="float" office:value="-0.003494194">
                <text:p>-0.00349419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09.015106201172">
                <text:p>409.015106201172</text:p>
              </table:table-cell>
              <table:table-cell office:value-type="float" office:value="-0.006492816">
                <text:p>-0.00649281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9.127593994141">
                <text:p>409.127593994141</text:p>
              </table:table-cell>
              <table:table-cell office:value-type="float" office:value="0.001199774">
                <text:p>0.0011997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9.240081787109">
                <text:p>409.240081787109</text:p>
              </table:table-cell>
              <table:table-cell office:value-type="float" office:value="0.002053908">
                <text:p>0.00205390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9.352569580078">
                <text:p>409.352569580078</text:p>
              </table:table-cell>
              <table:table-cell office:value-type="float" office:value="-0.01022485">
                <text:p>-0.0102248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9.465087890625">
                <text:p>409.465087890625</text:p>
              </table:table-cell>
              <table:table-cell office:value-type="float" office:value="-0.0036233">
                <text:p>-0.003623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9.577606201172">
                <text:p>409.577606201172</text:p>
              </table:table-cell>
              <table:table-cell office:value-type="float" office:value="-0.008064804">
                <text:p>-0.00806480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9.690093994141">
                <text:p>409.690093994141</text:p>
              </table:table-cell>
              <table:table-cell office:value-type="float" office:value="0.001149893">
                <text:p>0.00114989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9.802612304688">
                <text:p>409.802612304688</text:p>
              </table:table-cell>
              <table:table-cell office:value-type="float" office:value="-0.00062281">
                <text:p>-0.0006228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9.915161132813">
                <text:p>409.915161132813</text:p>
              </table:table-cell>
              <table:table-cell office:value-type="float" office:value="0.001544984">
                <text:p>0.00154498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10.027679443359">
                <text:p>410.027679443359</text:p>
              </table:table-cell>
              <table:table-cell office:value-type="float" office:value="-0.003054917">
                <text:p>-0.00305491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10.140228271484">
                <text:p>410.140228271484</text:p>
              </table:table-cell>
              <table:table-cell office:value-type="float" office:value="0.002940771">
                <text:p>0.00294077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10.252746582031">
                <text:p>410.252746582031</text:p>
              </table:table-cell>
              <table:table-cell office:value-type="float" office:value="0.002190494">
                <text:p>0.00219049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10.365295410156">
                <text:p>410.365295410156</text:p>
              </table:table-cell>
              <table:table-cell office:value-type="float" office:value="-0.003210971">
                <text:p>-0.00321097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10.477844238281">
                <text:p>410.477844238281</text:p>
              </table:table-cell>
              <table:table-cell office:value-type="float" office:value="0.02142172">
                <text:p>0.0214217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10.590423583984">
                <text:p>410.590423583984</text:p>
              </table:table-cell>
              <table:table-cell office:value-type="float" office:value="0.008082889">
                <text:p>0.00808288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10.702972412109">
                <text:p>410.702972412109</text:p>
              </table:table-cell>
              <table:table-cell office:value-type="float" office:value="-0.003970852">
                <text:p>-0.00397085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10.815551757813">
                <text:p>410.815551757813</text:p>
              </table:table-cell>
              <table:table-cell office:value-type="float" office:value="0.002375311">
                <text:p>0.00237531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10.928131103516">
                <text:p>410.928131103516</text:p>
              </table:table-cell>
              <table:table-cell office:value-type="float" office:value="0.02845347">
                <text:p>0.0284534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11.040679931641">
                <text:p>411.040679931641</text:p>
              </table:table-cell>
              <table:table-cell office:value-type="float" office:value="0.006584945">
                <text:p>0.00658494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11.153289794922">
                <text:p>411.153289794922</text:p>
              </table:table-cell>
              <table:table-cell office:value-type="float" office:value="0.01527654">
                <text:p>0.0152765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11.265869140625">
                <text:p>411.265869140625</text:p>
              </table:table-cell>
              <table:table-cell office:value-type="float" office:value="0.006564216">
                <text:p>0.00656421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11.378479003906">
                <text:p>411.378479003906</text:p>
              </table:table-cell>
              <table:table-cell office:value-type="float" office:value="0.002613255">
                <text:p>0.00261325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1.491058349609">
                <text:p>411.491058349609</text:p>
              </table:table-cell>
              <table:table-cell office:value-type="float" office:value="0.02711132">
                <text:p>0.027111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11.603668212891">
                <text:p>411.603668212891</text:p>
              </table:table-cell>
              <table:table-cell office:value-type="float" office:value="0.003039737">
                <text:p>0.00303973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11.716278076172">
                <text:p>411.716278076172</text:p>
              </table:table-cell>
              <table:table-cell office:value-type="float" office:value="0.0244834">
                <text:p>0.024483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1.828887939453">
                <text:p>411.828887939453</text:p>
              </table:table-cell>
              <table:table-cell office:value-type="float" office:value="0.0005779113">
                <text:p>0.000577911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1.941528320313">
                <text:p>411.941528320313</text:p>
              </table:table-cell>
              <table:table-cell office:value-type="float" office:value="0.00155224">
                <text:p>0.0015522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2.054138183594">
                <text:p>412.054138183594</text:p>
              </table:table-cell>
              <table:table-cell office:value-type="float" office:value="0.0005792144">
                <text:p>0.00057921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2.166778564453">
                <text:p>412.166778564453</text:p>
              </table:table-cell>
              <table:table-cell office:value-type="float" office:value="-0.008739742">
                <text:p>-0.00873974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2.279418945313">
                <text:p>412.279418945313</text:p>
              </table:table-cell>
              <table:table-cell office:value-type="float" office:value="0.009461716">
                <text:p>0.00946171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2.392059326172">
                <text:p>412.392059326172</text:p>
              </table:table-cell>
              <table:table-cell office:value-type="float" office:value="0.00159205">
                <text:p>0.0015920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.504730224609">
                <text:p>412.504730224609</text:p>
              </table:table-cell>
              <table:table-cell office:value-type="float" office:value="-0.009619609">
                <text:p>-0.00961960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2.617370605469">
                <text:p>412.617370605469</text:p>
              </table:table-cell>
              <table:table-cell office:value-type="float" office:value="-0.002973937">
                <text:p>-0.00297393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2.730041503906">
                <text:p>412.730041503906</text:p>
              </table:table-cell>
              <table:table-cell office:value-type="float" office:value="-0.0001231165">
                <text:p>-0.000123116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2.842712402344">
                <text:p>412.842712402344</text:p>
              </table:table-cell>
              <table:table-cell office:value-type="float" office:value="-0.001669507">
                <text:p>-0.00166950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2.955383300781">
                <text:p>412.955383300781</text:p>
              </table:table-cell>
              <table:table-cell office:value-type="float" office:value="-0.0105233">
                <text:p>-0.01052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3.068054199219">
                <text:p>413.068054199219</text:p>
              </table:table-cell>
              <table:table-cell office:value-type="float" office:value="-0.007777859">
                <text:p>-0.00777785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3.180725097656">
                <text:p>413.180725097656</text:p>
              </table:table-cell>
              <table:table-cell office:value-type="float" office:value="-0.001489058">
                <text:p>-0.00148905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3.293426513672">
                <text:p>413.293426513672</text:p>
              </table:table-cell>
              <table:table-cell office:value-type="float" office:value="-0.001003179">
                <text:p>-0.00100317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3.406097412109">
                <text:p>413.406097412109</text:p>
              </table:table-cell>
              <table:table-cell office:value-type="float" office:value="-0.004245953">
                <text:p>-0.00424595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3.518798828125">
                <text:p>413.518798828125</text:p>
              </table:table-cell>
              <table:table-cell office:value-type="float" office:value="-0.00261905">
                <text:p>-0.0026190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3.631500244141">
                <text:p>413.631500244141</text:p>
              </table:table-cell>
              <table:table-cell office:value-type="float" office:value="-0.008324893">
                <text:p>-0.00832489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3.744232177734">
                <text:p>413.744232177734</text:p>
              </table:table-cell>
              <table:table-cell office:value-type="float" office:value="0.001739614">
                <text:p>0.00173961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3.85693359375">
                <text:p>413.85693359375</text:p>
              </table:table-cell>
              <table:table-cell office:value-type="float" office:value="0.002789574">
                <text:p>0.00278957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3.969665527344">
                <text:p>413.969665527344</text:p>
              </table:table-cell>
              <table:table-cell office:value-type="float" office:value="-0.003491329">
                <text:p>-0.00349132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4.082366943359">
                <text:p>414.082366943359</text:p>
              </table:table-cell>
              <table:table-cell office:value-type="float" office:value="0.01266643">
                <text:p>0.0126664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4.195098876953">
                <text:p>414.195098876953</text:p>
              </table:table-cell>
              <table:table-cell office:value-type="float" office:value="0.0007306395">
                <text:p>0.000730639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14.307861328125">
                <text:p>414.307861328125</text:p>
              </table:table-cell>
              <table:table-cell office:value-type="float" office:value="0.008884094">
                <text:p>0.00888409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14.420593261719">
                <text:p>414.420593261719</text:p>
              </table:table-cell>
              <table:table-cell office:value-type="float" office:value="-0.01100154">
                <text:p>-0.0110015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14.533325195313">
                <text:p>414.533325195313</text:p>
              </table:table-cell>
              <table:table-cell office:value-type="float" office:value="0.007082226">
                <text:p>0.00708222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14.646087646484">
                <text:p>414.646087646484</text:p>
              </table:table-cell>
              <table:table-cell office:value-type="float" office:value="-0.004766627">
                <text:p>-0.00476662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14.758850097656">
                <text:p>414.758850097656</text:p>
              </table:table-cell>
              <table:table-cell office:value-type="float" office:value="-0.003329492">
                <text:p>-0.00332949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14.871612548828">
                <text:p>414.871612548828</text:p>
              </table:table-cell>
              <table:table-cell office:value-type="float" office:value="0.004356388">
                <text:p>0.00435638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14.984375">
                <text:p>414.984375</text:p>
              </table:table-cell>
              <table:table-cell office:value-type="float" office:value="0.00284001">
                <text:p>0.0028400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15.09716796875">
                <text:p>415.09716796875</text:p>
              </table:table-cell>
              <table:table-cell office:value-type="float" office:value="-0.0003102617">
                <text:p>-0.000310261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15.209930419922">
                <text:p>415.209930419922</text:p>
              </table:table-cell>
              <table:table-cell office:value-type="float" office:value="-0.004256846">
                <text:p>-0.00425684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15.322723388672">
                <text:p>415.322723388672</text:p>
              </table:table-cell>
              <table:table-cell office:value-type="float" office:value="-0.003533422">
                <text:p>-0.00353342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15.435516357422">
                <text:p>415.435516357422</text:p>
              </table:table-cell>
              <table:table-cell office:value-type="float" office:value="-0.005871556">
                <text:p>-0.00587155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15.548309326172">
                <text:p>415.548309326172</text:p>
              </table:table-cell>
              <table:table-cell office:value-type="float" office:value="-0.0006954549">
                <text:p>-0.000695454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15.661102294922">
                <text:p>415.661102294922</text:p>
              </table:table-cell>
              <table:table-cell office:value-type="float" office:value="-0.008141104">
                <text:p>-0.00814110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15.773895263672">
                <text:p>415.773895263672</text:p>
              </table:table-cell>
              <table:table-cell office:value-type="float" office:value="0.00626187">
                <text:p>0.0062618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15.88671875">
                <text:p>415.88671875</text:p>
              </table:table-cell>
              <table:table-cell office:value-type="float" office:value="-0.005905755">
                <text:p>-0.00590575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5.999542236328">
                <text:p>415.999542236328</text:p>
              </table:table-cell>
              <table:table-cell office:value-type="float" office:value="-0.01110456">
                <text:p>-0.0111045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16.112365722656">
                <text:p>416.112365722656</text:p>
              </table:table-cell>
              <table:table-cell office:value-type="float" office:value="-0.01030938">
                <text:p>-0.0103093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16.225189208984">
                <text:p>416.225189208984</text:p>
              </table:table-cell>
              <table:table-cell office:value-type="float" office:value="-0.0006362387">
                <text:p>-0.000636238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16.338012695313">
                <text:p>416.338012695313</text:p>
              </table:table-cell>
              <table:table-cell office:value-type="float" office:value="-0.004313741">
                <text:p>-0.00431374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16.450866699219">
                <text:p>416.450866699219</text:p>
              </table:table-cell>
              <table:table-cell office:value-type="float" office:value="0.0005806931">
                <text:p>0.000580693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16.563690185547">
                <text:p>416.563690185547</text:p>
              </table:table-cell>
              <table:table-cell office:value-type="float" office:value="-0.004385214">
                <text:p>-0.0043852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6.676544189453">
                <text:p>416.676544189453</text:p>
              </table:table-cell>
              <table:table-cell office:value-type="float" office:value="-0.005091695">
                <text:p>-0.00509169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16.789398193359">
                <text:p>416.789398193359</text:p>
              </table:table-cell>
              <table:table-cell office:value-type="float" office:value="0.0004701805">
                <text:p>0.000470180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16.902252197266">
                <text:p>416.902252197266</text:p>
              </table:table-cell>
              <table:table-cell office:value-type="float" office:value="-0.004419293">
                <text:p>-0.00441929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7.01513671875">
                <text:p>417.01513671875</text:p>
              </table:table-cell>
              <table:table-cell office:value-type="float" office:value="-0.007037937">
                <text:p>-0.00703793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17.127990722656">
                <text:p>417.127990722656</text:p>
              </table:table-cell>
              <table:table-cell office:value-type="float" office:value="0.01251694">
                <text:p>0.0125169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17.240875244141">
                <text:p>417.240875244141</text:p>
              </table:table-cell>
              <table:table-cell office:value-type="float" office:value="0.002595838">
                <text:p>0.00259583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17.353759765625">
                <text:p>417.353759765625</text:p>
              </table:table-cell>
              <table:table-cell office:value-type="float" office:value="0.02169375">
                <text:p>0.0216937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17.466644287109">
                <text:p>417.466644287109</text:p>
              </table:table-cell>
              <table:table-cell office:value-type="float" office:value="-0.01195568">
                <text:p>-0.0119556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17.579528808594">
                <text:p>417.579528808594</text:p>
              </table:table-cell>
              <table:table-cell office:value-type="float" office:value="-0.00695981">
                <text:p>-0.0069598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17.692443847656">
                <text:p>417.692443847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17.805328369141">
                <text:p>417.805328369141</text:p>
              </table:table-cell>
              <table:table-cell office:value-type="float" office:value="0.001587625">
                <text:p>0.00158762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17.918243408203">
                <text:p>417.918243408203</text:p>
              </table:table-cell>
              <table:table-cell office:value-type="float" office:value="-0.01742238">
                <text:p>-0.0174223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18.031158447266">
                <text:p>418.031158447266</text:p>
              </table:table-cell>
              <table:table-cell office:value-type="float" office:value="-0.009255669">
                <text:p>-0.00925566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18.144073486328">
                <text:p>418.144073486328</text:p>
              </table:table-cell>
              <table:table-cell office:value-type="float" office:value="0.03298181">
                <text:p>0.0329818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18.256988525391">
                <text:p>418.256988525391</text:p>
              </table:table-cell>
              <table:table-cell office:value-type="float" office:value="0.01647593">
                <text:p>0.0164759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18.369934082031">
                <text:p>418.369934082031</text:p>
              </table:table-cell>
              <table:table-cell office:value-type="float" office:value="0.005560339">
                <text:p>0.00556033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18.482849121094">
                <text:p>418.482849121094</text:p>
              </table:table-cell>
              <table:table-cell office:value-type="float" office:value="0.004566696">
                <text:p>0.00456669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18.595794677734">
                <text:p>418.595794677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8.708740234375">
                <text:p>418.708740234375</text:p>
              </table:table-cell>
              <table:table-cell office:value-type="float" office:value="0.0004626267">
                <text:p>0.000462626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18.821685791016">
                <text:p>418.821685791016</text:p>
              </table:table-cell>
              <table:table-cell office:value-type="float" office:value="0.001308578">
                <text:p>0.00130857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18.934661865234">
                <text:p>418.934661865234</text:p>
              </table:table-cell>
              <table:table-cell office:value-type="float" office:value="0.00400163">
                <text:p>0.0040016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9.047607421875">
                <text:p>419.047607421875</text:p>
              </table:table-cell>
              <table:table-cell office:value-type="float" office:value="-0.005977462">
                <text:p>-0.00597746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19.160583496094">
                <text:p>419.160583496094</text:p>
              </table:table-cell>
              <table:table-cell office:value-type="float" office:value="-0.01036246">
                <text:p>-0.0103624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19.273559570313">
                <text:p>419.273559570313</text:p>
              </table:table-cell>
              <table:table-cell office:value-type="float" office:value="-0.00754238">
                <text:p>-0.0075423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9.386535644531">
                <text:p>419.386535644531</text:p>
              </table:table-cell>
              <table:table-cell office:value-type="float" office:value="-0.001648351">
                <text:p>-0.00164835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19.49951171875">
                <text:p>419.49951171875</text:p>
              </table:table-cell>
              <table:table-cell office:value-type="float" office:value="0.01112964">
                <text:p>0.0111296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9.612487792969">
                <text:p>419.612487792969</text:p>
              </table:table-cell>
              <table:table-cell office:value-type="float" office:value="0.00529507">
                <text:p>0.0052950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19.725494384766">
                <text:p>419.725494384766</text:p>
              </table:table-cell>
              <table:table-cell office:value-type="float" office:value="0.009275715">
                <text:p>0.00927571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19.838470458984">
                <text:p>419.838470458984</text:p>
              </table:table-cell>
              <table:table-cell office:value-type="float" office:value="-0.0001195709">
                <text:p>-0.000119570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19.951477050781">
                <text:p>419.951477050781</text:p>
              </table:table-cell>
              <table:table-cell office:value-type="float" office:value="0.0131306">
                <text:p>0.013130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20.064483642578">
                <text:p>420.064483642578</text:p>
              </table:table-cell>
              <table:table-cell office:value-type="float" office:value="-0.004789534">
                <text:p>-0.00478953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20.177520751953">
                <text:p>420.177520751953</text:p>
              </table:table-cell>
              <table:table-cell office:value-type="float" office:value="-0.004928728">
                <text:p>-0.00492872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20.29052734375">
                <text:p>420.29052734375</text:p>
              </table:table-cell>
              <table:table-cell office:value-type="float" office:value="-0.008775382">
                <text:p>-0.00877538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20.403564453125">
                <text:p>420.403564453125</text:p>
              </table:table-cell>
              <table:table-cell office:value-type="float" office:value="-0.006757029">
                <text:p>-0.00675702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20.516571044922">
                <text:p>420.516571044922</text:p>
              </table:table-cell>
              <table:table-cell office:value-type="float" office:value="-0.00514267">
                <text:p>-0.0051426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20.629608154297">
                <text:p>420.629608154297</text:p>
              </table:table-cell>
              <table:table-cell office:value-type="float" office:value="0.002551416">
                <text:p>0.00255141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20.742645263672">
                <text:p>420.742645263672</text:p>
              </table:table-cell>
              <table:table-cell office:value-type="float" office:value="0.004480002">
                <text:p>0.00448000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20.855712890625">
                <text:p>420.855712890625</text:p>
              </table:table-cell>
              <table:table-cell office:value-type="float" office:value="0.004850273">
                <text:p>0.00485027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20.96875">
                <text:p>420.96875</text:p>
              </table:table-cell>
              <table:table-cell office:value-type="float" office:value="0.01446146">
                <text:p>0.0144614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21.081817626953">
                <text:p>421.081817626953</text:p>
              </table:table-cell>
              <table:table-cell office:value-type="float" office:value="-0.004869914">
                <text:p>-0.00486991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21.194854736328">
                <text:p>421.194854736328</text:p>
              </table:table-cell>
              <table:table-cell office:value-type="float" office:value="-0.006015108">
                <text:p>-0.00601510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21.307922363281">
                <text:p>421.307922363281</text:p>
              </table:table-cell>
              <table:table-cell office:value-type="float" office:value="0.0006510654">
                <text:p>0.000651065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21.421020507813">
                <text:p>421.421020507813</text:p>
              </table:table-cell>
              <table:table-cell office:value-type="float" office:value="0.01150202">
                <text:p>0.0115020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21.534088134766">
                <text:p>421.534088134766</text:p>
              </table:table-cell>
              <table:table-cell office:value-type="float" office:value="-0.01046058">
                <text:p>-0.0104605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21.647155761719">
                <text:p>421.647155761719</text:p>
              </table:table-cell>
              <table:table-cell office:value-type="float" office:value="0.003763712">
                <text:p>0.00376371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21.76025390625">
                <text:p>421.76025390625</text:p>
              </table:table-cell>
              <table:table-cell office:value-type="float" office:value="-0.003919296">
                <text:p>-0.00391929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1.873352050781">
                <text:p>421.873352050781</text:p>
              </table:table-cell>
              <table:table-cell office:value-type="float" office:value="0.0084226">
                <text:p>0.008422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21.986450195313">
                <text:p>421.986450195313</text:p>
              </table:table-cell>
              <table:table-cell office:value-type="float" office:value="0.006047553">
                <text:p>0.00604755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22.099548339844">
                <text:p>422.099548339844</text:p>
              </table:table-cell>
              <table:table-cell office:value-type="float" office:value="-0.002941016">
                <text:p>-0.0029410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22.212646484375">
                <text:p>422.212646484375</text:p>
              </table:table-cell>
              <table:table-cell office:value-type="float" office:value="0.02292605">
                <text:p>0.0229260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22.325775146484">
                <text:p>422.325775146484</text:p>
              </table:table-cell>
              <table:table-cell office:value-type="float" office:value="-0.004621412">
                <text:p>-0.00462141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22.438903808594">
                <text:p>422.438903808594</text:p>
              </table:table-cell>
              <table:table-cell office:value-type="float" office:value="-0.009353258">
                <text:p>-0.00935325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22.552001953125">
                <text:p>422.552001953125</text:p>
              </table:table-cell>
              <table:table-cell office:value-type="float" office:value="-0.009480977">
                <text:p>-0.00948097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22.665130615234">
                <text:p>422.665130615234</text:p>
              </table:table-cell>
              <table:table-cell office:value-type="float" office:value="0.00867902">
                <text:p>0.0086790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22.778289794922">
                <text:p>422.778289794922</text:p>
              </table:table-cell>
              <table:table-cell office:value-type="float" office:value="-0.007285222">
                <text:p>-0.0072852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22.891418457031">
                <text:p>422.891418457031</text:p>
              </table:table-cell>
              <table:table-cell office:value-type="float" office:value="0.01225204">
                <text:p>0.0122520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23.004577636719">
                <text:p>423.004577636719</text:p>
              </table:table-cell>
              <table:table-cell office:value-type="float" office:value="0.007014466">
                <text:p>0.00701446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3.117706298828">
                <text:p>423.117706298828</text:p>
              </table:table-cell>
              <table:table-cell office:value-type="float" office:value="-0.002859245">
                <text:p>-0.00285924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23.230865478516">
                <text:p>423.230865478516</text:p>
              </table:table-cell>
              <table:table-cell office:value-type="float" office:value="-0.005202014">
                <text:p>-0.00520201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3.344024658203">
                <text:p>423.344024658203</text:p>
              </table:table-cell>
              <table:table-cell office:value-type="float" office:value="0.002183519">
                <text:p>0.00218351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3.457183837891">
                <text:p>423.457183837891</text:p>
              </table:table-cell>
              <table:table-cell office:value-type="float" office:value="-0.01056474">
                <text:p>-0.0105647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3.570373535156">
                <text:p>423.570373535156</text:p>
              </table:table-cell>
              <table:table-cell office:value-type="float" office:value="0.01011577">
                <text:p>0.0101157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23.683532714844">
                <text:p>423.683532714844</text:p>
              </table:table-cell>
              <table:table-cell office:value-type="float" office:value="-0.001116985">
                <text:p>-0.00111698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3.796722412109">
                <text:p>423.796722412109</text:p>
              </table:table-cell>
              <table:table-cell office:value-type="float" office:value="-0.00535755">
                <text:p>-0.0053575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3.909912109375">
                <text:p>423.909912109375</text:p>
              </table:table-cell>
              <table:table-cell office:value-type="float" office:value="-0.01200944">
                <text:p>-0.0120094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4.023101806641">
                <text:p>424.023101806641</text:p>
              </table:table-cell>
              <table:table-cell office:value-type="float" office:value="0.00322577">
                <text:p>0.0032257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4.136291503906">
                <text:p>424.136291503906</text:p>
              </table:table-cell>
              <table:table-cell office:value-type="float" office:value="0.009868356">
                <text:p>0.00986835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24.24951171875">
                <text:p>424.24951171875</text:p>
              </table:table-cell>
              <table:table-cell office:value-type="float" office:value="0.005547821">
                <text:p>0.00554782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4.362701416016">
                <text:p>424.362701416016</text:p>
              </table:table-cell>
              <table:table-cell office:value-type="float" office:value="-0.005733974">
                <text:p>-0.00573397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24.475921630859">
                <text:p>424.475921630859</text:p>
              </table:table-cell>
              <table:table-cell office:value-type="float" office:value="0.002545319">
                <text:p>0.00254531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24.589141845703">
                <text:p>424.589141845703</text:p>
              </table:table-cell>
              <table:table-cell office:value-type="float" office:value="-0.001657539">
                <text:p>-0.00165753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24.702362060547">
                <text:p>424.702362060547</text:p>
              </table:table-cell>
              <table:table-cell office:value-type="float" office:value="-0.007282782">
                <text:p>-0.00728278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24.815612792969">
                <text:p>424.815612792969</text:p>
              </table:table-cell>
              <table:table-cell office:value-type="float" office:value="-0.003202684">
                <text:p>-0.00320268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24.928833007813">
                <text:p>424.928833007813</text:p>
              </table:table-cell>
              <table:table-cell office:value-type="float" office:value="0.01649821">
                <text:p>0.0164982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25.042083740234">
                <text:p>425.042083740234</text:p>
              </table:table-cell>
              <table:table-cell office:value-type="float" office:value="-0.005514882">
                <text:p>-0.00551488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25.155303955078">
                <text:p>425.155303955078</text:p>
              </table:table-cell>
              <table:table-cell office:value-type="float" office:value="-0.003302264">
                <text:p>-0.00330226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25.2685546875">
                <text:p>425.2685546875</text:p>
              </table:table-cell>
              <table:table-cell office:value-type="float" office:value="-0.01518641">
                <text:p>-0.0151864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25.3818359375">
                <text:p>425.3818359375</text:p>
              </table:table-cell>
              <table:table-cell office:value-type="float" office:value="-0.002345521">
                <text:p>-0.00234552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25.495086669922">
                <text:p>425.495086669922</text:p>
              </table:table-cell>
              <table:table-cell office:value-type="float" office:value="0.005219075">
                <text:p>0.00521907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25.608337402344">
                <text:p>425.608337402344</text:p>
              </table:table-cell>
              <table:table-cell office:value-type="float" office:value="0.005734246">
                <text:p>0.00573424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25.721618652344">
                <text:p>425.721618652344</text:p>
              </table:table-cell>
              <table:table-cell office:value-type="float" office:value="-0.006303436">
                <text:p>-0.00630343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25.834899902344">
                <text:p>425.834899902344</text:p>
              </table:table-cell>
              <table:table-cell office:value-type="float" office:value="-0.00817602">
                <text:p>-0.0081760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25.948181152344">
                <text:p>425.948181152344</text:p>
              </table:table-cell>
              <table:table-cell office:value-type="float" office:value="0.002381114">
                <text:p>0.00238111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26.061462402344">
                <text:p>426.061462402344</text:p>
              </table:table-cell>
              <table:table-cell office:value-type="float" office:value="0.01172824">
                <text:p>0.0117282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6.174743652344">
                <text:p>426.174743652344</text:p>
              </table:table-cell>
              <table:table-cell office:value-type="float" office:value="-0.006216319">
                <text:p>-0.00621631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26.288055419922">
                <text:p>426.288055419922</text:p>
              </table:table-cell>
              <table:table-cell office:value-type="float" office:value="0.009637324">
                <text:p>0.00963732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26.401336669922">
                <text:p>426.401336669922</text:p>
              </table:table-cell>
              <table:table-cell office:value-type="float" office:value="-0.001590265">
                <text:p>-0.00159026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26.5146484375">
                <text:p>426.5146484375</text:p>
              </table:table-cell>
              <table:table-cell office:value-type="float" office:value="-0.003373436">
                <text:p>-0.00337343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26.627960205078">
                <text:p>426.627960205078</text:p>
              </table:table-cell>
              <table:table-cell office:value-type="float" office:value="0.002026009">
                <text:p>0.00202600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26.741271972656">
                <text:p>426.741271972656</text:p>
              </table:table-cell>
              <table:table-cell office:value-type="float" office:value="0.00833558">
                <text:p>0.0083355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26.854614257813">
                <text:p>426.854614257813</text:p>
              </table:table-cell>
              <table:table-cell office:value-type="float" office:value="0.009072156">
                <text:p>0.00907215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26.967926025391">
                <text:p>426.967926025391</text:p>
              </table:table-cell>
              <table:table-cell office:value-type="float" office:value="-0.004600787">
                <text:p>-0.00460078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27.081268310547">
                <text:p>427.081268310547</text:p>
              </table:table-cell>
              <table:table-cell office:value-type="float" office:value="-0.005067143">
                <text:p>-0.00506714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27.194610595703">
                <text:p>427.194610595703</text:p>
              </table:table-cell>
              <table:table-cell office:value-type="float" office:value="0.003820119">
                <text:p>0.0038201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27.307952880859">
                <text:p>427.307952880859</text:p>
              </table:table-cell>
              <table:table-cell office:value-type="float" office:value="0.002474198">
                <text:p>0.00247419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27.421295166016">
                <text:p>427.421295166016</text:p>
              </table:table-cell>
              <table:table-cell office:value-type="float" office:value="0.0008331494">
                <text:p>0.000833149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27.534637451172">
                <text:p>427.534637451172</text:p>
              </table:table-cell>
              <table:table-cell office:value-type="float" office:value="-0.0109832">
                <text:p>-0.010983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27.648010253906">
                <text:p>427.648010253906</text:p>
              </table:table-cell>
              <table:table-cell office:value-type="float" office:value="0.001981565">
                <text:p>0.00198156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27.761383056641">
                <text:p>427.761383056641</text:p>
              </table:table-cell>
              <table:table-cell office:value-type="float" office:value="0.004205452">
                <text:p>0.00420545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7.874755859375">
                <text:p>427.874755859375</text:p>
              </table:table-cell>
              <table:table-cell office:value-type="float" office:value="-0.007327958">
                <text:p>-0.00732795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27.988128662109">
                <text:p>427.988128662109</text:p>
              </table:table-cell>
              <table:table-cell office:value-type="float" office:value="-0.01139374">
                <text:p>-0.0113937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28.101501464844">
                <text:p>428.101501464844</text:p>
              </table:table-cell>
              <table:table-cell office:value-type="float" office:value="-0.003328709">
                <text:p>-0.00332870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28.214874267578">
                <text:p>428.214874267578</text:p>
              </table:table-cell>
              <table:table-cell office:value-type="float" office:value="0.008867963">
                <text:p>0.00886796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8.328277587891">
                <text:p>428.328277587891</text:p>
              </table:table-cell>
              <table:table-cell office:value-type="float" office:value="-0.003573693">
                <text:p>-0.00357369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28.441650390625">
                <text:p>428.441650390625</text:p>
              </table:table-cell>
              <table:table-cell office:value-type="float" office:value="-0.007925056">
                <text:p>-0.00792505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8.555053710938">
                <text:p>428.555053710938</text:p>
              </table:table-cell>
              <table:table-cell office:value-type="float" office:value="-0.005410321">
                <text:p>-0.00541032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28.66845703125">
                <text:p>428.66845703125</text:p>
              </table:table-cell>
              <table:table-cell office:value-type="float" office:value="0.002873016">
                <text:p>0.00287301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28.781890869141">
                <text:p>428.781890869141</text:p>
              </table:table-cell>
              <table:table-cell office:value-type="float" office:value="-0.0005295259">
                <text:p>-0.000529525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28.895294189453">
                <text:p>428.895294189453</text:p>
              </table:table-cell>
              <table:table-cell office:value-type="float" office:value="0.007621186">
                <text:p>0.00762118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29.008728027344">
                <text:p>429.008728027344</text:p>
              </table:table-cell>
              <table:table-cell office:value-type="float" office:value="-0.006969613">
                <text:p>-0.00696961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9.122131347656">
                <text:p>429.122131347656</text:p>
              </table:table-cell>
              <table:table-cell office:value-type="float" office:value="-0.005249398">
                <text:p>-0.00524939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29.235565185547">
                <text:p>429.235565185547</text:p>
              </table:table-cell>
              <table:table-cell office:value-type="float" office:value="-0.006847801">
                <text:p>-0.00684780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29.348999023438">
                <text:p>429.348999023438</text:p>
              </table:table-cell>
              <table:table-cell office:value-type="float" office:value="0.01917194">
                <text:p>0.0191719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29.462432861328">
                <text:p>429.462432861328</text:p>
              </table:table-cell>
              <table:table-cell office:value-type="float" office:value="0.02750552">
                <text:p>0.0275055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29.575897216797">
                <text:p>429.575897216797</text:p>
              </table:table-cell>
              <table:table-cell office:value-type="float" office:value="0.0004985452">
                <text:p>0.000498545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29.689331054688">
                <text:p>429.689331054688</text:p>
              </table:table-cell>
              <table:table-cell office:value-type="float" office:value="-0.005873953">
                <text:p>-0.00587395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29.802795410156">
                <text:p>429.802795410156</text:p>
              </table:table-cell>
              <table:table-cell office:value-type="float" office:value="0.007195551">
                <text:p>0.00719555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29.916259765625">
                <text:p>429.916259765625</text:p>
              </table:table-cell>
              <table:table-cell office:value-type="float" office:value="-0.001810096">
                <text:p>-0.00181009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30.029724121094">
                <text:p>430.029724121094</text:p>
              </table:table-cell>
              <table:table-cell office:value-type="float" office:value="0.007868114">
                <text:p>0.00786811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30.143188476563">
                <text:p>430.143188476563</text:p>
              </table:table-cell>
              <table:table-cell office:value-type="float" office:value="0.008130158">
                <text:p>0.00813015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30.256683349609">
                <text:p>430.256683349609</text:p>
              </table:table-cell>
              <table:table-cell office:value-type="float" office:value="-0.005562749">
                <text:p>-0.00556274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0.370147705078">
                <text:p>430.370147705078</text:p>
              </table:table-cell>
              <table:table-cell office:value-type="float" office:value="0.01186866">
                <text:p>0.0118686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30.483642578125">
                <text:p>430.483642578125</text:p>
              </table:table-cell>
              <table:table-cell office:value-type="float" office:value="-0.004517174">
                <text:p>-0.00451717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30.597137451172">
                <text:p>430.597137451172</text:p>
              </table:table-cell>
              <table:table-cell office:value-type="float" office:value="0.0001048064">
                <text:p>0.000104806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30.710632324219">
                <text:p>430.710632324219</text:p>
              </table:table-cell>
              <table:table-cell office:value-type="float" office:value="-0.003334006">
                <text:p>-0.00333400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30.824127197266">
                <text:p>430.824127197266</text:p>
              </table:table-cell>
              <table:table-cell office:value-type="float" office:value="0.006808786">
                <text:p>0.00680878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30.937652587891">
                <text:p>430.937652587891</text:p>
              </table:table-cell>
              <table:table-cell office:value-type="float" office:value="-0.001773543">
                <text:p>-0.00177354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31.051147460938">
                <text:p>431.051147460938</text:p>
              </table:table-cell>
              <table:table-cell office:value-type="float" office:value="-0.003992442">
                <text:p>-0.00399244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31.164672851563">
                <text:p>431.164672851563</text:p>
              </table:table-cell>
              <table:table-cell office:value-type="float" office:value="-0.006780864">
                <text:p>-0.00678086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31.278198242188">
                <text:p>431.278198242188</text:p>
              </table:table-cell>
              <table:table-cell office:value-type="float" office:value="0.003754793">
                <text:p>0.00375479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31.391723632813">
                <text:p>431.391723632813</text:p>
              </table:table-cell>
              <table:table-cell office:value-type="float" office:value="-0.004952027">
                <text:p>-0.00495202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31.505249023438">
                <text:p>431.505249023438</text:p>
              </table:table-cell>
              <table:table-cell office:value-type="float" office:value="-0.001724125">
                <text:p>-0.00172412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31.618804931641">
                <text:p>431.618804931641</text:p>
              </table:table-cell>
              <table:table-cell office:value-type="float" office:value="-0.004190092">
                <text:p>-0.00419009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31.732330322266">
                <text:p>431.732330322266</text:p>
              </table:table-cell>
              <table:table-cell office:value-type="float" office:value="0.009381083">
                <text:p>0.00938108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31.845886230469">
                <text:p>431.845886230469</text:p>
              </table:table-cell>
              <table:table-cell office:value-type="float" office:value="0.01056027">
                <text:p>0.0105602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31.959442138672">
                <text:p>431.959442138672</text:p>
              </table:table-cell>
              <table:table-cell office:value-type="float" office:value="0.006388267">
                <text:p>0.00638826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32.072998046875">
                <text:p>432.072998046875</text:p>
              </table:table-cell>
              <table:table-cell office:value-type="float" office:value="0.02048432">
                <text:p>0.020484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32.186553955078">
                <text:p>432.186553955078</text:p>
              </table:table-cell>
              <table:table-cell office:value-type="float" office:value="-0.008020896">
                <text:p>-0.00802089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32.300140380859">
                <text:p>432.300140380859</text:p>
              </table:table-cell>
              <table:table-cell office:value-type="float" office:value="-0.003287312">
                <text:p>-0.00328731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32.413696289063">
                <text:p>432.413696289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32.527282714844">
                <text:p>432.527282714844</text:p>
              </table:table-cell>
              <table:table-cell office:value-type="float" office:value="0.003561246">
                <text:p>0.00356124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32.640869140625">
                <text:p>432.640869140625</text:p>
              </table:table-cell>
              <table:table-cell office:value-type="float" office:value="-0.004478257">
                <text:p>-0.00447825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32.754455566406">
                <text:p>432.754455566406</text:p>
              </table:table-cell>
              <table:table-cell office:value-type="float" office:value="0.01304102">
                <text:p>0.0130410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32.868041992188">
                <text:p>432.868041992188</text:p>
              </table:table-cell>
              <table:table-cell office:value-type="float" office:value="0.01831128">
                <text:p>0.0183112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32.981658935547">
                <text:p>432.981658935547</text:p>
              </table:table-cell>
              <table:table-cell office:value-type="float" office:value="0.00915294">
                <text:p>0.0091529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33.095245361328">
                <text:p>433.095245361328</text:p>
              </table:table-cell>
              <table:table-cell office:value-type="float" office:value="0.00236131">
                <text:p>0.0023613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33.208862304688">
                <text:p>433.208862304688</text:p>
              </table:table-cell>
              <table:table-cell office:value-type="float" office:value="0.003602717">
                <text:p>0.00360271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33.322479248047">
                <text:p>433.322479248047</text:p>
              </table:table-cell>
              <table:table-cell office:value-type="float" office:value="-0.001630158">
                <text:p>-0.00163015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33.436096191406">
                <text:p>433.436096191406</text:p>
              </table:table-cell>
              <table:table-cell office:value-type="float" office:value="0.004541751">
                <text:p>0.00454175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33.549713134766">
                <text:p>433.549713134766</text:p>
              </table:table-cell>
              <table:table-cell office:value-type="float" office:value="-0.002566589">
                <text:p>-0.00256658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33.663330078125">
                <text:p>433.663330078125</text:p>
              </table:table-cell>
              <table:table-cell office:value-type="float" office:value="-0.004416989">
                <text:p>-0.00441698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33.776977539063">
                <text:p>433.776977539063</text:p>
              </table:table-cell>
              <table:table-cell office:value-type="float" office:value="-0.00596171">
                <text:p>-0.0059617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33.890625">
                <text:p>433.890625</text:p>
              </table:table-cell>
              <table:table-cell office:value-type="float" office:value="0.01542281">
                <text:p>0.0154228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34.004272460938">
                <text:p>434.004272460938</text:p>
              </table:table-cell>
              <table:table-cell office:value-type="float" office:value="-0.001344389">
                <text:p>-0.00134438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34.117919921875">
                <text:p>434.117919921875</text:p>
              </table:table-cell>
              <table:table-cell office:value-type="float" office:value="0.002112025">
                <text:p>0.00211202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34.231567382813">
                <text:p>434.231567382813</text:p>
              </table:table-cell>
              <table:table-cell office:value-type="float" office:value="-0.009523274">
                <text:p>-0.00952327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34.34521484375">
                <text:p>434.34521484375</text:p>
              </table:table-cell>
              <table:table-cell office:value-type="float" office:value="-0.007968811">
                <text:p>-0.00796881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34.458892822266">
                <text:p>434.458892822266</text:p>
              </table:table-cell>
              <table:table-cell office:value-type="float" office:value="0.02190025">
                <text:p>0.0219002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34.572570800781">
                <text:p>434.572570800781</text:p>
              </table:table-cell>
              <table:table-cell office:value-type="float" office:value="-0.005583677">
                <text:p>-0.00558367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34.686248779297">
                <text:p>434.686248779297</text:p>
              </table:table-cell>
              <table:table-cell office:value-type="float" office:value="-0.003523897">
                <text:p>-0.00352389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34.799926757813">
                <text:p>434.799926757813</text:p>
              </table:table-cell>
              <table:table-cell office:value-type="float" office:value="-0.005408534">
                <text:p>-0.00540853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34.913604736328">
                <text:p>434.913604736328</text:p>
              </table:table-cell>
              <table:table-cell office:value-type="float" office:value="0.002254132">
                <text:p>0.00225413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35.027282714844">
                <text:p>435.027282714844</text:p>
              </table:table-cell>
              <table:table-cell office:value-type="float" office:value="-0.003207088">
                <text:p>-0.00320708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35.140991210938">
                <text:p>435.140991210938</text:p>
              </table:table-cell>
              <table:table-cell office:value-type="float" office:value="-0.001841526">
                <text:p>-0.00184152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35.254669189453">
                <text:p>435.254669189453</text:p>
              </table:table-cell>
              <table:table-cell office:value-type="float" office:value="0.006203873">
                <text:p>0.00620387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35.368377685547">
                <text:p>435.368377685547</text:p>
              </table:table-cell>
              <table:table-cell office:value-type="float" office:value="-0.008577113">
                <text:p>-0.00857711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35.482086181641">
                <text:p>435.482086181641</text:p>
              </table:table-cell>
              <table:table-cell office:value-type="float" office:value="-0.008209844">
                <text:p>-0.00820984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35.595825195313">
                <text:p>435.595825195313</text:p>
              </table:table-cell>
              <table:table-cell office:value-type="float" office:value="-0.005577841">
                <text:p>-0.00557784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35.709533691406">
                <text:p>435.709533691406</text:p>
              </table:table-cell>
              <table:table-cell office:value-type="float" office:value="0.01270452">
                <text:p>0.0127045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35.823272705078">
                <text:p>435.823272705078</text:p>
              </table:table-cell>
              <table:table-cell office:value-type="float" office:value="0.00185732">
                <text:p>0.0018573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35.936981201172">
                <text:p>435.936981201172</text:p>
              </table:table-cell>
              <table:table-cell office:value-type="float" office:value="-0.01134393">
                <text:p>-0.0113439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36.050720214844">
                <text:p>436.050720214844</text:p>
              </table:table-cell>
              <table:table-cell office:value-type="float" office:value="0.001793132">
                <text:p>0.00179313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36.164459228516">
                <text:p>436.164459228516</text:p>
              </table:table-cell>
              <table:table-cell office:value-type="float" office:value="-0.003227346">
                <text:p>-0.00322734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36.278198242188">
                <text:p>436.278198242188</text:p>
              </table:table-cell>
              <table:table-cell office:value-type="float" office:value="0.02728921">
                <text:p>0.0272892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36.391967773438">
                <text:p>436.391967773438</text:p>
              </table:table-cell>
              <table:table-cell office:value-type="float" office:value="-0.002208018">
                <text:p>-0.00220801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36.505706787109">
                <text:p>436.505706787109</text:p>
              </table:table-cell>
              <table:table-cell office:value-type="float" office:value="-0.003174262">
                <text:p>-0.00317426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36.619476318359">
                <text:p>436.619476318359</text:p>
              </table:table-cell>
              <table:table-cell office:value-type="float" office:value="0.004194912">
                <text:p>0.00419491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36.733245849609">
                <text:p>436.733245849609</text:p>
              </table:table-cell>
              <table:table-cell office:value-type="float" office:value="0.001254779">
                <text:p>0.00125477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36.847015380859">
                <text:p>436.847015380859</text:p>
              </table:table-cell>
              <table:table-cell office:value-type="float" office:value="-0.01015604">
                <text:p>-0.0101560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36.960784912109">
                <text:p>436.960784912109</text:p>
              </table:table-cell>
              <table:table-cell office:value-type="float" office:value="0.005338085">
                <text:p>0.00533808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37.074554443359">
                <text:p>437.074554443359</text:p>
              </table:table-cell>
              <table:table-cell office:value-type="float" office:value="0.003041045">
                <text:p>0.00304104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37.188354492188">
                <text:p>437.188354492188</text:p>
              </table:table-cell>
              <table:table-cell office:value-type="float" office:value="-0.001692347">
                <text:p>-0.00169234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37.302154541016">
                <text:p>437.302154541016</text:p>
              </table:table-cell>
              <table:table-cell office:value-type="float" office:value="0.003570141">
                <text:p>0.00357014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37.415924072266">
                <text:p>437.415924072266</text:p>
              </table:table-cell>
              <table:table-cell office:value-type="float" office:value="0.004120478">
                <text:p>0.00412047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37.529724121094">
                <text:p>437.52972412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37.6435546875">
                <text:p>437.6435546875</text:p>
              </table:table-cell>
              <table:table-cell office:value-type="float" office:value="-0.001251822">
                <text:p>-0.00125182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7.757354736328">
                <text:p>437.757354736328</text:p>
              </table:table-cell>
              <table:table-cell office:value-type="float" office:value="0.0054472">
                <text:p>0.005447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37.871154785156">
                <text:p>437.871154785156</text:p>
              </table:table-cell>
              <table:table-cell office:value-type="float" office:value="-0.004579739">
                <text:p>-0.00457973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37.984985351563">
                <text:p>437.984985351563</text:p>
              </table:table-cell>
              <table:table-cell office:value-type="float" office:value="0.01503123">
                <text:p>0.0150312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38.098815917969">
                <text:p>438.098815917969</text:p>
              </table:table-cell>
              <table:table-cell office:value-type="float" office:value="0.00372976">
                <text:p>0.0037297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38.212646484375">
                <text:p>438.212646484375</text:p>
              </table:table-cell>
              <table:table-cell office:value-type="float" office:value="-0.007876451">
                <text:p>-0.00787645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38.326477050781">
                <text:p>438.326477050781</text:p>
              </table:table-cell>
              <table:table-cell office:value-type="float" office:value="-0.0115521">
                <text:p>-0.011552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38.440307617188">
                <text:p>438.440307617188</text:p>
              </table:table-cell>
              <table:table-cell office:value-type="float" office:value="-0.001512032">
                <text:p>-0.00151203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38.554168701172">
                <text:p>438.554168701172</text:p>
              </table:table-cell>
              <table:table-cell office:value-type="float" office:value="0.006938442">
                <text:p>0.00693844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38.667999267578">
                <text:p>438.667999267578</text:p>
              </table:table-cell>
              <table:table-cell office:value-type="float" office:value="-0.01011907">
                <text:p>-0.0101190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38.781860351563">
                <text:p>438.781860351563</text:p>
              </table:table-cell>
              <table:table-cell office:value-type="float" office:value="-0.01427488">
                <text:p>-0.0142748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38.895721435547">
                <text:p>438.895721435547</text:p>
              </table:table-cell>
              <table:table-cell office:value-type="float" office:value="-0.004278515">
                <text:p>-0.00427851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39.009582519531">
                <text:p>439.009582519531</text:p>
              </table:table-cell>
              <table:table-cell office:value-type="float" office:value="0.001327921">
                <text:p>0.00132792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39.123474121094">
                <text:p>439.123474121094</text:p>
              </table:table-cell>
              <table:table-cell office:value-type="float" office:value="-0.0109995">
                <text:p>-0.010999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39.237335205078">
                <text:p>439.237335205078</text:p>
              </table:table-cell>
              <table:table-cell office:value-type="float" office:value="-0.008406855">
                <text:p>-0.00840685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39.351226806641">
                <text:p>439.351226806641</text:p>
              </table:table-cell>
              <table:table-cell office:value-type="float" office:value="0.003482854">
                <text:p>0.00348285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39.465087890625">
                <text:p>439.465087890625</text:p>
              </table:table-cell>
              <table:table-cell office:value-type="float" office:value="0.0220956">
                <text:p>0.022095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39.578979492188">
                <text:p>439.578979492188</text:p>
              </table:table-cell>
              <table:table-cell office:value-type="float" office:value="-0.005628922">
                <text:p>-0.00562892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39.69287109375">
                <text:p>439.69287109375</text:p>
              </table:table-cell>
              <table:table-cell office:value-type="float" office:value="-0.009692939">
                <text:p>-0.00969293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39.806793212891">
                <text:p>439.806793212891</text:p>
              </table:table-cell>
              <table:table-cell office:value-type="float" office:value="-0.007760459">
                <text:p>-0.00776045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39.920684814453">
                <text:p>439.920684814453</text:p>
              </table:table-cell>
              <table:table-cell office:value-type="float" office:value="0.06423979">
                <text:p>0.0642397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40.034606933594">
                <text:p>440.034606933594</text:p>
              </table:table-cell>
              <table:table-cell office:value-type="float" office:value="-0.0005348334">
                <text:p>-0.000534833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40.148498535156">
                <text:p>440.148498535156</text:p>
              </table:table-cell>
              <table:table-cell office:value-type="float" office:value="-0.003972925">
                <text:p>-0.00397292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40.262420654297">
                <text:p>440.262420654297</text:p>
              </table:table-cell>
              <table:table-cell office:value-type="float" office:value="0.00735397">
                <text:p>0.0073539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40.376342773438">
                <text:p>440.376342773438</text:p>
              </table:table-cell>
              <table:table-cell office:value-type="float" office:value="0.03344585">
                <text:p>0.0334458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40.490295410156">
                <text:p>440.490295410156</text:p>
              </table:table-cell>
              <table:table-cell office:value-type="float" office:value="-0.001188869">
                <text:p>-0.00118886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40.604217529297">
                <text:p>440.604217529297</text:p>
              </table:table-cell>
              <table:table-cell office:value-type="float" office:value="-0.0187484">
                <text:p>-0.018748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40.718170166016">
                <text:p>440.718170166016</text:p>
              </table:table-cell>
              <table:table-cell office:value-type="float" office:value="0.02161553">
                <text:p>0.0216155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40.832092285156">
                <text:p>440.832092285156</text:p>
              </table:table-cell>
              <table:table-cell office:value-type="float" office:value="0.01055673">
                <text:p>0.0105567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40.946044921875">
                <text:p>440.946044921875</text:p>
              </table:table-cell>
              <table:table-cell office:value-type="float" office:value="-0.004445108">
                <text:p>-0.00444510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41.059997558594">
                <text:p>441.059997558594</text:p>
              </table:table-cell>
              <table:table-cell office:value-type="float" office:value="-0.002266757">
                <text:p>-0.00226675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41.173950195313">
                <text:p>441.173950195313</text:p>
              </table:table-cell>
              <table:table-cell office:value-type="float" office:value="0.004830435">
                <text:p>0.00483043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41.287933349609">
                <text:p>441.287933349609</text:p>
              </table:table-cell>
              <table:table-cell office:value-type="float" office:value="-0.001852827">
                <text:p>-0.00185282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41.401885986328">
                <text:p>441.401885986328</text:p>
              </table:table-cell>
              <table:table-cell office:value-type="float" office:value="0.0003823249">
                <text:p>0.000382324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41.515869140625">
                <text:p>441.515869140625</text:p>
              </table:table-cell>
              <table:table-cell office:value-type="float" office:value="0.01721312">
                <text:p>0.0172131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41.629852294922">
                <text:p>441.629852294922</text:p>
              </table:table-cell>
              <table:table-cell office:value-type="float" office:value="0.0004383968">
                <text:p>0.000438396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41.743835449219">
                <text:p>441.743835449219</text:p>
              </table:table-cell>
              <table:table-cell office:value-type="float" office:value="0.006175636">
                <text:p>0.00617563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41.857818603516">
                <text:p>441.857818603516</text:p>
              </table:table-cell>
              <table:table-cell office:value-type="float" office:value="-0.01161725">
                <text:p>-0.0116172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41.971801757813">
                <text:p>441.971801757813</text:p>
              </table:table-cell>
              <table:table-cell office:value-type="float" office:value="0.001294875">
                <text:p>0.00129487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42.085815429688">
                <text:p>442.085815429688</text:p>
              </table:table-cell>
              <table:table-cell office:value-type="float" office:value="0.009327375">
                <text:p>0.00932737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42.199829101563">
                <text:p>442.199829101563</text:p>
              </table:table-cell>
              <table:table-cell office:value-type="float" office:value="-0.007128536">
                <text:p>-0.00712853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42.313812255859">
                <text:p>442.313812255859</text:p>
              </table:table-cell>
              <table:table-cell office:value-type="float" office:value="-0.000806951">
                <text:p>-0.00080695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42.427825927734">
                <text:p>442.427825927734</text:p>
              </table:table-cell>
              <table:table-cell office:value-type="float" office:value="0.02192697">
                <text:p>0.0219269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42.541839599609">
                <text:p>442.541839599609</text:p>
              </table:table-cell>
              <table:table-cell office:value-type="float" office:value="0.001100673">
                <text:p>0.00110067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2.655883789063">
                <text:p>442.655883789063</text:p>
              </table:table-cell>
              <table:table-cell office:value-type="float" office:value="-0.003589896">
                <text:p>-0.00358989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42.769897460938">
                <text:p>442.769897460938</text:p>
              </table:table-cell>
              <table:table-cell office:value-type="float" office:value="-0.0007925538">
                <text:p>-0.000792553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42.883941650391">
                <text:p>442.883941650391</text:p>
              </table:table-cell>
              <table:table-cell office:value-type="float" office:value="-0.002836298">
                <text:p>-0.00283629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42.997985839844">
                <text:p>442.997985839844</text:p>
              </table:table-cell>
              <table:table-cell office:value-type="float" office:value="0.007640108">
                <text:p>0.00764010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43.112030029297">
                <text:p>443.112030029297</text:p>
              </table:table-cell>
              <table:table-cell office:value-type="float" office:value="0.003396183">
                <text:p>0.00339618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43.22607421875">
                <text:p>443.22607421875</text:p>
              </table:table-cell>
              <table:table-cell office:value-type="float" office:value="-0.006154786">
                <text:p>-0.00615478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43.340118408203">
                <text:p>443.340118408203</text:p>
              </table:table-cell>
              <table:table-cell office:value-type="float" office:value="-0.001392435">
                <text:p>-0.00139243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43.454162597656">
                <text:p>443.454162597656</text:p>
              </table:table-cell>
              <table:table-cell office:value-type="float" office:value="0.003641749">
                <text:p>0.00364174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43.568237304688">
                <text:p>443.568237304688</text:p>
              </table:table-cell>
              <table:table-cell office:value-type="float" office:value="-0.006370682">
                <text:p>-0.00637068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43.682312011719">
                <text:p>443.682312011719</text:p>
              </table:table-cell>
              <table:table-cell office:value-type="float" office:value="-0.01070906">
                <text:p>-0.0107090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43.79638671875">
                <text:p>443.79638671875</text:p>
              </table:table-cell>
              <table:table-cell office:value-type="float" office:value="0.002500797">
                <text:p>0.00250079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43.910461425781">
                <text:p>443.910461425781</text:p>
              </table:table-cell>
              <table:table-cell office:value-type="float" office:value="-0.005026598">
                <text:p>-0.00502659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44.024536132813">
                <text:p>444.024536132813</text:p>
              </table:table-cell>
              <table:table-cell office:value-type="float" office:value="0.003850952">
                <text:p>0.00385095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44.138610839844">
                <text:p>444.138610839844</text:p>
              </table:table-cell>
              <table:table-cell office:value-type="float" office:value="0.02846891">
                <text:p>0.0284689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44.252716064453">
                <text:p>444.252716064453</text:p>
              </table:table-cell>
              <table:table-cell office:value-type="float" office:value="-0.004797393">
                <text:p>-0.00479739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44.366821289063">
                <text:p>444.366821289063</text:p>
              </table:table-cell>
              <table:table-cell office:value-type="float" office:value="-0.001290763">
                <text:p>-0.00129076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44.480895996094">
                <text:p>444.480895996094</text:p>
              </table:table-cell>
              <table:table-cell office:value-type="float" office:value="0.0007431004">
                <text:p>0.000743100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44.595001220703">
                <text:p>444.595001220703</text:p>
              </table:table-cell>
              <table:table-cell office:value-type="float" office:value="-0.005529869">
                <text:p>-0.00552986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44.709136962891">
                <text:p>444.709136962891</text:p>
              </table:table-cell>
              <table:table-cell office:value-type="float" office:value="-0.003457132">
                <text:p>-0.00345713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44.8232421875">
                <text:p>444.8232421875</text:p>
              </table:table-cell>
              <table:table-cell office:value-type="float" office:value="0.003839709">
                <text:p>0.00383970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44.937347412109">
                <text:p>444.937347412109</text:p>
              </table:table-cell>
              <table:table-cell office:value-type="float" office:value="0.006327373">
                <text:p>0.00632737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45.051483154297">
                <text:p>445.051483154297</text:p>
              </table:table-cell>
              <table:table-cell office:value-type="float" office:value="-0.004003252">
                <text:p>-0.00400325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45.165618896484">
                <text:p>445.165618896484</text:p>
              </table:table-cell>
              <table:table-cell office:value-type="float" office:value="-0.01147026">
                <text:p>-0.0114702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45.279754638672">
                <text:p>445.279754638672</text:p>
              </table:table-cell>
              <table:table-cell office:value-type="float" office:value="0.00556394">
                <text:p>0.0055639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45.393890380859">
                <text:p>445.393890380859</text:p>
              </table:table-cell>
              <table:table-cell office:value-type="float" office:value="-0.001161204">
                <text:p>-0.00116120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45.508026123047">
                <text:p>445.508026123047</text:p>
              </table:table-cell>
              <table:table-cell office:value-type="float" office:value="-0.00642621">
                <text:p>-0.0064262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45.622192382813">
                <text:p>445.622192382813</text:p>
              </table:table-cell>
              <table:table-cell office:value-type="float" office:value="0.001553287">
                <text:p>0.00155328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45.736328125">
                <text:p>445.736328125</text:p>
              </table:table-cell>
              <table:table-cell office:value-type="float" office:value="0.0004072981">
                <text:p>0.000407298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45.850494384766">
                <text:p>445.850494384766</text:p>
              </table:table-cell>
              <table:table-cell office:value-type="float" office:value="0.00409096">
                <text:p>0.0040909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45.964660644531">
                <text:p>445.964660644531</text:p>
              </table:table-cell>
              <table:table-cell office:value-type="float" office:value="-0.004810519">
                <text:p>-0.00481051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46.078826904297">
                <text:p>446.078826904297</text:p>
              </table:table-cell>
              <table:table-cell office:value-type="float" office:value="-0.0001059442">
                <text:p>-0.000105944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46.192993164063">
                <text:p>446.192993164063</text:p>
              </table:table-cell>
              <table:table-cell office:value-type="float" office:value="0.005354062">
                <text:p>0.00535406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46.307189941406">
                <text:p>446.307189941406</text:p>
              </table:table-cell>
              <table:table-cell office:value-type="float" office:value="0.003830722">
                <text:p>0.00383072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46.421356201172">
                <text:p>446.421356201172</text:p>
              </table:table-cell>
              <table:table-cell office:value-type="float" office:value="-0.005210075">
                <text:p>-0.00521007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46.535552978516">
                <text:p>446.535552978516</text:p>
              </table:table-cell>
              <table:table-cell office:value-type="float" office:value="0.001659997">
                <text:p>0.00165999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46.649749755859">
                <text:p>446.649749755859</text:p>
              </table:table-cell>
              <table:table-cell office:value-type="float" office:value="0.01352245">
                <text:p>0.0135224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46.763946533203">
                <text:p>446.763946533203</text:p>
              </table:table-cell>
              <table:table-cell office:value-type="float" office:value="-0.004658998">
                <text:p>-0.00465899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46.878143310547">
                <text:p>446.878143310547</text:p>
              </table:table-cell>
              <table:table-cell office:value-type="float" office:value="-0.002815398">
                <text:p>-0.00281539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46.992370605469">
                <text:p>446.992370605469</text:p>
              </table:table-cell>
              <table:table-cell office:value-type="float" office:value="-0.00429916">
                <text:p>-0.0042991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47.106567382813">
                <text:p>447.106567382813</text:p>
              </table:table-cell>
              <table:table-cell office:value-type="float" office:value="0.01476494">
                <text:p>0.0147649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47.220794677734">
                <text:p>447.220794677734</text:p>
              </table:table-cell>
              <table:table-cell office:value-type="float" office:value="0.00206408">
                <text:p>0.0020640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47.335021972656">
                <text:p>447.335021972656</text:p>
              </table:table-cell>
              <table:table-cell office:value-type="float" office:value="0.003219875">
                <text:p>0.00321987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47.449249267578">
                <text:p>447.449249267578</text:p>
              </table:table-cell>
              <table:table-cell office:value-type="float" office:value="0.008596203">
                <text:p>0.00859620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47.5634765625">
                <text:p>447.5634765625</text:p>
              </table:table-cell>
              <table:table-cell office:value-type="float" office:value="0.0005499503">
                <text:p>0.000549950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47.677703857422">
                <text:p>447.677703857422</text:p>
              </table:table-cell>
              <table:table-cell office:value-type="float" office:value="0.003838297">
                <text:p>0.00383829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47.791961669922">
                <text:p>447.791961669922</text:p>
              </table:table-cell>
              <table:table-cell office:value-type="float" office:value="-0.00650935">
                <text:p>-0.0065093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47.906188964844">
                <text:p>447.906188964844</text:p>
              </table:table-cell>
              <table:table-cell office:value-type="float" office:value="-0.008835317">
                <text:p>-0.00883531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48.020446777344">
                <text:p>448.020446777344</text:p>
              </table:table-cell>
              <table:table-cell office:value-type="float" office:value="-0.007018331">
                <text:p>-0.00701833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48.134704589844">
                <text:p>448.134704589844</text:p>
              </table:table-cell>
              <table:table-cell office:value-type="float" office:value="0.012812">
                <text:p>0.01281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48.248962402344">
                <text:p>448.248962402344</text:p>
              </table:table-cell>
              <table:table-cell office:value-type="float" office:value="-0.007772599">
                <text:p>-0.00777259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48.363220214844">
                <text:p>448.363220214844</text:p>
              </table:table-cell>
              <table:table-cell office:value-type="float" office:value="-0.00190229">
                <text:p>-0.0019022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48.477508544922">
                <text:p>448.477508544922</text:p>
              </table:table-cell>
              <table:table-cell office:value-type="float" office:value="0.006737088">
                <text:p>0.00673708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48.591766357422">
                <text:p>448.591766357422</text:p>
              </table:table-cell>
              <table:table-cell office:value-type="float" office:value="0.01099754">
                <text:p>0.0109975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48.7060546875">
                <text:p>448.7060546875</text:p>
              </table:table-cell>
              <table:table-cell office:value-type="float" office:value="0.01118395">
                <text:p>0.0111839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48.820343017578">
                <text:p>448.820343017578</text:p>
              </table:table-cell>
              <table:table-cell office:value-type="float" office:value="-0.009613401">
                <text:p>-0.00961340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48.934631347656">
                <text:p>448.934631347656</text:p>
              </table:table-cell>
              <table:table-cell office:value-type="float" office:value="-0.002712733">
                <text:p>-0.00271273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49.048919677734">
                <text:p>449.048919677734</text:p>
              </table:table-cell>
              <table:table-cell office:value-type="float" office:value="-0.003158496">
                <text:p>-0.00315849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49.163238525391">
                <text:p>449.163238525391</text:p>
              </table:table-cell>
              <table:table-cell office:value-type="float" office:value="-0.01265224">
                <text:p>-0.0126522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49.277526855469">
                <text:p>449.277526855469</text:p>
              </table:table-cell>
              <table:table-cell office:value-type="float" office:value="0.0005032228">
                <text:p>0.000503222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49.391845703125">
                <text:p>449.391845703125</text:p>
              </table:table-cell>
              <table:table-cell office:value-type="float" office:value="0.01594685">
                <text:p>0.0159468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49.506164550781">
                <text:p>449.506164550781</text:p>
              </table:table-cell>
              <table:table-cell office:value-type="float" office:value="0.001009423">
                <text:p>0.00100942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49.620483398438">
                <text:p>449.620483398438</text:p>
              </table:table-cell>
              <table:table-cell office:value-type="float" office:value="0.01078158">
                <text:p>0.0107815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49.734802246094">
                <text:p>449.734802246094</text:p>
              </table:table-cell>
              <table:table-cell office:value-type="float" office:value="-0.01132389">
                <text:p>-0.0113238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49.84912109375">
                <text:p>449.84912109375</text:p>
              </table:table-cell>
              <table:table-cell office:value-type="float" office:value="0.007228285">
                <text:p>0.00722828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49.963439941406">
                <text:p>449.963439941406</text:p>
              </table:table-cell>
              <table:table-cell office:value-type="float" office:value="-0.004080791">
                <text:p>-0.00408079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50.077789306641">
                <text:p>450.077789306641</text:p>
              </table:table-cell>
              <table:table-cell office:value-type="float" office:value="-0.00177459">
                <text:p>-0.0017745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50.192138671875">
                <text:p>450.192138671875</text:p>
              </table:table-cell>
              <table:table-cell office:value-type="float" office:value="-0.01339626">
                <text:p>-0.0133962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50.306488037109">
                <text:p>450.306488037109</text:p>
              </table:table-cell>
              <table:table-cell office:value-type="float" office:value="0.006700225">
                <text:p>0.00670022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50.420837402344">
                <text:p>450.420837402344</text:p>
              </table:table-cell>
              <table:table-cell office:value-type="float" office:value="0.003018271">
                <text:p>0.00301827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50.535186767578">
                <text:p>450.535186767578</text:p>
              </table:table-cell>
              <table:table-cell office:value-type="float" office:value="0.001027496">
                <text:p>0.00102749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50.649536132813">
                <text:p>450.649536132813</text:p>
              </table:table-cell>
              <table:table-cell office:value-type="float" office:value="-0.0128486">
                <text:p>-0.012848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50.763916015625">
                <text:p>450.763916015625</text:p>
              </table:table-cell>
              <table:table-cell office:value-type="float" office:value="0.008180664">
                <text:p>0.00818066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50.878295898438">
                <text:p>450.878295898438</text:p>
              </table:table-cell>
              <table:table-cell office:value-type="float" office:value="-0.007598497">
                <text:p>-0.00759849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50.99267578125">
                <text:p>450.99267578125</text:p>
              </table:table-cell>
              <table:table-cell office:value-type="float" office:value="-0.0009693782">
                <text:p>-0.000969378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51.107055664063">
                <text:p>451.107055664063</text:p>
              </table:table-cell>
              <table:table-cell office:value-type="float" office:value="-0.01560005">
                <text:p>-0.0156000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51.221435546875">
                <text:p>451.22143554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51.335815429688">
                <text:p>451.335815429688</text:p>
              </table:table-cell>
              <table:table-cell office:value-type="float" office:value="0.01182982">
                <text:p>0.0118298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51.450225830078">
                <text:p>451.450225830078</text:p>
              </table:table-cell>
              <table:table-cell office:value-type="float" office:value="0.001874404">
                <text:p>0.00187440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51.564605712891">
                <text:p>451.564605712891</text:p>
              </table:table-cell>
              <table:table-cell office:value-type="float" office:value="-0.01352611">
                <text:p>-0.0135261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51.679016113281">
                <text:p>451.679016113281</text:p>
              </table:table-cell>
              <table:table-cell office:value-type="float" office:value="0.007425028">
                <text:p>0.00742502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51.793426513672">
                <text:p>451.793426513672</text:p>
              </table:table-cell>
              <table:table-cell office:value-type="float" office:value="0.01038429">
                <text:p>0.0103842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51.907836914063">
                <text:p>451.907836914063</text:p>
              </table:table-cell>
              <table:table-cell office:value-type="float" office:value="-0.008016651">
                <text:p>-0.00801665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52.022247314453">
                <text:p>452.022247314453</text:p>
              </table:table-cell>
              <table:table-cell office:value-type="float" office:value="-0.002534954">
                <text:p>-0.00253495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52.136688232422">
                <text:p>452.136688232422</text:p>
              </table:table-cell>
              <table:table-cell office:value-type="float" office:value="0.002159542">
                <text:p>0.00215954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52.251098632813">
                <text:p>452.251098632813</text:p>
              </table:table-cell>
              <table:table-cell office:value-type="float" office:value="0.008617416">
                <text:p>0.00861741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52.365539550781">
                <text:p>452.365539550781</text:p>
              </table:table-cell>
              <table:table-cell office:value-type="float" office:value="-0.01066769">
                <text:p>-0.0106676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52.47998046875">
                <text:p>452.47998046875</text:p>
              </table:table-cell>
              <table:table-cell office:value-type="float" office:value="0.003933384">
                <text:p>0.00393338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52.594421386719">
                <text:p>452.594421386719</text:p>
              </table:table-cell>
              <table:table-cell office:value-type="float" office:value="0.01000784">
                <text:p>0.0100078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52.708862304688">
                <text:p>452.708862304688</text:p>
              </table:table-cell>
              <table:table-cell office:value-type="float" office:value="0.005946004">
                <text:p>0.00594600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52.823333740234">
                <text:p>452.823333740234</text:p>
              </table:table-cell>
              <table:table-cell office:value-type="float" office:value="0.01082437">
                <text:p>0.0108243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52.937774658203">
                <text:p>452.937774658203</text:p>
              </table:table-cell>
              <table:table-cell office:value-type="float" office:value="-0.00709486">
                <text:p>-0.0070948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53.05224609375">
                <text:p>453.05224609375</text:p>
              </table:table-cell>
              <table:table-cell office:value-type="float" office:value="-0.003585121">
                <text:p>-0.00358512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53.166717529297">
                <text:p>453.166717529297</text:p>
              </table:table-cell>
              <table:table-cell office:value-type="float" office:value="0.006587606">
                <text:p>0.00658760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53.281188964844">
                <text:p>453.281188964844</text:p>
              </table:table-cell>
              <table:table-cell office:value-type="float" office:value="-0.01205732">
                <text:p>-0.0120573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53.395660400391">
                <text:p>453.395660400391</text:p>
              </table:table-cell>
              <table:table-cell office:value-type="float" office:value="-0.004284215">
                <text:p>-0.00428421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53.510131835938">
                <text:p>453.510131835938</text:p>
              </table:table-cell>
              <table:table-cell office:value-type="float" office:value="0.01687058">
                <text:p>0.0168705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53.624603271484">
                <text:p>453.624603271484</text:p>
              </table:table-cell>
              <table:table-cell office:value-type="float" office:value="-0.007841586">
                <text:p>-0.00784158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53.739105224609">
                <text:p>453.739105224609</text:p>
              </table:table-cell>
              <table:table-cell office:value-type="float" office:value="-0.004128336">
                <text:p>-0.00412833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53.853607177734">
                <text:p>453.853607177734</text:p>
              </table:table-cell>
              <table:table-cell office:value-type="float" office:value="-0.003968889">
                <text:p>-0.00396888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53.968109130859">
                <text:p>453.968109130859</text:p>
              </table:table-cell>
              <table:table-cell office:value-type="float" office:value="0.001975934">
                <text:p>0.00197593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54.082611083984">
                <text:p>454.082611083984</text:p>
              </table:table-cell>
              <table:table-cell office:value-type="float" office:value="-0.003165632">
                <text:p>-0.00316563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54.197113037109">
                <text:p>454.197113037109</text:p>
              </table:table-cell>
              <table:table-cell office:value-type="float" office:value="-0.01126278">
                <text:p>-0.0112627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54.311614990234">
                <text:p>454.311614990234</text:p>
              </table:table-cell>
              <table:table-cell office:value-type="float" office:value="-0.0163094">
                <text:p>-0.016309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54.426147460938">
                <text:p>454.426147460938</text:p>
              </table:table-cell>
              <table:table-cell office:value-type="float" office:value="0.006527323">
                <text:p>0.00652732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54.540649414063">
                <text:p>454.540649414063</text:p>
              </table:table-cell>
              <table:table-cell office:value-type="float" office:value="0.01004293">
                <text:p>0.0100429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54.655181884766">
                <text:p>454.655181884766</text:p>
              </table:table-cell>
              <table:table-cell office:value-type="float" office:value="-0.006125152">
                <text:p>-0.00612515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54.769714355469">
                <text:p>454.769714355469</text:p>
              </table:table-cell>
              <table:table-cell office:value-type="float" office:value="-0.002923273">
                <text:p>-0.00292327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54.884246826172">
                <text:p>454.884246826172</text:p>
              </table:table-cell>
              <table:table-cell office:value-type="float" office:value="0.01092734">
                <text:p>0.0109273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54.998809814453">
                <text:p>454.998809814453</text:p>
              </table:table-cell>
              <table:table-cell office:value-type="float" office:value="0.01228422">
                <text:p>0.0122842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55.113342285156">
                <text:p>455.113342285156</text:p>
              </table:table-cell>
              <table:table-cell office:value-type="float" office:value="-0.007713606">
                <text:p>-0.00771360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55.227905273438">
                <text:p>455.227905273438</text:p>
              </table:table-cell>
              <table:table-cell office:value-type="float" office:value="-0.006764454">
                <text:p>-0.00676445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55.342468261719">
                <text:p>455.342468261719</text:p>
              </table:table-cell>
              <table:table-cell office:value-type="float" office:value="0.007563879">
                <text:p>0.00756387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55.457000732422">
                <text:p>455.457000732422</text:p>
              </table:table-cell>
              <table:table-cell office:value-type="float" office:value="0.008412273">
                <text:p>0.00841227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55.571563720703">
                <text:p>455.571563720703</text:p>
              </table:table-cell>
              <table:table-cell office:value-type="float" office:value="-0.0111757">
                <text:p>-0.011175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55.686157226563">
                <text:p>455.686157226563</text:p>
              </table:table-cell>
              <table:table-cell office:value-type="float" office:value="-0.01199551">
                <text:p>-0.0119955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55.800720214844">
                <text:p>455.800720214844</text:p>
              </table:table-cell>
              <table:table-cell office:value-type="float" office:value="0.01050807">
                <text:p>0.0105080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55.915313720703">
                <text:p>455.915313720703</text:p>
              </table:table-cell>
              <table:table-cell office:value-type="float" office:value="-0.001762945">
                <text:p>-0.00176294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56.029876708984">
                <text:p>456.029876708984</text:p>
              </table:table-cell>
              <table:table-cell office:value-type="float" office:value="-0.006830119">
                <text:p>-0.00683011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56.144470214844">
                <text:p>456.144470214844</text:p>
              </table:table-cell>
              <table:table-cell office:value-type="float" office:value="-0.005130272">
                <text:p>-0.00513027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56.259063720703">
                <text:p>456.259063720703</text:p>
              </table:table-cell>
              <table:table-cell office:value-type="float" office:value="-0.005763615">
                <text:p>-0.00576361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56.373657226563">
                <text:p>456.373657226563</text:p>
              </table:table-cell>
              <table:table-cell office:value-type="float" office:value="0.008901454">
                <text:p>0.00890145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56.488250732422">
                <text:p>456.488250732422</text:p>
              </table:table-cell>
              <table:table-cell office:value-type="float" office:value="-0.01155965">
                <text:p>-0.0115596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56.602874755859">
                <text:p>456.602874755859</text:p>
              </table:table-cell>
              <table:table-cell office:value-type="float" office:value="-0.01553586">
                <text:p>-0.0155358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56.717468261719">
                <text:p>456.717468261719</text:p>
              </table:table-cell>
              <table:table-cell office:value-type="float" office:value="0.01637841">
                <text:p>0.0163784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56.832092285156">
                <text:p>456.832092285156</text:p>
              </table:table-cell>
              <table:table-cell office:value-type="float" office:value="-0.0003760556">
                <text:p>-0.000376055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56.946716308594">
                <text:p>456.946716308594</text:p>
              </table:table-cell>
              <table:table-cell office:value-type="float" office:value="-0.01152921">
                <text:p>-0.0115292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57.061340332031">
                <text:p>457.061340332031</text:p>
              </table:table-cell>
              <table:table-cell office:value-type="float" office:value="0.009898593">
                <text:p>0.00989859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57.175964355469">
                <text:p>457.175964355469</text:p>
              </table:table-cell>
              <table:table-cell office:value-type="float" office:value="0.002949515">
                <text:p>0.00294951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57.290618896484">
                <text:p>457.290618896484</text:p>
              </table:table-cell>
              <table:table-cell office:value-type="float" office:value="0.00291631">
                <text:p>0.0029163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57.405242919922">
                <text:p>457.405242919922</text:p>
              </table:table-cell>
              <table:table-cell office:value-type="float" office:value="-0.01474416">
                <text:p>-0.0147441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57.519897460938">
                <text:p>457.519897460938</text:p>
              </table:table-cell>
              <table:table-cell office:value-type="float" office:value="0.01821023">
                <text:p>0.0182102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57.634552001953">
                <text:p>457.634552001953</text:p>
              </table:table-cell>
              <table:table-cell office:value-type="float" office:value="0.00958862">
                <text:p>0.0095886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57.749206542969">
                <text:p>457.749206542969</text:p>
              </table:table-cell>
              <table:table-cell office:value-type="float" office:value="0.01137732">
                <text:p>0.0113773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57.863861083984">
                <text:p>457.863861083984</text:p>
              </table:table-cell>
              <table:table-cell office:value-type="float" office:value="-0.001519286">
                <text:p>-0.00151928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57.978515625">
                <text:p>457.978515625</text:p>
              </table:table-cell>
              <table:table-cell office:value-type="float" office:value="-0.00129077">
                <text:p>-0.0012907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58.093200683594">
                <text:p>458.093200683594</text:p>
              </table:table-cell>
              <table:table-cell office:value-type="float" office:value="-0.003092797">
                <text:p>-0.00309279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58.207855224609">
                <text:p>458.207855224609</text:p>
              </table:table-cell>
              <table:table-cell office:value-type="float" office:value="0.009111003">
                <text:p>0.00911100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58.322540283203">
                <text:p>458.322540283203</text:p>
              </table:table-cell>
              <table:table-cell office:value-type="float" office:value="0.01400412">
                <text:p>0.0140041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58.437225341797">
                <text:p>458.437225341797</text:p>
              </table:table-cell>
              <table:table-cell office:value-type="float" office:value="0.0006536999">
                <text:p>0.000653699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58.551910400391">
                <text:p>458.551910400391</text:p>
              </table:table-cell>
              <table:table-cell office:value-type="float" office:value="0.007505669">
                <text:p>0.00750566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58.666595458984">
                <text:p>458.666595458984</text:p>
              </table:table-cell>
              <table:table-cell office:value-type="float" office:value="0.01681897">
                <text:p>0.0168189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58.781280517578">
                <text:p>458.781280517578</text:p>
              </table:table-cell>
              <table:table-cell office:value-type="float" office:value="-0.006384877">
                <text:p>-0.00638487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58.89599609375">
                <text:p>458.89599609375</text:p>
              </table:table-cell>
              <table:table-cell office:value-type="float" office:value="-0.0008658381">
                <text:p>-0.000865838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59.010681152344">
                <text:p>459.010681152344</text:p>
              </table:table-cell>
              <table:table-cell office:value-type="float" office:value="0.0109692">
                <text:p>0.010969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59.125396728516">
                <text:p>459.125396728516</text:p>
              </table:table-cell>
              <table:table-cell office:value-type="float" office:value="0.03599255">
                <text:p>0.0359925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59.240112304688">
                <text:p>459.240112304688</text:p>
              </table:table-cell>
              <table:table-cell office:value-type="float" office:value="0.01204112">
                <text:p>0.0120411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59.354827880859">
                <text:p>459.354827880859</text:p>
              </table:table-cell>
              <table:table-cell office:value-type="float" office:value="-0.00768278">
                <text:p>-0.0076827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59.469543457031">
                <text:p>459.469543457031</text:p>
              </table:table-cell>
              <table:table-cell office:value-type="float" office:value="0.004100797">
                <text:p>0.00410079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59.584289550781">
                <text:p>459.584289550781</text:p>
              </table:table-cell>
              <table:table-cell office:value-type="float" office:value="-0.002320265">
                <text:p>-0.00232026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59.699005126953">
                <text:p>459.699005126953</text:p>
              </table:table-cell>
              <table:table-cell office:value-type="float" office:value="0.006576655">
                <text:p>0.00657665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59.813751220703">
                <text:p>459.813751220703</text:p>
              </table:table-cell>
              <table:table-cell office:value-type="float" office:value="-0.006526043">
                <text:p>-0.00652604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59.928497314453">
                <text:p>459.928497314453</text:p>
              </table:table-cell>
              <table:table-cell office:value-type="float" office:value="0.008032383">
                <text:p>0.00803238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60.043243408203">
                <text:p>460.043243408203</text:p>
              </table:table-cell>
              <table:table-cell office:value-type="float" office:value="0.03883331">
                <text:p>0.0388333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60.157989501953">
                <text:p>460.157989501953</text:p>
              </table:table-cell>
              <table:table-cell office:value-type="float" office:value="0.01549665">
                <text:p>0.0154966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60.272735595703">
                <text:p>460.272735595703</text:p>
              </table:table-cell>
              <table:table-cell office:value-type="float" office:value="-0.01155463">
                <text:p>-0.0115546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60.387512207031">
                <text:p>460.387512207031</text:p>
              </table:table-cell>
              <table:table-cell office:value-type="float" office:value="-0.004469597">
                <text:p>-0.00446959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60.502258300781">
                <text:p>460.502258300781</text:p>
              </table:table-cell>
              <table:table-cell office:value-type="float" office:value="0.01071582">
                <text:p>0.0107158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60.617034912109">
                <text:p>460.617034912109</text:p>
              </table:table-cell>
              <table:table-cell office:value-type="float" office:value="-0.002544058">
                <text:p>-0.00254405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60.731811523438">
                <text:p>460.731811523438</text:p>
              </table:table-cell>
              <table:table-cell office:value-type="float" office:value="0.008381394">
                <text:p>0.00838139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60.846588134766">
                <text:p>460.846588134766</text:p>
              </table:table-cell>
              <table:table-cell office:value-type="float" office:value="0.01387202">
                <text:p>0.0138720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60.961364746094">
                <text:p>460.961364746094</text:p>
              </table:table-cell>
              <table:table-cell office:value-type="float" office:value="0.0001415509">
                <text:p>0.000141550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1.076171875">
                <text:p>461.076171875</text:p>
              </table:table-cell>
              <table:table-cell office:value-type="float" office:value="-0.01226147">
                <text:p>-0.0122614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61.190948486328">
                <text:p>461.190948486328</text:p>
              </table:table-cell>
              <table:table-cell office:value-type="float" office:value="-0.001045993">
                <text:p>-0.00104599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61.305755615234">
                <text:p>461.305755615234</text:p>
              </table:table-cell>
              <table:table-cell office:value-type="float" office:value="0.005958734">
                <text:p>0.00595873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61.420562744141">
                <text:p>461.420562744141</text:p>
              </table:table-cell>
              <table:table-cell office:value-type="float" office:value="-0.001783794">
                <text:p>-0.00178379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61.535369873047">
                <text:p>461.535369873047</text:p>
              </table:table-cell>
              <table:table-cell office:value-type="float" office:value="-0.0109403">
                <text:p>-0.010940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61.650177001953">
                <text:p>461.650177001953</text:p>
              </table:table-cell>
              <table:table-cell office:value-type="float" office:value="0.007658938">
                <text:p>0.00765893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61.764984130859">
                <text:p>461.764984130859</text:p>
              </table:table-cell>
              <table:table-cell office:value-type="float" office:value="0.00205933">
                <text:p>0.0020593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61.879791259766">
                <text:p>461.879791259766</text:p>
              </table:table-cell>
              <table:table-cell office:value-type="float" office:value="0.007331359">
                <text:p>0.00733135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61.99462890625">
                <text:p>461.99462890625</text:p>
              </table:table-cell>
              <table:table-cell office:value-type="float" office:value="-0.004086311">
                <text:p>-0.00408631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62.109466552734">
                <text:p>462.109466552734</text:p>
              </table:table-cell>
              <table:table-cell office:value-type="float" office:value="0.005908828">
                <text:p>0.00590882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62.224304199219">
                <text:p>462.224304199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62.339141845703">
                <text:p>462.339141845703</text:p>
              </table:table-cell>
              <table:table-cell office:value-type="float" office:value="0.0107731">
                <text:p>0.010773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62.453979492188">
                <text:p>462.453979492188</text:p>
              </table:table-cell>
              <table:table-cell office:value-type="float" office:value="-0.0006404943">
                <text:p>-0.000640494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62.568817138672">
                <text:p>462.568817138672</text:p>
              </table:table-cell>
              <table:table-cell office:value-type="float" office:value="0.002758068">
                <text:p>0.00275806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2.683654785156">
                <text:p>462.683654785156</text:p>
              </table:table-cell>
              <table:table-cell office:value-type="float" office:value="0.01267279">
                <text:p>0.0126727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62.798522949219">
                <text:p>462.798522949219</text:p>
              </table:table-cell>
              <table:table-cell office:value-type="float" office:value="-0.008582356">
                <text:p>-0.00858235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62.913391113281">
                <text:p>462.913391113281</text:p>
              </table:table-cell>
              <table:table-cell office:value-type="float" office:value="-0.005349316">
                <text:p>-0.00534931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63.028259277344">
                <text:p>463.028259277344</text:p>
              </table:table-cell>
              <table:table-cell office:value-type="float" office:value="0.006910245">
                <text:p>0.00691024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63.143127441406">
                <text:p>463.143127441406</text:p>
              </table:table-cell>
              <table:table-cell office:value-type="float" office:value="0.005393322">
                <text:p>0.00539332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63.257995605469">
                <text:p>463.257995605469</text:p>
              </table:table-cell>
              <table:table-cell office:value-type="float" office:value="-0.008377112">
                <text:p>-0.00837711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63.372863769531">
                <text:p>463.372863769531</text:p>
              </table:table-cell>
              <table:table-cell office:value-type="float" office:value="0.01494789">
                <text:p>0.0149478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63.487762451172">
                <text:p>463.487762451172</text:p>
              </table:table-cell>
              <table:table-cell office:value-type="float" office:value="0.00687316">
                <text:p>0.0068731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63.602661132813">
                <text:p>463.602661132813</text:p>
              </table:table-cell>
              <table:table-cell office:value-type="float" office:value="0.00514486">
                <text:p>0.0051448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63.717529296875">
                <text:p>463.717529296875</text:p>
              </table:table-cell>
              <table:table-cell office:value-type="float" office:value="-0.0008840571">
                <text:p>-0.000884057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63.832427978516">
                <text:p>463.832427978516</text:p>
              </table:table-cell>
              <table:table-cell office:value-type="float" office:value="-0.01274233">
                <text:p>-0.0127423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63.947326660156">
                <text:p>463.947326660156</text:p>
              </table:table-cell>
              <table:table-cell office:value-type="float" office:value="0.001385428">
                <text:p>0.00138542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64.062255859375">
                <text:p>464.062255859375</text:p>
              </table:table-cell>
              <table:table-cell office:value-type="float" office:value="-0.006537979">
                <text:p>-0.00653797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64.177154541016">
                <text:p>464.177154541016</text:p>
              </table:table-cell>
              <table:table-cell office:value-type="float" office:value="-0.007371325">
                <text:p>-0.00737132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64.292083740234">
                <text:p>464.292083740234</text:p>
              </table:table-cell>
              <table:table-cell office:value-type="float" office:value="-0.01072731">
                <text:p>-0.0107273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64.406982421875">
                <text:p>464.406982421875</text:p>
              </table:table-cell>
              <table:table-cell office:value-type="float" office:value="0.005260065">
                <text:p>0.00526006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64.521911621094">
                <text:p>464.521911621094</text:p>
              </table:table-cell>
              <table:table-cell office:value-type="float" office:value="-0.005072006">
                <text:p>-0.00507200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64.636840820313">
                <text:p>464.636840820313</text:p>
              </table:table-cell>
              <table:table-cell office:value-type="float" office:value="-0.002824325">
                <text:p>-0.00282432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64.751770019531">
                <text:p>464.751770019531</text:p>
              </table:table-cell>
              <table:table-cell office:value-type="float" office:value="-0.008059101">
                <text:p>-0.00805910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64.866729736328">
                <text:p>464.866729736328</text:p>
              </table:table-cell>
              <table:table-cell office:value-type="float" office:value="0.003488441">
                <text:p>0.00348844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64.981658935547">
                <text:p>464.981658935547</text:p>
              </table:table-cell>
              <table:table-cell office:value-type="float" office:value="0.01454457">
                <text:p>0.0145445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65.096618652344">
                <text:p>465.096618652344</text:p>
              </table:table-cell>
              <table:table-cell office:value-type="float" office:value="-0.007004624">
                <text:p>-0.00700462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65.211547851563">
                <text:p>465.211547851563</text:p>
              </table:table-cell>
              <table:table-cell office:value-type="float" office:value="-0.01393758">
                <text:p>-0.0139375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65.326507568359">
                <text:p>465.326507568359</text:p>
              </table:table-cell>
              <table:table-cell office:value-type="float" office:value="-0.01009395">
                <text:p>-0.0100939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65.441467285156">
                <text:p>465.441467285156</text:p>
              </table:table-cell>
              <table:table-cell office:value-type="float" office:value="0.001372111">
                <text:p>0.00137211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65.556427001953">
                <text:p>465.556427001953</text:p>
              </table:table-cell>
              <table:table-cell office:value-type="float" office:value="-0.003973699">
                <text:p>-0.00397369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65.671417236328">
                <text:p>465.671417236328</text:p>
              </table:table-cell>
              <table:table-cell office:value-type="float" office:value="-0.007465629">
                <text:p>-0.00746562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65.786376953125">
                <text:p>465.786376953125</text:p>
              </table:table-cell>
              <table:table-cell office:value-type="float" office:value="0.003285579">
                <text:p>0.00328557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65.9013671875">
                <text:p>465.9013671875</text:p>
              </table:table-cell>
              <table:table-cell office:value-type="float" office:value="0.004903127">
                <text:p>0.00490312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66.016357421875">
                <text:p>466.016357421875</text:p>
              </table:table-cell>
              <table:table-cell office:value-type="float" office:value="-0.002637292">
                <text:p>-0.00263729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66.13134765625">
                <text:p>466.13134765625</text:p>
              </table:table-cell>
              <table:table-cell office:value-type="float" office:value="-0.009891845">
                <text:p>-0.00989184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66.246337890625">
                <text:p>466.246337890625</text:p>
              </table:table-cell>
              <table:table-cell office:value-type="float" office:value="0.01666922">
                <text:p>0.0166692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66.361328125">
                <text:p>466.361328125</text:p>
              </table:table-cell>
              <table:table-cell office:value-type="float" office:value="-0.003820862">
                <text:p>-0.00382086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66.476318359375">
                <text:p>466.476318359375</text:p>
              </table:table-cell>
              <table:table-cell office:value-type="float" office:value="-0.01349802">
                <text:p>-0.0134980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66.591339111328">
                <text:p>466.591339111328</text:p>
              </table:table-cell>
              <table:table-cell office:value-type="float" office:value="0.003592304">
                <text:p>0.00359230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66.706329345703">
                <text:p>466.706329345703</text:p>
              </table:table-cell>
              <table:table-cell office:value-type="float" office:value="0.02626177">
                <text:p>0.0262617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66.821350097656">
                <text:p>466.821350097656</text:p>
              </table:table-cell>
              <table:table-cell office:value-type="float" office:value="-0.001586553">
                <text:p>-0.00158655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66.936370849609">
                <text:p>466.936370849609</text:p>
              </table:table-cell>
              <table:table-cell office:value-type="float" office:value="-0.006117521">
                <text:p>-0.00611752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67.051391601563">
                <text:p>467.051391601563</text:p>
              </table:table-cell>
              <table:table-cell office:value-type="float" office:value="0.009610989">
                <text:p>0.00961098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67.166442871094">
                <text:p>467.166442871094</text:p>
              </table:table-cell>
              <table:table-cell office:value-type="float" office:value="-0.005887977">
                <text:p>-0.00588797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67.281463623047">
                <text:p>467.281463623047</text:p>
              </table:table-cell>
              <table:table-cell office:value-type="float" office:value="0.0008061319">
                <text:p>0.000806131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67.396484375">
                <text:p>467.396484375</text:p>
              </table:table-cell>
              <table:table-cell office:value-type="float" office:value="-0.006962405">
                <text:p>-0.00696240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67.511535644531">
                <text:p>467.511535644531</text:p>
              </table:table-cell>
              <table:table-cell office:value-type="float" office:value="-0.009946955">
                <text:p>-0.00994695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67.626586914063">
                <text:p>467.626586914063</text:p>
              </table:table-cell>
              <table:table-cell office:value-type="float" office:value="0.001657601">
                <text:p>0.00165760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67.741638183594">
                <text:p>467.741638183594</text:p>
              </table:table-cell>
              <table:table-cell office:value-type="float" office:value="-0.01166252">
                <text:p>-0.0116625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67.856689453125">
                <text:p>467.856689453125</text:p>
              </table:table-cell>
              <table:table-cell office:value-type="float" office:value="-0.006833093">
                <text:p>-0.00683309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67.971740722656">
                <text:p>467.971740722656</text:p>
              </table:table-cell>
              <table:table-cell office:value-type="float" office:value="-0.008378959">
                <text:p>-0.00837895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68.086822509766">
                <text:p>468.086822509766</text:p>
              </table:table-cell>
              <table:table-cell office:value-type="float" office:value="-0.001671269">
                <text:p>-0.00167126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68.201873779297">
                <text:p>468.201873779297</text:p>
              </table:table-cell>
              <table:table-cell office:value-type="float" office:value="0.009445113">
                <text:p>0.00944511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68.316955566406">
                <text:p>468.316955566406</text:p>
              </table:table-cell>
              <table:table-cell office:value-type="float" office:value="-0.002075097">
                <text:p>-0.00207509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68.432037353516">
                <text:p>468.432037353516</text:p>
              </table:table-cell>
              <table:table-cell office:value-type="float" office:value="-0.004829294">
                <text:p>-0.00482929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68.547119140625">
                <text:p>468.547119140625</text:p>
              </table:table-cell>
              <table:table-cell office:value-type="float" office:value="-0.001596409">
                <text:p>-0.00159640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68.662200927734">
                <text:p>468.662200927734</text:p>
              </table:table-cell>
              <table:table-cell office:value-type="float" office:value="-0.009117946">
                <text:p>-0.00911794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68.777282714844">
                <text:p>468.777282714844</text:p>
              </table:table-cell>
              <table:table-cell office:value-type="float" office:value="-0.007334473">
                <text:p>-0.00733447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68.892395019531">
                <text:p>468.892395019531</text:p>
              </table:table-cell>
              <table:table-cell office:value-type="float" office:value="-0.006544612">
                <text:p>-0.00654461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69.007476806641">
                <text:p>469.007476806641</text:p>
              </table:table-cell>
              <table:table-cell office:value-type="float" office:value="0.02674441">
                <text:p>0.0267444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69.122589111328">
                <text:p>469.122589111328</text:p>
              </table:table-cell>
              <table:table-cell office:value-type="float" office:value="-0.002093723">
                <text:p>-0.00209372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69.237701416016">
                <text:p>469.237701416016</text:p>
              </table:table-cell>
              <table:table-cell office:value-type="float" office:value="0.004097568">
                <text:p>0.00409756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69.352813720703">
                <text:p>469.352813720703</text:p>
              </table:table-cell>
              <table:table-cell office:value-type="float" office:value="0.01017641">
                <text:p>0.0101764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69.467926025391">
                <text:p>469.467926025391</text:p>
              </table:table-cell>
              <table:table-cell office:value-type="float" office:value="0.009924205">
                <text:p>0.00992420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9.583068847656">
                <text:p>469.583068847656</text:p>
              </table:table-cell>
              <table:table-cell office:value-type="float" office:value="0.01006795">
                <text:p>0.0100679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69.698181152344">
                <text:p>469.698181152344</text:p>
              </table:table-cell>
              <table:table-cell office:value-type="float" office:value="0.0009832456">
                <text:p>0.000983245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69.813323974609">
                <text:p>469.813323974609</text:p>
              </table:table-cell>
              <table:table-cell office:value-type="float" office:value="-0.005408492">
                <text:p>-0.00540849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69.928436279297">
                <text:p>469.928436279297</text:p>
              </table:table-cell>
              <table:table-cell office:value-type="float" office:value="-0.003820343">
                <text:p>-0.00382034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70.043579101563">
                <text:p>470.043579101563</text:p>
              </table:table-cell>
              <table:table-cell office:value-type="float" office:value="0.004385715">
                <text:p>0.00438571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70.158721923828">
                <text:p>470.158721923828</text:p>
              </table:table-cell>
              <table:table-cell office:value-type="float" office:value="-0.01093782">
                <text:p>-0.0109378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70.273895263672">
                <text:p>470.273895263672</text:p>
              </table:table-cell>
              <table:table-cell office:value-type="float" office:value="0.004639161">
                <text:p>0.00463916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70.389038085938">
                <text:p>470.389038085938</text:p>
              </table:table-cell>
              <table:table-cell office:value-type="float" office:value="0.004150749">
                <text:p>0.00415074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70.504180908203">
                <text:p>470.504180908203</text:p>
              </table:table-cell>
              <table:table-cell office:value-type="float" office:value="-0.001622983">
                <text:p>-0.00162298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70.619354248047">
                <text:p>470.619354248047</text:p>
              </table:table-cell>
              <table:table-cell office:value-type="float" office:value="-0.01098119">
                <text:p>-0.0109811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70.734527587891">
                <text:p>470.734527587891</text:p>
              </table:table-cell>
              <table:table-cell office:value-type="float" office:value="0.01085339">
                <text:p>0.0108533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70.849700927734">
                <text:p>470.849700927734</text:p>
              </table:table-cell>
              <table:table-cell office:value-type="float" office:value="0.04700544">
                <text:p>0.0470054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70.964874267578">
                <text:p>470.964874267578</text:p>
              </table:table-cell>
              <table:table-cell office:value-type="float" office:value="0.0001717355">
                <text:p>0.000171735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71.080047607422">
                <text:p>471.080047607422</text:p>
              </table:table-cell>
              <table:table-cell office:value-type="float" office:value="0.01860991">
                <text:p>0.0186099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71.195220947266">
                <text:p>471.195220947266</text:p>
              </table:table-cell>
              <table:table-cell office:value-type="float" office:value="-0.01277706">
                <text:p>-0.0127770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71.310424804688">
                <text:p>471.310424804688</text:p>
              </table:table-cell>
              <table:table-cell office:value-type="float" office:value="0.007020331">
                <text:p>0.00702033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71.425628662109">
                <text:p>471.425628662109</text:p>
              </table:table-cell>
              <table:table-cell office:value-type="float" office:value="0.00407028">
                <text:p>0.0040702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71.540802001953">
                <text:p>471.540802001953</text:p>
              </table:table-cell>
              <table:table-cell office:value-type="float" office:value="0.01770499">
                <text:p>0.0177049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71.656005859375">
                <text:p>471.656005859375</text:p>
              </table:table-cell>
              <table:table-cell office:value-type="float" office:value="-0.001025477">
                <text:p>-0.00102547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71.771209716797">
                <text:p>471.771209716797</text:p>
              </table:table-cell>
              <table:table-cell office:value-type="float" office:value="0.02092136">
                <text:p>0.0209213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71.886444091797">
                <text:p>471.886444091797</text:p>
              </table:table-cell>
              <table:table-cell office:value-type="float" office:value="0.01493588">
                <text:p>0.0149358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72.001647949219">
                <text:p>472.001647949219</text:p>
              </table:table-cell>
              <table:table-cell office:value-type="float" office:value="0.006549847">
                <text:p>0.00654984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72.116882324219">
                <text:p>472.116882324219</text:p>
              </table:table-cell>
              <table:table-cell office:value-type="float" office:value="-0.009078314">
                <text:p>-0.00907831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72.232086181641">
                <text:p>472.232086181641</text:p>
              </table:table-cell>
              <table:table-cell office:value-type="float" office:value="0.001915764">
                <text:p>0.00191576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72.347320556641">
                <text:p>472.347320556641</text:p>
              </table:table-cell>
              <table:table-cell office:value-type="float" office:value="0.0009125199">
                <text:p>0.000912519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2.462554931641">
                <text:p>472.462554931641</text:p>
              </table:table-cell>
              <table:table-cell office:value-type="float" office:value="-0.01488446">
                <text:p>-0.0148844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72.577789306641">
                <text:p>472.577789306641</text:p>
              </table:table-cell>
              <table:table-cell office:value-type="float" office:value="-0.01066782">
                <text:p>-0.0106678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72.693023681641">
                <text:p>472.693023681641</text:p>
              </table:table-cell>
              <table:table-cell office:value-type="float" office:value="0.008920639">
                <text:p>0.00892063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72.808288574219">
                <text:p>472.808288574219</text:p>
              </table:table-cell>
              <table:table-cell office:value-type="float" office:value="-0.003144098">
                <text:p>-0.00314409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72.923522949219">
                <text:p>472.923522949219</text:p>
              </table:table-cell>
              <table:table-cell office:value-type="float" office:value="-0.008791257">
                <text:p>-0.00879125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73.038787841797">
                <text:p>473.038787841797</text:p>
              </table:table-cell>
              <table:table-cell office:value-type="float" office:value="-0.01321875">
                <text:p>-0.0132187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73.154052734375">
                <text:p>473.154052734375</text:p>
              </table:table-cell>
              <table:table-cell office:value-type="float" office:value="0.013468">
                <text:p>0.01346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73.269317626953">
                <text:p>473.269317626953</text:p>
              </table:table-cell>
              <table:table-cell office:value-type="float" office:value="0.005301207">
                <text:p>0.00530120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73.384582519531">
                <text:p>473.384582519531</text:p>
              </table:table-cell>
              <table:table-cell office:value-type="float" office:value="-0.006192872">
                <text:p>-0.00619287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73.499847412109">
                <text:p>473.499847412109</text:p>
              </table:table-cell>
              <table:table-cell office:value-type="float" office:value="-0.003019488">
                <text:p>-0.00301948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73.615112304688">
                <text:p>473.615112304688</text:p>
              </table:table-cell>
              <table:table-cell office:value-type="float" office:value="0.01599364">
                <text:p>0.0159936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73.730407714844">
                <text:p>473.730407714844</text:p>
              </table:table-cell>
              <table:table-cell office:value-type="float" office:value="0.02831179">
                <text:p>0.0283117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73.845703125">
                <text:p>473.845703125</text:p>
              </table:table-cell>
              <table:table-cell office:value-type="float" office:value="-0.005172161">
                <text:p>-0.00517216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73.960998535156">
                <text:p>473.960998535156</text:p>
              </table:table-cell>
              <table:table-cell office:value-type="float" office:value="0.003546416">
                <text:p>0.00354641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74.076263427734">
                <text:p>474.076263427734</text:p>
              </table:table-cell>
              <table:table-cell office:value-type="float" office:value="0.001114858">
                <text:p>0.00111485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74.191589355469">
                <text:p>474.191589355469</text:p>
              </table:table-cell>
              <table:table-cell office:value-type="float" office:value="0.01944345">
                <text:p>0.0194434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74.306884765625">
                <text:p>474.306884765625</text:p>
              </table:table-cell>
              <table:table-cell office:value-type="float" office:value="0.02434122">
                <text:p>0.0243412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74.422180175781">
                <text:p>474.422180175781</text:p>
              </table:table-cell>
              <table:table-cell office:value-type="float" office:value="-0.01358057">
                <text:p>-0.0135805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74.537506103516">
                <text:p>474.537506103516</text:p>
              </table:table-cell>
              <table:table-cell office:value-type="float" office:value="0.005457736">
                <text:p>0.00545773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74.652801513672">
                <text:p>474.652801513672</text:p>
              </table:table-cell>
              <table:table-cell office:value-type="float" office:value="-0.006220067">
                <text:p>-0.00622006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74.768127441406">
                <text:p>474.768127441406</text:p>
              </table:table-cell>
              <table:table-cell office:value-type="float" office:value="-0.009301093">
                <text:p>-0.00930109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74.883453369141">
                <text:p>474.883453369141</text:p>
              </table:table-cell>
              <table:table-cell office:value-type="float" office:value="-0.007500482">
                <text:p>-0.00750048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74.998779296875">
                <text:p>474.998779296875</text:p>
              </table:table-cell>
              <table:table-cell office:value-type="float" office:value="0.003373122">
                <text:p>0.00337312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75.114135742188">
                <text:p>475.114135742188</text:p>
              </table:table-cell>
              <table:table-cell office:value-type="float" office:value="-0.008148536">
                <text:p>-0.00814853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75.229461669922">
                <text:p>475.229461669922</text:p>
              </table:table-cell>
              <table:table-cell office:value-type="float" office:value="-0.006328131">
                <text:p>-0.00632813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75.344818115234">
                <text:p>475.344818115234</text:p>
              </table:table-cell>
              <table:table-cell office:value-type="float" office:value="0.00247927">
                <text:p>0.0024792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75.460144042969">
                <text:p>475.460144042969</text:p>
              </table:table-cell>
              <table:table-cell office:value-type="float" office:value="0.008286536">
                <text:p>0.00828653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75.575500488281">
                <text:p>475.575500488281</text:p>
              </table:table-cell>
              <table:table-cell office:value-type="float" office:value="0.001381881">
                <text:p>0.00138188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75.690856933594">
                <text:p>475.690856933594</text:p>
              </table:table-cell>
              <table:table-cell office:value-type="float" office:value="-0.0123324">
                <text:p>-0.012332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75.806213378906">
                <text:p>475.806213378906</text:p>
              </table:table-cell>
              <table:table-cell office:value-type="float" office:value="-0.01203565">
                <text:p>-0.0120356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75.921569824219">
                <text:p>475.921569824219</text:p>
              </table:table-cell>
              <table:table-cell office:value-type="float" office:value="0.0002232093">
                <text:p>0.000223209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76.036956787109">
                <text:p>476.036956787109</text:p>
              </table:table-cell>
              <table:table-cell office:value-type="float" office:value="0.007223069">
                <text:p>0.00722306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76.152313232422">
                <text:p>476.152313232422</text:p>
              </table:table-cell>
              <table:table-cell office:value-type="float" office:value="0.007234741">
                <text:p>0.00723474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76.267700195313">
                <text:p>476.267700195313</text:p>
              </table:table-cell>
              <table:table-cell office:value-type="float" office:value="-0.01314805">
                <text:p>-0.0131480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76.383087158203">
                <text:p>476.383087158203</text:p>
              </table:table-cell>
              <table:table-cell office:value-type="float" office:value="0.01431323">
                <text:p>0.0143132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76.498474121094">
                <text:p>476.498474121094</text:p>
              </table:table-cell>
              <table:table-cell office:value-type="float" office:value="-0.000537637">
                <text:p>-0.00053763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76.613861083984">
                <text:p>476.613861083984</text:p>
              </table:table-cell>
              <table:table-cell office:value-type="float" office:value="-0.009310451">
                <text:p>-0.00931045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76.729248046875">
                <text:p>476.729248046875</text:p>
              </table:table-cell>
              <table:table-cell office:value-type="float" office:value="-0.007110803">
                <text:p>-0.00711080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76.844665527344">
                <text:p>476.844665527344</text:p>
              </table:table-cell>
              <table:table-cell office:value-type="float" office:value="0.01630335">
                <text:p>0.0163033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76.960052490234">
                <text:p>476.960052490234</text:p>
              </table:table-cell>
              <table:table-cell office:value-type="float" office:value="0.0001425237">
                <text:p>0.000142523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77.075469970703">
                <text:p>477.075469970703</text:p>
              </table:table-cell>
              <table:table-cell office:value-type="float" office:value="-0.01398738">
                <text:p>-0.0139873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77.190887451172">
                <text:p>477.190887451172</text:p>
              </table:table-cell>
              <table:table-cell office:value-type="float" office:value="-0.008839277">
                <text:p>-0.00883927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77.306304931641">
                <text:p>477.306304931641</text:p>
              </table:table-cell>
              <table:table-cell office:value-type="float" office:value="0.01554193">
                <text:p>0.0155419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7.421722412109">
                <text:p>477.421722412109</text:p>
              </table:table-cell>
              <table:table-cell office:value-type="float" office:value="-0.01014441">
                <text:p>-0.0101444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77.537139892578">
                <text:p>477.537139892578</text:p>
              </table:table-cell>
              <table:table-cell office:value-type="float" office:value="-0.005522491">
                <text:p>-0.00552249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77.652557373047">
                <text:p>477.652557373047</text:p>
              </table:table-cell>
              <table:table-cell office:value-type="float" office:value="-0.0145372">
                <text:p>-0.014537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77.768005371094">
                <text:p>477.768005371094</text:p>
              </table:table-cell>
              <table:table-cell office:value-type="float" office:value="-0.007305073">
                <text:p>-0.00730507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77.883422851563">
                <text:p>477.883422851563</text:p>
              </table:table-cell>
              <table:table-cell office:value-type="float" office:value="0.01098556">
                <text:p>0.0109855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77.998870849609">
                <text:p>477.998870849609</text:p>
              </table:table-cell>
              <table:table-cell office:value-type="float" office:value="-0.014832">
                <text:p>-0.01483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78.114318847656">
                <text:p>478.114318847656</text:p>
              </table:table-cell>
              <table:table-cell office:value-type="float" office:value="-0.006005903">
                <text:p>-0.00600590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78.229766845703">
                <text:p>478.229766845703</text:p>
              </table:table-cell>
              <table:table-cell office:value-type="float" office:value="0.002605302">
                <text:p>0.00260530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78.345245361328">
                <text:p>478.345245361328</text:p>
              </table:table-cell>
              <table:table-cell office:value-type="float" office:value="-0.0004573523">
                <text:p>-0.000457352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78.460693359375">
                <text:p>478.460693359375</text:p>
              </table:table-cell>
              <table:table-cell office:value-type="float" office:value="-0.0125866">
                <text:p>-0.012586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78.576141357422">
                <text:p>478.576141357422</text:p>
              </table:table-cell>
              <table:table-cell office:value-type="float" office:value="-0.007227086">
                <text:p>-0.00722708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8.691619873047">
                <text:p>478.691619873047</text:p>
              </table:table-cell>
              <table:table-cell office:value-type="float" office:value="0.01191122">
                <text:p>0.0119112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78.807098388672">
                <text:p>478.807098388672</text:p>
              </table:table-cell>
              <table:table-cell office:value-type="float" office:value="-0.003663219">
                <text:p>-0.00366321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78.922576904297">
                <text:p>478.922576904297</text:p>
              </table:table-cell>
              <table:table-cell office:value-type="float" office:value="-0.004471757">
                <text:p>-0.00447175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79.038055419922">
                <text:p>479.038055419922</text:p>
              </table:table-cell>
              <table:table-cell office:value-type="float" office:value="-0.01351732">
                <text:p>-0.0135173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9.153533935547">
                <text:p>479.153533935547</text:p>
              </table:table-cell>
              <table:table-cell office:value-type="float" office:value="-0.003368617">
                <text:p>-0.00336861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79.269012451172">
                <text:p>479.269012451172</text:p>
              </table:table-cell>
              <table:table-cell office:value-type="float" office:value="0.02043848">
                <text:p>0.0204384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9.384521484375">
                <text:p>479.384521484375</text:p>
              </table:table-cell>
              <table:table-cell office:value-type="float" office:value="-0.01019852">
                <text:p>-0.0101985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9.500030517578">
                <text:p>479.500030517578</text:p>
              </table:table-cell>
              <table:table-cell office:value-type="float" office:value="-0.007718422">
                <text:p>-0.00771842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9.615509033203">
                <text:p>479.615509033203</text:p>
              </table:table-cell>
              <table:table-cell office:value-type="float" office:value="0.0007460095">
                <text:p>0.000746009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9.731018066406">
                <text:p>479.731018066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9.846527099609">
                <text:p>479.846527099609</text:p>
              </table:table-cell>
              <table:table-cell office:value-type="float" office:value="-0.006968995">
                <text:p>-0.00696899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9.962066650391">
                <text:p>479.962066650391</text:p>
              </table:table-cell>
              <table:table-cell office:value-type="float" office:value="-0.003914508">
                <text:p>-0.00391450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80.077575683594">
                <text:p>480.077575683594</text:p>
              </table:table-cell>
              <table:table-cell office:value-type="float" office:value="0.002132366">
                <text:p>0.00213236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80.193084716797">
                <text:p>480.193084716797</text:p>
              </table:table-cell>
              <table:table-cell office:value-type="float" office:value="0.01409133">
                <text:p>0.0140913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80.308624267578">
                <text:p>480.308624267578</text:p>
              </table:table-cell>
              <table:table-cell office:value-type="float" office:value="-0.005874654">
                <text:p>-0.00587465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80.424163818359">
                <text:p>480.424163818359</text:p>
              </table:table-cell>
              <table:table-cell office:value-type="float" office:value="-0.005418096">
                <text:p>-0.00541809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80.539703369141">
                <text:p>480.539703369141</text:p>
              </table:table-cell>
              <table:table-cell office:value-type="float" office:value="0.00687116">
                <text:p>0.0068711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80.655242919922">
                <text:p>480.655242919922</text:p>
              </table:table-cell>
              <table:table-cell office:value-type="float" office:value="-0.005298869">
                <text:p>-0.00529886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80.770782470703">
                <text:p>480.770782470703</text:p>
              </table:table-cell>
              <table:table-cell office:value-type="float" office:value="-0.01068609">
                <text:p>-0.0106860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80.886322021484">
                <text:p>480.886322021484</text:p>
              </table:table-cell>
              <table:table-cell office:value-type="float" office:value="-0.006939617">
                <text:p>-0.00693961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81.001892089844">
                <text:p>481.00189208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81.117431640625">
                <text:p>481.117431640625</text:p>
              </table:table-cell>
              <table:table-cell office:value-type="float" office:value="0.002355871">
                <text:p>0.00235587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81.233001708984">
                <text:p>481.233001708984</text:p>
              </table:table-cell>
              <table:table-cell office:value-type="float" office:value="0.003308662">
                <text:p>0.00330866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81.348571777344">
                <text:p>481.348571777344</text:p>
              </table:table-cell>
              <table:table-cell office:value-type="float" office:value="-0.01233161">
                <text:p>-0.0123316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81.464141845703">
                <text:p>481.464141845703</text:p>
              </table:table-cell>
              <table:table-cell office:value-type="float" office:value="-0.006598832">
                <text:p>-0.00659883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81.579711914063">
                <text:p>481.579711914063</text:p>
              </table:table-cell>
              <table:table-cell office:value-type="float" office:value="0.002431951">
                <text:p>0.00243195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81.695281982422">
                <text:p>481.695281982422</text:p>
              </table:table-cell>
              <table:table-cell office:value-type="float" office:value="-0.01214845">
                <text:p>-0.0121484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81.810882568359">
                <text:p>481.810882568359</text:p>
              </table:table-cell>
              <table:table-cell office:value-type="float" office:value="-0.006336372">
                <text:p>-0.00633637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81.926452636719">
                <text:p>481.926452636719</text:p>
              </table:table-cell>
              <table:table-cell office:value-type="float" office:value="-0.004824763">
                <text:p>-0.00482476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82.042053222656">
                <text:p>482.042053222656</text:p>
              </table:table-cell>
              <table:table-cell office:value-type="float" office:value="0.01541635">
                <text:p>0.0154163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82.157653808594">
                <text:p>482.157653808594</text:p>
              </table:table-cell>
              <table:table-cell office:value-type="float" office:value="-0.009674442">
                <text:p>-0.00967444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82.273254394531">
                <text:p>482.273254394531</text:p>
              </table:table-cell>
              <table:table-cell office:value-type="float" office:value="-0.003631017">
                <text:p>-0.00363101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82.388854980469">
                <text:p>482.388854980469</text:p>
              </table:table-cell>
              <table:table-cell office:value-type="float" office:value="0.01181422">
                <text:p>0.0118142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82.504455566406">
                <text:p>482.504455566406</text:p>
              </table:table-cell>
              <table:table-cell office:value-type="float" office:value="0.0171579">
                <text:p>0.017157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2.620086669922">
                <text:p>482.620086669922</text:p>
              </table:table-cell>
              <table:table-cell office:value-type="float" office:value="-0.007913311">
                <text:p>-0.00791331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82.735687255859">
                <text:p>482.735687255859</text:p>
              </table:table-cell>
              <table:table-cell office:value-type="float" office:value="0.003150596">
                <text:p>0.00315059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82.851318359375">
                <text:p>482.851318359375</text:p>
              </table:table-cell>
              <table:table-cell office:value-type="float" office:value="-0.006757909">
                <text:p>-0.00675790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82.966949462891">
                <text:p>482.966949462891</text:p>
              </table:table-cell>
              <table:table-cell office:value-type="float" office:value="0.008345108">
                <text:p>0.00834510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83.082580566406">
                <text:p>483.082580566406</text:p>
              </table:table-cell>
              <table:table-cell office:value-type="float" office:value="-0.01677114">
                <text:p>-0.0167711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83.198211669922">
                <text:p>483.198211669922</text:p>
              </table:table-cell>
              <table:table-cell office:value-type="float" office:value="-0.0003063315">
                <text:p>-0.000306331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3.313842773438">
                <text:p>483.313842773438</text:p>
              </table:table-cell>
              <table:table-cell office:value-type="float" office:value="0.0035762">
                <text:p>0.003576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83.429473876953">
                <text:p>483.429473876953</text:p>
              </table:table-cell>
              <table:table-cell office:value-type="float" office:value="0.008823774">
                <text:p>0.00882377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83.545135498047">
                <text:p>483.545135498047</text:p>
              </table:table-cell>
              <table:table-cell office:value-type="float" office:value="-0.002774828">
                <text:p>-0.00277482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83.660797119141">
                <text:p>483.660797119141</text:p>
              </table:table-cell>
              <table:table-cell office:value-type="float" office:value="-0.01007504">
                <text:p>-0.0100750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83.776428222656">
                <text:p>483.776428222656</text:p>
              </table:table-cell>
              <table:table-cell office:value-type="float" office:value="0.0003553198">
                <text:p>0.000355319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83.89208984375">
                <text:p>483.89208984375</text:p>
              </table:table-cell>
              <table:table-cell office:value-type="float" office:value="0.01663383">
                <text:p>0.0166338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84.007751464844">
                <text:p>484.007751464844</text:p>
              </table:table-cell>
              <table:table-cell office:value-type="float" office:value="-0.01300651">
                <text:p>-0.0130065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84.123413085938">
                <text:p>484.123413085938</text:p>
              </table:table-cell>
              <table:table-cell office:value-type="float" office:value="-0.016959">
                <text:p>-0.01695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84.239105224609">
                <text:p>484.239105224609</text:p>
              </table:table-cell>
              <table:table-cell office:value-type="float" office:value="0.00723066">
                <text:p>0.0072306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84.354766845703">
                <text:p>484.354766845703</text:p>
              </table:table-cell>
              <table:table-cell office:value-type="float" office:value="-0.001662057">
                <text:p>-0.00166205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84.470458984375">
                <text:p>484.470458984375</text:p>
              </table:table-cell>
              <table:table-cell office:value-type="float" office:value="-0.003240514">
                <text:p>-0.00324051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84.586151123047">
                <text:p>484.586151123047</text:p>
              </table:table-cell>
              <table:table-cell office:value-type="float" office:value="-0.01160383">
                <text:p>-0.0116038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84.701843261719">
                <text:p>484.701843261719</text:p>
              </table:table-cell>
              <table:table-cell office:value-type="float" office:value="-0.003168136">
                <text:p>-0.00316813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84.817535400391">
                <text:p>484.817535400391</text:p>
              </table:table-cell>
              <table:table-cell office:value-type="float" office:value="0.002727364">
                <text:p>0.00272736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84.933227539063">
                <text:p>484.933227539063</text:p>
              </table:table-cell>
              <table:table-cell office:value-type="float" office:value="-0.01444776">
                <text:p>-0.0144477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5.048919677734">
                <text:p>485.048919677734</text:p>
              </table:table-cell>
              <table:table-cell office:value-type="float" office:value="-0.005723515">
                <text:p>-0.00572351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85.164642333984">
                <text:p>485.164642333984</text:p>
              </table:table-cell>
              <table:table-cell office:value-type="float" office:value="0.01245886">
                <text:p>0.0124588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85.280334472656">
                <text:p>485.280334472656</text:p>
              </table:table-cell>
              <table:table-cell office:value-type="float" office:value="0.0005198076">
                <text:p>0.000519807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85.396057128906">
                <text:p>485.396057128906</text:p>
              </table:table-cell>
              <table:table-cell office:value-type="float" office:value="0.007012591">
                <text:p>0.00701259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85.511779785156">
                <text:p>485.511779785156</text:p>
              </table:table-cell>
              <table:table-cell office:value-type="float" office:value="-0.009220621">
                <text:p>-0.00922062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85.627502441406">
                <text:p>485.627502441406</text:p>
              </table:table-cell>
              <table:table-cell office:value-type="float" office:value="-0.00248566">
                <text:p>-0.0024856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5.743225097656">
                <text:p>485.743225097656</text:p>
              </table:table-cell>
              <table:table-cell office:value-type="float" office:value="0.02403817">
                <text:p>0.0240381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5.858947753906">
                <text:p>485.858947753906</text:p>
              </table:table-cell>
              <table:table-cell office:value-type="float" office:value="-0.01406838">
                <text:p>-0.0140683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5.974670410156">
                <text:p>485.974670410156</text:p>
              </table:table-cell>
              <table:table-cell office:value-type="float" office:value="-0.01017505">
                <text:p>-0.0101750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86.090423583984">
                <text:p>486.090423583984</text:p>
              </table:table-cell>
              <table:table-cell office:value-type="float" office:value="0.02154953">
                <text:p>0.0215495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86.206176757813">
                <text:p>486.206176757813</text:p>
              </table:table-cell>
              <table:table-cell office:value-type="float" office:value="-0.0003237892">
                <text:p>-0.000323789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86.321899414063">
                <text:p>486.321899414063</text:p>
              </table:table-cell>
              <table:table-cell office:value-type="float" office:value="-0.003180381">
                <text:p>-0.00318038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86.437652587891">
                <text:p>486.437652587891</text:p>
              </table:table-cell>
              <table:table-cell office:value-type="float" office:value="-0.002841842">
                <text:p>-0.00284184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86.553436279297">
                <text:p>486.553436279297</text:p>
              </table:table-cell>
              <table:table-cell office:value-type="float" office:value="0.004914837">
                <text:p>0.00491483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86.669189453125">
                <text:p>486.669189453125</text:p>
              </table:table-cell>
              <table:table-cell office:value-type="float" office:value="0.001081741">
                <text:p>0.00108174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86.784942626953">
                <text:p>486.784942626953</text:p>
              </table:table-cell>
              <table:table-cell office:value-type="float" office:value="0.0009639786">
                <text:p>0.000963978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86.900726318359">
                <text:p>486.900726318359</text:p>
              </table:table-cell>
              <table:table-cell office:value-type="float" office:value="-0.005757764">
                <text:p>-0.00575776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87.016479492188">
                <text:p>487.016479492188</text:p>
              </table:table-cell>
              <table:table-cell office:value-type="float" office:value="0.008839148">
                <text:p>0.00883914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87.132263183594">
                <text:p>487.132263183594</text:p>
              </table:table-cell>
              <table:table-cell office:value-type="float" office:value="-0.00436921">
                <text:p>-0.0043692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87.248046875">
                <text:p>487.248046875</text:p>
              </table:table-cell>
              <table:table-cell office:value-type="float" office:value="0.01132824">
                <text:p>0.0113282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87.363830566406">
                <text:p>487.363830566406</text:p>
              </table:table-cell>
              <table:table-cell office:value-type="float" office:value="0.001790806">
                <text:p>0.00179080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87.479614257813">
                <text:p>487.479614257813</text:p>
              </table:table-cell>
              <table:table-cell office:value-type="float" office:value="0.006525805">
                <text:p>0.00652580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87.595397949219">
                <text:p>487.595397949219</text:p>
              </table:table-cell>
              <table:table-cell office:value-type="float" office:value="0.005453199">
                <text:p>0.00545319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87.711212158203">
                <text:p>487.711212158203</text:p>
              </table:table-cell>
              <table:table-cell office:value-type="float" office:value="0.006696247">
                <text:p>0.00669624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7.826995849609">
                <text:p>487.826995849609</text:p>
              </table:table-cell>
              <table:table-cell office:value-type="float" office:value="-0.01106904">
                <text:p>-0.0110690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87.942810058594">
                <text:p>487.942810058594</text:p>
              </table:table-cell>
              <table:table-cell office:value-type="float" office:value="0.002779583">
                <text:p>0.00277958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88.058624267578">
                <text:p>488.058624267578</text:p>
              </table:table-cell>
              <table:table-cell office:value-type="float" office:value="0.01766282">
                <text:p>0.0176628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88.174438476563">
                <text:p>488.174438476563</text:p>
              </table:table-cell>
              <table:table-cell office:value-type="float" office:value="-0.005955565">
                <text:p>-0.00595556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88.290252685547">
                <text:p>488.290252685547</text:p>
              </table:table-cell>
              <table:table-cell office:value-type="float" office:value="-0.01355785">
                <text:p>-0.0135578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88.406066894531">
                <text:p>488.406066894531</text:p>
              </table:table-cell>
              <table:table-cell office:value-type="float" office:value="0.00623505">
                <text:p>0.0062350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88.521911621094">
                <text:p>488.521911621094</text:p>
              </table:table-cell>
              <table:table-cell office:value-type="float" office:value="-0.004320828">
                <text:p>-0.004320828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88.637725830078">
                <text:p>488.637725830078</text:p>
              </table:table-cell>
              <table:table-cell office:value-type="float" office:value="-0.01348983">
                <text:p>-0.0134898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88.753570556641">
                <text:p>488.753570556641</text:p>
              </table:table-cell>
              <table:table-cell office:value-type="float" office:value="-0.01388585">
                <text:p>-0.0138858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88.869415283203">
                <text:p>488.869415283203</text:p>
              </table:table-cell>
              <table:table-cell office:value-type="float" office:value="0.006126929">
                <text:p>0.00612692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88.985260009766">
                <text:p>488.985260009766</text:p>
              </table:table-cell>
              <table:table-cell office:value-type="float" office:value="-0.004963549">
                <text:p>-0.00496354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89.101104736328">
                <text:p>489.101104736328</text:p>
              </table:table-cell>
              <table:table-cell office:value-type="float" office:value="-0.001483179">
                <text:p>-0.00148317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89.216949462891">
                <text:p>489.216949462891</text:p>
              </table:table-cell>
              <table:table-cell office:value-type="float" office:value="-0.009519309">
                <text:p>-0.00951930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89.332794189453">
                <text:p>489.332794189453</text:p>
              </table:table-cell>
              <table:table-cell office:value-type="float" office:value="0.003213414">
                <text:p>0.00321341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89.448669433594">
                <text:p>489.448669433594</text:p>
              </table:table-cell>
              <table:table-cell office:value-type="float" office:value="0.003330402">
                <text:p>0.00333040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89.564544677734">
                <text:p>489.564544677734</text:p>
              </table:table-cell>
              <table:table-cell office:value-type="float" office:value="-0.01640008">
                <text:p>-0.0164000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89.680389404297">
                <text:p>489.680389404297</text:p>
              </table:table-cell>
              <table:table-cell office:value-type="float" office:value="-0.007217969">
                <text:p>-0.00721796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89.796264648438">
                <text:p>489.796264648438</text:p>
              </table:table-cell>
              <table:table-cell office:value-type="float" office:value="0.00668554">
                <text:p>0.0066855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89.912139892578">
                <text:p>489.912139892578</text:p>
              </table:table-cell>
              <table:table-cell office:value-type="float" office:value="-0.00206706">
                <text:p>-0.0020670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90.028015136719">
                <text:p>490.028015136719</text:p>
              </table:table-cell>
              <table:table-cell office:value-type="float" office:value="-0.01288599">
                <text:p>-0.0128859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90.143920898438">
                <text:p>490.143920898438</text:p>
              </table:table-cell>
              <table:table-cell office:value-type="float" office:value="0.01238907">
                <text:p>0.0123890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90.259796142578">
                <text:p>490.259796142578</text:p>
              </table:table-cell>
              <table:table-cell office:value-type="float" office:value="0.00437485">
                <text:p>0.0043748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90.375701904297">
                <text:p>490.375701904297</text:p>
              </table:table-cell>
              <table:table-cell office:value-type="float" office:value="-0.01456029">
                <text:p>-0.0145602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90.491577148438">
                <text:p>490.491577148438</text:p>
              </table:table-cell>
              <table:table-cell office:value-type="float" office:value="-0.002152127">
                <text:p>-0.00215212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90.607482910156">
                <text:p>490.607482910156</text:p>
              </table:table-cell>
              <table:table-cell office:value-type="float" office:value="-0.006584866">
                <text:p>-0.00658486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90.723388671875">
                <text:p>490.723388671875</text:p>
              </table:table-cell>
              <table:table-cell office:value-type="float" office:value="0.008904665">
                <text:p>0.00890466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90.839294433594">
                <text:p>490.839294433594</text:p>
              </table:table-cell>
              <table:table-cell office:value-type="float" office:value="-0.0002943049">
                <text:p>-0.000294304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90.955200195313">
                <text:p>490.955200195313</text:p>
              </table:table-cell>
              <table:table-cell office:value-type="float" office:value="-0.00389745">
                <text:p>-0.0038974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91.071136474609">
                <text:p>491.071136474609</text:p>
              </table:table-cell>
              <table:table-cell office:value-type="float" office:value="-0.0001633082">
                <text:p>-0.000163308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91.187042236328">
                <text:p>491.187042236328</text:p>
              </table:table-cell>
              <table:table-cell office:value-type="float" office:value="0.01036872">
                <text:p>0.0103687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91.302978515625">
                <text:p>491.302978515625</text:p>
              </table:table-cell>
              <table:table-cell office:value-type="float" office:value="-0.004604492">
                <text:p>-0.00460449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91.418914794922">
                <text:p>491.418914794922</text:p>
              </table:table-cell>
              <table:table-cell office:value-type="float" office:value="-0.01114542">
                <text:p>-0.0111454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91.534851074219">
                <text:p>491.534851074219</text:p>
              </table:table-cell>
              <table:table-cell office:value-type="float" office:value="0.008803161">
                <text:p>0.00880316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91.650787353516">
                <text:p>491.650787353516</text:p>
              </table:table-cell>
              <table:table-cell office:value-type="float" office:value="-0.00101338">
                <text:p>-0.0010133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91.766723632813">
                <text:p>491.766723632813</text:p>
              </table:table-cell>
              <table:table-cell office:value-type="float" office:value="-0.004696397">
                <text:p>-0.00469639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91.882659912109">
                <text:p>491.882659912109</text:p>
              </table:table-cell>
              <table:table-cell office:value-type="float" office:value="-0.01362575">
                <text:p>-0.0136257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91.998596191406">
                <text:p>491.998596191406</text:p>
              </table:table-cell>
              <table:table-cell office:value-type="float" office:value="0.002890135">
                <text:p>0.00289013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92.114562988281">
                <text:p>492.114562988281</text:p>
              </table:table-cell>
              <table:table-cell office:value-type="float" office:value="0.002816279">
                <text:p>0.00281627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92.230529785156">
                <text:p>492.230529785156</text:p>
              </table:table-cell>
              <table:table-cell office:value-type="float" office:value="-0.013854">
                <text:p>-0.01385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92.346496582031">
                <text:p>492.346496582031</text:p>
              </table:table-cell>
              <table:table-cell office:value-type="float" office:value="0.001675088">
                <text:p>0.00167508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92.462463378906">
                <text:p>492.462463378906</text:p>
              </table:table-cell>
              <table:table-cell office:value-type="float" office:value="0.0007134796">
                <text:p>0.000713479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92.578430175781">
                <text:p>492.578430175781</text:p>
              </table:table-cell>
              <table:table-cell office:value-type="float" office:value="0.001330239">
                <text:p>0.00133023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92.694396972656">
                <text:p>492.694396972656</text:p>
              </table:table-cell>
              <table:table-cell office:value-type="float" office:value="-0.006001437">
                <text:p>-0.006001437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92.810363769531">
                <text:p>492.810363769531</text:p>
              </table:table-cell>
              <table:table-cell office:value-type="float" office:value="-0.009906977">
                <text:p>-0.00990697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92.926361083984">
                <text:p>492.926361083984</text:p>
              </table:table-cell>
              <table:table-cell office:value-type="float" office:value="0.01041726">
                <text:p>0.0104172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93.042327880859">
                <text:p>493.042327880859</text:p>
              </table:table-cell>
              <table:table-cell office:value-type="float" office:value="-0.006458838">
                <text:p>-0.00645883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93.158325195313">
                <text:p>493.158325195313</text:p>
              </table:table-cell>
              <table:table-cell office:value-type="float" office:value="-0.009035162">
                <text:p>-0.00903516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93.274322509766">
                <text:p>493.274322509766</text:p>
              </table:table-cell>
              <table:table-cell office:value-type="float" office:value="-0.0005673094">
                <text:p>-0.000567309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93.390319824219">
                <text:p>493.390319824219</text:p>
              </table:table-cell>
              <table:table-cell office:value-type="float" office:value="0.01138209">
                <text:p>0.0113820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93.506317138672">
                <text:p>493.506317138672</text:p>
              </table:table-cell>
              <table:table-cell office:value-type="float" office:value="0.003218196">
                <text:p>0.00321819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93.622344970703">
                <text:p>493.622344970703</text:p>
              </table:table-cell>
              <table:table-cell office:value-type="float" office:value="-0.0004081805">
                <text:p>-0.000408180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93.738342285156">
                <text:p>493.738342285156</text:p>
              </table:table-cell>
              <table:table-cell office:value-type="float" office:value="-0.01304444">
                <text:p>-0.0130444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93.854370117188">
                <text:p>493.854370117188</text:p>
              </table:table-cell>
              <table:table-cell office:value-type="float" office:value="-0.006157529">
                <text:p>-0.00615752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93.970367431641">
                <text:p>493.970367431641</text:p>
              </table:table-cell>
              <table:table-cell office:value-type="float" office:value="0.004896412">
                <text:p>0.00489641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94.086395263672">
                <text:p>494.086395263672</text:p>
              </table:table-cell>
              <table:table-cell office:value-type="float" office:value="0.0008043814">
                <text:p>0.000804381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94.202423095703">
                <text:p>494.202423095703</text:p>
              </table:table-cell>
              <table:table-cell office:value-type="float" office:value="-0.001251537">
                <text:p>-0.00125153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94.318450927734">
                <text:p>494.318450927734</text:p>
              </table:table-cell>
              <table:table-cell office:value-type="float" office:value="-0.006362307">
                <text:p>-0.00636230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94.434478759766">
                <text:p>494.434478759766</text:p>
              </table:table-cell>
              <table:table-cell office:value-type="float" office:value="-0.003275767">
                <text:p>-0.00327576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94.550537109375">
                <text:p>494.550537109375</text:p>
              </table:table-cell>
              <table:table-cell office:value-type="float" office:value="-0.007442995">
                <text:p>-0.00744299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94.666564941406">
                <text:p>494.666564941406</text:p>
              </table:table-cell>
              <table:table-cell office:value-type="float" office:value="-0.006560253">
                <text:p>-0.00656025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94.782623291016">
                <text:p>494.782623291016</text:p>
              </table:table-cell>
              <table:table-cell office:value-type="float" office:value="-0.0035343">
                <text:p>-0.0035343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94.898681640625">
                <text:p>494.898681640625</text:p>
              </table:table-cell>
              <table:table-cell office:value-type="float" office:value="0.005796911">
                <text:p>0.00579691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95.014739990234">
                <text:p>495.014739990234</text:p>
              </table:table-cell>
              <table:table-cell office:value-type="float" office:value="-0.01328989">
                <text:p>-0.0132898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95.130798339844">
                <text:p>495.130798339844</text:p>
              </table:table-cell>
              <table:table-cell office:value-type="float" office:value="-0.01129866">
                <text:p>-0.0112986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95.246856689453">
                <text:p>495.246856689453</text:p>
              </table:table-cell>
              <table:table-cell office:value-type="float" office:value="0.002499581">
                <text:p>0.00249958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95.362915039063">
                <text:p>495.362915039063</text:p>
              </table:table-cell>
              <table:table-cell office:value-type="float" office:value="0.007860742">
                <text:p>0.00786074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95.478973388672">
                <text:p>495.478973388672</text:p>
              </table:table-cell>
              <table:table-cell office:value-type="float" office:value="-0.01322999">
                <text:p>-0.0132299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95.595062255859">
                <text:p>495.595062255859</text:p>
              </table:table-cell>
              <table:table-cell office:value-type="float" office:value="0.0049194">
                <text:p>0.004919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95.711151123047">
                <text:p>495.711151123047</text:p>
              </table:table-cell>
              <table:table-cell office:value-type="float" office:value="-0.005267375">
                <text:p>-0.00526737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95.827209472656">
                <text:p>495.827209472656</text:p>
              </table:table-cell>
              <table:table-cell office:value-type="float" office:value="0.02656195">
                <text:p>0.0265619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95.943298339844">
                <text:p>495.943298339844</text:p>
              </table:table-cell>
              <table:table-cell office:value-type="float" office:value="-0.00191252">
                <text:p>-0.0019125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96.059387207031">
                <text:p>496.059387207031</text:p>
              </table:table-cell>
              <table:table-cell office:value-type="float" office:value="0.009730031">
                <text:p>0.00973003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96.175506591797">
                <text:p>496.175506591797</text:p>
              </table:table-cell>
              <table:table-cell office:value-type="float" office:value="-0.006348785">
                <text:p>-0.00634878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96.291595458984">
                <text:p>496.291595458984</text:p>
              </table:table-cell>
              <table:table-cell office:value-type="float" office:value="-0.008616895">
                <text:p>-0.00861689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96.407684326172">
                <text:p>496.407684326172</text:p>
              </table:table-cell>
              <table:table-cell office:value-type="float" office:value="0.01277307">
                <text:p>0.0127730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96.523803710938">
                <text:p>496.523803710938</text:p>
              </table:table-cell>
              <table:table-cell office:value-type="float" office:value="-0.0117861">
                <text:p>-0.011786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96.639923095703">
                <text:p>496.639923095703</text:p>
              </table:table-cell>
              <table:table-cell office:value-type="float" office:value="0.007484854">
                <text:p>0.00748485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96.756042480469">
                <text:p>496.756042480469</text:p>
              </table:table-cell>
              <table:table-cell office:value-type="float" office:value="0.003761949">
                <text:p>0.00376194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96.872161865234">
                <text:p>496.872161865234</text:p>
              </table:table-cell>
              <table:table-cell office:value-type="float" office:value="-0.004947297">
                <text:p>-0.00494729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96.98828125">
                <text:p>496.98828125</text:p>
              </table:table-cell>
              <table:table-cell office:value-type="float" office:value="0.001892641">
                <text:p>0.00189264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97.104400634766">
                <text:p>497.104400634766</text:p>
              </table:table-cell>
              <table:table-cell office:value-type="float" office:value="0.02229134">
                <text:p>0.0222913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97.220520019531">
                <text:p>497.220520019531</text:p>
              </table:table-cell>
              <table:table-cell office:value-type="float" office:value="0.00295228">
                <text:p>0.00295228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97.336669921875">
                <text:p>497.336669921875</text:p>
              </table:table-cell>
              <table:table-cell office:value-type="float" office:value="-0.002607804">
                <text:p>-0.00260780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97.452819824219">
                <text:p>497.452819824219</text:p>
              </table:table-cell>
              <table:table-cell office:value-type="float" office:value="-0.01046004">
                <text:p>-0.0104600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97.568939208984">
                <text:p>497.568939208984</text:p>
              </table:table-cell>
              <table:table-cell office:value-type="float" office:value="0.004571742">
                <text:p>0.00457174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97.685089111328">
                <text:p>497.685089111328</text:p>
              </table:table-cell>
              <table:table-cell office:value-type="float" office:value="0.006029246">
                <text:p>0.00602924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97.801239013672">
                <text:p>497.801239013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97.917388916016">
                <text:p>497.917388916016</text:p>
              </table:table-cell>
              <table:table-cell office:value-type="float" office:value="-0.01238566">
                <text:p>-0.0123856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98.033569335938">
                <text:p>498.033569335938</text:p>
              </table:table-cell>
              <table:table-cell office:value-type="float" office:value="0.006680499">
                <text:p>0.00668049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98.149719238281">
                <text:p>498.149719238281</text:p>
              </table:table-cell>
              <table:table-cell office:value-type="float" office:value="0.01684307">
                <text:p>0.0168430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98.265899658203">
                <text:p>498.265899658203</text:p>
              </table:table-cell>
              <table:table-cell office:value-type="float" office:value="-0.005454245">
                <text:p>-0.00545424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98.382049560547">
                <text:p>498.382049560547</text:p>
              </table:table-cell>
              <table:table-cell office:value-type="float" office:value="-0.002109778">
                <text:p>-0.00210977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98.498229980469">
                <text:p>498.498229980469</text:p>
              </table:table-cell>
              <table:table-cell office:value-type="float" office:value="0.01395449">
                <text:p>0.01395449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98.614410400391">
                <text:p>498.614410400391</text:p>
              </table:table-cell>
              <table:table-cell office:value-type="float" office:value="-0.001969684">
                <text:p>-0.00196968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98.730590820313">
                <text:p>498.730590820313</text:p>
              </table:table-cell>
              <table:table-cell office:value-type="float" office:value="0.00325393">
                <text:p>0.0032539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98.846771240234">
                <text:p>498.846771240234</text:p>
              </table:table-cell>
              <table:table-cell office:value-type="float" office:value="-0.01445474">
                <text:p>-0.0144547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98.962982177734">
                <text:p>498.962982177734</text:p>
              </table:table-cell>
              <table:table-cell office:value-type="float" office:value="0.002488129">
                <text:p>0.00248812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99.079162597656">
                <text:p>499.079162597656</text:p>
              </table:table-cell>
              <table:table-cell office:value-type="float" office:value="0.02832491">
                <text:p>0.0283249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99.195373535156">
                <text:p>499.195373535156</text:p>
              </table:table-cell>
              <table:table-cell office:value-type="float" office:value="-0.007972355">
                <text:p>-0.00797235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99.311584472656">
                <text:p>499.311584472656</text:p>
              </table:table-cell>
              <table:table-cell office:value-type="float" office:value="-0.007059221">
                <text:p>-0.00705922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99.427764892578">
                <text:p>499.427764892578</text:p>
              </table:table-cell>
              <table:table-cell office:value-type="float" office:value="0.007849097">
                <text:p>0.00784909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99.543975830078">
                <text:p>499.543975830078</text:p>
              </table:table-cell>
              <table:table-cell office:value-type="float" office:value="-0.002938297">
                <text:p>-0.00293829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99.660217285156">
                <text:p>499.660217285156</text:p>
              </table:table-cell>
              <table:table-cell office:value-type="float" office:value="-0.008298847">
                <text:p>-0.00829884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99.776428222656">
                <text:p>499.776428222656</text:p>
              </table:table-cell>
              <table:table-cell office:value-type="float" office:value="-0.01472455">
                <text:p>-0.0147245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99.892639160156">
                <text:p>499.892639160156</text:p>
              </table:table-cell>
              <table:table-cell office:value-type="float" office:value="-0.0001862058">
                <text:p>-0.000186205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00.008880615234">
                <text:p>500.008880615234</text:p>
              </table:table-cell>
              <table:table-cell office:value-type="float" office:value="0.0276541">
                <text:p>0.027654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00.125091552734">
                <text:p>500.125091552734</text:p>
              </table:table-cell>
              <table:table-cell office:value-type="float" office:value="-0.003372723">
                <text:p>-0.00337272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00.241333007813">
                <text:p>500.241333007813</text:p>
              </table:table-cell>
              <table:table-cell office:value-type="float" office:value="0.002341582">
                <text:p>0.00234158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00.357574462891">
                <text:p>500.357574462891</text:p>
              </table:table-cell>
              <table:table-cell office:value-type="float" office:value="0.001847253">
                <text:p>0.00184725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00.473815917969">
                <text:p>500.473815917969</text:p>
              </table:table-cell>
              <table:table-cell office:value-type="float" office:value="-0.0004276809">
                <text:p>-0.000427680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00.590057373047">
                <text:p>500.590057373047</text:p>
              </table:table-cell>
              <table:table-cell office:value-type="float" office:value="-0.01098058">
                <text:p>-0.0109805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00.706298828125">
                <text:p>500.706298828125</text:p>
              </table:table-cell>
              <table:table-cell office:value-type="float" office:value="-0.01275515">
                <text:p>-0.0127551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00.822570800781">
                <text:p>500.822570800781</text:p>
              </table:table-cell>
              <table:table-cell office:value-type="float" office:value="-0.001532071">
                <text:p>-0.00153207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00.938812255859">
                <text:p>500.938812255859</text:p>
              </table:table-cell>
              <table:table-cell office:value-type="float" office:value="0.001038569">
                <text:p>0.001038569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01.055084228516">
                <text:p>501.055084228516</text:p>
              </table:table-cell>
              <table:table-cell office:value-type="float" office:value="-0.01468271">
                <text:p>-0.0146827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01.171356201172">
                <text:p>501.171356201172</text:p>
              </table:table-cell>
              <table:table-cell office:value-type="float" office:value="-0.00519153">
                <text:p>-0.0051915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01.287628173828">
                <text:p>501.287628173828</text:p>
              </table:table-cell>
              <table:table-cell office:value-type="float" office:value="0.006982329">
                <text:p>0.006982329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01.403900146484">
                <text:p>501.403900146484</text:p>
              </table:table-cell>
              <table:table-cell office:value-type="float" office:value="0.0001855771">
                <text:p>0.000185577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01.520172119141">
                <text:p>501.520172119141</text:p>
              </table:table-cell>
              <table:table-cell office:value-type="float" office:value="-0.003119988">
                <text:p>-0.00311998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01.636444091797">
                <text:p>501.636444091797</text:p>
              </table:table-cell>
              <table:table-cell office:value-type="float" office:value="0.07197692">
                <text:p>0.0719769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01.752746582031">
                <text:p>501.752746582031</text:p>
              </table:table-cell>
              <table:table-cell office:value-type="float" office:value="-0.0006951508">
                <text:p>-0.0006951508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01.869018554688">
                <text:p>501.869018554688</text:p>
              </table:table-cell>
              <table:table-cell office:value-type="float" office:value="-0.003112823">
                <text:p>-0.00311282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01.985321044922">
                <text:p>501.985321044922</text:p>
              </table:table-cell>
              <table:table-cell office:value-type="float" office:value="0.003172439">
                <text:p>0.00317243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02.101623535156">
                <text:p>502.101623535156</text:p>
              </table:table-cell>
              <table:table-cell office:value-type="float" office:value="-0.01253752">
                <text:p>-0.0125375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02.217926025391">
                <text:p>502.217926025391</text:p>
              </table:table-cell>
              <table:table-cell office:value-type="float" office:value="0.00191684">
                <text:p>0.0019168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02.334228515625">
                <text:p>502.334228515625</text:p>
              </table:table-cell>
              <table:table-cell office:value-type="float" office:value="-0.004931446">
                <text:p>-0.00493144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02.450531005859">
                <text:p>502.450531005859</text:p>
              </table:table-cell>
              <table:table-cell office:value-type="float" office:value="-0.01003959">
                <text:p>-0.0100395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02.566833496094">
                <text:p>502.566833496094</text:p>
              </table:table-cell>
              <table:table-cell office:value-type="float" office:value="-0.000264841">
                <text:p>-0.00026484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02.683166503906">
                <text:p>502.683166503906</text:p>
              </table:table-cell>
              <table:table-cell office:value-type="float" office:value="0.004018167">
                <text:p>0.00401816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02.799468994141">
                <text:p>502.799468994141</text:p>
              </table:table-cell>
              <table:table-cell office:value-type="float" office:value="-0.002639837">
                <text:p>-0.00263983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02.915802001953">
                <text:p>502.915802001953</text:p>
              </table:table-cell>
              <table:table-cell office:value-type="float" office:value="-0.007858781">
                <text:p>-0.00785878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03.032135009766">
                <text:p>503.032135009766</text:p>
              </table:table-cell>
              <table:table-cell office:value-type="float" office:value="-0.01092425">
                <text:p>-0.0109242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03.148468017578">
                <text:p>503.148468017578</text:p>
              </table:table-cell>
              <table:table-cell office:value-type="float" office:value="-0.004653675">
                <text:p>-0.00465367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03.264801025391">
                <text:p>503.264801025391</text:p>
              </table:table-cell>
              <table:table-cell office:value-type="float" office:value="0.005029272">
                <text:p>0.00502927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03.381134033203">
                <text:p>503.381134033203</text:p>
              </table:table-cell>
              <table:table-cell office:value-type="float" office:value="-0.01182068">
                <text:p>-0.0118206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03.497497558594">
                <text:p>503.497497558594</text:p>
              </table:table-cell>
              <table:table-cell office:value-type="float" office:value="-0.007834509">
                <text:p>-0.00783450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03.613830566406">
                <text:p>503.613830566406</text:p>
              </table:table-cell>
              <table:table-cell office:value-type="float" office:value="-0.0004887687">
                <text:p>-0.0004887687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03.730194091797">
                <text:p>503.730194091797</text:p>
              </table:table-cell>
              <table:table-cell office:value-type="float" office:value="-0.004069842">
                <text:p>-0.00406984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03.846527099609">
                <text:p>503.846527099609</text:p>
              </table:table-cell>
              <table:table-cell office:value-type="float" office:value="-0.001276795">
                <text:p>-0.00127679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03.962890625">
                <text:p>503.962890625</text:p>
              </table:table-cell>
              <table:table-cell office:value-type="float" office:value="-0.01357412">
                <text:p>-0.0135741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04.079254150391">
                <text:p>504.079254150391</text:p>
              </table:table-cell>
              <table:table-cell office:value-type="float" office:value="-0.001083672">
                <text:p>-0.00108367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04.195617675781">
                <text:p>504.195617675781</text:p>
              </table:table-cell>
              <table:table-cell office:value-type="float" office:value="0.004413423">
                <text:p>0.00441342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04.31201171875">
                <text:p>504.31201171875</text:p>
              </table:table-cell>
              <table:table-cell office:value-type="float" office:value="0.00635503">
                <text:p>0.0063550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04.428375244141">
                <text:p>504.428375244141</text:p>
              </table:table-cell>
              <table:table-cell office:value-type="float" office:value="-0.008325559">
                <text:p>-0.008325559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04.544738769531">
                <text:p>504.544738769531</text:p>
              </table:table-cell>
              <table:table-cell office:value-type="float" office:value="-0.003675802">
                <text:p>-0.00367580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4.6611328125">
                <text:p>504.6611328125</text:p>
              </table:table-cell>
              <table:table-cell office:value-type="float" office:value="-0.001369554">
                <text:p>-0.00136955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04.777526855469">
                <text:p>504.777526855469</text:p>
              </table:table-cell>
              <table:table-cell office:value-type="float" office:value="-0.003042958">
                <text:p>-0.00304295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04.893920898438">
                <text:p>504.893920898438</text:p>
              </table:table-cell>
              <table:table-cell office:value-type="float" office:value="-0.003026071">
                <text:p>-0.00302607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05.010314941406">
                <text:p>505.010314941406</text:p>
              </table:table-cell>
              <table:table-cell office:value-type="float" office:value="0.007039609">
                <text:p>0.00703960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05.126708984375">
                <text:p>505.126708984375</text:p>
              </table:table-cell>
              <table:table-cell office:value-type="float" office:value="0.0239551">
                <text:p>0.023955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05.243103027344">
                <text:p>505.243103027344</text:p>
              </table:table-cell>
              <table:table-cell office:value-type="float" office:value="-0.001499338">
                <text:p>-0.00149933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05.359497070313">
                <text:p>505.359497070313</text:p>
              </table:table-cell>
              <table:table-cell office:value-type="float" office:value="-0.006973741">
                <text:p>-0.00697374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05.475921630859">
                <text:p>505.475921630859</text:p>
              </table:table-cell>
              <table:table-cell office:value-type="float" office:value="0.001143766">
                <text:p>0.00114376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05.592346191406">
                <text:p>505.592346191406</text:p>
              </table:table-cell>
              <table:table-cell office:value-type="float" office:value="0.01050699">
                <text:p>0.0105069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05.708740234375">
                <text:p>505.708740234375</text:p>
              </table:table-cell>
              <table:table-cell office:value-type="float" office:value="-0.008989368">
                <text:p>-0.00898936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05.825164794922">
                <text:p>505.825164794922</text:p>
              </table:table-cell>
              <table:table-cell office:value-type="float" office:value="-0.00671277">
                <text:p>-0.0067127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05.941589355469">
                <text:p>505.941589355469</text:p>
              </table:table-cell>
              <table:table-cell office:value-type="float" office:value="0.0008512927">
                <text:p>0.000851292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06.058013916016">
                <text:p>506.058013916016</text:p>
              </table:table-cell>
              <table:table-cell office:value-type="float" office:value="-0.0003299624">
                <text:p>-0.000329962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06.174468994141">
                <text:p>506.174468994141</text:p>
              </table:table-cell>
              <table:table-cell office:value-type="float" office:value="0.001661947">
                <text:p>0.001661947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06.290893554688">
                <text:p>506.290893554688</text:p>
              </table:table-cell>
              <table:table-cell office:value-type="float" office:value="-0.00501665">
                <text:p>-0.0050166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06.407348632813">
                <text:p>506.407348632813</text:p>
              </table:table-cell>
              <table:table-cell office:value-type="float" office:value="0.008140496">
                <text:p>0.00814049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6.523773193359">
                <text:p>506.523773193359</text:p>
              </table:table-cell>
              <table:table-cell office:value-type="float" office:value="0.0003874475">
                <text:p>0.000387447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06.640228271484">
                <text:p>506.640228271484</text:p>
              </table:table-cell>
              <table:table-cell office:value-type="float" office:value="0.001968645">
                <text:p>0.00196864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06.756683349609">
                <text:p>506.756683349609</text:p>
              </table:table-cell>
              <table:table-cell office:value-type="float" office:value="0.004982891">
                <text:p>0.004982891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06.873138427734">
                <text:p>506.873138427734</text:p>
              </table:table-cell>
              <table:table-cell office:value-type="float" office:value="0.008881362">
                <text:p>0.00888136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06.989593505859">
                <text:p>506.989593505859</text:p>
              </table:table-cell>
              <table:table-cell office:value-type="float" office:value="-0.002798921">
                <text:p>-0.00279892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07.106048583984">
                <text:p>507.106048583984</text:p>
              </table:table-cell>
              <table:table-cell office:value-type="float" office:value="-0.007324535">
                <text:p>-0.00732453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07.222534179688">
                <text:p>507.222534179688</text:p>
              </table:table-cell>
              <table:table-cell office:value-type="float" office:value="-0.01524244">
                <text:p>-0.0152424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07.338989257813">
                <text:p>507.338989257813</text:p>
              </table:table-cell>
              <table:table-cell office:value-type="float" office:value="-0.008107079">
                <text:p>-0.00810707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07.455474853516">
                <text:p>507.455474853516</text:p>
              </table:table-cell>
              <table:table-cell office:value-type="float" office:value="-0.002415316">
                <text:p>-0.00241531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07.571960449219">
                <text:p>507.571960449219</text:p>
              </table:table-cell>
              <table:table-cell office:value-type="float" office:value="-0.01393582">
                <text:p>-0.0139358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07.688446044922">
                <text:p>507.688446044922</text:p>
              </table:table-cell>
              <table:table-cell office:value-type="float" office:value="-0.01035043">
                <text:p>-0.0103504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07.804931640625">
                <text:p>507.804931640625</text:p>
              </table:table-cell>
              <table:table-cell office:value-type="float" office:value="-0.003064862">
                <text:p>-0.00306486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07.921417236328">
                <text:p>507.921417236328</text:p>
              </table:table-cell>
              <table:table-cell office:value-type="float" office:value="-0.003273561">
                <text:p>-0.00327356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08.037902832031">
                <text:p>508.037902832031</text:p>
              </table:table-cell>
              <table:table-cell office:value-type="float" office:value="-0.006854521">
                <text:p>-0.00685452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08.154388427734">
                <text:p>508.154388427734</text:p>
              </table:table-cell>
              <table:table-cell office:value-type="float" office:value="-0.000293366">
                <text:p>-0.00029336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08.270904541016">
                <text:p>508.270904541016</text:p>
              </table:table-cell>
              <table:table-cell office:value-type="float" office:value="0.0003682098">
                <text:p>0.000368209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08.387420654297">
                <text:p>508.387420654297</text:p>
              </table:table-cell>
              <table:table-cell office:value-type="float" office:value="-0.006826262">
                <text:p>-0.00682626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08.50390625">
                <text:p>508.50390625</text:p>
              </table:table-cell>
              <table:table-cell office:value-type="float" office:value="-0.008614648">
                <text:p>-0.00861464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08.620422363281">
                <text:p>508.620422363281</text:p>
              </table:table-cell>
              <table:table-cell office:value-type="float" office:value="-0.01018819">
                <text:p>-0.0101881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08.736938476563">
                <text:p>508.736938476563</text:p>
              </table:table-cell>
              <table:table-cell office:value-type="float" office:value="0.01894927">
                <text:p>0.0189492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08.853454589844">
                <text:p>508.853454589844</text:p>
              </table:table-cell>
              <table:table-cell office:value-type="float" office:value="0.004764076">
                <text:p>0.00476407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08.970001220703">
                <text:p>508.970001220703</text:p>
              </table:table-cell>
              <table:table-cell office:value-type="float" office:value="-0.00619933">
                <text:p>-0.0061993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09.086517333984">
                <text:p>509.086517333984</text:p>
              </table:table-cell>
              <table:table-cell office:value-type="float" office:value="-0.001938668">
                <text:p>-0.00193866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09.203063964844">
                <text:p>509.203063964844</text:p>
              </table:table-cell>
              <table:table-cell office:value-type="float" office:value="0.01399524">
                <text:p>0.0139952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09.319580078125">
                <text:p>509.319580078125</text:p>
              </table:table-cell>
              <table:table-cell office:value-type="float" office:value="-0.004343016">
                <text:p>-0.00434301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09.436126708984">
                <text:p>509.436126708984</text:p>
              </table:table-cell>
              <table:table-cell office:value-type="float" office:value="-0.004768871">
                <text:p>-0.00476887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09.552673339844">
                <text:p>509.552673339844</text:p>
              </table:table-cell>
              <table:table-cell office:value-type="float" office:value="-0.007339101">
                <text:p>-0.00733910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09.669219970703">
                <text:p>509.669219970703</text:p>
              </table:table-cell>
              <table:table-cell office:value-type="float" office:value="0.006664636">
                <text:p>0.00666463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09.785766601563">
                <text:p>509.785766601563</text:p>
              </table:table-cell>
              <table:table-cell office:value-type="float" office:value="0.002409657">
                <text:p>0.00240965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09.902313232422">
                <text:p>509.902313232422</text:p>
              </table:table-cell>
              <table:table-cell office:value-type="float" office:value="-0.003480327">
                <text:p>-0.00348032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10.018890380859">
                <text:p>510.018890380859</text:p>
              </table:table-cell>
              <table:table-cell office:value-type="float" office:value="-0.01114464">
                <text:p>-0.0111446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10.135437011719">
                <text:p>510.135437011719</text:p>
              </table:table-cell>
              <table:table-cell office:value-type="float" office:value="-0.004806173">
                <text:p>-0.00480617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10.252014160156">
                <text:p>510.252014160156</text:p>
              </table:table-cell>
              <table:table-cell office:value-type="float" office:value="0.004010473">
                <text:p>0.00401047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10.368560791016">
                <text:p>510.368560791016</text:p>
              </table:table-cell>
              <table:table-cell office:value-type="float" office:value="-0.004514159">
                <text:p>-0.00451415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10.485137939453">
                <text:p>510.485137939453</text:p>
              </table:table-cell>
              <table:table-cell office:value-type="float" office:value="-0.01247043">
                <text:p>-0.0124704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10.601715087891">
                <text:p>510.601715087891</text:p>
              </table:table-cell>
              <table:table-cell office:value-type="float" office:value="0.004822687">
                <text:p>0.00482268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10.718322753906">
                <text:p>510.718322753906</text:p>
              </table:table-cell>
              <table:table-cell office:value-type="float" office:value="0.001225702">
                <text:p>0.00122570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10.834899902344">
                <text:p>510.834899902344</text:p>
              </table:table-cell>
              <table:table-cell office:value-type="float" office:value="-0.01333839">
                <text:p>-0.01333839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10.951477050781">
                <text:p>510.951477050781</text:p>
              </table:table-cell>
              <table:table-cell office:value-type="float" office:value="0.009392478">
                <text:p>0.00939247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11.068084716797">
                <text:p>511.068084716797</text:p>
              </table:table-cell>
              <table:table-cell office:value-type="float" office:value="-0.003535453">
                <text:p>-0.00353545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11.184661865234">
                <text:p>511.184661865234</text:p>
              </table:table-cell>
              <table:table-cell office:value-type="float" office:value="-0.007130796">
                <text:p>-0.00713079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11.30126953125">
                <text:p>511.30126953125</text:p>
              </table:table-cell>
              <table:table-cell office:value-type="float" office:value="-0.01189995">
                <text:p>-0.0118999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11.417877197266">
                <text:p>511.417877197266</text:p>
              </table:table-cell>
              <table:table-cell office:value-type="float" office:value="-0.01401315">
                <text:p>-0.0140131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11.534484863281">
                <text:p>511.534484863281</text:p>
              </table:table-cell>
              <table:table-cell office:value-type="float" office:value="-0.006204878">
                <text:p>-0.00620487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11.651092529297">
                <text:p>511.651092529297</text:p>
              </table:table-cell>
              <table:table-cell office:value-type="float" office:value="-0.007028077">
                <text:p>-0.007028077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11.767700195313">
                <text:p>511.767700195313</text:p>
              </table:table-cell>
              <table:table-cell office:value-type="float" office:value="-0.003808243">
                <text:p>-0.00380824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11.884338378906">
                <text:p>511.884338378906</text:p>
              </table:table-cell>
              <table:table-cell office:value-type="float" office:value="-0.004244972">
                <text:p>-0.00424497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12.0009765625">
                <text:p>512.0009765625</text:p>
              </table:table-cell>
              <table:table-cell office:value-type="float" office:value="-0.006780987">
                <text:p>-0.00678098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12.117553710938">
                <text:p>512.117553710938</text:p>
              </table:table-cell>
              <table:table-cell office:value-type="float" office:value="0.004288382">
                <text:p>0.00428838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12.234191894531">
                <text:p>512.234191894531</text:p>
              </table:table-cell>
              <table:table-cell office:value-type="float" office:value="0.008146204">
                <text:p>0.008146204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12.350830078125">
                <text:p>512.350830078125</text:p>
              </table:table-cell>
              <table:table-cell office:value-type="float" office:value="-0.001694738">
                <text:p>-0.00169473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12.467468261719">
                <text:p>512.467468261719</text:p>
              </table:table-cell>
              <table:table-cell office:value-type="float" office:value="0.008553232">
                <text:p>0.00855323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12.584106445313">
                <text:p>512.584106445313</text:p>
              </table:table-cell>
              <table:table-cell office:value-type="float" office:value="-0.003045182">
                <text:p>-0.00304518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12.700744628906">
                <text:p>512.700744628906</text:p>
              </table:table-cell>
              <table:table-cell office:value-type="float" office:value="0.02171144">
                <text:p>0.0217114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12.8173828125">
                <text:p>512.8173828125</text:p>
              </table:table-cell>
              <table:table-cell office:value-type="float" office:value="-0.0109748">
                <text:p>-0.010974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12.93408203125">
                <text:p>512.93408203125</text:p>
              </table:table-cell>
              <table:table-cell office:value-type="float" office:value="0.004669605">
                <text:p>0.00466960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13.050720214844">
                <text:p>513.050720214844</text:p>
              </table:table-cell>
              <table:table-cell office:value-type="float" office:value="0.004388459">
                <text:p>0.00438845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13.167358398438">
                <text:p>513.167358398438</text:p>
              </table:table-cell>
              <table:table-cell office:value-type="float" office:value="-0.01047995">
                <text:p>-0.0104799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13.284057617188">
                <text:p>513.284057617188</text:p>
              </table:table-cell>
              <table:table-cell office:value-type="float" office:value="-0.0111981">
                <text:p>-0.011198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13.400695800781">
                <text:p>513.400695800781</text:p>
              </table:table-cell>
              <table:table-cell office:value-type="float" office:value="0.009239228">
                <text:p>0.009239228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13.517395019531">
                <text:p>513.517395019531</text:p>
              </table:table-cell>
              <table:table-cell office:value-type="float" office:value="0.003517401">
                <text:p>0.00351740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13.634033203125">
                <text:p>513.634033203125</text:p>
              </table:table-cell>
              <table:table-cell office:value-type="float" office:value="-0.005730241">
                <text:p>-0.00573024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13.750732421875">
                <text:p>513.750732421875</text:p>
              </table:table-cell>
              <table:table-cell office:value-type="float" office:value="0.006150702">
                <text:p>0.00615070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13.867431640625">
                <text:p>513.867431640625</text:p>
              </table:table-cell>
              <table:table-cell office:value-type="float" office:value="0.004160631">
                <text:p>0.004160631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13.984069824219">
                <text:p>513.984069824219</text:p>
              </table:table-cell>
              <table:table-cell office:value-type="float" office:value="0.005713054">
                <text:p>0.00571305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14.100769042969">
                <text:p>514.100769042969</text:p>
              </table:table-cell>
              <table:table-cell office:value-type="float" office:value="0.009917497">
                <text:p>0.00991749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14.217468261719">
                <text:p>514.217468261719</text:p>
              </table:table-cell>
              <table:table-cell office:value-type="float" office:value="-0.004895819">
                <text:p>-0.004895819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14.334167480469">
                <text:p>514.334167480469</text:p>
              </table:table-cell>
              <table:table-cell office:value-type="float" office:value="-0.0003687414">
                <text:p>-0.000368741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14.450866699219">
                <text:p>514.450866699219</text:p>
              </table:table-cell>
              <table:table-cell office:value-type="float" office:value="0.006284454">
                <text:p>0.00628445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14.567565917969">
                <text:p>514.567565917969</text:p>
              </table:table-cell>
              <table:table-cell office:value-type="float" office:value="-0.00816989">
                <text:p>-0.0081698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14.684265136719">
                <text:p>514.684265136719</text:p>
              </table:table-cell>
              <table:table-cell office:value-type="float" office:value="0.000676784">
                <text:p>0.000676784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4.801025390625">
                <text:p>514.801025390625</text:p>
              </table:table-cell>
              <table:table-cell office:value-type="float" office:value="-0.0009558017">
                <text:p>-0.000955801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14.917724609375">
                <text:p>514.917724609375</text:p>
              </table:table-cell>
              <table:table-cell office:value-type="float" office:value="0.004443909">
                <text:p>0.00444390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15.034423828125">
                <text:p>515.034423828125</text:p>
              </table:table-cell>
              <table:table-cell office:value-type="float" office:value="-0.004908312">
                <text:p>-0.00490831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15.151184082031">
                <text:p>515.151184082031</text:p>
              </table:table-cell>
              <table:table-cell office:value-type="float" office:value="-0.01369707">
                <text:p>-0.0136970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15.267883300781">
                <text:p>515.267883300781</text:p>
              </table:table-cell>
              <table:table-cell office:value-type="float" office:value="-0.002781037">
                <text:p>-0.00278103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15.384643554688">
                <text:p>515.384643554688</text:p>
              </table:table-cell>
              <table:table-cell office:value-type="float" office:value="0.005344789">
                <text:p>0.00534478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15.501342773438">
                <text:p>515.501342773438</text:p>
              </table:table-cell>
              <table:table-cell office:value-type="float" office:value="-0.0009756539">
                <text:p>-0.000975653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15.618103027344">
                <text:p>515.618103027344</text:p>
              </table:table-cell>
              <table:table-cell office:value-type="float" office:value="0.00180729">
                <text:p>0.0018072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15.734802246094">
                <text:p>515.734802246094</text:p>
              </table:table-cell>
              <table:table-cell office:value-type="float" office:value="-0.003355527">
                <text:p>-0.00335552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15.8515625">
                <text:p>515.8515625</text:p>
              </table:table-cell>
              <table:table-cell office:value-type="float" office:value="0.01235353">
                <text:p>0.0123535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15.968322753906">
                <text:p>515.968322753906</text:p>
              </table:table-cell>
              <table:table-cell office:value-type="float" office:value="-0.0002036861">
                <text:p>-0.000203686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16.085083007813">
                <text:p>516.085083007813</text:p>
              </table:table-cell>
              <table:table-cell office:value-type="float" office:value="0.0009386968">
                <text:p>0.000938696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16.201843261719">
                <text:p>516.201843261719</text:p>
              </table:table-cell>
              <table:table-cell office:value-type="float" office:value="-0.003194618">
                <text:p>-0.00319461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16.318603515625">
                <text:p>516.318603515625</text:p>
              </table:table-cell>
              <table:table-cell office:value-type="float" office:value="-0.006235525">
                <text:p>-0.00623552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16.435363769531">
                <text:p>516.435363769531</text:p>
              </table:table-cell>
              <table:table-cell office:value-type="float" office:value="-0.008334293">
                <text:p>-0.00833429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16.552124023438">
                <text:p>516.552124023438</text:p>
              </table:table-cell>
              <table:table-cell office:value-type="float" office:value="-0.002957814">
                <text:p>-0.00295781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16.668884277344">
                <text:p>516.668884277344</text:p>
              </table:table-cell>
              <table:table-cell office:value-type="float" office:value="-0.00314821">
                <text:p>-0.0031482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16.78564453125">
                <text:p>516.78564453125</text:p>
              </table:table-cell>
              <table:table-cell office:value-type="float" office:value="0.01197539">
                <text:p>0.0119753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16.902465820313">
                <text:p>516.902465820313</text:p>
              </table:table-cell>
              <table:table-cell office:value-type="float" office:value="0.03308583">
                <text:p>0.03308583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17.019226074219">
                <text:p>517.019226074219</text:p>
              </table:table-cell>
              <table:table-cell office:value-type="float" office:value="-0.007219942">
                <text:p>-0.00721994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17.135986328125">
                <text:p>517.135986328125</text:p>
              </table:table-cell>
              <table:table-cell office:value-type="float" office:value="-0.00037022">
                <text:p>-0.0003702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17.252807617188">
                <text:p>517.252807617188</text:p>
              </table:table-cell>
              <table:table-cell office:value-type="float" office:value="0.005260281">
                <text:p>0.00526028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17.369567871094">
                <text:p>517.369567871094</text:p>
              </table:table-cell>
              <table:table-cell office:value-type="float" office:value="-0.006909472">
                <text:p>-0.00690947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17.486389160156">
                <text:p>517.486389160156</text:p>
              </table:table-cell>
              <table:table-cell office:value-type="float" office:value="0.001876286">
                <text:p>0.00187628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17.603210449219">
                <text:p>517.603210449219</text:p>
              </table:table-cell>
              <table:table-cell office:value-type="float" office:value="0.01341724">
                <text:p>0.0134172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17.719970703125">
                <text:p>517.7199707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17.836791992188">
                <text:p>517.836791992188</text:p>
              </table:table-cell>
              <table:table-cell office:value-type="float" office:value="0.002871351">
                <text:p>0.00287135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17.95361328125">
                <text:p>517.95361328125</text:p>
              </table:table-cell>
              <table:table-cell office:value-type="float" office:value="0.0001537292">
                <text:p>0.000153729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18.070434570313">
                <text:p>518.070434570313</text:p>
              </table:table-cell>
              <table:table-cell office:value-type="float" office:value="-0.005558189">
                <text:p>-0.005558189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18.187255859375">
                <text:p>518.187255859375</text:p>
              </table:table-cell>
              <table:table-cell office:value-type="float" office:value="0.00508991">
                <text:p>0.0050899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18.304077148438">
                <text:p>518.304077148438</text:p>
              </table:table-cell>
              <table:table-cell office:value-type="float" office:value="0.01322466">
                <text:p>0.0132246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18.4208984375">
                <text:p>518.4208984375</text:p>
              </table:table-cell>
              <table:table-cell office:value-type="float" office:value="0.00483311">
                <text:p>0.0048331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18.537719726563">
                <text:p>518.537719726563</text:p>
              </table:table-cell>
              <table:table-cell office:value-type="float" office:value="0.02102269">
                <text:p>0.0210226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18.654541015625">
                <text:p>518.654541015625</text:p>
              </table:table-cell>
              <table:table-cell office:value-type="float" office:value="0.007204483">
                <text:p>0.00720448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18.771362304688">
                <text:p>518.771362304688</text:p>
              </table:table-cell>
              <table:table-cell office:value-type="float" office:value="-0.01093468">
                <text:p>-0.0109346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18.888244628906">
                <text:p>518.888244628906</text:p>
              </table:table-cell>
              <table:table-cell office:value-type="float" office:value="-0.01127861">
                <text:p>-0.0112786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19.005065917969">
                <text:p>519.005065917969</text:p>
              </table:table-cell>
              <table:table-cell office:value-type="float" office:value="0.001134836">
                <text:p>0.00113483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19.121887207031">
                <text:p>519.121887207031</text:p>
              </table:table-cell>
              <table:table-cell office:value-type="float" office:value="-0.002424677">
                <text:p>-0.00242467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19.23876953125">
                <text:p>519.23876953125</text:p>
              </table:table-cell>
              <table:table-cell office:value-type="float" office:value="0.005411181">
                <text:p>0.00541118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19.355590820313">
                <text:p>519.355590820313</text:p>
              </table:table-cell>
              <table:table-cell office:value-type="float" office:value="-0.002647329">
                <text:p>-0.00264732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19.472473144531">
                <text:p>519.472473144531</text:p>
              </table:table-cell>
              <table:table-cell office:value-type="float" office:value="0.002543526">
                <text:p>0.00254352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19.58935546875">
                <text:p>519.58935546875</text:p>
              </table:table-cell>
              <table:table-cell office:value-type="float" office:value="0.0007443523">
                <text:p>0.000744352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19.706176757813">
                <text:p>519.706176757813</text:p>
              </table:table-cell>
              <table:table-cell office:value-type="float" office:value="-0.003823233">
                <text:p>-0.00382323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19.823059082031">
                <text:p>519.823059082031</text:p>
              </table:table-cell>
              <table:table-cell office:value-type="float" office:value="-0.0067366">
                <text:p>-0.006736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19.93994140625">
                <text:p>519.93994140625</text:p>
              </table:table-cell>
              <table:table-cell office:value-type="float" office:value="0.01517891">
                <text:p>0.0151789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20.056823730469">
                <text:p>520.056823730469</text:p>
              </table:table-cell>
              <table:table-cell office:value-type="float" office:value="-0.005930224">
                <text:p>-0.005930224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20.173706054688">
                <text:p>520.173706054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20.290588378906">
                <text:p>520.290588378906</text:p>
              </table:table-cell>
              <table:table-cell office:value-type="float" office:value="-0.007793396">
                <text:p>-0.00779339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20.407470703125">
                <text:p>520.407470703125</text:p>
              </table:table-cell>
              <table:table-cell office:value-type="float" office:value="-0.004078668">
                <text:p>-0.00407866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20.524353027344">
                <text:p>520.524353027344</text:p>
              </table:table-cell>
              <table:table-cell office:value-type="float" office:value="-0.006476119">
                <text:p>-0.006476119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20.641235351563">
                <text:p>520.641235351563</text:p>
              </table:table-cell>
              <table:table-cell office:value-type="float" office:value="-0.008686448">
                <text:p>-0.00868644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20.758178710938">
                <text:p>520.758178710938</text:p>
              </table:table-cell>
              <table:table-cell office:value-type="float" office:value="-0.003461377">
                <text:p>-0.00346137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20.875061035156">
                <text:p>520.875061035156</text:p>
              </table:table-cell>
              <table:table-cell office:value-type="float" office:value="0.02320031">
                <text:p>0.0232003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20.991943359375">
                <text:p>520.991943359375</text:p>
              </table:table-cell>
              <table:table-cell office:value-type="float" office:value="0.001771432">
                <text:p>0.00177143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21.10888671875">
                <text:p>521.10888671875</text:p>
              </table:table-cell>
              <table:table-cell office:value-type="float" office:value="-0.009552298">
                <text:p>-0.00955229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21.225769042969">
                <text:p>521.225769042969</text:p>
              </table:table-cell>
              <table:table-cell office:value-type="float" office:value="0.0009098702">
                <text:p>0.000909870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21.342712402344">
                <text:p>521.342712402344</text:p>
              </table:table-cell>
              <table:table-cell office:value-type="float" office:value="0.006578246">
                <text:p>0.00657824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21.459594726563">
                <text:p>521.459594726563</text:p>
              </table:table-cell>
              <table:table-cell office:value-type="float" office:value="-0.006937866">
                <text:p>-0.00693786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21.576538085938">
                <text:p>521.576538085938</text:p>
              </table:table-cell>
              <table:table-cell office:value-type="float" office:value="-0.006338471">
                <text:p>-0.00633847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21.693481445313">
                <text:p>521.693481445313</text:p>
              </table:table-cell>
              <table:table-cell office:value-type="float" office:value="-0.002808037">
                <text:p>-0.002808037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21.810424804688">
                <text:p>521.810424804688</text:p>
              </table:table-cell>
              <table:table-cell office:value-type="float" office:value="-0.00735308">
                <text:p>-0.0073530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21.927307128906">
                <text:p>521.927307128906</text:p>
              </table:table-cell>
              <table:table-cell office:value-type="float" office:value="0.01220219">
                <text:p>0.0122021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22.044250488281">
                <text:p>522.044250488281</text:p>
              </table:table-cell>
              <table:table-cell office:value-type="float" office:value="0.001872906">
                <text:p>0.00187290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22.161193847656">
                <text:p>522.161193847656</text:p>
              </table:table-cell>
              <table:table-cell office:value-type="float" office:value="0.04099652">
                <text:p>0.0409965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22.278137207031">
                <text:p>522.278137207031</text:p>
              </table:table-cell>
              <table:table-cell office:value-type="float" office:value="0.009384413">
                <text:p>0.009384413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22.395080566406">
                <text:p>522.395080566406</text:p>
              </table:table-cell>
              <table:table-cell office:value-type="float" office:value="0.0001511905">
                <text:p>0.000151190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22.512023925781">
                <text:p>522.512023925781</text:p>
              </table:table-cell>
              <table:table-cell office:value-type="float" office:value="-0.005839935">
                <text:p>-0.00583993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22.629028320313">
                <text:p>522.629028320313</text:p>
              </table:table-cell>
              <table:table-cell office:value-type="float" office:value="0.0009562515">
                <text:p>0.000956251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22.745971679688">
                <text:p>522.745971679688</text:p>
              </table:table-cell>
              <table:table-cell office:value-type="float" office:value="-0.0007510778">
                <text:p>-0.000751077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22.862915039063">
                <text:p>522.862915039063</text:p>
              </table:table-cell>
              <table:table-cell office:value-type="float" office:value="0.01670666">
                <text:p>0.0167066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22.979919433594">
                <text:p>522.979919433594</text:p>
              </table:table-cell>
              <table:table-cell office:value-type="float" office:value="-0.01138783">
                <text:p>-0.0113878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23.096862792969">
                <text:p>523.096862792969</text:p>
              </table:table-cell>
              <table:table-cell office:value-type="float" office:value="0.01638635">
                <text:p>0.0163863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23.2138671875">
                <text:p>523.2138671875</text:p>
              </table:table-cell>
              <table:table-cell office:value-type="float" office:value="0.006306221">
                <text:p>0.006306221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23.330810546875">
                <text:p>523.330810546875</text:p>
              </table:table-cell>
              <table:table-cell office:value-type="float" office:value="0.002950973">
                <text:p>0.00295097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23.447814941406">
                <text:p>523.447814941406</text:p>
              </table:table-cell>
              <table:table-cell office:value-type="float" office:value="0.001231364">
                <text:p>0.001231364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23.564758300781">
                <text:p>523.564758300781</text:p>
              </table:table-cell>
              <table:table-cell office:value-type="float" office:value="0.001600622">
                <text:p>0.00160062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23.681762695313">
                <text:p>523.681762695313</text:p>
              </table:table-cell>
              <table:table-cell office:value-type="float" office:value="-0.004195951">
                <text:p>-0.00419595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23.798767089844">
                <text:p>523.798767089844</text:p>
              </table:table-cell>
              <table:table-cell office:value-type="float" office:value="-0.00690208">
                <text:p>-0.0069020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23.915771484375">
                <text:p>523.915771484375</text:p>
              </table:table-cell>
              <table:table-cell office:value-type="float" office:value="-0.01118867">
                <text:p>-0.01118867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24.032775878906">
                <text:p>524.032775878906</text:p>
              </table:table-cell>
              <table:table-cell office:value-type="float" office:value="0.00818923">
                <text:p>0.0081892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24.149719238281">
                <text:p>524.149719238281</text:p>
              </table:table-cell>
              <table:table-cell office:value-type="float" office:value="0.002246246">
                <text:p>0.00224624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24.266723632813">
                <text:p>524.266723632813</text:p>
              </table:table-cell>
              <table:table-cell office:value-type="float" office:value="0.004768911">
                <text:p>0.00476891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24.3837890625">
                <text:p>524.3837890625</text:p>
              </table:table-cell>
              <table:table-cell office:value-type="float" office:value="-0.01192133">
                <text:p>-0.0119213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24.500793457031">
                <text:p>524.500793457031</text:p>
              </table:table-cell>
              <table:table-cell office:value-type="float" office:value="0.01979402">
                <text:p>0.0197940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24.617797851563">
                <text:p>524.617797851563</text:p>
              </table:table-cell>
              <table:table-cell office:value-type="float" office:value="0.005903137">
                <text:p>0.005903137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24.734802246094">
                <text:p>524.734802246094</text:p>
              </table:table-cell>
              <table:table-cell office:value-type="float" office:value="-0.00998092">
                <text:p>-0.0099809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524.851806640625">
                <text:p>524.851806640625</text:p>
              </table:table-cell>
              <table:table-cell office:value-type="float" office:value="-0.008395435">
                <text:p>-0.00839543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524.968872070313">
                <text:p>524.968872070313</text:p>
              </table:table-cell>
              <table:table-cell office:value-type="float" office:value="-0.0001835648">
                <text:p>-0.000183564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25.085876464844">
                <text:p>525.085876464844</text:p>
              </table:table-cell>
              <table:table-cell office:value-type="float" office:value="0.01998766">
                <text:p>0.0199876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25.202941894531">
                <text:p>525.202941894531</text:p>
              </table:table-cell>
              <table:table-cell office:value-type="float" office:value="-0.006452098">
                <text:p>-0.00645209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25.319946289063">
                <text:p>525.319946289063</text:p>
              </table:table-cell>
              <table:table-cell office:value-type="float" office:value="-0.003933405">
                <text:p>-0.00393340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525.43701171875">
                <text:p>525.43701171875</text:p>
              </table:table-cell>
              <table:table-cell office:value-type="float" office:value="0.006082948">
                <text:p>0.00608294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525.554016113281">
                <text:p>525.554016113281</text:p>
              </table:table-cell>
              <table:table-cell office:value-type="float" office:value="0.00519484">
                <text:p>0.00519484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25.671081542969">
                <text:p>525.671081542969</text:p>
              </table:table-cell>
              <table:table-cell office:value-type="float" office:value="-0.005567447">
                <text:p>-0.00556744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25.788146972656">
                <text:p>525.788146972656</text:p>
              </table:table-cell>
              <table:table-cell office:value-type="float" office:value="-0.01494464">
                <text:p>-0.0149446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25.905212402344">
                <text:p>525.905212402344</text:p>
              </table:table-cell>
              <table:table-cell office:value-type="float" office:value="-0.00242818">
                <text:p>-0.0024281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26.022277832031">
                <text:p>526.022277832031</text:p>
              </table:table-cell>
              <table:table-cell office:value-type="float" office:value="-0.007199016">
                <text:p>-0.00719901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26.139282226563">
                <text:p>526.139282226563</text:p>
              </table:table-cell>
              <table:table-cell office:value-type="float" office:value="-0.005228117">
                <text:p>-0.00522811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6.25634765625">
                <text:p>526.25634765625</text:p>
              </table:table-cell>
              <table:table-cell office:value-type="float" office:value="0.0139836">
                <text:p>0.013983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26.373474121094">
                <text:p>526.373474121094</text:p>
              </table:table-cell>
              <table:table-cell office:value-type="float" office:value="-0.007438086">
                <text:p>-0.00743808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26.490539550781">
                <text:p>526.490539550781</text:p>
              </table:table-cell>
              <table:table-cell office:value-type="float" office:value="0.01184227">
                <text:p>0.0118422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26.607604980469">
                <text:p>526.607604980469</text:p>
              </table:table-cell>
              <table:table-cell office:value-type="float" office:value="-0.007418135">
                <text:p>-0.00741813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526.724670410156">
                <text:p>526.724670410156</text:p>
              </table:table-cell>
              <table:table-cell office:value-type="float" office:value="0.006926032">
                <text:p>0.00692603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526.841735839844">
                <text:p>526.841735839844</text:p>
              </table:table-cell>
              <table:table-cell office:value-type="float" office:value="0.01201486">
                <text:p>0.0120148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526.958862304688">
                <text:p>526.958862304688</text:p>
              </table:table-cell>
              <table:table-cell office:value-type="float" office:value="0.0004840202">
                <text:p>0.000484020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27.075927734375">
                <text:p>527.075927734375</text:p>
              </table:table-cell>
              <table:table-cell office:value-type="float" office:value="0.01826999">
                <text:p>0.0182699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27.192993164063">
                <text:p>527.192993164063</text:p>
              </table:table-cell>
              <table:table-cell office:value-type="float" office:value="-0.009912643">
                <text:p>-0.009912643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27.310119628906">
                <text:p>527.310119628906</text:p>
              </table:table-cell>
              <table:table-cell office:value-type="float" office:value="0.002716702">
                <text:p>0.002716702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527.42724609375">
                <text:p>527.42724609375</text:p>
              </table:table-cell>
              <table:table-cell office:value-type="float" office:value="-0.00297118">
                <text:p>-0.0029711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527.544311523438">
                <text:p>527.544311523438</text:p>
              </table:table-cell>
              <table:table-cell office:value-type="float" office:value="-0.009082828">
                <text:p>-0.00908282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527.661437988281">
                <text:p>527.661437988281</text:p>
              </table:table-cell>
              <table:table-cell office:value-type="float" office:value="-0.0141734">
                <text:p>-0.014173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527.778564453125">
                <text:p>527.778564453125</text:p>
              </table:table-cell>
              <table:table-cell office:value-type="float" office:value="0.006627559">
                <text:p>0.006627559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527.895629882813">
                <text:p>527.895629882813</text:p>
              </table:table-cell>
              <table:table-cell office:value-type="float" office:value="0.003121908">
                <text:p>0.00312190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528.012756347656">
                <text:p>528.012756347656</text:p>
              </table:table-cell>
              <table:table-cell office:value-type="float" office:value="-0.009146239">
                <text:p>-0.00914623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28.1298828125">
                <text:p>528.1298828125</text:p>
              </table:table-cell>
              <table:table-cell office:value-type="float" office:value="-0.002268709">
                <text:p>-0.002268709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528.247009277344">
                <text:p>528.247009277344</text:p>
              </table:table-cell>
              <table:table-cell office:value-type="float" office:value="0.00941668">
                <text:p>0.0094166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528.364135742188">
                <text:p>528.364135742188</text:p>
              </table:table-cell>
              <table:table-cell office:value-type="float" office:value="-0.009281643">
                <text:p>-0.00928164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528.481262207031">
                <text:p>528.481262207031</text:p>
              </table:table-cell>
              <table:table-cell office:value-type="float" office:value="0.01910338">
                <text:p>0.0191033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528.598388671875">
                <text:p>528.598388671875</text:p>
              </table:table-cell>
              <table:table-cell office:value-type="float" office:value="0.01197138">
                <text:p>0.0119713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528.715576171875">
                <text:p>528.715576171875</text:p>
              </table:table-cell>
              <table:table-cell office:value-type="float" office:value="0.002051177">
                <text:p>0.00205117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28.832702636719">
                <text:p>528.832702636719</text:p>
              </table:table-cell>
              <table:table-cell office:value-type="float" office:value="-0.0008023802">
                <text:p>-0.000802380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528.949829101563">
                <text:p>528.949829101563</text:p>
              </table:table-cell>
              <table:table-cell office:value-type="float" office:value="-0.005298264">
                <text:p>-0.005298264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529.066955566406">
                <text:p>529.066955566406</text:p>
              </table:table-cell>
              <table:table-cell office:value-type="float" office:value="-0.01495555">
                <text:p>-0.0149555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529.184143066406">
                <text:p>529.184143066406</text:p>
              </table:table-cell>
              <table:table-cell office:value-type="float" office:value="0.003128008">
                <text:p>0.00312800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529.30126953125">
                <text:p>529.30126953125</text:p>
              </table:table-cell>
              <table:table-cell office:value-type="float" office:value="0.01241459">
                <text:p>0.01241459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529.41845703125">
                <text:p>529.41845703125</text:p>
              </table:table-cell>
              <table:table-cell office:value-type="float" office:value="-0.004545474">
                <text:p>-0.00454547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529.535583496094">
                <text:p>529.535583496094</text:p>
              </table:table-cell>
              <table:table-cell office:value-type="float" office:value="0.00250366">
                <text:p>0.0025036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529.652770996094">
                <text:p>529.652770996094</text:p>
              </table:table-cell>
              <table:table-cell office:value-type="float" office:value="-0.0002521581">
                <text:p>-0.000252158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529.769958496094">
                <text:p>529.769958496094</text:p>
              </table:table-cell>
              <table:table-cell office:value-type="float" office:value="-0.001033677">
                <text:p>-0.00103367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529.887145996094">
                <text:p>529.887145996094</text:p>
              </table:table-cell>
              <table:table-cell office:value-type="float" office:value="-0.0006483941">
                <text:p>-0.0006483941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530.004272460938">
                <text:p>530.004272460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530.121459960938">
                <text:p>530.121459960938</text:p>
              </table:table-cell>
              <table:table-cell office:value-type="float" office:value="0.0006977106">
                <text:p>0.0006977106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530.238647460938">
                <text:p>530.238647460938</text:p>
              </table:table-cell>
              <table:table-cell office:value-type="float" office:value="-0.002029651">
                <text:p>-0.002029651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530.355834960938">
                <text:p>530.355834960938</text:p>
              </table:table-cell>
              <table:table-cell office:value-type="float" office:value="-0.008387285">
                <text:p>-0.00838728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530.473022460938">
                <text:p>530.473022460938</text:p>
              </table:table-cell>
              <table:table-cell office:value-type="float" office:value="-0.0119094">
                <text:p>-0.0119094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530.590209960938">
                <text:p>530.590209960938</text:p>
              </table:table-cell>
              <table:table-cell office:value-type="float" office:value="0.003111816">
                <text:p>0.003111816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530.707397460938">
                <text:p>530.707397460938</text:p>
              </table:table-cell>
              <table:table-cell office:value-type="float" office:value="0.05360217">
                <text:p>0.05360217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530.824645996094">
                <text:p>530.824645996094</text:p>
              </table:table-cell>
              <table:table-cell office:value-type="float" office:value="0.007209915">
                <text:p>0.00720991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530.941833496094">
                <text:p>530.941833496094</text:p>
              </table:table-cell>
              <table:table-cell office:value-type="float" office:value="0.001901658">
                <text:p>0.001901658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531.059020996094">
                <text:p>531.059020996094</text:p>
              </table:table-cell>
              <table:table-cell office:value-type="float" office:value="0.001851426">
                <text:p>0.00185142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531.17626953125">
                <text:p>531.17626953125</text:p>
              </table:table-cell>
              <table:table-cell office:value-type="float" office:value="-0.003060281">
                <text:p>-0.00306028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531.29345703125">
                <text:p>531.29345703125</text:p>
              </table:table-cell>
              <table:table-cell office:value-type="float" office:value="0.001756473">
                <text:p>0.001756473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531.410705566406">
                <text:p>531.410705566406</text:p>
              </table:table-cell>
              <table:table-cell office:value-type="float" office:value="0.002441312">
                <text:p>0.00244131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531.527893066406">
                <text:p>531.527893066406</text:p>
              </table:table-cell>
              <table:table-cell office:value-type="float" office:value="-0.005933646">
                <text:p>-0.005933646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531.645141601563">
                <text:p>531.645141601563</text:p>
              </table:table-cell>
              <table:table-cell office:value-type="float" office:value="-0.002285338">
                <text:p>-0.00228533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531.762329101563">
                <text:p>531.762329101563</text:p>
              </table:table-cell>
              <table:table-cell office:value-type="float" office:value="-0.0002067516">
                <text:p>-0.000206751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531.879577636719">
                <text:p>531.879577636719</text:p>
              </table:table-cell>
              <table:table-cell office:value-type="float" office:value="-0.004735935">
                <text:p>-0.00473593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31.996826171875">
                <text:p>531.996826171875</text:p>
              </table:table-cell>
              <table:table-cell office:value-type="float" office:value="0.002647015">
                <text:p>0.00264701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32.114074707031">
                <text:p>532.114074707031</text:p>
              </table:table-cell>
              <table:table-cell office:value-type="float" office:value="0.02685035">
                <text:p>0.0268503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32.231323242188">
                <text:p>532.231323242188</text:p>
              </table:table-cell>
              <table:table-cell office:value-type="float" office:value="0.003295896">
                <text:p>0.003295896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32.348510742188">
                <text:p>532.348510742188</text:p>
              </table:table-cell>
              <table:table-cell office:value-type="float" office:value="0.01946419">
                <text:p>0.0194641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32.465759277344">
                <text:p>532.465759277344</text:p>
              </table:table-cell>
              <table:table-cell office:value-type="float" office:value="-0.007137342">
                <text:p>-0.00713734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32.583068847656">
                <text:p>532.583068847656</text:p>
              </table:table-cell>
              <table:table-cell office:value-type="float" office:value="-0.00326102">
                <text:p>-0.0032610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32.700317382813">
                <text:p>532.700317382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32.817565917969">
                <text:p>532.817565917969</text:p>
              </table:table-cell>
              <table:table-cell office:value-type="float" office:value="-0.01157693">
                <text:p>-0.01157693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32.934814453125">
                <text:p>532.934814453125</text:p>
              </table:table-cell>
              <table:table-cell office:value-type="float" office:value="0.007672027">
                <text:p>0.00767202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533.052062988281">
                <text:p>533.052062988281</text:p>
              </table:table-cell>
              <table:table-cell office:value-type="float" office:value="-0.006021138">
                <text:p>-0.00602113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533.169372558594">
                <text:p>533.169372558594</text:p>
              </table:table-cell>
              <table:table-cell office:value-type="float" office:value="-0.00602203">
                <text:p>-0.0060220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533.28662109375">
                <text:p>533.28662109375</text:p>
              </table:table-cell>
              <table:table-cell office:value-type="float" office:value="0.02433437">
                <text:p>0.0243343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533.403869628906">
                <text:p>533.403869628906</text:p>
              </table:table-cell>
              <table:table-cell office:value-type="float" office:value="-0.002721541">
                <text:p>-0.002721541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533.521179199219">
                <text:p>533.521179199219</text:p>
              </table:table-cell>
              <table:table-cell office:value-type="float" office:value="0.006578151">
                <text:p>0.00657815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33.638427734375">
                <text:p>533.638427734375</text:p>
              </table:table-cell>
              <table:table-cell office:value-type="float" office:value="0.005533057">
                <text:p>0.00553305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533.755737304688">
                <text:p>533.755737304688</text:p>
              </table:table-cell>
              <table:table-cell office:value-type="float" office:value="-0.009445792">
                <text:p>-0.00944579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533.873046875">
                <text:p>533.873046875</text:p>
              </table:table-cell>
              <table:table-cell office:value-type="float" office:value="0.01413971">
                <text:p>0.0141397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533.990295410156">
                <text:p>533.990295410156</text:p>
              </table:table-cell>
              <table:table-cell office:value-type="float" office:value="0.008265158">
                <text:p>0.008265158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534.107604980469">
                <text:p>534.107604980469</text:p>
              </table:table-cell>
              <table:table-cell office:value-type="float" office:value="-0.0006890853">
                <text:p>-0.000689085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534.224914550781">
                <text:p>534.224914550781</text:p>
              </table:table-cell>
              <table:table-cell office:value-type="float" office:value="0.006036631">
                <text:p>0.006036631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534.342224121094">
                <text:p>534.342224121094</text:p>
              </table:table-cell>
              <table:table-cell office:value-type="float" office:value="-0.005169746">
                <text:p>-0.00516974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34.459533691406">
                <text:p>534.459533691406</text:p>
              </table:table-cell>
              <table:table-cell office:value-type="float" office:value="-0.00441478">
                <text:p>-0.0044147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34.576843261719">
                <text:p>534.576843261719</text:p>
              </table:table-cell>
              <table:table-cell office:value-type="float" office:value="0.00796133">
                <text:p>0.0079613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34.694152832031">
                <text:p>534.694152832031</text:p>
              </table:table-cell>
              <table:table-cell office:value-type="float" office:value="-0.009612183">
                <text:p>-0.009612183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34.811462402344">
                <text:p>534.811462402344</text:p>
              </table:table-cell>
              <table:table-cell office:value-type="float" office:value="-0.00179452">
                <text:p>-0.0017945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534.928771972656">
                <text:p>534.928771972656</text:p>
              </table:table-cell>
              <table:table-cell office:value-type="float" office:value="-0.006402906">
                <text:p>-0.00640290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35.046081542969">
                <text:p>535.046081542969</text:p>
              </table:table-cell>
              <table:table-cell office:value-type="float" office:value="-0.008617386">
                <text:p>-0.008617386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535.163452148438">
                <text:p>535.163452148438</text:p>
              </table:table-cell>
              <table:table-cell office:value-type="float" office:value="0.004815978">
                <text:p>0.00481597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35.28076171875">
                <text:p>535.2807617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35.398071289063">
                <text:p>535.398071289063</text:p>
              </table:table-cell>
              <table:table-cell office:value-type="float" office:value="0.0007475817">
                <text:p>0.000747581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535.515441894531">
                <text:p>535.515441894531</text:p>
              </table:table-cell>
              <table:table-cell office:value-type="float" office:value="-0.01086531">
                <text:p>-0.01086531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535.632751464844">
                <text:p>535.632751464844</text:p>
              </table:table-cell>
              <table:table-cell office:value-type="float" office:value="-0.005534784">
                <text:p>-0.005534784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35.750122070313">
                <text:p>535.750122070313</text:p>
              </table:table-cell>
              <table:table-cell office:value-type="float" office:value="-0.004487757">
                <text:p>-0.00448775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535.867431640625">
                <text:p>535.867431640625</text:p>
              </table:table-cell>
              <table:table-cell office:value-type="float" office:value="0.004200228">
                <text:p>0.004200228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535.984802246094">
                <text:p>535.984802246094</text:p>
              </table:table-cell>
              <table:table-cell office:value-type="float" office:value="0.01030716">
                <text:p>0.01030716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36.102172851563">
                <text:p>536.102172851563</text:p>
              </table:table-cell>
              <table:table-cell office:value-type="float" office:value="0.008169389">
                <text:p>0.00816938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36.219543457031">
                <text:p>536.219543457031</text:p>
              </table:table-cell>
              <table:table-cell office:value-type="float" office:value="-0.001260536">
                <text:p>-0.00126053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36.336853027344">
                <text:p>536.336853027344</text:p>
              </table:table-cell>
              <table:table-cell office:value-type="float" office:value="-0.004782185">
                <text:p>-0.00478218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6.454223632813">
                <text:p>536.454223632813</text:p>
              </table:table-cell>
              <table:table-cell office:value-type="float" office:value="-0.0137885">
                <text:p>-0.013788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36.571594238281">
                <text:p>536.571594238281</text:p>
              </table:table-cell>
              <table:table-cell office:value-type="float" office:value="-0.01037626">
                <text:p>-0.0103762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536.68896484375">
                <text:p>536.68896484375</text:p>
              </table:table-cell>
              <table:table-cell office:value-type="float" office:value="-0.004515377">
                <text:p>-0.00451537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536.806335449219">
                <text:p>536.806335449219</text:p>
              </table:table-cell>
              <table:table-cell office:value-type="float" office:value="-0.001320917">
                <text:p>-0.00132091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536.923706054688">
                <text:p>536.923706054688</text:p>
              </table:table-cell>
              <table:table-cell office:value-type="float" office:value="0.02072556">
                <text:p>0.0207255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537.041076660156">
                <text:p>537.041076660156</text:p>
              </table:table-cell>
              <table:table-cell office:value-type="float" office:value="-0.002231837">
                <text:p>-0.002231837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537.158508300781">
                <text:p>537.158508300781</text:p>
              </table:table-cell>
              <table:table-cell office:value-type="float" office:value="0.0008177432">
                <text:p>0.0008177432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537.27587890625">
                <text:p>537.27587890625</text:p>
              </table:table-cell>
              <table:table-cell office:value-type="float" office:value="-0.0005829405">
                <text:p>-0.000582940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537.393249511719">
                <text:p>537.393249511719</text:p>
              </table:table-cell>
              <table:table-cell office:value-type="float" office:value="0.002087907">
                <text:p>0.00208790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537.510681152344">
                <text:p>537.510681152344</text:p>
              </table:table-cell>
              <table:table-cell office:value-type="float" office:value="-0.005406796">
                <text:p>-0.00540679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537.628051757813">
                <text:p>537.628051757813</text:p>
              </table:table-cell>
              <table:table-cell office:value-type="float" office:value="0.001161363">
                <text:p>0.00116136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537.745483398438">
                <text:p>537.745483398438</text:p>
              </table:table-cell>
              <table:table-cell office:value-type="float" office:value="-0.004018315">
                <text:p>-0.00401831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537.862854003906">
                <text:p>537.862854003906</text:p>
              </table:table-cell>
              <table:table-cell office:value-type="float" office:value="0.001820655">
                <text:p>0.00182065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537.980285644531">
                <text:p>537.980285644531</text:p>
              </table:table-cell>
              <table:table-cell office:value-type="float" office:value="-0.01391233">
                <text:p>-0.01391233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538.09765625">
                <text:p>538.09765625</text:p>
              </table:table-cell>
              <table:table-cell office:value-type="float" office:value="0.03452605">
                <text:p>0.0345260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538.215087890625">
                <text:p>538.215087890625</text:p>
              </table:table-cell>
              <table:table-cell office:value-type="float" office:value="0.0007406042">
                <text:p>0.000740604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38.33251953125">
                <text:p>538.33251953125</text:p>
              </table:table-cell>
              <table:table-cell office:value-type="float" office:value="0.02977515">
                <text:p>0.0297751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538.449890136719">
                <text:p>538.44989013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538.567321777344">
                <text:p>538.567321777344</text:p>
              </table:table-cell>
              <table:table-cell office:value-type="float" office:value="0.03413024">
                <text:p>0.0341302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538.684753417969">
                <text:p>538.684753417969</text:p>
              </table:table-cell>
              <table:table-cell office:value-type="float" office:value="-0.001754302">
                <text:p>-0.00175430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538.802185058594">
                <text:p>538.802185058594</text:p>
              </table:table-cell>
              <table:table-cell office:value-type="float" office:value="0.00449505">
                <text:p>0.0044950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538.919616699219">
                <text:p>538.919616699219</text:p>
              </table:table-cell>
              <table:table-cell office:value-type="float" office:value="-0.01186987">
                <text:p>-0.0118698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539.037048339844">
                <text:p>539.037048339844</text:p>
              </table:table-cell>
              <table:table-cell office:value-type="float" office:value="0.00717863">
                <text:p>0.0071786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39.154479980469">
                <text:p>539.154479980469</text:p>
              </table:table-cell>
              <table:table-cell office:value-type="float" office:value="0.001339478">
                <text:p>0.001339478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39.27197265625">
                <text:p>539.27197265625</text:p>
              </table:table-cell>
              <table:table-cell office:value-type="float" office:value="-0.009526871">
                <text:p>-0.00952687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539.389404296875">
                <text:p>539.389404296875</text:p>
              </table:table-cell>
              <table:table-cell office:value-type="float" office:value="0.0002638463">
                <text:p>0.0002638463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539.5068359375">
                <text:p>539.5068359375</text:p>
              </table:table-cell>
              <table:table-cell office:value-type="float" office:value="-0.002415108">
                <text:p>-0.00241510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539.624267578125">
                <text:p>539.624267578125</text:p>
              </table:table-cell>
              <table:table-cell office:value-type="float" office:value="-0.003096775">
                <text:p>-0.00309677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539.741760253906">
                <text:p>539.741760253906</text:p>
              </table:table-cell>
              <table:table-cell office:value-type="float" office:value="-0.004612128">
                <text:p>-0.00461212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539.859191894531">
                <text:p>539.859191894531</text:p>
              </table:table-cell>
              <table:table-cell office:value-type="float" office:value="-0.01267078">
                <text:p>-0.0126707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539.976684570313">
                <text:p>539.976684570313</text:p>
              </table:table-cell>
              <table:table-cell office:value-type="float" office:value="0.006115727">
                <text:p>0.00611572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540.094116210938">
                <text:p>540.094116210938</text:p>
              </table:table-cell>
              <table:table-cell office:value-type="float" office:value="-0.009912028">
                <text:p>-0.00991202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540.211608886719">
                <text:p>540.211608886719</text:p>
              </table:table-cell>
              <table:table-cell office:value-type="float" office:value="-0.01057338">
                <text:p>-0.0105733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540.3291015625">
                <text:p>540.3291015625</text:p>
              </table:table-cell>
              <table:table-cell office:value-type="float" office:value="-0.003026595">
                <text:p>-0.00302659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540.446533203125">
                <text:p>540.446533203125</text:p>
              </table:table-cell>
              <table:table-cell office:value-type="float" office:value="-0.005239562">
                <text:p>-0.005239562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540.564025878906">
                <text:p>540.564025878906</text:p>
              </table:table-cell>
              <table:table-cell office:value-type="float" office:value="0.01283765">
                <text:p>0.0128376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540.681518554688">
                <text:p>540.681518554688</text:p>
              </table:table-cell>
              <table:table-cell office:value-type="float" office:value="-0.004709399">
                <text:p>-0.00470939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540.799011230469">
                <text:p>540.799011230469</text:p>
              </table:table-cell>
              <table:table-cell office:value-type="float" office:value="-0.00477284">
                <text:p>-0.0047728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540.91650390625">
                <text:p>540.91650390625</text:p>
              </table:table-cell>
              <table:table-cell office:value-type="float" office:value="-0.01080709">
                <text:p>-0.0108070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541.033996582031">
                <text:p>541.033996582031</text:p>
              </table:table-cell>
              <table:table-cell office:value-type="float" office:value="-0.002274969">
                <text:p>-0.00227496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41.151489257813">
                <text:p>541.151489257813</text:p>
              </table:table-cell>
              <table:table-cell office:value-type="float" office:value="0.001623635">
                <text:p>0.00162363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541.268981933594">
                <text:p>541.268981933594</text:p>
              </table:table-cell>
              <table:table-cell office:value-type="float" office:value="-0.00495418">
                <text:p>-0.0049541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541.386474609375">
                <text:p>541.386474609375</text:p>
              </table:table-cell>
              <table:table-cell office:value-type="float" office:value="0.008401022">
                <text:p>0.00840102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541.503967285156">
                <text:p>541.503967285156</text:p>
              </table:table-cell>
              <table:table-cell office:value-type="float" office:value="-0.004136775">
                <text:p>-0.00413677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541.621459960938">
                <text:p>541.621459960938</text:p>
              </table:table-cell>
              <table:table-cell office:value-type="float" office:value="0.0005500786">
                <text:p>0.0005500786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541.739013671875">
                <text:p>541.739013671875</text:p>
              </table:table-cell>
              <table:table-cell office:value-type="float" office:value="0.01367037">
                <text:p>0.01367037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541.856506347656">
                <text:p>541.856506347656</text:p>
              </table:table-cell>
              <table:table-cell office:value-type="float" office:value="-0.002859234">
                <text:p>-0.00285923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541.974060058594">
                <text:p>541.974060058594</text:p>
              </table:table-cell>
              <table:table-cell office:value-type="float" office:value="-0.01265305">
                <text:p>-0.0126530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542.091552734375">
                <text:p>542.091552734375</text:p>
              </table:table-cell>
              <table:table-cell office:value-type="float" office:value="0.001795636">
                <text:p>0.00179563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542.209106445313">
                <text:p>542.209106445313</text:p>
              </table:table-cell>
              <table:table-cell office:value-type="float" office:value="0.0006471399">
                <text:p>0.0006471399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542.326599121094">
                <text:p>542.326599121094</text:p>
              </table:table-cell>
              <table:table-cell office:value-type="float" office:value="-0.00843206">
                <text:p>-0.00843206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542.444152832031">
                <text:p>542.444152832031</text:p>
              </table:table-cell>
              <table:table-cell office:value-type="float" office:value="0.007504304">
                <text:p>0.00750430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42.561645507813">
                <text:p>542.561645507813</text:p>
              </table:table-cell>
              <table:table-cell office:value-type="float" office:value="-0.002312331">
                <text:p>-0.002312331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42.67919921875">
                <text:p>542.67919921875</text:p>
              </table:table-cell>
              <table:table-cell office:value-type="float" office:value="-0.008895274">
                <text:p>-0.00889527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42.796752929688">
                <text:p>542.796752929688</text:p>
              </table:table-cell>
              <table:table-cell office:value-type="float" office:value="0.007344123">
                <text:p>0.00734412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42.914306640625">
                <text:p>542.914306640625</text:p>
              </table:table-cell>
              <table:table-cell office:value-type="float" office:value="-0.00440385">
                <text:p>-0.0044038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43.031860351563">
                <text:p>543.031860351563</text:p>
              </table:table-cell>
              <table:table-cell office:value-type="float" office:value="0.005522482">
                <text:p>0.00552248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3.1494140625">
                <text:p>543.1494140625</text:p>
              </table:table-cell>
              <table:table-cell office:value-type="float" office:value="-0.01338739">
                <text:p>-0.01338739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43.266967773438">
                <text:p>543.266967773438</text:p>
              </table:table-cell>
              <table:table-cell office:value-type="float" office:value="0.0008968835">
                <text:p>0.000896883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43.384521484375">
                <text:p>543.384521484375</text:p>
              </table:table-cell>
              <table:table-cell office:value-type="float" office:value="0.004199316">
                <text:p>0.00419931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43.502075195313">
                <text:p>543.502075195313</text:p>
              </table:table-cell>
              <table:table-cell office:value-type="float" office:value="-0.0101387">
                <text:p>-0.010138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43.61962890625">
                <text:p>543.61962890625</text:p>
              </table:table-cell>
              <table:table-cell office:value-type="float" office:value="0.0007067786">
                <text:p>0.000706778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543.737182617188">
                <text:p>543.737182617188</text:p>
              </table:table-cell>
              <table:table-cell office:value-type="float" office:value="-0.007222534">
                <text:p>-0.00722253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543.854736328125">
                <text:p>543.854736328125</text:p>
              </table:table-cell>
              <table:table-cell office:value-type="float" office:value="-0.005464017">
                <text:p>-0.00546401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543.972351074219">
                <text:p>543.972351074219</text:p>
              </table:table-cell>
              <table:table-cell office:value-type="float" office:value="0.0001499367">
                <text:p>0.000149936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544.089904785156">
                <text:p>544.089904785156</text:p>
              </table:table-cell>
              <table:table-cell office:value-type="float" office:value="-0.003629463">
                <text:p>-0.00362946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544.207458496094">
                <text:p>544.207458496094</text:p>
              </table:table-cell>
              <table:table-cell office:value-type="float" office:value="-0.001508721">
                <text:p>-0.00150872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544.325073242188">
                <text:p>544.325073242188</text:p>
              </table:table-cell>
              <table:table-cell office:value-type="float" office:value="0.005299175">
                <text:p>0.00529917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544.442626953125">
                <text:p>544.442626953125</text:p>
              </table:table-cell>
              <table:table-cell office:value-type="float" office:value="-0.009276687">
                <text:p>-0.00927668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44.560241699219">
                <text:p>544.560241699219</text:p>
              </table:table-cell>
              <table:table-cell office:value-type="float" office:value="0.00197782">
                <text:p>0.0019778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544.677856445313">
                <text:p>544.677856445313</text:p>
              </table:table-cell>
              <table:table-cell office:value-type="float" office:value="0.001979976">
                <text:p>0.001979976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544.79541015625">
                <text:p>544.79541015625</text:p>
              </table:table-cell>
              <table:table-cell office:value-type="float" office:value="0.002758229">
                <text:p>0.00275822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544.913024902344">
                <text:p>544.913024902344</text:p>
              </table:table-cell>
              <table:table-cell office:value-type="float" office:value="-0.01095667">
                <text:p>-0.01095667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545.030639648438">
                <text:p>545.030639648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545.148254394531">
                <text:p>545.148254394531</text:p>
              </table:table-cell>
              <table:table-cell office:value-type="float" office:value="0.002554045">
                <text:p>0.00255404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545.265869140625">
                <text:p>545.265869140625</text:p>
              </table:table-cell>
              <table:table-cell office:value-type="float" office:value="0.001339778">
                <text:p>0.001339778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545.383483886719">
                <text:p>545.383483886719</text:p>
              </table:table-cell>
              <table:table-cell office:value-type="float" office:value="-0.01393182">
                <text:p>-0.0139318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545.501098632813">
                <text:p>545.501098632813</text:p>
              </table:table-cell>
              <table:table-cell office:value-type="float" office:value="-0.0007809165">
                <text:p>-0.000780916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45.618713378906">
                <text:p>545.618713378906</text:p>
              </table:table-cell>
              <table:table-cell office:value-type="float" office:value="0.005239622">
                <text:p>0.00523962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545.736328125">
                <text:p>545.736328125</text:p>
              </table:table-cell>
              <table:table-cell office:value-type="float" office:value="0.004264586">
                <text:p>0.004264586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545.853942871094">
                <text:p>545.853942871094</text:p>
              </table:table-cell>
              <table:table-cell office:value-type="float" office:value="0.001563261">
                <text:p>0.00156326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545.971557617188">
                <text:p>545.971557617188</text:p>
              </table:table-cell>
              <table:table-cell office:value-type="float" office:value="0.0100502">
                <text:p>0.0100502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46.089172363281">
                <text:p>546.089172363281</text:p>
              </table:table-cell>
              <table:table-cell office:value-type="float" office:value="0.01131559">
                <text:p>0.0113155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546.206848144531">
                <text:p>546.206848144531</text:p>
              </table:table-cell>
              <table:table-cell office:value-type="float" office:value="0.01110069">
                <text:p>0.0111006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46.324462890625">
                <text:p>546.324462890625</text:p>
              </table:table-cell>
              <table:table-cell office:value-type="float" office:value="-0.00620697">
                <text:p>-0.00620697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546.442077636719">
                <text:p>546.442077636719</text:p>
              </table:table-cell>
              <table:table-cell office:value-type="float" office:value="0.003452319">
                <text:p>0.00345231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546.559753417969">
                <text:p>546.559753417969</text:p>
              </table:table-cell>
              <table:table-cell office:value-type="float" office:value="0.004316628">
                <text:p>0.004316628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546.677368164063">
                <text:p>546.677368164063</text:p>
              </table:table-cell>
              <table:table-cell office:value-type="float" office:value="0.0001592674">
                <text:p>0.0001592674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46.795043945313">
                <text:p>546.795043945313</text:p>
              </table:table-cell>
              <table:table-cell office:value-type="float" office:value="0.001511156">
                <text:p>0.001511156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46.912719726563">
                <text:p>546.912719726563</text:p>
              </table:table-cell>
              <table:table-cell office:value-type="float" office:value="0.005304684">
                <text:p>0.005304684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47.030334472656">
                <text:p>547.030334472656</text:p>
              </table:table-cell>
              <table:table-cell office:value-type="float" office:value="-0.003751123">
                <text:p>-0.00375112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47.148010253906">
                <text:p>547.148010253906</text:p>
              </table:table-cell>
              <table:table-cell office:value-type="float" office:value="0.004789958">
                <text:p>0.004789958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547.265686035156">
                <text:p>547.265686035156</text:p>
              </table:table-cell>
              <table:table-cell office:value-type="float" office:value="0.005879279">
                <text:p>0.00587927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47.383361816406">
                <text:p>547.383361816406</text:p>
              </table:table-cell>
              <table:table-cell office:value-type="float" office:value="0.005899072">
                <text:p>0.00589907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47.5009765625">
                <text:p>547.5009765625</text:p>
              </table:table-cell>
              <table:table-cell office:value-type="float" office:value="-0.007326414">
                <text:p>-0.007326414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547.61865234375">
                <text:p>547.61865234375</text:p>
              </table:table-cell>
              <table:table-cell office:value-type="float" office:value="0.000888521">
                <text:p>0.00088852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547.736328125">
                <text:p>547.736328125</text:p>
              </table:table-cell>
              <table:table-cell office:value-type="float" office:value="0.003947369">
                <text:p>0.003947369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47.85400390625">
                <text:p>547.85400390625</text:p>
              </table:table-cell>
              <table:table-cell office:value-type="float" office:value="-0.002909567">
                <text:p>-0.00290956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47.971740722656">
                <text:p>547.971740722656</text:p>
              </table:table-cell>
              <table:table-cell office:value-type="float" office:value="-0.0116894">
                <text:p>-0.011689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48.089416503906">
                <text:p>548.089416503906</text:p>
              </table:table-cell>
              <table:table-cell office:value-type="float" office:value="-0.007459983">
                <text:p>-0.00745998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48.207092285156">
                <text:p>548.207092285156</text:p>
              </table:table-cell>
              <table:table-cell office:value-type="float" office:value="0.007932511">
                <text:p>0.007932511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48.324768066406">
                <text:p>548.324768066406</text:p>
              </table:table-cell>
              <table:table-cell office:value-type="float" office:value="-0.009783866">
                <text:p>-0.009783866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48.442443847656">
                <text:p>548.442443847656</text:p>
              </table:table-cell>
              <table:table-cell office:value-type="float" office:value="-0.003731607">
                <text:p>-0.003731607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48.560180664063">
                <text:p>548.560180664063</text:p>
              </table:table-cell>
              <table:table-cell office:value-type="float" office:value="-0.003403714">
                <text:p>-0.003403714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48.677856445313">
                <text:p>548.677856445313</text:p>
              </table:table-cell>
              <table:table-cell office:value-type="float" office:value="0.007068576">
                <text:p>0.00706857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48.795593261719">
                <text:p>548.795593261719</text:p>
              </table:table-cell>
              <table:table-cell office:value-type="float" office:value="-0.004567716">
                <text:p>-0.00456771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48.913269042969">
                <text:p>548.913269042969</text:p>
              </table:table-cell>
              <table:table-cell office:value-type="float" office:value="-0.006379917">
                <text:p>-0.00637991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9.031005859375">
                <text:p>549.031005859375</text:p>
              </table:table-cell>
              <table:table-cell office:value-type="float" office:value="-0.002758448">
                <text:p>-0.00275844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49.148681640625">
                <text:p>549.148681640625</text:p>
              </table:table-cell>
              <table:table-cell office:value-type="float" office:value="-0.005365353">
                <text:p>-0.00536535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49.266418457031">
                <text:p>549.266418457031</text:p>
              </table:table-cell>
              <table:table-cell office:value-type="float" office:value="0.005237874">
                <text:p>0.00523787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49.384155273438">
                <text:p>549.384155273438</text:p>
              </table:table-cell>
              <table:table-cell office:value-type="float" office:value="-0.001295646">
                <text:p>-0.001295646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49.501831054688">
                <text:p>549.501831054688</text:p>
              </table:table-cell>
              <table:table-cell office:value-type="float" office:value="0.0040118">
                <text:p>0.004011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49.619567871094">
                <text:p>549.619567871094</text:p>
              </table:table-cell>
              <table:table-cell office:value-type="float" office:value="0.01625946">
                <text:p>0.0162594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49.7373046875">
                <text:p>549.7373046875</text:p>
              </table:table-cell>
              <table:table-cell office:value-type="float" office:value="0.007840333">
                <text:p>0.00784033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49.855041503906">
                <text:p>549.855041503906</text:p>
              </table:table-cell>
              <table:table-cell office:value-type="float" office:value="0.00227997">
                <text:p>0.0022799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49.972778320313">
                <text:p>549.972778320313</text:p>
              </table:table-cell>
              <table:table-cell office:value-type="float" office:value="0.009052929">
                <text:p>0.009052929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50.090515136719">
                <text:p>550.090515136719</text:p>
              </table:table-cell>
              <table:table-cell office:value-type="float" office:value="-0.01106312">
                <text:p>-0.01106312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50.208251953125">
                <text:p>550.208251953125</text:p>
              </table:table-cell>
              <table:table-cell office:value-type="float" office:value="0.002688653">
                <text:p>0.002688653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50.325988769531">
                <text:p>550.325988769531</text:p>
              </table:table-cell>
              <table:table-cell office:value-type="float" office:value="-0.00582884">
                <text:p>-0.0058288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50.443725585938">
                <text:p>550.443725585938</text:p>
              </table:table-cell>
              <table:table-cell office:value-type="float" office:value="-0.0005420346">
                <text:p>-0.0005420346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50.561462402344">
                <text:p>550.561462402344</text:p>
              </table:table-cell>
              <table:table-cell office:value-type="float" office:value="0.01040415">
                <text:p>0.0104041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50.679260253906">
                <text:p>550.679260253906</text:p>
              </table:table-cell>
              <table:table-cell office:value-type="float" office:value="0.004790849">
                <text:p>0.00479084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50.796997070313">
                <text:p>550.796997070313</text:p>
              </table:table-cell>
              <table:table-cell office:value-type="float" office:value="0.0007444785">
                <text:p>0.000744478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50.914733886719">
                <text:p>550.914733886719</text:p>
              </table:table-cell>
              <table:table-cell office:value-type="float" office:value="0.003805948">
                <text:p>0.00380594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51.032531738281">
                <text:p>551.032531738281</text:p>
              </table:table-cell>
              <table:table-cell office:value-type="float" office:value="-0.003612262">
                <text:p>-0.003612262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51.150268554688">
                <text:p>551.150268554688</text:p>
              </table:table-cell>
              <table:table-cell office:value-type="float" office:value="0.003978503">
                <text:p>0.00397850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51.26806640625">
                <text:p>551.26806640625</text:p>
              </table:table-cell>
              <table:table-cell office:value-type="float" office:value="-0.009736053">
                <text:p>-0.009736053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51.385803222656">
                <text:p>551.385803222656</text:p>
              </table:table-cell>
              <table:table-cell office:value-type="float" office:value="0.005217816">
                <text:p>0.005217816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51.503601074219">
                <text:p>551.503601074219</text:p>
              </table:table-cell>
              <table:table-cell office:value-type="float" office:value="-0.008851162">
                <text:p>-0.008851162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51.621398925781">
                <text:p>551.621398925781</text:p>
              </table:table-cell>
              <table:table-cell office:value-type="float" office:value="0.01555712">
                <text:p>0.01555712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51.739135742188">
                <text:p>551.739135742188</text:p>
              </table:table-cell>
              <table:table-cell office:value-type="float" office:value="-0.001575764">
                <text:p>-0.001575764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51.85693359375">
                <text:p>551.85693359375</text:p>
              </table:table-cell>
              <table:table-cell office:value-type="float" office:value="-0.005755802">
                <text:p>-0.00575580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51.974731445313">
                <text:p>551.974731445313</text:p>
              </table:table-cell>
              <table:table-cell office:value-type="float" office:value="0.005033548">
                <text:p>0.005033548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52.092529296875">
                <text:p>552.092529296875</text:p>
              </table:table-cell>
              <table:table-cell office:value-type="float" office:value="-0.004326935">
                <text:p>-0.00432693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52.210327148438">
                <text:p>552.210327148438</text:p>
              </table:table-cell>
              <table:table-cell office:value-type="float" office:value="0.01171499">
                <text:p>0.01171499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52.328125">
                <text:p>552.328125</text:p>
              </table:table-cell>
              <table:table-cell office:value-type="float" office:value="-0.000905874">
                <text:p>-0.000905874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52.445922851563">
                <text:p>552.445922851563</text:p>
              </table:table-cell>
              <table:table-cell office:value-type="float" office:value="0.001485556">
                <text:p>0.001485556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52.563720703125">
                <text:p>552.563720703125</text:p>
              </table:table-cell>
              <table:table-cell office:value-type="float" office:value="0.01576474">
                <text:p>0.0157647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52.681518554688">
                <text:p>552.681518554688</text:p>
              </table:table-cell>
              <table:table-cell office:value-type="float" office:value="-0.002841256">
                <text:p>-0.00284125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52.79931640625">
                <text:p>552.79931640625</text:p>
              </table:table-cell>
              <table:table-cell office:value-type="float" office:value="-0.001179809">
                <text:p>-0.00117980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52.917114257813">
                <text:p>552.917114257813</text:p>
              </table:table-cell>
              <table:table-cell office:value-type="float" office:value="-0.003211446">
                <text:p>-0.003211446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53.034973144531">
                <text:p>553.034973144531</text:p>
              </table:table-cell>
              <table:table-cell office:value-type="float" office:value="-0.002345625">
                <text:p>-0.00234562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53.152770996094">
                <text:p>553.152770996094</text:p>
              </table:table-cell>
              <table:table-cell office:value-type="float" office:value="0.00318195">
                <text:p>0.0031819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53.270568847656">
                <text:p>553.270568847656</text:p>
              </table:table-cell>
              <table:table-cell office:value-type="float" office:value="0.02141654">
                <text:p>0.0214165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53.388427734375">
                <text:p>553.388427734375</text:p>
              </table:table-cell>
              <table:table-cell office:value-type="float" office:value="-0.00706638">
                <text:p>-0.00706638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53.506225585938">
                <text:p>553.506225585938</text:p>
              </table:table-cell>
              <table:table-cell office:value-type="float" office:value="0.01274755">
                <text:p>0.0127475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53.624084472656">
                <text:p>553.624084472656</text:p>
              </table:table-cell>
              <table:table-cell office:value-type="float" office:value="0.001884509">
                <text:p>0.001884509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53.741882324219">
                <text:p>553.741882324219</text:p>
              </table:table-cell>
              <table:table-cell office:value-type="float" office:value="-0.001985996">
                <text:p>-0.001985996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53.859741210938">
                <text:p>553.859741210938</text:p>
              </table:table-cell>
              <table:table-cell office:value-type="float" office:value="-0.009731881">
                <text:p>-0.009731881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53.977600097656">
                <text:p>553.977600097656</text:p>
              </table:table-cell>
              <table:table-cell office:value-type="float" office:value="0.002080506">
                <text:p>0.002080506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54.095458984375">
                <text:p>554.095458984375</text:p>
              </table:table-cell>
              <table:table-cell office:value-type="float" office:value="-0.002762669">
                <text:p>-0.002762669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54.213256835938">
                <text:p>554.213256835938</text:p>
              </table:table-cell>
              <table:table-cell office:value-type="float" office:value="0.02081816">
                <text:p>0.02081816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54.331115722656">
                <text:p>554.331115722656</text:p>
              </table:table-cell>
              <table:table-cell office:value-type="float" office:value="0.002815518">
                <text:p>0.002815518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54.448974609375">
                <text:p>554.448974609375</text:p>
              </table:table-cell>
              <table:table-cell office:value-type="float" office:value="0.001641987">
                <text:p>0.00164198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54.566833496094">
                <text:p>554.566833496094</text:p>
              </table:table-cell>
              <table:table-cell office:value-type="float" office:value="0.002248578">
                <text:p>0.002248578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54.684692382813">
                <text:p>554.684692382813</text:p>
              </table:table-cell>
              <table:table-cell office:value-type="float" office:value="-0.004345607">
                <text:p>-0.004345607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54.802551269531">
                <text:p>554.802551269531</text:p>
              </table:table-cell>
              <table:table-cell office:value-type="float" office:value="-0.003185414">
                <text:p>-0.003185414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54.92041015625">
                <text:p>554.92041015625</text:p>
              </table:table-cell>
              <table:table-cell office:value-type="float" office:value="-0.007257106">
                <text:p>-0.007257106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55.038269042969">
                <text:p>555.038269042969</text:p>
              </table:table-cell>
              <table:table-cell office:value-type="float" office:value="-0.0006151854">
                <text:p>-0.0006151854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55.156127929688">
                <text:p>555.156127929688</text:p>
              </table:table-cell>
              <table:table-cell office:value-type="float" office:value="-0.0005666695">
                <text:p>-0.000566669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55.274047851563">
                <text:p>555.274047851563</text:p>
              </table:table-cell>
              <table:table-cell office:value-type="float" office:value="0.000621695">
                <text:p>0.00062169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55.391906738281">
                <text:p>555.391906738281</text:p>
              </table:table-cell>
              <table:table-cell office:value-type="float" office:value="0.003185738">
                <text:p>0.003185738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55.509765625">
                <text:p>555.509765625</text:p>
              </table:table-cell>
              <table:table-cell office:value-type="float" office:value="0.002004652">
                <text:p>0.00200465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55.627685546875">
                <text:p>555.627685546875</text:p>
              </table:table-cell>
              <table:table-cell office:value-type="float" office:value="0.009848861">
                <text:p>0.009848861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55.745544433594">
                <text:p>555.745544433594</text:p>
              </table:table-cell>
              <table:table-cell office:value-type="float" office:value="0.007173517">
                <text:p>0.007173517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55.863403320313">
                <text:p>555.863403320313</text:p>
              </table:table-cell>
              <table:table-cell office:value-type="float" office:value="-0.004941696">
                <text:p>-0.004941696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55.981323242188">
                <text:p>555.981323242188</text:p>
              </table:table-cell>
              <table:table-cell office:value-type="float" office:value="0.003088405">
                <text:p>0.003088405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56.099243164063">
                <text:p>556.099243164063</text:p>
              </table:table-cell>
              <table:table-cell office:value-type="float" office:value="-0.001951635">
                <text:p>-0.00195163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56.217102050781">
                <text:p>556.217102050781</text:p>
              </table:table-cell>
              <table:table-cell office:value-type="float" office:value="0.0124185">
                <text:p>0.012418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56.335021972656">
                <text:p>556.335021972656</text:p>
              </table:table-cell>
              <table:table-cell office:value-type="float" office:value="0.0132558">
                <text:p>0.0132558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56.452941894531">
                <text:p>556.452941894531</text:p>
              </table:table-cell>
              <table:table-cell office:value-type="float" office:value="0.005059682">
                <text:p>0.005059682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56.57080078125">
                <text:p>556.57080078125</text:p>
              </table:table-cell>
              <table:table-cell office:value-type="float" office:value="0.005317095">
                <text:p>0.00531709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56.688720703125">
                <text:p>556.688720703125</text:p>
              </table:table-cell>
              <table:table-cell office:value-type="float" office:value="0.003270506">
                <text:p>0.003270506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56.806640625">
                <text:p>556.806640625</text:p>
              </table:table-cell>
              <table:table-cell office:value-type="float" office:value="0.0009730126">
                <text:p>0.0009730126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56.924560546875">
                <text:p>556.924560546875</text:p>
              </table:table-cell>
              <table:table-cell office:value-type="float" office:value="0.007948439">
                <text:p>0.007948439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57.04248046875">
                <text:p>557.04248046875</text:p>
              </table:table-cell>
              <table:table-cell office:value-type="float" office:value="0.002597689">
                <text:p>0.002597689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57.160400390625">
                <text:p>557.160400390625</text:p>
              </table:table-cell>
              <table:table-cell office:value-type="float" office:value="-0.002973871">
                <text:p>-0.002973871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57.2783203125">
                <text:p>557.2783203125</text:p>
              </table:table-cell>
              <table:table-cell office:value-type="float" office:value="0.01826072">
                <text:p>0.0182607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57.396240234375">
                <text:p>557.396240234375</text:p>
              </table:table-cell>
              <table:table-cell office:value-type="float" office:value="0.002391657">
                <text:p>0.00239165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57.51416015625">
                <text:p>557.51416015625</text:p>
              </table:table-cell>
              <table:table-cell office:value-type="float" office:value="-0.008330899">
                <text:p>-0.008330899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57.632141113281">
                <text:p>557.632141113281</text:p>
              </table:table-cell>
              <table:table-cell office:value-type="float" office:value="0.004596881">
                <text:p>0.004596881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57.750061035156">
                <text:p>557.750061035156</text:p>
              </table:table-cell>
              <table:table-cell office:value-type="float" office:value="-0.0002541163">
                <text:p>-0.0002541163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57.867980957031">
                <text:p>557.867980957031</text:p>
              </table:table-cell>
              <table:table-cell office:value-type="float" office:value="0.003583626">
                <text:p>0.00358362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57.985961914063">
                <text:p>557.985961914063</text:p>
              </table:table-cell>
              <table:table-cell office:value-type="float" office:value="-0.009248873">
                <text:p>-0.00924887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58.103881835938">
                <text:p>558.103881835938</text:p>
              </table:table-cell>
              <table:table-cell office:value-type="float" office:value="-0.006322998">
                <text:p>-0.006322998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58.221801757813">
                <text:p>558.221801757813</text:p>
              </table:table-cell>
              <table:table-cell office:value-type="float" office:value="-0.001699809">
                <text:p>-0.001699809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58.339782714844">
                <text:p>558.339782714844</text:p>
              </table:table-cell>
              <table:table-cell office:value-type="float" office:value="0.01080403">
                <text:p>0.01080403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58.457702636719">
                <text:p>558.457702636719</text:p>
              </table:table-cell>
              <table:table-cell office:value-type="float" office:value="-0.002401209">
                <text:p>-0.002401209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58.57568359375">
                <text:p>558.57568359375</text:p>
              </table:table-cell>
              <table:table-cell office:value-type="float" office:value="0.002694461">
                <text:p>0.002694461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58.693664550781">
                <text:p>558.693664550781</text:p>
              </table:table-cell>
              <table:table-cell office:value-type="float" office:value="0.00619067">
                <text:p>0.00619067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58.811584472656">
                <text:p>558.811584472656</text:p>
              </table:table-cell>
              <table:table-cell office:value-type="float" office:value="0.01015978">
                <text:p>0.01015978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58.929565429688">
                <text:p>558.929565429688</text:p>
              </table:table-cell>
              <table:table-cell office:value-type="float" office:value="-0.002112497">
                <text:p>-0.002112497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59.047546386719">
                <text:p>559.047546386719</text:p>
              </table:table-cell>
              <table:table-cell office:value-type="float" office:value="0.005171101">
                <text:p>0.00517110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59.16552734375">
                <text:p>559.16552734375</text:p>
              </table:table-cell>
              <table:table-cell office:value-type="float" office:value="0.004363128">
                <text:p>0.004363128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59.283508300781">
                <text:p>559.283508300781</text:p>
              </table:table-cell>
              <table:table-cell office:value-type="float" office:value="0.002360248">
                <text:p>0.002360248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59.401489257813">
                <text:p>559.401489257813</text:p>
              </table:table-cell>
              <table:table-cell office:value-type="float" office:value="0.008849293">
                <text:p>0.008849293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59.519470214844">
                <text:p>559.519470214844</text:p>
              </table:table-cell>
              <table:table-cell office:value-type="float" office:value="-0.008792556">
                <text:p>-0.008792556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59.637451171875">
                <text:p>559.637451171875</text:p>
              </table:table-cell>
              <table:table-cell office:value-type="float" office:value="0.005448265">
                <text:p>0.00544826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59.755432128906">
                <text:p>559.755432128906</text:p>
              </table:table-cell>
              <table:table-cell office:value-type="float" office:value="0.01208092">
                <text:p>0.01208092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59.873413085938">
                <text:p>559.873413085938</text:p>
              </table:table-cell>
              <table:table-cell office:value-type="float" office:value="0.0009975001">
                <text:p>0.000997500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59.991394042969">
                <text:p>559.991394042969</text:p>
              </table:table-cell>
              <table:table-cell office:value-type="float" office:value="0.006074636">
                <text:p>0.00607463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60.109375">
                <text:p>560.109375</text:p>
              </table:table-cell>
              <table:table-cell office:value-type="float" office:value="0.008855636">
                <text:p>0.008855636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60.227416992188">
                <text:p>560.227416992188</text:p>
              </table:table-cell>
              <table:table-cell office:value-type="float" office:value="0.001191183">
                <text:p>0.001191183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60.345397949219">
                <text:p>560.345397949219</text:p>
              </table:table-cell>
              <table:table-cell office:value-type="float" office:value="-0.004112442">
                <text:p>-0.00411244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60.46337890625">
                <text:p>560.46337890625</text:p>
              </table:table-cell>
              <table:table-cell office:value-type="float" office:value="0.008031293">
                <text:p>0.00803129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60.581420898438">
                <text:p>560.581420898438</text:p>
              </table:table-cell>
              <table:table-cell office:value-type="float" office:value="0.03004708">
                <text:p>0.03004708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60.699401855469">
                <text:p>560.699401855469</text:p>
              </table:table-cell>
              <table:table-cell office:value-type="float" office:value="-0.004059427">
                <text:p>-0.004059427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60.817443847656">
                <text:p>560.817443847656</text:p>
              </table:table-cell>
              <table:table-cell office:value-type="float" office:value="-0.001720669">
                <text:p>-0.001720669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60.935424804688">
                <text:p>560.935424804688</text:p>
              </table:table-cell>
              <table:table-cell office:value-type="float" office:value="0.01075294">
                <text:p>0.01075294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61.053466796875">
                <text:p>561.053466796875</text:p>
              </table:table-cell>
              <table:table-cell office:value-type="float" office:value="0.002669167">
                <text:p>0.002669167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61.171508789063">
                <text:p>561.171508789063</text:p>
              </table:table-cell>
              <table:table-cell office:value-type="float" office:value="-0.000157561">
                <text:p>-0.000157561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61.289489746094">
                <text:p>561.289489746094</text:p>
              </table:table-cell>
              <table:table-cell office:value-type="float" office:value="0.01071216">
                <text:p>0.01071216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61.407531738281">
                <text:p>561.407531738281</text:p>
              </table:table-cell>
              <table:table-cell office:value-type="float" office:value="0.001325286">
                <text:p>0.001325286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61.525573730469">
                <text:p>561.525573730469</text:p>
              </table:table-cell>
              <table:table-cell office:value-type="float" office:value="0.01723982">
                <text:p>0.01723982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61.643615722656">
                <text:p>561.643615722656</text:p>
              </table:table-cell>
              <table:table-cell office:value-type="float" office:value="-0.0008684333">
                <text:p>-0.000868433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61.761657714844">
                <text:p>561.761657714844</text:p>
              </table:table-cell>
              <table:table-cell office:value-type="float" office:value="-0.0051646">
                <text:p>-0.0051646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61.879699707031">
                <text:p>561.879699707031</text:p>
              </table:table-cell>
              <table:table-cell office:value-type="float" office:value="0.0152838">
                <text:p>0.015283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61.997741699219">
                <text:p>561.997741699219</text:p>
              </table:table-cell>
              <table:table-cell office:value-type="float" office:value="0.02308871">
                <text:p>0.0230887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62.115783691406">
                <text:p>562.115783691406</text:p>
              </table:table-cell>
              <table:table-cell office:value-type="float" office:value="-0.0008453006">
                <text:p>-0.0008453006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62.233825683594">
                <text:p>562.233825683594</text:p>
              </table:table-cell>
              <table:table-cell office:value-type="float" office:value="0.01304991">
                <text:p>0.01304991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62.351867675781">
                <text:p>562.351867675781</text:p>
              </table:table-cell>
              <table:table-cell office:value-type="float" office:value="0.009986307">
                <text:p>0.00998630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62.469909667969">
                <text:p>562.469909667969</text:p>
              </table:table-cell>
              <table:table-cell office:value-type="float" office:value="0.007962174">
                <text:p>0.007962174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62.588012695313">
                <text:p>562.588012695313</text:p>
              </table:table-cell>
              <table:table-cell office:value-type="float" office:value="0.005648824">
                <text:p>0.005648824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62.7060546875">
                <text:p>562.7060546875</text:p>
              </table:table-cell>
              <table:table-cell office:value-type="float" office:value="-0.005856181">
                <text:p>-0.005856181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62.824096679688">
                <text:p>562.824096679688</text:p>
              </table:table-cell>
              <table:table-cell office:value-type="float" office:value="-0.000980107">
                <text:p>-0.000980107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62.942199707031">
                <text:p>562.942199707031</text:p>
              </table:table-cell>
              <table:table-cell office:value-type="float" office:value="-0.0006619967">
                <text:p>-0.0006619967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63.060241699219">
                <text:p>563.060241699219</text:p>
              </table:table-cell>
              <table:table-cell office:value-type="float" office:value="0.008640761">
                <text:p>0.008640761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63.178344726563">
                <text:p>563.178344726563</text:p>
              </table:table-cell>
              <table:table-cell office:value-type="float" office:value="0.02103249">
                <text:p>0.0210324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63.29638671875">
                <text:p>563.29638671875</text:p>
              </table:table-cell>
              <table:table-cell office:value-type="float" office:value="-0.001341063">
                <text:p>-0.00134106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63.414489746094">
                <text:p>563.414489746094</text:p>
              </table:table-cell>
              <table:table-cell office:value-type="float" office:value="0.009476363">
                <text:p>0.009476363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63.532531738281">
                <text:p>563.532531738281</text:p>
              </table:table-cell>
              <table:table-cell office:value-type="float" office:value="0.02191185">
                <text:p>0.0219118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63.650634765625">
                <text:p>563.650634765625</text:p>
              </table:table-cell>
              <table:table-cell office:value-type="float" office:value="-0.0005964178">
                <text:p>-0.000596417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63.768737792969">
                <text:p>563.768737792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63.886779785156">
                <text:p>563.886779785156</text:p>
              </table:table-cell>
              <table:table-cell office:value-type="float" office:value="0.00863776">
                <text:p>0.00863776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64.0048828125">
                <text:p>564.0048828125</text:p>
              </table:table-cell>
              <table:table-cell office:value-type="float" office:value="0.001653868">
                <text:p>0.001653868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64.122985839844">
                <text:p>564.122985839844</text:p>
              </table:table-cell>
              <table:table-cell office:value-type="float" office:value="-0.004046907">
                <text:p>-0.004046907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64.241088867188">
                <text:p>564.241088867188</text:p>
              </table:table-cell>
              <table:table-cell office:value-type="float" office:value="0.01744942">
                <text:p>0.01744942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64.359191894531">
                <text:p>564.359191894531</text:p>
              </table:table-cell>
              <table:table-cell office:value-type="float" office:value="0.01538983">
                <text:p>0.01538983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64.477294921875">
                <text:p>564.477294921875</text:p>
              </table:table-cell>
              <table:table-cell office:value-type="float" office:value="0.008000102">
                <text:p>0.008000102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64.595397949219">
                <text:p>564.595397949219</text:p>
              </table:table-cell>
              <table:table-cell office:value-type="float" office:value="0.01538748">
                <text:p>0.01538748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64.713500976563">
                <text:p>564.713500976563</text:p>
              </table:table-cell>
              <table:table-cell office:value-type="float" office:value="0.04711964">
                <text:p>0.04711964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64.831604003906">
                <text:p>564.831604003906</text:p>
              </table:table-cell>
              <table:table-cell office:value-type="float" office:value="0.008454565">
                <text:p>0.00845456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64.949768066406">
                <text:p>564.949768066406</text:p>
              </table:table-cell>
              <table:table-cell office:value-type="float" office:value="0.01036631">
                <text:p>0.01036631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65.06787109375">
                <text:p>565.06787109375</text:p>
              </table:table-cell>
              <table:table-cell office:value-type="float" office:value="0.0173414">
                <text:p>0.0173414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65.185974121094">
                <text:p>565.185974121094</text:p>
              </table:table-cell>
              <table:table-cell office:value-type="float" office:value="0.01362825">
                <text:p>0.0136282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65.304077148438">
                <text:p>565.304077148438</text:p>
              </table:table-cell>
              <table:table-cell office:value-type="float" office:value="-0.0006547222">
                <text:p>-0.0006547222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65.422241210938">
                <text:p>565.422241210938</text:p>
              </table:table-cell>
              <table:table-cell office:value-type="float" office:value="0.007883633">
                <text:p>0.007883633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65.540344238281">
                <text:p>565.540344238281</text:p>
              </table:table-cell>
              <table:table-cell office:value-type="float" office:value="0.002662864">
                <text:p>0.002662864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65.658508300781">
                <text:p>565.658508300781</text:p>
              </table:table-cell>
              <table:table-cell office:value-type="float" office:value="0.01657141">
                <text:p>0.01657141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65.776611328125">
                <text:p>565.776611328125</text:p>
              </table:table-cell>
              <table:table-cell office:value-type="float" office:value="0.01214407">
                <text:p>0.01214407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65.894775390625">
                <text:p>565.894775390625</text:p>
              </table:table-cell>
              <table:table-cell office:value-type="float" office:value="0.02531207">
                <text:p>0.02531207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66.012878417969">
                <text:p>566.012878417969</text:p>
              </table:table-cell>
              <table:table-cell office:value-type="float" office:value="0.01296059">
                <text:p>0.01296059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66.131042480469">
                <text:p>566.131042480469</text:p>
              </table:table-cell>
              <table:table-cell office:value-type="float" office:value="0.009780678">
                <text:p>0.00978067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66.249206542969">
                <text:p>566.249206542969</text:p>
              </table:table-cell>
              <table:table-cell office:value-type="float" office:value="0.01314867">
                <text:p>0.01314867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66.367370605469">
                <text:p>566.367370605469</text:p>
              </table:table-cell>
              <table:table-cell office:value-type="float" office:value="0.01575862">
                <text:p>0.01575862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66.485473632813">
                <text:p>566.485473632813</text:p>
              </table:table-cell>
              <table:table-cell office:value-type="float" office:value="0.002623969">
                <text:p>0.002623969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66.603637695313">
                <text:p>566.603637695313</text:p>
              </table:table-cell>
              <table:table-cell office:value-type="float" office:value="0.03095608">
                <text:p>0.03095608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66.721801757813">
                <text:p>566.721801757813</text:p>
              </table:table-cell>
              <table:table-cell office:value-type="float" office:value="0.01664475">
                <text:p>0.0166447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66.839965820313">
                <text:p>566.839965820313</text:p>
              </table:table-cell>
              <table:table-cell office:value-type="float" office:value="0.01014502">
                <text:p>0.01014502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66.958129882813">
                <text:p>566.958129882813</text:p>
              </table:table-cell>
              <table:table-cell office:value-type="float" office:value="0.0191241">
                <text:p>0.0191241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67.076293945313">
                <text:p>567.076293945313</text:p>
              </table:table-cell>
              <table:table-cell office:value-type="float" office:value="0.0344527">
                <text:p>0.0344527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67.194458007813">
                <text:p>567.194458007813</text:p>
              </table:table-cell>
              <table:table-cell office:value-type="float" office:value="0.02413486">
                <text:p>0.02413486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67.312622070313">
                <text:p>567.312622070313</text:p>
              </table:table-cell>
              <table:table-cell office:value-type="float" office:value="0.01615253">
                <text:p>0.01615253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67.430847167969">
                <text:p>567.430847167969</text:p>
              </table:table-cell>
              <table:table-cell office:value-type="float" office:value="0.01100377">
                <text:p>0.01100377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67.549011230469">
                <text:p>567.549011230469</text:p>
              </table:table-cell>
              <table:table-cell office:value-type="float" office:value="0.02843077">
                <text:p>0.02843077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67.667175292969">
                <text:p>567.667175292969</text:p>
              </table:table-cell>
              <table:table-cell office:value-type="float" office:value="0.0191504">
                <text:p>0.0191504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67.785339355469">
                <text:p>567.785339355469</text:p>
              </table:table-cell>
              <table:table-cell office:value-type="float" office:value="0.02085034">
                <text:p>0.0208503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67.903564453125">
                <text:p>567.903564453125</text:p>
              </table:table-cell>
              <table:table-cell office:value-type="float" office:value="0.01331621">
                <text:p>0.01331621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68.021728515625">
                <text:p>568.021728515625</text:p>
              </table:table-cell>
              <table:table-cell office:value-type="float" office:value="0.04352777">
                <text:p>0.04352777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68.139953613281">
                <text:p>568.139953613281</text:p>
              </table:table-cell>
              <table:table-cell office:value-type="float" office:value="0.04581613">
                <text:p>0.04581613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68.258117675781">
                <text:p>568.258117675781</text:p>
              </table:table-cell>
              <table:table-cell office:value-type="float" office:value="0.007546532">
                <text:p>0.007546532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68.376342773438">
                <text:p>568.376342773438</text:p>
              </table:table-cell>
              <table:table-cell office:value-type="float" office:value="0.01484533">
                <text:p>0.01484533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68.494506835938">
                <text:p>568.494506835938</text:p>
              </table:table-cell>
              <table:table-cell office:value-type="float" office:value="0.02656251">
                <text:p>0.02656251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68.612731933594">
                <text:p>568.612731933594</text:p>
              </table:table-cell>
              <table:table-cell office:value-type="float" office:value="0.02861451">
                <text:p>0.02861451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68.73095703125">
                <text:p>568.73095703125</text:p>
              </table:table-cell>
              <table:table-cell office:value-type="float" office:value="0.003262381">
                <text:p>0.003262381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68.84912109375">
                <text:p>568.84912109375</text:p>
              </table:table-cell>
              <table:table-cell office:value-type="float" office:value="0.02311466">
                <text:p>0.02311466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68.967346191406">
                <text:p>568.967346191406</text:p>
              </table:table-cell>
              <table:table-cell office:value-type="float" office:value="0.02523213">
                <text:p>0.02523213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69.085571289063">
                <text:p>569.085571289063</text:p>
              </table:table-cell>
              <table:table-cell office:value-type="float" office:value="0.04029486">
                <text:p>0.04029486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69.203796386719">
                <text:p>569.203796386719</text:p>
              </table:table-cell>
              <table:table-cell office:value-type="float" office:value="0.005630256">
                <text:p>0.005630256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69.322021484375">
                <text:p>569.322021484375</text:p>
              </table:table-cell>
              <table:table-cell office:value-type="float" office:value="0.02053683">
                <text:p>0.02053683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69.440246582031">
                <text:p>569.440246582031</text:p>
              </table:table-cell>
              <table:table-cell office:value-type="float" office:value="0.02152723">
                <text:p>0.02152723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69.558471679688">
                <text:p>569.558471679688</text:p>
              </table:table-cell>
              <table:table-cell office:value-type="float" office:value="0.0287741">
                <text:p>0.0287741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69.676696777344">
                <text:p>569.676696777344</text:p>
              </table:table-cell>
              <table:table-cell office:value-type="float" office:value="0.02150272">
                <text:p>0.02150272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69.794921875">
                <text:p>569.794921875</text:p>
              </table:table-cell>
              <table:table-cell office:value-type="float" office:value="0.009367861">
                <text:p>0.009367861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69.913146972656">
                <text:p>569.913146972656</text:p>
              </table:table-cell>
              <table:table-cell office:value-type="float" office:value="0.007999732">
                <text:p>0.007999732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70.031372070313">
                <text:p>570.031372070313</text:p>
              </table:table-cell>
              <table:table-cell office:value-type="float" office:value="0.01712498">
                <text:p>0.01712498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70.149597167969">
                <text:p>570.149597167969</text:p>
              </table:table-cell>
              <table:table-cell office:value-type="float" office:value="0.01794326">
                <text:p>0.01794326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70.267883300781">
                <text:p>570.267883300781</text:p>
              </table:table-cell>
              <table:table-cell office:value-type="float" office:value="0.003496227">
                <text:p>0.003496227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70.386108398438">
                <text:p>570.386108398438</text:p>
              </table:table-cell>
              <table:table-cell office:value-type="float" office:value="0.01631304">
                <text:p>0.0163130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70.504333496094">
                <text:p>570.504333496094</text:p>
              </table:table-cell>
              <table:table-cell office:value-type="float" office:value="0.03226573">
                <text:p>0.0322657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70.622619628906">
                <text:p>570.622619628906</text:p>
              </table:table-cell>
              <table:table-cell office:value-type="float" office:value="0.03277191">
                <text:p>0.03277191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70.740844726563">
                <text:p>570.740844726563</text:p>
              </table:table-cell>
              <table:table-cell office:value-type="float" office:value="0.01687883">
                <text:p>0.01687883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70.859130859375">
                <text:p>570.859130859375</text:p>
              </table:table-cell>
              <table:table-cell office:value-type="float" office:value="0.0128205">
                <text:p>0.0128205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70.977355957031">
                <text:p>570.977355957031</text:p>
              </table:table-cell>
              <table:table-cell office:value-type="float" office:value="0.02194632">
                <text:p>0.0219463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71.095642089844">
                <text:p>571.095642089844</text:p>
              </table:table-cell>
              <table:table-cell office:value-type="float" office:value="0.009884335">
                <text:p>0.00988433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71.213928222656">
                <text:p>571.213928222656</text:p>
              </table:table-cell>
              <table:table-cell office:value-type="float" office:value="0.0202921">
                <text:p>0.0202921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71.332153320313">
                <text:p>571.332153320313</text:p>
              </table:table-cell>
              <table:table-cell office:value-type="float" office:value="0.02183584">
                <text:p>0.02183584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71.450439453125">
                <text:p>571.450439453125</text:p>
              </table:table-cell>
              <table:table-cell office:value-type="float" office:value="0.02014402">
                <text:p>0.0201440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71.568725585938">
                <text:p>571.568725585938</text:p>
              </table:table-cell>
              <table:table-cell office:value-type="float" office:value="0.00838898">
                <text:p>0.00838898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71.68701171875">
                <text:p>571.68701171875</text:p>
              </table:table-cell>
              <table:table-cell office:value-type="float" office:value="0.02671532">
                <text:p>0.02671532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71.805297851563">
                <text:p>571.805297851563</text:p>
              </table:table-cell>
              <table:table-cell office:value-type="float" office:value="0.01410379">
                <text:p>0.01410379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71.923583984375">
                <text:p>571.923583984375</text:p>
              </table:table-cell>
              <table:table-cell office:value-type="float" office:value="0.0401993">
                <text:p>0.0401993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72.041870117188">
                <text:p>572.041870117188</text:p>
              </table:table-cell>
              <table:table-cell office:value-type="float" office:value="0.01477915">
                <text:p>0.0147791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72.16015625">
                <text:p>572.16015625</text:p>
              </table:table-cell>
              <table:table-cell office:value-type="float" office:value="0.02903982">
                <text:p>0.0290398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72.278442382813">
                <text:p>572.278442382813</text:p>
              </table:table-cell>
              <table:table-cell office:value-type="float" office:value="0.01392536">
                <text:p>0.01392536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72.396728515625">
                <text:p>572.396728515625</text:p>
              </table:table-cell>
              <table:table-cell office:value-type="float" office:value="0.01281957">
                <text:p>0.01281957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72.515014648438">
                <text:p>572.515014648438</text:p>
              </table:table-cell>
              <table:table-cell office:value-type="float" office:value="0.01066309">
                <text:p>0.0106630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72.63330078125">
                <text:p>572.63330078125</text:p>
              </table:table-cell>
              <table:table-cell office:value-type="float" office:value="0.01721959">
                <text:p>0.01721959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72.751586914063">
                <text:p>572.751586914063</text:p>
              </table:table-cell>
              <table:table-cell office:value-type="float" office:value="0.02364499">
                <text:p>0.02364499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72.869934082031">
                <text:p>572.869934082031</text:p>
              </table:table-cell>
              <table:table-cell office:value-type="float" office:value="0.01191245">
                <text:p>0.0119124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72.988220214844">
                <text:p>572.988220214844</text:p>
              </table:table-cell>
              <table:table-cell office:value-type="float" office:value="0.01141196">
                <text:p>0.01141196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73.106506347656">
                <text:p>573.106506347656</text:p>
              </table:table-cell>
              <table:table-cell office:value-type="float" office:value="0.02624724">
                <text:p>0.0262472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73.224853515625">
                <text:p>573.224853515625</text:p>
              </table:table-cell>
              <table:table-cell office:value-type="float" office:value="0.01766478">
                <text:p>0.01766478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73.343139648438">
                <text:p>573.343139648438</text:p>
              </table:table-cell>
              <table:table-cell office:value-type="float" office:value="0.01853235">
                <text:p>0.0185323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73.461486816406">
                <text:p>573.461486816406</text:p>
              </table:table-cell>
              <table:table-cell office:value-type="float" office:value="0.02907996">
                <text:p>0.02907996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73.579772949219">
                <text:p>573.579772949219</text:p>
              </table:table-cell>
              <table:table-cell office:value-type="float" office:value="0.01633359">
                <text:p>0.01633359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73.698120117188">
                <text:p>573.698120117188</text:p>
              </table:table-cell>
              <table:table-cell office:value-type="float" office:value="0.02219151">
                <text:p>0.0221915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73.81640625">
                <text:p>573.81640625</text:p>
              </table:table-cell>
              <table:table-cell office:value-type="float" office:value="0.01407814">
                <text:p>0.01407814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73.934753417969">
                <text:p>573.934753417969</text:p>
              </table:table-cell>
              <table:table-cell office:value-type="float" office:value="0.01879546">
                <text:p>0.01879546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74.053100585938">
                <text:p>574.053100585938</text:p>
              </table:table-cell>
              <table:table-cell office:value-type="float" office:value="0.01545443">
                <text:p>0.01545443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74.171447753906">
                <text:p>574.171447753906</text:p>
              </table:table-cell>
              <table:table-cell office:value-type="float" office:value="0.0164851">
                <text:p>0.0164851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74.289733886719">
                <text:p>574.289733886719</text:p>
              </table:table-cell>
              <table:table-cell office:value-type="float" office:value="0.01289258">
                <text:p>0.01289258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74.408081054688">
                <text:p>574.408081054688</text:p>
              </table:table-cell>
              <table:table-cell office:value-type="float" office:value="0.0233221">
                <text:p>0.023322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74.526428222656">
                <text:p>574.526428222656</text:p>
              </table:table-cell>
              <table:table-cell office:value-type="float" office:value="0.02207859">
                <text:p>0.02207859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74.644775390625">
                <text:p>574.644775390625</text:p>
              </table:table-cell>
              <table:table-cell office:value-type="float" office:value="0.02090059">
                <text:p>0.02090059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74.763122558594">
                <text:p>574.763122558594</text:p>
              </table:table-cell>
              <table:table-cell office:value-type="float" office:value="0.02458198">
                <text:p>0.02458198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74.881469726563">
                <text:p>574.881469726563</text:p>
              </table:table-cell>
              <table:table-cell office:value-type="float" office:value="0.0281585">
                <text:p>0.028158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74.999816894531">
                <text:p>574.999816894531</text:p>
              </table:table-cell>
              <table:table-cell office:value-type="float" office:value="0.01574834">
                <text:p>0.01574834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75.1181640625">
                <text:p>575.1181640625</text:p>
              </table:table-cell>
              <table:table-cell office:value-type="float" office:value="0.04306344">
                <text:p>0.04306344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75.236572265625">
                <text:p>575.236572265625</text:p>
              </table:table-cell>
              <table:table-cell office:value-type="float" office:value="0.01561351">
                <text:p>0.01561351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75.354919433594">
                <text:p>575.354919433594</text:p>
              </table:table-cell>
              <table:table-cell office:value-type="float" office:value="0.03298603">
                <text:p>0.0329860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75.473266601563">
                <text:p>575.473266601563</text:p>
              </table:table-cell>
              <table:table-cell office:value-type="float" office:value="0.01485773">
                <text:p>0.0148577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75.591613769531">
                <text:p>575.591613769531</text:p>
              </table:table-cell>
              <table:table-cell office:value-type="float" office:value="0.01441893">
                <text:p>0.01441893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75.710021972656">
                <text:p>575.710021972656</text:p>
              </table:table-cell>
              <table:table-cell office:value-type="float" office:value="0.01559165">
                <text:p>0.0155916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75.828369140625">
                <text:p>575.828369140625</text:p>
              </table:table-cell>
              <table:table-cell office:value-type="float" office:value="0.01658185">
                <text:p>0.0165818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75.94677734375">
                <text:p>575.94677734375</text:p>
              </table:table-cell>
              <table:table-cell office:value-type="float" office:value="0.02603434">
                <text:p>0.02603434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76.065124511719">
                <text:p>576.065124511719</text:p>
              </table:table-cell>
              <table:table-cell office:value-type="float" office:value="0.02326526">
                <text:p>0.02326526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76.183532714844">
                <text:p>576.183532714844</text:p>
              </table:table-cell>
              <table:table-cell office:value-type="float" office:value="0.01439665">
                <text:p>0.0143966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76.301879882813">
                <text:p>576.301879882813</text:p>
              </table:table-cell>
              <table:table-cell office:value-type="float" office:value="0.02873886">
                <text:p>0.02873886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76.420288085938">
                <text:p>576.420288085938</text:p>
              </table:table-cell>
              <table:table-cell office:value-type="float" office:value="0.03226378">
                <text:p>0.03226378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76.538635253906">
                <text:p>576.538635253906</text:p>
              </table:table-cell>
              <table:table-cell office:value-type="float" office:value="0.01860479">
                <text:p>0.0186047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76.657043457031">
                <text:p>576.657043457031</text:p>
              </table:table-cell>
              <table:table-cell office:value-type="float" office:value="0.03754766">
                <text:p>0.03754766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76.775451660156">
                <text:p>576.775451660156</text:p>
              </table:table-cell>
              <table:table-cell office:value-type="float" office:value="0.01333627">
                <text:p>0.0133362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76.893859863281">
                <text:p>576.893859863281</text:p>
              </table:table-cell>
              <table:table-cell office:value-type="float" office:value="0.01901605">
                <text:p>0.0190160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77.012268066406">
                <text:p>577.012268066406</text:p>
              </table:table-cell>
              <table:table-cell office:value-type="float" office:value="0.03118661">
                <text:p>0.03118661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77.130615234375">
                <text:p>577.130615234375</text:p>
              </table:table-cell>
              <table:table-cell office:value-type="float" office:value="0.0240805">
                <text:p>0.024080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77.2490234375">
                <text:p>577.2490234375</text:p>
              </table:table-cell>
              <table:table-cell office:value-type="float" office:value="0.02940422">
                <text:p>0.02940422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77.367431640625">
                <text:p>577.367431640625</text:p>
              </table:table-cell>
              <table:table-cell office:value-type="float" office:value="0.01381984">
                <text:p>0.01381984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77.48583984375">
                <text:p>577.48583984375</text:p>
              </table:table-cell>
              <table:table-cell office:value-type="float" office:value="0.0286076">
                <text:p>0.0286076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577.604248046875">
                <text:p>577.604248046875</text:p>
              </table:table-cell>
              <table:table-cell office:value-type="float" office:value="0.01403624">
                <text:p>0.01403624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577.722717285156">
                <text:p>577.722717285156</text:p>
              </table:table-cell>
              <table:table-cell office:value-type="float" office:value="0.0186198">
                <text:p>0.0186198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577.841125488281">
                <text:p>577.841125488281</text:p>
              </table:table-cell>
              <table:table-cell office:value-type="float" office:value="0.02230876">
                <text:p>0.0223087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577.959533691406">
                <text:p>577.959533691406</text:p>
              </table:table-cell>
              <table:table-cell office:value-type="float" office:value="0.01717451">
                <text:p>0.01717451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578.077941894531">
                <text:p>578.077941894531</text:p>
              </table:table-cell>
              <table:table-cell office:value-type="float" office:value="0.03816115">
                <text:p>0.0381611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578.196350097656">
                <text:p>578.196350097656</text:p>
              </table:table-cell>
              <table:table-cell office:value-type="float" office:value="0.01798461">
                <text:p>0.01798461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578.314819335938">
                <text:p>578.314819335938</text:p>
              </table:table-cell>
              <table:table-cell office:value-type="float" office:value="0.01803209">
                <text:p>0.01803209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578.433227539063">
                <text:p>578.433227539063</text:p>
              </table:table-cell>
              <table:table-cell office:value-type="float" office:value="0.0203492">
                <text:p>0.0203492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578.551635742188">
                <text:p>578.551635742188</text:p>
              </table:table-cell>
              <table:table-cell office:value-type="float" office:value="0.02161998">
                <text:p>0.02161998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578.670104980469">
                <text:p>578.670104980469</text:p>
              </table:table-cell>
              <table:table-cell office:value-type="float" office:value="0.03347567">
                <text:p>0.03347567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578.788513183594">
                <text:p>578.788513183594</text:p>
              </table:table-cell>
              <table:table-cell office:value-type="float" office:value="0.05311136">
                <text:p>0.05311136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578.906982421875">
                <text:p>578.906982421875</text:p>
              </table:table-cell>
              <table:table-cell office:value-type="float" office:value="0.01369512">
                <text:p>0.01369512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579.025451660156">
                <text:p>579.025451660156</text:p>
              </table:table-cell>
              <table:table-cell office:value-type="float" office:value="0.02104568">
                <text:p>0.02104568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579.143859863281">
                <text:p>579.143859863281</text:p>
              </table:table-cell>
              <table:table-cell office:value-type="float" office:value="0.02720702">
                <text:p>0.02720702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579.262329101563">
                <text:p>579.262329101563</text:p>
              </table:table-cell>
              <table:table-cell office:value-type="float" office:value="0.02101087">
                <text:p>0.02101087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579.380798339844">
                <text:p>579.380798339844</text:p>
              </table:table-cell>
              <table:table-cell office:value-type="float" office:value="0.02552911">
                <text:p>0.02552911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579.499206542969">
                <text:p>579.499206542969</text:p>
              </table:table-cell>
              <table:table-cell office:value-type="float" office:value="0.01955818">
                <text:p>0.0195581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579.61767578125">
                <text:p>579.61767578125</text:p>
              </table:table-cell>
              <table:table-cell office:value-type="float" office:value="0.01939353">
                <text:p>0.01939353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579.736145019531">
                <text:p>579.736145019531</text:p>
              </table:table-cell>
              <table:table-cell office:value-type="float" office:value="0.02244032">
                <text:p>0.02244032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579.854614257813">
                <text:p>579.854614257813</text:p>
              </table:table-cell>
              <table:table-cell office:value-type="float" office:value="0.01547542">
                <text:p>0.0154754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579.973083496094">
                <text:p>579.973083496094</text:p>
              </table:table-cell>
              <table:table-cell office:value-type="float" office:value="0.01661958">
                <text:p>0.0166195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580.091552734375">
                <text:p>580.091552734375</text:p>
              </table:table-cell>
              <table:table-cell office:value-type="float" office:value="0.02795284">
                <text:p>0.02795284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580.210021972656">
                <text:p>580.210021972656</text:p>
              </table:table-cell>
              <table:table-cell office:value-type="float" office:value="0.04015467">
                <text:p>0.04015467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580.328491210938">
                <text:p>580.328491210938</text:p>
              </table:table-cell>
              <table:table-cell office:value-type="float" office:value="0.02798992">
                <text:p>0.02798992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580.446960449219">
                <text:p>580.446960449219</text:p>
              </table:table-cell>
              <table:table-cell office:value-type="float" office:value="0.02207539">
                <text:p>0.02207539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580.5654296875">
                <text:p>580.5654296875</text:p>
              </table:table-cell>
              <table:table-cell office:value-type="float" office:value="0.02157428">
                <text:p>0.0215742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580.683898925781">
                <text:p>580.683898925781</text:p>
              </table:table-cell>
              <table:table-cell office:value-type="float" office:value="0.03358595">
                <text:p>0.03358595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580.802368164063">
                <text:p>580.802368164063</text:p>
              </table:table-cell>
              <table:table-cell office:value-type="float" office:value="0.02638599">
                <text:p>0.02638599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580.9208984375">
                <text:p>580.9208984375</text:p>
              </table:table-cell>
              <table:table-cell office:value-type="float" office:value="0.02373185">
                <text:p>0.02373185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581.039367675781">
                <text:p>581.039367675781</text:p>
              </table:table-cell>
              <table:table-cell office:value-type="float" office:value="0.02311346">
                <text:p>0.02311346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581.157836914063">
                <text:p>581.157836914063</text:p>
              </table:table-cell>
              <table:table-cell office:value-type="float" office:value="0.03445786">
                <text:p>0.03445786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81.2763671875">
                <text:p>581.2763671875</text:p>
              </table:table-cell>
              <table:table-cell office:value-type="float" office:value="0.03855924">
                <text:p>0.03855924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81.394836425781">
                <text:p>581.394836425781</text:p>
              </table:table-cell>
              <table:table-cell office:value-type="float" office:value="0.02806571">
                <text:p>0.02806571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81.513366699219">
                <text:p>581.513366699219</text:p>
              </table:table-cell>
              <table:table-cell office:value-type="float" office:value="0.0364609">
                <text:p>0.0364609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581.6318359375">
                <text:p>581.6318359375</text:p>
              </table:table-cell>
              <table:table-cell office:value-type="float" office:value="0.02251369">
                <text:p>0.0225136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581.750366210938">
                <text:p>581.750366210938</text:p>
              </table:table-cell>
              <table:table-cell office:value-type="float" office:value="0.0180562">
                <text:p>0.0180562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581.868835449219">
                <text:p>581.868835449219</text:p>
              </table:table-cell>
              <table:table-cell office:value-type="float" office:value="0.02169405">
                <text:p>0.0216940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581.987365722656">
                <text:p>581.987365722656</text:p>
              </table:table-cell>
              <table:table-cell office:value-type="float" office:value="0.02374571">
                <text:p>0.02374571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582.105895996094">
                <text:p>582.105895996094</text:p>
              </table:table-cell>
              <table:table-cell office:value-type="float" office:value="0.02583844">
                <text:p>0.02583844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582.224365234375">
                <text:p>582.224365234375</text:p>
              </table:table-cell>
              <table:table-cell office:value-type="float" office:value="0.02905741">
                <text:p>0.02905741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582.342895507813">
                <text:p>582.342895507813</text:p>
              </table:table-cell>
              <table:table-cell office:value-type="float" office:value="0.02267554">
                <text:p>0.02267554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582.46142578125">
                <text:p>582.46142578125</text:p>
              </table:table-cell>
              <table:table-cell office:value-type="float" office:value="0.02651654">
                <text:p>0.02651654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582.579956054688">
                <text:p>582.579956054688</text:p>
              </table:table-cell>
              <table:table-cell office:value-type="float" office:value="0.0210692">
                <text:p>0.0210692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582.698486328125">
                <text:p>582.698486328125</text:p>
              </table:table-cell>
              <table:table-cell office:value-type="float" office:value="0.01819133">
                <text:p>0.01819133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582.817016601563">
                <text:p>582.817016601563</text:p>
              </table:table-cell>
              <table:table-cell office:value-type="float" office:value="0.02724257">
                <text:p>0.02724257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582.935546875">
                <text:p>582.935546875</text:p>
              </table:table-cell>
              <table:table-cell office:value-type="float" office:value="0.01612533">
                <text:p>0.01612533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583.054077148438">
                <text:p>583.054077148438</text:p>
              </table:table-cell>
              <table:table-cell office:value-type="float" office:value="0.02080929">
                <text:p>0.02080929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583.172607421875">
                <text:p>583.172607421875</text:p>
              </table:table-cell>
              <table:table-cell office:value-type="float" office:value="0.05438695">
                <text:p>0.0543869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583.291137695313">
                <text:p>583.291137695313</text:p>
              </table:table-cell>
              <table:table-cell office:value-type="float" office:value="0.02384249">
                <text:p>0.02384249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583.40966796875">
                <text:p>583.40966796875</text:p>
              </table:table-cell>
              <table:table-cell office:value-type="float" office:value="0.01887719">
                <text:p>0.01887719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583.528198242188">
                <text:p>583.528198242188</text:p>
              </table:table-cell>
              <table:table-cell office:value-type="float" office:value="0.02535346">
                <text:p>0.02535346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583.646789550781">
                <text:p>583.646789550781</text:p>
              </table:table-cell>
              <table:table-cell office:value-type="float" office:value="0.01960813">
                <text:p>0.01960813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583.765319824219">
                <text:p>583.765319824219</text:p>
              </table:table-cell>
              <table:table-cell office:value-type="float" office:value="0.01707939">
                <text:p>0.01707939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583.883850097656">
                <text:p>583.883850097656</text:p>
              </table:table-cell>
              <table:table-cell office:value-type="float" office:value="0.03214831">
                <text:p>0.03214831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584.00244140625">
                <text:p>584.00244140625</text:p>
              </table:table-cell>
              <table:table-cell office:value-type="float" office:value="0.01454058">
                <text:p>0.01454058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84.120971679688">
                <text:p>584.120971679688</text:p>
              </table:table-cell>
              <table:table-cell office:value-type="float" office:value="0.03274368">
                <text:p>0.03274368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84.239501953125">
                <text:p>584.239501953125</text:p>
              </table:table-cell>
              <table:table-cell office:value-type="float" office:value="0.02604157">
                <text:p>0.02604157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84.358093261719">
                <text:p>584.358093261719</text:p>
              </table:table-cell>
              <table:table-cell office:value-type="float" office:value="0.0213048">
                <text:p>0.0213048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584.476623535156">
                <text:p>584.476623535156</text:p>
              </table:table-cell>
              <table:table-cell office:value-type="float" office:value="0.02943044">
                <text:p>0.02943044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584.59521484375">
                <text:p>584.59521484375</text:p>
              </table:table-cell>
              <table:table-cell office:value-type="float" office:value="0.03273793">
                <text:p>0.03273793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584.713806152344">
                <text:p>584.713806152344</text:p>
              </table:table-cell>
              <table:table-cell office:value-type="float" office:value="0.02415641">
                <text:p>0.02415641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584.832336425781">
                <text:p>584.832336425781</text:p>
              </table:table-cell>
              <table:table-cell office:value-type="float" office:value="0.02384589">
                <text:p>0.02384589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584.950927734375">
                <text:p>584.950927734375</text:p>
              </table:table-cell>
              <table:table-cell office:value-type="float" office:value="0.02194575">
                <text:p>0.02194575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585.069519042969">
                <text:p>585.069519042969</text:p>
              </table:table-cell>
              <table:table-cell office:value-type="float" office:value="0.01304898">
                <text:p>0.01304898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585.188110351563">
                <text:p>585.188110351563</text:p>
              </table:table-cell>
              <table:table-cell office:value-type="float" office:value="0.02864158">
                <text:p>0.02864158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585.306640625">
                <text:p>585.306640625</text:p>
              </table:table-cell>
              <table:table-cell office:value-type="float" office:value="0.02977618">
                <text:p>0.02977618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585.425231933594">
                <text:p>585.425231933594</text:p>
              </table:table-cell>
              <table:table-cell office:value-type="float" office:value="0.02088783">
                <text:p>0.02088783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85.543823242188">
                <text:p>585.543823242188</text:p>
              </table:table-cell>
              <table:table-cell office:value-type="float" office:value="0.0464182">
                <text:p>0.046418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85.662414550781">
                <text:p>585.662414550781</text:p>
              </table:table-cell>
              <table:table-cell office:value-type="float" office:value="0.01448554">
                <text:p>0.01448554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85.781005859375">
                <text:p>585.781005859375</text:p>
              </table:table-cell>
              <table:table-cell office:value-type="float" office:value="0.02467149">
                <text:p>0.02467149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85.899597167969">
                <text:p>585.899597167969</text:p>
              </table:table-cell>
              <table:table-cell office:value-type="float" office:value="0.02905968">
                <text:p>0.02905968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86.018188476563">
                <text:p>586.018188476563</text:p>
              </table:table-cell>
              <table:table-cell office:value-type="float" office:value="0.01522723">
                <text:p>0.01522723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86.136779785156">
                <text:p>586.136779785156</text:p>
              </table:table-cell>
              <table:table-cell office:value-type="float" office:value="0.01751451">
                <text:p>0.0175145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86.255432128906">
                <text:p>586.255432128906</text:p>
              </table:table-cell>
              <table:table-cell office:value-type="float" office:value="0.02533338">
                <text:p>0.02533338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586.3740234375">
                <text:p>586.3740234375</text:p>
              </table:table-cell>
              <table:table-cell office:value-type="float" office:value="0.0279655">
                <text:p>0.0279655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586.492614746094">
                <text:p>586.492614746094</text:p>
              </table:table-cell>
              <table:table-cell office:value-type="float" office:value="0.02674754">
                <text:p>0.02674754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586.611206054688">
                <text:p>586.611206054688</text:p>
              </table:table-cell>
              <table:table-cell office:value-type="float" office:value="0.0359617">
                <text:p>0.035961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586.729858398438">
                <text:p>586.729858398438</text:p>
              </table:table-cell>
              <table:table-cell office:value-type="float" office:value="0.02890382">
                <text:p>0.02890382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586.848449707031">
                <text:p>586.848449707031</text:p>
              </table:table-cell>
              <table:table-cell office:value-type="float" office:value="0.03354956">
                <text:p>0.03354956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586.967041015625">
                <text:p>586.967041015625</text:p>
              </table:table-cell>
              <table:table-cell office:value-type="float" office:value="0.0184334">
                <text:p>0.0184334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587.085693359375">
                <text:p>587.085693359375</text:p>
              </table:table-cell>
              <table:table-cell office:value-type="float" office:value="0.02008709">
                <text:p>0.02008709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587.204284667969">
                <text:p>587.204284667969</text:p>
              </table:table-cell>
              <table:table-cell office:value-type="float" office:value="0.03219749">
                <text:p>0.03219749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587.322937011719">
                <text:p>587.322937011719</text:p>
              </table:table-cell>
              <table:table-cell office:value-type="float" office:value="0.02610646">
                <text:p>0.02610646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587.441589355469">
                <text:p>587.441589355469</text:p>
              </table:table-cell>
              <table:table-cell office:value-type="float" office:value="0.03305181">
                <text:p>0.03305181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587.560180664063">
                <text:p>587.560180664063</text:p>
              </table:table-cell>
              <table:table-cell office:value-type="float" office:value="0.01486064">
                <text:p>0.01486064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587.678833007813">
                <text:p>587.678833007813</text:p>
              </table:table-cell>
              <table:table-cell office:value-type="float" office:value="0.02524306">
                <text:p>0.02524306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587.797424316406">
                <text:p>587.797424316406</text:p>
              </table:table-cell>
              <table:table-cell office:value-type="float" office:value="0.03101397">
                <text:p>0.03101397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587.916076660156">
                <text:p>587.916076660156</text:p>
              </table:table-cell>
              <table:table-cell office:value-type="float" office:value="0.03482605">
                <text:p>0.0348260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588.034729003906">
                <text:p>588.034729003906</text:p>
              </table:table-cell>
              <table:table-cell office:value-type="float" office:value="0.02565947">
                <text:p>0.02565947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588.153381347656">
                <text:p>588.153381347656</text:p>
              </table:table-cell>
              <table:table-cell office:value-type="float" office:value="0.02652668">
                <text:p>0.02652668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588.272033691406">
                <text:p>588.272033691406</text:p>
              </table:table-cell>
              <table:table-cell office:value-type="float" office:value="0.02740292">
                <text:p>0.02740292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588.390686035156">
                <text:p>588.390686035156</text:p>
              </table:table-cell>
              <table:table-cell office:value-type="float" office:value="0.03800187">
                <text:p>0.03800187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588.509338378906">
                <text:p>588.509338378906</text:p>
              </table:table-cell>
              <table:table-cell office:value-type="float" office:value="0.02415891">
                <text:p>0.0241589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88.627990722656">
                <text:p>588.627990722656</text:p>
              </table:table-cell>
              <table:table-cell office:value-type="float" office:value="0.01908563">
                <text:p>0.0190856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88.746643066406">
                <text:p>588.746643066406</text:p>
              </table:table-cell>
              <table:table-cell office:value-type="float" office:value="0.01651735">
                <text:p>0.0165173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588.865295410156">
                <text:p>588.865295410156</text:p>
              </table:table-cell>
              <table:table-cell office:value-type="float" office:value="0.02271336">
                <text:p>0.02271336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588.983947753906">
                <text:p>588.983947753906</text:p>
              </table:table-cell>
              <table:table-cell office:value-type="float" office:value="0.01806302">
                <text:p>0.01806302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589.102600097656">
                <text:p>589.102600097656</text:p>
              </table:table-cell>
              <table:table-cell office:value-type="float" office:value="0.03036013">
                <text:p>0.03036013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589.221252441406">
                <text:p>589.221252441406</text:p>
              </table:table-cell>
              <table:table-cell office:value-type="float" office:value="0.0151944">
                <text:p>0.0151944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589.339904785156">
                <text:p>589.339904785156</text:p>
              </table:table-cell>
              <table:table-cell office:value-type="float" office:value="0.01980762">
                <text:p>0.01980762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589.458618164063">
                <text:p>589.458618164063</text:p>
              </table:table-cell>
              <table:table-cell office:value-type="float" office:value="0.01861841">
                <text:p>0.01861841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589.577270507813">
                <text:p>589.577270507813</text:p>
              </table:table-cell>
              <table:table-cell office:value-type="float" office:value="0.01348861">
                <text:p>0.01348861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589.695922851563">
                <text:p>589.695922851563</text:p>
              </table:table-cell>
              <table:table-cell office:value-type="float" office:value="0.02901945">
                <text:p>0.02901945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589.814636230469">
                <text:p>589.814636230469</text:p>
              </table:table-cell>
              <table:table-cell office:value-type="float" office:value="0.01449715">
                <text:p>0.0144971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589.933288574219">
                <text:p>589.933288574219</text:p>
              </table:table-cell>
              <table:table-cell office:value-type="float" office:value="0.02256965">
                <text:p>0.0225696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590.052001953125">
                <text:p>590.052001953125</text:p>
              </table:table-cell>
              <table:table-cell office:value-type="float" office:value="0.01731732">
                <text:p>0.01731732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590.170654296875">
                <text:p>590.170654296875</text:p>
              </table:table-cell>
              <table:table-cell office:value-type="float" office:value="0.02282189">
                <text:p>0.02282189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590.289367675781">
                <text:p>590.289367675781</text:p>
              </table:table-cell>
              <table:table-cell office:value-type="float" office:value="0.01334877">
                <text:p>0.01334877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590.408020019531">
                <text:p>590.408020019531</text:p>
              </table:table-cell>
              <table:table-cell office:value-type="float" office:value="0.06305735">
                <text:p>0.06305735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590.526733398438">
                <text:p>590.526733398438</text:p>
              </table:table-cell>
              <table:table-cell office:value-type="float" office:value="0.02918423">
                <text:p>0.02918423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590.645446777344">
                <text:p>590.645446777344</text:p>
              </table:table-cell>
              <table:table-cell office:value-type="float" office:value="0.01546095">
                <text:p>0.01546095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590.764099121094">
                <text:p>590.764099121094</text:p>
              </table:table-cell>
              <table:table-cell office:value-type="float" office:value="0.01817361">
                <text:p>0.01817361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590.8828125">
                <text:p>590.8828125</text:p>
              </table:table-cell>
              <table:table-cell office:value-type="float" office:value="0.02864543">
                <text:p>0.02864543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591.001525878906">
                <text:p>591.001525878906</text:p>
              </table:table-cell>
              <table:table-cell office:value-type="float" office:value="0.03033371">
                <text:p>0.03033371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591.120239257813">
                <text:p>591.120239257813</text:p>
              </table:table-cell>
              <table:table-cell office:value-type="float" office:value="0.01550488">
                <text:p>0.01550488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591.238891601563">
                <text:p>591.238891601563</text:p>
              </table:table-cell>
              <table:table-cell office:value-type="float" office:value="0.01466001">
                <text:p>0.01466001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591.357604980469">
                <text:p>591.357604980469</text:p>
              </table:table-cell>
              <table:table-cell office:value-type="float" office:value="0.02687687">
                <text:p>0.02687687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91.476318359375">
                <text:p>591.476318359375</text:p>
              </table:table-cell>
              <table:table-cell office:value-type="float" office:value="0.01734396">
                <text:p>0.01734396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91.595031738281">
                <text:p>591.595031738281</text:p>
              </table:table-cell>
              <table:table-cell office:value-type="float" office:value="0.03402841">
                <text:p>0.03402841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91.713745117188">
                <text:p>591.713745117188</text:p>
              </table:table-cell>
              <table:table-cell office:value-type="float" office:value="0.02040541">
                <text:p>0.02040541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91.832458496094">
                <text:p>591.832458496094</text:p>
              </table:table-cell>
              <table:table-cell office:value-type="float" office:value="0.03389976">
                <text:p>0.03389976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91.951232910156">
                <text:p>591.951232910156</text:p>
              </table:table-cell>
              <table:table-cell office:value-type="float" office:value="0.02015917">
                <text:p>0.02015917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92.069946289063">
                <text:p>592.069946289063</text:p>
              </table:table-cell>
              <table:table-cell office:value-type="float" office:value="0.02523845">
                <text:p>0.0252384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92.188659667969">
                <text:p>592.188659667969</text:p>
              </table:table-cell>
              <table:table-cell office:value-type="float" office:value="0.0137069">
                <text:p>0.0137069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92.307373046875">
                <text:p>592.307373046875</text:p>
              </table:table-cell>
              <table:table-cell office:value-type="float" office:value="0.01511117">
                <text:p>0.0151111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592.426086425781">
                <text:p>592.426086425781</text:p>
              </table:table-cell>
              <table:table-cell office:value-type="float" office:value="0.03947297">
                <text:p>0.03947297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592.544860839844">
                <text:p>592.544860839844</text:p>
              </table:table-cell>
              <table:table-cell office:value-type="float" office:value="0.01531957">
                <text:p>0.01531957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592.66357421875">
                <text:p>592.66357421875</text:p>
              </table:table-cell>
              <table:table-cell office:value-type="float" office:value="0.01291548">
                <text:p>0.01291548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592.782348632813">
                <text:p>592.782348632813</text:p>
              </table:table-cell>
              <table:table-cell office:value-type="float" office:value="0.01270805">
                <text:p>0.01270805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592.901062011719">
                <text:p>592.901062011719</text:p>
              </table:table-cell>
              <table:table-cell office:value-type="float" office:value="0.01825881">
                <text:p>0.01825881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593.019775390625">
                <text:p>593.019775390625</text:p>
              </table:table-cell>
              <table:table-cell office:value-type="float" office:value="0.0132872">
                <text:p>0.013287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93.138549804688">
                <text:p>593.138549804688</text:p>
              </table:table-cell>
              <table:table-cell office:value-type="float" office:value="0.01029616">
                <text:p>0.01029616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93.257263183594">
                <text:p>593.257263183594</text:p>
              </table:table-cell>
              <table:table-cell office:value-type="float" office:value="0.008050467">
                <text:p>0.008050467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93.376037597656">
                <text:p>593.376037597656</text:p>
              </table:table-cell>
              <table:table-cell office:value-type="float" office:value="0.006226867">
                <text:p>0.006226867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593.494812011719">
                <text:p>593.494812011719</text:p>
              </table:table-cell>
              <table:table-cell office:value-type="float" office:value="0.02387751">
                <text:p>0.02387751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593.613525390625">
                <text:p>593.613525390625</text:p>
              </table:table-cell>
              <table:table-cell office:value-type="float" office:value="0.01147623">
                <text:p>0.01147623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593.732299804688">
                <text:p>593.732299804688</text:p>
              </table:table-cell>
              <table:table-cell office:value-type="float" office:value="0.01464484">
                <text:p>0.01464484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593.85107421875">
                <text:p>593.85107421875</text:p>
              </table:table-cell>
              <table:table-cell office:value-type="float" office:value="0.0158626">
                <text:p>0.0158626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593.969848632813">
                <text:p>593.969848632813</text:p>
              </table:table-cell>
              <table:table-cell office:value-type="float" office:value="0.01379484">
                <text:p>0.01379484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594.088562011719">
                <text:p>594.088562011719</text:p>
              </table:table-cell>
              <table:table-cell office:value-type="float" office:value="0.0123385">
                <text:p>0.012338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594.207336425781">
                <text:p>594.207336425781</text:p>
              </table:table-cell>
              <table:table-cell office:value-type="float" office:value="0.01584408">
                <text:p>0.01584408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594.326110839844">
                <text:p>594.326110839844</text:p>
              </table:table-cell>
              <table:table-cell office:value-type="float" office:value="0.02167474">
                <text:p>0.02167474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594.444885253906">
                <text:p>594.444885253906</text:p>
              </table:table-cell>
              <table:table-cell office:value-type="float" office:value="0.01019979">
                <text:p>0.01019979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594.563659667969">
                <text:p>594.563659667969</text:p>
              </table:table-cell>
              <table:table-cell office:value-type="float" office:value="0.01473024">
                <text:p>0.01473024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594.682434082031">
                <text:p>594.682434082031</text:p>
              </table:table-cell>
              <table:table-cell office:value-type="float" office:value="0.01955972">
                <text:p>0.01955972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594.801208496094">
                <text:p>594.801208496094</text:p>
              </table:table-cell>
              <table:table-cell office:value-type="float" office:value="0.01602711">
                <text:p>0.01602711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594.919982910156">
                <text:p>594.919982910156</text:p>
              </table:table-cell>
              <table:table-cell office:value-type="float" office:value="0.01316122">
                <text:p>0.01316122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595.038818359375">
                <text:p>595.038818359375</text:p>
              </table:table-cell>
              <table:table-cell office:value-type="float" office:value="0.01829125">
                <text:p>0.0182912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595.157592773438">
                <text:p>595.157592773438</text:p>
              </table:table-cell>
              <table:table-cell office:value-type="float" office:value="0.030059">
                <text:p>0.030059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595.2763671875">
                <text:p>595.2763671875</text:p>
              </table:table-cell>
              <table:table-cell office:value-type="float" office:value="0.04427752">
                <text:p>0.04427752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595.395141601563">
                <text:p>595.395141601563</text:p>
              </table:table-cell>
              <table:table-cell office:value-type="float" office:value="0.01835009">
                <text:p>0.01835009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595.513916015625">
                <text:p>595.513916015625</text:p>
              </table:table-cell>
              <table:table-cell office:value-type="float" office:value="0.02809868">
                <text:p>0.02809868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595.632751464844">
                <text:p>595.632751464844</text:p>
              </table:table-cell>
              <table:table-cell office:value-type="float" office:value="0.009996756">
                <text:p>0.009996756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595.751525878906">
                <text:p>595.751525878906</text:p>
              </table:table-cell>
              <table:table-cell office:value-type="float" office:value="0.01541273">
                <text:p>0.01541273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595.870361328125">
                <text:p>595.870361328125</text:p>
              </table:table-cell>
              <table:table-cell office:value-type="float" office:value="0.0133891">
                <text:p>0.0133891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595.989135742188">
                <text:p>595.989135742188</text:p>
              </table:table-cell>
              <table:table-cell office:value-type="float" office:value="0.02358138">
                <text:p>0.02358138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596.107971191406">
                <text:p>596.107971191406</text:p>
              </table:table-cell>
              <table:table-cell office:value-type="float" office:value="0.01682421">
                <text:p>0.01682421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596.226745605469">
                <text:p>596.226745605469</text:p>
              </table:table-cell>
              <table:table-cell office:value-type="float" office:value="0.02095138">
                <text:p>0.0209513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596.345581054688">
                <text:p>596.345581054688</text:p>
              </table:table-cell>
              <table:table-cell office:value-type="float" office:value="0.01443573">
                <text:p>0.0144357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596.46435546875">
                <text:p>596.46435546875</text:p>
              </table:table-cell>
              <table:table-cell office:value-type="float" office:value="0.0315033">
                <text:p>0.0315033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596.583190917969">
                <text:p>596.583190917969</text:p>
              </table:table-cell>
              <table:table-cell office:value-type="float" office:value="0.0143443">
                <text:p>0.0143443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596.702026367188">
                <text:p>596.702026367188</text:p>
              </table:table-cell>
              <table:table-cell office:value-type="float" office:value="0.01983114">
                <text:p>0.01983114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596.82080078125">
                <text:p>596.82080078125</text:p>
              </table:table-cell>
              <table:table-cell office:value-type="float" office:value="0.01622242">
                <text:p>0.01622242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596.939636230469">
                <text:p>596.939636230469</text:p>
              </table:table-cell>
              <table:table-cell office:value-type="float" office:value="0.01314775">
                <text:p>0.0131477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597.058471679688">
                <text:p>597.058471679688</text:p>
              </table:table-cell>
              <table:table-cell office:value-type="float" office:value="0.01734659">
                <text:p>0.01734659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597.177307128906">
                <text:p>597.177307128906</text:p>
              </table:table-cell>
              <table:table-cell office:value-type="float" office:value="0.01466519">
                <text:p>0.01466519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597.296142578125">
                <text:p>597.296142578125</text:p>
              </table:table-cell>
              <table:table-cell office:value-type="float" office:value="0.02954448">
                <text:p>0.02954448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597.414978027344">
                <text:p>597.414978027344</text:p>
              </table:table-cell>
              <table:table-cell office:value-type="float" office:value="0.0143493">
                <text:p>0.0143493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597.533752441406">
                <text:p>597.533752441406</text:p>
              </table:table-cell>
              <table:table-cell office:value-type="float" office:value="0.009194088">
                <text:p>0.009194088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97.652587890625">
                <text:p>597.652587890625</text:p>
              </table:table-cell>
              <table:table-cell office:value-type="float" office:value="0.04249223">
                <text:p>0.04249223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97.771423339844">
                <text:p>597.771423339844</text:p>
              </table:table-cell>
              <table:table-cell office:value-type="float" office:value="0.01959391">
                <text:p>0.01959391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97.890319824219">
                <text:p>597.890319824219</text:p>
              </table:table-cell>
              <table:table-cell office:value-type="float" office:value="0.02316239">
                <text:p>0.02316239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98.009155273438">
                <text:p>598.009155273438</text:p>
              </table:table-cell>
              <table:table-cell office:value-type="float" office:value="0.01533452">
                <text:p>0.01533452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98.127990722656">
                <text:p>598.127990722656</text:p>
              </table:table-cell>
              <table:table-cell office:value-type="float" office:value="0.01043026">
                <text:p>0.01043026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98.246826171875">
                <text:p>598.246826171875</text:p>
              </table:table-cell>
              <table:table-cell office:value-type="float" office:value="0.02425278">
                <text:p>0.02425278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98.365661621094">
                <text:p>598.365661621094</text:p>
              </table:table-cell>
              <table:table-cell office:value-type="float" office:value="0.01864774">
                <text:p>0.01864774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98.484497070313">
                <text:p>598.484497070313</text:p>
              </table:table-cell>
              <table:table-cell office:value-type="float" office:value="0.01491098">
                <text:p>0.01491098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598.603393554688">
                <text:p>598.603393554688</text:p>
              </table:table-cell>
              <table:table-cell office:value-type="float" office:value="0.02366212">
                <text:p>0.02366212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598.722229003906">
                <text:p>598.722229003906</text:p>
              </table:table-cell>
              <table:table-cell office:value-type="float" office:value="0.01030602">
                <text:p>0.01030602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598.841064453125">
                <text:p>598.841064453125</text:p>
              </table:table-cell>
              <table:table-cell office:value-type="float" office:value="0.01396147">
                <text:p>0.01396147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598.9599609375">
                <text:p>598.9599609375</text:p>
              </table:table-cell>
              <table:table-cell office:value-type="float" office:value="0.02729101">
                <text:p>0.02729101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599.078796386719">
                <text:p>599.078796386719</text:p>
              </table:table-cell>
              <table:table-cell office:value-type="float" office:value="0.02680553">
                <text:p>0.02680553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599.197692871094">
                <text:p>599.197692871094</text:p>
              </table:table-cell>
              <table:table-cell office:value-type="float" office:value="0.01879757">
                <text:p>0.01879757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599.316528320313">
                <text:p>599.316528320313</text:p>
              </table:table-cell>
              <table:table-cell office:value-type="float" office:value="0.002777732">
                <text:p>0.002777732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599.435424804688">
                <text:p>599.435424804688</text:p>
              </table:table-cell>
              <table:table-cell office:value-type="float" office:value="0.02241419">
                <text:p>0.02241419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599.554321289063">
                <text:p>599.554321289063</text:p>
              </table:table-cell>
              <table:table-cell office:value-type="float" office:value="0.008353907">
                <text:p>0.008353907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599.673156738281">
                <text:p>599.673156738281</text:p>
              </table:table-cell>
              <table:table-cell office:value-type="float" office:value="0.01253947">
                <text:p>0.01253947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599.792053222656">
                <text:p>599.792053222656</text:p>
              </table:table-cell>
              <table:table-cell office:value-type="float" office:value="0.01846514">
                <text:p>0.01846514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599.910949707031">
                <text:p>599.910949707031</text:p>
              </table:table-cell>
              <table:table-cell office:value-type="float" office:value="0.01992477">
                <text:p>0.0199247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600.02978515625">
                <text:p>600.02978515625</text:p>
              </table:table-cell>
              <table:table-cell office:value-type="float" office:value="0.01289506">
                <text:p>0.01289506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600.148681640625">
                <text:p>600.148681640625</text:p>
              </table:table-cell>
              <table:table-cell office:value-type="float" office:value="0.02043743">
                <text:p>0.02043743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600.267578125">
                <text:p>600.267578125</text:p>
              </table:table-cell>
              <table:table-cell office:value-type="float" office:value="0.01007273">
                <text:p>0.01007273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600.386474609375">
                <text:p>600.386474609375</text:p>
              </table:table-cell>
              <table:table-cell office:value-type="float" office:value="0.007447427">
                <text:p>0.007447427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00.50537109375">
                <text:p>600.50537109375</text:p>
              </table:table-cell>
              <table:table-cell office:value-type="float" office:value="0.03843553">
                <text:p>0.03843553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00.624267578125">
                <text:p>600.624267578125</text:p>
              </table:table-cell>
              <table:table-cell office:value-type="float" office:value="0.006428062">
                <text:p>0.006428062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00.7431640625">
                <text:p>600.7431640625</text:p>
              </table:table-cell>
              <table:table-cell office:value-type="float" office:value="0.01245218">
                <text:p>0.01245218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600.862060546875">
                <text:p>600.862060546875</text:p>
              </table:table-cell>
              <table:table-cell office:value-type="float" office:value="0.002116386">
                <text:p>0.002116386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600.98095703125">
                <text:p>600.98095703125</text:p>
              </table:table-cell>
              <table:table-cell office:value-type="float" office:value="0.01544272">
                <text:p>0.01544272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601.099853515625">
                <text:p>601.099853515625</text:p>
              </table:table-cell>
              <table:table-cell office:value-type="float" office:value="0.003376719">
                <text:p>0.003376719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01.21875">
                <text:p>601.21875</text:p>
              </table:table-cell>
              <table:table-cell office:value-type="float" office:value="0.01522415">
                <text:p>0.0152241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01.337646484375">
                <text:p>601.337646484375</text:p>
              </table:table-cell>
              <table:table-cell office:value-type="float" office:value="0.01559515">
                <text:p>0.0155951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601.45654296875">
                <text:p>601.45654296875</text:p>
              </table:table-cell>
              <table:table-cell office:value-type="float" office:value="0.01319575">
                <text:p>0.01319575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601.575500488281">
                <text:p>601.575500488281</text:p>
              </table:table-cell>
              <table:table-cell office:value-type="float" office:value="0.009778542">
                <text:p>0.009778542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601.694396972656">
                <text:p>601.694396972656</text:p>
              </table:table-cell>
              <table:table-cell office:value-type="float" office:value="0.0132329">
                <text:p>0.0132329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601.813293457031">
                <text:p>601.813293457031</text:p>
              </table:table-cell>
              <table:table-cell office:value-type="float" office:value="0.01506309">
                <text:p>0.01506309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601.932250976563">
                <text:p>601.932250976563</text:p>
              </table:table-cell>
              <table:table-cell office:value-type="float" office:value="0.008385431">
                <text:p>0.008385431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602.051147460938">
                <text:p>602.051147460938</text:p>
              </table:table-cell>
              <table:table-cell office:value-type="float" office:value="0.01802858">
                <text:p>0.01802858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602.170043945313">
                <text:p>602.170043945313</text:p>
              </table:table-cell>
              <table:table-cell office:value-type="float" office:value="0.02161764">
                <text:p>0.02161764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602.289001464844">
                <text:p>602.289001464844</text:p>
              </table:table-cell>
              <table:table-cell office:value-type="float" office:value="0.002618929">
                <text:p>0.002618929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602.407897949219">
                <text:p>602.407897949219</text:p>
              </table:table-cell>
              <table:table-cell office:value-type="float" office:value="0.0158758">
                <text:p>0.0158758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602.52685546875">
                <text:p>602.52685546875</text:p>
              </table:table-cell>
              <table:table-cell office:value-type="float" office:value="0.0181216">
                <text:p>0.0181216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02.645751953125">
                <text:p>602.645751953125</text:p>
              </table:table-cell>
              <table:table-cell office:value-type="float" office:value="0.003157572">
                <text:p>0.003157572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602.764709472656">
                <text:p>602.764709472656</text:p>
              </table:table-cell>
              <table:table-cell office:value-type="float" office:value="0.005870128">
                <text:p>0.005870128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602.883666992188">
                <text:p>602.883666992188</text:p>
              </table:table-cell>
              <table:table-cell office:value-type="float" office:value="-0.003627207">
                <text:p>-0.003627207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603.002563476563">
                <text:p>603.002563476563</text:p>
              </table:table-cell>
              <table:table-cell office:value-type="float" office:value="0.009037096">
                <text:p>0.009037096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603.121520996094">
                <text:p>603.121520996094</text:p>
              </table:table-cell>
              <table:table-cell office:value-type="float" office:value="0.01302433">
                <text:p>0.01302433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603.240478515625">
                <text:p>603.240478515625</text:p>
              </table:table-cell>
              <table:table-cell office:value-type="float" office:value="0.02013713">
                <text:p>0.02013713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03.359436035156">
                <text:p>603.359436035156</text:p>
              </table:table-cell>
              <table:table-cell office:value-type="float" office:value="0.01888143">
                <text:p>0.01888143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03.478393554688">
                <text:p>603.478393554688</text:p>
              </table:table-cell>
              <table:table-cell office:value-type="float" office:value="0.01155829">
                <text:p>0.01155829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603.597290039063">
                <text:p>603.597290039063</text:p>
              </table:table-cell>
              <table:table-cell office:value-type="float" office:value="0.01086866">
                <text:p>0.01086866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03.716247558594">
                <text:p>603.716247558594</text:p>
              </table:table-cell>
              <table:table-cell office:value-type="float" office:value="0.008403859">
                <text:p>0.008403859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03.835205078125">
                <text:p>603.835205078125</text:p>
              </table:table-cell>
              <table:table-cell office:value-type="float" office:value="0.002089706">
                <text:p>0.002089706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03.954162597656">
                <text:p>603.954162597656</text:p>
              </table:table-cell>
              <table:table-cell office:value-type="float" office:value="0.004203991">
                <text:p>0.004203991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04.073120117188">
                <text:p>604.073120117188</text:p>
              </table:table-cell>
              <table:table-cell office:value-type="float" office:value="0.005337066">
                <text:p>0.005337066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04.192077636719">
                <text:p>604.192077636719</text:p>
              </table:table-cell>
              <table:table-cell office:value-type="float" office:value="0.002030204">
                <text:p>0.002030204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04.31103515625">
                <text:p>604.31103515625</text:p>
              </table:table-cell>
              <table:table-cell office:value-type="float" office:value="0.0261512">
                <text:p>0.0261512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04.430053710938">
                <text:p>604.430053710938</text:p>
              </table:table-cell>
              <table:table-cell office:value-type="float" office:value="0.009151911">
                <text:p>0.009151911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04.549011230469">
                <text:p>604.549011230469</text:p>
              </table:table-cell>
              <table:table-cell office:value-type="float" office:value="0.006201179">
                <text:p>0.006201179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04.66796875">
                <text:p>604.66796875</text:p>
              </table:table-cell>
              <table:table-cell office:value-type="float" office:value="0.008995091">
                <text:p>0.008995091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604.786926269531">
                <text:p>604.786926269531</text:p>
              </table:table-cell>
              <table:table-cell office:value-type="float" office:value="0.02197152">
                <text:p>0.02197152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604.905883789063">
                <text:p>604.905883789063</text:p>
              </table:table-cell>
              <table:table-cell office:value-type="float" office:value="0.01880963">
                <text:p>0.01880963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05.02490234375">
                <text:p>605.02490234375</text:p>
              </table:table-cell>
              <table:table-cell office:value-type="float" office:value="0.007497525">
                <text:p>0.00749752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05.143859863281">
                <text:p>605.143859863281</text:p>
              </table:table-cell>
              <table:table-cell office:value-type="float" office:value="0.003346425">
                <text:p>0.003346425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05.262817382813">
                <text:p>605.262817382813</text:p>
              </table:table-cell>
              <table:table-cell office:value-type="float" office:value="0.001985683">
                <text:p>0.001985683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05.3818359375">
                <text:p>605.3818359375</text:p>
              </table:table-cell>
              <table:table-cell office:value-type="float" office:value="0.01065525">
                <text:p>0.0106552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05.500793457031">
                <text:p>605.500793457031</text:p>
              </table:table-cell>
              <table:table-cell office:value-type="float" office:value="0.007365531">
                <text:p>0.007365531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05.619812011719">
                <text:p>605.619812011719</text:p>
              </table:table-cell>
              <table:table-cell office:value-type="float" office:value="0.01056633">
                <text:p>0.01056633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05.73876953125">
                <text:p>605.73876953125</text:p>
              </table:table-cell>
              <table:table-cell office:value-type="float" office:value="0.005008738">
                <text:p>0.005008738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05.857788085938">
                <text:p>605.857788085938</text:p>
              </table:table-cell>
              <table:table-cell office:value-type="float" office:value="0.02076978">
                <text:p>0.02076978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05.976806640625">
                <text:p>605.976806640625</text:p>
              </table:table-cell>
              <table:table-cell office:value-type="float" office:value="0.02203378">
                <text:p>0.0220337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06.095764160156">
                <text:p>606.095764160156</text:p>
              </table:table-cell>
              <table:table-cell office:value-type="float" office:value="0.01228636">
                <text:p>0.01228636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06.214782714844">
                <text:p>606.214782714844</text:p>
              </table:table-cell>
              <table:table-cell office:value-type="float" office:value="0.0228504">
                <text:p>0.0228504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06.333801269531">
                <text:p>606.333801269531</text:p>
              </table:table-cell>
              <table:table-cell office:value-type="float" office:value="0.003896437">
                <text:p>0.003896437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606.452758789063">
                <text:p>606.452758789063</text:p>
              </table:table-cell>
              <table:table-cell office:value-type="float" office:value="0.01785806">
                <text:p>0.01785806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06.57177734375">
                <text:p>606.57177734375</text:p>
              </table:table-cell>
              <table:table-cell office:value-type="float" office:value="0.003644071">
                <text:p>0.003644071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606.690795898438">
                <text:p>606.690795898438</text:p>
              </table:table-cell>
              <table:table-cell office:value-type="float" office:value="0.01105764">
                <text:p>0.01105764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06.809814453125">
                <text:p>606.809814453125</text:p>
              </table:table-cell>
              <table:table-cell office:value-type="float" office:value="0.00271073">
                <text:p>0.00271073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606.928833007813">
                <text:p>606.928833007813</text:p>
              </table:table-cell>
              <table:table-cell office:value-type="float" office:value="0.00411624">
                <text:p>0.00411624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607.0478515625">
                <text:p>607.0478515625</text:p>
              </table:table-cell>
              <table:table-cell office:value-type="float" office:value="0.001192828">
                <text:p>0.001192828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07.166870117188">
                <text:p>607.166870117188</text:p>
              </table:table-cell>
              <table:table-cell office:value-type="float" office:value="0.02857208">
                <text:p>0.02857208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07.285888671875">
                <text:p>607.285888671875</text:p>
              </table:table-cell>
              <table:table-cell office:value-type="float" office:value="0.01885969">
                <text:p>0.01885969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07.404907226563">
                <text:p>607.404907226563</text:p>
              </table:table-cell>
              <table:table-cell office:value-type="float" office:value="0.01258291">
                <text:p>0.01258291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607.52392578125">
                <text:p>607.52392578125</text:p>
              </table:table-cell>
              <table:table-cell office:value-type="float" office:value="0.0107781">
                <text:p>0.0107781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607.642944335938">
                <text:p>607.642944335938</text:p>
              </table:table-cell>
              <table:table-cell office:value-type="float" office:value="0.01668952">
                <text:p>0.01668952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607.761962890625">
                <text:p>607.761962890625</text:p>
              </table:table-cell>
              <table:table-cell office:value-type="float" office:value="0.03122672">
                <text:p>0.03122672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607.880981445313">
                <text:p>607.880981445313</text:p>
              </table:table-cell>
              <table:table-cell office:value-type="float" office:value="0.01881845">
                <text:p>0.01881845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608">
                <text:p>608</text:p>
              </table:table-cell>
              <table:table-cell office:value-type="float" office:value="0.003342316">
                <text:p>0.003342316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608.119079589844">
                <text:p>608.119079589844</text:p>
              </table:table-cell>
              <table:table-cell office:value-type="float" office:value="0.008695438">
                <text:p>0.008695438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608.238098144531">
                <text:p>608.238098144531</text:p>
              </table:table-cell>
              <table:table-cell office:value-type="float" office:value="0.007721105">
                <text:p>0.007721105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608.357116699219">
                <text:p>608.357116699219</text:p>
              </table:table-cell>
              <table:table-cell office:value-type="float" office:value="0.005285034">
                <text:p>0.005285034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608.476196289063">
                <text:p>608.476196289063</text:p>
              </table:table-cell>
              <table:table-cell office:value-type="float" office:value="0.014593">
                <text:p>0.014593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608.59521484375">
                <text:p>608.59521484375</text:p>
              </table:table-cell>
              <table:table-cell office:value-type="float" office:value="0.02407438">
                <text:p>0.02407438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608.714233398438">
                <text:p>608.714233398438</text:p>
              </table:table-cell>
              <table:table-cell office:value-type="float" office:value="0.01257083">
                <text:p>0.01257083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608.833312988281">
                <text:p>608.833312988281</text:p>
              </table:table-cell>
              <table:table-cell office:value-type="float" office:value="0.01221362">
                <text:p>0.01221362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608.952331542969">
                <text:p>608.952331542969</text:p>
              </table:table-cell>
              <table:table-cell office:value-type="float" office:value="-0.0008841245">
                <text:p>-0.000884124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609.071411132813">
                <text:p>609.071411132813</text:p>
              </table:table-cell>
              <table:table-cell office:value-type="float" office:value="0.002865122">
                <text:p>0.002865122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609.1904296875">
                <text:p>609.1904296875</text:p>
              </table:table-cell>
              <table:table-cell office:value-type="float" office:value="0.0003250018">
                <text:p>0.0003250018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609.309509277344">
                <text:p>609.309509277344</text:p>
              </table:table-cell>
              <table:table-cell office:value-type="float" office:value="0.02320705">
                <text:p>0.02320705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609.428588867188">
                <text:p>609.428588867188</text:p>
              </table:table-cell>
              <table:table-cell office:value-type="float" office:value="0.01232891">
                <text:p>0.01232891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609.547607421875">
                <text:p>609.547607421875</text:p>
              </table:table-cell>
              <table:table-cell office:value-type="float" office:value="0.01221494">
                <text:p>0.01221494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609.666687011719">
                <text:p>609.666687011719</text:p>
              </table:table-cell>
              <table:table-cell office:value-type="float" office:value="0.007954939">
                <text:p>0.007954939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609.785766601563">
                <text:p>609.785766601563</text:p>
              </table:table-cell>
              <table:table-cell office:value-type="float" office:value="0.007368553">
                <text:p>0.007368553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609.904846191406">
                <text:p>609.904846191406</text:p>
              </table:table-cell>
              <table:table-cell office:value-type="float" office:value="0.01070909">
                <text:p>0.01070909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610.023864746094">
                <text:p>610.023864746094</text:p>
              </table:table-cell>
              <table:table-cell office:value-type="float" office:value="0.005766384">
                <text:p>0.005766384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610.142944335938">
                <text:p>610.142944335938</text:p>
              </table:table-cell>
              <table:table-cell office:value-type="float" office:value="0.005879075">
                <text:p>0.005879075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610.262023925781">
                <text:p>610.262023925781</text:p>
              </table:table-cell>
              <table:table-cell office:value-type="float" office:value="0.02719131">
                <text:p>0.02719131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610.381103515625">
                <text:p>610.381103515625</text:p>
              </table:table-cell>
              <table:table-cell office:value-type="float" office:value="0.01257193">
                <text:p>0.01257193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610.500183105469">
                <text:p>610.500183105469</text:p>
              </table:table-cell>
              <table:table-cell office:value-type="float" office:value="0.009023766">
                <text:p>0.009023766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610.619262695313">
                <text:p>610.619262695313</text:p>
              </table:table-cell>
              <table:table-cell office:value-type="float" office:value="0.002861069">
                <text:p>0.002861069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610.738342285156">
                <text:p>610.738342285156</text:p>
              </table:table-cell>
              <table:table-cell office:value-type="float" office:value="0.01159703">
                <text:p>0.01159703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610.857421875">
                <text:p>610.857421875</text:p>
              </table:table-cell>
              <table:table-cell office:value-type="float" office:value="0.004302974">
                <text:p>0.004302974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610.976501464844">
                <text:p>610.976501464844</text:p>
              </table:table-cell>
              <table:table-cell office:value-type="float" office:value="0.01600209">
                <text:p>0.01600209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611.095581054688">
                <text:p>611.095581054688</text:p>
              </table:table-cell>
              <table:table-cell office:value-type="float" office:value="0.01048555">
                <text:p>0.01048555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611.214660644531">
                <text:p>611.214660644531</text:p>
              </table:table-cell>
              <table:table-cell office:value-type="float" office:value="0.006793716">
                <text:p>0.006793716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611.333801269531">
                <text:p>611.333801269531</text:p>
              </table:table-cell>
              <table:table-cell office:value-type="float" office:value="0.004320162">
                <text:p>0.004320162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611.452880859375">
                <text:p>611.452880859375</text:p>
              </table:table-cell>
              <table:table-cell office:value-type="float" office:value="-0.003175234">
                <text:p>-0.003175234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611.571960449219">
                <text:p>611.571960449219</text:p>
              </table:table-cell>
              <table:table-cell office:value-type="float" office:value="0.0118364">
                <text:p>0.0118364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11.691040039063">
                <text:p>611.691040039063</text:p>
              </table:table-cell>
              <table:table-cell office:value-type="float" office:value="0.0108403">
                <text:p>0.0108403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11.810180664063">
                <text:p>611.810180664063</text:p>
              </table:table-cell>
              <table:table-cell office:value-type="float" office:value="0.009379155">
                <text:p>0.009379155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11.929260253906">
                <text:p>611.929260253906</text:p>
              </table:table-cell>
              <table:table-cell office:value-type="float" office:value="0.009611339">
                <text:p>0.009611339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12.048400878906">
                <text:p>612.048400878906</text:p>
              </table:table-cell>
              <table:table-cell office:value-type="float" office:value="0.01206155">
                <text:p>0.01206155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12.16748046875">
                <text:p>612.16748046875</text:p>
              </table:table-cell>
              <table:table-cell office:value-type="float" office:value="0.003963841">
                <text:p>0.003963841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12.286560058594">
                <text:p>612.286560058594</text:p>
              </table:table-cell>
              <table:table-cell office:value-type="float" office:value="0.01745655">
                <text:p>0.01745655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12.405700683594">
                <text:p>612.405700683594</text:p>
              </table:table-cell>
              <table:table-cell office:value-type="float" office:value="0.01855553">
                <text:p>0.01855553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12.524780273438">
                <text:p>612.524780273438</text:p>
              </table:table-cell>
              <table:table-cell office:value-type="float" office:value="0.006919138">
                <text:p>0.006919138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612.643920898438">
                <text:p>612.643920898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612.763061523438">
                <text:p>612.763061523438</text:p>
              </table:table-cell>
              <table:table-cell office:value-type="float" office:value="0.02063857">
                <text:p>0.02063857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612.882141113281">
                <text:p>612.882141113281</text:p>
              </table:table-cell>
              <table:table-cell office:value-type="float" office:value="0.002652083">
                <text:p>0.002652083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613.001281738281">
                <text:p>613.001281738281</text:p>
              </table:table-cell>
              <table:table-cell office:value-type="float" office:value="0.0101662">
                <text:p>0.0101662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613.120422363281">
                <text:p>613.120422363281</text:p>
              </table:table-cell>
              <table:table-cell office:value-type="float" office:value="0.005027059">
                <text:p>0.005027059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613.239501953125">
                <text:p>613.239501953125</text:p>
              </table:table-cell>
              <table:table-cell office:value-type="float" office:value="0.009158476">
                <text:p>0.009158476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613.358642578125">
                <text:p>613.358642578125</text:p>
              </table:table-cell>
              <table:table-cell office:value-type="float" office:value="0.01304212">
                <text:p>0.01304212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613.477783203125">
                <text:p>613.477783203125</text:p>
              </table:table-cell>
              <table:table-cell office:value-type="float" office:value="0.002234333">
                <text:p>0.002234333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613.596923828125">
                <text:p>613.596923828125</text:p>
              </table:table-cell>
              <table:table-cell office:value-type="float" office:value="-0.002517856">
                <text:p>-0.002517856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613.716064453125">
                <text:p>613.716064453125</text:p>
              </table:table-cell>
              <table:table-cell office:value-type="float" office:value="0.002544544">
                <text:p>0.002544544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613.835205078125">
                <text:p>613.835205078125</text:p>
              </table:table-cell>
              <table:table-cell office:value-type="float" office:value="0.0005391316">
                <text:p>0.0005391316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13.954345703125">
                <text:p>613.954345703125</text:p>
              </table:table-cell>
              <table:table-cell office:value-type="float" office:value="-0.003898174">
                <text:p>-0.003898174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14.073486328125">
                <text:p>614.073486328125</text:p>
              </table:table-cell>
              <table:table-cell office:value-type="float" office:value="0.003500358">
                <text:p>0.003500358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14.192626953125">
                <text:p>614.192626953125</text:p>
              </table:table-cell>
              <table:table-cell office:value-type="float" office:value="0.02502969">
                <text:p>0.02502969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614.311767578125">
                <text:p>614.311767578125</text:p>
              </table:table-cell>
              <table:table-cell office:value-type="float" office:value="0.001221552">
                <text:p>0.001221552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614.430908203125">
                <text:p>614.430908203125</text:p>
              </table:table-cell>
              <table:table-cell office:value-type="float" office:value="0.00142929">
                <text:p>0.00142929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614.550048828125">
                <text:p>614.550048828125</text:p>
              </table:table-cell>
              <table:table-cell office:value-type="float" office:value="0.001424288">
                <text:p>0.001424288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614.669189453125">
                <text:p>614.669189453125</text:p>
              </table:table-cell>
              <table:table-cell office:value-type="float" office:value="0.01456974">
                <text:p>0.01456974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614.788330078125">
                <text:p>614.788330078125</text:p>
              </table:table-cell>
              <table:table-cell office:value-type="float" office:value="0.003596322">
                <text:p>0.003596322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614.907531738281">
                <text:p>614.907531738281</text:p>
              </table:table-cell>
              <table:table-cell office:value-type="float" office:value="0.009943278">
                <text:p>0.009943278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615.026672363281">
                <text:p>615.026672363281</text:p>
              </table:table-cell>
              <table:table-cell office:value-type="float" office:value="0.007803592">
                <text:p>0.007803592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615.145812988281">
                <text:p>615.145812988281</text:p>
              </table:table-cell>
              <table:table-cell office:value-type="float" office:value="0.03530751">
                <text:p>0.03530751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615.264953613281">
                <text:p>615.264953613281</text:p>
              </table:table-cell>
              <table:table-cell office:value-type="float" office:value="0.01088182">
                <text:p>0.01088182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615.384155273438">
                <text:p>615.384155273438</text:p>
              </table:table-cell>
              <table:table-cell office:value-type="float" office:value="0.01101465">
                <text:p>0.01101465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615.503295898438">
                <text:p>615.503295898438</text:p>
              </table:table-cell>
              <table:table-cell office:value-type="float" office:value="0.003050503">
                <text:p>0.003050503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615.622497558594">
                <text:p>615.622497558594</text:p>
              </table:table-cell>
              <table:table-cell office:value-type="float" office:value="0.01656264">
                <text:p>0.01656264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615.741638183594">
                <text:p>615.741638183594</text:p>
              </table:table-cell>
              <table:table-cell office:value-type="float" office:value="0.003644179">
                <text:p>0.003644179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615.86083984375">
                <text:p>615.86083984375</text:p>
              </table:table-cell>
              <table:table-cell office:value-type="float" office:value="0.007417641">
                <text:p>0.007417641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615.97998046875">
                <text:p>615.97998046875</text:p>
              </table:table-cell>
              <table:table-cell office:value-type="float" office:value="0.003135571">
                <text:p>0.003135571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616.099182128906">
                <text:p>616.099182128906</text:p>
              </table:table-cell>
              <table:table-cell office:value-type="float" office:value="0.007392317">
                <text:p>0.007392317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616.218322753906">
                <text:p>616.218322753906</text:p>
              </table:table-cell>
              <table:table-cell office:value-type="float" office:value="0.01452163">
                <text:p>0.01452163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616.337524414063">
                <text:p>616.337524414063</text:p>
              </table:table-cell>
              <table:table-cell office:value-type="float" office:value="0.001723972">
                <text:p>0.001723972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616.456726074219">
                <text:p>616.456726074219</text:p>
              </table:table-cell>
              <table:table-cell office:value-type="float" office:value="0.02224019">
                <text:p>0.02224019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616.575866699219">
                <text:p>616.575866699219</text:p>
              </table:table-cell>
              <table:table-cell office:value-type="float" office:value="0.002499697">
                <text:p>0.002499697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616.695068359375">
                <text:p>616.695068359375</text:p>
              </table:table-cell>
              <table:table-cell office:value-type="float" office:value="-0.002543737">
                <text:p>-0.002543737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616.814270019531">
                <text:p>616.814270019531</text:p>
              </table:table-cell>
              <table:table-cell office:value-type="float" office:value="0.00301748">
                <text:p>0.00301748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616.933471679688">
                <text:p>616.933471679688</text:p>
              </table:table-cell>
              <table:table-cell office:value-type="float" office:value="0.009023149">
                <text:p>0.009023149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617.052612304688">
                <text:p>617.052612304688</text:p>
              </table:table-cell>
              <table:table-cell office:value-type="float" office:value="0.005802298">
                <text:p>0.005802298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617.171813964844">
                <text:p>617.171813964844</text:p>
              </table:table-cell>
              <table:table-cell office:value-type="float" office:value="0.01653524">
                <text:p>0.01653524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617.291015625">
                <text:p>617.291015625</text:p>
              </table:table-cell>
              <table:table-cell office:value-type="float" office:value="0.001846915">
                <text:p>0.001846915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617.410217285156">
                <text:p>617.410217285156</text:p>
              </table:table-cell>
              <table:table-cell office:value-type="float" office:value="0.007408302">
                <text:p>0.007408302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617.529418945313">
                <text:p>617.529418945313</text:p>
              </table:table-cell>
              <table:table-cell office:value-type="float" office:value="0.01502447">
                <text:p>0.01502447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617.648620605469">
                <text:p>617.648620605469</text:p>
              </table:table-cell>
              <table:table-cell office:value-type="float" office:value="0.005534281">
                <text:p>0.005534281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617.767822265625">
                <text:p>617.767822265625</text:p>
              </table:table-cell>
              <table:table-cell office:value-type="float" office:value="0.03192843">
                <text:p>0.03192843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17.887023925781">
                <text:p>617.887023925781</text:p>
              </table:table-cell>
              <table:table-cell office:value-type="float" office:value="0.01263075">
                <text:p>0.01263075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18.006225585938">
                <text:p>618.006225585938</text:p>
              </table:table-cell>
              <table:table-cell office:value-type="float" office:value="0.004789466">
                <text:p>0.004789466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18.125427246094">
                <text:p>618.125427246094</text:p>
              </table:table-cell>
              <table:table-cell office:value-type="float" office:value="0.01086251">
                <text:p>0.01086251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18.24462890625">
                <text:p>618.24462890625</text:p>
              </table:table-cell>
              <table:table-cell office:value-type="float" office:value="0.01516368">
                <text:p>0.01516368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18.363891601563">
                <text:p>618.363891601563</text:p>
              </table:table-cell>
              <table:table-cell office:value-type="float" office:value="0.01526215">
                <text:p>0.01526215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18.483093261719">
                <text:p>618.483093261719</text:p>
              </table:table-cell>
              <table:table-cell office:value-type="float" office:value="0.004265926">
                <text:p>0.004265926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18.602294921875">
                <text:p>618.602294921875</text:p>
              </table:table-cell>
              <table:table-cell office:value-type="float" office:value="0.01013429">
                <text:p>0.01013429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18.721496582031">
                <text:p>618.721496582031</text:p>
              </table:table-cell>
              <table:table-cell office:value-type="float" office:value="0.02410127">
                <text:p>0.02410127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18.840759277344">
                <text:p>618.840759277344</text:p>
              </table:table-cell>
              <table:table-cell office:value-type="float" office:value="0.001974171">
                <text:p>0.001974171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18.9599609375">
                <text:p>618.9599609375</text:p>
              </table:table-cell>
              <table:table-cell office:value-type="float" office:value="0.01551779">
                <text:p>0.01551779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619.079162597656">
                <text:p>619.079162597656</text:p>
              </table:table-cell>
              <table:table-cell office:value-type="float" office:value="-0.001997558">
                <text:p>-0.001997558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619.198425292969">
                <text:p>619.198425292969</text:p>
              </table:table-cell>
              <table:table-cell office:value-type="float" office:value="0.02187228">
                <text:p>0.02187228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619.317626953125">
                <text:p>619.317626953125</text:p>
              </table:table-cell>
              <table:table-cell office:value-type="float" office:value="0.003642086">
                <text:p>0.003642086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619.436889648438">
                <text:p>619.436889648438</text:p>
              </table:table-cell>
              <table:table-cell office:value-type="float" office:value="0.01509599">
                <text:p>0.01509599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619.556091308594">
                <text:p>619.556091308594</text:p>
              </table:table-cell>
              <table:table-cell office:value-type="float" office:value="0.008908766">
                <text:p>0.008908766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619.675354003906">
                <text:p>619.675354003906</text:p>
              </table:table-cell>
              <table:table-cell office:value-type="float" office:value="0.002557795">
                <text:p>0.002557795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619.794616699219">
                <text:p>619.794616699219</text:p>
              </table:table-cell>
              <table:table-cell office:value-type="float" office:value="0.009874426">
                <text:p>0.009874426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619.913818359375">
                <text:p>619.913818359375</text:p>
              </table:table-cell>
              <table:table-cell office:value-type="float" office:value="-0.002570753">
                <text:p>-0.002570753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620.033081054688">
                <text:p>620.033081054688</text:p>
              </table:table-cell>
              <table:table-cell office:value-type="float" office:value="0.02683536">
                <text:p>0.02683536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620.152282714844">
                <text:p>620.152282714844</text:p>
              </table:table-cell>
              <table:table-cell office:value-type="float" office:value="0.01262682">
                <text:p>0.01262682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620.271545410156">
                <text:p>620.271545410156</text:p>
              </table:table-cell>
              <table:table-cell office:value-type="float" office:value="0.01075243">
                <text:p>0.01075243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620.390808105469">
                <text:p>620.390808105469</text:p>
              </table:table-cell>
              <table:table-cell office:value-type="float" office:value="-0.0007540382">
                <text:p>-0.0007540382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620.510070800781">
                <text:p>620.510070800781</text:p>
              </table:table-cell>
              <table:table-cell office:value-type="float" office:value="0.004609094">
                <text:p>0.004609094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620.629333496094">
                <text:p>620.629333496094</text:p>
              </table:table-cell>
              <table:table-cell office:value-type="float" office:value="0.003220962">
                <text:p>0.003220962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620.74853515625">
                <text:p>620.74853515625</text:p>
              </table:table-cell>
              <table:table-cell office:value-type="float" office:value="-0.004038558">
                <text:p>-0.004038558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620.867797851563">
                <text:p>620.867797851563</text:p>
              </table:table-cell>
              <table:table-cell office:value-type="float" office:value="0.03423138">
                <text:p>0.03423138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620.987060546875">
                <text:p>620.987060546875</text:p>
              </table:table-cell>
              <table:table-cell office:value-type="float" office:value="0.002074184">
                <text:p>0.002074184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621.106323242188">
                <text:p>621.106323242188</text:p>
              </table:table-cell>
              <table:table-cell office:value-type="float" office:value="0.002641811">
                <text:p>0.002641811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621.2255859375">
                <text:p>621.2255859375</text:p>
              </table:table-cell>
              <table:table-cell office:value-type="float" office:value="0.007559452">
                <text:p>0.007559452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621.344848632813">
                <text:p>621.344848632813</text:p>
              </table:table-cell>
              <table:table-cell office:value-type="float" office:value="-0.00112982">
                <text:p>-0.00112982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621.464111328125">
                <text:p>621.464111328125</text:p>
              </table:table-cell>
              <table:table-cell office:value-type="float" office:value="0.001987824">
                <text:p>0.001987824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621.583374023438">
                <text:p>621.583374023438</text:p>
              </table:table-cell>
              <table:table-cell office:value-type="float" office:value="0.02975914">
                <text:p>0.02975914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621.70263671875">
                <text:p>621.70263671875</text:p>
              </table:table-cell>
              <table:table-cell office:value-type="float" office:value="0.008262529">
                <text:p>0.008262529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621.821899414063">
                <text:p>621.821899414063</text:p>
              </table:table-cell>
              <table:table-cell office:value-type="float" office:value="0.03569268">
                <text:p>0.03569268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621.941223144531">
                <text:p>621.941223144531</text:p>
              </table:table-cell>
              <table:table-cell office:value-type="float" office:value="-0.003333829">
                <text:p>-0.003333829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622.060485839844">
                <text:p>622.060485839844</text:p>
              </table:table-cell>
              <table:table-cell office:value-type="float" office:value="0.01731689">
                <text:p>0.01731689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622.179748535156">
                <text:p>622.179748535156</text:p>
              </table:table-cell>
              <table:table-cell office:value-type="float" office:value="0.02003003">
                <text:p>0.02003003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622.299011230469">
                <text:p>622.299011230469</text:p>
              </table:table-cell>
              <table:table-cell office:value-type="float" office:value="0.002368427">
                <text:p>0.002368427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622.418334960938">
                <text:p>622.418334960938</text:p>
              </table:table-cell>
              <table:table-cell office:value-type="float" office:value="0.004563001">
                <text:p>0.004563001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22.53759765625">
                <text:p>622.53759765625</text:p>
              </table:table-cell>
              <table:table-cell office:value-type="float" office:value="0.004141034">
                <text:p>0.004141034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622.656860351563">
                <text:p>622.656860351563</text:p>
              </table:table-cell>
              <table:table-cell office:value-type="float" office:value="0.0005424015">
                <text:p>0.0005424015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22.776184082031">
                <text:p>622.776184082031</text:p>
              </table:table-cell>
              <table:table-cell office:value-type="float" office:value="0.00795739">
                <text:p>0.00795739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22.895446777344">
                <text:p>622.895446777344</text:p>
              </table:table-cell>
              <table:table-cell office:value-type="float" office:value="0.009216988">
                <text:p>0.009216988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23.014709472656">
                <text:p>623.014709472656</text:p>
              </table:table-cell>
              <table:table-cell office:value-type="float" office:value="0.005563794">
                <text:p>0.005563794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23.134033203125">
                <text:p>623.134033203125</text:p>
              </table:table-cell>
              <table:table-cell office:value-type="float" office:value="-0.003251888">
                <text:p>-0.003251888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23.253295898438">
                <text:p>623.253295898438</text:p>
              </table:table-cell>
              <table:table-cell office:value-type="float" office:value="0.0009999718">
                <text:p>0.0009999718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23.372619628906">
                <text:p>623.372619628906</text:p>
              </table:table-cell>
              <table:table-cell office:value-type="float" office:value="0.01195749">
                <text:p>0.01195749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23.491943359375">
                <text:p>623.491943359375</text:p>
              </table:table-cell>
              <table:table-cell office:value-type="float" office:value="0.006492928">
                <text:p>0.006492928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23.611206054688">
                <text:p>623.611206054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23.730529785156">
                <text:p>623.730529785156</text:p>
              </table:table-cell>
              <table:table-cell office:value-type="float" office:value="0.007836119">
                <text:p>0.007836119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623.849853515625">
                <text:p>623.849853515625</text:p>
              </table:table-cell>
              <table:table-cell office:value-type="float" office:value="0.005557021">
                <text:p>0.005557021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623.969116210938">
                <text:p>623.969116210938</text:p>
              </table:table-cell>
              <table:table-cell office:value-type="float" office:value="0.004857031">
                <text:p>0.004857031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624.088439941406">
                <text:p>624.088439941406</text:p>
              </table:table-cell>
              <table:table-cell office:value-type="float" office:value="-0.00447818">
                <text:p>-0.00447818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624.207763671875">
                <text:p>624.207763671875</text:p>
              </table:table-cell>
              <table:table-cell office:value-type="float" office:value="-0.003747386">
                <text:p>-0.00374738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624.327087402344">
                <text:p>624.327087402344</text:p>
              </table:table-cell>
              <table:table-cell office:value-type="float" office:value="0.004625101">
                <text:p>0.004625101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624.446350097656">
                <text:p>624.446350097656</text:p>
              </table:table-cell>
              <table:table-cell office:value-type="float" office:value="0.02201101">
                <text:p>0.02201101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624.565673828125">
                <text:p>624.565673828125</text:p>
              </table:table-cell>
              <table:table-cell office:value-type="float" office:value="0.01161147">
                <text:p>0.01161147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624.684997558594">
                <text:p>624.684997558594</text:p>
              </table:table-cell>
              <table:table-cell office:value-type="float" office:value="0.006904491">
                <text:p>0.006904491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624.804321289063">
                <text:p>624.804321289063</text:p>
              </table:table-cell>
              <table:table-cell office:value-type="float" office:value="0.004741134">
                <text:p>0.004741134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624.923645019531">
                <text:p>624.923645019531</text:p>
              </table:table-cell>
              <table:table-cell office:value-type="float" office:value="0.01007673">
                <text:p>0.01007673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625.04296875">
                <text:p>625.04296875</text:p>
              </table:table-cell>
              <table:table-cell office:value-type="float" office:value="-0.004012845">
                <text:p>-0.004012845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625.162292480469">
                <text:p>625.162292480469</text:p>
              </table:table-cell>
              <table:table-cell office:value-type="float" office:value="0.002877917">
                <text:p>0.002877917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625.281616210938">
                <text:p>625.281616210938</text:p>
              </table:table-cell>
              <table:table-cell office:value-type="float" office:value="0.01054992">
                <text:p>0.01054992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625.400939941406">
                <text:p>625.400939941406</text:p>
              </table:table-cell>
              <table:table-cell office:value-type="float" office:value="0.003963486">
                <text:p>0.003963486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625.520263671875">
                <text:p>625.520263671875</text:p>
              </table:table-cell>
              <table:table-cell office:value-type="float" office:value="0.001874409">
                <text:p>0.001874409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625.639587402344">
                <text:p>625.639587402344</text:p>
              </table:table-cell>
              <table:table-cell office:value-type="float" office:value="0.008802793">
                <text:p>0.008802793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625.758911132813">
                <text:p>625.758911132813</text:p>
              </table:table-cell>
              <table:table-cell office:value-type="float" office:value="0.01112228">
                <text:p>0.01112228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625.878295898438">
                <text:p>625.878295898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625.997619628906">
                <text:p>625.997619628906</text:p>
              </table:table-cell>
              <table:table-cell office:value-type="float" office:value="-0.001838242">
                <text:p>-0.001838242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626.116943359375">
                <text:p>626.116943359375</text:p>
              </table:table-cell>
              <table:table-cell office:value-type="float" office:value="0.008852796">
                <text:p>0.008852796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626.236267089844">
                <text:p>626.236267089844</text:p>
              </table:table-cell>
              <table:table-cell office:value-type="float" office:value="0.01138782">
                <text:p>0.01138782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626.355651855469">
                <text:p>626.355651855469</text:p>
              </table:table-cell>
              <table:table-cell office:value-type="float" office:value="0.02566564">
                <text:p>0.02566564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26.474975585938">
                <text:p>626.474975585938</text:p>
              </table:table-cell>
              <table:table-cell office:value-type="float" office:value="-0.003008415">
                <text:p>-0.003008415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626.594360351563">
                <text:p>626.594360351563</text:p>
              </table:table-cell>
              <table:table-cell office:value-type="float" office:value="0.02020443">
                <text:p>0.02020443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626.713684082031">
                <text:p>626.713684082031</text:p>
              </table:table-cell>
              <table:table-cell office:value-type="float" office:value="0.004371739">
                <text:p>0.004371739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626.8330078125">
                <text:p>626.8330078125</text:p>
              </table:table-cell>
              <table:table-cell office:value-type="float" office:value="0.02149351">
                <text:p>0.02149351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626.952392578125">
                <text:p>626.952392578125</text:p>
              </table:table-cell>
              <table:table-cell office:value-type="float" office:value="0.01095495">
                <text:p>0.01095495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627.071716308594">
                <text:p>627.071716308594</text:p>
              </table:table-cell>
              <table:table-cell office:value-type="float" office:value="0.0148623">
                <text:p>0.0148623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627.191101074219">
                <text:p>627.191101074219</text:p>
              </table:table-cell>
              <table:table-cell office:value-type="float" office:value="0.01804084">
                <text:p>0.01804084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627.310424804688">
                <text:p>627.310424804688</text:p>
              </table:table-cell>
              <table:table-cell office:value-type="float" office:value="0.00626323">
                <text:p>0.00626323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627.429809570313">
                <text:p>627.429809570313</text:p>
              </table:table-cell>
              <table:table-cell office:value-type="float" office:value="-0.003862808">
                <text:p>-0.003862808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627.549194335938">
                <text:p>627.549194335938</text:p>
              </table:table-cell>
              <table:table-cell office:value-type="float" office:value="-0.0005163118">
                <text:p>-0.0005163118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627.668518066406">
                <text:p>627.668518066406</text:p>
              </table:table-cell>
              <table:table-cell office:value-type="float" office:value="0.01520169">
                <text:p>0.01520169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627.787902832031">
                <text:p>627.787902832031</text:p>
              </table:table-cell>
              <table:table-cell office:value-type="float" office:value="0.01231965">
                <text:p>0.01231965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627.907287597656">
                <text:p>627.907287597656</text:p>
              </table:table-cell>
              <table:table-cell office:value-type="float" office:value="0.002605802">
                <text:p>0.002605802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628.026672363281">
                <text:p>628.026672363281</text:p>
              </table:table-cell>
              <table:table-cell office:value-type="float" office:value="-0.0004992938">
                <text:p>-0.0004992938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28.14599609375">
                <text:p>628.14599609375</text:p>
              </table:table-cell>
              <table:table-cell office:value-type="float" office:value="-0.00216926">
                <text:p>-0.00216926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28.265380859375">
                <text:p>628.265380859375</text:p>
              </table:table-cell>
              <table:table-cell office:value-type="float" office:value="0.01344499">
                <text:p>0.01344499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628.384765625">
                <text:p>628.384765625</text:p>
              </table:table-cell>
              <table:table-cell office:value-type="float" office:value="0.0178567">
                <text:p>0.0178567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628.504150390625">
                <text:p>628.504150390625</text:p>
              </table:table-cell>
              <table:table-cell office:value-type="float" office:value="-0.004492704">
                <text:p>-0.004492704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628.62353515625">
                <text:p>628.62353515625</text:p>
              </table:table-cell>
              <table:table-cell office:value-type="float" office:value="0.009016016">
                <text:p>0.009016016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628.742919921875">
                <text:p>628.742919921875</text:p>
              </table:table-cell>
              <table:table-cell office:value-type="float" office:value="-0.002859136">
                <text:p>-0.002859136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628.8623046875">
                <text:p>628.8623046875</text:p>
              </table:table-cell>
              <table:table-cell office:value-type="float" office:value="0.001210804">
                <text:p>0.001210804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628.981689453125">
                <text:p>628.98168945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629.10107421875">
                <text:p>629.10107421875</text:p>
              </table:table-cell>
              <table:table-cell office:value-type="float" office:value="-0.001118495">
                <text:p>-0.001118495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629.220458984375">
                <text:p>629.220458984375</text:p>
              </table:table-cell>
              <table:table-cell office:value-type="float" office:value="0.02657971">
                <text:p>0.02657971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629.33984375">
                <text:p>629.33984375</text:p>
              </table:table-cell>
              <table:table-cell office:value-type="float" office:value="0.01572917">
                <text:p>0.01572917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629.459228515625">
                <text:p>629.459228515625</text:p>
              </table:table-cell>
              <table:table-cell office:value-type="float" office:value="0.01578159">
                <text:p>0.01578159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629.57861328125">
                <text:p>629.57861328125</text:p>
              </table:table-cell>
              <table:table-cell office:value-type="float" office:value="-0.002548148">
                <text:p>-0.002548148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629.697998046875">
                <text:p>629.697998046875</text:p>
              </table:table-cell>
              <table:table-cell office:value-type="float" office:value="0.001827674">
                <text:p>0.001827674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29.8173828125">
                <text:p>629.8173828125</text:p>
              </table:table-cell>
              <table:table-cell office:value-type="float" office:value="0.005844427">
                <text:p>0.005844427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29.936828613281">
                <text:p>629.936828613281</text:p>
              </table:table-cell>
              <table:table-cell office:value-type="float" office:value="0.03608244">
                <text:p>0.03608244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30.056213378906">
                <text:p>630.056213378906</text:p>
              </table:table-cell>
              <table:table-cell office:value-type="float" office:value="0.01795529">
                <text:p>0.01795529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630.175598144531">
                <text:p>630.175598144531</text:p>
              </table:table-cell>
              <table:table-cell office:value-type="float" office:value="0.0168272">
                <text:p>0.0168272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630.295043945313">
                <text:p>630.295043945313</text:p>
              </table:table-cell>
              <table:table-cell office:value-type="float" office:value="-0.0003654341">
                <text:p>-0.0003654341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630.414428710938">
                <text:p>630.414428710938</text:p>
              </table:table-cell>
              <table:table-cell office:value-type="float" office:value="0.01290179">
                <text:p>0.01290179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630.533813476563">
                <text:p>630.533813476563</text:p>
              </table:table-cell>
              <table:table-cell office:value-type="float" office:value="0.004447341">
                <text:p>0.004447341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630.653259277344">
                <text:p>630.653259277344</text:p>
              </table:table-cell>
              <table:table-cell office:value-type="float" office:value="-0.002003669">
                <text:p>-0.002003669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630.772644042969">
                <text:p>630.772644042969</text:p>
              </table:table-cell>
              <table:table-cell office:value-type="float" office:value="0.003526428">
                <text:p>0.003526428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630.89208984375">
                <text:p>630.89208984375</text:p>
              </table:table-cell>
              <table:table-cell office:value-type="float" office:value="0.009534079">
                <text:p>0.009534079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631.011474609375">
                <text:p>631.011474609375</text:p>
              </table:table-cell>
              <table:table-cell office:value-type="float" office:value="0.01636776">
                <text:p>0.01636776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631.130920410156">
                <text:p>631.130920410156</text:p>
              </table:table-cell>
              <table:table-cell office:value-type="float" office:value="0.005117208">
                <text:p>0.005117208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631.250305175781">
                <text:p>631.250305175781</text:p>
              </table:table-cell>
              <table:table-cell office:value-type="float" office:value="0.004168564">
                <text:p>0.004168564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631.369750976563">
                <text:p>631.369750976563</text:p>
              </table:table-cell>
              <table:table-cell office:value-type="float" office:value="0.01221604">
                <text:p>0.01221604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631.489135742188">
                <text:p>631.489135742188</text:p>
              </table:table-cell>
              <table:table-cell office:value-type="float" office:value="0.01785927">
                <text:p>0.01785927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631.608581542969">
                <text:p>631.608581542969</text:p>
              </table:table-cell>
              <table:table-cell office:value-type="float" office:value="-0.0007074351">
                <text:p>-0.0007074351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631.72802734375">
                <text:p>631.72802734375</text:p>
              </table:table-cell>
              <table:table-cell office:value-type="float" office:value="0.01347928">
                <text:p>0.01347928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631.847412109375">
                <text:p>631.847412109375</text:p>
              </table:table-cell>
              <table:table-cell office:value-type="float" office:value="0.002800243">
                <text:p>0.002800243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631.966857910156">
                <text:p>631.966857910156</text:p>
              </table:table-cell>
              <table:table-cell office:value-type="float" office:value="0.02173628">
                <text:p>0.02173628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632.086303710938">
                <text:p>632.086303710938</text:p>
              </table:table-cell>
              <table:table-cell office:value-type="float" office:value="-0.003233019">
                <text:p>-0.003233019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632.205749511719">
                <text:p>632.205749511719</text:p>
              </table:table-cell>
              <table:table-cell office:value-type="float" office:value="0.005546873">
                <text:p>0.005546873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32.3251953125">
                <text:p>632.3251953125</text:p>
              </table:table-cell>
              <table:table-cell office:value-type="float" office:value="0.004920365">
                <text:p>0.004920365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32.444580078125">
                <text:p>632.444580078125</text:p>
              </table:table-cell>
              <table:table-cell office:value-type="float" office:value="0.01627766">
                <text:p>0.01627766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32.564025878906">
                <text:p>632.564025878906</text:p>
              </table:table-cell>
              <table:table-cell office:value-type="float" office:value="0.004266558">
                <text:p>0.004266558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32.683471679688">
                <text:p>632.683471679688</text:p>
              </table:table-cell>
              <table:table-cell office:value-type="float" office:value="0.006782142">
                <text:p>0.006782142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32.802917480469">
                <text:p>632.802917480469</text:p>
              </table:table-cell>
              <table:table-cell office:value-type="float" office:value="0.001656695">
                <text:p>0.001656695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32.92236328125">
                <text:p>632.92236328125</text:p>
              </table:table-cell>
              <table:table-cell office:value-type="float" office:value="-0.002698708">
                <text:p>-0.002698708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33.041809082031">
                <text:p>633.041809082031</text:p>
              </table:table-cell>
              <table:table-cell office:value-type="float" office:value="0.01307217">
                <text:p>0.01307217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633.161254882813">
                <text:p>633.161254882813</text:p>
              </table:table-cell>
              <table:table-cell office:value-type="float" office:value="0.03833222">
                <text:p>0.03833222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633.280700683594">
                <text:p>633.280700683594</text:p>
              </table:table-cell>
              <table:table-cell office:value-type="float" office:value="-0.001888902">
                <text:p>-0.001888902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633.400146484375">
                <text:p>633.400146484375</text:p>
              </table:table-cell>
              <table:table-cell office:value-type="float" office:value="0.003329019">
                <text:p>0.003329019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633.519592285156">
                <text:p>633.519592285156</text:p>
              </table:table-cell>
              <table:table-cell office:value-type="float" office:value="0.0001172139">
                <text:p>0.0001172139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633.639038085938">
                <text:p>633.639038085938</text:p>
              </table:table-cell>
              <table:table-cell office:value-type="float" office:value="0.01536573">
                <text:p>0.01536573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633.758544921875">
                <text:p>633.758544921875</text:p>
              </table:table-cell>
              <table:table-cell office:value-type="float" office:value="-0.004610096">
                <text:p>-0.004610096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633.877990722656">
                <text:p>633.877990722656</text:p>
              </table:table-cell>
              <table:table-cell office:value-type="float" office:value="0.004595901">
                <text:p>0.004595901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633.997436523438">
                <text:p>633.997436523438</text:p>
              </table:table-cell>
              <table:table-cell office:value-type="float" office:value="0.002069234">
                <text:p>0.002069234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634.116882324219">
                <text:p>634.116882324219</text:p>
              </table:table-cell>
              <table:table-cell office:value-type="float" office:value="-0.002344663">
                <text:p>-0.002344663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634.236389160156">
                <text:p>634.236389160156</text:p>
              </table:table-cell>
              <table:table-cell office:value-type="float" office:value="-0.001824404">
                <text:p>-0.001824404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634.355834960938">
                <text:p>634.355834960938</text:p>
              </table:table-cell>
              <table:table-cell office:value-type="float" office:value="0.005302879">
                <text:p>0.005302879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634.475280761719">
                <text:p>634.475280761719</text:p>
              </table:table-cell>
              <table:table-cell office:value-type="float" office:value="0.0005940629">
                <text:p>0.0005940629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634.594787597656">
                <text:p>634.594787597656</text:p>
              </table:table-cell>
              <table:table-cell office:value-type="float" office:value="0.0267755">
                <text:p>0.0267755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634.714233398438">
                <text:p>634.714233398438</text:p>
              </table:table-cell>
              <table:table-cell office:value-type="float" office:value="-0.001230927">
                <text:p>-0.001230927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634.833679199219">
                <text:p>634.833679199219</text:p>
              </table:table-cell>
              <table:table-cell office:value-type="float" office:value="-0.003088692">
                <text:p>-0.003088692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634.953186035156">
                <text:p>634.953186035156</text:p>
              </table:table-cell>
              <table:table-cell office:value-type="float" office:value="0.009961602">
                <text:p>0.009961602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635.072631835938">
                <text:p>635.072631835938</text:p>
              </table:table-cell>
              <table:table-cell office:value-type="float" office:value="0.01271476">
                <text:p>0.01271476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35.192138671875">
                <text:p>635.192138671875</text:p>
              </table:table-cell>
              <table:table-cell office:value-type="float" office:value="0.002974624">
                <text:p>0.002974624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635.311584472656">
                <text:p>635.311584472656</text:p>
              </table:table-cell>
              <table:table-cell office:value-type="float" office:value="-0.007654584">
                <text:p>-0.007654584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635.431091308594">
                <text:p>635.431091308594</text:p>
              </table:table-cell>
              <table:table-cell office:value-type="float" office:value="0.02314332">
                <text:p>0.0231433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635.550598144531">
                <text:p>635.550598144531</text:p>
              </table:table-cell>
              <table:table-cell office:value-type="float" office:value="0.01127749">
                <text:p>0.01127749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35.670043945313">
                <text:p>635.670043945313</text:p>
              </table:table-cell>
              <table:table-cell office:value-type="float" office:value="-0.003423996">
                <text:p>-0.003423996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35.78955078125">
                <text:p>635.78955078125</text:p>
              </table:table-cell>
              <table:table-cell office:value-type="float" office:value="0.00516477">
                <text:p>0.00516477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635.909057617188">
                <text:p>635.909057617188</text:p>
              </table:table-cell>
              <table:table-cell office:value-type="float" office:value="0.004064666">
                <text:p>0.004064666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636.028503417969">
                <text:p>636.028503417969</text:p>
              </table:table-cell>
              <table:table-cell office:value-type="float" office:value="-0.002437302">
                <text:p>-0.002437302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636.148010253906">
                <text:p>636.148010253906</text:p>
              </table:table-cell>
              <table:table-cell office:value-type="float" office:value="-0.001519879">
                <text:p>-0.001519879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636.267517089844">
                <text:p>636.267517089844</text:p>
              </table:table-cell>
              <table:table-cell office:value-type="float" office:value="0.01473564">
                <text:p>0.01473564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636.387023925781">
                <text:p>636.387023925781</text:p>
              </table:table-cell>
              <table:table-cell office:value-type="float" office:value="0.01511226">
                <text:p>0.01511226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636.506469726563">
                <text:p>636.506469726563</text:p>
              </table:table-cell>
              <table:table-cell office:value-type="float" office:value="0.005528125">
                <text:p>0.005528125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636.6259765625">
                <text:p>636.6259765625</text:p>
              </table:table-cell>
              <table:table-cell office:value-type="float" office:value="0.01502762">
                <text:p>0.01502762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636.745483398438">
                <text:p>636.745483398438</text:p>
              </table:table-cell>
              <table:table-cell office:value-type="float" office:value="-0.003510471">
                <text:p>-0.003510471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636.864990234375">
                <text:p>636.864990234375</text:p>
              </table:table-cell>
              <table:table-cell office:value-type="float" office:value="0.002122488">
                <text:p>0.002122488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636.984497070313">
                <text:p>636.984497070313</text:p>
              </table:table-cell>
              <table:table-cell office:value-type="float" office:value="-0.003705847">
                <text:p>-0.003705847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637.10400390625">
                <text:p>637.10400390625</text:p>
              </table:table-cell>
              <table:table-cell office:value-type="float" office:value="-0.004111958">
                <text:p>-0.004111958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637.223510742188">
                <text:p>637.223510742188</text:p>
              </table:table-cell>
              <table:table-cell office:value-type="float" office:value="0.006708776">
                <text:p>0.006708776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637.343017578125">
                <text:p>637.343017578125</text:p>
              </table:table-cell>
              <table:table-cell office:value-type="float" office:value="0.01647231">
                <text:p>0.01647231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637.462524414063">
                <text:p>637.462524414063</text:p>
              </table:table-cell>
              <table:table-cell office:value-type="float" office:value="-0.004082148">
                <text:p>-0.004082148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637.58203125">
                <text:p>637.58203125</text:p>
              </table:table-cell>
              <table:table-cell office:value-type="float" office:value="0.02704417">
                <text:p>0.02704417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637.701538085938">
                <text:p>637.701538085938</text:p>
              </table:table-cell>
              <table:table-cell office:value-type="float" office:value="0.004926876">
                <text:p>0.004926876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637.821044921875">
                <text:p>637.821044921875</text:p>
              </table:table-cell>
              <table:table-cell office:value-type="float" office:value="0.0008945704">
                <text:p>0.0008945704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637.940551757813">
                <text:p>637.940551757813</text:p>
              </table:table-cell>
              <table:table-cell office:value-type="float" office:value="-0.005782234">
                <text:p>-0.005782234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638.060119628906">
                <text:p>638.060119628906</text:p>
              </table:table-cell>
              <table:table-cell office:value-type="float" office:value="-0.006290091">
                <text:p>-0.006290091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638.179626464844">
                <text:p>638.179626464844</text:p>
              </table:table-cell>
              <table:table-cell office:value-type="float" office:value="-0.002698458">
                <text:p>-0.002698458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638.299133300781">
                <text:p>638.299133300781</text:p>
              </table:table-cell>
              <table:table-cell office:value-type="float" office:value="0.01520624">
                <text:p>0.01520624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638.418640136719">
                <text:p>638.418640136719</text:p>
              </table:table-cell>
              <table:table-cell office:value-type="float" office:value="0.01977334">
                <text:p>0.01977334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638.538208007813">
                <text:p>638.538208007813</text:p>
              </table:table-cell>
              <table:table-cell office:value-type="float" office:value="-0.0003096749">
                <text:p>-0.0003096749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38.65771484375">
                <text:p>638.65771484375</text:p>
              </table:table-cell>
              <table:table-cell office:value-type="float" office:value="0.0001713569">
                <text:p>0.0001713569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638.777221679688">
                <text:p>638.777221679688</text:p>
              </table:table-cell>
              <table:table-cell office:value-type="float" office:value="-0.003658947">
                <text:p>-0.003658947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638.896789550781">
                <text:p>638.896789550781</text:p>
              </table:table-cell>
              <table:table-cell office:value-type="float" office:value="0.01727777">
                <text:p>0.01727777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639.016296386719">
                <text:p>639.016296386719</text:p>
              </table:table-cell>
              <table:table-cell office:value-type="float" office:value="0.005501568">
                <text:p>0.005501568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639.135864257813">
                <text:p>639.135864257813</text:p>
              </table:table-cell>
              <table:table-cell office:value-type="float" office:value="-0.007629033">
                <text:p>-0.007629033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639.25537109375">
                <text:p>639.25537109375</text:p>
              </table:table-cell>
              <table:table-cell office:value-type="float" office:value="-0.0004155795">
                <text:p>-0.0004155795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639.374938964844">
                <text:p>639.374938964844</text:p>
              </table:table-cell>
              <table:table-cell office:value-type="float" office:value="0.005357565">
                <text:p>0.005357565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639.494445800781">
                <text:p>639.494445800781</text:p>
              </table:table-cell>
              <table:table-cell office:value-type="float" office:value="-0.0006624287">
                <text:p>-0.0006624287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639.614013671875">
                <text:p>639.614013671875</text:p>
              </table:table-cell>
              <table:table-cell office:value-type="float" office:value="0.0007648529">
                <text:p>0.0007648529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639.733520507813">
                <text:p>639.733520507813</text:p>
              </table:table-cell>
              <table:table-cell office:value-type="float" office:value="0.01792308">
                <text:p>0.01792308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639.853088378906">
                <text:p>639.853088378906</text:p>
              </table:table-cell>
              <table:table-cell office:value-type="float" office:value="-0.003436655">
                <text:p>-0.003436655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39.972595214844">
                <text:p>639.972595214844</text:p>
              </table:table-cell>
              <table:table-cell office:value-type="float" office:value="0.01721922">
                <text:p>0.01721922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40.092163085938">
                <text:p>640.092163085938</text:p>
              </table:table-cell>
              <table:table-cell office:value-type="float" office:value="-0.002692307">
                <text:p>-0.002692307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40.211730957031">
                <text:p>640.211730957031</text:p>
              </table:table-cell>
              <table:table-cell office:value-type="float" office:value="0.01404409">
                <text:p>0.01404409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40.331237792969">
                <text:p>640.331237792969</text:p>
              </table:table-cell>
              <table:table-cell office:value-type="float" office:value="0.002888764">
                <text:p>0.002888764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40.450805664063">
                <text:p>640.450805664063</text:p>
              </table:table-cell>
              <table:table-cell office:value-type="float" office:value="-0.004231535">
                <text:p>-0.004231535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40.570373535156">
                <text:p>640.570373535156</text:p>
              </table:table-cell>
              <table:table-cell office:value-type="float" office:value="0.01107558">
                <text:p>0.01107558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640.68994140625">
                <text:p>640.68994140625</text:p>
              </table:table-cell>
              <table:table-cell office:value-type="float" office:value="0.01065434">
                <text:p>0.01065434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640.809509277344">
                <text:p>640.809509277344</text:p>
              </table:table-cell>
              <table:table-cell office:value-type="float" office:value="-0.002911478">
                <text:p>-0.002911478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640.929016113281">
                <text:p>640.929016113281</text:p>
              </table:table-cell>
              <table:table-cell office:value-type="float" office:value="-0.007884222">
                <text:p>-0.007884222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641.048583984375">
                <text:p>641.048583984375</text:p>
              </table:table-cell>
              <table:table-cell office:value-type="float" office:value="-0.0085771">
                <text:p>-0.0085771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641.168151855469">
                <text:p>641.168151855469</text:p>
              </table:table-cell>
              <table:table-cell office:value-type="float" office:value="-0.002331274">
                <text:p>-0.002331274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641.287719726563">
                <text:p>641.287719726563</text:p>
              </table:table-cell>
              <table:table-cell office:value-type="float" office:value="-0.0009107589">
                <text:p>-0.0009107589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641.407287597656">
                <text:p>641.407287597656</text:p>
              </table:table-cell>
              <table:table-cell office:value-type="float" office:value="0.005581583">
                <text:p>0.005581583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641.52685546875">
                <text:p>641.52685546875</text:p>
              </table:table-cell>
              <table:table-cell office:value-type="float" office:value="0.01103135">
                <text:p>0.01103135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641.646423339844">
                <text:p>641.646423339844</text:p>
              </table:table-cell>
              <table:table-cell office:value-type="float" office:value="0.001583465">
                <text:p>0.001583465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641.765991210938">
                <text:p>641.765991210938</text:p>
              </table:table-cell>
              <table:table-cell office:value-type="float" office:value="-0.003943501">
                <text:p>-0.003943501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641.885559082031">
                <text:p>641.885559082031</text:p>
              </table:table-cell>
              <table:table-cell office:value-type="float" office:value="0.007052871">
                <text:p>0.007052871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642.005126953125">
                <text:p>642.005126953125</text:p>
              </table:table-cell>
              <table:table-cell office:value-type="float" office:value="-0.0001013589">
                <text:p>-0.0001013589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642.124694824219">
                <text:p>642.124694824219</text:p>
              </table:table-cell>
              <table:table-cell office:value-type="float" office:value="0.003371771">
                <text:p>0.003371771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642.244262695313">
                <text:p>642.244262695313</text:p>
              </table:table-cell>
              <table:table-cell office:value-type="float" office:value="-0.001764286">
                <text:p>-0.001764286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642.363891601563">
                <text:p>642.363891601563</text:p>
              </table:table-cell>
              <table:table-cell office:value-type="float" office:value="-0.004304958">
                <text:p>-0.004304958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642.483459472656">
                <text:p>642.483459472656</text:p>
              </table:table-cell>
              <table:table-cell office:value-type="float" office:value="-0.001744789">
                <text:p>-0.001744789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642.60302734375">
                <text:p>642.60302734375</text:p>
              </table:table-cell>
              <table:table-cell office:value-type="float" office:value="0.01116807">
                <text:p>0.01116807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642.722595214844">
                <text:p>642.722595214844</text:p>
              </table:table-cell>
              <table:table-cell office:value-type="float" office:value="-0.00620447">
                <text:p>-0.00620447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42.842163085938">
                <text:p>642.842163085938</text:p>
              </table:table-cell>
              <table:table-cell office:value-type="float" office:value="-0.002545894">
                <text:p>-0.002545894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42.961791992188">
                <text:p>642.961791992188</text:p>
              </table:table-cell>
              <table:table-cell office:value-type="float" office:value="0.000480745">
                <text:p>0.000480745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643.081359863281">
                <text:p>643.081359863281</text:p>
              </table:table-cell>
              <table:table-cell office:value-type="float" office:value="0.01053871">
                <text:p>0.01053871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643.200927734375">
                <text:p>643.200927734375</text:p>
              </table:table-cell>
              <table:table-cell office:value-type="float" office:value="0.004979719">
                <text:p>0.004979719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643.320556640625">
                <text:p>643.320556640625</text:p>
              </table:table-cell>
              <table:table-cell office:value-type="float" office:value="0.002326251">
                <text:p>0.002326251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643.440124511719">
                <text:p>643.440124511719</text:p>
              </table:table-cell>
              <table:table-cell office:value-type="float" office:value="0.01367654">
                <text:p>0.01367654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643.559753417969">
                <text:p>643.559753417969</text:p>
              </table:table-cell>
              <table:table-cell office:value-type="float" office:value="0.01165969">
                <text:p>0.01165969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643.679321289063">
                <text:p>643.679321289063</text:p>
              </table:table-cell>
              <table:table-cell office:value-type="float" office:value="0.007589224">
                <text:p>0.007589224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643.798950195313">
                <text:p>643.798950195313</text:p>
              </table:table-cell>
              <table:table-cell office:value-type="float" office:value="0.003949154">
                <text:p>0.003949154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643.918518066406">
                <text:p>643.918518066406</text:p>
              </table:table-cell>
              <table:table-cell office:value-type="float" office:value="0.001080307">
                <text:p>0.001080307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644.038146972656">
                <text:p>644.038146972656</text:p>
              </table:table-cell>
              <table:table-cell office:value-type="float" office:value="0.02147637">
                <text:p>0.02147637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644.15771484375">
                <text:p>644.15771484375</text:p>
              </table:table-cell>
              <table:table-cell office:value-type="float" office:value="-0.004388231">
                <text:p>-0.004388231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644.27734375">
                <text:p>644.27734375</text:p>
              </table:table-cell>
              <table:table-cell office:value-type="float" office:value="-0.003902622">
                <text:p>-0.003902622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644.396911621094">
                <text:p>644.396911621094</text:p>
              </table:table-cell>
              <table:table-cell office:value-type="float" office:value="-0.0006843189">
                <text:p>-0.0006843189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644.516540527344">
                <text:p>644.516540527344</text:p>
              </table:table-cell>
              <table:table-cell office:value-type="float" office:value="-0.001008747">
                <text:p>-0.001008747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644.636169433594">
                <text:p>644.636169433594</text:p>
              </table:table-cell>
              <table:table-cell office:value-type="float" office:value="-0.00248392">
                <text:p>-0.00248392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644.755737304688">
                <text:p>644.755737304688</text:p>
              </table:table-cell>
              <table:table-cell office:value-type="float" office:value="-0.003019765">
                <text:p>-0.003019765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644.875366210938">
                <text:p>644.875366210938</text:p>
              </table:table-cell>
              <table:table-cell office:value-type="float" office:value="0.008500794">
                <text:p>0.008500794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644.994995117188">
                <text:p>644.994995117188</text:p>
              </table:table-cell>
              <table:table-cell office:value-type="float" office:value="0.008801144">
                <text:p>0.008801144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645.114562988281">
                <text:p>645.114562988281</text:p>
              </table:table-cell>
              <table:table-cell office:value-type="float" office:value="0.01260272">
                <text:p>0.01260272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645.234191894531">
                <text:p>645.234191894531</text:p>
              </table:table-cell>
              <table:table-cell office:value-type="float" office:value="0.01065356">
                <text:p>0.01065356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645.353820800781">
                <text:p>645.353820800781</text:p>
              </table:table-cell>
              <table:table-cell office:value-type="float" office:value="0.001658455">
                <text:p>0.001658455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645.473449707031">
                <text:p>645.473449707031</text:p>
              </table:table-cell>
              <table:table-cell office:value-type="float" office:value="-0.00327142">
                <text:p>-0.00327142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645.593078613281">
                <text:p>645.593078613281</text:p>
              </table:table-cell>
              <table:table-cell office:value-type="float" office:value="0.002245702">
                <text:p>0.002245702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45.712707519531">
                <text:p>645.712707519531</text:p>
              </table:table-cell>
              <table:table-cell office:value-type="float" office:value="-0.0007722695">
                <text:p>-0.0007722695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45.832336425781">
                <text:p>645.832336425781</text:p>
              </table:table-cell>
              <table:table-cell office:value-type="float" office:value="-0.003524985">
                <text:p>-0.003524985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45.951965332031">
                <text:p>645.951965332031</text:p>
              </table:table-cell>
              <table:table-cell office:value-type="float" office:value="0.001621702">
                <text:p>0.001621702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46.071533203125">
                <text:p>646.071533203125</text:p>
              </table:table-cell>
              <table:table-cell office:value-type="float" office:value="0.0001499503">
                <text:p>0.0001499503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46.191162109375">
                <text:p>646.191162109375</text:p>
              </table:table-cell>
              <table:table-cell office:value-type="float" office:value="-0.005902319">
                <text:p>-0.005902319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46.310852050781">
                <text:p>646.310852050781</text:p>
              </table:table-cell>
              <table:table-cell office:value-type="float" office:value="0.01053103">
                <text:p>0.01053103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646.430480957031">
                <text:p>646.430480957031</text:p>
              </table:table-cell>
              <table:table-cell office:value-type="float" office:value="0.004002211">
                <text:p>0.004002211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646.550109863281">
                <text:p>646.550109863281</text:p>
              </table:table-cell>
              <table:table-cell office:value-type="float" office:value="0.01351902">
                <text:p>0.01351902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46.669738769531">
                <text:p>646.669738769531</text:p>
              </table:table-cell>
              <table:table-cell office:value-type="float" office:value="-0.000745676">
                <text:p>-0.000745676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646.789367675781">
                <text:p>646.789367675781</text:p>
              </table:table-cell>
              <table:table-cell office:value-type="float" office:value="0.007360765">
                <text:p>0.007360765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646.908996582031">
                <text:p>646.908996582031</text:p>
              </table:table-cell>
              <table:table-cell office:value-type="float" office:value="0.02714826">
                <text:p>0.02714826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647.028625488281">
                <text:p>647.028625488281</text:p>
              </table:table-cell>
              <table:table-cell office:value-type="float" office:value="0.007078524">
                <text:p>0.007078524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647.148254394531">
                <text:p>647.148254394531</text:p>
              </table:table-cell>
              <table:table-cell office:value-type="float" office:value="-0.0001159974">
                <text:p>-0.0001159974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647.267944335938">
                <text:p>647.267944335938</text:p>
              </table:table-cell>
              <table:table-cell office:value-type="float" office:value="-0.0004275982">
                <text:p>-0.0004275982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647.387573242188">
                <text:p>647.387573242188</text:p>
              </table:table-cell>
              <table:table-cell office:value-type="float" office:value="0.006968528">
                <text:p>0.006968528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647.507202148438">
                <text:p>647.507202148438</text:p>
              </table:table-cell>
              <table:table-cell office:value-type="float" office:value="-0.001625259">
                <text:p>-0.001625259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647.626831054688">
                <text:p>647.626831054688</text:p>
              </table:table-cell>
              <table:table-cell office:value-type="float" office:value="0.004911608">
                <text:p>0.004911608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647.746520996094">
                <text:p>647.746520996094</text:p>
              </table:table-cell>
              <table:table-cell office:value-type="float" office:value="0.02892393">
                <text:p>0.02892393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647.866149902344">
                <text:p>647.866149902344</text:p>
              </table:table-cell>
              <table:table-cell office:value-type="float" office:value="-0.005157663">
                <text:p>-0.005157663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647.985778808594">
                <text:p>647.985778808594</text:p>
              </table:table-cell>
              <table:table-cell office:value-type="float" office:value="0.02635702">
                <text:p>0.02635702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648.10546875">
                <text:p>648.10546875</text:p>
              </table:table-cell>
              <table:table-cell office:value-type="float" office:value="-0.005472901">
                <text:p>-0.005472901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648.22509765625">
                <text:p>648.22509765625</text:p>
              </table:table-cell>
              <table:table-cell office:value-type="float" office:value="0.02235772">
                <text:p>0.0223577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648.344787597656">
                <text:p>648.344787597656</text:p>
              </table:table-cell>
              <table:table-cell office:value-type="float" office:value="0.01031237">
                <text:p>0.01031237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648.464416503906">
                <text:p>648.464416503906</text:p>
              </table:table-cell>
              <table:table-cell office:value-type="float" office:value="0.001044071">
                <text:p>0.001044071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648.584106445313">
                <text:p>648.584106445313</text:p>
              </table:table-cell>
              <table:table-cell office:value-type="float" office:value="0.005226035">
                <text:p>0.005226035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648.703735351563">
                <text:p>648.703735351563</text:p>
              </table:table-cell>
              <table:table-cell office:value-type="float" office:value="0.002701448">
                <text:p>0.002701448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648.823425292969">
                <text:p>648.823425292969</text:p>
              </table:table-cell>
              <table:table-cell office:value-type="float" office:value="-0.008715181">
                <text:p>-0.008715181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648.943054199219">
                <text:p>648.943054199219</text:p>
              </table:table-cell>
              <table:table-cell office:value-type="float" office:value="-0.001958142">
                <text:p>-0.001958142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649.062744140625">
                <text:p>649.062744140625</text:p>
              </table:table-cell>
              <table:table-cell office:value-type="float" office:value="0.0004050424">
                <text:p>0.0004050424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649.182434082031">
                <text:p>649.182434082031</text:p>
              </table:table-cell>
              <table:table-cell office:value-type="float" office:value="0.00223485">
                <text:p>0.00223485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649.302062988281">
                <text:p>649.302062988281</text:p>
              </table:table-cell>
              <table:table-cell office:value-type="float" office:value="0.006802391">
                <text:p>0.006802391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649.421752929688">
                <text:p>649.421752929688</text:p>
              </table:table-cell>
              <table:table-cell office:value-type="float" office:value="-0.007203636">
                <text:p>-0.007203636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649.541442871094">
                <text:p>649.541442871094</text:p>
              </table:table-cell>
              <table:table-cell office:value-type="float" office:value="-0.001955209">
                <text:p>-0.001955209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49.661071777344">
                <text:p>649.661071777344</text:p>
              </table:table-cell>
              <table:table-cell office:value-type="float" office:value="0.01911967">
                <text:p>0.01911967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649.78076171875">
                <text:p>649.78076171875</text:p>
              </table:table-cell>
              <table:table-cell office:value-type="float" office:value="0.005784376">
                <text:p>0.005784376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649.900451660156">
                <text:p>649.900451660156</text:p>
              </table:table-cell>
              <table:table-cell office:value-type="float" office:value="0.006190426">
                <text:p>0.006190426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650.020141601563">
                <text:p>650.020141601563</text:p>
              </table:table-cell>
              <table:table-cell office:value-type="float" office:value="-0.003197125">
                <text:p>-0.003197125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650.139770507813">
                <text:p>650.139770507813</text:p>
              </table:table-cell>
              <table:table-cell office:value-type="float" office:value="-0.007022438">
                <text:p>-0.007022438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650.259460449219">
                <text:p>650.259460449219</text:p>
              </table:table-cell>
              <table:table-cell office:value-type="float" office:value="-0.005423923">
                <text:p>-0.005423923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650.379150390625">
                <text:p>650.379150390625</text:p>
              </table:table-cell>
              <table:table-cell office:value-type="float" office:value="0.001526982">
                <text:p>0.001526982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50.498840332031">
                <text:p>650.498840332031</text:p>
              </table:table-cell>
              <table:table-cell office:value-type="float" office:value="-0.001732252">
                <text:p>-0.001732252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50.618530273438">
                <text:p>650.618530273438</text:p>
              </table:table-cell>
              <table:table-cell office:value-type="float" office:value="0.005960555">
                <text:p>0.005960555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50.738220214844">
                <text:p>650.738220214844</text:p>
              </table:table-cell>
              <table:table-cell office:value-type="float" office:value="-0.0001766199">
                <text:p>-0.0001766199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650.85791015625">
                <text:p>650.85791015625</text:p>
              </table:table-cell>
              <table:table-cell office:value-type="float" office:value="0.009014093">
                <text:p>0.009014093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650.977600097656">
                <text:p>650.977600097656</text:p>
              </table:table-cell>
              <table:table-cell office:value-type="float" office:value="0.01103865">
                <text:p>0.01103865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651.097290039063">
                <text:p>651.097290039063</text:p>
              </table:table-cell>
              <table:table-cell office:value-type="float" office:value="0.002293675">
                <text:p>0.002293675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651.216979980469">
                <text:p>651.216979980469</text:p>
              </table:table-cell>
              <table:table-cell office:value-type="float" office:value="0.01253172">
                <text:p>0.01253172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651.336669921875">
                <text:p>651.336669921875</text:p>
              </table:table-cell>
              <table:table-cell office:value-type="float" office:value="0.000946636">
                <text:p>0.000946636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651.456359863281">
                <text:p>651.456359863281</text:p>
              </table:table-cell>
              <table:table-cell office:value-type="float" office:value="0.0009460535">
                <text:p>0.0009460535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651.576049804688">
                <text:p>651.576049804688</text:p>
              </table:table-cell>
              <table:table-cell office:value-type="float" office:value="-0.002323769">
                <text:p>-0.002323769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51.695739746094">
                <text:p>651.695739746094</text:p>
              </table:table-cell>
              <table:table-cell office:value-type="float" office:value="0.007116602">
                <text:p>0.007116602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51.8154296875">
                <text:p>651.8154296875</text:p>
              </table:table-cell>
              <table:table-cell office:value-type="float" office:value="-0.001172855">
                <text:p>-0.001172855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51.935180664063">
                <text:p>651.935180664063</text:p>
              </table:table-cell>
              <table:table-cell office:value-type="float" office:value="-0.005744781">
                <text:p>-0.005744781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52.054870605469">
                <text:p>652.054870605469</text:p>
              </table:table-cell>
              <table:table-cell office:value-type="float" office:value="0.003592106">
                <text:p>0.003592106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52.174560546875">
                <text:p>652.174560546875</text:p>
              </table:table-cell>
              <table:table-cell office:value-type="float" office:value="-0.001751142">
                <text:p>-0.001751142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52.294250488281">
                <text:p>652.294250488281</text:p>
              </table:table-cell>
              <table:table-cell office:value-type="float" office:value="-0.001398333">
                <text:p>-0.001398333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652.414001464844">
                <text:p>652.414001464844</text:p>
              </table:table-cell>
              <table:table-cell office:value-type="float" office:value="0.004521523">
                <text:p>0.004521523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652.53369140625">
                <text:p>652.53369140625</text:p>
              </table:table-cell>
              <table:table-cell office:value-type="float" office:value="-0.006095146">
                <text:p>-0.006095146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652.653381347656">
                <text:p>652.653381347656</text:p>
              </table:table-cell>
              <table:table-cell office:value-type="float" office:value="0.001067607">
                <text:p>0.001067607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652.773071289063">
                <text:p>652.773071289063</text:p>
              </table:table-cell>
              <table:table-cell office:value-type="float" office:value="-0.006917321">
                <text:p>-0.006917321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652.892822265625">
                <text:p>652.892822265625</text:p>
              </table:table-cell>
              <table:table-cell office:value-type="float" office:value="0.00706401">
                <text:p>0.00706401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653.012512207031">
                <text:p>653.012512207031</text:p>
              </table:table-cell>
              <table:table-cell office:value-type="float" office:value="-0.003724789">
                <text:p>-0.003724789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653.132263183594">
                <text:p>653.132263183594</text:p>
              </table:table-cell>
              <table:table-cell office:value-type="float" office:value="0.005335403">
                <text:p>0.005335403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653.251953125">
                <text:p>653.251953125</text:p>
              </table:table-cell>
              <table:table-cell office:value-type="float" office:value="-0.004495563">
                <text:p>-0.004495563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653.371704101563">
                <text:p>653.371704101563</text:p>
              </table:table-cell>
              <table:table-cell office:value-type="float" office:value="0.003990612">
                <text:p>0.003990612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653.491394042969">
                <text:p>653.491394042969</text:p>
              </table:table-cell>
              <table:table-cell office:value-type="float" office:value="0.01957794">
                <text:p>0.01957794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653.611145019531">
                <text:p>653.611145019531</text:p>
              </table:table-cell>
              <table:table-cell office:value-type="float" office:value="0.005185043">
                <text:p>0.005185043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653.730834960938">
                <text:p>653.730834960938</text:p>
              </table:table-cell>
              <table:table-cell office:value-type="float" office:value="0.02385694">
                <text:p>0.02385694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653.8505859375">
                <text:p>653.8505859375</text:p>
              </table:table-cell>
              <table:table-cell office:value-type="float" office:value="0.004717229">
                <text:p>0.004717229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653.970275878906">
                <text:p>653.970275878906</text:p>
              </table:table-cell>
              <table:table-cell office:value-type="float" office:value="0.01801332">
                <text:p>0.01801332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654.090026855469">
                <text:p>654.090026855469</text:p>
              </table:table-cell>
              <table:table-cell office:value-type="float" office:value="-0.006366109">
                <text:p>-0.006366109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654.209716796875">
                <text:p>654.209716796875</text:p>
              </table:table-cell>
              <table:table-cell office:value-type="float" office:value="-0.003675169">
                <text:p>-0.003675169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654.329467773438">
                <text:p>654.329467773438</text:p>
              </table:table-cell>
              <table:table-cell office:value-type="float" office:value="-0.01202293">
                <text:p>-0.01202293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654.44921875">
                <text:p>654.44921875</text:p>
              </table:table-cell>
              <table:table-cell office:value-type="float" office:value="0.008361468">
                <text:p>0.008361468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54.568969726563">
                <text:p>654.568969726563</text:p>
              </table:table-cell>
              <table:table-cell office:value-type="float" office:value="-0.003884767">
                <text:p>-0.003884767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654.688659667969">
                <text:p>654.688659667969</text:p>
              </table:table-cell>
              <table:table-cell office:value-type="float" office:value="0.007068644">
                <text:p>0.007068644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654.808410644531">
                <text:p>654.808410644531</text:p>
              </table:table-cell>
              <table:table-cell office:value-type="float" office:value="0.0005073598">
                <text:p>0.0005073598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654.928161621094">
                <text:p>654.928161621094</text:p>
              </table:table-cell>
              <table:table-cell office:value-type="float" office:value="-0.0007038256">
                <text:p>-0.0007038256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55.047912597656">
                <text:p>655.047912597656</text:p>
              </table:table-cell>
              <table:table-cell office:value-type="float" office:value="0.01838209">
                <text:p>0.01838209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55.167602539063">
                <text:p>655.167602539063</text:p>
              </table:table-cell>
              <table:table-cell office:value-type="float" office:value="-0.0002235119">
                <text:p>-0.0002235119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55.287353515625">
                <text:p>655.287353515625</text:p>
              </table:table-cell>
              <table:table-cell office:value-type="float" office:value="0.01046119">
                <text:p>0.01046119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655.407104492188">
                <text:p>655.407104492188</text:p>
              </table:table-cell>
              <table:table-cell office:value-type="float" office:value="-0.008311636">
                <text:p>-0.008311636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655.52685546875">
                <text:p>655.52685546875</text:p>
              </table:table-cell>
              <table:table-cell office:value-type="float" office:value="0.001683329">
                <text:p>0.001683329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655.646606445313">
                <text:p>655.646606445313</text:p>
              </table:table-cell>
              <table:table-cell office:value-type="float" office:value="-0.009718755">
                <text:p>-0.009718755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655.766357421875">
                <text:p>655.766357421875</text:p>
              </table:table-cell>
              <table:table-cell office:value-type="float" office:value="0.001828351">
                <text:p>0.001828351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655.886108398438">
                <text:p>655.886108398438</text:p>
              </table:table-cell>
              <table:table-cell office:value-type="float" office:value="-0.00815648">
                <text:p>-0.00815648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656.005859375">
                <text:p>656.005859375</text:p>
              </table:table-cell>
              <table:table-cell office:value-type="float" office:value="-0.01033911">
                <text:p>-0.01033911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656.125610351563">
                <text:p>656.125610351563</text:p>
              </table:table-cell>
              <table:table-cell office:value-type="float" office:value="0.002241095">
                <text:p>0.002241095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656.245361328125">
                <text:p>656.245361328125</text:p>
              </table:table-cell>
              <table:table-cell office:value-type="float" office:value="-0.002485774">
                <text:p>-0.002485774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656.365112304688">
                <text:p>656.365112304688</text:p>
              </table:table-cell>
              <table:table-cell office:value-type="float" office:value="0.0165264">
                <text:p>0.0165264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656.48486328125">
                <text:p>656.48486328125</text:p>
              </table:table-cell>
              <table:table-cell office:value-type="float" office:value="-0.002073888">
                <text:p>-0.002073888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656.604614257813">
                <text:p>656.604614257813</text:p>
              </table:table-cell>
              <table:table-cell office:value-type="float" office:value="0.00241895">
                <text:p>0.00241895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656.724365234375">
                <text:p>656.724365234375</text:p>
              </table:table-cell>
              <table:table-cell office:value-type="float" office:value="0.01962326">
                <text:p>0.01962326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656.844116210938">
                <text:p>656.844116210938</text:p>
              </table:table-cell>
              <table:table-cell office:value-type="float" office:value="0.001355273">
                <text:p>0.001355273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656.9638671875">
                <text:p>656.9638671875</text:p>
              </table:table-cell>
              <table:table-cell office:value-type="float" office:value="-0.001755424">
                <text:p>-0.001755424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657.083679199219">
                <text:p>657.083679199219</text:p>
              </table:table-cell>
              <table:table-cell office:value-type="float" office:value="0.003914101">
                <text:p>0.003914101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657.203430175781">
                <text:p>657.203430175781</text:p>
              </table:table-cell>
              <table:table-cell office:value-type="float" office:value="-0.003680764">
                <text:p>-0.003680764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657.323181152344">
                <text:p>657.323181152344</text:p>
              </table:table-cell>
              <table:table-cell office:value-type="float" office:value="0.01570501">
                <text:p>0.01570501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657.442932128906">
                <text:p>657.442932128906</text:p>
              </table:table-cell>
              <table:table-cell office:value-type="float" office:value="0.009525825">
                <text:p>0.009525825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57.562744140625">
                <text:p>657.562744140625</text:p>
              </table:table-cell>
              <table:table-cell office:value-type="float" office:value="0.005308683">
                <text:p>0.005308683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7.682495117188">
                <text:p>657.682495117188</text:p>
              </table:table-cell>
              <table:table-cell office:value-type="float" office:value="0.01649876">
                <text:p>0.01649876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57.80224609375">
                <text:p>657.80224609375</text:p>
              </table:table-cell>
              <table:table-cell office:value-type="float" office:value="0.008420316">
                <text:p>0.008420316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57.921997070313">
                <text:p>657.921997070313</text:p>
              </table:table-cell>
              <table:table-cell office:value-type="float" office:value="-0.005975451">
                <text:p>-0.005975451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658.041809082031">
                <text:p>658.041809082031</text:p>
              </table:table-cell>
              <table:table-cell office:value-type="float" office:value="-0.003800791">
                <text:p>-0.003800791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658.161560058594">
                <text:p>658.161560058594</text:p>
              </table:table-cell>
              <table:table-cell office:value-type="float" office:value="-0.008139701">
                <text:p>-0.008139701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658.281372070313">
                <text:p>658.281372070313</text:p>
              </table:table-cell>
              <table:table-cell office:value-type="float" office:value="0.01476755">
                <text:p>0.01476755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658.401123046875">
                <text:p>658.401123046875</text:p>
              </table:table-cell>
              <table:table-cell office:value-type="float" office:value="0.03106951">
                <text:p>0.03106951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658.520935058594">
                <text:p>658.520935058594</text:p>
              </table:table-cell>
              <table:table-cell office:value-type="float" office:value="-0.003904947">
                <text:p>-0.003904947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658.640686035156">
                <text:p>658.640686035156</text:p>
              </table:table-cell>
              <table:table-cell office:value-type="float" office:value="-0.005812788">
                <text:p>-0.005812788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658.760437011719">
                <text:p>658.760437011719</text:p>
              </table:table-cell>
              <table:table-cell office:value-type="float" office:value="-0.001228384">
                <text:p>-0.001228384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658.880249023438">
                <text:p>658.880249023438</text:p>
              </table:table-cell>
              <table:table-cell office:value-type="float" office:value="-0.006517091">
                <text:p>-0.006517091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659.000061035156">
                <text:p>659.000061035156</text:p>
              </table:table-cell>
              <table:table-cell office:value-type="float" office:value="-0.003143149">
                <text:p>-0.003143149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659.119812011719">
                <text:p>659.119812011719</text:p>
              </table:table-cell>
              <table:table-cell office:value-type="float" office:value="-0.006892288">
                <text:p>-0.006892288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659.239624023438">
                <text:p>659.239624023438</text:p>
              </table:table-cell>
              <table:table-cell office:value-type="float" office:value="0.00548214">
                <text:p>0.00548214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659.359375">
                <text:p>659.359375</text:p>
              </table:table-cell>
              <table:table-cell office:value-type="float" office:value="0.004296086">
                <text:p>0.004296086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659.479187011719">
                <text:p>659.479187011719</text:p>
              </table:table-cell>
              <table:table-cell office:value-type="float" office:value="0.001924036">
                <text:p>0.001924036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659.598999023438">
                <text:p>659.598999023438</text:p>
              </table:table-cell>
              <table:table-cell office:value-type="float" office:value="0.002087465">
                <text:p>0.002087465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659.71875">
                <text:p>659.71875</text:p>
              </table:table-cell>
              <table:table-cell office:value-type="float" office:value="0.004051721">
                <text:p>0.004051721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659.838562011719">
                <text:p>659.838562011719</text:p>
              </table:table-cell>
              <table:table-cell office:value-type="float" office:value="-0.006589915">
                <text:p>-0.006589915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659.958374023438">
                <text:p>659.958374023438</text:p>
              </table:table-cell>
              <table:table-cell office:value-type="float" office:value="-0.002542848">
                <text:p>-0.002542848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660.078125">
                <text:p>660.078125</text:p>
              </table:table-cell>
              <table:table-cell office:value-type="float" office:value="-0.00792969">
                <text:p>-0.00792969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660.197937011719">
                <text:p>660.197937011719</text:p>
              </table:table-cell>
              <table:table-cell office:value-type="float" office:value="0.006251895">
                <text:p>0.006251895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60.317749023438">
                <text:p>660.317749023438</text:p>
              </table:table-cell>
              <table:table-cell office:value-type="float" office:value="0.002762864">
                <text:p>0.002762864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660.437561035156">
                <text:p>660.437561035156</text:p>
              </table:table-cell>
              <table:table-cell office:value-type="float" office:value="0.01529136">
                <text:p>0.01529136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660.557373046875">
                <text:p>660.557373046875</text:p>
              </table:table-cell>
              <table:table-cell office:value-type="float" office:value="-0.01098717">
                <text:p>-0.01098717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60.677124023438">
                <text:p>660.677124023438</text:p>
              </table:table-cell>
              <table:table-cell office:value-type="float" office:value="-0.006757346">
                <text:p>-0.006757346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60.796936035156">
                <text:p>660.796936035156</text:p>
              </table:table-cell>
              <table:table-cell office:value-type="float" office:value="-0.00142329">
                <text:p>-0.00142329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660.916748046875">
                <text:p>660.916748046875</text:p>
              </table:table-cell>
              <table:table-cell office:value-type="float" office:value="-0.009752787">
                <text:p>-0.009752787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661.036560058594">
                <text:p>661.036560058594</text:p>
              </table:table-cell>
              <table:table-cell office:value-type="float" office:value="0.004032441">
                <text:p>0.004032441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661.156372070313">
                <text:p>661.156372070313</text:p>
              </table:table-cell>
              <table:table-cell office:value-type="float" office:value="0.005128266">
                <text:p>0.005128266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661.276184082031">
                <text:p>661.276184082031</text:p>
              </table:table-cell>
              <table:table-cell office:value-type="float" office:value="-0.001012249">
                <text:p>-0.001012249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661.39599609375">
                <text:p>661.39599609375</text:p>
              </table:table-cell>
              <table:table-cell office:value-type="float" office:value="0.0008735593">
                <text:p>0.0008735593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661.515808105469">
                <text:p>661.515808105469</text:p>
              </table:table-cell>
              <table:table-cell office:value-type="float" office:value="0.01130677">
                <text:p>0.01130677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661.635620117188">
                <text:p>661.635620117188</text:p>
              </table:table-cell>
              <table:table-cell office:value-type="float" office:value="-0.003054559">
                <text:p>-0.003054559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661.755432128906">
                <text:p>661.755432128906</text:p>
              </table:table-cell>
              <table:table-cell office:value-type="float" office:value="0.004936344">
                <text:p>0.004936344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661.875244140625">
                <text:p>661.875244140625</text:p>
              </table:table-cell>
              <table:table-cell office:value-type="float" office:value="0.01030722">
                <text:p>0.01030722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661.995056152344">
                <text:p>661.995056152344</text:p>
              </table:table-cell>
              <table:table-cell office:value-type="float" office:value="0.002734483">
                <text:p>0.002734483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662.114868164063">
                <text:p>662.114868164063</text:p>
              </table:table-cell>
              <table:table-cell office:value-type="float" office:value="-0.002460798">
                <text:p>-0.002460798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662.234680175781">
                <text:p>662.234680175781</text:p>
              </table:table-cell>
              <table:table-cell office:value-type="float" office:value="-0.005274433">
                <text:p>-0.005274433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662.354553222656">
                <text:p>662.354553222656</text:p>
              </table:table-cell>
              <table:table-cell office:value-type="float" office:value="-0.005323344">
                <text:p>-0.005323344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662.474365234375">
                <text:p>662.474365234375</text:p>
              </table:table-cell>
              <table:table-cell office:value-type="float" office:value="-0.0008486711">
                <text:p>-0.0008486711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662.594177246094">
                <text:p>662.594177246094</text:p>
              </table:table-cell>
              <table:table-cell office:value-type="float" office:value="0.002014594">
                <text:p>0.002014594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662.713989257813">
                <text:p>662.713989257813</text:p>
              </table:table-cell>
              <table:table-cell office:value-type="float" office:value="0.006618525">
                <text:p>0.006618525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662.833801269531">
                <text:p>662.833801269531</text:p>
              </table:table-cell>
              <table:table-cell office:value-type="float" office:value="-0.009439715">
                <text:p>-0.009439715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662.953674316406">
                <text:p>662.953674316406</text:p>
              </table:table-cell>
              <table:table-cell office:value-type="float" office:value="-0.003446416">
                <text:p>-0.003446416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663.073486328125">
                <text:p>663.073486328125</text:p>
              </table:table-cell>
              <table:table-cell office:value-type="float" office:value="-0.001911501">
                <text:p>-0.001911501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663.193298339844">
                <text:p>663.193298339844</text:p>
              </table:table-cell>
              <table:table-cell office:value-type="float" office:value="-0.001374864">
                <text:p>-0.001374864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663.313110351563">
                <text:p>663.313110351563</text:p>
              </table:table-cell>
              <table:table-cell office:value-type="float" office:value="0.001109533">
                <text:p>0.001109533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663.432983398438">
                <text:p>663.432983398438</text:p>
              </table:table-cell>
              <table:table-cell office:value-type="float" office:value="-0.0009113282">
                <text:p>-0.0009113282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663.552795410156">
                <text:p>663.552795410156</text:p>
              </table:table-cell>
              <table:table-cell office:value-type="float" office:value="0.002413901">
                <text:p>0.002413901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663.672668457031">
                <text:p>663.672668457031</text:p>
              </table:table-cell>
              <table:table-cell office:value-type="float" office:value="-0.0007088789">
                <text:p>-0.0007088789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663.79248046875">
                <text:p>663.79248046875</text:p>
              </table:table-cell>
              <table:table-cell office:value-type="float" office:value="0.001932491">
                <text:p>0.001932491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63.912292480469">
                <text:p>663.912292480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664.032165527344">
                <text:p>664.032165527344</text:p>
              </table:table-cell>
              <table:table-cell office:value-type="float" office:value="0.004589454">
                <text:p>0.004589454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664.151977539063">
                <text:p>664.151977539063</text:p>
              </table:table-cell>
              <table:table-cell office:value-type="float" office:value="-0.0002608005">
                <text:p>-0.0002608005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664.271850585938">
                <text:p>664.271850585938</text:p>
              </table:table-cell>
              <table:table-cell office:value-type="float" office:value="-0.00713217">
                <text:p>-0.00713217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664.391662597656">
                <text:p>664.391662597656</text:p>
              </table:table-cell>
              <table:table-cell office:value-type="float" office:value="-0.00091665">
                <text:p>-0.00091665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664.511535644531">
                <text:p>664.511535644531</text:p>
              </table:table-cell>
              <table:table-cell office:value-type="float" office:value="0.004601344">
                <text:p>0.004601344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664.63134765625">
                <text:p>664.63134765625</text:p>
              </table:table-cell>
              <table:table-cell office:value-type="float" office:value="-0.001734036">
                <text:p>-0.001734036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664.751220703125">
                <text:p>664.751220703125</text:p>
              </table:table-cell>
              <table:table-cell office:value-type="float" office:value="-0.007999957">
                <text:p>-0.007999957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664.87109375">
                <text:p>664.87109375</text:p>
              </table:table-cell>
              <table:table-cell office:value-type="float" office:value="0.005355991">
                <text:p>0.005355991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664.990905761719">
                <text:p>664.990905761719</text:p>
              </table:table-cell>
              <table:table-cell office:value-type="float" office:value="0.006110932">
                <text:p>0.006110932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665.110778808594">
                <text:p>665.110778808594</text:p>
              </table:table-cell>
              <table:table-cell office:value-type="float" office:value="-0.001803587">
                <text:p>-0.001803587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665.230590820313">
                <text:p>665.230590820313</text:p>
              </table:table-cell>
              <table:table-cell office:value-type="float" office:value="0.006308377">
                <text:p>0.006308377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665.350463867188">
                <text:p>665.350463867188</text:p>
              </table:table-cell>
              <table:table-cell office:value-type="float" office:value="-0.008345726">
                <text:p>-0.008345726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665.470336914063">
                <text:p>665.470336914063</text:p>
              </table:table-cell>
              <table:table-cell office:value-type="float" office:value="0.01352502">
                <text:p>0.01352502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665.590148925781">
                <text:p>665.590148925781</text:p>
              </table:table-cell>
              <table:table-cell office:value-type="float" office:value="0.008724253">
                <text:p>0.008724253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665.710021972656">
                <text:p>665.710021972656</text:p>
              </table:table-cell>
              <table:table-cell office:value-type="float" office:value="0.0002415836">
                <text:p>0.0002415836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665.829895019531">
                <text:p>665.829895019531</text:p>
              </table:table-cell>
              <table:table-cell office:value-type="float" office:value="-0.005179127">
                <text:p>-0.005179127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665.949768066406">
                <text:p>665.949768066406</text:p>
              </table:table-cell>
              <table:table-cell office:value-type="float" office:value="0.01542372">
                <text:p>0.01542372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66.069580078125">
                <text:p>666.069580078125</text:p>
              </table:table-cell>
              <table:table-cell office:value-type="float" office:value="-0.006098511">
                <text:p>-0.006098511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66.189453125">
                <text:p>666.189453125</text:p>
              </table:table-cell>
              <table:table-cell office:value-type="float" office:value="0.01819851">
                <text:p>0.01819851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66.309326171875">
                <text:p>666.309326171875</text:p>
              </table:table-cell>
              <table:table-cell office:value-type="float" office:value="-0.003402918">
                <text:p>-0.003402918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66.42919921875">
                <text:p>666.42919921875</text:p>
              </table:table-cell>
              <table:table-cell office:value-type="float" office:value="0.008276424">
                <text:p>0.008276424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66.549072265625">
                <text:p>666.549072265625</text:p>
              </table:table-cell>
              <table:table-cell office:value-type="float" office:value="0.00776046">
                <text:p>0.00776046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66.6689453125">
                <text:p>666.6689453125</text:p>
              </table:table-cell>
              <table:table-cell office:value-type="float" office:value="0.0005662547">
                <text:p>0.0005662547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66.788818359375">
                <text:p>666.788818359375</text:p>
              </table:table-cell>
              <table:table-cell office:value-type="float" office:value="0.000337159">
                <text:p>0.00033715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66.90869140625">
                <text:p>666.90869140625</text:p>
              </table:table-cell>
              <table:table-cell office:value-type="float" office:value="-0.004466649">
                <text:p>-0.004466649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667.028564453125">
                <text:p>667.028564453125</text:p>
              </table:table-cell>
              <table:table-cell office:value-type="float" office:value="0.002265425">
                <text:p>0.002265425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667.1484375">
                <text:p>667.1484375</text:p>
              </table:table-cell>
              <table:table-cell office:value-type="float" office:value="0.002279571">
                <text:p>0.002279571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667.268310546875">
                <text:p>667.268310546875</text:p>
              </table:table-cell>
              <table:table-cell office:value-type="float" office:value="0.0006815857">
                <text:p>0.0006815857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667.38818359375">
                <text:p>667.38818359375</text:p>
              </table:table-cell>
              <table:table-cell office:value-type="float" office:value="0.008431074">
                <text:p>0.008431074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667.508056640625">
                <text:p>667.508056640625</text:p>
              </table:table-cell>
              <table:table-cell office:value-type="float" office:value="-0.004874736">
                <text:p>-0.004874736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667.6279296875">
                <text:p>667.6279296875</text:p>
              </table:table-cell>
              <table:table-cell office:value-type="float" office:value="-0.006839002">
                <text:p>-0.006839002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667.747802734375">
                <text:p>667.747802734375</text:p>
              </table:table-cell>
              <table:table-cell office:value-type="float" office:value="-0.006430139">
                <text:p>-0.006430139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67.86767578125">
                <text:p>667.86767578125</text:p>
              </table:table-cell>
              <table:table-cell office:value-type="float" office:value="-0.01344361">
                <text:p>-0.01344361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67.987548828125">
                <text:p>667.987548828125</text:p>
              </table:table-cell>
              <table:table-cell office:value-type="float" office:value="0.005813934">
                <text:p>0.005813934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68.107421875">
                <text:p>668.107421875</text:p>
              </table:table-cell>
              <table:table-cell office:value-type="float" office:value="-0.01161091">
                <text:p>-0.01161091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668.227294921875">
                <text:p>668.22729492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668.34716796875">
                <text:p>668.34716796875</text:p>
              </table:table-cell>
              <table:table-cell office:value-type="float" office:value="0.00523892">
                <text:p>0.00523892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668.467102050781">
                <text:p>668.467102050781</text:p>
              </table:table-cell>
              <table:table-cell office:value-type="float" office:value="0.0003536598">
                <text:p>0.0003536598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668.586975097656">
                <text:p>668.586975097656</text:p>
              </table:table-cell>
              <table:table-cell office:value-type="float" office:value="-0.002190942">
                <text:p>-0.002190942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668.706848144531">
                <text:p>668.706848144531</text:p>
              </table:table-cell>
              <table:table-cell office:value-type="float" office:value="-0.001825592">
                <text:p>-0.001825592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668.826721191406">
                <text:p>668.826721191406</text:p>
              </table:table-cell>
              <table:table-cell office:value-type="float" office:value="-0.002570548">
                <text:p>-0.002570548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668.946594238281">
                <text:p>668.946594238281</text:p>
              </table:table-cell>
              <table:table-cell office:value-type="float" office:value="0.006585503">
                <text:p>0.006585503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669.066528320313">
                <text:p>669.066528320313</text:p>
              </table:table-cell>
              <table:table-cell office:value-type="float" office:value="0.002358148">
                <text:p>0.002358148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669.186401367188">
                <text:p>669.186401367188</text:p>
              </table:table-cell>
              <table:table-cell office:value-type="float" office:value="-0.007394173">
                <text:p>-0.007394173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669.306274414063">
                <text:p>669.306274414063</text:p>
              </table:table-cell>
              <table:table-cell office:value-type="float" office:value="0.01283471">
                <text:p>0.01283471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669.426208496094">
                <text:p>669.426208496094</text:p>
              </table:table-cell>
              <table:table-cell office:value-type="float" office:value="0.003399528">
                <text:p>0.003399528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669.546081542969">
                <text:p>669.546081542969</text:p>
              </table:table-cell>
              <table:table-cell office:value-type="float" office:value="-0.005740819">
                <text:p>-0.005740819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69.665954589844">
                <text:p>669.665954589844</text:p>
              </table:table-cell>
              <table:table-cell office:value-type="float" office:value="-0.006477827">
                <text:p>-0.006477827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669.785888671875">
                <text:p>669.785888671875</text:p>
              </table:table-cell>
              <table:table-cell office:value-type="float" office:value="0.0005366358">
                <text:p>0.0005366358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669.90576171875">
                <text:p>669.90576171875</text:p>
              </table:table-cell>
              <table:table-cell office:value-type="float" office:value="-0.0009653653">
                <text:p>-0.0009653653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670.025695800781">
                <text:p>670.025695800781</text:p>
              </table:table-cell>
              <table:table-cell office:value-type="float" office:value="-0.007968275">
                <text:p>-0.007968275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670.145568847656">
                <text:p>670.145568847656</text:p>
              </table:table-cell>
              <table:table-cell office:value-type="float" office:value="0.01337495">
                <text:p>0.01337495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670.265502929688">
                <text:p>670.265502929688</text:p>
              </table:table-cell>
              <table:table-cell office:value-type="float" office:value="0.00346455">
                <text:p>0.00346455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670.385375976563">
                <text:p>670.385375976563</text:p>
              </table:table-cell>
              <table:table-cell office:value-type="float" office:value="0.01195823">
                <text:p>0.01195823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670.505310058594">
                <text:p>670.505310058594</text:p>
              </table:table-cell>
              <table:table-cell office:value-type="float" office:value="0.003988802">
                <text:p>0.003988802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670.625183105469">
                <text:p>670.625183105469</text:p>
              </table:table-cell>
              <table:table-cell office:value-type="float" office:value="0.006460385">
                <text:p>0.006460385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670.7451171875">
                <text:p>670.7451171875</text:p>
              </table:table-cell>
              <table:table-cell office:value-type="float" office:value="-0.0001883619">
                <text:p>-0.0001883619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70.864990234375">
                <text:p>670.864990234375</text:p>
              </table:table-cell>
              <table:table-cell office:value-type="float" office:value="0.01011638">
                <text:p>0.01011638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670.984924316406">
                <text:p>670.984924316406</text:p>
              </table:table-cell>
              <table:table-cell office:value-type="float" office:value="0.007985319">
                <text:p>0.007985319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671.104858398438">
                <text:p>671.104858398438</text:p>
              </table:table-cell>
              <table:table-cell office:value-type="float" office:value="-0.006764987">
                <text:p>-0.006764987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671.224731445313">
                <text:p>671.224731445313</text:p>
              </table:table-cell>
              <table:table-cell office:value-type="float" office:value="0.001379957">
                <text:p>0.001379957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671.344665527344">
                <text:p>671.344665527344</text:p>
              </table:table-cell>
              <table:table-cell office:value-type="float" office:value="0.007437945">
                <text:p>0.007437945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671.464599609375">
                <text:p>671.464599609375</text:p>
              </table:table-cell>
              <table:table-cell office:value-type="float" office:value="-0.009395333">
                <text:p>-0.009395333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671.58447265625">
                <text:p>671.58447265625</text:p>
              </table:table-cell>
              <table:table-cell office:value-type="float" office:value="-0.004224089">
                <text:p>-0.004224089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671.704406738281">
                <text:p>671.704406738281</text:p>
              </table:table-cell>
              <table:table-cell office:value-type="float" office:value="0.008636829">
                <text:p>0.008636829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671.824340820313">
                <text:p>671.824340820313</text:p>
              </table:table-cell>
              <table:table-cell office:value-type="float" office:value="-0.001136244">
                <text:p>-0.001136244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671.944213867188">
                <text:p>671.944213867188</text:p>
              </table:table-cell>
              <table:table-cell office:value-type="float" office:value="-0.001826507">
                <text:p>-0.001826507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672.064147949219">
                <text:p>672.064147949219</text:p>
              </table:table-cell>
              <table:table-cell office:value-type="float" office:value="-0.004307741">
                <text:p>-0.004307741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672.18408203125">
                <text:p>672.18408203125</text:p>
              </table:table-cell>
              <table:table-cell office:value-type="float" office:value="-0.003129573">
                <text:p>-0.003129573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672.304016113281">
                <text:p>672.304016113281</text:p>
              </table:table-cell>
              <table:table-cell office:value-type="float" office:value="-0.006604888">
                <text:p>-0.006604888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672.423950195313">
                <text:p>672.423950195313</text:p>
              </table:table-cell>
              <table:table-cell office:value-type="float" office:value="-0.01035397">
                <text:p>-0.01035397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72.543823242188">
                <text:p>672.543823242188</text:p>
              </table:table-cell>
              <table:table-cell office:value-type="float" office:value="-0.007257154">
                <text:p>-0.007257154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72.663757324219">
                <text:p>672.663757324219</text:p>
              </table:table-cell>
              <table:table-cell office:value-type="float" office:value="0.003801237">
                <text:p>0.003801237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72.78369140625">
                <text:p>672.78369140625</text:p>
              </table:table-cell>
              <table:table-cell office:value-type="float" office:value="0.001556483">
                <text:p>0.001556483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672.903625488281">
                <text:p>672.903625488281</text:p>
              </table:table-cell>
              <table:table-cell office:value-type="float" office:value="0.01451294">
                <text:p>0.01451294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673.023559570313">
                <text:p>673.023559570313</text:p>
              </table:table-cell>
              <table:table-cell office:value-type="float" office:value="0.009901622">
                <text:p>0.009901622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673.143493652344">
                <text:p>673.143493652344</text:p>
              </table:table-cell>
              <table:table-cell office:value-type="float" office:value="0.002640004">
                <text:p>0.002640004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673.263427734375">
                <text:p>673.263427734375</text:p>
              </table:table-cell>
              <table:table-cell office:value-type="float" office:value="-0.01137184">
                <text:p>-0.01137184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673.383361816406">
                <text:p>673.383361816406</text:p>
              </table:table-cell>
              <table:table-cell office:value-type="float" office:value="0.01947961">
                <text:p>0.01947961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673.503295898438">
                <text:p>673.503295898438</text:p>
              </table:table-cell>
              <table:table-cell office:value-type="float" office:value="-0.01077003">
                <text:p>-0.01077003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673.623229980469">
                <text:p>673.623229980469</text:p>
              </table:table-cell>
              <table:table-cell office:value-type="float" office:value="-0.003884181">
                <text:p>-0.003884181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673.7431640625">
                <text:p>673.7431640625</text:p>
              </table:table-cell>
              <table:table-cell office:value-type="float" office:value="-0.003668711">
                <text:p>-0.003668711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673.863098144531">
                <text:p>673.863098144531</text:p>
              </table:table-cell>
              <table:table-cell office:value-type="float" office:value="0.00169183">
                <text:p>0.00169183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673.983032226563">
                <text:p>673.983032226563</text:p>
              </table:table-cell>
              <table:table-cell office:value-type="float" office:value="-0.003139333">
                <text:p>-0.003139333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74.102966308594">
                <text:p>674.102966308594</text:p>
              </table:table-cell>
              <table:table-cell office:value-type="float" office:value="0.005889064">
                <text:p>0.005889064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74.222900390625">
                <text:p>674.222900390625</text:p>
              </table:table-cell>
              <table:table-cell office:value-type="float" office:value="-0.008799053">
                <text:p>-0.008799053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74.342834472656">
                <text:p>674.342834472656</text:p>
              </table:table-cell>
              <table:table-cell office:value-type="float" office:value="-0.0100439">
                <text:p>-0.0100439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674.462768554688">
                <text:p>674.462768554688</text:p>
              </table:table-cell>
              <table:table-cell office:value-type="float" office:value="0.0005506533">
                <text:p>0.0005506533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674.582702636719">
                <text:p>674.582702636719</text:p>
              </table:table-cell>
              <table:table-cell office:value-type="float" office:value="0.001676705">
                <text:p>0.001676705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674.702697753906">
                <text:p>674.702697753906</text:p>
              </table:table-cell>
              <table:table-cell office:value-type="float" office:value="0.006523455">
                <text:p>0.006523455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674.822631835938">
                <text:p>674.822631835938</text:p>
              </table:table-cell>
              <table:table-cell office:value-type="float" office:value="-0.004440729">
                <text:p>-0.004440729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674.942565917969">
                <text:p>674.942565917969</text:p>
              </table:table-cell>
              <table:table-cell office:value-type="float" office:value="0.01111261">
                <text:p>0.01111261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675.0625">
                <text:p>675.0625</text:p>
              </table:table-cell>
              <table:table-cell office:value-type="float" office:value="-0.00664251">
                <text:p>-0.00664251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675.182495117188">
                <text:p>675.182495117188</text:p>
              </table:table-cell>
              <table:table-cell office:value-type="float" office:value="-0.004491401">
                <text:p>-0.004491401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675.302429199219">
                <text:p>675.302429199219</text:p>
              </table:table-cell>
              <table:table-cell office:value-type="float" office:value="0.003954547">
                <text:p>0.003954547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675.42236328125">
                <text:p>675.42236328125</text:p>
              </table:table-cell>
              <table:table-cell office:value-type="float" office:value="0.01280694">
                <text:p>0.01280694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675.542297363281">
                <text:p>675.542297363281</text:p>
              </table:table-cell>
              <table:table-cell office:value-type="float" office:value="0.01054338">
                <text:p>0.01054338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675.662292480469">
                <text:p>675.662292480469</text:p>
              </table:table-cell>
              <table:table-cell office:value-type="float" office:value="0.004839284">
                <text:p>0.004839284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675.7822265625">
                <text:p>675.7822265625</text:p>
              </table:table-cell>
              <table:table-cell office:value-type="float" office:value="0.006359243">
                <text:p>0.006359243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675.902160644531">
                <text:p>675.902160644531</text:p>
              </table:table-cell>
              <table:table-cell office:value-type="float" office:value="-0.009598278">
                <text:p>-0.009598278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676.022155761719">
                <text:p>676.022155761719</text:p>
              </table:table-cell>
              <table:table-cell office:value-type="float" office:value="0.006465103">
                <text:p>0.006465103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676.14208984375">
                <text:p>676.14208984375</text:p>
              </table:table-cell>
              <table:table-cell office:value-type="float" office:value="-0.001077625">
                <text:p>-0.001077625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676.262023925781">
                <text:p>676.262023925781</text:p>
              </table:table-cell>
              <table:table-cell office:value-type="float" office:value="-0.008914578">
                <text:p>-0.008914578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676.382019042969">
                <text:p>676.382019042969</text:p>
              </table:table-cell>
              <table:table-cell office:value-type="float" office:value="0.00827105">
                <text:p>0.00827105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676.501953125">
                <text:p>676.501953125</text:p>
              </table:table-cell>
              <table:table-cell office:value-type="float" office:value="-0.0008805179">
                <text:p>-0.0008805179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76.621948242188">
                <text:p>676.621948242188</text:p>
              </table:table-cell>
              <table:table-cell office:value-type="float" office:value="-0.008967735">
                <text:p>-0.008967735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676.741882324219">
                <text:p>676.741882324219</text:p>
              </table:table-cell>
              <table:table-cell office:value-type="float" office:value="-0.01302377">
                <text:p>-0.01302377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676.861877441406">
                <text:p>676.861877441406</text:p>
              </table:table-cell>
              <table:table-cell office:value-type="float" office:value="-0.003469179">
                <text:p>-0.003469179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76.981811523438">
                <text:p>676.981811523438</text:p>
              </table:table-cell>
              <table:table-cell office:value-type="float" office:value="0.00151481">
                <text:p>0.00151481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677.101806640625">
                <text:p>677.101806640625</text:p>
              </table:table-cell>
              <table:table-cell office:value-type="float" office:value="-0.0002100907">
                <text:p>-0.0002100907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77.221740722656">
                <text:p>677.221740722656</text:p>
              </table:table-cell>
              <table:table-cell office:value-type="float" office:value="-0.005753289">
                <text:p>-0.005753289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77.341735839844">
                <text:p>677.341735839844</text:p>
              </table:table-cell>
              <table:table-cell office:value-type="float" office:value="0.008308152">
                <text:p>0.008308152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677.461669921875">
                <text:p>677.461669921875</text:p>
              </table:table-cell>
              <table:table-cell office:value-type="float" office:value="-0.003612897">
                <text:p>-0.003612897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677.581665039063">
                <text:p>677.581665039063</text:p>
              </table:table-cell>
              <table:table-cell office:value-type="float" office:value="0.00365717">
                <text:p>0.00365717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677.70166015625">
                <text:p>677.70166015625</text:p>
              </table:table-cell>
              <table:table-cell office:value-type="float" office:value="-0.004470595">
                <text:p>-0.004470595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677.821594238281">
                <text:p>677.821594238281</text:p>
              </table:table-cell>
              <table:table-cell office:value-type="float" office:value="0.004012888">
                <text:p>0.004012888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677.941589355469">
                <text:p>677.941589355469</text:p>
              </table:table-cell>
              <table:table-cell office:value-type="float" office:value="0.0003470405">
                <text:p>0.0003470405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678.061584472656">
                <text:p>678.061584472656</text:p>
              </table:table-cell>
              <table:table-cell office:value-type="float" office:value="-0.002684016">
                <text:p>-0.002684016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678.181518554688">
                <text:p>678.181518554688</text:p>
              </table:table-cell>
              <table:table-cell office:value-type="float" office:value="-0.003467252">
                <text:p>-0.003467252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678.301513671875">
                <text:p>678.301513671875</text:p>
              </table:table-cell>
              <table:table-cell office:value-type="float" office:value="0.001036144">
                <text:p>0.001036144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678.421508789063">
                <text:p>678.421508789063</text:p>
              </table:table-cell>
              <table:table-cell office:value-type="float" office:value="-0.006388956">
                <text:p>-0.006388956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678.541442871094">
                <text:p>678.541442871094</text:p>
              </table:table-cell>
              <table:table-cell office:value-type="float" office:value="0.01591286">
                <text:p>0.01591286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678.661437988281">
                <text:p>678.661437988281</text:p>
              </table:table-cell>
              <table:table-cell office:value-type="float" office:value="-0.002416316">
                <text:p>-0.002416316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678.781433105469">
                <text:p>678.781433105469</text:p>
              </table:table-cell>
              <table:table-cell office:value-type="float" office:value="0.001971718">
                <text:p>0.001971718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678.901428222656">
                <text:p>678.901428222656</text:p>
              </table:table-cell>
              <table:table-cell office:value-type="float" office:value="0.003816707">
                <text:p>0.003816707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679.021362304688">
                <text:p>679.021362304688</text:p>
              </table:table-cell>
              <table:table-cell office:value-type="float" office:value="0.002524822">
                <text:p>0.002524822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679.141357421875">
                <text:p>679.141357421875</text:p>
              </table:table-cell>
              <table:table-cell office:value-type="float" office:value="-0.0007467153">
                <text:p>-0.0007467153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679.261352539063">
                <text:p>679.261352539063</text:p>
              </table:table-cell>
              <table:table-cell office:value-type="float" office:value="0.006367675">
                <text:p>0.006367675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679.38134765625">
                <text:p>679.38134765625</text:p>
              </table:table-cell>
              <table:table-cell office:value-type="float" office:value="0.008045745">
                <text:p>0.008045745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79.501342773438">
                <text:p>679.501342773438</text:p>
              </table:table-cell>
              <table:table-cell office:value-type="float" office:value="-0.004975183">
                <text:p>-0.004975183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79.621337890625">
                <text:p>679.621337890625</text:p>
              </table:table-cell>
              <table:table-cell office:value-type="float" office:value="0.004921405">
                <text:p>0.004921405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79.741333007813">
                <text:p>679.741333007813</text:p>
              </table:table-cell>
              <table:table-cell office:value-type="float" office:value="-0.0002524562">
                <text:p>-0.0002524562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679.861267089844">
                <text:p>679.861267089844</text:p>
              </table:table-cell>
              <table:table-cell office:value-type="float" office:value="0.002687402">
                <text:p>0.002687402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679.981262207031">
                <text:p>679.981262207031</text:p>
              </table:table-cell>
              <table:table-cell office:value-type="float" office:value="-0.002396428">
                <text:p>-0.002396428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680.101257324219">
                <text:p>680.101257324219</text:p>
              </table:table-cell>
              <table:table-cell office:value-type="float" office:value="-0.006039623">
                <text:p>-0.006039623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680.221252441406">
                <text:p>680.221252441406</text:p>
              </table:table-cell>
              <table:table-cell office:value-type="float" office:value="0.008679239">
                <text:p>0.008679239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680.341247558594">
                <text:p>680.341247558594</text:p>
              </table:table-cell>
              <table:table-cell office:value-type="float" office:value="-0.004996565">
                <text:p>-0.004996565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680.461242675781">
                <text:p>680.461242675781</text:p>
              </table:table-cell>
              <table:table-cell office:value-type="float" office:value="-0.004653232">
                <text:p>-0.004653232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680.581237792969">
                <text:p>680.581237792969</text:p>
              </table:table-cell>
              <table:table-cell office:value-type="float" office:value="-0.002630655">
                <text:p>-0.002630655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680.701232910156">
                <text:p>680.701232910156</text:p>
              </table:table-cell>
              <table:table-cell office:value-type="float" office:value="0.001826974">
                <text:p>0.001826974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680.821228027344">
                <text:p>680.821228027344</text:p>
              </table:table-cell>
              <table:table-cell office:value-type="float" office:value="0.001755837">
                <text:p>0.001755837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680.941223144531">
                <text:p>680.941223144531</text:p>
              </table:table-cell>
              <table:table-cell office:value-type="float" office:value="-0.001545848">
                <text:p>-0.001545848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681.061218261719">
                <text:p>681.061218261719</text:p>
              </table:table-cell>
              <table:table-cell office:value-type="float" office:value="-0.003300952">
                <text:p>-0.003300952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681.181274414063">
                <text:p>681.181274414063</text:p>
              </table:table-cell>
              <table:table-cell office:value-type="float" office:value="-0.003440456">
                <text:p>-0.003440456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681.30126953125">
                <text:p>681.30126953125</text:p>
              </table:table-cell>
              <table:table-cell office:value-type="float" office:value="0.001521521">
                <text:p>0.001521521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681.421264648438">
                <text:p>681.421264648438</text:p>
              </table:table-cell>
              <table:table-cell office:value-type="float" office:value="0.004282545">
                <text:p>0.004282545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681.541259765625">
                <text:p>681.541259765625</text:p>
              </table:table-cell>
              <table:table-cell office:value-type="float" office:value="-0.0119039">
                <text:p>-0.0119039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681.661254882813">
                <text:p>681.661254882813</text:p>
              </table:table-cell>
              <table:table-cell office:value-type="float" office:value="0.000112806">
                <text:p>0.000112806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681.78125">
                <text:p>681.78125</text:p>
              </table:table-cell>
              <table:table-cell office:value-type="float" office:value="-0.007294075">
                <text:p>-0.007294075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681.901245117188">
                <text:p>681.901245117188</text:p>
              </table:table-cell>
              <table:table-cell office:value-type="float" office:value="0.00151229">
                <text:p>0.00151229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682.021301269531">
                <text:p>682.021301269531</text:p>
              </table:table-cell>
              <table:table-cell office:value-type="float" office:value="-0.003354351">
                <text:p>-0.003354351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682.141296386719">
                <text:p>682.141296386719</text:p>
              </table:table-cell>
              <table:table-cell office:value-type="float" office:value="-0.005888394">
                <text:p>-0.005888394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682.261291503906">
                <text:p>682.261291503906</text:p>
              </table:table-cell>
              <table:table-cell office:value-type="float" office:value="-0.005537485">
                <text:p>-0.005537485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682.381286621094">
                <text:p>682.381286621094</text:p>
              </table:table-cell>
              <table:table-cell office:value-type="float" office:value="-0.001829081">
                <text:p>-0.001829081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682.501342773438">
                <text:p>682.501342773438</text:p>
              </table:table-cell>
              <table:table-cell office:value-type="float" office:value="0.001822946">
                <text:p>0.001822946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82.621337890625">
                <text:p>682.621337890625</text:p>
              </table:table-cell>
              <table:table-cell office:value-type="float" office:value="-0.002912038">
                <text:p>-0.002912038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82.741333007813">
                <text:p>682.741333007813</text:p>
              </table:table-cell>
              <table:table-cell office:value-type="float" office:value="-0.005185266">
                <text:p>-0.005185266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82.861389160156">
                <text:p>682.861389160156</text:p>
              </table:table-cell>
              <table:table-cell office:value-type="float" office:value="-0.001948585">
                <text:p>-0.001948585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682.981384277344">
                <text:p>682.981384277344</text:p>
              </table:table-cell>
              <table:table-cell office:value-type="float" office:value="0.0002547288">
                <text:p>0.0002547288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683.101379394531">
                <text:p>683.101379394531</text:p>
              </table:table-cell>
              <table:table-cell office:value-type="float" office:value="-0.008708003">
                <text:p>-0.008708003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683.221435546875">
                <text:p>683.221435546875</text:p>
              </table:table-cell>
              <table:table-cell office:value-type="float" office:value="-0.002451923">
                <text:p>-0.002451923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683.341430664063">
                <text:p>683.341430664063</text:p>
              </table:table-cell>
              <table:table-cell office:value-type="float" office:value="-0.01142815">
                <text:p>-0.01142815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683.46142578125">
                <text:p>683.46142578125</text:p>
              </table:table-cell>
              <table:table-cell office:value-type="float" office:value="-0.009100841">
                <text:p>-0.009100841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683.581481933594">
                <text:p>683.581481933594</text:p>
              </table:table-cell>
              <table:table-cell office:value-type="float" office:value="-0.006018262">
                <text:p>-0.006018262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683.701477050781">
                <text:p>683.701477050781</text:p>
              </table:table-cell>
              <table:table-cell office:value-type="float" office:value="-0.003379966">
                <text:p>-0.003379966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683.821533203125">
                <text:p>683.821533203125</text:p>
              </table:table-cell>
              <table:table-cell office:value-type="float" office:value="-0.006564335">
                <text:p>-0.006564335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683.941528320313">
                <text:p>683.941528320313</text:p>
              </table:table-cell>
              <table:table-cell office:value-type="float" office:value="-0.007142405">
                <text:p>-0.007142405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684.061584472656">
                <text:p>684.061584472656</text:p>
              </table:table-cell>
              <table:table-cell office:value-type="float" office:value="0.003757597">
                <text:p>0.003757597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684.181579589844">
                <text:p>684.181579589844</text:p>
              </table:table-cell>
              <table:table-cell office:value-type="float" office:value="-0.01240839">
                <text:p>-0.01240839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684.301635742188">
                <text:p>684.301635742188</text:p>
              </table:table-cell>
              <table:table-cell office:value-type="float" office:value="-0.005934113">
                <text:p>-0.005934113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684.421630859375">
                <text:p>684.421630859375</text:p>
              </table:table-cell>
              <table:table-cell office:value-type="float" office:value="-0.008946336">
                <text:p>-0.008946336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684.541687011719">
                <text:p>684.541687011719</text:p>
              </table:table-cell>
              <table:table-cell office:value-type="float" office:value="0.004433057">
                <text:p>0.004433057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684.661682128906">
                <text:p>684.661682128906</text:p>
              </table:table-cell>
              <table:table-cell office:value-type="float" office:value="-0.006353692">
                <text:p>-0.006353692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684.78173828125">
                <text:p>684.78173828125</text:p>
              </table:table-cell>
              <table:table-cell office:value-type="float" office:value="0.007254958">
                <text:p>0.007254958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684.901733398438">
                <text:p>684.901733398438</text:p>
              </table:table-cell>
              <table:table-cell office:value-type="float" office:value="0.008054675">
                <text:p>0.008054675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685.021789550781">
                <text:p>685.021789550781</text:p>
              </table:table-cell>
              <table:table-cell office:value-type="float" office:value="-0.005183618">
                <text:p>-0.005183618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685.141784667969">
                <text:p>685.141784667969</text:p>
              </table:table-cell>
              <table:table-cell office:value-type="float" office:value="-0.000275157">
                <text:p>-0.000275157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685.261840820313">
                <text:p>685.261840820313</text:p>
              </table:table-cell>
              <table:table-cell office:value-type="float" office:value="0.009129366">
                <text:p>0.009129366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685.381896972656">
                <text:p>685.381896972656</text:p>
              </table:table-cell>
              <table:table-cell office:value-type="float" office:value="0.001762889">
                <text:p>0.001762889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685.501892089844">
                <text:p>685.501892089844</text:p>
              </table:table-cell>
              <table:table-cell office:value-type="float" office:value="-0.005149159">
                <text:p>-0.005149159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685.621948242188">
                <text:p>685.621948242188</text:p>
              </table:table-cell>
              <table:table-cell office:value-type="float" office:value="0.01129103">
                <text:p>0.01129103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685.742004394531">
                <text:p>685.742004394531</text:p>
              </table:table-cell>
              <table:table-cell office:value-type="float" office:value="-0.001262349">
                <text:p>-0.001262349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685.861999511719">
                <text:p>685.861999511719</text:p>
              </table:table-cell>
              <table:table-cell office:value-type="float" office:value="-0.0008719841">
                <text:p>-0.0008719841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685.982055664063">
                <text:p>685.982055664063</text:p>
              </table:table-cell>
              <table:table-cell office:value-type="float" office:value="-0.004423195">
                <text:p>-0.004423195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686.102111816406">
                <text:p>686.102111816406</text:p>
              </table:table-cell>
              <table:table-cell office:value-type="float" office:value="0.001565848">
                <text:p>0.001565848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686.22216796875">
                <text:p>686.22216796875</text:p>
              </table:table-cell>
              <table:table-cell office:value-type="float" office:value="-0.009202777">
                <text:p>-0.009202777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86.342163085938">
                <text:p>686.342163085938</text:p>
              </table:table-cell>
              <table:table-cell office:value-type="float" office:value="-0.007924693">
                <text:p>-0.007924693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686.462219238281">
                <text:p>686.462219238281</text:p>
              </table:table-cell>
              <table:table-cell office:value-type="float" office:value="0.0008977633">
                <text:p>0.0008977633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86.582275390625">
                <text:p>686.582275390625</text:p>
              </table:table-cell>
              <table:table-cell office:value-type="float" office:value="-0.001844576">
                <text:p>-0.001844576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86.702331542969">
                <text:p>686.702331542969</text:p>
              </table:table-cell>
              <table:table-cell office:value-type="float" office:value="0.001561358">
                <text:p>0.001561358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686.822387695313">
                <text:p>686.822387695313</text:p>
              </table:table-cell>
              <table:table-cell office:value-type="float" office:value="-0.002934812">
                <text:p>-0.002934812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86.9423828125">
                <text:p>686.9423828125</text:p>
              </table:table-cell>
              <table:table-cell office:value-type="float" office:value="0.00713462">
                <text:p>0.00713462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687.062438964844">
                <text:p>687.062438964844</text:p>
              </table:table-cell>
              <table:table-cell office:value-type="float" office:value="0.002332858">
                <text:p>0.002332858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687.182495117188">
                <text:p>687.182495117188</text:p>
              </table:table-cell>
              <table:table-cell office:value-type="float" office:value="-0.01085252">
                <text:p>-0.01085252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687.302551269531">
                <text:p>687.302551269531</text:p>
              </table:table-cell>
              <table:table-cell office:value-type="float" office:value="0.0005155723">
                <text:p>0.0005155723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687.422607421875">
                <text:p>687.422607421875</text:p>
              </table:table-cell>
              <table:table-cell office:value-type="float" office:value="-0.008294358">
                <text:p>-0.008294358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687.542663574219">
                <text:p>687.542663574219</text:p>
              </table:table-cell>
              <table:table-cell office:value-type="float" office:value="-0.0103922">
                <text:p>-0.0103922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687.662719726563">
                <text:p>687.662719726563</text:p>
              </table:table-cell>
              <table:table-cell office:value-type="float" office:value="0.01040956">
                <text:p>0.01040956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687.782775878906">
                <text:p>687.782775878906</text:p>
              </table:table-cell>
              <table:table-cell office:value-type="float" office:value="-0.002491453">
                <text:p>-0.002491453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687.90283203125">
                <text:p>687.90283203125</text:p>
              </table:table-cell>
              <table:table-cell office:value-type="float" office:value="0.001557277">
                <text:p>0.001557277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688.022888183594">
                <text:p>688.022888183594</text:p>
              </table:table-cell>
              <table:table-cell office:value-type="float" office:value="0.007715176">
                <text:p>0.007715176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88.142944335938">
                <text:p>688.142944335938</text:p>
              </table:table-cell>
              <table:table-cell office:value-type="float" office:value="0.003271975">
                <text:p>0.003271975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688.263000488281">
                <text:p>688.263000488281</text:p>
              </table:table-cell>
              <table:table-cell office:value-type="float" office:value="-0.006263632">
                <text:p>-0.006263632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688.383056640625">
                <text:p>688.383056640625</text:p>
              </table:table-cell>
              <table:table-cell office:value-type="float" office:value="-0.003516452">
                <text:p>-0.003516452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688.503112792969">
                <text:p>688.503112792969</text:p>
              </table:table-cell>
              <table:table-cell office:value-type="float" office:value="-0.006511063">
                <text:p>-0.006511063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688.623168945313">
                <text:p>688.623168945313</text:p>
              </table:table-cell>
              <table:table-cell office:value-type="float" office:value="-0.007545265">
                <text:p>-0.007545265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688.743225097656">
                <text:p>688.743225097656</text:p>
              </table:table-cell>
              <table:table-cell office:value-type="float" office:value="-0.005232542">
                <text:p>-0.005232542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688.86328125">
                <text:p>688.86328125</text:p>
              </table:table-cell>
              <table:table-cell office:value-type="float" office:value="-0.004347247">
                <text:p>-0.004347247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688.983337402344">
                <text:p>688.983337402344</text:p>
              </table:table-cell>
              <table:table-cell office:value-type="float" office:value="-0.004732625">
                <text:p>-0.004732625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689.103393554688">
                <text:p>689.103393554688</text:p>
              </table:table-cell>
              <table:table-cell office:value-type="float" office:value="-0.00048563">
                <text:p>-0.00048563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689.223449707031">
                <text:p>689.223449707031</text:p>
              </table:table-cell>
              <table:table-cell office:value-type="float" office:value="-0.001520489">
                <text:p>-0.001520489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689.343505859375">
                <text:p>689.343505859375</text:p>
              </table:table-cell>
              <table:table-cell office:value-type="float" office:value="0.01644383">
                <text:p>0.01644383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689.463562011719">
                <text:p>689.463562011719</text:p>
              </table:table-cell>
              <table:table-cell office:value-type="float" office:value="0.003600281">
                <text:p>0.003600281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689.583679199219">
                <text:p>689.583679199219</text:p>
              </table:table-cell>
              <table:table-cell office:value-type="float" office:value="0.005194919">
                <text:p>0.005194919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689.703735351563">
                <text:p>689.703735351563</text:p>
              </table:table-cell>
              <table:table-cell office:value-type="float" office:value="0.003739642">
                <text:p>0.003739642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689.823791503906">
                <text:p>689.823791503906</text:p>
              </table:table-cell>
              <table:table-cell office:value-type="float" office:value="-0.005303037">
                <text:p>-0.00530303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689.94384765625">
                <text:p>689.94384765625</text:p>
              </table:table-cell>
              <table:table-cell office:value-type="float" office:value="-0.005093976">
                <text:p>-0.005093976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690.063903808594">
                <text:p>690.063903808594</text:p>
              </table:table-cell>
              <table:table-cell office:value-type="float" office:value="0.00337468">
                <text:p>0.00337468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690.184020996094">
                <text:p>690.184020996094</text:p>
              </table:table-cell>
              <table:table-cell office:value-type="float" office:value="0.0001282319">
                <text:p>0.0001282319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690.304077148438">
                <text:p>690.304077148438</text:p>
              </table:table-cell>
              <table:table-cell office:value-type="float" office:value="-0.001606471">
                <text:p>-0.001606471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690.424133300781">
                <text:p>690.424133300781</text:p>
              </table:table-cell>
              <table:table-cell office:value-type="float" office:value="0.001910459">
                <text:p>0.001910459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690.544189453125">
                <text:p>690.544189453125</text:p>
              </table:table-cell>
              <table:table-cell office:value-type="float" office:value="0.0215692">
                <text:p>0.0215692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690.664306640625">
                <text:p>690.664306640625</text:p>
              </table:table-cell>
              <table:table-cell office:value-type="float" office:value="-0.008254167">
                <text:p>-0.008254167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90.784362792969">
                <text:p>690.784362792969</text:p>
              </table:table-cell>
              <table:table-cell office:value-type="float" office:value="-0.001027967">
                <text:p>-0.001027967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90.904418945313">
                <text:p>690.904418945313</text:p>
              </table:table-cell>
              <table:table-cell office:value-type="float" office:value="0.04135571">
                <text:p>0.04135571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91.024475097656">
                <text:p>691.024475097656</text:p>
              </table:table-cell>
              <table:table-cell office:value-type="float" office:value="0.001666647">
                <text:p>0.001666647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91.144592285156">
                <text:p>691.144592285156</text:p>
              </table:table-cell>
              <table:table-cell office:value-type="float" office:value="0.002598171">
                <text:p>0.002598171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691.2646484375">
                <text:p>691.2646484375</text:p>
              </table:table-cell>
              <table:table-cell office:value-type="float" office:value="-0.00300793">
                <text:p>-0.00300793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691.384765625">
                <text:p>691.384765625</text:p>
              </table:table-cell>
              <table:table-cell office:value-type="float" office:value="0.01145179">
                <text:p>0.01145179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691.504821777344">
                <text:p>691.504821777344</text:p>
              </table:table-cell>
              <table:table-cell office:value-type="float" office:value="0.002034003">
                <text:p>0.002034003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691.624877929688">
                <text:p>691.624877929688</text:p>
              </table:table-cell>
              <table:table-cell office:value-type="float" office:value="-0.01072018">
                <text:p>-0.01072018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691.744995117188">
                <text:p>691.744995117188</text:p>
              </table:table-cell>
              <table:table-cell office:value-type="float" office:value="0.009189672">
                <text:p>0.009189672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691.865051269531">
                <text:p>691.865051269531</text:p>
              </table:table-cell>
              <table:table-cell office:value-type="float" office:value="-0.007595073">
                <text:p>-0.007595073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691.985168457031">
                <text:p>691.985168457031</text:p>
              </table:table-cell>
              <table:table-cell office:value-type="float" office:value="-0.006489578">
                <text:p>-0.006489578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692.105224609375">
                <text:p>692.105224609375</text:p>
              </table:table-cell>
              <table:table-cell office:value-type="float" office:value="0.008052743">
                <text:p>0.008052743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692.225280761719">
                <text:p>692.225280761719</text:p>
              </table:table-cell>
              <table:table-cell office:value-type="float" office:value="0.002510065">
                <text:p>0.002510065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692.345397949219">
                <text:p>692.345397949219</text:p>
              </table:table-cell>
              <table:table-cell office:value-type="float" office:value="0.01199284">
                <text:p>0.01199284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692.465454101563">
                <text:p>692.465454101563</text:p>
              </table:table-cell>
              <table:table-cell office:value-type="float" office:value="0.00324632">
                <text:p>0.00324632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692.585571289063">
                <text:p>692.585571289063</text:p>
              </table:table-cell>
              <table:table-cell office:value-type="float" office:value="0.004826519">
                <text:p>0.004826519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692.705627441406">
                <text:p>692.705627441406</text:p>
              </table:table-cell>
              <table:table-cell office:value-type="float" office:value="-0.001016868">
                <text:p>-0.001016868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692.825744628906">
                <text:p>692.825744628906</text:p>
              </table:table-cell>
              <table:table-cell office:value-type="float" office:value="0.001602348">
                <text:p>0.001602348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692.94580078125">
                <text:p>692.94580078125</text:p>
              </table:table-cell>
              <table:table-cell office:value-type="float" office:value="-0.001087322">
                <text:p>-0.001087322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693.06591796875">
                <text:p>693.06591796875</text:p>
              </table:table-cell>
              <table:table-cell office:value-type="float" office:value="-0.0006905451">
                <text:p>-0.0006905451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693.18603515625">
                <text:p>693.18603515625</text:p>
              </table:table-cell>
              <table:table-cell office:value-type="float" office:value="-0.009147349">
                <text:p>-0.009147349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693.306091308594">
                <text:p>693.306091308594</text:p>
              </table:table-cell>
              <table:table-cell office:value-type="float" office:value="-0.006843613">
                <text:p>-0.006843613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693.426208496094">
                <text:p>693.426208496094</text:p>
              </table:table-cell>
              <table:table-cell office:value-type="float" office:value="-0.01269868">
                <text:p>-0.01269868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693.546264648438">
                <text:p>693.546264648438</text:p>
              </table:table-cell>
              <table:table-cell office:value-type="float" office:value="-0.002022807">
                <text:p>-0.002022807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693.666381835938">
                <text:p>693.666381835938</text:p>
              </table:table-cell>
              <table:table-cell office:value-type="float" office:value="-0.005552317">
                <text:p>-0.005552317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693.786499023438">
                <text:p>693.786499023438</text:p>
              </table:table-cell>
              <table:table-cell office:value-type="float" office:value="0.01167812">
                <text:p>0.01167812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693.906555175781">
                <text:p>693.906555175781</text:p>
              </table:table-cell>
              <table:table-cell office:value-type="float" office:value="-0.008433348">
                <text:p>-0.008433348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694.026672363281">
                <text:p>694.026672363281</text:p>
              </table:table-cell>
              <table:table-cell office:value-type="float" office:value="-0.002002806">
                <text:p>-0.002002806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694.146728515625">
                <text:p>694.146728515625</text:p>
              </table:table-cell>
              <table:table-cell office:value-type="float" office:value="-0.001521334">
                <text:p>-0.001521334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694.266845703125">
                <text:p>694.266845703125</text:p>
              </table:table-cell>
              <table:table-cell office:value-type="float" office:value="-0.001576384">
                <text:p>-0.001576384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694.386962890625">
                <text:p>694.386962890625</text:p>
              </table:table-cell>
              <table:table-cell office:value-type="float" office:value="-0.001818592">
                <text:p>-0.001818592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694.507080078125">
                <text:p>694.507080078125</text:p>
              </table:table-cell>
              <table:table-cell office:value-type="float" office:value="0.008263862">
                <text:p>0.008263862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694.627136230469">
                <text:p>694.627136230469</text:p>
              </table:table-cell>
              <table:table-cell office:value-type="float" office:value="-0.002448546">
                <text:p>-0.002448546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694.747253417969">
                <text:p>694.747253417969</text:p>
              </table:table-cell>
              <table:table-cell office:value-type="float" office:value="-0.004756493">
                <text:p>-0.004756493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694.867370605469">
                <text:p>694.867370605469</text:p>
              </table:table-cell>
              <table:table-cell office:value-type="float" office:value="-0.01160159">
                <text:p>-0.01160159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694.987426757813">
                <text:p>694.987426757813</text:p>
              </table:table-cell>
              <table:table-cell office:value-type="float" office:value="-0.00124983">
                <text:p>-0.00124983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695.107543945313">
                <text:p>695.107543945313</text:p>
              </table:table-cell>
              <table:table-cell office:value-type="float" office:value="0.001322265">
                <text:p>0.001322265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695.227661132813">
                <text:p>695.227661132813</text:p>
              </table:table-cell>
              <table:table-cell office:value-type="float" office:value="0.002702159">
                <text:p>0.002702159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695.347778320313">
                <text:p>695.347778320313</text:p>
              </table:table-cell>
              <table:table-cell office:value-type="float" office:value="-0.007125502">
                <text:p>-0.007125502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695.467895507813">
                <text:p>695.467895507813</text:p>
              </table:table-cell>
              <table:table-cell office:value-type="float" office:value="-0.009878996">
                <text:p>-0.009878996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695.587951660156">
                <text:p>695.587951660156</text:p>
              </table:table-cell>
              <table:table-cell office:value-type="float" office:value="0.008594262">
                <text:p>0.008594262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695.708068847656">
                <text:p>695.708068847656</text:p>
              </table:table-cell>
              <table:table-cell office:value-type="float" office:value="0.001694304">
                <text:p>0.001694304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695.828186035156">
                <text:p>695.828186035156</text:p>
              </table:table-cell>
              <table:table-cell office:value-type="float" office:value="-0.004322668">
                <text:p>-0.004322668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695.948303222656">
                <text:p>695.948303222656</text:p>
              </table:table-cell>
              <table:table-cell office:value-type="float" office:value="-0.002329711">
                <text:p>-0.002329711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96.068420410156">
                <text:p>696.068420410156</text:p>
              </table:table-cell>
              <table:table-cell office:value-type="float" office:value="-0.007788897">
                <text:p>-0.007788897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696.188537597656">
                <text:p>696.188537597656</text:p>
              </table:table-cell>
              <table:table-cell office:value-type="float" office:value="0.02504553">
                <text:p>0.02504553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696.308654785156">
                <text:p>696.308654785156</text:p>
              </table:table-cell>
              <table:table-cell office:value-type="float" office:value="-0.008849152">
                <text:p>-0.008849152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96.428771972656">
                <text:p>696.428771972656</text:p>
              </table:table-cell>
              <table:table-cell office:value-type="float" office:value="0.01275769">
                <text:p>0.01275769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96.548828125">
                <text:p>696.548828125</text:p>
              </table:table-cell>
              <table:table-cell office:value-type="float" office:value="-0.007444355">
                <text:p>-0.007444355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96.6689453125">
                <text:p>696.6689453125</text:p>
              </table:table-cell>
              <table:table-cell office:value-type="float" office:value="-0.00651006">
                <text:p>-0.00651006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96.7890625">
                <text:p>696.7890625</text:p>
              </table:table-cell>
              <table:table-cell office:value-type="float" office:value="-0.009802379">
                <text:p>-0.009802379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96.9091796875">
                <text:p>696.9091796875</text:p>
              </table:table-cell>
              <table:table-cell office:value-type="float" office:value="-0.008982324">
                <text:p>-0.008982324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97.029296875">
                <text:p>697.029296875</text:p>
              </table:table-cell>
              <table:table-cell office:value-type="float" office:value="-0.0131293">
                <text:p>-0.0131293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697.1494140625">
                <text:p>697.1494140625</text:p>
              </table:table-cell>
              <table:table-cell office:value-type="float" office:value="0.007261369">
                <text:p>0.007261369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697.26953125">
                <text:p>697.26953125</text:p>
              </table:table-cell>
              <table:table-cell office:value-type="float" office:value="0.002983697">
                <text:p>0.002983697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697.3896484375">
                <text:p>697.3896484375</text:p>
              </table:table-cell>
              <table:table-cell office:value-type="float" office:value="-0.008260603">
                <text:p>-0.008260603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697.509765625">
                <text:p>697.509765625</text:p>
              </table:table-cell>
              <table:table-cell office:value-type="float" office:value="0.0002833083">
                <text:p>0.0002833083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697.6298828125">
                <text:p>697.6298828125</text:p>
              </table:table-cell>
              <table:table-cell office:value-type="float" office:value="-0.006927943">
                <text:p>-0.006927943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97.75">
                <text:p>697.75</text:p>
              </table:table-cell>
              <table:table-cell office:value-type="float" office:value="0.02629779">
                <text:p>0.02629779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697.8701171875">
                <text:p>697.8701171875</text:p>
              </table:table-cell>
              <table:table-cell office:value-type="float" office:value="0.005768067">
                <text:p>0.005768067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697.990234375">
                <text:p>697.990234375</text:p>
              </table:table-cell>
              <table:table-cell office:value-type="float" office:value="0.01282597">
                <text:p>0.01282597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698.1103515625">
                <text:p>698.1103515625</text:p>
              </table:table-cell>
              <table:table-cell office:value-type="float" office:value="0.001247213">
                <text:p>0.001247213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698.23046875">
                <text:p>698.23046875</text:p>
              </table:table-cell>
              <table:table-cell office:value-type="float" office:value="-0.01007026">
                <text:p>-0.01007026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698.350646972656">
                <text:p>698.350646972656</text:p>
              </table:table-cell>
              <table:table-cell office:value-type="float" office:value="-0.005115109">
                <text:p>-0.005115109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698.470764160156">
                <text:p>698.470764160156</text:p>
              </table:table-cell>
              <table:table-cell office:value-type="float" office:value="0.002672553">
                <text:p>0.002672553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698.590881347656">
                <text:p>698.590881347656</text:p>
              </table:table-cell>
              <table:table-cell office:value-type="float" office:value="0.001869976">
                <text:p>0.001869976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698.710998535156">
                <text:p>698.710998535156</text:p>
              </table:table-cell>
              <table:table-cell office:value-type="float" office:value="0.02501151">
                <text:p>0.02501151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698.831115722656">
                <text:p>698.831115722656</text:p>
              </table:table-cell>
              <table:table-cell office:value-type="float" office:value="-0.00169398">
                <text:p>-0.00169398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698.951232910156">
                <text:p>698.951232910156</text:p>
              </table:table-cell>
              <table:table-cell office:value-type="float" office:value="-0.0009200377">
                <text:p>-0.0009200377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699.071350097656">
                <text:p>699.071350097656</text:p>
              </table:table-cell>
              <table:table-cell office:value-type="float" office:value="0.005660117">
                <text:p>0.005660117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699.191528320313">
                <text:p>699.191528320313</text:p>
              </table:table-cell>
              <table:table-cell office:value-type="float" office:value="-0.001158094">
                <text:p>-0.001158094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699.311645507813">
                <text:p>699.311645507813</text:p>
              </table:table-cell>
              <table:table-cell office:value-type="float" office:value="0.0008808241">
                <text:p>0.0008808241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699.431762695313">
                <text:p>699.431762695313</text:p>
              </table:table-cell>
              <table:table-cell office:value-type="float" office:value="0.00447885">
                <text:p>0.00447885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699.551879882813">
                <text:p>699.551879882813</text:p>
              </table:table-cell>
              <table:table-cell office:value-type="float" office:value="0.01082431">
                <text:p>0.01082431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699.671997070313">
                <text:p>699.671997070313</text:p>
              </table:table-cell>
              <table:table-cell office:value-type="float" office:value="-0.001941289">
                <text:p>-0.001941289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699.792175292969">
                <text:p>699.792175292969</text:p>
              </table:table-cell>
              <table:table-cell office:value-type="float" office:value="-0.003676947">
                <text:p>-0.003676947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699.912292480469">
                <text:p>699.912292480469</text:p>
              </table:table-cell>
              <table:table-cell office:value-type="float" office:value="0.02612434">
                <text:p>0.02612434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700.032409667969">
                <text:p>700.032409667969</text:p>
              </table:table-cell>
              <table:table-cell office:value-type="float" office:value="0.01075441">
                <text:p>0.01075441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700.152526855469">
                <text:p>700.152526855469</text:p>
              </table:table-cell>
              <table:table-cell office:value-type="float" office:value="0.0005026435">
                <text:p>0.0005026435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700.272705078125">
                <text:p>700.272705078125</text:p>
              </table:table-cell>
              <table:table-cell office:value-type="float" office:value="-0.002692452">
                <text:p>-0.002692452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700.392822265625">
                <text:p>700.392822265625</text:p>
              </table:table-cell>
              <table:table-cell office:value-type="float" office:value="0.001883175">
                <text:p>0.001883175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700.512939453125">
                <text:p>700.512939453125</text:p>
              </table:table-cell>
              <table:table-cell office:value-type="float" office:value="0.01038859">
                <text:p>0.01038859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700.633117675781">
                <text:p>700.633117675781</text:p>
              </table:table-cell>
              <table:table-cell office:value-type="float" office:value="0.0003808994">
                <text:p>0.0003808994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700.753234863281">
                <text:p>700.753234863281</text:p>
              </table:table-cell>
              <table:table-cell office:value-type="float" office:value="0.0001683015">
                <text:p>0.0001683015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700.873352050781">
                <text:p>700.873352050781</text:p>
              </table:table-cell>
              <table:table-cell office:value-type="float" office:value="-0.007411547">
                <text:p>-0.007411547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700.993530273438">
                <text:p>700.993530273438</text:p>
              </table:table-cell>
              <table:table-cell office:value-type="float" office:value="-0.004036697">
                <text:p>-0.004036697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701.113647460938">
                <text:p>701.113647460938</text:p>
              </table:table-cell>
              <table:table-cell office:value-type="float" office:value="0.002936625">
                <text:p>0.002936625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701.233764648438">
                <text:p>701.233764648438</text:p>
              </table:table-cell>
              <table:table-cell office:value-type="float" office:value="-0.00544906">
                <text:p>-0.00544906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701.353942871094">
                <text:p>701.353942871094</text:p>
              </table:table-cell>
              <table:table-cell office:value-type="float" office:value="0.01476594">
                <text:p>0.01476594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701.474060058594">
                <text:p>701.474060058594</text:p>
              </table:table-cell>
              <table:table-cell office:value-type="float" office:value="0.005810441">
                <text:p>0.005810441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701.594177246094">
                <text:p>701.594177246094</text:p>
              </table:table-cell>
              <table:table-cell office:value-type="float" office:value="-0.005742726">
                <text:p>-0.005742726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701.71435546875">
                <text:p>701.71435546875</text:p>
              </table:table-cell>
              <table:table-cell office:value-type="float" office:value="0.004915532">
                <text:p>0.004915532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01.83447265625">
                <text:p>701.83447265625</text:p>
              </table:table-cell>
              <table:table-cell office:value-type="float" office:value="-0.01069412">
                <text:p>-0.01069412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01.954650878906">
                <text:p>701.954650878906</text:p>
              </table:table-cell>
              <table:table-cell office:value-type="float" office:value="-0.006181581">
                <text:p>-0.006181581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02.074768066406">
                <text:p>702.074768066406</text:p>
              </table:table-cell>
              <table:table-cell office:value-type="float" office:value="0.005442209">
                <text:p>0.005442209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702.194946289063">
                <text:p>702.194946289063</text:p>
              </table:table-cell>
              <table:table-cell office:value-type="float" office:value="0.01004315">
                <text:p>0.01004315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702.315063476563">
                <text:p>702.315063476563</text:p>
              </table:table-cell>
              <table:table-cell office:value-type="float" office:value="-0.006047157">
                <text:p>-0.006047157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702.435241699219">
                <text:p>702.435241699219</text:p>
              </table:table-cell>
              <table:table-cell office:value-type="float" office:value="-0.00627084">
                <text:p>-0.00627084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702.555358886719">
                <text:p>702.555358886719</text:p>
              </table:table-cell>
              <table:table-cell office:value-type="float" office:value="0.008347129">
                <text:p>0.008347129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702.675537109375">
                <text:p>702.675537109375</text:p>
              </table:table-cell>
              <table:table-cell office:value-type="float" office:value="0.01687378">
                <text:p>0.01687378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02.795654296875">
                <text:p>702.795654296875</text:p>
              </table:table-cell>
              <table:table-cell office:value-type="float" office:value="-0.002359747">
                <text:p>-0.002359747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702.915832519531">
                <text:p>702.915832519531</text:p>
              </table:table-cell>
              <table:table-cell office:value-type="float" office:value="0.0007028703">
                <text:p>0.0007028703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703.035949707031">
                <text:p>703.035949707031</text:p>
              </table:table-cell>
              <table:table-cell office:value-type="float" office:value="-0.004227722">
                <text:p>-0.004227722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703.156127929688">
                <text:p>703.156127929688</text:p>
              </table:table-cell>
              <table:table-cell office:value-type="float" office:value="-0.002464217">
                <text:p>-0.002464217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703.276245117188">
                <text:p>703.276245117188</text:p>
              </table:table-cell>
              <table:table-cell office:value-type="float" office:value="-0.003193505">
                <text:p>-0.003193505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703.396423339844">
                <text:p>703.396423339844</text:p>
              </table:table-cell>
              <table:table-cell office:value-type="float" office:value="-0.006839217">
                <text:p>-0.006839217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703.516540527344">
                <text:p>703.516540527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703.63671875">
                <text:p>703.63671875</text:p>
              </table:table-cell>
              <table:table-cell office:value-type="float" office:value="0.0121902">
                <text:p>0.0121902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703.756896972656">
                <text:p>703.756896972656</text:p>
              </table:table-cell>
              <table:table-cell office:value-type="float" office:value="-0.0108734">
                <text:p>-0.0108734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703.877014160156">
                <text:p>703.877014160156</text:p>
              </table:table-cell>
              <table:table-cell office:value-type="float" office:value="0.006299515">
                <text:p>0.006299515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703.997192382813">
                <text:p>703.997192382813</text:p>
              </table:table-cell>
              <table:table-cell office:value-type="float" office:value="-0.00570807">
                <text:p>-0.00570807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704.117309570313">
                <text:p>704.117309570313</text:p>
              </table:table-cell>
              <table:table-cell office:value-type="float" office:value="-0.002925327">
                <text:p>-0.002925327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704.237487792969">
                <text:p>704.237487792969</text:p>
              </table:table-cell>
              <table:table-cell office:value-type="float" office:value="-0.006076985">
                <text:p>-0.006076985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704.357666015625">
                <text:p>704.357666015625</text:p>
              </table:table-cell>
              <table:table-cell office:value-type="float" office:value="-0.0070829">
                <text:p>-0.0070829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704.477783203125">
                <text:p>704.477783203125</text:p>
              </table:table-cell>
              <table:table-cell office:value-type="float" office:value="0.0102375">
                <text:p>0.0102375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704.597961425781">
                <text:p>704.597961425781</text:p>
              </table:table-cell>
              <table:table-cell office:value-type="float" office:value="-0.005591057">
                <text:p>-0.005591057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04.718139648438">
                <text:p>704.718139648438</text:p>
              </table:table-cell>
              <table:table-cell office:value-type="float" office:value="-0.008087924">
                <text:p>-0.008087924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704.838256835938">
                <text:p>704.838256835938</text:p>
              </table:table-cell>
              <table:table-cell office:value-type="float" office:value="-0.01046689">
                <text:p>-0.01046689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704.958435058594">
                <text:p>704.958435058594</text:p>
              </table:table-cell>
              <table:table-cell office:value-type="float" office:value="-0.00924729">
                <text:p>-0.00924729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705.07861328125">
                <text:p>705.07861328125</text:p>
              </table:table-cell>
              <table:table-cell office:value-type="float" office:value="0.001135561">
                <text:p>0.001135561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705.19873046875">
                <text:p>705.19873046875</text:p>
              </table:table-cell>
              <table:table-cell office:value-type="float" office:value="-0.0001364364">
                <text:p>-0.0001364364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05.318908691406">
                <text:p>705.318908691406</text:p>
              </table:table-cell>
              <table:table-cell office:value-type="float" office:value="-0.005343573">
                <text:p>-0.005343573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705.439086914063">
                <text:p>705.439086914063</text:p>
              </table:table-cell>
              <table:table-cell office:value-type="float" office:value="0.01091625">
                <text:p>0.01091625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05.559265136719">
                <text:p>705.559265136719</text:p>
              </table:table-cell>
              <table:table-cell office:value-type="float" office:value="-0.003003832">
                <text:p>-0.003003832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705.679382324219">
                <text:p>705.679382324219</text:p>
              </table:table-cell>
              <table:table-cell office:value-type="float" office:value="0.001551465">
                <text:p>0.001551465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705.799560546875">
                <text:p>705.799560546875</text:p>
              </table:table-cell>
              <table:table-cell office:value-type="float" office:value="0.01332777">
                <text:p>0.01332777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705.919738769531">
                <text:p>705.919738769531</text:p>
              </table:table-cell>
              <table:table-cell office:value-type="float" office:value="-0.003367312">
                <text:p>-0.003367312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706.039916992188">
                <text:p>706.039916992188</text:p>
              </table:table-cell>
              <table:table-cell office:value-type="float" office:value="-0.003328738">
                <text:p>-0.003328738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706.160034179688">
                <text:p>706.160034179688</text:p>
              </table:table-cell>
              <table:table-cell office:value-type="float" office:value="0.01957286">
                <text:p>0.01957286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706.280212402344">
                <text:p>706.280212402344</text:p>
              </table:table-cell>
              <table:table-cell office:value-type="float" office:value="-0.001863217">
                <text:p>-0.001863217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706.400390625">
                <text:p>706.400390625</text:p>
              </table:table-cell>
              <table:table-cell office:value-type="float" office:value="0.002901664">
                <text:p>0.002901664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706.520568847656">
                <text:p>706.520568847656</text:p>
              </table:table-cell>
              <table:table-cell office:value-type="float" office:value="0.00458804">
                <text:p>0.00458804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706.640747070313">
                <text:p>706.640747070313</text:p>
              </table:table-cell>
              <table:table-cell office:value-type="float" office:value="-0.005098816">
                <text:p>-0.005098816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706.760925292969">
                <text:p>706.760925292969</text:p>
              </table:table-cell>
              <table:table-cell office:value-type="float" office:value="0.008174012">
                <text:p>0.008174012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706.881042480469">
                <text:p>706.881042480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707.001220703125">
                <text:p>707.001220703125</text:p>
              </table:table-cell>
              <table:table-cell office:value-type="float" office:value="-0.009529613">
                <text:p>-0.00952961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707.121398925781">
                <text:p>707.121398925781</text:p>
              </table:table-cell>
              <table:table-cell office:value-type="float" office:value="-0.01136013">
                <text:p>-0.01136013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707.241577148438">
                <text:p>707.241577148438</text:p>
              </table:table-cell>
              <table:table-cell office:value-type="float" office:value="0.00187173">
                <text:p>0.00187173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707.361755371094">
                <text:p>707.361755371094</text:p>
              </table:table-cell>
              <table:table-cell office:value-type="float" office:value="0.003579202">
                <text:p>0.003579202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707.48193359375">
                <text:p>707.48193359375</text:p>
              </table:table-cell>
              <table:table-cell office:value-type="float" office:value="0.003913992">
                <text:p>0.003913992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707.602111816406">
                <text:p>707.602111816406</text:p>
              </table:table-cell>
              <table:table-cell office:value-type="float" office:value="-0.007954606">
                <text:p>-0.007954606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707.722290039063">
                <text:p>707.722290039063</text:p>
              </table:table-cell>
              <table:table-cell office:value-type="float" office:value="0.001905392">
                <text:p>0.001905392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707.842468261719">
                <text:p>707.842468261719</text:p>
              </table:table-cell>
              <table:table-cell office:value-type="float" office:value="0.003905534">
                <text:p>0.003905534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707.962646484375">
                <text:p>707.962646484375</text:p>
              </table:table-cell>
              <table:table-cell office:value-type="float" office:value="0.008043281">
                <text:p>0.008043281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708.082763671875">
                <text:p>708.082763671875</text:p>
              </table:table-cell>
              <table:table-cell office:value-type="float" office:value="-0.003356783">
                <text:p>-0.003356783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708.202941894531">
                <text:p>708.202941894531</text:p>
              </table:table-cell>
              <table:table-cell office:value-type="float" office:value="0.002195793">
                <text:p>0.002195793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708.323120117188">
                <text:p>708.323120117188</text:p>
              </table:table-cell>
              <table:table-cell office:value-type="float" office:value="0.003917172">
                <text:p>0.003917172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708.443298339844">
                <text:p>708.443298339844</text:p>
              </table:table-cell>
              <table:table-cell office:value-type="float" office:value="-0.004943904">
                <text:p>-0.004943904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708.5634765625">
                <text:p>708.5634765625</text:p>
              </table:table-cell>
              <table:table-cell office:value-type="float" office:value="-0.003561051">
                <text:p>-0.003561051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08.683654785156">
                <text:p>708.683654785156</text:p>
              </table:table-cell>
              <table:table-cell office:value-type="float" office:value="-0.004727773">
                <text:p>-0.004727773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708.803833007813">
                <text:p>708.803833007813</text:p>
              </table:table-cell>
              <table:table-cell office:value-type="float" office:value="0.01205756">
                <text:p>0.01205756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708.924011230469">
                <text:p>708.924011230469</text:p>
              </table:table-cell>
              <table:table-cell office:value-type="float" office:value="-0.01092023">
                <text:p>-0.01092023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709.044189453125">
                <text:p>709.044189453125</text:p>
              </table:table-cell>
              <table:table-cell office:value-type="float" office:value="-0.002906256">
                <text:p>-0.002906256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709.164367675781">
                <text:p>709.164367675781</text:p>
              </table:table-cell>
              <table:table-cell office:value-type="float" office:value="0.001296105">
                <text:p>0.001296105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09.284545898438">
                <text:p>709.284545898438</text:p>
              </table:table-cell>
              <table:table-cell office:value-type="float" office:value="0.001333781">
                <text:p>0.001333781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709.404724121094">
                <text:p>709.404724121094</text:p>
              </table:table-cell>
              <table:table-cell office:value-type="float" office:value="0.0001736891">
                <text:p>0.0001736891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709.52490234375">
                <text:p>709.52490234375</text:p>
              </table:table-cell>
              <table:table-cell office:value-type="float" office:value="-0.0062666">
                <text:p>-0.0062666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709.645141601563">
                <text:p>709.645141601563</text:p>
              </table:table-cell>
              <table:table-cell office:value-type="float" office:value="-0.007109209">
                <text:p>-0.007109209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709.765319824219">
                <text:p>709.765319824219</text:p>
              </table:table-cell>
              <table:table-cell office:value-type="float" office:value="0.001294479">
                <text:p>0.001294479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709.885498046875">
                <text:p>709.885498046875</text:p>
              </table:table-cell>
              <table:table-cell office:value-type="float" office:value="-0.002718847">
                <text:p>-0.002718847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710.005676269531">
                <text:p>710.005676269531</text:p>
              </table:table-cell>
              <table:table-cell office:value-type="float" office:value="-0.00243435">
                <text:p>-0.00243435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710.125854492188">
                <text:p>710.125854492188</text:p>
              </table:table-cell>
              <table:table-cell office:value-type="float" office:value="0.00612215">
                <text:p>0.00612215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710.246032714844">
                <text:p>710.246032714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710.3662109375">
                <text:p>710.3662109375</text:p>
              </table:table-cell>
              <table:table-cell office:value-type="float" office:value="-0.009252496">
                <text:p>-0.009252496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710.486389160156">
                <text:p>710.486389160156</text:p>
              </table:table-cell>
              <table:table-cell office:value-type="float" office:value="0.008872642">
                <text:p>0.008872642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710.606567382813">
                <text:p>710.606567382813</text:p>
              </table:table-cell>
              <table:table-cell office:value-type="float" office:value="-0.002537293">
                <text:p>-0.002537293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710.726745605469">
                <text:p>710.726745605469</text:p>
              </table:table-cell>
              <table:table-cell office:value-type="float" office:value="-0.008040189">
                <text:p>-0.008040189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710.846984863281">
                <text:p>710.846984863281</text:p>
              </table:table-cell>
              <table:table-cell office:value-type="float" office:value="0.00132561">
                <text:p>0.00132561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710.967163085938">
                <text:p>710.967163085938</text:p>
              </table:table-cell>
              <table:table-cell office:value-type="float" office:value="-0.001285629">
                <text:p>-0.001285629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711.087341308594">
                <text:p>711.087341308594</text:p>
              </table:table-cell>
              <table:table-cell office:value-type="float" office:value="-0.0001261152">
                <text:p>-0.0001261152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711.20751953125">
                <text:p>711.20751953125</text:p>
              </table:table-cell>
              <table:table-cell office:value-type="float" office:value="-0.01058645">
                <text:p>-0.01058645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711.327697753906">
                <text:p>711.327697753906</text:p>
              </table:table-cell>
              <table:table-cell office:value-type="float" office:value="-0.009084742">
                <text:p>-0.009084742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711.447875976563">
                <text:p>711.447875976563</text:p>
              </table:table-cell>
              <table:table-cell office:value-type="float" office:value="0.00297193">
                <text:p>0.00297193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711.568115234375">
                <text:p>711.568115234375</text:p>
              </table:table-cell>
              <table:table-cell office:value-type="float" office:value="-0.004686319">
                <text:p>-0.004686319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711.688293457031">
                <text:p>711.688293457031</text:p>
              </table:table-cell>
              <table:table-cell office:value-type="float" office:value="0.01308344">
                <text:p>0.01308344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711.808471679688">
                <text:p>711.808471679688</text:p>
              </table:table-cell>
              <table:table-cell office:value-type="float" office:value="-0.009604197">
                <text:p>-0.009604197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711.928649902344">
                <text:p>711.928649902344</text:p>
              </table:table-cell>
              <table:table-cell office:value-type="float" office:value="-0.004858013">
                <text:p>-0.004858013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712.048889160156">
                <text:p>712.048889160156</text:p>
              </table:table-cell>
              <table:table-cell office:value-type="float" office:value="-0.001078805">
                <text:p>-0.001078805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712.169067382813">
                <text:p>712.169067382813</text:p>
              </table:table-cell>
              <table:table-cell office:value-type="float" office:value="0.007738488">
                <text:p>0.007738488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712.289245605469">
                <text:p>712.289245605469</text:p>
              </table:table-cell>
              <table:table-cell office:value-type="float" office:value="0.003944362">
                <text:p>0.003944362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712.409423828125">
                <text:p>712.409423828125</text:p>
              </table:table-cell>
              <table:table-cell office:value-type="float" office:value="-0.007865828">
                <text:p>-0.007865828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712.529663085938">
                <text:p>712.529663085938</text:p>
              </table:table-cell>
              <table:table-cell office:value-type="float" office:value="0.007516222">
                <text:p>0.007516222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712.649841308594">
                <text:p>712.649841308594</text:p>
              </table:table-cell>
              <table:table-cell office:value-type="float" office:value="-0.006328824">
                <text:p>-0.006328824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712.77001953125">
                <text:p>712.77001953125</text:p>
              </table:table-cell>
              <table:table-cell office:value-type="float" office:value="-0.01082599">
                <text:p>-0.01082599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712.890197753906">
                <text:p>712.890197753906</text:p>
              </table:table-cell>
              <table:table-cell office:value-type="float" office:value="-0.005296331">
                <text:p>-0.005296331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713.010437011719">
                <text:p>713.010437011719</text:p>
              </table:table-cell>
              <table:table-cell office:value-type="float" office:value="0.01814304">
                <text:p>0.01814304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713.130615234375">
                <text:p>713.130615234375</text:p>
              </table:table-cell>
              <table:table-cell office:value-type="float" office:value="0.01715759">
                <text:p>0.01715759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713.250793457031">
                <text:p>713.250793457031</text:p>
              </table:table-cell>
              <table:table-cell office:value-type="float" office:value="0.01629872">
                <text:p>0.01629872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713.371032714844">
                <text:p>713.371032714844</text:p>
              </table:table-cell>
              <table:table-cell office:value-type="float" office:value="-0.01148183">
                <text:p>-0.01148183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713.4912109375">
                <text:p>713.4912109375</text:p>
              </table:table-cell>
              <table:table-cell office:value-type="float" office:value="-0.00125294">
                <text:p>-0.00125294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713.611389160156">
                <text:p>713.611389160156</text:p>
              </table:table-cell>
              <table:table-cell office:value-type="float" office:value="0.003443052">
                <text:p>0.003443052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13.731628417969">
                <text:p>713.731628417969</text:p>
              </table:table-cell>
              <table:table-cell office:value-type="float" office:value="0.003892601">
                <text:p>0.003892601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713.851806640625">
                <text:p>713.851806640625</text:p>
              </table:table-cell>
              <table:table-cell office:value-type="float" office:value="-0.008719914">
                <text:p>-0.008719914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713.971984863281">
                <text:p>713.971984863281</text:p>
              </table:table-cell>
              <table:table-cell office:value-type="float" office:value="-0.0008898601">
                <text:p>-0.0008898601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714.092224121094">
                <text:p>714.092224121094</text:p>
              </table:table-cell>
              <table:table-cell office:value-type="float" office:value="-0.0120066">
                <text:p>-0.0120066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714.21240234375">
                <text:p>714.21240234375</text:p>
              </table:table-cell>
              <table:table-cell office:value-type="float" office:value="0.009651252">
                <text:p>0.009651252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714.332580566406">
                <text:p>714.332580566406</text:p>
              </table:table-cell>
              <table:table-cell office:value-type="float" office:value="0.00432006">
                <text:p>0.00432006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714.452819824219">
                <text:p>714.452819824219</text:p>
              </table:table-cell>
              <table:table-cell office:value-type="float" office:value="-0.0008529884">
                <text:p>-0.0008529884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714.572998046875">
                <text:p>714.572998046875</text:p>
              </table:table-cell>
              <table:table-cell office:value-type="float" office:value="0.004649546">
                <text:p>0.004649546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714.693237304688">
                <text:p>714.693237304688</text:p>
              </table:table-cell>
              <table:table-cell office:value-type="float" office:value="0.01396362">
                <text:p>0.01396362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714.813415527344">
                <text:p>714.813415527344</text:p>
              </table:table-cell>
              <table:table-cell office:value-type="float" office:value="-0.004023918">
                <text:p>-0.004023918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714.93359375">
                <text:p>714.93359375</text:p>
              </table:table-cell>
              <table:table-cell office:value-type="float" office:value="0.004096895">
                <text:p>0.004096895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715.053833007813">
                <text:p>715.053833007813</text:p>
              </table:table-cell>
              <table:table-cell office:value-type="float" office:value="0.002407159">
                <text:p>0.002407159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715.174011230469">
                <text:p>715.174011230469</text:p>
              </table:table-cell>
              <table:table-cell office:value-type="float" office:value="0.003598304">
                <text:p>0.003598304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715.294250488281">
                <text:p>715.294250488281</text:p>
              </table:table-cell>
              <table:table-cell office:value-type="float" office:value="-0.01066207">
                <text:p>-0.01066207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715.414428710938">
                <text:p>715.414428710938</text:p>
              </table:table-cell>
              <table:table-cell office:value-type="float" office:value="-0.00429156">
                <text:p>-0.00429156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715.53466796875">
                <text:p>715.53466796875</text:p>
              </table:table-cell>
              <table:table-cell office:value-type="float" office:value="-0.0001738334">
                <text:p>-0.0001738334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715.654846191406">
                <text:p>715.654846191406</text:p>
              </table:table-cell>
              <table:table-cell office:value-type="float" office:value="-0.008384756">
                <text:p>-0.008384756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715.775024414063">
                <text:p>715.775024414063</text:p>
              </table:table-cell>
              <table:table-cell office:value-type="float" office:value="0.001756823">
                <text:p>0.001756823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715.895263671875">
                <text:p>715.895263671875</text:p>
              </table:table-cell>
              <table:table-cell office:value-type="float" office:value="-0.003128252">
                <text:p>-0.003128252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716.015441894531">
                <text:p>716.015441894531</text:p>
              </table:table-cell>
              <table:table-cell office:value-type="float" office:value="-0.006835237">
                <text:p>-0.006835237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716.135681152344">
                <text:p>716.135681152344</text:p>
              </table:table-cell>
              <table:table-cell office:value-type="float" office:value="-0.00159474">
                <text:p>-0.00159474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716.255859375">
                <text:p>716.255859375</text:p>
              </table:table-cell>
              <table:table-cell office:value-type="float" office:value="-0.009772574">
                <text:p>-0.009772574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716.376098632813">
                <text:p>716.376098632813</text:p>
              </table:table-cell>
              <table:table-cell office:value-type="float" office:value="-0.01156753">
                <text:p>-0.01156753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716.496276855469">
                <text:p>716.496276855469</text:p>
              </table:table-cell>
              <table:table-cell office:value-type="float" office:value="0.004767626">
                <text:p>0.004767626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716.616516113281">
                <text:p>716.616516113281</text:p>
              </table:table-cell>
              <table:table-cell office:value-type="float" office:value="0.0008031724">
                <text:p>0.0008031724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716.736694335938">
                <text:p>716.736694335938</text:p>
              </table:table-cell>
              <table:table-cell office:value-type="float" office:value="0.0002237484">
                <text:p>0.0002237484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716.85693359375">
                <text:p>716.85693359375</text:p>
              </table:table-cell>
              <table:table-cell office:value-type="float" office:value="-0.0002469834">
                <text:p>-0.0002469834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716.977172851563">
                <text:p>716.977172851563</text:p>
              </table:table-cell>
              <table:table-cell office:value-type="float" office:value="0.0004246739">
                <text:p>0.0004246739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717.097351074219">
                <text:p>717.097351074219</text:p>
              </table:table-cell>
              <table:table-cell office:value-type="float" office:value="0.005471865">
                <text:p>0.005471865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717.217590332031">
                <text:p>717.217590332031</text:p>
              </table:table-cell>
              <table:table-cell office:value-type="float" office:value="-0.006583596">
                <text:p>-0.006583596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717.337768554688">
                <text:p>717.337768554688</text:p>
              </table:table-cell>
              <table:table-cell office:value-type="float" office:value="-0.01097505">
                <text:p>-0.01097505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717.4580078125">
                <text:p>717.4580078125</text:p>
              </table:table-cell>
              <table:table-cell office:value-type="float" office:value="0.0008311846">
                <text:p>0.0008311846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717.578186035156">
                <text:p>717.578186035156</text:p>
              </table:table-cell>
              <table:table-cell office:value-type="float" office:value="-0.0007846949">
                <text:p>-0.0007846949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717.698425292969">
                <text:p>717.698425292969</text:p>
              </table:table-cell>
              <table:table-cell office:value-type="float" office:value="-0.0007126475">
                <text:p>-0.0007126475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17.818603515625">
                <text:p>717.818603515625</text:p>
              </table:table-cell>
              <table:table-cell office:value-type="float" office:value="-0.0002408794">
                <text:p>-0.0002408794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17.938842773438">
                <text:p>717.938842773438</text:p>
              </table:table-cell>
              <table:table-cell office:value-type="float" office:value="-0.003431071">
                <text:p>-0.003431071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718.05908203125">
                <text:p>718.05908203125</text:p>
              </table:table-cell>
              <table:table-cell office:value-type="float" office:value="0.0004937571">
                <text:p>0.0004937571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718.179260253906">
                <text:p>718.179260253906</text:p>
              </table:table-cell>
              <table:table-cell office:value-type="float" office:value="-0.007123902">
                <text:p>-0.007123902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718.299499511719">
                <text:p>718.299499511719</text:p>
              </table:table-cell>
              <table:table-cell office:value-type="float" office:value="0.004325842">
                <text:p>0.004325842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718.419677734375">
                <text:p>718.419677734375</text:p>
              </table:table-cell>
              <table:table-cell office:value-type="float" office:value="-0.002957789">
                <text:p>-0.002957789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718.539916992188">
                <text:p>718.539916992188</text:p>
              </table:table-cell>
              <table:table-cell office:value-type="float" office:value="-0.003631531">
                <text:p>-0.003631531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718.66015625">
                <text:p>718.66015625</text:p>
              </table:table-cell>
              <table:table-cell office:value-type="float" office:value="0.0006862363">
                <text:p>0.0006862363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718.780334472656">
                <text:p>718.780334472656</text:p>
              </table:table-cell>
              <table:table-cell office:value-type="float" office:value="-0.003565185">
                <text:p>-0.003565185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718.900573730469">
                <text:p>718.900573730469</text:p>
              </table:table-cell>
              <table:table-cell office:value-type="float" office:value="0.0006546063">
                <text:p>0.0006546063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719.020812988281">
                <text:p>719.020812988281</text:p>
              </table:table-cell>
              <table:table-cell office:value-type="float" office:value="0.004428744">
                <text:p>0.004428744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19.140991210938">
                <text:p>719.140991210938</text:p>
              </table:table-cell>
              <table:table-cell office:value-type="float" office:value="0.00757295">
                <text:p>0.00757295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19.26123046875">
                <text:p>719.26123046875</text:p>
              </table:table-cell>
              <table:table-cell office:value-type="float" office:value="-0.001224846">
                <text:p>-0.001224846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719.381469726563">
                <text:p>719.381469726563</text:p>
              </table:table-cell>
              <table:table-cell office:value-type="float" office:value="-0.005378382">
                <text:p>-0.005378382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719.501647949219">
                <text:p>719.501647949219</text:p>
              </table:table-cell>
              <table:table-cell office:value-type="float" office:value="0.009275562">
                <text:p>0.009275562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719.621887207031">
                <text:p>719.621887207031</text:p>
              </table:table-cell>
              <table:table-cell office:value-type="float" office:value="-0.003860317">
                <text:p>-0.003860317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719.742126464844">
                <text:p>719.742126464844</text:p>
              </table:table-cell>
              <table:table-cell office:value-type="float" office:value="-0.009792524">
                <text:p>-0.009792524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719.8623046875">
                <text:p>719.8623046875</text:p>
              </table:table-cell>
              <table:table-cell office:value-type="float" office:value="-0.01040356">
                <text:p>-0.01040356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719.982543945313">
                <text:p>719.982543945313</text:p>
              </table:table-cell>
              <table:table-cell office:value-type="float" office:value="0.003672092">
                <text:p>0.003672092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720.102783203125">
                <text:p>720.102783203125</text:p>
              </table:table-cell>
              <table:table-cell office:value-type="float" office:value="-0.007490266">
                <text:p>-0.007490266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720.222961425781">
                <text:p>720.222961425781</text:p>
              </table:table-cell>
              <table:table-cell office:value-type="float" office:value="0.009118738">
                <text:p>0.009118738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720.343200683594">
                <text:p>720.343200683594</text:p>
              </table:table-cell>
              <table:table-cell office:value-type="float" office:value="-0.01138261">
                <text:p>-0.01138261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720.463439941406">
                <text:p>720.463439941406</text:p>
              </table:table-cell>
              <table:table-cell office:value-type="float" office:value="0.0003065919">
                <text:p>0.0003065919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720.583679199219">
                <text:p>720.583679199219</text:p>
              </table:table-cell>
              <table:table-cell office:value-type="float" office:value="0.02346498">
                <text:p>0.02346498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720.703857421875">
                <text:p>720.703857421875</text:p>
              </table:table-cell>
              <table:table-cell office:value-type="float" office:value="0.0003310621">
                <text:p>0.0003310621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720.824096679688">
                <text:p>720.824096679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720.9443359375">
                <text:p>720.9443359375</text:p>
              </table:table-cell>
              <table:table-cell office:value-type="float" office:value="0.005299927">
                <text:p>0.005299927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721.064575195313">
                <text:p>721.064575195313</text:p>
              </table:table-cell>
              <table:table-cell office:value-type="float" office:value="0.004674824">
                <text:p>0.004674824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721.184753417969">
                <text:p>721.184753417969</text:p>
              </table:table-cell>
              <table:table-cell office:value-type="float" office:value="-0.004890274">
                <text:p>-0.004890274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721.304992675781">
                <text:p>721.304992675781</text:p>
              </table:table-cell>
              <table:table-cell office:value-type="float" office:value="0.001376727">
                <text:p>0.001376727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721.425231933594">
                <text:p>721.425231933594</text:p>
              </table:table-cell>
              <table:table-cell office:value-type="float" office:value="0.001406418">
                <text:p>0.001406418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721.545471191406">
                <text:p>721.545471191406</text:p>
              </table:table-cell>
              <table:table-cell office:value-type="float" office:value="0.01834446">
                <text:p>0.01834446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721.665649414063">
                <text:p>721.665649414063</text:p>
              </table:table-cell>
              <table:table-cell office:value-type="float" office:value="-0.01028585">
                <text:p>-0.01028585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721.785888671875">
                <text:p>721.785888671875</text:p>
              </table:table-cell>
              <table:table-cell office:value-type="float" office:value="0.01791875">
                <text:p>0.01791875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721.906127929688">
                <text:p>721.906127929688</text:p>
              </table:table-cell>
              <table:table-cell office:value-type="float" office:value="-0.003213027">
                <text:p>-0.003213027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722.0263671875">
                <text:p>722.0263671875</text:p>
              </table:table-cell>
              <table:table-cell office:value-type="float" office:value="-0.007915369">
                <text:p>-0.007915369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722.146606445313">
                <text:p>722.146606445313</text:p>
              </table:table-cell>
              <table:table-cell office:value-type="float" office:value="0.01521553">
                <text:p>0.01521553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722.266784667969">
                <text:p>722.266784667969</text:p>
              </table:table-cell>
              <table:table-cell office:value-type="float" office:value="-0.003840372">
                <text:p>-0.003840372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22.387023925781">
                <text:p>722.387023925781</text:p>
              </table:table-cell>
              <table:table-cell office:value-type="float" office:value="-0.009029108">
                <text:p>-0.009029108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22.507263183594">
                <text:p>722.507263183594</text:p>
              </table:table-cell>
              <table:table-cell office:value-type="float" office:value="-0.01092367">
                <text:p>-0.01092367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722.627502441406">
                <text:p>722.627502441406</text:p>
              </table:table-cell>
              <table:table-cell office:value-type="float" office:value="-0.007576936">
                <text:p>-0.007576936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722.747741699219">
                <text:p>722.747741699219</text:p>
              </table:table-cell>
              <table:table-cell office:value-type="float" office:value="0.002300308">
                <text:p>0.002300308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722.867980957031">
                <text:p>722.867980957031</text:p>
              </table:table-cell>
              <table:table-cell office:value-type="float" office:value="-0.01015377">
                <text:p>-0.01015377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722.988159179688">
                <text:p>722.988159179688</text:p>
              </table:table-cell>
              <table:table-cell office:value-type="float" office:value="0.0006999783">
                <text:p>0.0006999783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723.1083984375">
                <text:p>723.1083984375</text:p>
              </table:table-cell>
              <table:table-cell office:value-type="float" office:value="0.003084229">
                <text:p>0.003084229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723.228637695313">
                <text:p>723.228637695313</text:p>
              </table:table-cell>
              <table:table-cell office:value-type="float" office:value="0.01759773">
                <text:p>0.01759773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723.348876953125">
                <text:p>723.348876953125</text:p>
              </table:table-cell>
              <table:table-cell office:value-type="float" office:value="0.0001274139">
                <text:p>0.0001274139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723.469116210938">
                <text:p>723.469116210938</text:p>
              </table:table-cell>
              <table:table-cell office:value-type="float" office:value="-0.005939547">
                <text:p>-0.005939547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723.58935546875">
                <text:p>723.58935546875</text:p>
              </table:table-cell>
              <table:table-cell office:value-type="float" office:value="0.0009281379">
                <text:p>0.0009281379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723.709594726563">
                <text:p>723.709594726563</text:p>
              </table:table-cell>
              <table:table-cell office:value-type="float" office:value="-0.006640574">
                <text:p>-0.006640574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23.829772949219">
                <text:p>723.829772949219</text:p>
              </table:table-cell>
              <table:table-cell office:value-type="float" office:value="-0.00670647">
                <text:p>-0.00670647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23.950012207031">
                <text:p>723.950012207031</text:p>
              </table:table-cell>
              <table:table-cell office:value-type="float" office:value="0.002751492">
                <text:p>0.002751492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24.070251464844">
                <text:p>724.070251464844</text:p>
              </table:table-cell>
              <table:table-cell office:value-type="float" office:value="-0.0003610818">
                <text:p>-0.0003610818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724.190490722656">
                <text:p>724.190490722656</text:p>
              </table:table-cell>
              <table:table-cell office:value-type="float" office:value="-0.01341699">
                <text:p>-0.01341699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724.310729980469">
                <text:p>724.310729980469</text:p>
              </table:table-cell>
              <table:table-cell office:value-type="float" office:value="-0.008633696">
                <text:p>-0.008633696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724.430969238281">
                <text:p>724.430969238281</text:p>
              </table:table-cell>
              <table:table-cell office:value-type="float" office:value="-0.009262803">
                <text:p>-0.009262803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724.551208496094">
                <text:p>724.551208496094</text:p>
              </table:table-cell>
              <table:table-cell office:value-type="float" office:value="-0.01220157">
                <text:p>-0.01220157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724.671447753906">
                <text:p>724.671447753906</text:p>
              </table:table-cell>
              <table:table-cell office:value-type="float" office:value="0.005648097">
                <text:p>0.005648097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724.791687011719">
                <text:p>724.791687011719</text:p>
              </table:table-cell>
              <table:table-cell office:value-type="float" office:value="-0.01052458">
                <text:p>-0.01052458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724.911865234375">
                <text:p>724.911865234375</text:p>
              </table:table-cell>
              <table:table-cell office:value-type="float" office:value="-0.009964285">
                <text:p>-0.009964285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725.032104492188">
                <text:p>725.032104492188</text:p>
              </table:table-cell>
              <table:table-cell office:value-type="float" office:value="0.001433979">
                <text:p>0.001433979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725.15234375">
                <text:p>725.15234375</text:p>
              </table:table-cell>
              <table:table-cell office:value-type="float" office:value="-0.008024926">
                <text:p>-0.008024926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725.272583007813">
                <text:p>725.272583007813</text:p>
              </table:table-cell>
              <table:table-cell office:value-type="float" office:value="-0.009084483">
                <text:p>-0.009084483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725.392822265625">
                <text:p>725.392822265625</text:p>
              </table:table-cell>
              <table:table-cell office:value-type="float" office:value="0.0271724">
                <text:p>0.0271724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725.513061523438">
                <text:p>725.513061523438</text:p>
              </table:table-cell>
              <table:table-cell office:value-type="float" office:value="-0.002749609">
                <text:p>-0.002749609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725.63330078125">
                <text:p>725.63330078125</text:p>
              </table:table-cell>
              <table:table-cell office:value-type="float" office:value="-0.001908425">
                <text:p>-0.001908425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725.753540039063">
                <text:p>725.753540039063</text:p>
              </table:table-cell>
              <table:table-cell office:value-type="float" office:value="-0.007498351">
                <text:p>-0.007498351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725.873779296875">
                <text:p>725.873779296875</text:p>
              </table:table-cell>
              <table:table-cell office:value-type="float" office:value="0.001697218">
                <text:p>0.001697218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725.994018554688">
                <text:p>725.994018554688</text:p>
              </table:table-cell>
              <table:table-cell office:value-type="float" office:value="-0.00283082">
                <text:p>-0.00283082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726.1142578125">
                <text:p>726.1142578125</text:p>
              </table:table-cell>
              <table:table-cell office:value-type="float" office:value="0.0003820487">
                <text:p>0.0003820487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726.234497070313">
                <text:p>726.234497070313</text:p>
              </table:table-cell>
              <table:table-cell office:value-type="float" office:value="-0.003486377">
                <text:p>-0.003486377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726.354736328125">
                <text:p>726.354736328125</text:p>
              </table:table-cell>
              <table:table-cell office:value-type="float" office:value="0.008811962">
                <text:p>0.008811962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726.474975585938">
                <text:p>726.474975585938</text:p>
              </table:table-cell>
              <table:table-cell office:value-type="float" office:value="-0.001173919">
                <text:p>-0.001173919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726.59521484375">
                <text:p>726.59521484375</text:p>
              </table:table-cell>
              <table:table-cell office:value-type="float" office:value="-0.0001981912">
                <text:p>-0.0001981912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726.715454101563">
                <text:p>726.715454101563</text:p>
              </table:table-cell>
              <table:table-cell office:value-type="float" office:value="-0.005068622">
                <text:p>-0.005068622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726.835693359375">
                <text:p>726.835693359375</text:p>
              </table:table-cell>
              <table:table-cell office:value-type="float" office:value="-0.006001346">
                <text:p>-0.006001346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26.955932617188">
                <text:p>726.955932617188</text:p>
              </table:table-cell>
              <table:table-cell office:value-type="float" office:value="-0.01249822">
                <text:p>-0.01249822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727.076171875">
                <text:p>727.076171875</text:p>
              </table:table-cell>
              <table:table-cell office:value-type="float" office:value="0.00430293">
                <text:p>0.00430293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727.196411132813">
                <text:p>727.196411132813</text:p>
              </table:table-cell>
              <table:table-cell office:value-type="float" office:value="-0.002798461">
                <text:p>-0.002798461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727.316650390625">
                <text:p>727.316650390625</text:p>
              </table:table-cell>
              <table:table-cell office:value-type="float" office:value="0.01153564">
                <text:p>0.01153564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727.436889648438">
                <text:p>727.436889648438</text:p>
              </table:table-cell>
              <table:table-cell office:value-type="float" office:value="-0.002539162">
                <text:p>-0.002539162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727.55712890625">
                <text:p>727.55712890625</text:p>
              </table:table-cell>
              <table:table-cell office:value-type="float" office:value="-0.0008371508">
                <text:p>-0.0008371508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727.677368164063">
                <text:p>727.677368164063</text:p>
              </table:table-cell>
              <table:table-cell office:value-type="float" office:value="-0.003304046">
                <text:p>-0.003304046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727.797607421875">
                <text:p>727.797607421875</text:p>
              </table:table-cell>
              <table:table-cell office:value-type="float" office:value="-0.009540192">
                <text:p>-0.009540192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727.917846679688">
                <text:p>727.917846679688</text:p>
              </table:table-cell>
              <table:table-cell office:value-type="float" office:value="-0.0133308">
                <text:p>-0.0133308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728.0380859375">
                <text:p>728.0380859375</text:p>
              </table:table-cell>
              <table:table-cell office:value-type="float" office:value="0.001114488">
                <text:p>0.001114488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728.158325195313">
                <text:p>728.158325195313</text:p>
              </table:table-cell>
              <table:table-cell office:value-type="float" office:value="-0.01198481">
                <text:p>-0.01198481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728.278564453125">
                <text:p>728.278564453125</text:p>
              </table:table-cell>
              <table:table-cell office:value-type="float" office:value="-0.005658489">
                <text:p>-0.005658489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728.398803710938">
                <text:p>728.398803710938</text:p>
              </table:table-cell>
              <table:table-cell office:value-type="float" office:value="-0.009883872">
                <text:p>-0.009883872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728.51904296875">
                <text:p>728.51904296875</text:p>
              </table:table-cell>
              <table:table-cell office:value-type="float" office:value="0.005233797">
                <text:p>0.005233797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728.639282226563">
                <text:p>728.639282226563</text:p>
              </table:table-cell>
              <table:table-cell office:value-type="float" office:value="-0.01033108">
                <text:p>-0.01033108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728.759521484375">
                <text:p>728.759521484375</text:p>
              </table:table-cell>
              <table:table-cell office:value-type="float" office:value="-0.0001406877">
                <text:p>-0.0001406877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728.879760742188">
                <text:p>728.879760742188</text:p>
              </table:table-cell>
              <table:table-cell office:value-type="float" office:value="0.002040586">
                <text:p>0.002040586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729">
                <text:p>729</text:p>
              </table:table-cell>
              <table:table-cell office:value-type="float" office:value="-0.008777603">
                <text:p>-0.008777603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729.120239257813">
                <text:p>729.120239257813</text:p>
              </table:table-cell>
              <table:table-cell office:value-type="float" office:value="-0.0002341749">
                <text:p>-0.0002341749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729.240478515625">
                <text:p>729.240478515625</text:p>
              </table:table-cell>
              <table:table-cell office:value-type="float" office:value="0.008357267">
                <text:p>0.008357267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729.360778808594">
                <text:p>729.360778808594</text:p>
              </table:table-cell>
              <table:table-cell office:value-type="float" office:value="0.001746456">
                <text:p>0.001746456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729.481018066406">
                <text:p>729.481018066406</text:p>
              </table:table-cell>
              <table:table-cell office:value-type="float" office:value="-0.001568165">
                <text:p>-0.001568165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29.601257324219">
                <text:p>729.601257324219</text:p>
              </table:table-cell>
              <table:table-cell office:value-type="float" office:value="0.005712986">
                <text:p>0.005712986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29.721496582031">
                <text:p>729.721496582031</text:p>
              </table:table-cell>
              <table:table-cell office:value-type="float" office:value="0.02483187">
                <text:p>0.02483187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729.841735839844">
                <text:p>729.841735839844</text:p>
              </table:table-cell>
              <table:table-cell office:value-type="float" office:value="-0.008050601">
                <text:p>-0.008050601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729.961975097656">
                <text:p>729.961975097656</text:p>
              </table:table-cell>
              <table:table-cell office:value-type="float" office:value="-0.009660354">
                <text:p>-0.009660354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730.082214355469">
                <text:p>730.082214355469</text:p>
              </table:table-cell>
              <table:table-cell office:value-type="float" office:value="0.01139741">
                <text:p>0.01139741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730.202453613281">
                <text:p>730.202453613281</text:p>
              </table:table-cell>
              <table:table-cell office:value-type="float" office:value="0.004776701">
                <text:p>0.004776701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730.322692871094">
                <text:p>730.322692871094</text:p>
              </table:table-cell>
              <table:table-cell office:value-type="float" office:value="-0.002779967">
                <text:p>-0.002779967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730.442932128906">
                <text:p>730.442932128906</text:p>
              </table:table-cell>
              <table:table-cell office:value-type="float" office:value="0.002171355">
                <text:p>0.002171355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730.563171386719">
                <text:p>730.563171386719</text:p>
              </table:table-cell>
              <table:table-cell office:value-type="float" office:value="0.00561429">
                <text:p>0.00561429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730.683471679688">
                <text:p>730.683471679688</text:p>
              </table:table-cell>
              <table:table-cell office:value-type="float" office:value="-0.00209873">
                <text:p>-0.00209873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730.8037109375">
                <text:p>730.8037109375</text:p>
              </table:table-cell>
              <table:table-cell office:value-type="float" office:value="0.01236567">
                <text:p>0.01236567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730.923950195313">
                <text:p>730.923950195313</text:p>
              </table:table-cell>
              <table:table-cell office:value-type="float" office:value="0.005522665">
                <text:p>0.005522665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731.044189453125">
                <text:p>731.044189453125</text:p>
              </table:table-cell>
              <table:table-cell office:value-type="float" office:value="0.01441305">
                <text:p>0.01441305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731.164428710938">
                <text:p>731.164428710938</text:p>
              </table:table-cell>
              <table:table-cell office:value-type="float" office:value="-0.006473608">
                <text:p>-0.006473608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731.28466796875">
                <text:p>731.284667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731.404907226563">
                <text:p>731.404907226563</text:p>
              </table:table-cell>
              <table:table-cell office:value-type="float" office:value="-0.008891174">
                <text:p>-0.008891174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731.525146484375">
                <text:p>731.525146484375</text:p>
              </table:table-cell>
              <table:table-cell office:value-type="float" office:value="-0.004203844">
                <text:p>-0.004203844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731.645446777344">
                <text:p>731.645446777344</text:p>
              </table:table-cell>
              <table:table-cell office:value-type="float" office:value="0.007397819">
                <text:p>0.007397819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731.765686035156">
                <text:p>731.765686035156</text:p>
              </table:table-cell>
              <table:table-cell office:value-type="float" office:value="0.007361745">
                <text:p>0.007361745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731.885925292969">
                <text:p>731.885925292969</text:p>
              </table:table-cell>
              <table:table-cell office:value-type="float" office:value="0.004549225">
                <text:p>0.004549225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732.006164550781">
                <text:p>732.006164550781</text:p>
              </table:table-cell>
              <table:table-cell office:value-type="float" office:value="-0.003898795">
                <text:p>-0.003898795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732.126403808594">
                <text:p>732.126403808594</text:p>
              </table:table-cell>
              <table:table-cell office:value-type="float" office:value="0.01803953">
                <text:p>0.01803953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732.246643066406">
                <text:p>732.246643066406</text:p>
              </table:table-cell>
              <table:table-cell office:value-type="float" office:value="-0.005436138">
                <text:p>-0.005436138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732.366882324219">
                <text:p>732.366882324219</text:p>
              </table:table-cell>
              <table:table-cell office:value-type="float" office:value="-0.007034209">
                <text:p>-0.007034209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732.487182617188">
                <text:p>732.487182617188</text:p>
              </table:table-cell>
              <table:table-cell office:value-type="float" office:value="-0.006944219">
                <text:p>-0.006944219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732.607421875">
                <text:p>732.607421875</text:p>
              </table:table-cell>
              <table:table-cell office:value-type="float" office:value="-0.002267088">
                <text:p>-0.002267088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732.727661132813">
                <text:p>732.727661132813</text:p>
              </table:table-cell>
              <table:table-cell office:value-type="float" office:value="0.003792865">
                <text:p>0.003792865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732.847900390625">
                <text:p>732.847900390625</text:p>
              </table:table-cell>
              <table:table-cell office:value-type="float" office:value="-0.004131202">
                <text:p>-0.004131202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732.968139648438">
                <text:p>732.968139648438</text:p>
              </table:table-cell>
              <table:table-cell office:value-type="float" office:value="-0.002922907">
                <text:p>-0.002922907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733.08837890625">
                <text:p>733.08837890625</text:p>
              </table:table-cell>
              <table:table-cell office:value-type="float" office:value="-0.006360619">
                <text:p>-0.006360619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733.208679199219">
                <text:p>733.208679199219</text:p>
              </table:table-cell>
              <table:table-cell office:value-type="float" office:value="-0.009119394">
                <text:p>-0.009119394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733.328918457031">
                <text:p>733.328918457031</text:p>
              </table:table-cell>
              <table:table-cell office:value-type="float" office:value="-0.004744295">
                <text:p>-0.004744295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733.449157714844">
                <text:p>733.449157714844</text:p>
              </table:table-cell>
              <table:table-cell office:value-type="float" office:value="-0.001889729">
                <text:p>-0.001889729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733.569396972656">
                <text:p>733.569396972656</text:p>
              </table:table-cell>
              <table:table-cell office:value-type="float" office:value="0.001559336">
                <text:p>0.001559336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733.689636230469">
                <text:p>733.689636230469</text:p>
              </table:table-cell>
              <table:table-cell office:value-type="float" office:value="-0.003374959">
                <text:p>-0.003374959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733.809936523438">
                <text:p>733.809936523438</text:p>
              </table:table-cell>
              <table:table-cell office:value-type="float" office:value="-0.001844049">
                <text:p>-0.001844049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733.93017578125">
                <text:p>733.93017578125</text:p>
              </table:table-cell>
              <table:table-cell office:value-type="float" office:value="0.006152297">
                <text:p>0.006152297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734.050415039063">
                <text:p>734.050415039063</text:p>
              </table:table-cell>
              <table:table-cell office:value-type="float" office:value="-0.0003750961">
                <text:p>-0.0003750961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734.170654296875">
                <text:p>734.170654296875</text:p>
              </table:table-cell>
              <table:table-cell office:value-type="float" office:value="0.005821737">
                <text:p>0.005821737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734.290893554688">
                <text:p>734.290893554688</text:p>
              </table:table-cell>
              <table:table-cell office:value-type="float" office:value="-0.008186108">
                <text:p>-0.008186108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734.4111328125">
                <text:p>734.4111328125</text:p>
              </table:table-cell>
              <table:table-cell office:value-type="float" office:value="-0.01017121">
                <text:p>-0.01017121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734.531433105469">
                <text:p>734.531433105469</text:p>
              </table:table-cell>
              <table:table-cell office:value-type="float" office:value="-0.003233237">
                <text:p>-0.003233237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734.651672363281">
                <text:p>734.651672363281</text:p>
              </table:table-cell>
              <table:table-cell office:value-type="float" office:value="0.005697584">
                <text:p>0.005697584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734.771911621094">
                <text:p>734.771911621094</text:p>
              </table:table-cell>
              <table:table-cell office:value-type="float" office:value="-0.0006496643">
                <text:p>-0.0006496643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734.892150878906">
                <text:p>734.892150878906</text:p>
              </table:table-cell>
              <table:table-cell office:value-type="float" office:value="-0.009156136">
                <text:p>-0.009156136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735.012451171875">
                <text:p>735.012451171875</text:p>
              </table:table-cell>
              <table:table-cell office:value-type="float" office:value="-0.008205848">
                <text:p>-0.008205848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735.132690429688">
                <text:p>735.132690429688</text:p>
              </table:table-cell>
              <table:table-cell office:value-type="float" office:value="-0.001687542">
                <text:p>-0.001687542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735.2529296875">
                <text:p>735.2529296875</text:p>
              </table:table-cell>
              <table:table-cell office:value-type="float" office:value="0.01937302">
                <text:p>0.01937302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735.373168945313">
                <text:p>735.373168945313</text:p>
              </table:table-cell>
              <table:table-cell office:value-type="float" office:value="0.003215992">
                <text:p>0.003215992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735.493408203125">
                <text:p>735.493408203125</text:p>
              </table:table-cell>
              <table:table-cell office:value-type="float" office:value="-0.001727242">
                <text:p>-0.001727242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735.613708496094">
                <text:p>735.613708496094</text:p>
              </table:table-cell>
              <table:table-cell office:value-type="float" office:value="0.003556361">
                <text:p>0.003556361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735.733947753906">
                <text:p>735.733947753906</text:p>
              </table:table-cell>
              <table:table-cell office:value-type="float" office:value="0.005553383">
                <text:p>0.005553383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735.854187011719">
                <text:p>735.854187011719</text:p>
              </table:table-cell>
              <table:table-cell office:value-type="float" office:value="0.008327662">
                <text:p>0.008327662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735.974426269531">
                <text:p>735.974426269531</text:p>
              </table:table-cell>
              <table:table-cell office:value-type="float" office:value="0.001981626">
                <text:p>0.001981626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736.094665527344">
                <text:p>736.094665527344</text:p>
              </table:table-cell>
              <table:table-cell office:value-type="float" office:value="0.002577468">
                <text:p>0.002577468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736.214965820313">
                <text:p>736.214965820313</text:p>
              </table:table-cell>
              <table:table-cell office:value-type="float" office:value="-0.006576474">
                <text:p>-0.006576474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736.335205078125">
                <text:p>736.335205078125</text:p>
              </table:table-cell>
              <table:table-cell office:value-type="float" office:value="-0.0001582879">
                <text:p>-0.0001582879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736.455444335938">
                <text:p>736.455444335938</text:p>
              </table:table-cell>
              <table:table-cell office:value-type="float" office:value="0.004794262">
                <text:p>0.004794262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736.57568359375">
                <text:p>736.57568359375</text:p>
              </table:table-cell>
              <table:table-cell office:value-type="float" office:value="0.002786946">
                <text:p>0.002786946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36.695983886719">
                <text:p>736.695983886719</text:p>
              </table:table-cell>
              <table:table-cell office:value-type="float" office:value="0.01221534">
                <text:p>0.01221534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736.816223144531">
                <text:p>736.816223144531</text:p>
              </table:table-cell>
              <table:table-cell office:value-type="float" office:value="0.007786917">
                <text:p>0.007786917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736.936462402344">
                <text:p>736.936462402344</text:p>
              </table:table-cell>
              <table:table-cell office:value-type="float" office:value="0.01191976">
                <text:p>0.01191976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737.056701660156">
                <text:p>737.056701660156</text:p>
              </table:table-cell>
              <table:table-cell office:value-type="float" office:value="-0.002015991">
                <text:p>-0.002015991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737.177001953125">
                <text:p>737.177001953125</text:p>
              </table:table-cell>
              <table:table-cell office:value-type="float" office:value="0.004646985">
                <text:p>0.004646985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737.297241210938">
                <text:p>737.297241210938</text:p>
              </table:table-cell>
              <table:table-cell office:value-type="float" office:value="0.006282838">
                <text:p>0.006282838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737.41748046875">
                <text:p>737.41748046875</text:p>
              </table:table-cell>
              <table:table-cell office:value-type="float" office:value="0.002975118">
                <text:p>0.002975118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737.537719726563">
                <text:p>737.537719726563</text:p>
              </table:table-cell>
              <table:table-cell office:value-type="float" office:value="0.002132043">
                <text:p>0.002132043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737.658020019531">
                <text:p>737.658020019531</text:p>
              </table:table-cell>
              <table:table-cell office:value-type="float" office:value="-0.009304726">
                <text:p>-0.009304726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737.778259277344">
                <text:p>737.778259277344</text:p>
              </table:table-cell>
              <table:table-cell office:value-type="float" office:value="0.005092471">
                <text:p>0.005092471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737.898498535156">
                <text:p>737.898498535156</text:p>
              </table:table-cell>
              <table:table-cell office:value-type="float" office:value="0.001268498">
                <text:p>0.001268498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738.018737792969">
                <text:p>738.018737792969</text:p>
              </table:table-cell>
              <table:table-cell office:value-type="float" office:value="0.004390442">
                <text:p>0.004390442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738.139038085938">
                <text:p>738.139038085938</text:p>
              </table:table-cell>
              <table:table-cell office:value-type="float" office:value="0.004100404">
                <text:p>0.004100404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738.25927734375">
                <text:p>738.25927734375</text:p>
              </table:table-cell>
              <table:table-cell office:value-type="float" office:value="-0.002507671">
                <text:p>-0.002507671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738.379516601563">
                <text:p>738.379516601563</text:p>
              </table:table-cell>
              <table:table-cell office:value-type="float" office:value="0.01600073">
                <text:p>0.01600073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738.499755859375">
                <text:p>738.499755859375</text:p>
              </table:table-cell>
              <table:table-cell office:value-type="float" office:value="0.004755205">
                <text:p>0.004755205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738.620056152344">
                <text:p>738.620056152344</text:p>
              </table:table-cell>
              <table:table-cell office:value-type="float" office:value="-0.005544273">
                <text:p>-0.005544273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738.740295410156">
                <text:p>738.740295410156</text:p>
              </table:table-cell>
              <table:table-cell office:value-type="float" office:value="-0.001800725">
                <text:p>-0.001800725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738.860534667969">
                <text:p>738.860534667969</text:p>
              </table:table-cell>
              <table:table-cell office:value-type="float" office:value="-0.007070417">
                <text:p>-0.007070417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738.980773925781">
                <text:p>738.980773925781</text:p>
              </table:table-cell>
              <table:table-cell office:value-type="float" office:value="0.01223478">
                <text:p>0.01223478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739.10107421875">
                <text:p>739.10107421875</text:p>
              </table:table-cell>
              <table:table-cell office:value-type="float" office:value="-0.003577496">
                <text:p>-0.003577496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739.221313476563">
                <text:p>739.221313476563</text:p>
              </table:table-cell>
              <table:table-cell office:value-type="float" office:value="0.00774039">
                <text:p>0.00774039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739.341552734375">
                <text:p>739.341552734375</text:p>
              </table:table-cell>
              <table:table-cell office:value-type="float" office:value="-0.0002107702">
                <text:p>-0.0002107702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739.461791992188">
                <text:p>739.461791992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739.582092285156">
                <text:p>739.582092285156</text:p>
              </table:table-cell>
              <table:table-cell office:value-type="float" office:value="-0.004979913">
                <text:p>-0.004979913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739.702331542969">
                <text:p>739.702331542969</text:p>
              </table:table-cell>
              <table:table-cell office:value-type="float" office:value="-0.01127071">
                <text:p>-0.01127071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739.822570800781">
                <text:p>739.822570800781</text:p>
              </table:table-cell>
              <table:table-cell office:value-type="float" office:value="-0.004090992">
                <text:p>-0.004090992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739.942810058594">
                <text:p>739.942810058594</text:p>
              </table:table-cell>
              <table:table-cell office:value-type="float" office:value="-0.0113537">
                <text:p>-0.0113537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740.063110351563">
                <text:p>740.063110351563</text:p>
              </table:table-cell>
              <table:table-cell office:value-type="float" office:value="-0.005569329">
                <text:p>-0.005569329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740.183349609375">
                <text:p>740.183349609375</text:p>
              </table:table-cell>
              <table:table-cell office:value-type="float" office:value="-0.004157092">
                <text:p>-0.004157092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740.303588867188">
                <text:p>740.303588867188</text:p>
              </table:table-cell>
              <table:table-cell office:value-type="float" office:value="-0.002277307">
                <text:p>-0.002277307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40.423889160156">
                <text:p>740.423889160156</text:p>
              </table:table-cell>
              <table:table-cell office:value-type="float" office:value="0.009273239">
                <text:p>0.009273239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40.544128417969">
                <text:p>740.544128417969</text:p>
              </table:table-cell>
              <table:table-cell office:value-type="float" office:value="0.01414009">
                <text:p>0.01414009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740.664367675781">
                <text:p>740.664367675781</text:p>
              </table:table-cell>
              <table:table-cell office:value-type="float" office:value="-0.009240786">
                <text:p>-0.009240786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740.784606933594">
                <text:p>740.784606933594</text:p>
              </table:table-cell>
              <table:table-cell office:value-type="float" office:value="0.008067625">
                <text:p>0.008067625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740.904907226563">
                <text:p>740.904907226563</text:p>
              </table:table-cell>
              <table:table-cell office:value-type="float" office:value="0.0001618248">
                <text:p>0.0001618248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741.025146484375">
                <text:p>741.025146484375</text:p>
              </table:table-cell>
              <table:table-cell office:value-type="float" office:value="-0.008044597">
                <text:p>-0.008044597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741.145385742188">
                <text:p>741.145385742188</text:p>
              </table:table-cell>
              <table:table-cell office:value-type="float" office:value="-0.006233589">
                <text:p>-0.006233589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741.265625">
                <text:p>741.265625</text:p>
              </table:table-cell>
              <table:table-cell office:value-type="float" office:value="0.02448891">
                <text:p>0.02448891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741.385925292969">
                <text:p>741.385925292969</text:p>
              </table:table-cell>
              <table:table-cell office:value-type="float" office:value="-0.007603536">
                <text:p>-0.007603536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741.506164550781">
                <text:p>741.506164550781</text:p>
              </table:table-cell>
              <table:table-cell office:value-type="float" office:value="-0.0005487578">
                <text:p>-0.0005487578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741.626403808594">
                <text:p>741.626403808594</text:p>
              </table:table-cell>
              <table:table-cell office:value-type="float" office:value="0.009978903">
                <text:p>0.009978903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741.746704101563">
                <text:p>741.746704101563</text:p>
              </table:table-cell>
              <table:table-cell office:value-type="float" office:value="-0.0009998402">
                <text:p>-0.0009998402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741.866943359375">
                <text:p>741.866943359375</text:p>
              </table:table-cell>
              <table:table-cell office:value-type="float" office:value="0.01906606">
                <text:p>0.01906606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741.987182617188">
                <text:p>741.987182617188</text:p>
              </table:table-cell>
              <table:table-cell office:value-type="float" office:value="-0.003990329">
                <text:p>-0.003990329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742.107421875">
                <text:p>742.107421875</text:p>
              </table:table-cell>
              <table:table-cell office:value-type="float" office:value="0.005675144">
                <text:p>0.005675144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742.227722167969">
                <text:p>742.227722167969</text:p>
              </table:table-cell>
              <table:table-cell office:value-type="float" office:value="0.007566161">
                <text:p>0.007566161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742.347961425781">
                <text:p>742.347961425781</text:p>
              </table:table-cell>
              <table:table-cell office:value-type="float" office:value="0.001958368">
                <text:p>0.001958368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742.468200683594">
                <text:p>742.468200683594</text:p>
              </table:table-cell>
              <table:table-cell office:value-type="float" office:value="-0.007165482">
                <text:p>-0.007165482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742.588439941406">
                <text:p>742.588439941406</text:p>
              </table:table-cell>
              <table:table-cell office:value-type="float" office:value="-0.001095809">
                <text:p>-0.001095809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742.708740234375">
                <text:p>742.708740234375</text:p>
              </table:table-cell>
              <table:table-cell office:value-type="float" office:value="-0.002571366">
                <text:p>-0.002571366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742.828979492188">
                <text:p>742.828979492188</text:p>
              </table:table-cell>
              <table:table-cell office:value-type="float" office:value="-0.004683041">
                <text:p>-0.004683041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742.94921875">
                <text:p>742.94921875</text:p>
              </table:table-cell>
              <table:table-cell office:value-type="float" office:value="0.004198">
                <text:p>0.004198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743.069519042969">
                <text:p>743.069519042969</text:p>
              </table:table-cell>
              <table:table-cell office:value-type="float" office:value="0.01330531">
                <text:p>0.01330531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743.189758300781">
                <text:p>743.189758300781</text:p>
              </table:table-cell>
              <table:table-cell office:value-type="float" office:value="0.0001039733">
                <text:p>0.0001039733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743.309997558594">
                <text:p>743.309997558594</text:p>
              </table:table-cell>
              <table:table-cell office:value-type="float" office:value="-0.0117304">
                <text:p>-0.0117304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743.430236816406">
                <text:p>743.430236816406</text:p>
              </table:table-cell>
              <table:table-cell office:value-type="float" office:value="0.002884467">
                <text:p>0.002884467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743.550537109375">
                <text:p>743.550537109375</text:p>
              </table:table-cell>
              <table:table-cell office:value-type="float" office:value="-0.009619131">
                <text:p>-0.009619131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743.670776367188">
                <text:p>743.670776367188</text:p>
              </table:table-cell>
              <table:table-cell office:value-type="float" office:value="-0.007639721">
                <text:p>-0.007639721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743.791015625">
                <text:p>743.791015625</text:p>
              </table:table-cell>
              <table:table-cell office:value-type="float" office:value="-0.007924575">
                <text:p>-0.007924575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743.911254882813">
                <text:p>743.911254882813</text:p>
              </table:table-cell>
              <table:table-cell office:value-type="float" office:value="0.03345027">
                <text:p>0.03345027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744.031555175781">
                <text:p>744.031555175781</text:p>
              </table:table-cell>
              <table:table-cell office:value-type="float" office:value="-0.008642629">
                <text:p>-0.008642629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744.151794433594">
                <text:p>744.151794433594</text:p>
              </table:table-cell>
              <table:table-cell office:value-type="float" office:value="-0.06017993">
                <text:p>-0.06017993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744.272033691406">
                <text:p>744.272033691406</text:p>
              </table:table-cell>
              <table:table-cell office:value-type="float" office:value="-0.06122516">
                <text:p>-0.06122516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744.392333984375">
                <text:p>744.392333984375</text:p>
              </table:table-cell>
              <table:table-cell office:value-type="float" office:value="-0.06361131">
                <text:p>-0.06361131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744.512573242188">
                <text:p>744.512573242188</text:p>
              </table:table-cell>
              <table:table-cell office:value-type="float" office:value="-0.06356826">
                <text:p>-0.06356826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744.6328125">
                <text:p>744.6328125</text:p>
              </table:table-cell>
              <table:table-cell office:value-type="float" office:value="-0.06405681">
                <text:p>-0.06405681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744.753051757813">
                <text:p>744.753051757813</text:p>
              </table:table-cell>
              <table:table-cell office:value-type="float" office:value="-0.06395926">
                <text:p>-0.06395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