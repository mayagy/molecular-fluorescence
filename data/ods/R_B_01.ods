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 [nm (air)]</text:p>
          </table:table-cell>
          <table:table-cell office:value-type="string">
            <text:p>Y [Intensity]</text:p>
          </table:table-cell>
          <table:table-cell table:number-columns-repeated="4"/>
        </table:table-row>
        <table:table-row table:style-name="ro1">
          <table:table-cell office:value-type="float" office:value="321.5908203125">
            <text:p>321.5908203125</text:p>
          </table:table-cell>
          <table:table-cell office:value-type="float" office:value="0.005212234">
            <text:p>0.005212234</text:p>
          </table:table-cell>
          <table:table-cell table:number-columns-repeated="4"/>
        </table:table-row>
        <table:table-row table:style-name="ro1">
          <table:table-cell office:value-type="float" office:value="321.698333740234">
            <text:p>321.6983337402</text:p>
          </table:table-cell>
          <table:table-cell office:value-type="float" office:value="0.00115659">
            <text:p>0.00115659</text:p>
          </table:table-cell>
          <table:table-cell table:number-columns-repeated="3"/>
          <table:table-cell>
            <draw:frame table:end-cell-address="Sheet1.M23" table:end-x="0.7083in" table:end-y="0.1417in" draw:z-index="0" draw:style-name="gr1" draw:text-style-name="P1" svg:width="6.2988in" svg:height="3.5429in" svg:x="0.6327in" svg:y="0.1547in">
              <draw:object draw:notify-on-update-of-ranges="Sheet1.A1:Sheet1.A1 Sheet1.A2:Sheet1.A3649 Sheet1.B1:Sheet1.B1 Sheet1.B2:Sheet1.B36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1.805877685547">
            <text:p>321.8058776855</text:p>
          </table:table-cell>
          <table:table-cell office:value-type="float" office:value="0.003243573">
            <text:p>0.003243573</text:p>
          </table:table-cell>
          <table:table-cell table:number-columns-repeated="4"/>
        </table:table-row>
        <table:table-row table:style-name="ro1">
          <table:table-cell office:value-type="float" office:value="321.913421630859">
            <text:p>321.9134216309</text:p>
          </table:table-cell>
          <table:table-cell office:value-type="float" office:value="0.01145807">
            <text:p>0.01145807</text:p>
          </table:table-cell>
          <table:table-cell table:number-columns-repeated="4"/>
        </table:table-row>
        <table:table-row table:style-name="ro1">
          <table:table-cell office:value-type="float" office:value="322.020965576172">
            <text:p>322.0209655762</text:p>
          </table:table-cell>
          <table:table-cell office:value-type="float" office:value="0.006331592">
            <text:p>0.006331592</text:p>
          </table:table-cell>
          <table:table-cell table:number-columns-repeated="4"/>
        </table:table-row>
        <table:table-row table:style-name="ro1">
          <table:table-cell office:value-type="float" office:value="322.128540039063">
            <text:p>322.1285400391</text:p>
          </table:table-cell>
          <table:table-cell office:value-type="float" office:value="0.004813194">
            <text:p>0.004813194</text:p>
          </table:table-cell>
          <table:table-cell table:number-columns-repeated="4"/>
        </table:table-row>
        <table:table-row table:style-name="ro1">
          <table:table-cell office:value-type="float" office:value="322.236083984375">
            <text:p>322.2360839844</text:p>
          </table:table-cell>
          <table:table-cell office:value-type="float" office:value="0.01629797">
            <text:p>0.01629797</text:p>
          </table:table-cell>
          <table:table-cell table:number-columns-repeated="4"/>
        </table:table-row>
        <table:table-row table:style-name="ro1">
          <table:table-cell office:value-type="float" office:value="322.343658447266">
            <text:p>322.3436584473</text:p>
          </table:table-cell>
          <table:table-cell office:value-type="float" office:value="-0.001738467">
            <text:p>-0.001738467</text:p>
          </table:table-cell>
          <table:table-cell table:number-columns-repeated="4"/>
        </table:table-row>
        <table:table-row table:style-name="ro1">
          <table:table-cell office:value-type="float" office:value="322.451232910156">
            <text:p>322.4512329102</text:p>
          </table:table-cell>
          <table:table-cell office:value-type="string">
            <text:p>6.807248E-05</text:p>
          </table:table-cell>
          <table:table-cell table:number-columns-repeated="4"/>
        </table:table-row>
        <table:table-row table:style-name="ro1">
          <table:table-cell office:value-type="float" office:value="322.558837890625">
            <text:p>322.5588378906</text:p>
          </table:table-cell>
          <table:table-cell office:value-type="float" office:value="0.006274268">
            <text:p>0.006274268</text:p>
          </table:table-cell>
          <table:table-cell table:number-columns-repeated="4"/>
        </table:table-row>
        <table:table-row table:style-name="ro1">
          <table:table-cell office:value-type="float" office:value="322.666412353516">
            <text:p>322.6664123535</text:p>
          </table:table-cell>
          <table:table-cell office:value-type="float" office:value="0.008973436">
            <text:p>0.008973436</text:p>
          </table:table-cell>
          <table:table-cell table:number-columns-repeated="4"/>
        </table:table-row>
        <table:table-row table:style-name="ro1">
          <table:table-cell office:value-type="float" office:value="322.774017333984">
            <text:p>322.774017334</text:p>
          </table:table-cell>
          <table:table-cell office:value-type="float" office:value="0.01125534">
            <text:p>0.01125534</text:p>
          </table:table-cell>
          <table:table-cell table:number-columns-repeated="4"/>
        </table:table-row>
        <table:table-row table:style-name="ro1">
          <table:table-cell office:value-type="float" office:value="322.881622314453">
            <text:p>322.8816223145</text:p>
          </table:table-cell>
          <table:table-cell office:value-type="float" office:value="-0.00298038">
            <text:p>-0.00298038</text:p>
          </table:table-cell>
          <table:table-cell table:number-columns-repeated="4"/>
        </table:table-row>
        <table:table-row table:style-name="ro1">
          <table:table-cell office:value-type="float" office:value="322.989227294922">
            <text:p>322.9892272949</text:p>
          </table:table-cell>
          <table:table-cell office:value-type="float" office:value="0.003490729">
            <text:p>0.003490729</text:p>
          </table:table-cell>
          <table:table-cell table:number-columns-repeated="4"/>
        </table:table-row>
        <table:table-row table:style-name="ro1">
          <table:table-cell office:value-type="float" office:value="323.096862792969">
            <text:p>323.096862793</text:p>
          </table:table-cell>
          <table:table-cell office:value-type="float" office:value="0.001533429">
            <text:p>0.001533429</text:p>
          </table:table-cell>
          <table:table-cell table:number-columns-repeated="4"/>
        </table:table-row>
        <table:table-row table:style-name="ro1">
          <table:table-cell office:value-type="float" office:value="323.204498291016">
            <text:p>323.204498291</text:p>
          </table:table-cell>
          <table:table-cell office:value-type="float" office:value="0.00669343">
            <text:p>0.00669343</text:p>
          </table:table-cell>
          <table:table-cell table:number-columns-repeated="4"/>
        </table:table-row>
        <table:table-row table:style-name="ro1">
          <table:table-cell office:value-type="float" office:value="323.312133789063">
            <text:p>323.3121337891</text:p>
          </table:table-cell>
          <table:table-cell office:value-type="float" office:value="-0.00160456">
            <text:p>-0.00160456</text:p>
          </table:table-cell>
          <table:table-cell table:number-columns-repeated="4"/>
        </table:table-row>
        <table:table-row table:style-name="ro1">
          <table:table-cell office:value-type="float" office:value="323.419769287109">
            <text:p>323.4197692871</text:p>
          </table:table-cell>
          <table:table-cell office:value-type="float" office:value="0.003550855">
            <text:p>0.003550855</text:p>
          </table:table-cell>
          <table:table-cell table:number-columns-repeated="4"/>
        </table:table-row>
        <table:table-row table:style-name="ro1">
          <table:table-cell office:value-type="float" office:value="323.527404785156">
            <text:p>323.5274047852</text:p>
          </table:table-cell>
          <table:table-cell office:value-type="float" office:value="0.03704138">
            <text:p>0.03704138</text:p>
          </table:table-cell>
          <table:table-cell table:number-columns-repeated="4"/>
        </table:table-row>
        <table:table-row table:style-name="ro1">
          <table:table-cell office:value-type="float" office:value="323.635070800781">
            <text:p>323.6350708008</text:p>
          </table:table-cell>
          <table:table-cell office:value-type="float" office:value="-0.006448764">
            <text:p>-0.006448764</text:p>
          </table:table-cell>
          <table:table-cell table:number-columns-repeated="4"/>
        </table:table-row>
        <table:table-row table:style-name="ro1">
          <table:table-cell office:value-type="float" office:value="323.742736816406">
            <text:p>323.7427368164</text:p>
          </table:table-cell>
          <table:table-cell office:value-type="float" office:value="-0.004230672">
            <text:p>-0.004230672</text:p>
          </table:table-cell>
          <table:table-cell table:number-columns-repeated="4"/>
        </table:table-row>
        <table:table-row table:style-name="ro1">
          <table:table-cell office:value-type="float" office:value="323.850402832031">
            <text:p>323.850402832</text:p>
          </table:table-cell>
          <table:table-cell office:value-type="float" office:value="0.01142329">
            <text:p>0.01142329</text:p>
          </table:table-cell>
          <table:table-cell table:number-columns-repeated="4"/>
        </table:table-row>
        <table:table-row table:style-name="ro1">
          <table:table-cell office:value-type="float" office:value="323.958068847656">
            <text:p>323.9580688477</text:p>
          </table:table-cell>
          <table:table-cell office:value-type="float" office:value="0.01782057">
            <text:p>0.01782057</text:p>
          </table:table-cell>
          <table:table-cell table:number-columns-repeated="4"/>
        </table:table-row>
        <table:table-row table:style-name="ro1">
          <table:table-cell office:value-type="float" office:value="324.065765380859">
            <text:p>324.0657653809</text:p>
          </table:table-cell>
          <table:table-cell office:value-type="float" office:value="-0.002020303">
            <text:p>-0.002020303</text:p>
          </table:table-cell>
          <table:table-cell table:number-columns-repeated="4"/>
        </table:table-row>
        <table:table-row table:style-name="ro1">
          <table:table-cell office:value-type="float" office:value="324.173461914063">
            <text:p>324.1734619141</text:p>
          </table:table-cell>
          <table:table-cell office:value-type="float" office:value="-0.005955962">
            <text:p>-0.005955962</text:p>
          </table:table-cell>
          <table:table-cell table:number-columns-repeated="4"/>
        </table:table-row>
        <table:table-row table:style-name="ro1">
          <table:table-cell office:value-type="float" office:value="324.281158447266">
            <text:p>324.2811584473</text:p>
          </table:table-cell>
          <table:table-cell office:value-type="float" office:value="0.004274735">
            <text:p>0.004274735</text:p>
          </table:table-cell>
          <table:table-cell table:number-columns-repeated="4"/>
        </table:table-row>
        <table:table-row table:style-name="ro1">
          <table:table-cell office:value-type="float" office:value="324.388854980469">
            <text:p>324.3888549805</text:p>
          </table:table-cell>
          <table:table-cell office:value-type="float" office:value="-0.00371813">
            <text:p>-0.00371813</text:p>
          </table:table-cell>
          <table:table-cell table:number-columns-repeated="4"/>
        </table:table-row>
        <table:table-row table:style-name="ro1">
          <table:table-cell office:value-type="float" office:value="324.496551513672">
            <text:p>324.4965515137</text:p>
          </table:table-cell>
          <table:table-cell office:value-type="float" office:value="0.002131953">
            <text:p>0.002131953</text:p>
          </table:table-cell>
          <table:table-cell table:number-columns-repeated="4"/>
        </table:table-row>
        <table:table-row table:style-name="ro1">
          <table:table-cell office:value-type="float" office:value="324.604278564453">
            <text:p>324.6042785645</text:p>
          </table:table-cell>
          <table:table-cell office:value-type="float" office:value="0.007089259">
            <text:p>0.007089259</text:p>
          </table:table-cell>
          <table:table-cell table:number-columns-repeated="4"/>
        </table:table-row>
        <table:table-row table:style-name="ro1">
          <table:table-cell office:value-type="float" office:value="324.712005615234">
            <text:p>324.7120056152</text:p>
          </table:table-cell>
          <table:table-cell office:value-type="float" office:value="0.00324699">
            <text:p>0.00324699</text:p>
          </table:table-cell>
          <table:table-cell table:number-columns-repeated="4"/>
        </table:table-row>
        <table:table-row table:style-name="ro1">
          <table:table-cell office:value-type="float" office:value="324.819732666016">
            <text:p>324.819732666</text:p>
          </table:table-cell>
          <table:table-cell office:value-type="float" office:value="0.001323177">
            <text:p>0.001323177</text:p>
          </table:table-cell>
          <table:table-cell table:number-columns-repeated="4"/>
        </table:table-row>
        <table:table-row table:style-name="ro1">
          <table:table-cell office:value-type="float" office:value="324.927490234375">
            <text:p>324.9274902344</text:p>
          </table:table-cell>
          <table:table-cell office:value-type="float" office:value="0.01596894">
            <text:p>0.01596894</text:p>
          </table:table-cell>
          <table:table-cell table:number-columns-repeated="4"/>
        </table:table-row>
        <table:table-row table:style-name="ro1">
          <table:table-cell office:value-type="float" office:value="325.035217285156">
            <text:p>325.0352172852</text:p>
          </table:table-cell>
          <table:table-cell office:value-type="float" office:value="-0.007365465">
            <text:p>-0.007365465</text:p>
          </table:table-cell>
          <table:table-cell table:number-columns-repeated="4"/>
        </table:table-row>
        <table:table-row table:style-name="ro1">
          <table:table-cell office:value-type="float" office:value="325.142974853516">
            <text:p>325.1429748535</text:p>
          </table:table-cell>
          <table:table-cell office:value-type="float" office:value="0.001530671">
            <text:p>0.001530671</text:p>
          </table:table-cell>
          <table:table-cell table:number-columns-repeated="4"/>
        </table:table-row>
        <table:table-row table:style-name="ro1">
          <table:table-cell office:value-type="float" office:value="325.250732421875">
            <text:p>325.2507324219</text:p>
          </table:table-cell>
          <table:table-cell office:value-type="float" office:value="0.0008522327">
            <text:p>0.0008522327</text:p>
          </table:table-cell>
          <table:table-cell table:number-columns-repeated="4"/>
        </table:table-row>
        <table:table-row table:style-name="ro1">
          <table:table-cell office:value-type="float" office:value="325.358489990234">
            <text:p>325.3584899902</text:p>
          </table:table-cell>
          <table:table-cell office:value-type="float" office:value="-0.0033719">
            <text:p>-0.0033719</text:p>
          </table:table-cell>
          <table:table-cell table:number-columns-repeated="4"/>
        </table:table-row>
        <table:table-row table:style-name="ro1">
          <table:table-cell office:value-type="float" office:value="325.466278076172">
            <text:p>325.4662780762</text:p>
          </table:table-cell>
          <table:table-cell office:value-type="float" office:value="0.003152006">
            <text:p>0.003152006</text:p>
          </table:table-cell>
          <table:table-cell table:number-columns-repeated="4"/>
        </table:table-row>
        <table:table-row table:style-name="ro1">
          <table:table-cell office:value-type="float" office:value="325.574066162109">
            <text:p>325.5740661621</text:p>
          </table:table-cell>
          <table:table-cell office:value-type="float" office:value="0.004856593">
            <text:p>0.004856593</text:p>
          </table:table-cell>
          <table:table-cell table:number-columns-repeated="4"/>
        </table:table-row>
        <table:table-row table:style-name="ro1">
          <table:table-cell office:value-type="float" office:value="325.681854248047">
            <text:p>325.681854248</text:p>
          </table:table-cell>
          <table:table-cell office:value-type="float" office:value="0.003876512">
            <text:p>0.003876512</text:p>
          </table:table-cell>
          <table:table-cell table:number-columns-repeated="4"/>
        </table:table-row>
        <table:table-row table:style-name="ro1">
          <table:table-cell office:value-type="float" office:value="325.789642333984">
            <text:p>325.789642334</text:p>
          </table:table-cell>
          <table:table-cell office:value-type="float" office:value="0.005464093">
            <text:p>0.005464093</text:p>
          </table:table-cell>
          <table:table-cell table:number-columns-repeated="4"/>
        </table:table-row>
        <table:table-row table:style-name="ro1">
          <table:table-cell office:value-type="float" office:value="325.897430419922">
            <text:p>325.8974304199</text:p>
          </table:table-cell>
          <table:table-cell office:value-type="float" office:value="0.002539601">
            <text:p>0.002539601</text:p>
          </table:table-cell>
          <table:table-cell table:number-columns-repeated="4"/>
        </table:table-row>
        <table:table-row table:style-name="ro1">
          <table:table-cell office:value-type="float" office:value="326.005249023438">
            <text:p>326.0052490234</text:p>
          </table:table-cell>
          <table:table-cell office:value-type="float" office:value="0.001710856">
            <text:p>0.001710856</text:p>
          </table:table-cell>
          <table:table-cell table:number-columns-repeated="4"/>
        </table:table-row>
        <table:table-row table:style-name="ro1">
          <table:table-cell office:value-type="float" office:value="326.113067626953">
            <text:p>326.113067627</text:p>
          </table:table-cell>
          <table:table-cell office:value-type="float" office:value="0.007805158">
            <text:p>0.007805158</text:p>
          </table:table-cell>
          <table:table-cell table:number-columns-repeated="4"/>
        </table:table-row>
        <table:table-row table:style-name="ro1">
          <table:table-cell office:value-type="float" office:value="326.220886230469">
            <text:p>326.2208862305</text:p>
          </table:table-cell>
          <table:table-cell office:value-type="float" office:value="0.01534442">
            <text:p>0.01534442</text:p>
          </table:table-cell>
          <table:table-cell table:number-columns-repeated="4"/>
        </table:table-row>
        <table:table-row table:style-name="ro1">
          <table:table-cell office:value-type="float" office:value="326.328704833984">
            <text:p>326.328704834</text:p>
          </table:table-cell>
          <table:table-cell office:value-type="float" office:value="-0.004527873">
            <text:p>-0.004527873</text:p>
          </table:table-cell>
          <table:table-cell table:number-columns-repeated="4"/>
        </table:table-row>
        <table:table-row table:style-name="ro1">
          <table:table-cell office:value-type="float" office:value="326.436553955078">
            <text:p>326.4365539551</text:p>
          </table:table-cell>
          <table:table-cell office:value-type="float" office:value="0.007985528">
            <text:p>0.007985528</text:p>
          </table:table-cell>
          <table:table-cell table:number-columns-repeated="4"/>
        </table:table-row>
        <table:table-row table:style-name="ro1">
          <table:table-cell office:value-type="float" office:value="326.544403076172">
            <text:p>326.5444030762</text:p>
          </table:table-cell>
          <table:table-cell office:value-type="float" office:value="0.02228499">
            <text:p>0.02228499</text:p>
          </table:table-cell>
          <table:table-cell table:number-columns-repeated="4"/>
        </table:table-row>
        <table:table-row table:style-name="ro1">
          <table:table-cell office:value-type="float" office:value="326.652252197266">
            <text:p>326.6522521973</text:p>
          </table:table-cell>
          <table:table-cell office:value-type="float" office:value="0.01681977">
            <text:p>0.01681977</text:p>
          </table:table-cell>
          <table:table-cell table:number-columns-repeated="4"/>
        </table:table-row>
        <table:table-row table:style-name="ro1">
          <table:table-cell office:value-type="float" office:value="326.760101318359">
            <text:p>326.7601013184</text:p>
          </table:table-cell>
          <table:table-cell office:value-type="float" office:value="0.005135227">
            <text:p>0.005135227</text:p>
          </table:table-cell>
          <table:table-cell table:number-columns-repeated="4"/>
        </table:table-row>
        <table:table-row table:style-name="ro1">
          <table:table-cell office:value-type="float" office:value="326.867950439453">
            <text:p>326.8679504395</text:p>
          </table:table-cell>
          <table:table-cell office:value-type="float" office:value="0.009542903">
            <text:p>0.009542903</text:p>
          </table:table-cell>
          <table:table-cell table:number-columns-repeated="4"/>
        </table:table-row>
        <table:table-row table:style-name="ro1">
          <table:table-cell office:value-type="float" office:value="326.975830078125">
            <text:p>326.9758300781</text:p>
          </table:table-cell>
          <table:table-cell office:value-type="float" office:value="0.004244313">
            <text:p>0.004244313</text:p>
          </table:table-cell>
          <table:table-cell table:number-columns-repeated="4"/>
        </table:table-row>
        <table:table-row table:style-name="ro1">
          <table:table-cell office:value-type="float" office:value="327.083709716797">
            <text:p>327.0837097168</text:p>
          </table:table-cell>
          <table:table-cell office:value-type="float" office:value="0.00739447">
            <text:p>0.00739447</text:p>
          </table:table-cell>
          <table:table-cell table:number-columns-repeated="4"/>
        </table:table-row>
        <table:table-row table:style-name="ro1">
          <table:table-cell office:value-type="float" office:value="327.191589355469">
            <text:p>327.1915893555</text:p>
          </table:table-cell>
          <table:table-cell office:value-type="float" office:value="-0.001396103">
            <text:p>-0.001396103</text:p>
          </table:table-cell>
          <table:table-cell table:number-columns-repeated="4"/>
        </table:table-row>
        <table:table-row table:style-name="ro1">
          <table:table-cell office:value-type="float" office:value="327.299499511719">
            <text:p>327.2994995117</text:p>
          </table:table-cell>
          <table:table-cell office:value-type="float" office:value="0.005180408">
            <text:p>0.005180408</text:p>
          </table:table-cell>
          <table:table-cell table:number-columns-repeated="4"/>
        </table:table-row>
        <table:table-row table:style-name="ro1">
          <table:table-cell office:value-type="float" office:value="327.407379150391">
            <text:p>327.4073791504</text:p>
          </table:table-cell>
          <table:table-cell office:value-type="float" office:value="0.01908247">
            <text:p>0.01908247</text:p>
          </table:table-cell>
          <table:table-cell table:number-columns-repeated="4"/>
        </table:table-row>
        <table:table-row table:style-name="ro1">
          <table:table-cell office:value-type="float" office:value="327.515289306641">
            <text:p>327.5152893066</text:p>
          </table:table-cell>
          <table:table-cell office:value-type="float" office:value="-0.002485394">
            <text:p>-0.002485394</text:p>
          </table:table-cell>
          <table:table-cell table:number-columns-repeated="4"/>
        </table:table-row>
        <table:table-row table:style-name="ro1">
          <table:table-cell office:value-type="float" office:value="327.623199462891">
            <text:p>327.6231994629</text:p>
          </table:table-cell>
          <table:table-cell office:value-type="float" office:value="0.008415091">
            <text:p>0.008415091</text:p>
          </table:table-cell>
          <table:table-cell table:number-columns-repeated="4"/>
        </table:table-row>
        <table:table-row table:style-name="ro1">
          <table:table-cell office:value-type="float" office:value="327.731109619141">
            <text:p>327.7311096191</text:p>
          </table:table-cell>
          <table:table-cell office:value-type="float" office:value="-0.00223547">
            <text:p>-0.00223547</text:p>
          </table:table-cell>
          <table:table-cell table:number-columns-repeated="4"/>
        </table:table-row>
        <table:table-row table:style-name="ro1">
          <table:table-cell office:value-type="float" office:value="327.839050292969">
            <text:p>327.839050293</text:p>
          </table:table-cell>
          <table:table-cell office:value-type="float" office:value="-0.006270499">
            <text:p>-0.006270499</text:p>
          </table:table-cell>
          <table:table-cell table:number-columns-repeated="4"/>
        </table:table-row>
        <table:table-row table:style-name="ro1">
          <table:table-cell office:value-type="float" office:value="327.946990966797">
            <text:p>327.9469909668</text:p>
          </table:table-cell>
          <table:table-cell office:value-type="float" office:value="-0.0003960514">
            <text:p>-0.0003960514</text:p>
          </table:table-cell>
          <table:table-cell table:number-columns-repeated="4"/>
        </table:table-row>
        <table:table-row table:style-name="ro1">
          <table:table-cell office:value-type="float" office:value="328.054931640625">
            <text:p>328.0549316406</text:p>
          </table:table-cell>
          <table:table-cell office:value-type="float" office:value="0.003320084">
            <text:p>0.003320084</text:p>
          </table:table-cell>
          <table:table-cell table:number-columns-repeated="4"/>
        </table:table-row>
        <table:table-row table:style-name="ro1">
          <table:table-cell office:value-type="float" office:value="328.162872314453">
            <text:p>328.1628723145</text:p>
          </table:table-cell>
          <table:table-cell office:value-type="float" office:value="0.005921789">
            <text:p>0.005921789</text:p>
          </table:table-cell>
          <table:table-cell table:number-columns-repeated="4"/>
        </table:table-row>
        <table:table-row table:style-name="ro1">
          <table:table-cell office:value-type="float" office:value="328.270812988281">
            <text:p>328.2708129883</text:p>
          </table:table-cell>
          <table:table-cell office:value-type="float" office:value="-0.003329551">
            <text:p>-0.003329551</text:p>
          </table:table-cell>
          <table:table-cell table:number-columns-repeated="4"/>
        </table:table-row>
        <table:table-row table:style-name="ro1">
          <table:table-cell office:value-type="float" office:value="328.378784179688">
            <text:p>328.3787841797</text:p>
          </table:table-cell>
          <table:table-cell office:value-type="float" office:value="-0.00165147">
            <text:p>-0.00165147</text:p>
          </table:table-cell>
          <table:table-cell table:number-columns-repeated="4"/>
        </table:table-row>
        <table:table-row table:style-name="ro1">
          <table:table-cell office:value-type="float" office:value="328.486755371094">
            <text:p>328.4867553711</text:p>
          </table:table-cell>
          <table:table-cell office:value-type="float" office:value="-0.00854549">
            <text:p>-0.00854549</text:p>
          </table:table-cell>
          <table:table-cell table:number-columns-repeated="4"/>
        </table:table-row>
        <table:table-row table:style-name="ro1">
          <table:table-cell office:value-type="float" office:value="328.5947265625">
            <text:p>328.5947265625</text:p>
          </table:table-cell>
          <table:table-cell office:value-type="float" office:value="0.002535154">
            <text:p>0.002535154</text:p>
          </table:table-cell>
          <table:table-cell table:number-columns-repeated="4"/>
        </table:table-row>
        <table:table-row table:style-name="ro1">
          <table:table-cell office:value-type="float" office:value="328.702697753906">
            <text:p>328.7026977539</text:p>
          </table:table-cell>
          <table:table-cell office:value-type="float" office:value="0.02165887">
            <text:p>0.02165887</text:p>
          </table:table-cell>
          <table:table-cell table:number-columns-repeated="4"/>
        </table:table-row>
        <table:table-row table:style-name="ro1">
          <table:table-cell office:value-type="float" office:value="328.810699462891">
            <text:p>328.8106994629</text:p>
          </table:table-cell>
          <table:table-cell office:value-type="float" office:value="0.001118528">
            <text:p>0.001118528</text:p>
          </table:table-cell>
          <table:table-cell table:number-columns-repeated="4"/>
        </table:table-row>
        <table:table-row table:style-name="ro1">
          <table:table-cell office:value-type="float" office:value="328.918670654297">
            <text:p>328.9186706543</text:p>
          </table:table-cell>
          <table:table-cell office:value-type="float" office:value="0.007155646">
            <text:p>0.007155646</text:p>
          </table:table-cell>
          <table:table-cell table:number-columns-repeated="4"/>
        </table:table-row>
        <table:table-row table:style-name="ro1">
          <table:table-cell office:value-type="float" office:value="329.026672363281">
            <text:p>329.0266723633</text:p>
          </table:table-cell>
          <table:table-cell office:value-type="float" office:value="0.008688378">
            <text:p>0.008688378</text:p>
          </table:table-cell>
          <table:table-cell table:number-columns-repeated="4"/>
        </table:table-row>
        <table:table-row table:style-name="ro1">
          <table:table-cell office:value-type="float" office:value="329.134704589844">
            <text:p>329.1347045898</text:p>
          </table:table-cell>
          <table:table-cell office:value-type="float" office:value="0.01697955">
            <text:p>0.01697955</text:p>
          </table:table-cell>
          <table:table-cell table:number-columns-repeated="4"/>
        </table:table-row>
        <table:table-row table:style-name="ro1">
          <table:table-cell office:value-type="float" office:value="329.242706298828">
            <text:p>329.2427062988</text:p>
          </table:table-cell>
          <table:table-cell office:value-type="float" office:value="-0.002380587">
            <text:p>-0.002380587</text:p>
          </table:table-cell>
          <table:table-cell table:number-columns-repeated="4"/>
        </table:table-row>
        <table:table-row table:style-name="ro1">
          <table:table-cell office:value-type="float" office:value="329.350738525391">
            <text:p>329.3507385254</text:p>
          </table:table-cell>
          <table:table-cell office:value-type="float" office:value="-0.002903507">
            <text:p>-0.002903507</text:p>
          </table:table-cell>
          <table:table-cell table:number-columns-repeated="4"/>
        </table:table-row>
        <table:table-row table:style-name="ro1">
          <table:table-cell office:value-type="float" office:value="329.458770751953">
            <text:p>329.458770752</text:p>
          </table:table-cell>
          <table:table-cell office:value-type="float" office:value="0.001744048">
            <text:p>0.001744048</text:p>
          </table:table-cell>
          <table:table-cell table:number-columns-repeated="4"/>
        </table:table-row>
        <table:table-row table:style-name="ro1">
          <table:table-cell office:value-type="float" office:value="329.566802978516">
            <text:p>329.5668029785</text:p>
          </table:table-cell>
          <table:table-cell office:value-type="float" office:value="0.003854342">
            <text:p>0.003854342</text:p>
          </table:table-cell>
          <table:table-cell table:number-columns-repeated="4"/>
        </table:table-row>
        <table:table-row table:style-name="ro1">
          <table:table-cell office:value-type="float" office:value="329.674835205078">
            <text:p>329.6748352051</text:p>
          </table:table-cell>
          <table:table-cell office:value-type="float" office:value="-0.00294069">
            <text:p>-0.00294069</text:p>
          </table:table-cell>
          <table:table-cell table:number-columns-repeated="4"/>
        </table:table-row>
        <table:table-row table:style-name="ro1">
          <table:table-cell office:value-type="float" office:value="329.782897949219">
            <text:p>329.7828979492</text:p>
          </table:table-cell>
          <table:table-cell office:value-type="float" office:value="0.008006306">
            <text:p>0.008006306</text:p>
          </table:table-cell>
          <table:table-cell table:number-columns-repeated="4"/>
        </table:table-row>
        <table:table-row table:style-name="ro1">
          <table:table-cell office:value-type="float" office:value="329.890960693359">
            <text:p>329.8909606934</text:p>
          </table:table-cell>
          <table:table-cell office:value-type="float" office:value="0.03815298">
            <text:p>0.03815298</text:p>
          </table:table-cell>
          <table:table-cell table:number-columns-repeated="4"/>
        </table:table-row>
        <table:table-row table:style-name="ro1">
          <table:table-cell office:value-type="float" office:value="329.9990234375">
            <text:p>329.9990234375</text:p>
          </table:table-cell>
          <table:table-cell office:value-type="float" office:value="0.00251658">
            <text:p>0.00251658</text:p>
          </table:table-cell>
          <table:table-cell table:number-columns-repeated="4"/>
        </table:table-row>
        <table:table-row table:style-name="ro1">
          <table:table-cell office:value-type="float" office:value="330.107086181641">
            <text:p>330.1070861816</text:p>
          </table:table-cell>
          <table:table-cell office:value-type="float" office:value="0.00144173">
            <text:p>0.00144173</text:p>
          </table:table-cell>
          <table:table-cell table:number-columns-repeated="4"/>
        </table:table-row>
        <table:table-row table:style-name="ro1">
          <table:table-cell office:value-type="float" office:value="330.215148925781">
            <text:p>330.2151489258</text:p>
          </table:table-cell>
          <table:table-cell office:value-type="float" office:value="-0.006916465">
            <text:p>-0.006916465</text:p>
          </table:table-cell>
          <table:table-cell table:number-columns-repeated="4"/>
        </table:table-row>
        <table:table-row table:style-name="ro1">
          <table:table-cell office:value-type="float" office:value="330.3232421875">
            <text:p>330.3232421875</text:p>
          </table:table-cell>
          <table:table-cell office:value-type="float" office:value="0.01597583">
            <text:p>0.01597583</text:p>
          </table:table-cell>
          <table:table-cell table:number-columns-repeated="4"/>
        </table:table-row>
        <table:table-row table:style-name="ro1">
          <table:table-cell office:value-type="float" office:value="330.431335449219">
            <text:p>330.4313354492</text:p>
          </table:table-cell>
          <table:table-cell office:value-type="float" office:value="0.008528234">
            <text:p>0.008528234</text:p>
          </table:table-cell>
          <table:table-cell table:number-columns-repeated="4"/>
        </table:table-row>
        <table:table-row table:style-name="ro1">
          <table:table-cell office:value-type="float" office:value="330.539428710938">
            <text:p>330.5394287109</text:p>
          </table:table-cell>
          <table:table-cell office:value-type="float" office:value="0.008315331">
            <text:p>0.008315331</text:p>
          </table:table-cell>
          <table:table-cell table:number-columns-repeated="4"/>
        </table:table-row>
        <table:table-row table:style-name="ro1">
          <table:table-cell office:value-type="float" office:value="330.647521972656">
            <text:p>330.6475219727</text:p>
          </table:table-cell>
          <table:table-cell office:value-type="float" office:value="-0.003622621">
            <text:p>-0.003622621</text:p>
          </table:table-cell>
          <table:table-cell table:number-columns-repeated="4"/>
        </table:table-row>
        <table:table-row table:style-name="ro1">
          <table:table-cell office:value-type="float" office:value="330.755645751953">
            <text:p>330.755645752</text:p>
          </table:table-cell>
          <table:table-cell office:value-type="float" office:value="0.005161009">
            <text:p>0.005161009</text:p>
          </table:table-cell>
          <table:table-cell table:number-columns-repeated="4"/>
        </table:table-row>
        <table:table-row table:style-name="ro1">
          <table:table-cell office:value-type="float" office:value="330.86376953125">
            <text:p>330.8637695313</text:p>
          </table:table-cell>
          <table:table-cell office:value-type="float" office:value="0.01595779">
            <text:p>0.01595779</text:p>
          </table:table-cell>
          <table:table-cell table:number-columns-repeated="4"/>
        </table:table-row>
        <table:table-row table:style-name="ro1">
          <table:table-cell office:value-type="float" office:value="330.971893310547">
            <text:p>330.9718933105</text:p>
          </table:table-cell>
          <table:table-cell office:value-type="float" office:value="0.01113051">
            <text:p>0.01113051</text:p>
          </table:table-cell>
          <table:table-cell table:number-columns-repeated="4"/>
        </table:table-row>
        <table:table-row table:style-name="ro1">
          <table:table-cell office:value-type="float" office:value="331.080017089844">
            <text:p>331.0800170898</text:p>
          </table:table-cell>
          <table:table-cell office:value-type="float" office:value="0.0271397">
            <text:p>0.0271397</text:p>
          </table:table-cell>
          <table:table-cell table:number-columns-repeated="4"/>
        </table:table-row>
        <table:table-row table:style-name="ro1">
          <table:table-cell office:value-type="float" office:value="331.188171386719">
            <text:p>331.1881713867</text:p>
          </table:table-cell>
          <table:table-cell office:value-type="float" office:value="0.01083427">
            <text:p>0.01083427</text:p>
          </table:table-cell>
          <table:table-cell table:number-columns-repeated="4"/>
        </table:table-row>
        <table:table-row table:style-name="ro1">
          <table:table-cell office:value-type="float" office:value="331.296295166016">
            <text:p>331.296295166</text:p>
          </table:table-cell>
          <table:table-cell office:value-type="float" office:value="0.01886982">
            <text:p>0.01886982</text:p>
          </table:table-cell>
          <table:table-cell table:number-columns-repeated="4"/>
        </table:table-row>
        <table:table-row table:style-name="ro1">
          <table:table-cell office:value-type="float" office:value="331.404449462891">
            <text:p>331.4044494629</text:p>
          </table:table-cell>
          <table:table-cell office:value-type="float" office:value="-0.003431434">
            <text:p>-0.003431434</text:p>
          </table:table-cell>
          <table:table-cell table:number-columns-repeated="4"/>
        </table:table-row>
        <table:table-row table:style-name="ro1">
          <table:table-cell office:value-type="float" office:value="331.512603759766">
            <text:p>331.5126037598</text:p>
          </table:table-cell>
          <table:table-cell office:value-type="float" office:value="-0.003710333">
            <text:p>-0.003710333</text:p>
          </table:table-cell>
          <table:table-cell table:number-columns-repeated="4"/>
        </table:table-row>
        <table:table-row table:style-name="ro1">
          <table:table-cell office:value-type="float" office:value="331.620788574219">
            <text:p>331.6207885742</text:p>
          </table:table-cell>
          <table:table-cell office:value-type="float" office:value="0.003802932">
            <text:p>0.003802932</text:p>
          </table:table-cell>
          <table:table-cell table:number-columns-repeated="4"/>
        </table:table-row>
        <table:table-row table:style-name="ro1">
          <table:table-cell office:value-type="float" office:value="331.728942871094">
            <text:p>331.7289428711</text:p>
          </table:table-cell>
          <table:table-cell office:value-type="float" office:value="0.008926352">
            <text:p>0.008926352</text:p>
          </table:table-cell>
          <table:table-cell table:number-columns-repeated="4"/>
        </table:table-row>
        <table:table-row table:style-name="ro1">
          <table:table-cell office:value-type="float" office:value="331.837127685547">
            <text:p>331.8371276855</text:p>
          </table:table-cell>
          <table:table-cell office:value-type="float" office:value="-0.0007784098">
            <text:p>-0.0007784098</text:p>
          </table:table-cell>
          <table:table-cell table:number-columns-repeated="4"/>
        </table:table-row>
        <table:table-row table:style-name="ro1">
          <table:table-cell office:value-type="float" office:value="331.9453125">
            <text:p>331.9453125</text:p>
          </table:table-cell>
          <table:table-cell office:value-type="float" office:value="-0.003076675">
            <text:p>-0.003076675</text:p>
          </table:table-cell>
          <table:table-cell table:number-columns-repeated="4"/>
        </table:table-row>
        <table:table-row table:style-name="ro1">
          <table:table-cell office:value-type="float" office:value="332.053527832031">
            <text:p>332.053527832</text:p>
          </table:table-cell>
          <table:table-cell office:value-type="float" office:value="0.006510112">
            <text:p>0.006510112</text:p>
          </table:table-cell>
          <table:table-cell table:number-columns-repeated="4"/>
        </table:table-row>
        <table:table-row table:style-name="ro1">
          <table:table-cell office:value-type="float" office:value="332.161712646484">
            <text:p>332.1617126465</text:p>
          </table:table-cell>
          <table:table-cell office:value-type="float" office:value="-0.0004778146">
            <text:p>-0.0004778146</text:p>
          </table:table-cell>
          <table:table-cell table:number-columns-repeated="4"/>
        </table:table-row>
        <table:table-row table:style-name="ro1">
          <table:table-cell office:value-type="float" office:value="332.269927978516">
            <text:p>332.2699279785</text:p>
          </table:table-cell>
          <table:table-cell office:value-type="float" office:value="-0.008755307">
            <text:p>-0.008755307</text:p>
          </table:table-cell>
          <table:table-cell table:number-columns-repeated="4"/>
        </table:table-row>
        <table:table-row table:style-name="ro1">
          <table:table-cell office:value-type="float" office:value="332.378143310547">
            <text:p>332.3781433105</text:p>
          </table:table-cell>
          <table:table-cell office:value-type="float" office:value="-0.003482284">
            <text:p>-0.003482284</text:p>
          </table:table-cell>
          <table:table-cell table:number-columns-repeated="4"/>
        </table:table-row>
        <table:table-row table:style-name="ro1">
          <table:table-cell office:value-type="float" office:value="332.486358642578">
            <text:p>332.4863586426</text:p>
          </table:table-cell>
          <table:table-cell office:value-type="float" office:value="0.01899159">
            <text:p>0.01899159</text:p>
          </table:table-cell>
          <table:table-cell table:number-columns-repeated="4"/>
        </table:table-row>
        <table:table-row table:style-name="ro1">
          <table:table-cell office:value-type="float" office:value="332.594573974609">
            <text:p>332.5945739746</text:p>
          </table:table-cell>
          <table:table-cell office:value-type="float" office:value="0.01131201">
            <text:p>0.01131201</text:p>
          </table:table-cell>
          <table:table-cell table:number-columns-repeated="4"/>
        </table:table-row>
        <table:table-row table:style-name="ro1">
          <table:table-cell office:value-type="float" office:value="332.702819824219">
            <text:p>332.7028198242</text:p>
          </table:table-cell>
          <table:table-cell office:value-type="float" office:value="0.003728348">
            <text:p>0.003728348</text:p>
          </table:table-cell>
          <table:table-cell table:number-columns-repeated="4"/>
        </table:table-row>
        <table:table-row table:style-name="ro1">
          <table:table-cell office:value-type="float" office:value="332.811065673828">
            <text:p>332.8110656738</text:p>
          </table:table-cell>
          <table:table-cell office:value-type="float" office:value="-0.008705101">
            <text:p>-0.008705101</text:p>
          </table:table-cell>
          <table:table-cell table:number-columns-repeated="4"/>
        </table:table-row>
        <table:table-row table:style-name="ro1">
          <table:table-cell office:value-type="float" office:value="332.919311523438">
            <text:p>332.9193115234</text:p>
          </table:table-cell>
          <table:table-cell office:value-type="float" office:value="0.0002206033">
            <text:p>0.0002206033</text:p>
          </table:table-cell>
          <table:table-cell table:number-columns-repeated="4"/>
        </table:table-row>
        <table:table-row table:style-name="ro1">
          <table:table-cell office:value-type="float" office:value="333.027557373047">
            <text:p>333.027557373</text:p>
          </table:table-cell>
          <table:table-cell office:value-type="float" office:value="-0.0004469764">
            <text:p>-0.0004469764</text:p>
          </table:table-cell>
          <table:table-cell table:number-columns-repeated="4"/>
        </table:table-row>
        <table:table-row table:style-name="ro1">
          <table:table-cell office:value-type="float" office:value="333.135833740234">
            <text:p>333.1358337402</text:p>
          </table:table-cell>
          <table:table-cell office:value-type="float" office:value="0.005514379">
            <text:p>0.005514379</text:p>
          </table:table-cell>
          <table:table-cell table:number-columns-repeated="4"/>
        </table:table-row>
        <table:table-row table:style-name="ro1">
          <table:table-cell office:value-type="float" office:value="333.244079589844">
            <text:p>333.2440795898</text:p>
          </table:table-cell>
          <table:table-cell office:value-type="float" office:value="0.04592992">
            <text:p>0.04592992</text:p>
          </table:table-cell>
          <table:table-cell table:number-columns-repeated="4"/>
        </table:table-row>
        <table:table-row table:style-name="ro1">
          <table:table-cell office:value-type="float" office:value="333.352355957031">
            <text:p>333.352355957</text:p>
          </table:table-cell>
          <table:table-cell office:value-type="float" office:value="-0.001764965">
            <text:p>-0.001764965</text:p>
          </table:table-cell>
          <table:table-cell table:number-columns-repeated="4"/>
        </table:table-row>
        <table:table-row table:style-name="ro1">
          <table:table-cell office:value-type="float" office:value="333.460662841797">
            <text:p>333.4606628418</text:p>
          </table:table-cell>
          <table:table-cell office:value-type="float" office:value="0.002525622">
            <text:p>0.002525622</text:p>
          </table:table-cell>
          <table:table-cell table:number-columns-repeated="4"/>
        </table:table-row>
        <table:table-row table:style-name="ro1">
          <table:table-cell office:value-type="float" office:value="333.568939208984">
            <text:p>333.568939209</text:p>
          </table:table-cell>
          <table:table-cell office:value-type="float" office:value="0.002233567">
            <text:p>0.002233567</text:p>
          </table:table-cell>
          <table:table-cell table:number-columns-repeated="4"/>
        </table:table-row>
        <table:table-row table:style-name="ro1">
          <table:table-cell office:value-type="float" office:value="333.67724609375">
            <text:p>333.6772460938</text:p>
          </table:table-cell>
          <table:table-cell office:value-type="float" office:value="-0.006076542">
            <text:p>-0.006076542</text:p>
          </table:table-cell>
          <table:table-cell table:number-columns-repeated="4"/>
        </table:table-row>
        <table:table-row table:style-name="ro1">
          <table:table-cell office:value-type="float" office:value="333.785552978516">
            <text:p>333.7855529785</text:p>
          </table:table-cell>
          <table:table-cell office:value-type="float" office:value="0.008252569">
            <text:p>0.008252569</text:p>
          </table:table-cell>
          <table:table-cell table:number-columns-repeated="4"/>
        </table:table-row>
        <table:table-row table:style-name="ro1">
          <table:table-cell office:value-type="float" office:value="333.893859863281">
            <text:p>333.8938598633</text:p>
          </table:table-cell>
          <table:table-cell office:value-type="float" office:value="0.004268704">
            <text:p>0.004268704</text:p>
          </table:table-cell>
          <table:table-cell table:number-columns-repeated="4"/>
        </table:table-row>
        <table:table-row table:style-name="ro1">
          <table:table-cell office:value-type="float" office:value="334.002166748047">
            <text:p>334.002166748</text:p>
          </table:table-cell>
          <table:table-cell office:value-type="float" office:value="-0.009930665">
            <text:p>-0.009930665</text:p>
          </table:table-cell>
          <table:table-cell table:number-columns-repeated="4"/>
        </table:table-row>
        <table:table-row table:style-name="ro1">
          <table:table-cell office:value-type="float" office:value="334.110473632813">
            <text:p>334.1104736328</text:p>
          </table:table-cell>
          <table:table-cell office:value-type="float" office:value="0.0002143357">
            <text:p>0.0002143357</text:p>
          </table:table-cell>
          <table:table-cell table:number-columns-repeated="4"/>
        </table:table-row>
        <table:table-row table:style-name="ro1">
          <table:table-cell office:value-type="float" office:value="334.218811035156">
            <text:p>334.2188110352</text:p>
          </table:table-cell>
          <table:table-cell office:value-type="float" office:value="0.005103158">
            <text:p>0.005103158</text:p>
          </table:table-cell>
          <table:table-cell table:number-columns-repeated="4"/>
        </table:table-row>
        <table:table-row table:style-name="ro1">
          <table:table-cell office:value-type="float" office:value="334.3271484375">
            <text:p>334.3271484375</text:p>
          </table:table-cell>
          <table:table-cell office:value-type="float" office:value="-0.0002381251">
            <text:p>-0.0002381251</text:p>
          </table:table-cell>
          <table:table-cell table:number-columns-repeated="4"/>
        </table:table-row>
        <table:table-row table:style-name="ro1">
          <table:table-cell office:value-type="float" office:value="334.435485839844">
            <text:p>334.4354858398</text:p>
          </table:table-cell>
          <table:table-cell office:value-type="float" office:value="0.0006613132">
            <text:p>0.0006613132</text:p>
          </table:table-cell>
          <table:table-cell table:number-columns-repeated="4"/>
        </table:table-row>
        <table:table-row table:style-name="ro1">
          <table:table-cell office:value-type="float" office:value="334.543853759766">
            <text:p>334.5438537598</text:p>
          </table:table-cell>
          <table:table-cell office:value-type="float" office:value="-0.005750126">
            <text:p>-0.005750126</text:p>
          </table:table-cell>
          <table:table-cell table:number-columns-repeated="4"/>
        </table:table-row>
        <table:table-row table:style-name="ro1">
          <table:table-cell office:value-type="float" office:value="334.652191162109">
            <text:p>334.6521911621</text:p>
          </table:table-cell>
          <table:table-cell office:value-type="float" office:value="0.01640544">
            <text:p>0.01640544</text:p>
          </table:table-cell>
          <table:table-cell table:number-columns-repeated="4"/>
        </table:table-row>
        <table:table-row table:style-name="ro1">
          <table:table-cell office:value-type="float" office:value="334.760559082031">
            <text:p>334.760559082</text:p>
          </table:table-cell>
          <table:table-cell office:value-type="float" office:value="-0.0003663284">
            <text:p>-0.0003663284</text:p>
          </table:table-cell>
          <table:table-cell table:number-columns-repeated="4"/>
        </table:table-row>
        <table:table-row table:style-name="ro1">
          <table:table-cell office:value-type="float" office:value="334.868927001953">
            <text:p>334.868927002</text:p>
          </table:table-cell>
          <table:table-cell office:value-type="float" office:value="0.007430843">
            <text:p>0.007430843</text:p>
          </table:table-cell>
          <table:table-cell table:number-columns-repeated="4"/>
        </table:table-row>
        <table:table-row table:style-name="ro1">
          <table:table-cell office:value-type="float" office:value="334.977325439453">
            <text:p>334.9773254395</text:p>
          </table:table-cell>
          <table:table-cell office:value-type="float" office:value="0.006514202">
            <text:p>0.006514202</text:p>
          </table:table-cell>
          <table:table-cell table:number-columns-repeated="4"/>
        </table:table-row>
        <table:table-row table:style-name="ro1">
          <table:table-cell office:value-type="float" office:value="335.085693359375">
            <text:p>335.0856933594</text:p>
          </table:table-cell>
          <table:table-cell office:value-type="float" office:value="0.0091248">
            <text:p>0.0091248</text:p>
          </table:table-cell>
          <table:table-cell table:number-columns-repeated="4"/>
        </table:table-row>
        <table:table-row table:style-name="ro1">
          <table:table-cell office:value-type="float" office:value="335.194091796875">
            <text:p>335.1940917969</text:p>
          </table:table-cell>
          <table:table-cell office:value-type="float" office:value="0.0003030372">
            <text:p>0.0003030372</text:p>
          </table:table-cell>
          <table:table-cell table:number-columns-repeated="4"/>
        </table:table-row>
        <table:table-row table:style-name="ro1">
          <table:table-cell office:value-type="float" office:value="335.302490234375">
            <text:p>335.3024902344</text:p>
          </table:table-cell>
          <table:table-cell office:value-type="float" office:value="0.008479683">
            <text:p>0.008479683</text:p>
          </table:table-cell>
          <table:table-cell table:number-columns-repeated="4"/>
        </table:table-row>
        <table:table-row table:style-name="ro1">
          <table:table-cell office:value-type="float" office:value="335.410888671875">
            <text:p>335.4108886719</text:p>
          </table:table-cell>
          <table:table-cell office:value-type="float" office:value="0.007036212">
            <text:p>0.007036212</text:p>
          </table:table-cell>
          <table:table-cell table:number-columns-repeated="4"/>
        </table:table-row>
        <table:table-row table:style-name="ro1">
          <table:table-cell office:value-type="float" office:value="335.519287109375">
            <text:p>335.5192871094</text:p>
          </table:table-cell>
          <table:table-cell office:value-type="float" office:value="0.02969431">
            <text:p>0.02969431</text:p>
          </table:table-cell>
          <table:table-cell table:number-columns-repeated="4"/>
        </table:table-row>
        <table:table-row table:style-name="ro1">
          <table:table-cell office:value-type="float" office:value="335.627716064453">
            <text:p>335.6277160645</text:p>
          </table:table-cell>
          <table:table-cell office:value-type="float" office:value="0.008761438">
            <text:p>0.008761438</text:p>
          </table:table-cell>
          <table:table-cell table:number-columns-repeated="4"/>
        </table:table-row>
        <table:table-row table:style-name="ro1">
          <table:table-cell office:value-type="float" office:value="335.736145019531">
            <text:p>335.7361450195</text:p>
          </table:table-cell>
          <table:table-cell office:value-type="float" office:value="0.006621204">
            <text:p>0.006621204</text:p>
          </table:table-cell>
          <table:table-cell table:number-columns-repeated="4"/>
        </table:table-row>
        <table:table-row table:style-name="ro1">
          <table:table-cell office:value-type="float" office:value="335.844573974609">
            <text:p>335.8445739746</text:p>
          </table:table-cell>
          <table:table-cell office:value-type="float" office:value="-0.0007558934">
            <text:p>-0.0007558934</text:p>
          </table:table-cell>
          <table:table-cell table:number-columns-repeated="4"/>
        </table:table-row>
        <table:table-row table:style-name="ro1">
          <table:table-cell office:value-type="float" office:value="335.953002929688">
            <text:p>335.9530029297</text:p>
          </table:table-cell>
          <table:table-cell office:value-type="float" office:value="0.009808271">
            <text:p>0.009808271</text:p>
          </table:table-cell>
          <table:table-cell table:number-columns-repeated="4"/>
        </table:table-row>
        <table:table-row table:style-name="ro1">
          <table:table-cell office:value-type="float" office:value="336.061462402344">
            <text:p>336.0614624023</text:p>
          </table:table-cell>
          <table:table-cell office:value-type="float" office:value="0.01943274">
            <text:p>0.01943274</text:p>
          </table:table-cell>
          <table:table-cell table:number-columns-repeated="4"/>
        </table:table-row>
        <table:table-row table:style-name="ro1">
          <table:table-cell office:value-type="float" office:value="336.169891357422">
            <text:p>336.1698913574</text:p>
          </table:table-cell>
          <table:table-cell office:value-type="float" office:value="-0.005461147">
            <text:p>-0.005461147</text:p>
          </table:table-cell>
          <table:table-cell table:number-columns-repeated="4"/>
        </table:table-row>
        <table:table-row table:style-name="ro1">
          <table:table-cell office:value-type="float" office:value="336.278350830078">
            <text:p>336.2783508301</text:p>
          </table:table-cell>
          <table:table-cell office:value-type="float" office:value="0.002397163">
            <text:p>0.002397163</text:p>
          </table:table-cell>
          <table:table-cell table:number-columns-repeated="4"/>
        </table:table-row>
        <table:table-row table:style-name="ro1">
          <table:table-cell office:value-type="float" office:value="336.386840820313">
            <text:p>336.3868408203</text:p>
          </table:table-cell>
          <table:table-cell office:value-type="float" office:value="0.01754734">
            <text:p>0.01754734</text:p>
          </table:table-cell>
          <table:table-cell table:number-columns-repeated="4"/>
        </table:table-row>
        <table:table-row table:style-name="ro1">
          <table:table-cell office:value-type="float" office:value="336.495300292969">
            <text:p>336.495300293</text:p>
          </table:table-cell>
          <table:table-cell office:value-type="float" office:value="0.004469243">
            <text:p>0.004469243</text:p>
          </table:table-cell>
          <table:table-cell table:number-columns-repeated="4"/>
        </table:table-row>
        <table:table-row table:style-name="ro1">
          <table:table-cell office:value-type="float" office:value="336.603790283203">
            <text:p>336.6037902832</text:p>
          </table:table-cell>
          <table:table-cell office:value-type="float" office:value="-0.00493672">
            <text:p>-0.00493672</text:p>
          </table:table-cell>
          <table:table-cell table:number-columns-repeated="4"/>
        </table:table-row>
        <table:table-row table:style-name="ro1">
          <table:table-cell office:value-type="float" office:value="336.712249755859">
            <text:p>336.7122497559</text:p>
          </table:table-cell>
          <table:table-cell office:value-type="float" office:value="-0.002866992">
            <text:p>-0.002866992</text:p>
          </table:table-cell>
          <table:table-cell table:number-columns-repeated="4"/>
        </table:table-row>
        <table:table-row table:style-name="ro1">
          <table:table-cell office:value-type="float" office:value="336.820770263672">
            <text:p>336.8207702637</text:p>
          </table:table-cell>
          <table:table-cell office:value-type="float" office:value="-0.0011496">
            <text:p>-0.0011496</text:p>
          </table:table-cell>
          <table:table-cell table:number-columns-repeated="4"/>
        </table:table-row>
        <table:table-row table:style-name="ro1">
          <table:table-cell office:value-type="float" office:value="336.929260253906">
            <text:p>336.9292602539</text:p>
          </table:table-cell>
          <table:table-cell office:value-type="float" office:value="0.001758172">
            <text:p>0.001758172</text:p>
          </table:table-cell>
          <table:table-cell table:number-columns-repeated="4"/>
        </table:table-row>
        <table:table-row table:style-name="ro1">
          <table:table-cell office:value-type="float" office:value="337.037750244141">
            <text:p>337.0377502441</text:p>
          </table:table-cell>
          <table:table-cell office:value-type="float" office:value="-0.006285778">
            <text:p>-0.006285778</text:p>
          </table:table-cell>
          <table:table-cell table:number-columns-repeated="4"/>
        </table:table-row>
        <table:table-row table:style-name="ro1">
          <table:table-cell office:value-type="float" office:value="337.146270751953">
            <text:p>337.146270752</text:p>
          </table:table-cell>
          <table:table-cell office:value-type="float" office:value="-0.009068375">
            <text:p>-0.009068375</text:p>
          </table:table-cell>
          <table:table-cell table:number-columns-repeated="4"/>
        </table:table-row>
        <table:table-row table:style-name="ro1">
          <table:table-cell office:value-type="float" office:value="337.254791259766">
            <text:p>337.2547912598</text:p>
          </table:table-cell>
          <table:table-cell office:value-type="float" office:value="0.02394343">
            <text:p>0.02394343</text:p>
          </table:table-cell>
          <table:table-cell table:number-columns-repeated="4"/>
        </table:table-row>
        <table:table-row table:style-name="ro1">
          <table:table-cell office:value-type="float" office:value="337.363311767578">
            <text:p>337.3633117676</text:p>
          </table:table-cell>
          <table:table-cell office:value-type="float" office:value="0.001960333">
            <text:p>0.001960333</text:p>
          </table:table-cell>
          <table:table-cell table:number-columns-repeated="4"/>
        </table:table-row>
        <table:table-row table:style-name="ro1">
          <table:table-cell office:value-type="float" office:value="337.471862792969">
            <text:p>337.471862793</text:p>
          </table:table-cell>
          <table:table-cell office:value-type="float" office:value="0.003833157">
            <text:p>0.003833157</text:p>
          </table:table-cell>
          <table:table-cell table:number-columns-repeated="4"/>
        </table:table-row>
        <table:table-row table:style-name="ro1">
          <table:table-cell office:value-type="float" office:value="337.580383300781">
            <text:p>337.5803833008</text:p>
          </table:table-cell>
          <table:table-cell office:value-type="float" office:value="-0.00292451">
            <text:p>-0.00292451</text:p>
          </table:table-cell>
          <table:table-cell table:number-columns-repeated="4"/>
        </table:table-row>
        <table:table-row table:style-name="ro1">
          <table:table-cell office:value-type="float" office:value="337.688934326172">
            <text:p>337.6889343262</text:p>
          </table:table-cell>
          <table:table-cell office:value-type="float" office:value="-0.0007062525">
            <text:p>-0.0007062525</text:p>
          </table:table-cell>
          <table:table-cell table:number-columns-repeated="4"/>
        </table:table-row>
        <table:table-row table:style-name="ro1">
          <table:table-cell office:value-type="float" office:value="337.797485351563">
            <text:p>337.7974853516</text:p>
          </table:table-cell>
          <table:table-cell office:value-type="float" office:value="-0.002402663">
            <text:p>-0.002402663</text:p>
          </table:table-cell>
          <table:table-cell table:number-columns-repeated="4"/>
        </table:table-row>
        <table:table-row table:style-name="ro1">
          <table:table-cell office:value-type="float" office:value="337.906036376953">
            <text:p>337.906036377</text:p>
          </table:table-cell>
          <table:table-cell office:value-type="float" office:value="-0.003149543">
            <text:p>-0.003149543</text:p>
          </table:table-cell>
          <table:table-cell table:number-columns-repeated="4"/>
        </table:table-row>
        <table:table-row table:style-name="ro1">
          <table:table-cell office:value-type="float" office:value="338.014617919922">
            <text:p>338.0146179199</text:p>
          </table:table-cell>
          <table:table-cell office:value-type="float" office:value="-0.002450965">
            <text:p>-0.002450965</text:p>
          </table:table-cell>
          <table:table-cell table:number-columns-repeated="4"/>
        </table:table-row>
        <table:table-row table:style-name="ro1">
          <table:table-cell office:value-type="float" office:value="338.123168945313">
            <text:p>338.1231689453</text:p>
          </table:table-cell>
          <table:table-cell office:value-type="float" office:value="0.01209852">
            <text:p>0.01209852</text:p>
          </table:table-cell>
          <table:table-cell table:number-columns-repeated="4"/>
        </table:table-row>
        <table:table-row table:style-name="ro1">
          <table:table-cell office:value-type="float" office:value="338.231750488281">
            <text:p>338.2317504883</text:p>
          </table:table-cell>
          <table:table-cell office:value-type="float" office:value="0.0116934">
            <text:p>0.0116934</text:p>
          </table:table-cell>
          <table:table-cell table:number-columns-repeated="4"/>
        </table:table-row>
        <table:table-row table:style-name="ro1">
          <table:table-cell office:value-type="float" office:value="338.340362548828">
            <text:p>338.3403625488</text:p>
          </table:table-cell>
          <table:table-cell office:value-type="float" office:value="-0.002296332">
            <text:p>-0.002296332</text:p>
          </table:table-cell>
          <table:table-cell table:number-columns-repeated="4"/>
        </table:table-row>
        <table:table-row table:style-name="ro1">
          <table:table-cell office:value-type="float" office:value="338.448944091797">
            <text:p>338.4489440918</text:p>
          </table:table-cell>
          <table:table-cell office:value-type="float" office:value="0.02330956">
            <text:p>0.02330956</text:p>
          </table:table-cell>
          <table:table-cell table:number-columns-repeated="4"/>
        </table:table-row>
        <table:table-row table:style-name="ro1">
          <table:table-cell office:value-type="float" office:value="338.557525634766">
            <text:p>338.5575256348</text:p>
          </table:table-cell>
          <table:table-cell office:value-type="float" office:value="0.005906032">
            <text:p>0.005906032</text:p>
          </table:table-cell>
          <table:table-cell table:number-columns-repeated="4"/>
        </table:table-row>
        <table:table-row table:style-name="ro1">
          <table:table-cell office:value-type="float" office:value="338.666137695313">
            <text:p>338.6661376953</text:p>
          </table:table-cell>
          <table:table-cell office:value-type="float" office:value="0.01261646">
            <text:p>0.01261646</text:p>
          </table:table-cell>
          <table:table-cell table:number-columns-repeated="4"/>
        </table:table-row>
        <table:table-row table:style-name="ro1">
          <table:table-cell office:value-type="float" office:value="338.774749755859">
            <text:p>338.7747497559</text:p>
          </table:table-cell>
          <table:table-cell office:value-type="float" office:value="-0.004853721">
            <text:p>-0.004853721</text:p>
          </table:table-cell>
          <table:table-cell table:number-columns-repeated="4"/>
        </table:table-row>
        <table:table-row table:style-name="ro1">
          <table:table-cell office:value-type="float" office:value="338.883392333984">
            <text:p>338.883392334</text:p>
          </table:table-cell>
          <table:table-cell office:value-type="float" office:value="-0.00311048">
            <text:p>-0.00311048</text:p>
          </table:table-cell>
          <table:table-cell table:number-columns-repeated="4"/>
        </table:table-row>
        <table:table-row table:style-name="ro1">
          <table:table-cell office:value-type="float" office:value="338.992004394531">
            <text:p>338.9920043945</text:p>
          </table:table-cell>
          <table:table-cell office:value-type="float" office:value="0.003358519">
            <text:p>0.003358519</text:p>
          </table:table-cell>
          <table:table-cell table:number-columns-repeated="4"/>
        </table:table-row>
        <table:table-row table:style-name="ro1">
          <table:table-cell office:value-type="float" office:value="339.100646972656">
            <text:p>339.1006469727</text:p>
          </table:table-cell>
          <table:table-cell office:value-type="float" office:value="0.009283929">
            <text:p>0.009283929</text:p>
          </table:table-cell>
          <table:table-cell table:number-columns-repeated="4"/>
        </table:table-row>
        <table:table-row table:style-name="ro1">
          <table:table-cell office:value-type="float" office:value="339.209289550781">
            <text:p>339.2092895508</text:p>
          </table:table-cell>
          <table:table-cell office:value-type="float" office:value="-0.004989578">
            <text:p>-0.004989578</text:p>
          </table:table-cell>
          <table:table-cell table:number-columns-repeated="4"/>
        </table:table-row>
        <table:table-row table:style-name="ro1">
          <table:table-cell office:value-type="float" office:value="339.317932128906">
            <text:p>339.3179321289</text:p>
          </table:table-cell>
          <table:table-cell office:value-type="float" office:value="0.008731316">
            <text:p>0.008731316</text:p>
          </table:table-cell>
          <table:table-cell table:number-columns-repeated="4"/>
        </table:table-row>
        <table:table-row table:style-name="ro1">
          <table:table-cell office:value-type="float" office:value="339.426574707031">
            <text:p>339.426574707</text:p>
          </table:table-cell>
          <table:table-cell office:value-type="float" office:value="0.002494362">
            <text:p>0.002494362</text:p>
          </table:table-cell>
          <table:table-cell table:number-columns-repeated="4"/>
        </table:table-row>
        <table:table-row table:style-name="ro1">
          <table:table-cell office:value-type="float" office:value="339.535247802734">
            <text:p>339.5352478027</text:p>
          </table:table-cell>
          <table:table-cell office:value-type="float" office:value="0.01054531">
            <text:p>0.01054531</text:p>
          </table:table-cell>
          <table:table-cell table:number-columns-repeated="4"/>
        </table:table-row>
        <table:table-row table:style-name="ro1">
          <table:table-cell office:value-type="float" office:value="339.643890380859">
            <text:p>339.6438903809</text:p>
          </table:table-cell>
          <table:table-cell office:value-type="float" office:value="0.003347633">
            <text:p>0.003347633</text:p>
          </table:table-cell>
          <table:table-cell table:number-columns-repeated="4"/>
        </table:table-row>
        <table:table-row table:style-name="ro1">
          <table:table-cell office:value-type="float" office:value="339.752563476563">
            <text:p>339.7525634766</text:p>
          </table:table-cell>
          <table:table-cell office:value-type="float" office:value="0.003878395">
            <text:p>0.003878395</text:p>
          </table:table-cell>
          <table:table-cell table:number-columns-repeated="4"/>
        </table:table-row>
        <table:table-row table:style-name="ro1">
          <table:table-cell office:value-type="float" office:value="339.861267089844">
            <text:p>339.8612670898</text:p>
          </table:table-cell>
          <table:table-cell office:value-type="float" office:value="0.001225415">
            <text:p>0.001225415</text:p>
          </table:table-cell>
          <table:table-cell table:number-columns-repeated="4"/>
        </table:table-row>
        <table:table-row table:style-name="ro1">
          <table:table-cell office:value-type="float" office:value="339.969940185547">
            <text:p>339.9699401855</text:p>
          </table:table-cell>
          <table:table-cell office:value-type="float" office:value="0.01683649">
            <text:p>0.01683649</text:p>
          </table:table-cell>
          <table:table-cell table:number-columns-repeated="4"/>
        </table:table-row>
        <table:table-row table:style-name="ro1">
          <table:table-cell office:value-type="float" office:value="340.078643798828">
            <text:p>340.0786437988</text:p>
          </table:table-cell>
          <table:table-cell office:value-type="float" office:value="0.002539399">
            <text:p>0.002539399</text:p>
          </table:table-cell>
          <table:table-cell table:number-columns-repeated="4"/>
        </table:table-row>
        <table:table-row table:style-name="ro1">
          <table:table-cell office:value-type="float" office:value="340.187347412109">
            <text:p>340.1873474121</text:p>
          </table:table-cell>
          <table:table-cell office:value-type="float" office:value="0.01715364">
            <text:p>0.01715364</text:p>
          </table:table-cell>
          <table:table-cell table:number-columns-repeated="4"/>
        </table:table-row>
        <table:table-row table:style-name="ro1">
          <table:table-cell office:value-type="float" office:value="340.296051025391">
            <text:p>340.2960510254</text:p>
          </table:table-cell>
          <table:table-cell office:value-type="float" office:value="0.006243362">
            <text:p>0.006243362</text:p>
          </table:table-cell>
          <table:table-cell table:number-columns-repeated="4"/>
        </table:table-row>
        <table:table-row table:style-name="ro1">
          <table:table-cell office:value-type="float" office:value="340.404754638672">
            <text:p>340.4047546387</text:p>
          </table:table-cell>
          <table:table-cell office:value-type="float" office:value="0.008591425">
            <text:p>0.008591425</text:p>
          </table:table-cell>
          <table:table-cell table:number-columns-repeated="4"/>
        </table:table-row>
        <table:table-row table:style-name="ro1">
          <table:table-cell office:value-type="float" office:value="340.513488769531">
            <text:p>340.5134887695</text:p>
          </table:table-cell>
          <table:table-cell office:value-type="float" office:value="-0.007449938">
            <text:p>-0.007449938</text:p>
          </table:table-cell>
          <table:table-cell table:number-columns-repeated="4"/>
        </table:table-row>
        <table:table-row table:style-name="ro1">
          <table:table-cell office:value-type="float" office:value="340.622192382813">
            <text:p>340.6221923828</text:p>
          </table:table-cell>
          <table:table-cell office:value-type="float" office:value="0.01601252">
            <text:p>0.01601252</text:p>
          </table:table-cell>
          <table:table-cell table:number-columns-repeated="4"/>
        </table:table-row>
        <table:table-row table:style-name="ro1">
          <table:table-cell office:value-type="float" office:value="340.730926513672">
            <text:p>340.7309265137</text:p>
          </table:table-cell>
          <table:table-cell office:value-type="float" office:value="0.01561204">
            <text:p>0.01561204</text:p>
          </table:table-cell>
          <table:table-cell table:number-columns-repeated="4"/>
        </table:table-row>
        <table:table-row table:style-name="ro1">
          <table:table-cell office:value-type="float" office:value="340.839660644531">
            <text:p>340.8396606445</text:p>
          </table:table-cell>
          <table:table-cell office:value-type="float" office:value="0.01416404">
            <text:p>0.01416404</text:p>
          </table:table-cell>
          <table:table-cell table:number-columns-repeated="4"/>
        </table:table-row>
        <table:table-row table:style-name="ro1">
          <table:table-cell office:value-type="float" office:value="340.948425292969">
            <text:p>340.948425293</text:p>
          </table:table-cell>
          <table:table-cell office:value-type="float" office:value="-0.00476479">
            <text:p>-0.00476479</text:p>
          </table:table-cell>
          <table:table-cell table:number-columns-repeated="4"/>
        </table:table-row>
        <table:table-row table:style-name="ro1">
          <table:table-cell office:value-type="float" office:value="341.057159423828">
            <text:p>341.0571594238</text:p>
          </table:table-cell>
          <table:table-cell office:value-type="float" office:value="-0.0008798944">
            <text:p>-0.0008798944</text:p>
          </table:table-cell>
          <table:table-cell table:number-columns-repeated="4"/>
        </table:table-row>
        <table:table-row table:style-name="ro1">
          <table:table-cell office:value-type="float" office:value="341.165924072266">
            <text:p>341.1659240723</text:p>
          </table:table-cell>
          <table:table-cell office:value-type="float" office:value="-0.00246947">
            <text:p>-0.00246947</text:p>
          </table:table-cell>
          <table:table-cell table:number-columns-repeated="4"/>
        </table:table-row>
        <table:table-row table:style-name="ro1">
          <table:table-cell office:value-type="float" office:value="341.274688720703">
            <text:p>341.2746887207</text:p>
          </table:table-cell>
          <table:table-cell office:value-type="float" office:value="-0.002611369">
            <text:p>-0.002611369</text:p>
          </table:table-cell>
          <table:table-cell table:number-columns-repeated="4"/>
        </table:table-row>
        <table:table-row table:style-name="ro1">
          <table:table-cell office:value-type="float" office:value="341.383483886719">
            <text:p>341.3834838867</text:p>
          </table:table-cell>
          <table:table-cell office:value-type="float" office:value="0.01521923">
            <text:p>0.01521923</text:p>
          </table:table-cell>
          <table:table-cell table:number-columns-repeated="4"/>
        </table:table-row>
        <table:table-row table:style-name="ro1">
          <table:table-cell office:value-type="float" office:value="341.492248535156">
            <text:p>341.4922485352</text:p>
          </table:table-cell>
          <table:table-cell office:value-type="float" office:value="0.004235016">
            <text:p>0.004235016</text:p>
          </table:table-cell>
          <table:table-cell table:number-columns-repeated="4"/>
        </table:table-row>
        <table:table-row table:style-name="ro1">
          <table:table-cell office:value-type="float" office:value="341.601043701172">
            <text:p>341.6010437012</text:p>
          </table:table-cell>
          <table:table-cell office:value-type="float" office:value="0.02339114">
            <text:p>0.02339114</text:p>
          </table:table-cell>
          <table:table-cell table:number-columns-repeated="4"/>
        </table:table-row>
        <table:table-row table:style-name="ro1">
          <table:table-cell office:value-type="float" office:value="341.709838867188">
            <text:p>341.7098388672</text:p>
          </table:table-cell>
          <table:table-cell office:value-type="float" office:value="0.0196177">
            <text:p>0.0196177</text:p>
          </table:table-cell>
          <table:table-cell table:number-columns-repeated="4"/>
        </table:table-row>
        <table:table-row table:style-name="ro1">
          <table:table-cell office:value-type="float" office:value="341.818634033203">
            <text:p>341.8186340332</text:p>
          </table:table-cell>
          <table:table-cell office:value-type="float" office:value="0.01456818">
            <text:p>0.01456818</text:p>
          </table:table-cell>
          <table:table-cell table:number-columns-repeated="4"/>
        </table:table-row>
        <table:table-row table:style-name="ro1">
          <table:table-cell office:value-type="float" office:value="341.927429199219">
            <text:p>341.9274291992</text:p>
          </table:table-cell>
          <table:table-cell office:value-type="float" office:value="-0.001555428">
            <text:p>-0.001555428</text:p>
          </table:table-cell>
          <table:table-cell table:number-columns-repeated="4"/>
        </table:table-row>
        <table:table-row table:style-name="ro1">
          <table:table-cell office:value-type="float" office:value="342.036254882813">
            <text:p>342.0362548828</text:p>
          </table:table-cell>
          <table:table-cell office:value-type="float" office:value="-0.002588107">
            <text:p>-0.002588107</text:p>
          </table:table-cell>
          <table:table-cell table:number-columns-repeated="4"/>
        </table:table-row>
        <table:table-row table:style-name="ro1">
          <table:table-cell office:value-type="float" office:value="342.145080566406">
            <text:p>342.1450805664</text:p>
          </table:table-cell>
          <table:table-cell office:value-type="float" office:value="0.00116229">
            <text:p>0.00116229</text:p>
          </table:table-cell>
          <table:table-cell table:number-columns-repeated="4"/>
        </table:table-row>
        <table:table-row table:style-name="ro1">
          <table:table-cell office:value-type="float" office:value="342.25390625">
            <text:p>342.25390625</text:p>
          </table:table-cell>
          <table:table-cell office:value-type="float" office:value="0.01026317">
            <text:p>0.01026317</text:p>
          </table:table-cell>
          <table:table-cell table:number-columns-repeated="4"/>
        </table:table-row>
        <table:table-row table:style-name="ro1">
          <table:table-cell office:value-type="float" office:value="342.362731933594">
            <text:p>342.3627319336</text:p>
          </table:table-cell>
          <table:table-cell office:value-type="float" office:value="0.004463703">
            <text:p>0.004463703</text:p>
          </table:table-cell>
          <table:table-cell table:number-columns-repeated="4"/>
        </table:table-row>
        <table:table-row table:style-name="ro1">
          <table:table-cell office:value-type="float" office:value="342.471557617188">
            <text:p>342.4715576172</text:p>
          </table:table-cell>
          <table:table-cell office:value-type="string">
            <text:p>-8.779777E-05</text:p>
          </table:table-cell>
          <table:table-cell table:number-columns-repeated="4"/>
        </table:table-row>
        <table:table-row table:style-name="ro1">
          <table:table-cell office:value-type="float" office:value="342.580413818359">
            <text:p>342.5804138184</text:p>
          </table:table-cell>
          <table:table-cell office:value-type="float" office:value="0.01082254">
            <text:p>0.01082254</text:p>
          </table:table-cell>
          <table:table-cell table:number-columns-repeated="4"/>
        </table:table-row>
        <table:table-row table:style-name="ro1">
          <table:table-cell office:value-type="float" office:value="342.689270019531">
            <text:p>342.6892700195</text:p>
          </table:table-cell>
          <table:table-cell office:value-type="float" office:value="-0.004138452">
            <text:p>-0.004138452</text:p>
          </table:table-cell>
          <table:table-cell table:number-columns-repeated="4"/>
        </table:table-row>
        <table:table-row table:style-name="ro1">
          <table:table-cell office:value-type="float" office:value="342.798126220703">
            <text:p>342.7981262207</text:p>
          </table:table-cell>
          <table:table-cell office:value-type="float" office:value="0.006943411">
            <text:p>0.006943411</text:p>
          </table:table-cell>
          <table:table-cell table:number-columns-repeated="4"/>
        </table:table-row>
        <table:table-row table:style-name="ro1">
          <table:table-cell office:value-type="float" office:value="342.906982421875">
            <text:p>342.9069824219</text:p>
          </table:table-cell>
          <table:table-cell office:value-type="float" office:value="0.0148305">
            <text:p>0.0148305</text:p>
          </table:table-cell>
          <table:table-cell table:number-columns-repeated="4"/>
        </table:table-row>
        <table:table-row table:style-name="ro1">
          <table:table-cell office:value-type="float" office:value="343.015869140625">
            <text:p>343.0158691406</text:p>
          </table:table-cell>
          <table:table-cell office:value-type="float" office:value="0.01162419">
            <text:p>0.01162419</text:p>
          </table:table-cell>
          <table:table-cell table:number-columns-repeated="4"/>
        </table:table-row>
        <table:table-row table:style-name="ro1">
          <table:table-cell office:value-type="float" office:value="343.124755859375">
            <text:p>343.1247558594</text:p>
          </table:table-cell>
          <table:table-cell office:value-type="float" office:value="-0.00295447">
            <text:p>-0.00295447</text:p>
          </table:table-cell>
          <table:table-cell table:number-columns-repeated="4"/>
        </table:table-row>
        <table:table-row table:style-name="ro1">
          <table:table-cell office:value-type="float" office:value="343.233642578125">
            <text:p>343.2336425781</text:p>
          </table:table-cell>
          <table:table-cell office:value-type="float" office:value="-0.007499588">
            <text:p>-0.007499588</text:p>
          </table:table-cell>
          <table:table-cell table:number-columns-repeated="4"/>
        </table:table-row>
        <table:table-row table:style-name="ro1">
          <table:table-cell office:value-type="float" office:value="343.342529296875">
            <text:p>343.3425292969</text:p>
          </table:table-cell>
          <table:table-cell office:value-type="float" office:value="0.008935149">
            <text:p>0.008935149</text:p>
          </table:table-cell>
          <table:table-cell table:number-columns-repeated="4"/>
        </table:table-row>
        <table:table-row table:style-name="ro1">
          <table:table-cell office:value-type="float" office:value="343.451416015625">
            <text:p>343.4514160156</text:p>
          </table:table-cell>
          <table:table-cell office:value-type="float" office:value="0.001534611">
            <text:p>0.001534611</text:p>
          </table:table-cell>
          <table:table-cell table:number-columns-repeated="4"/>
        </table:table-row>
        <table:table-row table:style-name="ro1">
          <table:table-cell office:value-type="float" office:value="343.560333251953">
            <text:p>343.560333252</text:p>
          </table:table-cell>
          <table:table-cell office:value-type="float" office:value="-0.003070885">
            <text:p>-0.003070885</text:p>
          </table:table-cell>
          <table:table-cell table:number-columns-repeated="4"/>
        </table:table-row>
        <table:table-row table:style-name="ro1">
          <table:table-cell office:value-type="float" office:value="343.669250488281">
            <text:p>343.6692504883</text:p>
          </table:table-cell>
          <table:table-cell office:value-type="float" office:value="-0.003288553">
            <text:p>-0.003288553</text:p>
          </table:table-cell>
          <table:table-cell table:number-columns-repeated="4"/>
        </table:table-row>
        <table:table-row table:style-name="ro1">
          <table:table-cell office:value-type="float" office:value="343.778167724609">
            <text:p>343.7781677246</text:p>
          </table:table-cell>
          <table:table-cell office:value-type="float" office:value="0.001777538">
            <text:p>0.001777538</text:p>
          </table:table-cell>
          <table:table-cell table:number-columns-repeated="4"/>
        </table:table-row>
        <table:table-row table:style-name="ro1">
          <table:table-cell office:value-type="float" office:value="343.887084960938">
            <text:p>343.8870849609</text:p>
          </table:table-cell>
          <table:table-cell office:value-type="float" office:value="0.004351772">
            <text:p>0.004351772</text:p>
          </table:table-cell>
          <table:table-cell table:number-columns-repeated="4"/>
        </table:table-row>
        <table:table-row table:style-name="ro1">
          <table:table-cell office:value-type="float" office:value="343.996032714844">
            <text:p>343.9960327148</text:p>
          </table:table-cell>
          <table:table-cell office:value-type="float" office:value="-0.007746607">
            <text:p>-0.007746607</text:p>
          </table:table-cell>
          <table:table-cell table:number-columns-repeated="4"/>
        </table:table-row>
        <table:table-row table:style-name="ro1">
          <table:table-cell office:value-type="float" office:value="344.104949951172">
            <text:p>344.1049499512</text:p>
          </table:table-cell>
          <table:table-cell office:value-type="float" office:value="0.009755013">
            <text:p>0.009755013</text:p>
          </table:table-cell>
          <table:table-cell table:number-columns-repeated="4"/>
        </table:table-row>
        <table:table-row table:style-name="ro1">
          <table:table-cell office:value-type="float" office:value="344.213897705078">
            <text:p>344.2138977051</text:p>
          </table:table-cell>
          <table:table-cell office:value-type="float" office:value="-0.00235684">
            <text:p>-0.00235684</text:p>
          </table:table-cell>
          <table:table-cell table:number-columns-repeated="4"/>
        </table:table-row>
        <table:table-row table:style-name="ro1">
          <table:table-cell office:value-type="float" office:value="344.322845458984">
            <text:p>344.322845459</text:p>
          </table:table-cell>
          <table:table-cell office:value-type="float" office:value="0.007544121">
            <text:p>0.007544121</text:p>
          </table:table-cell>
          <table:table-cell table:number-columns-repeated="4"/>
        </table:table-row>
        <table:table-row table:style-name="ro1">
          <table:table-cell office:value-type="float" office:value="344.431823730469">
            <text:p>344.4318237305</text:p>
          </table:table-cell>
          <table:table-cell office:value-type="float" office:value="-0.003901405">
            <text:p>-0.003901405</text:p>
          </table:table-cell>
          <table:table-cell table:number-columns-repeated="4"/>
        </table:table-row>
        <table:table-row table:style-name="ro1">
          <table:table-cell office:value-type="float" office:value="344.540771484375">
            <text:p>344.5407714844</text:p>
          </table:table-cell>
          <table:table-cell office:value-type="string">
            <text:p>4.459755E-05</text:p>
          </table:table-cell>
          <table:table-cell table:number-columns-repeated="4"/>
        </table:table-row>
        <table:table-row table:style-name="ro1">
          <table:table-cell office:value-type="float" office:value="344.649749755859">
            <text:p>344.6497497559</text:p>
          </table:table-cell>
          <table:table-cell office:value-type="float" office:value="0.0005115874">
            <text:p>0.0005115874</text:p>
          </table:table-cell>
          <table:table-cell table:number-columns-repeated="4"/>
        </table:table-row>
        <table:table-row table:style-name="ro1">
          <table:table-cell office:value-type="float" office:value="344.758728027344">
            <text:p>344.7587280273</text:p>
          </table:table-cell>
          <table:table-cell office:value-type="float" office:value="0.0002509933">
            <text:p>0.0002509933</text:p>
          </table:table-cell>
          <table:table-cell table:number-columns-repeated="4"/>
        </table:table-row>
        <table:table-row table:style-name="ro1">
          <table:table-cell office:value-type="float" office:value="344.867706298828">
            <text:p>344.8677062988</text:p>
          </table:table-cell>
          <table:table-cell office:value-type="float" office:value="0.006309864">
            <text:p>0.006309864</text:p>
          </table:table-cell>
          <table:table-cell table:number-columns-repeated="4"/>
        </table:table-row>
        <table:table-row table:style-name="ro1">
          <table:table-cell office:value-type="float" office:value="344.976715087891">
            <text:p>344.9767150879</text:p>
          </table:table-cell>
          <table:table-cell office:value-type="float" office:value="0.009965725">
            <text:p>0.009965725</text:p>
          </table:table-cell>
          <table:table-cell table:number-columns-repeated="4"/>
        </table:table-row>
        <table:table-row table:style-name="ro1">
          <table:table-cell office:value-type="float" office:value="345.085723876953">
            <text:p>345.085723877</text:p>
          </table:table-cell>
          <table:table-cell office:value-type="float" office:value="-0.001516046">
            <text:p>-0.001516046</text:p>
          </table:table-cell>
          <table:table-cell table:number-columns-repeated="4"/>
        </table:table-row>
        <table:table-row table:style-name="ro1">
          <table:table-cell office:value-type="float" office:value="345.194702148438">
            <text:p>345.1947021484</text:p>
          </table:table-cell>
          <table:table-cell office:value-type="float" office:value="0.002389991">
            <text:p>0.002389991</text:p>
          </table:table-cell>
          <table:table-cell table:number-columns-repeated="4"/>
        </table:table-row>
        <table:table-row table:style-name="ro1">
          <table:table-cell office:value-type="float" office:value="345.303741455078">
            <text:p>345.3037414551</text:p>
          </table:table-cell>
          <table:table-cell office:value-type="float" office:value="0.0228337">
            <text:p>0.0228337</text:p>
          </table:table-cell>
          <table:table-cell table:number-columns-repeated="4"/>
        </table:table-row>
        <table:table-row table:style-name="ro1">
          <table:table-cell office:value-type="float" office:value="345.412750244141">
            <text:p>345.4127502441</text:p>
          </table:table-cell>
          <table:table-cell office:value-type="float" office:value="-0.006484458">
            <text:p>-0.006484458</text:p>
          </table:table-cell>
          <table:table-cell table:number-columns-repeated="4"/>
        </table:table-row>
        <table:table-row table:style-name="ro1">
          <table:table-cell office:value-type="float" office:value="345.521759033203">
            <text:p>345.5217590332</text:p>
          </table:table-cell>
          <table:table-cell office:value-type="float" office:value="-0.004698917">
            <text:p>-0.004698917</text:p>
          </table:table-cell>
          <table:table-cell table:number-columns-repeated="4"/>
        </table:table-row>
        <table:table-row table:style-name="ro1">
          <table:table-cell office:value-type="float" office:value="345.630798339844">
            <text:p>345.6307983398</text:p>
          </table:table-cell>
          <table:table-cell office:value-type="float" office:value="0.00308458">
            <text:p>0.00308458</text:p>
          </table:table-cell>
          <table:table-cell table:number-columns-repeated="4"/>
        </table:table-row>
        <table:table-row table:style-name="ro1">
          <table:table-cell office:value-type="float" office:value="345.739837646484">
            <text:p>345.7398376465</text:p>
          </table:table-cell>
          <table:table-cell office:value-type="float" office:value="-0.001563024">
            <text:p>-0.001563024</text:p>
          </table:table-cell>
          <table:table-cell table:number-columns-repeated="4"/>
        </table:table-row>
        <table:table-row table:style-name="ro1">
          <table:table-cell office:value-type="float" office:value="345.848876953125">
            <text:p>345.8488769531</text:p>
          </table:table-cell>
          <table:table-cell office:value-type="float" office:value="0.0104556">
            <text:p>0.0104556</text:p>
          </table:table-cell>
          <table:table-cell table:number-columns-repeated="4"/>
        </table:table-row>
        <table:table-row table:style-name="ro1">
          <table:table-cell office:value-type="float" office:value="345.957946777344">
            <text:p>345.9579467773</text:p>
          </table:table-cell>
          <table:table-cell office:value-type="float" office:value="0.01166079">
            <text:p>0.01166079</text:p>
          </table:table-cell>
          <table:table-cell table:number-columns-repeated="4"/>
        </table:table-row>
        <table:table-row table:style-name="ro1">
          <table:table-cell office:value-type="float" office:value="346.066986083984">
            <text:p>346.066986084</text:p>
          </table:table-cell>
          <table:table-cell office:value-type="float" office:value="-0.001887506">
            <text:p>-0.001887506</text:p>
          </table:table-cell>
          <table:table-cell table:number-columns-repeated="4"/>
        </table:table-row>
        <table:table-row table:style-name="ro1">
          <table:table-cell office:value-type="float" office:value="346.176055908203">
            <text:p>346.1760559082</text:p>
          </table:table-cell>
          <table:table-cell office:value-type="float" office:value="-0.003104336">
            <text:p>-0.003104336</text:p>
          </table:table-cell>
          <table:table-cell table:number-columns-repeated="4"/>
        </table:table-row>
        <table:table-row table:style-name="ro1">
          <table:table-cell office:value-type="float" office:value="346.285125732422">
            <text:p>346.2851257324</text:p>
          </table:table-cell>
          <table:table-cell office:value-type="float" office:value="-0.004347884">
            <text:p>-0.004347884</text:p>
          </table:table-cell>
          <table:table-cell table:number-columns-repeated="4"/>
        </table:table-row>
        <table:table-row table:style-name="ro1">
          <table:table-cell office:value-type="float" office:value="346.394195556641">
            <text:p>346.3941955566</text:p>
          </table:table-cell>
          <table:table-cell office:value-type="float" office:value="0.002931881">
            <text:p>0.002931881</text:p>
          </table:table-cell>
          <table:table-cell table:number-columns-repeated="4"/>
        </table:table-row>
        <table:table-row table:style-name="ro1">
          <table:table-cell office:value-type="float" office:value="346.503295898438">
            <text:p>346.5032958984</text:p>
          </table:table-cell>
          <table:table-cell office:value-type="float" office:value="-0.002360474">
            <text:p>-0.002360474</text:p>
          </table:table-cell>
          <table:table-cell table:number-columns-repeated="4"/>
        </table:table-row>
        <table:table-row table:style-name="ro1">
          <table:table-cell office:value-type="float" office:value="346.612365722656">
            <text:p>346.6123657227</text:p>
          </table:table-cell>
          <table:table-cell office:value-type="float" office:value="-0.004528181">
            <text:p>-0.004528181</text:p>
          </table:table-cell>
          <table:table-cell table:number-columns-repeated="4"/>
        </table:table-row>
        <table:table-row table:style-name="ro1">
          <table:table-cell office:value-type="float" office:value="346.721466064453">
            <text:p>346.7214660645</text:p>
          </table:table-cell>
          <table:table-cell office:value-type="float" office:value="0.0008801112">
            <text:p>0.0008801112</text:p>
          </table:table-cell>
          <table:table-cell table:number-columns-repeated="4"/>
        </table:table-row>
        <table:table-row table:style-name="ro1">
          <table:table-cell office:value-type="float" office:value="346.83056640625">
            <text:p>346.8305664063</text:p>
          </table:table-cell>
          <table:table-cell office:value-type="float" office:value="0.01116166">
            <text:p>0.01116166</text:p>
          </table:table-cell>
          <table:table-cell table:number-columns-repeated="4"/>
        </table:table-row>
        <table:table-row table:style-name="ro1">
          <table:table-cell office:value-type="float" office:value="346.939697265625">
            <text:p>346.9396972656</text:p>
          </table:table-cell>
          <table:table-cell office:value-type="float" office:value="0.02839008">
            <text:p>0.02839008</text:p>
          </table:table-cell>
          <table:table-cell table:number-columns-repeated="4"/>
        </table:table-row>
        <table:table-row table:style-name="ro1">
          <table:table-cell office:value-type="float" office:value="347.048797607422">
            <text:p>347.0487976074</text:p>
          </table:table-cell>
          <table:table-cell office:value-type="float" office:value="-0.008756751">
            <text:p>-0.008756751</text:p>
          </table:table-cell>
          <table:table-cell table:number-columns-repeated="4"/>
        </table:table-row>
        <table:table-row table:style-name="ro1">
          <table:table-cell office:value-type="float" office:value="347.157928466797">
            <text:p>347.1579284668</text:p>
          </table:table-cell>
          <table:table-cell office:value-type="float" office:value="-0.00869242">
            <text:p>-0.00869242</text:p>
          </table:table-cell>
          <table:table-cell table:number-columns-repeated="4"/>
        </table:table-row>
        <table:table-row table:style-name="ro1">
          <table:table-cell office:value-type="float" office:value="347.267059326172">
            <text:p>347.2670593262</text:p>
          </table:table-cell>
          <table:table-cell office:value-type="float" office:value="0.002602618">
            <text:p>0.002602618</text:p>
          </table:table-cell>
          <table:table-cell table:number-columns-repeated="4"/>
        </table:table-row>
        <table:table-row table:style-name="ro1">
          <table:table-cell office:value-type="float" office:value="347.376190185547">
            <text:p>347.3761901855</text:p>
          </table:table-cell>
          <table:table-cell office:value-type="float" office:value="-0.002172594">
            <text:p>-0.002172594</text:p>
          </table:table-cell>
          <table:table-cell table:number-columns-repeated="4"/>
        </table:table-row>
        <table:table-row table:style-name="ro1">
          <table:table-cell office:value-type="float" office:value="347.4853515625">
            <text:p>347.4853515625</text:p>
          </table:table-cell>
          <table:table-cell office:value-type="float" office:value="0.00504324">
            <text:p>0.00504324</text:p>
          </table:table-cell>
          <table:table-cell table:number-columns-repeated="4"/>
        </table:table-row>
        <table:table-row table:style-name="ro1">
          <table:table-cell office:value-type="float" office:value="347.594482421875">
            <text:p>347.5944824219</text:p>
          </table:table-cell>
          <table:table-cell office:value-type="float" office:value="-0.01181706">
            <text:p>-0.01181706</text:p>
          </table:table-cell>
          <table:table-cell table:number-columns-repeated="4"/>
        </table:table-row>
        <table:table-row table:style-name="ro1">
          <table:table-cell office:value-type="float" office:value="347.703643798828">
            <text:p>347.7036437988</text:p>
          </table:table-cell>
          <table:table-cell office:value-type="float" office:value="0.00393224">
            <text:p>0.00393224</text:p>
          </table:table-cell>
          <table:table-cell table:number-columns-repeated="4"/>
        </table:table-row>
        <table:table-row table:style-name="ro1">
          <table:table-cell office:value-type="float" office:value="347.812805175781">
            <text:p>347.8128051758</text:p>
          </table:table-cell>
          <table:table-cell office:value-type="float" office:value="-0.0008647703">
            <text:p>-0.0008647703</text:p>
          </table:table-cell>
          <table:table-cell table:number-columns-repeated="4"/>
        </table:table-row>
        <table:table-row table:style-name="ro1">
          <table:table-cell office:value-type="float" office:value="347.921966552734">
            <text:p>347.9219665527</text:p>
          </table:table-cell>
          <table:table-cell office:value-type="float" office:value="0.002261562">
            <text:p>0.002261562</text:p>
          </table:table-cell>
          <table:table-cell table:number-columns-repeated="4"/>
        </table:table-row>
        <table:table-row table:style-name="ro1">
          <table:table-cell office:value-type="float" office:value="348.031158447266">
            <text:p>348.0311584473</text:p>
          </table:table-cell>
          <table:table-cell office:value-type="float" office:value="0.006800523">
            <text:p>0.006800523</text:p>
          </table:table-cell>
          <table:table-cell table:number-columns-repeated="4"/>
        </table:table-row>
        <table:table-row table:style-name="ro1">
          <table:table-cell office:value-type="float" office:value="348.140319824219">
            <text:p>348.1403198242</text:p>
          </table:table-cell>
          <table:table-cell office:value-type="float" office:value="0.001583443">
            <text:p>0.001583443</text:p>
          </table:table-cell>
          <table:table-cell table:number-columns-repeated="4"/>
        </table:table-row>
        <table:table-row table:style-name="ro1">
          <table:table-cell office:value-type="float" office:value="348.24951171875">
            <text:p>348.2495117188</text:p>
          </table:table-cell>
          <table:table-cell office:value-type="float" office:value="0.01298139">
            <text:p>0.01298139</text:p>
          </table:table-cell>
          <table:table-cell table:number-columns-repeated="4"/>
        </table:table-row>
        <table:table-row table:style-name="ro1">
          <table:table-cell office:value-type="float" office:value="348.358703613281">
            <text:p>348.3587036133</text:p>
          </table:table-cell>
          <table:table-cell office:value-type="float" office:value="-0.008444242">
            <text:p>-0.008444242</text:p>
          </table:table-cell>
          <table:table-cell table:number-columns-repeated="4"/>
        </table:table-row>
        <table:table-row table:style-name="ro1">
          <table:table-cell office:value-type="float" office:value="348.467926025391">
            <text:p>348.4679260254</text:p>
          </table:table-cell>
          <table:table-cell office:value-type="float" office:value="-0.0007637385">
            <text:p>-0.0007637385</text:p>
          </table:table-cell>
          <table:table-cell table:number-columns-repeated="4"/>
        </table:table-row>
        <table:table-row table:style-name="ro1">
          <table:table-cell office:value-type="float" office:value="348.577117919922">
            <text:p>348.5771179199</text:p>
          </table:table-cell>
          <table:table-cell office:value-type="float" office:value="-0.001543608">
            <text:p>-0.001543608</text:p>
          </table:table-cell>
          <table:table-cell table:number-columns-repeated="4"/>
        </table:table-row>
        <table:table-row table:style-name="ro1">
          <table:table-cell office:value-type="float" office:value="348.686340332031">
            <text:p>348.686340332</text:p>
          </table:table-cell>
          <table:table-cell office:value-type="float" office:value="0.01968663">
            <text:p>0.01968663</text:p>
          </table:table-cell>
          <table:table-cell table:number-columns-repeated="4"/>
        </table:table-row>
        <table:table-row table:style-name="ro1">
          <table:table-cell office:value-type="float" office:value="348.795562744141">
            <text:p>348.7955627441</text:p>
          </table:table-cell>
          <table:table-cell office:value-type="float" office:value="-0.0008586079">
            <text:p>-0.0008586079</text:p>
          </table:table-cell>
          <table:table-cell table:number-columns-repeated="4"/>
        </table:table-row>
        <table:table-row table:style-name="ro1">
          <table:table-cell office:value-type="float" office:value="348.90478515625">
            <text:p>348.9047851563</text:p>
          </table:table-cell>
          <table:table-cell office:value-type="float" office:value="0.005063996">
            <text:p>0.005063996</text:p>
          </table:table-cell>
          <table:table-cell table:number-columns-repeated="4"/>
        </table:table-row>
        <table:table-row table:style-name="ro1">
          <table:table-cell office:value-type="float" office:value="349.014038085938">
            <text:p>349.0140380859</text:p>
          </table:table-cell>
          <table:table-cell office:value-type="float" office:value="0.001217663">
            <text:p>0.001217663</text:p>
          </table:table-cell>
          <table:table-cell table:number-columns-repeated="4"/>
        </table:table-row>
        <table:table-row table:style-name="ro1">
          <table:table-cell office:value-type="float" office:value="349.123260498047">
            <text:p>349.123260498</text:p>
          </table:table-cell>
          <table:table-cell office:value-type="float" office:value="0.009948528">
            <text:p>0.009948528</text:p>
          </table:table-cell>
          <table:table-cell table:number-columns-repeated="4"/>
        </table:table-row>
        <table:table-row table:style-name="ro1">
          <table:table-cell office:value-type="float" office:value="349.232513427734">
            <text:p>349.2325134277</text:p>
          </table:table-cell>
          <table:table-cell office:value-type="float" office:value="-0.008707716">
            <text:p>-0.008707716</text:p>
          </table:table-cell>
          <table:table-cell table:number-columns-repeated="4"/>
        </table:table-row>
        <table:table-row table:style-name="ro1">
          <table:table-cell office:value-type="float" office:value="349.341766357422">
            <text:p>349.3417663574</text:p>
          </table:table-cell>
          <table:table-cell office:value-type="float" office:value="-0.009005493">
            <text:p>-0.009005493</text:p>
          </table:table-cell>
          <table:table-cell table:number-columns-repeated="4"/>
        </table:table-row>
        <table:table-row table:style-name="ro1">
          <table:table-cell office:value-type="float" office:value="349.451019287109">
            <text:p>349.4510192871</text:p>
          </table:table-cell>
          <table:table-cell office:value-type="float" office:value="0.008488341">
            <text:p>0.008488341</text:p>
          </table:table-cell>
          <table:table-cell table:number-columns-repeated="4"/>
        </table:table-row>
        <table:table-row table:style-name="ro1">
          <table:table-cell office:value-type="float" office:value="349.560302734375">
            <text:p>349.5603027344</text:p>
          </table:table-cell>
          <table:table-cell office:value-type="float" office:value="0.003418948">
            <text:p>0.003418948</text:p>
          </table:table-cell>
          <table:table-cell table:number-columns-repeated="4"/>
        </table:table-row>
        <table:table-row table:style-name="ro1">
          <table:table-cell office:value-type="float" office:value="349.669586181641">
            <text:p>349.6695861816</text:p>
          </table:table-cell>
          <table:table-cell office:value-type="float" office:value="-0.006783471">
            <text:p>-0.006783471</text:p>
          </table:table-cell>
          <table:table-cell table:number-columns-repeated="4"/>
        </table:table-row>
        <table:table-row table:style-name="ro1">
          <table:table-cell office:value-type="float" office:value="349.778839111328">
            <text:p>349.7788391113</text:p>
          </table:table-cell>
          <table:table-cell office:value-type="float" office:value="-0.003756392">
            <text:p>-0.003756392</text:p>
          </table:table-cell>
          <table:table-cell table:number-columns-repeated="4"/>
        </table:table-row>
        <table:table-row table:style-name="ro1">
          <table:table-cell office:value-type="float" office:value="349.888153076172">
            <text:p>349.8881530762</text:p>
          </table:table-cell>
          <table:table-cell office:value-type="float" office:value="0.01446066">
            <text:p>0.01446066</text:p>
          </table:table-cell>
          <table:table-cell table:number-columns-repeated="4"/>
        </table:table-row>
        <table:table-row table:style-name="ro1">
          <table:table-cell office:value-type="float" office:value="349.997436523438">
            <text:p>349.9974365234</text:p>
          </table:table-cell>
          <table:table-cell office:value-type="float" office:value="0.009927637">
            <text:p>0.009927637</text:p>
          </table:table-cell>
          <table:table-cell table:number-columns-repeated="4"/>
        </table:table-row>
        <table:table-row table:style-name="ro1">
          <table:table-cell office:value-type="float" office:value="350.106719970703">
            <text:p>350.1067199707</text:p>
          </table:table-cell>
          <table:table-cell office:value-type="float" office:value="0.009518604">
            <text:p>0.009518604</text:p>
          </table:table-cell>
          <table:table-cell table:number-columns-repeated="4"/>
        </table:table-row>
        <table:table-row table:style-name="ro1">
          <table:table-cell office:value-type="float" office:value="350.216033935547">
            <text:p>350.2160339355</text:p>
          </table:table-cell>
          <table:table-cell office:value-type="float" office:value="-0.007611021">
            <text:p>-0.007611021</text:p>
          </table:table-cell>
          <table:table-cell table:number-columns-repeated="4"/>
        </table:table-row>
        <table:table-row table:style-name="ro1">
          <table:table-cell office:value-type="float" office:value="350.325347900391">
            <text:p>350.3253479004</text:p>
          </table:table-cell>
          <table:table-cell office:value-type="float" office:value="-0.000918333">
            <text:p>-0.000918333</text:p>
          </table:table-cell>
          <table:table-cell table:number-columns-repeated="4"/>
        </table:table-row>
        <table:table-row table:style-name="ro1">
          <table:table-cell office:value-type="float" office:value="350.434661865234">
            <text:p>350.4346618652</text:p>
          </table:table-cell>
          <table:table-cell office:value-type="float" office:value="0.005952943">
            <text:p>0.005952943</text:p>
          </table:table-cell>
          <table:table-cell table:number-columns-repeated="4"/>
        </table:table-row>
        <table:table-row table:style-name="ro1">
          <table:table-cell office:value-type="float" office:value="350.544006347656">
            <text:p>350.5440063477</text:p>
          </table:table-cell>
          <table:table-cell office:value-type="float" office:value="0.003569404">
            <text:p>0.003569404</text:p>
          </table:table-cell>
          <table:table-cell table:number-columns-repeated="4"/>
        </table:table-row>
        <table:table-row table:style-name="ro1">
          <table:table-cell office:value-type="float" office:value="350.6533203125">
            <text:p>350.6533203125</text:p>
          </table:table-cell>
          <table:table-cell office:value-type="float" office:value="0.005123412">
            <text:p>0.005123412</text:p>
          </table:table-cell>
          <table:table-cell table:number-columns-repeated="4"/>
        </table:table-row>
        <table:table-row table:style-name="ro1">
          <table:table-cell office:value-type="float" office:value="350.762664794922">
            <text:p>350.7626647949</text:p>
          </table:table-cell>
          <table:table-cell office:value-type="float" office:value="0.004440204">
            <text:p>0.004440204</text:p>
          </table:table-cell>
          <table:table-cell table:number-columns-repeated="4"/>
        </table:table-row>
        <table:table-row table:style-name="ro1">
          <table:table-cell office:value-type="float" office:value="350.872009277344">
            <text:p>350.8720092773</text:p>
          </table:table-cell>
          <table:table-cell office:value-type="float" office:value="0.01281749">
            <text:p>0.01281749</text:p>
          </table:table-cell>
          <table:table-cell table:number-columns-repeated="4"/>
        </table:table-row>
        <table:table-row table:style-name="ro1">
          <table:table-cell office:value-type="float" office:value="350.981353759766">
            <text:p>350.9813537598</text:p>
          </table:table-cell>
          <table:table-cell office:value-type="float" office:value="-0.01077365">
            <text:p>-0.01077365</text:p>
          </table:table-cell>
          <table:table-cell table:number-columns-repeated="4"/>
        </table:table-row>
        <table:table-row table:style-name="ro1">
          <table:table-cell office:value-type="float" office:value="351.090728759766">
            <text:p>351.0907287598</text:p>
          </table:table-cell>
          <table:table-cell office:value-type="float" office:value="0.003047456">
            <text:p>0.003047456</text:p>
          </table:table-cell>
          <table:table-cell table:number-columns-repeated="4"/>
        </table:table-row>
        <table:table-row table:style-name="ro1">
          <table:table-cell office:value-type="float" office:value="351.200073242188">
            <text:p>351.2000732422</text:p>
          </table:table-cell>
          <table:table-cell office:value-type="float" office:value="0.002283974">
            <text:p>0.002283974</text:p>
          </table:table-cell>
          <table:table-cell table:number-columns-repeated="4"/>
        </table:table-row>
        <table:table-row table:style-name="ro1">
          <table:table-cell office:value-type="float" office:value="351.309448242188">
            <text:p>351.3094482422</text:p>
          </table:table-cell>
          <table:table-cell office:value-type="float" office:value="0.01130279">
            <text:p>0.01130279</text:p>
          </table:table-cell>
          <table:table-cell table:number-columns-repeated="4"/>
        </table:table-row>
        <table:table-row table:style-name="ro1">
          <table:table-cell office:value-type="float" office:value="351.418823242188">
            <text:p>351.4188232422</text:p>
          </table:table-cell>
          <table:table-cell office:value-type="float" office:value="0.008097465">
            <text:p>0.008097465</text:p>
          </table:table-cell>
          <table:table-cell table:number-columns-repeated="4"/>
        </table:table-row>
        <table:table-row table:style-name="ro1">
          <table:table-cell office:value-type="float" office:value="351.528228759766">
            <text:p>351.5282287598</text:p>
          </table:table-cell>
          <table:table-cell office:value-type="float" office:value="-0.008565827">
            <text:p>-0.008565827</text:p>
          </table:table-cell>
          <table:table-cell table:number-columns-repeated="4"/>
        </table:table-row>
        <table:table-row table:style-name="ro1">
          <table:table-cell office:value-type="float" office:value="351.637603759766">
            <text:p>351.6376037598</text:p>
          </table:table-cell>
          <table:table-cell office:value-type="float" office:value="0.01054595">
            <text:p>0.01054595</text:p>
          </table:table-cell>
          <table:table-cell table:number-columns-repeated="4"/>
        </table:table-row>
        <table:table-row table:style-name="ro1">
          <table:table-cell office:value-type="float" office:value="351.747009277344">
            <text:p>351.7470092773</text:p>
          </table:table-cell>
          <table:table-cell office:value-type="float" office:value="0.00164016">
            <text:p>0.00164016</text:p>
          </table:table-cell>
          <table:table-cell table:number-columns-repeated="4"/>
        </table:table-row>
        <table:table-row table:style-name="ro1">
          <table:table-cell office:value-type="float" office:value="351.856414794922">
            <text:p>351.8564147949</text:p>
          </table:table-cell>
          <table:table-cell office:value-type="float" office:value="-0.008235634">
            <text:p>-0.008235634</text:p>
          </table:table-cell>
          <table:table-cell table:number-columns-repeated="4"/>
        </table:table-row>
        <table:table-row table:style-name="ro1">
          <table:table-cell office:value-type="float" office:value="351.9658203125">
            <text:p>351.9658203125</text:p>
          </table:table-cell>
          <table:table-cell office:value-type="float" office:value="0.002205011">
            <text:p>0.002205011</text:p>
          </table:table-cell>
          <table:table-cell table:number-columns-repeated="4"/>
        </table:table-row>
        <table:table-row table:style-name="ro1">
          <table:table-cell office:value-type="float" office:value="352.075225830078">
            <text:p>352.0752258301</text:p>
          </table:table-cell>
          <table:table-cell office:value-type="float" office:value="-0.000421244">
            <text:p>-0.000421244</text:p>
          </table:table-cell>
          <table:table-cell table:number-columns-repeated="4"/>
        </table:table-row>
        <table:table-row table:style-name="ro1">
          <table:table-cell office:value-type="float" office:value="352.184661865234">
            <text:p>352.1846618652</text:p>
          </table:table-cell>
          <table:table-cell office:value-type="float" office:value="0.003617468">
            <text:p>0.003617468</text:p>
          </table:table-cell>
          <table:table-cell table:number-columns-repeated="4"/>
        </table:table-row>
        <table:table-row table:style-name="ro1">
          <table:table-cell office:value-type="float" office:value="352.294097900391">
            <text:p>352.2940979004</text:p>
          </table:table-cell>
          <table:table-cell office:value-type="float" office:value="0.005271125">
            <text:p>0.005271125</text:p>
          </table:table-cell>
          <table:table-cell table:number-columns-repeated="4"/>
        </table:table-row>
        <table:table-row table:style-name="ro1">
          <table:table-cell office:value-type="float" office:value="352.403533935547">
            <text:p>352.4035339355</text:p>
          </table:table-cell>
          <table:table-cell office:value-type="float" office:value="-0.00234586">
            <text:p>-0.00234586</text:p>
          </table:table-cell>
          <table:table-cell table:number-columns-repeated="4"/>
        </table:table-row>
        <table:table-row table:style-name="ro1">
          <table:table-cell office:value-type="float" office:value="352.512969970703">
            <text:p>352.5129699707</text:p>
          </table:table-cell>
          <table:table-cell office:value-type="float" office:value="0.001866367">
            <text:p>0.001866367</text:p>
          </table:table-cell>
          <table:table-cell table:number-columns-repeated="4"/>
        </table:table-row>
        <table:table-row table:style-name="ro1">
          <table:table-cell office:value-type="float" office:value="352.622406005859">
            <text:p>352.6224060059</text:p>
          </table:table-cell>
          <table:table-cell office:value-type="float" office:value="0.01675478">
            <text:p>0.01675478</text:p>
          </table:table-cell>
          <table:table-cell table:number-columns-repeated="4"/>
        </table:table-row>
        <table:table-row table:style-name="ro1">
          <table:table-cell office:value-type="float" office:value="352.731872558594">
            <text:p>352.7318725586</text:p>
          </table:table-cell>
          <table:table-cell office:value-type="float" office:value="-0.004597291">
            <text:p>-0.004597291</text:p>
          </table:table-cell>
          <table:table-cell table:number-columns-repeated="4"/>
        </table:table-row>
        <table:table-row table:style-name="ro1">
          <table:table-cell office:value-type="float" office:value="352.841339111328">
            <text:p>352.8413391113</text:p>
          </table:table-cell>
          <table:table-cell office:value-type="float" office:value="-0.00713058">
            <text:p>-0.00713058</text:p>
          </table:table-cell>
          <table:table-cell table:number-columns-repeated="4"/>
        </table:table-row>
        <table:table-row table:style-name="ro1">
          <table:table-cell office:value-type="float" office:value="352.950805664063">
            <text:p>352.9508056641</text:p>
          </table:table-cell>
          <table:table-cell office:value-type="float" office:value="0.01546569">
            <text:p>0.01546569</text:p>
          </table:table-cell>
          <table:table-cell table:number-columns-repeated="4"/>
        </table:table-row>
        <table:table-row table:style-name="ro1">
          <table:table-cell office:value-type="float" office:value="353.060272216797">
            <text:p>353.0602722168</text:p>
          </table:table-cell>
          <table:table-cell office:value-type="float" office:value="0.01117441">
            <text:p>0.01117441</text:p>
          </table:table-cell>
          <table:table-cell table:number-columns-repeated="4"/>
        </table:table-row>
        <table:table-row table:style-name="ro1">
          <table:table-cell office:value-type="float" office:value="353.169738769531">
            <text:p>353.1697387695</text:p>
          </table:table-cell>
          <table:table-cell office:value-type="float" office:value="-0.001379678">
            <text:p>-0.001379678</text:p>
          </table:table-cell>
          <table:table-cell table:number-columns-repeated="4"/>
        </table:table-row>
        <table:table-row table:style-name="ro1">
          <table:table-cell office:value-type="float" office:value="353.279235839844">
            <text:p>353.2792358398</text:p>
          </table:table-cell>
          <table:table-cell office:value-type="float" office:value="-0.002050626">
            <text:p>-0.002050626</text:p>
          </table:table-cell>
          <table:table-cell table:number-columns-repeated="4"/>
        </table:table-row>
        <table:table-row table:style-name="ro1">
          <table:table-cell office:value-type="float" office:value="353.388732910156">
            <text:p>353.3887329102</text:p>
          </table:table-cell>
          <table:table-cell office:value-type="float" office:value="0.005182718">
            <text:p>0.005182718</text:p>
          </table:table-cell>
          <table:table-cell table:number-columns-repeated="4"/>
        </table:table-row>
        <table:table-row table:style-name="ro1">
          <table:table-cell office:value-type="float" office:value="353.498229980469">
            <text:p>353.4982299805</text:p>
          </table:table-cell>
          <table:table-cell office:value-type="float" office:value="0.005016899">
            <text:p>0.005016899</text:p>
          </table:table-cell>
          <table:table-cell table:number-columns-repeated="4"/>
        </table:table-row>
        <table:table-row table:style-name="ro1">
          <table:table-cell office:value-type="float" office:value="353.607727050781">
            <text:p>353.6077270508</text:p>
          </table:table-cell>
          <table:table-cell office:value-type="float" office:value="0.00819344">
            <text:p>0.00819344</text:p>
          </table:table-cell>
          <table:table-cell table:number-columns-repeated="4"/>
        </table:table-row>
        <table:table-row table:style-name="ro1">
          <table:table-cell office:value-type="float" office:value="353.717254638672">
            <text:p>353.7172546387</text:p>
          </table:table-cell>
          <table:table-cell office:value-type="float" office:value="-0.0008742505">
            <text:p>-0.0008742505</text:p>
          </table:table-cell>
          <table:table-cell table:number-columns-repeated="4"/>
        </table:table-row>
        <table:table-row table:style-name="ro1">
          <table:table-cell office:value-type="float" office:value="353.826782226563">
            <text:p>353.8267822266</text:p>
          </table:table-cell>
          <table:table-cell office:value-type="float" office:value="-0.004060785">
            <text:p>-0.004060785</text:p>
          </table:table-cell>
          <table:table-cell table:number-columns-repeated="4"/>
        </table:table-row>
        <table:table-row table:style-name="ro1">
          <table:table-cell office:value-type="float" office:value="353.936309814453">
            <text:p>353.9363098145</text:p>
          </table:table-cell>
          <table:table-cell office:value-type="float" office:value="0.01591812">
            <text:p>0.01591812</text:p>
          </table:table-cell>
          <table:table-cell table:number-columns-repeated="4"/>
        </table:table-row>
        <table:table-row table:style-name="ro1">
          <table:table-cell office:value-type="float" office:value="354.045837402344">
            <text:p>354.0458374023</text:p>
          </table:table-cell>
          <table:table-cell office:value-type="float" office:value="-0.00464865">
            <text:p>-0.00464865</text:p>
          </table:table-cell>
          <table:table-cell table:number-columns-repeated="4"/>
        </table:table-row>
        <table:table-row table:style-name="ro1">
          <table:table-cell office:value-type="float" office:value="354.155364990234">
            <text:p>354.1553649902</text:p>
          </table:table-cell>
          <table:table-cell office:value-type="float" office:value="0.00499635">
            <text:p>0.00499635</text:p>
          </table:table-cell>
          <table:table-cell table:number-columns-repeated="4"/>
        </table:table-row>
        <table:table-row table:style-name="ro1">
          <table:table-cell office:value-type="float" office:value="354.264923095703">
            <text:p>354.2649230957</text:p>
          </table:table-cell>
          <table:table-cell office:value-type="float" office:value="0.002729551">
            <text:p>0.002729551</text:p>
          </table:table-cell>
          <table:table-cell table:number-columns-repeated="4"/>
        </table:table-row>
        <table:table-row table:style-name="ro1">
          <table:table-cell office:value-type="float" office:value="354.374481201172">
            <text:p>354.3744812012</text:p>
          </table:table-cell>
          <table:table-cell office:value-type="float" office:value="0.005740423">
            <text:p>0.005740423</text:p>
          </table:table-cell>
          <table:table-cell table:number-columns-repeated="4"/>
        </table:table-row>
        <table:table-row table:style-name="ro1">
          <table:table-cell office:value-type="float" office:value="354.484039306641">
            <text:p>354.4840393066</text:p>
          </table:table-cell>
          <table:table-cell office:value-type="float" office:value="0.003757245">
            <text:p>0.003757245</text:p>
          </table:table-cell>
          <table:table-cell table:number-columns-repeated="4"/>
        </table:table-row>
        <table:table-row table:style-name="ro1">
          <table:table-cell office:value-type="float" office:value="354.593597412109">
            <text:p>354.5935974121</text:p>
          </table:table-cell>
          <table:table-cell office:value-type="float" office:value="0.003685752">
            <text:p>0.003685752</text:p>
          </table:table-cell>
          <table:table-cell table:number-columns-repeated="4"/>
        </table:table-row>
        <table:table-row table:style-name="ro1">
          <table:table-cell office:value-type="float" office:value="354.703155517578">
            <text:p>354.7031555176</text:p>
          </table:table-cell>
          <table:table-cell office:value-type="float" office:value="0.001864188">
            <text:p>0.001864188</text:p>
          </table:table-cell>
          <table:table-cell table:number-columns-repeated="4"/>
        </table:table-row>
        <table:table-row table:style-name="ro1">
          <table:table-cell office:value-type="float" office:value="354.812744140625">
            <text:p>354.8127441406</text:p>
          </table:table-cell>
          <table:table-cell office:value-type="float" office:value="0.01145365">
            <text:p>0.01145365</text:p>
          </table:table-cell>
          <table:table-cell table:number-columns-repeated="4"/>
        </table:table-row>
        <table:table-row table:style-name="ro1">
          <table:table-cell office:value-type="float" office:value="354.922332763672">
            <text:p>354.9223327637</text:p>
          </table:table-cell>
          <table:table-cell office:value-type="float" office:value="0.0006166624">
            <text:p>0.0006166624</text:p>
          </table:table-cell>
          <table:table-cell table:number-columns-repeated="4"/>
        </table:table-row>
        <table:table-row table:style-name="ro1">
          <table:table-cell office:value-type="float" office:value="355.031921386719">
            <text:p>355.0319213867</text:p>
          </table:table-cell>
          <table:table-cell office:value-type="float" office:value="0.006752285">
            <text:p>0.006752285</text:p>
          </table:table-cell>
          <table:table-cell table:number-columns-repeated="4"/>
        </table:table-row>
        <table:table-row table:style-name="ro1">
          <table:table-cell office:value-type="float" office:value="355.141510009766">
            <text:p>355.1415100098</text:p>
          </table:table-cell>
          <table:table-cell office:value-type="float" office:value="-0.002466033">
            <text:p>-0.002466033</text:p>
          </table:table-cell>
          <table:table-cell table:number-columns-repeated="4"/>
        </table:table-row>
        <table:table-row table:style-name="ro1">
          <table:table-cell office:value-type="float" office:value="355.251129150391">
            <text:p>355.2511291504</text:p>
          </table:table-cell>
          <table:table-cell office:value-type="float" office:value="0.003870827">
            <text:p>0.003870827</text:p>
          </table:table-cell>
          <table:table-cell table:number-columns-repeated="4"/>
        </table:table-row>
        <table:table-row table:style-name="ro1">
          <table:table-cell office:value-type="float" office:value="355.360717773438">
            <text:p>355.3607177734</text:p>
          </table:table-cell>
          <table:table-cell office:value-type="float" office:value="0.003018853">
            <text:p>0.003018853</text:p>
          </table:table-cell>
          <table:table-cell table:number-columns-repeated="4"/>
        </table:table-row>
        <table:table-row table:style-name="ro1">
          <table:table-cell office:value-type="float" office:value="355.470336914063">
            <text:p>355.4703369141</text:p>
          </table:table-cell>
          <table:table-cell office:value-type="float" office:value="0.0007789153">
            <text:p>0.0007789153</text:p>
          </table:table-cell>
          <table:table-cell table:number-columns-repeated="4"/>
        </table:table-row>
        <table:table-row table:style-name="ro1">
          <table:table-cell office:value-type="float" office:value="355.579956054688">
            <text:p>355.5799560547</text:p>
          </table:table-cell>
          <table:table-cell office:value-type="float" office:value="0.008823338">
            <text:p>0.008823338</text:p>
          </table:table-cell>
          <table:table-cell table:number-columns-repeated="4"/>
        </table:table-row>
        <table:table-row table:style-name="ro1">
          <table:table-cell office:value-type="float" office:value="355.689605712891">
            <text:p>355.6896057129</text:p>
          </table:table-cell>
          <table:table-cell office:value-type="float" office:value="0.01262111">
            <text:p>0.01262111</text:p>
          </table:table-cell>
          <table:table-cell table:number-columns-repeated="4"/>
        </table:table-row>
        <table:table-row table:style-name="ro1">
          <table:table-cell office:value-type="float" office:value="355.799224853516">
            <text:p>355.7992248535</text:p>
          </table:table-cell>
          <table:table-cell office:value-type="float" office:value="0.01417643">
            <text:p>0.01417643</text:p>
          </table:table-cell>
          <table:table-cell table:number-columns-repeated="4"/>
        </table:table-row>
        <table:table-row table:style-name="ro1">
          <table:table-cell office:value-type="float" office:value="355.908874511719">
            <text:p>355.9088745117</text:p>
          </table:table-cell>
          <table:table-cell office:value-type="float" office:value="-0.006172351">
            <text:p>-0.006172351</text:p>
          </table:table-cell>
          <table:table-cell table:number-columns-repeated="4"/>
        </table:table-row>
        <table:table-row table:style-name="ro1">
          <table:table-cell office:value-type="float" office:value="356.018524169922">
            <text:p>356.0185241699</text:p>
          </table:table-cell>
          <table:table-cell office:value-type="float" office:value="0.01046337">
            <text:p>0.01046337</text:p>
          </table:table-cell>
          <table:table-cell table:number-columns-repeated="4"/>
        </table:table-row>
        <table:table-row table:style-name="ro1">
          <table:table-cell office:value-type="float" office:value="356.128173828125">
            <text:p>356.1281738281</text:p>
          </table:table-cell>
          <table:table-cell office:value-type="float" office:value="-0.002813441">
            <text:p>-0.002813441</text:p>
          </table:table-cell>
          <table:table-cell table:number-columns-repeated="4"/>
        </table:table-row>
        <table:table-row table:style-name="ro1">
          <table:table-cell office:value-type="float" office:value="356.237823486328">
            <text:p>356.2378234863</text:p>
          </table:table-cell>
          <table:table-cell office:value-type="float" office:value="-0.005278667">
            <text:p>-0.005278667</text:p>
          </table:table-cell>
          <table:table-cell table:number-columns-repeated="4"/>
        </table:table-row>
        <table:table-row table:style-name="ro1">
          <table:table-cell office:value-type="float" office:value="356.347503662109">
            <text:p>356.3475036621</text:p>
          </table:table-cell>
          <table:table-cell office:value-type="float" office:value="0.003861682">
            <text:p>0.003861682</text:p>
          </table:table-cell>
          <table:table-cell table:number-columns-repeated="4"/>
        </table:table-row>
        <table:table-row table:style-name="ro1">
          <table:table-cell office:value-type="float" office:value="356.457183837891">
            <text:p>356.4571838379</text:p>
          </table:table-cell>
          <table:table-cell office:value-type="float" office:value="0.003008819">
            <text:p>0.003008819</text:p>
          </table:table-cell>
          <table:table-cell table:number-columns-repeated="4"/>
        </table:table-row>
        <table:table-row table:style-name="ro1">
          <table:table-cell office:value-type="float" office:value="356.566864013672">
            <text:p>356.5668640137</text:p>
          </table:table-cell>
          <table:table-cell office:value-type="float" office:value="0.001223081">
            <text:p>0.001223081</text:p>
          </table:table-cell>
          <table:table-cell table:number-columns-repeated="4"/>
        </table:table-row>
        <table:table-row table:style-name="ro1">
          <table:table-cell office:value-type="float" office:value="356.676544189453">
            <text:p>356.6765441895</text:p>
          </table:table-cell>
          <table:table-cell office:value-type="float" office:value="-0.005649687">
            <text:p>-0.005649687</text:p>
          </table:table-cell>
          <table:table-cell table:number-columns-repeated="4"/>
        </table:table-row>
        <table:table-row table:style-name="ro1">
          <table:table-cell office:value-type="float" office:value="356.786224365234">
            <text:p>356.7862243652</text:p>
          </table:table-cell>
          <table:table-cell office:value-type="float" office:value="-0.005822403">
            <text:p>-0.005822403</text:p>
          </table:table-cell>
          <table:table-cell table:number-columns-repeated="4"/>
        </table:table-row>
        <table:table-row table:style-name="ro1">
          <table:table-cell office:value-type="float" office:value="356.895935058594">
            <text:p>356.8959350586</text:p>
          </table:table-cell>
          <table:table-cell office:value-type="float" office:value="-0.005943328">
            <text:p>-0.005943328</text:p>
          </table:table-cell>
          <table:table-cell table:number-columns-repeated="4"/>
        </table:table-row>
        <table:table-row table:style-name="ro1">
          <table:table-cell office:value-type="float" office:value="357.005645751953">
            <text:p>357.005645752</text:p>
          </table:table-cell>
          <table:table-cell office:value-type="float" office:value="-0.008079506">
            <text:p>-0.008079506</text:p>
          </table:table-cell>
          <table:table-cell table:number-columns-repeated="4"/>
        </table:table-row>
        <table:table-row table:style-name="ro1">
          <table:table-cell office:value-type="float" office:value="357.115356445313">
            <text:p>357.1153564453</text:p>
          </table:table-cell>
          <table:table-cell office:value-type="float" office:value="0.000292081">
            <text:p>0.000292081</text:p>
          </table:table-cell>
          <table:table-cell table:number-columns-repeated="4"/>
        </table:table-row>
        <table:table-row table:style-name="ro1">
          <table:table-cell office:value-type="float" office:value="357.225067138672">
            <text:p>357.2250671387</text:p>
          </table:table-cell>
          <table:table-cell office:value-type="float" office:value="0.003898786">
            <text:p>0.003898786</text:p>
          </table:table-cell>
          <table:table-cell table:number-columns-repeated="4"/>
        </table:table-row>
        <table:table-row table:style-name="ro1">
          <table:table-cell office:value-type="float" office:value="357.334777832031">
            <text:p>357.334777832</text:p>
          </table:table-cell>
          <table:table-cell office:value-type="float" office:value="0.003617486">
            <text:p>0.003617486</text:p>
          </table:table-cell>
          <table:table-cell table:number-columns-repeated="4"/>
        </table:table-row>
        <table:table-row table:style-name="ro1">
          <table:table-cell office:value-type="float" office:value="357.444519042969">
            <text:p>357.444519043</text:p>
          </table:table-cell>
          <table:table-cell office:value-type="float" office:value="0.007688948">
            <text:p>0.007688948</text:p>
          </table:table-cell>
          <table:table-cell table:number-columns-repeated="4"/>
        </table:table-row>
        <table:table-row table:style-name="ro1">
          <table:table-cell office:value-type="float" office:value="357.554260253906">
            <text:p>357.5542602539</text:p>
          </table:table-cell>
          <table:table-cell office:value-type="float" office:value="-0.00433439">
            <text:p>-0.00433439</text:p>
          </table:table-cell>
          <table:table-cell table:number-columns-repeated="4"/>
        </table:table-row>
        <table:table-row table:style-name="ro1">
          <table:table-cell office:value-type="float" office:value="357.664001464844">
            <text:p>357.6640014648</text:p>
          </table:table-cell>
          <table:table-cell office:value-type="float" office:value="-0.0008585656">
            <text:p>-0.0008585656</text:p>
          </table:table-cell>
          <table:table-cell table:number-columns-repeated="4"/>
        </table:table-row>
        <table:table-row table:style-name="ro1">
          <table:table-cell office:value-type="float" office:value="357.773742675781">
            <text:p>357.7737426758</text:p>
          </table:table-cell>
          <table:table-cell office:value-type="float" office:value="0.01474736">
            <text:p>0.01474736</text:p>
          </table:table-cell>
          <table:table-cell table:number-columns-repeated="4"/>
        </table:table-row>
        <table:table-row table:style-name="ro1">
          <table:table-cell office:value-type="float" office:value="357.883514404297">
            <text:p>357.8835144043</text:p>
          </table:table-cell>
          <table:table-cell office:value-type="float" office:value="0.001310314">
            <text:p>0.001310314</text:p>
          </table:table-cell>
          <table:table-cell table:number-columns-repeated="4"/>
        </table:table-row>
        <table:table-row table:style-name="ro1">
          <table:table-cell office:value-type="float" office:value="357.993286132813">
            <text:p>357.9932861328</text:p>
          </table:table-cell>
          <table:table-cell office:value-type="float" office:value="-0.000949987">
            <text:p>-0.000949987</text:p>
          </table:table-cell>
          <table:table-cell table:number-columns-repeated="4"/>
        </table:table-row>
        <table:table-row table:style-name="ro1">
          <table:table-cell office:value-type="float" office:value="358.10302734375">
            <text:p>358.1030273438</text:p>
          </table:table-cell>
          <table:table-cell office:value-type="float" office:value="0.009798704">
            <text:p>0.009798704</text:p>
          </table:table-cell>
          <table:table-cell table:number-columns-repeated="4"/>
        </table:table-row>
        <table:table-row table:style-name="ro1">
          <table:table-cell office:value-type="float" office:value="358.212829589844">
            <text:p>358.2128295898</text:p>
          </table:table-cell>
          <table:table-cell office:value-type="float" office:value="0.01057744">
            <text:p>0.01057744</text:p>
          </table:table-cell>
          <table:table-cell table:number-columns-repeated="4"/>
        </table:table-row>
        <table:table-row table:style-name="ro1">
          <table:table-cell office:value-type="float" office:value="358.322601318359">
            <text:p>358.3226013184</text:p>
          </table:table-cell>
          <table:table-cell office:value-type="float" office:value="0.003147061">
            <text:p>0.003147061</text:p>
          </table:table-cell>
          <table:table-cell table:number-columns-repeated="4"/>
        </table:table-row>
        <table:table-row table:style-name="ro1">
          <table:table-cell office:value-type="float" office:value="358.432373046875">
            <text:p>358.4323730469</text:p>
          </table:table-cell>
          <table:table-cell office:value-type="float" office:value="0.007180858">
            <text:p>0.007180858</text:p>
          </table:table-cell>
          <table:table-cell table:number-columns-repeated="4"/>
        </table:table-row>
        <table:table-row table:style-name="ro1">
          <table:table-cell office:value-type="float" office:value="358.542175292969">
            <text:p>358.542175293</text:p>
          </table:table-cell>
          <table:table-cell office:value-type="float" office:value="-0.004715101">
            <text:p>-0.004715101</text:p>
          </table:table-cell>
          <table:table-cell table:number-columns-repeated="4"/>
        </table:table-row>
        <table:table-row table:style-name="ro1">
          <table:table-cell office:value-type="float" office:value="358.651977539063">
            <text:p>358.6519775391</text:p>
          </table:table-cell>
          <table:table-cell office:value-type="float" office:value="0.002185221">
            <text:p>0.002185221</text:p>
          </table:table-cell>
          <table:table-cell table:number-columns-repeated="4"/>
        </table:table-row>
        <table:table-row table:style-name="ro1">
          <table:table-cell office:value-type="float" office:value="358.761779785156">
            <text:p>358.7617797852</text:p>
          </table:table-cell>
          <table:table-cell office:value-type="float" office:value="0.0090333">
            <text:p>0.0090333</text:p>
          </table:table-cell>
          <table:table-cell table:number-columns-repeated="4"/>
        </table:table-row>
        <table:table-row table:style-name="ro1">
          <table:table-cell office:value-type="float" office:value="358.871612548828">
            <text:p>358.8716125488</text:p>
          </table:table-cell>
          <table:table-cell office:value-type="float" office:value="-0.005472638">
            <text:p>-0.005472638</text:p>
          </table:table-cell>
          <table:table-cell table:number-columns-repeated="4"/>
        </table:table-row>
        <table:table-row table:style-name="ro1">
          <table:table-cell office:value-type="float" office:value="358.981414794922">
            <text:p>358.9814147949</text:p>
          </table:table-cell>
          <table:table-cell office:value-type="float" office:value="0.00206763">
            <text:p>0.00206763</text:p>
          </table:table-cell>
          <table:table-cell table:number-columns-repeated="4"/>
        </table:table-row>
        <table:table-row table:style-name="ro1">
          <table:table-cell office:value-type="float" office:value="359.091247558594">
            <text:p>359.0912475586</text:p>
          </table:table-cell>
          <table:table-cell office:value-type="float" office:value="0.01472148">
            <text:p>0.01472148</text:p>
          </table:table-cell>
          <table:table-cell table:number-columns-repeated="4"/>
        </table:table-row>
        <table:table-row table:style-name="ro1">
          <table:table-cell office:value-type="float" office:value="359.201080322266">
            <text:p>359.2010803223</text:p>
          </table:table-cell>
          <table:table-cell office:value-type="float" office:value="0.005216882">
            <text:p>0.005216882</text:p>
          </table:table-cell>
          <table:table-cell table:number-columns-repeated="4"/>
        </table:table-row>
        <table:table-row table:style-name="ro1">
          <table:table-cell office:value-type="float" office:value="359.310913085938">
            <text:p>359.3109130859</text:p>
          </table:table-cell>
          <table:table-cell office:value-type="float" office:value="0.001036683">
            <text:p>0.001036683</text:p>
          </table:table-cell>
          <table:table-cell table:number-columns-repeated="4"/>
        </table:table-row>
        <table:table-row table:style-name="ro1">
          <table:table-cell office:value-type="float" office:value="359.420776367188">
            <text:p>359.4207763672</text:p>
          </table:table-cell>
          <table:table-cell office:value-type="float" office:value="-0.009017445">
            <text:p>-0.009017445</text:p>
          </table:table-cell>
          <table:table-cell table:number-columns-repeated="4"/>
        </table:table-row>
        <table:table-row table:style-name="ro1">
          <table:table-cell office:value-type="float" office:value="359.530609130859">
            <text:p>359.5306091309</text:p>
          </table:table-cell>
          <table:table-cell office:value-type="float" office:value="0.01165855">
            <text:p>0.01165855</text:p>
          </table:table-cell>
          <table:table-cell table:number-columns-repeated="4"/>
        </table:table-row>
        <table:table-row table:style-name="ro1">
          <table:table-cell office:value-type="float" office:value="359.640472412109">
            <text:p>359.6404724121</text:p>
          </table:table-cell>
          <table:table-cell office:value-type="float" office:value="-0.0008192227">
            <text:p>-0.0008192227</text:p>
          </table:table-cell>
          <table:table-cell table:number-columns-repeated="4"/>
        </table:table-row>
        <table:table-row table:style-name="ro1">
          <table:table-cell office:value-type="float" office:value="359.750335693359">
            <text:p>359.7503356934</text:p>
          </table:table-cell>
          <table:table-cell office:value-type="float" office:value="-0.001629036">
            <text:p>-0.001629036</text:p>
          </table:table-cell>
          <table:table-cell table:number-columns-repeated="4"/>
        </table:table-row>
        <table:table-row table:style-name="ro1">
          <table:table-cell office:value-type="float" office:value="359.860198974609">
            <text:p>359.8601989746</text:p>
          </table:table-cell>
          <table:table-cell office:value-type="float" office:value="0.0003648962">
            <text:p>0.0003648962</text:p>
          </table:table-cell>
          <table:table-cell table:number-columns-repeated="4"/>
        </table:table-row>
        <table:table-row table:style-name="ro1">
          <table:table-cell office:value-type="float" office:value="359.970092773438">
            <text:p>359.9700927734</text:p>
          </table:table-cell>
          <table:table-cell office:value-type="float" office:value="0.007121339">
            <text:p>0.007121339</text:p>
          </table:table-cell>
          <table:table-cell table:number-columns-repeated="4"/>
        </table:table-row>
        <table:table-row table:style-name="ro1">
          <table:table-cell office:value-type="float" office:value="360.079986572266">
            <text:p>360.0799865723</text:p>
          </table:table-cell>
          <table:table-cell office:value-type="float" office:value="-0.005427741">
            <text:p>-0.005427741</text:p>
          </table:table-cell>
          <table:table-cell table:number-columns-repeated="4"/>
        </table:table-row>
        <table:table-row table:style-name="ro1">
          <table:table-cell office:value-type="float" office:value="360.189849853516">
            <text:p>360.1898498535</text:p>
          </table:table-cell>
          <table:table-cell office:value-type="float" office:value="0.01245541">
            <text:p>0.01245541</text:p>
          </table:table-cell>
          <table:table-cell table:number-columns-repeated="4"/>
        </table:table-row>
        <table:table-row table:style-name="ro1">
          <table:table-cell office:value-type="float" office:value="360.299743652344">
            <text:p>360.2997436523</text:p>
          </table:table-cell>
          <table:table-cell office:value-type="float" office:value="0.01176024">
            <text:p>0.01176024</text:p>
          </table:table-cell>
          <table:table-cell table:number-columns-repeated="4"/>
        </table:table-row>
        <table:table-row table:style-name="ro1">
          <table:table-cell office:value-type="float" office:value="360.40966796875">
            <text:p>360.4096679688</text:p>
          </table:table-cell>
          <table:table-cell office:value-type="float" office:value="0.009479216">
            <text:p>0.009479216</text:p>
          </table:table-cell>
          <table:table-cell table:number-columns-repeated="4"/>
        </table:table-row>
        <table:table-row table:style-name="ro1">
          <table:table-cell office:value-type="float" office:value="360.519561767578">
            <text:p>360.5195617676</text:p>
          </table:table-cell>
          <table:table-cell office:value-type="float" office:value="0.003812491">
            <text:p>0.003812491</text:p>
          </table:table-cell>
          <table:table-cell table:number-columns-repeated="4"/>
        </table:table-row>
        <table:table-row table:style-name="ro1">
          <table:table-cell office:value-type="float" office:value="360.629486083984">
            <text:p>360.629486084</text:p>
          </table:table-cell>
          <table:table-cell office:value-type="float" office:value="0.0028202">
            <text:p>0.0028202</text:p>
          </table:table-cell>
          <table:table-cell table:number-columns-repeated="4"/>
        </table:table-row>
        <table:table-row table:style-name="ro1">
          <table:table-cell office:value-type="float" office:value="360.739410400391">
            <text:p>360.7394104004</text:p>
          </table:table-cell>
          <table:table-cell office:value-type="float" office:value="-0.003438495">
            <text:p>-0.003438495</text:p>
          </table:table-cell>
          <table:table-cell table:number-columns-repeated="4"/>
        </table:table-row>
        <table:table-row table:style-name="ro1">
          <table:table-cell office:value-type="float" office:value="360.849334716797">
            <text:p>360.8493347168</text:p>
          </table:table-cell>
          <table:table-cell office:value-type="float" office:value="0.006135249">
            <text:p>0.006135249</text:p>
          </table:table-cell>
          <table:table-cell table:number-columns-repeated="4"/>
        </table:table-row>
        <table:table-row table:style-name="ro1">
          <table:table-cell office:value-type="float" office:value="360.959259033203">
            <text:p>360.9592590332</text:p>
          </table:table-cell>
          <table:table-cell office:value-type="float" office:value="-0.008084182">
            <text:p>-0.008084182</text:p>
          </table:table-cell>
          <table:table-cell table:number-columns-repeated="4"/>
        </table:table-row>
        <table:table-row table:style-name="ro1">
          <table:table-cell office:value-type="float" office:value="361.069213867188">
            <text:p>361.0692138672</text:p>
          </table:table-cell>
          <table:table-cell office:value-type="string">
            <text:p>-6.228466E-05</text:p>
          </table:table-cell>
          <table:table-cell table:number-columns-repeated="4"/>
        </table:table-row>
        <table:table-row table:style-name="ro1">
          <table:table-cell office:value-type="float" office:value="361.179168701172">
            <text:p>361.1791687012</text:p>
          </table:table-cell>
          <table:table-cell office:value-type="float" office:value="-0.0002893191">
            <text:p>-0.0002893191</text:p>
          </table:table-cell>
          <table:table-cell table:number-columns-repeated="4"/>
        </table:table-row>
        <table:table-row table:style-name="ro1">
          <table:table-cell office:value-type="float" office:value="361.289093017578">
            <text:p>361.2890930176</text:p>
          </table:table-cell>
          <table:table-cell office:value-type="float" office:value="0.001977733">
            <text:p>0.001977733</text:p>
          </table:table-cell>
          <table:table-cell table:number-columns-repeated="4"/>
        </table:table-row>
        <table:table-row table:style-name="ro1">
          <table:table-cell office:value-type="float" office:value="361.399078369141">
            <text:p>361.3990783691</text:p>
          </table:table-cell>
          <table:table-cell office:value-type="float" office:value="0.003853807">
            <text:p>0.003853807</text:p>
          </table:table-cell>
          <table:table-cell table:number-columns-repeated="4"/>
        </table:table-row>
        <table:table-row table:style-name="ro1">
          <table:table-cell office:value-type="float" office:value="361.509033203125">
            <text:p>361.5090332031</text:p>
          </table:table-cell>
          <table:table-cell office:value-type="float" office:value="-0.006685247">
            <text:p>-0.006685247</text:p>
          </table:table-cell>
          <table:table-cell table:number-columns-repeated="4"/>
        </table:table-row>
        <table:table-row table:style-name="ro1">
          <table:table-cell office:value-type="float" office:value="361.619018554688">
            <text:p>361.6190185547</text:p>
          </table:table-cell>
          <table:table-cell office:value-type="float" office:value="-0.005496413">
            <text:p>-0.005496413</text:p>
          </table:table-cell>
          <table:table-cell table:number-columns-repeated="4"/>
        </table:table-row>
        <table:table-row table:style-name="ro1">
          <table:table-cell office:value-type="float" office:value="361.728973388672">
            <text:p>361.7289733887</text:p>
          </table:table-cell>
          <table:table-cell office:value-type="float" office:value="0.007883203">
            <text:p>0.007883203</text:p>
          </table:table-cell>
          <table:table-cell table:number-columns-repeated="4"/>
        </table:table-row>
        <table:table-row table:style-name="ro1">
          <table:table-cell office:value-type="float" office:value="361.838958740234">
            <text:p>361.8389587402</text:p>
          </table:table-cell>
          <table:table-cell office:value-type="float" office:value="0.00241527">
            <text:p>0.00241527</text:p>
          </table:table-cell>
          <table:table-cell table:number-columns-repeated="4"/>
        </table:table-row>
        <table:table-row table:style-name="ro1">
          <table:table-cell office:value-type="float" office:value="361.948944091797">
            <text:p>361.9489440918</text:p>
          </table:table-cell>
          <table:table-cell office:value-type="float" office:value="0.0003723637">
            <text:p>0.0003723637</text:p>
          </table:table-cell>
          <table:table-cell table:number-columns-repeated="4"/>
        </table:table-row>
        <table:table-row table:style-name="ro1">
          <table:table-cell office:value-type="float" office:value="362.058959960938">
            <text:p>362.0589599609</text:p>
          </table:table-cell>
          <table:table-cell office:value-type="float" office:value="-0.0005907053">
            <text:p>-0.0005907053</text:p>
          </table:table-cell>
          <table:table-cell table:number-columns-repeated="4"/>
        </table:table-row>
        <table:table-row table:style-name="ro1">
          <table:table-cell office:value-type="float" office:value="362.1689453125">
            <text:p>362.1689453125</text:p>
          </table:table-cell>
          <table:table-cell office:value-type="float" office:value="0.004297743">
            <text:p>0.004297743</text:p>
          </table:table-cell>
          <table:table-cell table:number-columns-repeated="4"/>
        </table:table-row>
        <table:table-row table:style-name="ro1">
          <table:table-cell office:value-type="float" office:value="362.278961181641">
            <text:p>362.2789611816</text:p>
          </table:table-cell>
          <table:table-cell office:value-type="float" office:value="0.01737295">
            <text:p>0.01737295</text:p>
          </table:table-cell>
          <table:table-cell table:number-columns-repeated="4"/>
        </table:table-row>
        <table:table-row table:style-name="ro1">
          <table:table-cell office:value-type="float" office:value="362.388977050781">
            <text:p>362.3889770508</text:p>
          </table:table-cell>
          <table:table-cell office:value-type="float" office:value="0.01041399">
            <text:p>0.01041399</text:p>
          </table:table-cell>
          <table:table-cell table:number-columns-repeated="4"/>
        </table:table-row>
        <table:table-row table:style-name="ro1">
          <table:table-cell office:value-type="float" office:value="362.498992919922">
            <text:p>362.4989929199</text:p>
          </table:table-cell>
          <table:table-cell office:value-type="float" office:value="-0.0007476792">
            <text:p>-0.0007476792</text:p>
          </table:table-cell>
          <table:table-cell table:number-columns-repeated="4"/>
        </table:table-row>
        <table:table-row table:style-name="ro1">
          <table:table-cell office:value-type="float" office:value="362.609039306641">
            <text:p>362.6090393066</text:p>
          </table:table-cell>
          <table:table-cell office:value-type="float" office:value="-0.002044813">
            <text:p>-0.002044813</text:p>
          </table:table-cell>
          <table:table-cell table:number-columns-repeated="4"/>
        </table:table-row>
        <table:table-row table:style-name="ro1">
          <table:table-cell office:value-type="float" office:value="362.719055175781">
            <text:p>362.7190551758</text:p>
          </table:table-cell>
          <table:table-cell office:value-type="float" office:value="0.007763628">
            <text:p>0.007763628</text:p>
          </table:table-cell>
          <table:table-cell table:number-columns-repeated="4"/>
        </table:table-row>
        <table:table-row table:style-name="ro1">
          <table:table-cell office:value-type="float" office:value="362.8291015625">
            <text:p>362.8291015625</text:p>
          </table:table-cell>
          <table:table-cell office:value-type="float" office:value="0.01180357">
            <text:p>0.01180357</text:p>
          </table:table-cell>
          <table:table-cell table:number-columns-repeated="4"/>
        </table:table-row>
        <table:table-row table:style-name="ro1">
          <table:table-cell office:value-type="float" office:value="362.939147949219">
            <text:p>362.9391479492</text:p>
          </table:table-cell>
          <table:table-cell office:value-type="float" office:value="0.0008683686">
            <text:p>0.0008683686</text:p>
          </table:table-cell>
          <table:table-cell table:number-columns-repeated="4"/>
        </table:table-row>
        <table:table-row table:style-name="ro1">
          <table:table-cell office:value-type="float" office:value="363.049224853516">
            <text:p>363.0492248535</text:p>
          </table:table-cell>
          <table:table-cell office:value-type="float" office:value="-0.0007311311">
            <text:p>-0.0007311311</text:p>
          </table:table-cell>
          <table:table-cell table:number-columns-repeated="4"/>
        </table:table-row>
        <table:table-row table:style-name="ro1">
          <table:table-cell office:value-type="float" office:value="363.159271240234">
            <text:p>363.1592712402</text:p>
          </table:table-cell>
          <table:table-cell office:value-type="float" office:value="-0.000862432">
            <text:p>-0.000862432</text:p>
          </table:table-cell>
          <table:table-cell table:number-columns-repeated="4"/>
        </table:table-row>
        <table:table-row table:style-name="ro1">
          <table:table-cell office:value-type="float" office:value="363.269348144531">
            <text:p>363.2693481445</text:p>
          </table:table-cell>
          <table:table-cell office:value-type="float" office:value="0.005945758">
            <text:p>0.005945758</text:p>
          </table:table-cell>
          <table:table-cell table:number-columns-repeated="4"/>
        </table:table-row>
        <table:table-row table:style-name="ro1">
          <table:table-cell office:value-type="float" office:value="363.37939453125">
            <text:p>363.3793945313</text:p>
          </table:table-cell>
          <table:table-cell office:value-type="float" office:value="0.005593059">
            <text:p>0.005593059</text:p>
          </table:table-cell>
          <table:table-cell table:number-columns-repeated="4"/>
        </table:table-row>
        <table:table-row table:style-name="ro1">
          <table:table-cell office:value-type="float" office:value="363.489501953125">
            <text:p>363.4895019531</text:p>
          </table:table-cell>
          <table:table-cell office:value-type="float" office:value="-0.006820907">
            <text:p>-0.006820907</text:p>
          </table:table-cell>
          <table:table-cell table:number-columns-repeated="4"/>
        </table:table-row>
        <table:table-row table:style-name="ro1">
          <table:table-cell office:value-type="float" office:value="363.599578857422">
            <text:p>363.5995788574</text:p>
          </table:table-cell>
          <table:table-cell office:value-type="float" office:value="0.01262655">
            <text:p>0.01262655</text:p>
          </table:table-cell>
          <table:table-cell table:number-columns-repeated="4"/>
        </table:table-row>
        <table:table-row table:style-name="ro1">
          <table:table-cell office:value-type="float" office:value="363.709655761719">
            <text:p>363.7096557617</text:p>
          </table:table-cell>
          <table:table-cell office:value-type="float" office:value="0.007805487">
            <text:p>0.007805487</text:p>
          </table:table-cell>
          <table:table-cell table:number-columns-repeated="4"/>
        </table:table-row>
        <table:table-row table:style-name="ro1">
          <table:table-cell office:value-type="float" office:value="363.819763183594">
            <text:p>363.8197631836</text:p>
          </table:table-cell>
          <table:table-cell office:value-type="float" office:value="0.005617854">
            <text:p>0.005617854</text:p>
          </table:table-cell>
          <table:table-cell table:number-columns-repeated="4"/>
        </table:table-row>
        <table:table-row table:style-name="ro1">
          <table:table-cell office:value-type="float" office:value="363.929870605469">
            <text:p>363.9298706055</text:p>
          </table:table-cell>
          <table:table-cell office:value-type="float" office:value="-0.005613798">
            <text:p>-0.005613798</text:p>
          </table:table-cell>
          <table:table-cell table:number-columns-repeated="4"/>
        </table:table-row>
        <table:table-row table:style-name="ro1">
          <table:table-cell office:value-type="float" office:value="364.039978027344">
            <text:p>364.0399780273</text:p>
          </table:table-cell>
          <table:table-cell office:value-type="float" office:value="-0.006665592">
            <text:p>-0.006665592</text:p>
          </table:table-cell>
          <table:table-cell table:number-columns-repeated="4"/>
        </table:table-row>
        <table:table-row table:style-name="ro1">
          <table:table-cell office:value-type="float" office:value="364.150085449219">
            <text:p>364.1500854492</text:p>
          </table:table-cell>
          <table:table-cell office:value-type="float" office:value="-0.004338553">
            <text:p>-0.004338553</text:p>
          </table:table-cell>
          <table:table-cell table:number-columns-repeated="4"/>
        </table:table-row>
        <table:table-row table:style-name="ro1">
          <table:table-cell office:value-type="float" office:value="364.260223388672">
            <text:p>364.2602233887</text:p>
          </table:table-cell>
          <table:table-cell office:value-type="float" office:value="-0.002192688">
            <text:p>-0.002192688</text:p>
          </table:table-cell>
          <table:table-cell table:number-columns-repeated="4"/>
        </table:table-row>
        <table:table-row table:style-name="ro1">
          <table:table-cell office:value-type="float" office:value="364.370330810547">
            <text:p>364.3703308105</text:p>
          </table:table-cell>
          <table:table-cell office:value-type="float" office:value="-0.004166504">
            <text:p>-0.004166504</text:p>
          </table:table-cell>
          <table:table-cell table:number-columns-repeated="4"/>
        </table:table-row>
        <table:table-row table:style-name="ro1">
          <table:table-cell office:value-type="float" office:value="364.48046875">
            <text:p>364.48046875</text:p>
          </table:table-cell>
          <table:table-cell office:value-type="float" office:value="0.006801072">
            <text:p>0.006801072</text:p>
          </table:table-cell>
          <table:table-cell table:number-columns-repeated="4"/>
        </table:table-row>
        <table:table-row table:style-name="ro1">
          <table:table-cell office:value-type="float" office:value="364.590606689453">
            <text:p>364.5906066895</text:p>
          </table:table-cell>
          <table:table-cell office:value-type="float" office:value="0.009166613">
            <text:p>0.009166613</text:p>
          </table:table-cell>
          <table:table-cell table:number-columns-repeated="4"/>
        </table:table-row>
        <table:table-row table:style-name="ro1">
          <table:table-cell office:value-type="float" office:value="364.700775146484">
            <text:p>364.7007751465</text:p>
          </table:table-cell>
          <table:table-cell office:value-type="float" office:value="0.003460175">
            <text:p>0.003460175</text:p>
          </table:table-cell>
          <table:table-cell table:number-columns-repeated="4"/>
        </table:table-row>
        <table:table-row table:style-name="ro1">
          <table:table-cell office:value-type="float" office:value="364.810913085938">
            <text:p>364.8109130859</text:p>
          </table:table-cell>
          <table:table-cell office:value-type="float" office:value="0.01435385">
            <text:p>0.01435385</text:p>
          </table:table-cell>
          <table:table-cell table:number-columns-repeated="4"/>
        </table:table-row>
        <table:table-row table:style-name="ro1">
          <table:table-cell office:value-type="float" office:value="364.921081542969">
            <text:p>364.921081543</text:p>
          </table:table-cell>
          <table:table-cell office:value-type="float" office:value="-0.004425531">
            <text:p>-0.004425531</text:p>
          </table:table-cell>
          <table:table-cell table:number-columns-repeated="4"/>
        </table:table-row>
        <table:table-row table:style-name="ro1">
          <table:table-cell office:value-type="float" office:value="365.03125">
            <text:p>365.03125</text:p>
          </table:table-cell>
          <table:table-cell office:value-type="float" office:value="-0.005584772">
            <text:p>-0.005584772</text:p>
          </table:table-cell>
          <table:table-cell table:number-columns-repeated="4"/>
        </table:table-row>
        <table:table-row table:style-name="ro1">
          <table:table-cell office:value-type="float" office:value="365.141418457031">
            <text:p>365.141418457</text:p>
          </table:table-cell>
          <table:table-cell office:value-type="float" office:value="-0.008698112">
            <text:p>-0.008698112</text:p>
          </table:table-cell>
          <table:table-cell table:number-columns-repeated="4"/>
        </table:table-row>
        <table:table-row table:style-name="ro1">
          <table:table-cell office:value-type="float" office:value="365.251586914063">
            <text:p>365.2515869141</text:p>
          </table:table-cell>
          <table:table-cell office:value-type="float" office:value="0.009551741">
            <text:p>0.009551741</text:p>
          </table:table-cell>
          <table:table-cell table:number-columns-repeated="4"/>
        </table:table-row>
        <table:table-row table:style-name="ro1">
          <table:table-cell office:value-type="float" office:value="365.361785888672">
            <text:p>365.3617858887</text:p>
          </table:table-cell>
          <table:table-cell office:value-type="float" office:value="0.0264585">
            <text:p>0.0264585</text:p>
          </table:table-cell>
          <table:table-cell table:number-columns-repeated="4"/>
        </table:table-row>
        <table:table-row table:style-name="ro1">
          <table:table-cell office:value-type="float" office:value="365.471984863281">
            <text:p>365.4719848633</text:p>
          </table:table-cell>
          <table:table-cell office:value-type="float" office:value="0.003150185">
            <text:p>0.003150185</text:p>
          </table:table-cell>
          <table:table-cell table:number-columns-repeated="4"/>
        </table:table-row>
        <table:table-row table:style-name="ro1">
          <table:table-cell office:value-type="float" office:value="365.582183837891">
            <text:p>365.5821838379</text:p>
          </table:table-cell>
          <table:table-cell office:value-type="float" office:value="0.007087763">
            <text:p>0.007087763</text:p>
          </table:table-cell>
          <table:table-cell table:number-columns-repeated="4"/>
        </table:table-row>
        <table:table-row table:style-name="ro1">
          <table:table-cell office:value-type="float" office:value="365.6923828125">
            <text:p>365.6923828125</text:p>
          </table:table-cell>
          <table:table-cell office:value-type="float" office:value="0.00905039">
            <text:p>0.00905039</text:p>
          </table:table-cell>
          <table:table-cell table:number-columns-repeated="4"/>
        </table:table-row>
        <table:table-row table:style-name="ro1">
          <table:table-cell office:value-type="float" office:value="365.802581787109">
            <text:p>365.8025817871</text:p>
          </table:table-cell>
          <table:table-cell office:value-type="float" office:value="-0.0003541051">
            <text:p>-0.0003541051</text:p>
          </table:table-cell>
          <table:table-cell table:number-columns-repeated="4"/>
        </table:table-row>
        <table:table-row table:style-name="ro1">
          <table:table-cell office:value-type="float" office:value="365.912811279297">
            <text:p>365.9128112793</text:p>
          </table:table-cell>
          <table:table-cell office:value-type="float" office:value="0.008882673">
            <text:p>0.008882673</text:p>
          </table:table-cell>
          <table:table-cell table:number-columns-repeated="4"/>
        </table:table-row>
        <table:table-row table:style-name="ro1">
          <table:table-cell office:value-type="float" office:value="366.023010253906">
            <text:p>366.0230102539</text:p>
          </table:table-cell>
          <table:table-cell office:value-type="float" office:value="0.003384786">
            <text:p>0.003384786</text:p>
          </table:table-cell>
          <table:table-cell table:number-columns-repeated="4"/>
        </table:table-row>
        <table:table-row table:style-name="ro1">
          <table:table-cell office:value-type="float" office:value="366.133239746094">
            <text:p>366.1332397461</text:p>
          </table:table-cell>
          <table:table-cell office:value-type="float" office:value="0.004965893">
            <text:p>0.004965893</text:p>
          </table:table-cell>
          <table:table-cell table:number-columns-repeated="4"/>
        </table:table-row>
        <table:table-row table:style-name="ro1">
          <table:table-cell office:value-type="float" office:value="366.243499755859">
            <text:p>366.2434997559</text:p>
          </table:table-cell>
          <table:table-cell office:value-type="float" office:value="-0.002153087">
            <text:p>-0.002153087</text:p>
          </table:table-cell>
          <table:table-cell table:number-columns-repeated="4"/>
        </table:table-row>
        <table:table-row table:style-name="ro1">
          <table:table-cell office:value-type="float" office:value="366.353729248047">
            <text:p>366.353729248</text:p>
          </table:table-cell>
          <table:table-cell office:value-type="string">
            <text:p>9.295658E-05</text:p>
          </table:table-cell>
          <table:table-cell table:number-columns-repeated="4"/>
        </table:table-row>
        <table:table-row table:style-name="ro1">
          <table:table-cell office:value-type="float" office:value="366.463989257813">
            <text:p>366.4639892578</text:p>
          </table:table-cell>
          <table:table-cell office:value-type="float" office:value="-0.0006124174">
            <text:p>-0.0006124174</text:p>
          </table:table-cell>
          <table:table-cell table:number-columns-repeated="4"/>
        </table:table-row>
        <table:table-row table:style-name="ro1">
          <table:table-cell office:value-type="float" office:value="366.57421875">
            <text:p>366.57421875</text:p>
          </table:table-cell>
          <table:table-cell office:value-type="float" office:value="0.003554728">
            <text:p>0.003554728</text:p>
          </table:table-cell>
          <table:table-cell table:number-columns-repeated="4"/>
        </table:table-row>
        <table:table-row table:style-name="ro1">
          <table:table-cell office:value-type="float" office:value="366.684478759766">
            <text:p>366.6844787598</text:p>
          </table:table-cell>
          <table:table-cell office:value-type="float" office:value="-0.0007172529">
            <text:p>-0.0007172529</text:p>
          </table:table-cell>
          <table:table-cell table:number-columns-repeated="4"/>
        </table:table-row>
        <table:table-row table:style-name="ro1">
          <table:table-cell office:value-type="float" office:value="366.794738769531">
            <text:p>366.7947387695</text:p>
          </table:table-cell>
          <table:table-cell office:value-type="float" office:value="0.009848307">
            <text:p>0.009848307</text:p>
          </table:table-cell>
          <table:table-cell table:number-columns-repeated="4"/>
        </table:table-row>
        <table:table-row table:style-name="ro1">
          <table:table-cell office:value-type="float" office:value="366.905029296875">
            <text:p>366.9050292969</text:p>
          </table:table-cell>
          <table:table-cell office:value-type="float" office:value="-0.003023271">
            <text:p>-0.003023271</text:p>
          </table:table-cell>
          <table:table-cell table:number-columns-repeated="4"/>
        </table:table-row>
        <table:table-row table:style-name="ro1">
          <table:table-cell office:value-type="float" office:value="367.015289306641">
            <text:p>367.0152893066</text:p>
          </table:table-cell>
          <table:table-cell office:value-type="float" office:value="0.0009811952">
            <text:p>0.0009811952</text:p>
          </table:table-cell>
          <table:table-cell table:number-columns-repeated="4"/>
        </table:table-row>
        <table:table-row table:style-name="ro1">
          <table:table-cell office:value-type="float" office:value="367.125579833984">
            <text:p>367.125579834</text:p>
          </table:table-cell>
          <table:table-cell office:value-type="float" office:value="0.01178099">
            <text:p>0.01178099</text:p>
          </table:table-cell>
          <table:table-cell table:number-columns-repeated="4"/>
        </table:table-row>
        <table:table-row table:style-name="ro1">
          <table:table-cell office:value-type="float" office:value="367.235870361328">
            <text:p>367.2358703613</text:p>
          </table:table-cell>
          <table:table-cell office:value-type="float" office:value="0.01482128">
            <text:p>0.01482128</text:p>
          </table:table-cell>
          <table:table-cell table:number-columns-repeated="4"/>
        </table:table-row>
        <table:table-row table:style-name="ro1">
          <table:table-cell office:value-type="float" office:value="367.346160888672">
            <text:p>367.3461608887</text:p>
          </table:table-cell>
          <table:table-cell office:value-type="float" office:value="0.01850895">
            <text:p>0.01850895</text:p>
          </table:table-cell>
          <table:table-cell table:number-columns-repeated="4"/>
        </table:table-row>
        <table:table-row table:style-name="ro1">
          <table:table-cell office:value-type="float" office:value="367.456481933594">
            <text:p>367.4564819336</text:p>
          </table:table-cell>
          <table:table-cell office:value-type="float" office:value="0.009881925">
            <text:p>0.009881925</text:p>
          </table:table-cell>
          <table:table-cell table:number-columns-repeated="4"/>
        </table:table-row>
        <table:table-row table:style-name="ro1">
          <table:table-cell office:value-type="float" office:value="367.566772460938">
            <text:p>367.5667724609</text:p>
          </table:table-cell>
          <table:table-cell office:value-type="float" office:value="-0.005734229">
            <text:p>-0.005734229</text:p>
          </table:table-cell>
          <table:table-cell table:number-columns-repeated="4"/>
        </table:table-row>
        <table:table-row table:style-name="ro1">
          <table:table-cell office:value-type="float" office:value="367.677093505859">
            <text:p>367.6770935059</text:p>
          </table:table-cell>
          <table:table-cell office:value-type="float" office:value="-0.002401382">
            <text:p>-0.002401382</text:p>
          </table:table-cell>
          <table:table-cell table:number-columns-repeated="4"/>
        </table:table-row>
        <table:table-row table:style-name="ro1">
          <table:table-cell office:value-type="float" office:value="367.787414550781">
            <text:p>367.7874145508</text:p>
          </table:table-cell>
          <table:table-cell office:value-type="float" office:value="-0.007138149">
            <text:p>-0.007138149</text:p>
          </table:table-cell>
          <table:table-cell table:number-columns-repeated="4"/>
        </table:table-row>
        <table:table-row table:style-name="ro1">
          <table:table-cell office:value-type="float" office:value="367.897766113281">
            <text:p>367.8977661133</text:p>
          </table:table-cell>
          <table:table-cell office:value-type="float" office:value="-0.008717109">
            <text:p>-0.008717109</text:p>
          </table:table-cell>
          <table:table-cell table:number-columns-repeated="4"/>
        </table:table-row>
        <table:table-row table:style-name="ro1">
          <table:table-cell office:value-type="float" office:value="368.008087158203">
            <text:p>368.0080871582</text:p>
          </table:table-cell>
          <table:table-cell office:value-type="string">
            <text:p>9.221727E-05</text:p>
          </table:table-cell>
          <table:table-cell table:number-columns-repeated="4"/>
        </table:table-row>
        <table:table-row table:style-name="ro1">
          <table:table-cell office:value-type="float" office:value="368.118438720703">
            <text:p>368.1184387207</text:p>
          </table:table-cell>
          <table:table-cell office:value-type="float" office:value="-0.003169647">
            <text:p>-0.003169647</text:p>
          </table:table-cell>
          <table:table-cell table:number-columns-repeated="4"/>
        </table:table-row>
        <table:table-row table:style-name="ro1">
          <table:table-cell office:value-type="float" office:value="368.228759765625">
            <text:p>368.2287597656</text:p>
          </table:table-cell>
          <table:table-cell office:value-type="float" office:value="0.0007845262">
            <text:p>0.0007845262</text:p>
          </table:table-cell>
          <table:table-cell table:number-columns-repeated="4"/>
        </table:table-row>
        <table:table-row table:style-name="ro1">
          <table:table-cell office:value-type="float" office:value="368.339111328125">
            <text:p>368.3391113281</text:p>
          </table:table-cell>
          <table:table-cell office:value-type="float" office:value="-0.001747122">
            <text:p>-0.001747122</text:p>
          </table:table-cell>
          <table:table-cell table:number-columns-repeated="4"/>
        </table:table-row>
        <table:table-row table:style-name="ro1">
          <table:table-cell office:value-type="float" office:value="368.449493408203">
            <text:p>368.4494934082</text:p>
          </table:table-cell>
          <table:table-cell office:value-type="float" office:value="0.003219312">
            <text:p>0.003219312</text:p>
          </table:table-cell>
          <table:table-cell table:number-columns-repeated="4"/>
        </table:table-row>
        <table:table-row table:style-name="ro1">
          <table:table-cell office:value-type="float" office:value="368.559844970703">
            <text:p>368.5598449707</text:p>
          </table:table-cell>
          <table:table-cell office:value-type="float" office:value="0.007997064">
            <text:p>0.007997064</text:p>
          </table:table-cell>
          <table:table-cell table:number-columns-repeated="4"/>
        </table:table-row>
        <table:table-row table:style-name="ro1">
          <table:table-cell office:value-type="float" office:value="368.670227050781">
            <text:p>368.6702270508</text:p>
          </table:table-cell>
          <table:table-cell office:value-type="float" office:value="-0.006331035">
            <text:p>-0.006331035</text:p>
          </table:table-cell>
          <table:table-cell table:number-columns-repeated="4"/>
        </table:table-row>
        <table:table-row table:style-name="ro1">
          <table:table-cell office:value-type="float" office:value="368.780609130859">
            <text:p>368.7806091309</text:p>
          </table:table-cell>
          <table:table-cell office:value-type="float" office:value="-0.00253577">
            <text:p>-0.00253577</text:p>
          </table:table-cell>
          <table:table-cell table:number-columns-repeated="4"/>
        </table:table-row>
        <table:table-row table:style-name="ro1">
          <table:table-cell office:value-type="float" office:value="368.890991210938">
            <text:p>368.8909912109</text:p>
          </table:table-cell>
          <table:table-cell office:value-type="float" office:value="-0.00871176">
            <text:p>-0.00871176</text:p>
          </table:table-cell>
          <table:table-cell table:number-columns-repeated="4"/>
        </table:table-row>
        <table:table-row table:style-name="ro1">
          <table:table-cell office:value-type="float" office:value="369.001373291016">
            <text:p>369.001373291</text:p>
          </table:table-cell>
          <table:table-cell office:value-type="float" office:value="-0.0003892291">
            <text:p>-0.0003892291</text:p>
          </table:table-cell>
          <table:table-cell table:number-columns-repeated="4"/>
        </table:table-row>
        <table:table-row table:style-name="ro1">
          <table:table-cell office:value-type="float" office:value="369.111755371094">
            <text:p>369.1117553711</text:p>
          </table:table-cell>
          <table:table-cell office:value-type="float" office:value="-0.008194225">
            <text:p>-0.008194225</text:p>
          </table:table-cell>
          <table:table-cell table:number-columns-repeated="4"/>
        </table:table-row>
        <table:table-row table:style-name="ro1">
          <table:table-cell office:value-type="float" office:value="369.22216796875">
            <text:p>369.2221679688</text:p>
          </table:table-cell>
          <table:table-cell office:value-type="float" office:value="-0.007519995">
            <text:p>-0.007519995</text:p>
          </table:table-cell>
          <table:table-cell table:number-columns-repeated="4"/>
        </table:table-row>
        <table:table-row table:style-name="ro1">
          <table:table-cell office:value-type="float" office:value="369.332580566406">
            <text:p>369.3325805664</text:p>
          </table:table-cell>
          <table:table-cell office:value-type="float" office:value="-0.007708793">
            <text:p>-0.007708793</text:p>
          </table:table-cell>
          <table:table-cell table:number-columns-repeated="4"/>
        </table:table-row>
        <table:table-row table:style-name="ro1">
          <table:table-cell office:value-type="float" office:value="369.442993164063">
            <text:p>369.4429931641</text:p>
          </table:table-cell>
          <table:table-cell office:value-type="float" office:value="-0.0008813191">
            <text:p>-0.0008813191</text:p>
          </table:table-cell>
          <table:table-cell table:number-columns-repeated="4"/>
        </table:table-row>
        <table:table-row table:style-name="ro1">
          <table:table-cell office:value-type="float" office:value="369.553405761719">
            <text:p>369.5534057617</text:p>
          </table:table-cell>
          <table:table-cell office:value-type="float" office:value="0.00315688">
            <text:p>0.00315688</text:p>
          </table:table-cell>
          <table:table-cell table:number-columns-repeated="4"/>
        </table:table-row>
        <table:table-row table:style-name="ro1">
          <table:table-cell office:value-type="float" office:value="369.663848876953">
            <text:p>369.663848877</text:p>
          </table:table-cell>
          <table:table-cell office:value-type="float" office:value="0.005345318">
            <text:p>0.005345318</text:p>
          </table:table-cell>
          <table:table-cell table:number-columns-repeated="4"/>
        </table:table-row>
        <table:table-row table:style-name="ro1">
          <table:table-cell office:value-type="float" office:value="369.774261474609">
            <text:p>369.7742614746</text:p>
          </table:table-cell>
          <table:table-cell office:value-type="float" office:value="-0.004158068">
            <text:p>-0.004158068</text:p>
          </table:table-cell>
          <table:table-cell table:number-columns-repeated="4"/>
        </table:table-row>
        <table:table-row table:style-name="ro1">
          <table:table-cell office:value-type="float" office:value="369.884704589844">
            <text:p>369.8847045898</text:p>
          </table:table-cell>
          <table:table-cell office:value-type="float" office:value="0.002962178">
            <text:p>0.002962178</text:p>
          </table:table-cell>
          <table:table-cell table:number-columns-repeated="4"/>
        </table:table-row>
        <table:table-row table:style-name="ro1">
          <table:table-cell office:value-type="float" office:value="369.995147705078">
            <text:p>369.9951477051</text:p>
          </table:table-cell>
          <table:table-cell office:value-type="float" office:value="-0.006008863">
            <text:p>-0.006008863</text:p>
          </table:table-cell>
          <table:table-cell table:number-columns-repeated="4"/>
        </table:table-row>
        <table:table-row table:style-name="ro1">
          <table:table-cell office:value-type="float" office:value="370.105621337891">
            <text:p>370.1056213379</text:p>
          </table:table-cell>
          <table:table-cell office:value-type="float" office:value="0.009050566">
            <text:p>0.009050566</text:p>
          </table:table-cell>
          <table:table-cell table:number-columns-repeated="4"/>
        </table:table-row>
        <table:table-row table:style-name="ro1">
          <table:table-cell office:value-type="float" office:value="370.216064453125">
            <text:p>370.2160644531</text:p>
          </table:table-cell>
          <table:table-cell office:value-type="float" office:value="0.008139867">
            <text:p>0.008139867</text:p>
          </table:table-cell>
          <table:table-cell table:number-columns-repeated="4"/>
        </table:table-row>
        <table:table-row table:style-name="ro1">
          <table:table-cell office:value-type="float" office:value="370.326538085938">
            <text:p>370.3265380859</text:p>
          </table:table-cell>
          <table:table-cell office:value-type="float" office:value="0.01962248">
            <text:p>0.01962248</text:p>
          </table:table-cell>
          <table:table-cell table:number-columns-repeated="4"/>
        </table:table-row>
        <table:table-row table:style-name="ro1">
          <table:table-cell office:value-type="float" office:value="370.43701171875">
            <text:p>370.4370117188</text:p>
          </table:table-cell>
          <table:table-cell office:value-type="float" office:value="0.01075726">
            <text:p>0.01075726</text:p>
          </table:table-cell>
          <table:table-cell table:number-columns-repeated="4"/>
        </table:table-row>
        <table:table-row table:style-name="ro1">
          <table:table-cell office:value-type="float" office:value="370.547485351563">
            <text:p>370.5474853516</text:p>
          </table:table-cell>
          <table:table-cell office:value-type="float" office:value="0.002703733">
            <text:p>0.002703733</text:p>
          </table:table-cell>
          <table:table-cell table:number-columns-repeated="4"/>
        </table:table-row>
        <table:table-row table:style-name="ro1">
          <table:table-cell office:value-type="float" office:value="370.657958984375">
            <text:p>370.6579589844</text:p>
          </table:table-cell>
          <table:table-cell office:value-type="float" office:value="-0.003669117">
            <text:p>-0.003669117</text:p>
          </table:table-cell>
          <table:table-cell table:number-columns-repeated="4"/>
        </table:table-row>
        <table:table-row table:style-name="ro1">
          <table:table-cell office:value-type="float" office:value="370.768432617188">
            <text:p>370.7684326172</text:p>
          </table:table-cell>
          <table:table-cell office:value-type="float" office:value="-0.008573296">
            <text:p>-0.008573296</text:p>
          </table:table-cell>
          <table:table-cell table:number-columns-repeated="4"/>
        </table:table-row>
        <table:table-row table:style-name="ro1">
          <table:table-cell office:value-type="float" office:value="370.878936767578">
            <text:p>370.8789367676</text:p>
          </table:table-cell>
          <table:table-cell office:value-type="float" office:value="0.006271032">
            <text:p>0.006271032</text:p>
          </table:table-cell>
          <table:table-cell table:number-columns-repeated="4"/>
        </table:table-row>
        <table:table-row table:style-name="ro1">
          <table:table-cell office:value-type="float" office:value="370.989440917969">
            <text:p>370.989440918</text:p>
          </table:table-cell>
          <table:table-cell office:value-type="float" office:value="-0.006522551">
            <text:p>-0.006522551</text:p>
          </table:table-cell>
          <table:table-cell table:number-columns-repeated="4"/>
        </table:table-row>
        <table:table-row table:style-name="ro1">
          <table:table-cell office:value-type="float" office:value="371.099945068359">
            <text:p>371.0999450684</text:p>
          </table:table-cell>
          <table:table-cell office:value-type="float" office:value="0.004378581">
            <text:p>0.004378581</text:p>
          </table:table-cell>
          <table:table-cell table:number-columns-repeated="4"/>
        </table:table-row>
        <table:table-row table:style-name="ro1">
          <table:table-cell office:value-type="float" office:value="371.21044921875">
            <text:p>371.2104492188</text:p>
          </table:table-cell>
          <table:table-cell office:value-type="float" office:value="-0.005534307">
            <text:p>-0.005534307</text:p>
          </table:table-cell>
          <table:table-cell table:number-columns-repeated="4"/>
        </table:table-row>
        <table:table-row table:style-name="ro1">
          <table:table-cell office:value-type="float" office:value="371.320983886719">
            <text:p>371.3209838867</text:p>
          </table:table-cell>
          <table:table-cell office:value-type="float" office:value="-0.005006213">
            <text:p>-0.005006213</text:p>
          </table:table-cell>
          <table:table-cell table:number-columns-repeated="4"/>
        </table:table-row>
        <table:table-row table:style-name="ro1">
          <table:table-cell office:value-type="float" office:value="371.431488037109">
            <text:p>371.4314880371</text:p>
          </table:table-cell>
          <table:table-cell office:value-type="float" office:value="0.00135943">
            <text:p>0.00135943</text:p>
          </table:table-cell>
          <table:table-cell table:number-columns-repeated="4"/>
        </table:table-row>
        <table:table-row table:style-name="ro1">
          <table:table-cell office:value-type="float" office:value="371.542022705078">
            <text:p>371.5420227051</text:p>
          </table:table-cell>
          <table:table-cell office:value-type="float" office:value="0.01196707">
            <text:p>0.01196707</text:p>
          </table:table-cell>
          <table:table-cell table:number-columns-repeated="4"/>
        </table:table-row>
        <table:table-row table:style-name="ro1">
          <table:table-cell office:value-type="float" office:value="371.652557373047">
            <text:p>371.652557373</text:p>
          </table:table-cell>
          <table:table-cell office:value-type="float" office:value="-0.0074987">
            <text:p>-0.0074987</text:p>
          </table:table-cell>
          <table:table-cell table:number-columns-repeated="4"/>
        </table:table-row>
        <table:table-row table:style-name="ro1">
          <table:table-cell office:value-type="float" office:value="371.763122558594">
            <text:p>371.7631225586</text:p>
          </table:table-cell>
          <table:table-cell office:value-type="float" office:value="-0.004919441">
            <text:p>-0.004919441</text:p>
          </table:table-cell>
          <table:table-cell table:number-columns-repeated="4"/>
        </table:table-row>
        <table:table-row table:style-name="ro1">
          <table:table-cell office:value-type="float" office:value="371.873657226563">
            <text:p>371.8736572266</text:p>
          </table:table-cell>
          <table:table-cell office:value-type="float" office:value="-0.007148038">
            <text:p>-0.007148038</text:p>
          </table:table-cell>
          <table:table-cell table:number-columns-repeated="4"/>
        </table:table-row>
        <table:table-row table:style-name="ro1">
          <table:table-cell office:value-type="float" office:value="371.984222412109">
            <text:p>371.9842224121</text:p>
          </table:table-cell>
          <table:table-cell office:value-type="float" office:value="0.003410203">
            <text:p>0.003410203</text:p>
          </table:table-cell>
          <table:table-cell table:number-columns-repeated="4"/>
        </table:table-row>
        <table:table-row table:style-name="ro1">
          <table:table-cell office:value-type="float" office:value="372.094787597656">
            <text:p>372.0947875977</text:p>
          </table:table-cell>
          <table:table-cell office:value-type="float" office:value="-0.00485561">
            <text:p>-0.00485561</text:p>
          </table:table-cell>
          <table:table-cell table:number-columns-repeated="4"/>
        </table:table-row>
        <table:table-row table:style-name="ro1">
          <table:table-cell office:value-type="float" office:value="372.205352783203">
            <text:p>372.2053527832</text:p>
          </table:table-cell>
          <table:table-cell office:value-type="float" office:value="-0.006059073">
            <text:p>-0.006059073</text:p>
          </table:table-cell>
          <table:table-cell table:number-columns-repeated="4"/>
        </table:table-row>
        <table:table-row table:style-name="ro1">
          <table:table-cell office:value-type="float" office:value="372.31591796875">
            <text:p>372.3159179688</text:p>
          </table:table-cell>
          <table:table-cell office:value-type="float" office:value="-0.005980629">
            <text:p>-0.005980629</text:p>
          </table:table-cell>
          <table:table-cell table:number-columns-repeated="4"/>
        </table:table-row>
        <table:table-row table:style-name="ro1">
          <table:table-cell office:value-type="float" office:value="372.426513671875">
            <text:p>372.4265136719</text:p>
          </table:table-cell>
          <table:table-cell office:value-type="float" office:value="-0.001286643">
            <text:p>-0.001286643</text:p>
          </table:table-cell>
          <table:table-cell table:number-columns-repeated="4"/>
        </table:table-row>
        <table:table-row table:style-name="ro1">
          <table:table-cell office:value-type="float" office:value="372.537078857422">
            <text:p>372.5370788574</text:p>
          </table:table-cell>
          <table:table-cell office:value-type="float" office:value="0.00264607">
            <text:p>0.00264607</text:p>
          </table:table-cell>
          <table:table-cell table:number-columns-repeated="4"/>
        </table:table-row>
        <table:table-row table:style-name="ro1">
          <table:table-cell office:value-type="float" office:value="372.647674560547">
            <text:p>372.6476745605</text:p>
          </table:table-cell>
          <table:table-cell office:value-type="float" office:value="-0.009400459">
            <text:p>-0.009400459</text:p>
          </table:table-cell>
          <table:table-cell table:number-columns-repeated="4"/>
        </table:table-row>
        <table:table-row table:style-name="ro1">
          <table:table-cell office:value-type="float" office:value="372.758270263672">
            <text:p>372.7582702637</text:p>
          </table:table-cell>
          <table:table-cell office:value-type="string">
            <text:p>-7.844146E-05</text:p>
          </table:table-cell>
          <table:table-cell table:number-columns-repeated="4"/>
        </table:table-row>
        <table:table-row table:style-name="ro1">
          <table:table-cell office:value-type="float" office:value="372.868896484375">
            <text:p>372.8688964844</text:p>
          </table:table-cell>
          <table:table-cell office:value-type="float" office:value="0.005753997">
            <text:p>0.005753997</text:p>
          </table:table-cell>
          <table:table-cell table:number-columns-repeated="4"/>
        </table:table-row>
        <table:table-row table:style-name="ro1">
          <table:table-cell office:value-type="float" office:value="372.9794921875">
            <text:p>372.9794921875</text:p>
          </table:table-cell>
          <table:table-cell office:value-type="float" office:value="-0.009567216">
            <text:p>-0.009567216</text:p>
          </table:table-cell>
          <table:table-cell table:number-columns-repeated="4"/>
        </table:table-row>
        <table:table-row table:style-name="ro1">
          <table:table-cell office:value-type="float" office:value="373.090118408203">
            <text:p>373.0901184082</text:p>
          </table:table-cell>
          <table:table-cell office:value-type="float" office:value="-0.00128052">
            <text:p>-0.00128052</text:p>
          </table:table-cell>
          <table:table-cell table:number-columns-repeated="4"/>
        </table:table-row>
        <table:table-row table:style-name="ro1">
          <table:table-cell office:value-type="float" office:value="373.200744628906">
            <text:p>373.2007446289</text:p>
          </table:table-cell>
          <table:table-cell office:value-type="float" office:value="0.02798198">
            <text:p>0.02798198</text:p>
          </table:table-cell>
          <table:table-cell table:number-columns-repeated="4"/>
        </table:table-row>
        <table:table-row table:style-name="ro1">
          <table:table-cell office:value-type="float" office:value="373.311370849609">
            <text:p>373.3113708496</text:p>
          </table:table-cell>
          <table:table-cell office:value-type="float" office:value="-0.00102001">
            <text:p>-0.00102001</text:p>
          </table:table-cell>
          <table:table-cell table:number-columns-repeated="4"/>
        </table:table-row>
        <table:table-row table:style-name="ro1">
          <table:table-cell office:value-type="float" office:value="373.421997070313">
            <text:p>373.4219970703</text:p>
          </table:table-cell>
          <table:table-cell office:value-type="float" office:value="0.0009509774">
            <text:p>0.0009509774</text:p>
          </table:table-cell>
          <table:table-cell table:number-columns-repeated="4"/>
        </table:table-row>
        <table:table-row table:style-name="ro1">
          <table:table-cell office:value-type="float" office:value="373.532623291016">
            <text:p>373.532623291</text:p>
          </table:table-cell>
          <table:table-cell office:value-type="float" office:value="-0.006494706">
            <text:p>-0.006494706</text:p>
          </table:table-cell>
          <table:table-cell table:number-columns-repeated="4"/>
        </table:table-row>
        <table:table-row table:style-name="ro1">
          <table:table-cell office:value-type="float" office:value="373.643280029297">
            <text:p>373.6432800293</text:p>
          </table:table-cell>
          <table:table-cell office:value-type="float" office:value="0.01126196">
            <text:p>0.01126196</text:p>
          </table:table-cell>
          <table:table-cell table:number-columns-repeated="4"/>
        </table:table-row>
        <table:table-row table:style-name="ro1">
          <table:table-cell office:value-type="float" office:value="373.753936767578">
            <text:p>373.7539367676</text:p>
          </table:table-cell>
          <table:table-cell office:value-type="float" office:value="0.006846471">
            <text:p>0.006846471</text:p>
          </table:table-cell>
          <table:table-cell table:number-columns-repeated="4"/>
        </table:table-row>
        <table:table-row table:style-name="ro1">
          <table:table-cell office:value-type="float" office:value="373.864593505859">
            <text:p>373.8645935059</text:p>
          </table:table-cell>
          <table:table-cell office:value-type="float" office:value="-0.005613838">
            <text:p>-0.005613838</text:p>
          </table:table-cell>
          <table:table-cell table:number-columns-repeated="4"/>
        </table:table-row>
        <table:table-row table:style-name="ro1">
          <table:table-cell office:value-type="float" office:value="373.975250244141">
            <text:p>373.9752502441</text:p>
          </table:table-cell>
          <table:table-cell office:value-type="string">
            <text:p>-4.540773E-05</text:p>
          </table:table-cell>
          <table:table-cell table:number-columns-repeated="4"/>
        </table:table-row>
        <table:table-row table:style-name="ro1">
          <table:table-cell office:value-type="float" office:value="374.0859375">
            <text:p>374.0859375</text:p>
          </table:table-cell>
          <table:table-cell office:value-type="float" office:value="-0.005046547">
            <text:p>-0.005046547</text:p>
          </table:table-cell>
          <table:table-cell table:number-columns-repeated="4"/>
        </table:table-row>
        <table:table-row table:style-name="ro1">
          <table:table-cell office:value-type="float" office:value="374.196624755859">
            <text:p>374.1966247559</text:p>
          </table:table-cell>
          <table:table-cell office:value-type="float" office:value="-0.008772089">
            <text:p>-0.008772089</text:p>
          </table:table-cell>
          <table:table-cell table:number-columns-repeated="4"/>
        </table:table-row>
        <table:table-row table:style-name="ro1">
          <table:table-cell office:value-type="float" office:value="374.307281494141">
            <text:p>374.3072814941</text:p>
          </table:table-cell>
          <table:table-cell office:value-type="float" office:value="-0.002248087">
            <text:p>-0.002248087</text:p>
          </table:table-cell>
          <table:table-cell table:number-columns-repeated="4"/>
        </table:table-row>
        <table:table-row table:style-name="ro1">
          <table:table-cell office:value-type="float" office:value="374.417999267578">
            <text:p>374.4179992676</text:p>
          </table:table-cell>
          <table:table-cell office:value-type="float" office:value="-0.005401549">
            <text:p>-0.005401549</text:p>
          </table:table-cell>
          <table:table-cell table:number-columns-repeated="4"/>
        </table:table-row>
        <table:table-row table:style-name="ro1">
          <table:table-cell office:value-type="float" office:value="374.528686523438">
            <text:p>374.5286865234</text:p>
          </table:table-cell>
          <table:table-cell office:value-type="float" office:value="0.006887797">
            <text:p>0.006887797</text:p>
          </table:table-cell>
          <table:table-cell table:number-columns-repeated="4"/>
        </table:table-row>
        <table:table-row table:style-name="ro1">
          <table:table-cell office:value-type="float" office:value="374.639373779297">
            <text:p>374.6393737793</text:p>
          </table:table-cell>
          <table:table-cell office:value-type="float" office:value="0.008617021">
            <text:p>0.008617021</text:p>
          </table:table-cell>
          <table:table-cell table:number-columns-repeated="4"/>
        </table:table-row>
        <table:table-row table:style-name="ro1">
          <table:table-cell office:value-type="float" office:value="374.750091552734">
            <text:p>374.7500915527</text:p>
          </table:table-cell>
          <table:table-cell office:value-type="float" office:value="-0.004598459">
            <text:p>-0.004598459</text:p>
          </table:table-cell>
          <table:table-cell table:number-columns-repeated="4"/>
        </table:table-row>
        <table:table-row table:style-name="ro1">
          <table:table-cell office:value-type="float" office:value="374.860809326172">
            <text:p>374.8608093262</text:p>
          </table:table-cell>
          <table:table-cell office:value-type="float" office:value="-0.001167377">
            <text:p>-0.001167377</text:p>
          </table:table-cell>
          <table:table-cell table:number-columns-repeated="4"/>
        </table:table-row>
        <table:table-row table:style-name="ro1">
          <table:table-cell office:value-type="float" office:value="374.971527099609">
            <text:p>374.9715270996</text:p>
          </table:table-cell>
          <table:table-cell office:value-type="float" office:value="0.0001000278">
            <text:p>0.0001000278</text:p>
          </table:table-cell>
          <table:table-cell table:number-columns-repeated="4"/>
        </table:table-row>
        <table:table-row table:style-name="ro1">
          <table:table-cell office:value-type="float" office:value="375.082244873047">
            <text:p>375.082244873</text:p>
          </table:table-cell>
          <table:table-cell office:value-type="float" office:value="-0.0004186097">
            <text:p>-0.0004186097</text:p>
          </table:table-cell>
          <table:table-cell table:number-columns-repeated="4"/>
        </table:table-row>
        <table:table-row table:style-name="ro1">
          <table:table-cell office:value-type="float" office:value="375.192993164063">
            <text:p>375.1929931641</text:p>
          </table:table-cell>
          <table:table-cell office:value-type="float" office:value="-0.003010155">
            <text:p>-0.003010155</text:p>
          </table:table-cell>
          <table:table-cell table:number-columns-repeated="4"/>
        </table:table-row>
        <table:table-row table:style-name="ro1">
          <table:table-cell office:value-type="float" office:value="375.3037109375">
            <text:p>375.3037109375</text:p>
          </table:table-cell>
          <table:table-cell office:value-type="float" office:value="-0.008411233">
            <text:p>-0.008411233</text:p>
          </table:table-cell>
          <table:table-cell table:number-columns-repeated="4"/>
        </table:table-row>
        <table:table-row table:style-name="ro1">
          <table:table-cell office:value-type="float" office:value="375.414459228516">
            <text:p>375.4144592285</text:p>
          </table:table-cell>
          <table:table-cell office:value-type="float" office:value="0.003221042">
            <text:p>0.003221042</text:p>
          </table:table-cell>
          <table:table-cell table:number-columns-repeated="4"/>
        </table:table-row>
        <table:table-row table:style-name="ro1">
          <table:table-cell office:value-type="float" office:value="375.525207519531">
            <text:p>375.5252075195</text:p>
          </table:table-cell>
          <table:table-cell office:value-type="float" office:value="-0.001225788">
            <text:p>-0.001225788</text:p>
          </table:table-cell>
          <table:table-cell table:number-columns-repeated="4"/>
        </table:table-row>
        <table:table-row table:style-name="ro1">
          <table:table-cell office:value-type="float" office:value="375.635986328125">
            <text:p>375.6359863281</text:p>
          </table:table-cell>
          <table:table-cell office:value-type="float" office:value="0.006856595">
            <text:p>0.006856595</text:p>
          </table:table-cell>
          <table:table-cell table:number-columns-repeated="4"/>
        </table:table-row>
        <table:table-row table:style-name="ro1">
          <table:table-cell office:value-type="float" office:value="375.746734619141">
            <text:p>375.7467346191</text:p>
          </table:table-cell>
          <table:table-cell office:value-type="float" office:value="-0.001551148">
            <text:p>-0.001551148</text:p>
          </table:table-cell>
          <table:table-cell table:number-columns-repeated="4"/>
        </table:table-row>
        <table:table-row table:style-name="ro1">
          <table:table-cell office:value-type="float" office:value="375.857513427734">
            <text:p>375.8575134277</text:p>
          </table:table-cell>
          <table:table-cell office:value-type="float" office:value="-0.003670598">
            <text:p>-0.003670598</text:p>
          </table:table-cell>
          <table:table-cell table:number-columns-repeated="4"/>
        </table:table-row>
        <table:table-row table:style-name="ro1">
          <table:table-cell office:value-type="float" office:value="375.968292236328">
            <text:p>375.9682922363</text:p>
          </table:table-cell>
          <table:table-cell office:value-type="float" office:value="-0.002930521">
            <text:p>-0.002930521</text:p>
          </table:table-cell>
          <table:table-cell table:number-columns-repeated="4"/>
        </table:table-row>
        <table:table-row table:style-name="ro1">
          <table:table-cell office:value-type="float" office:value="376.079071044922">
            <text:p>376.0790710449</text:p>
          </table:table-cell>
          <table:table-cell office:value-type="float" office:value="-0.00652318">
            <text:p>-0.00652318</text:p>
          </table:table-cell>
          <table:table-cell table:number-columns-repeated="4"/>
        </table:table-row>
        <table:table-row table:style-name="ro1">
          <table:table-cell office:value-type="float" office:value="376.189849853516">
            <text:p>376.1898498535</text:p>
          </table:table-cell>
          <table:table-cell office:value-type="float" office:value="0.0004290097">
            <text:p>0.0004290097</text:p>
          </table:table-cell>
          <table:table-cell table:number-columns-repeated="4"/>
        </table:table-row>
        <table:table-row table:style-name="ro1">
          <table:table-cell office:value-type="float" office:value="376.300628662109">
            <text:p>376.3006286621</text:p>
          </table:table-cell>
          <table:table-cell office:value-type="float" office:value="-0.002273491">
            <text:p>-0.002273491</text:p>
          </table:table-cell>
          <table:table-cell table:number-columns-repeated="4"/>
        </table:table-row>
        <table:table-row table:style-name="ro1">
          <table:table-cell office:value-type="float" office:value="376.411437988281">
            <text:p>376.4114379883</text:p>
          </table:table-cell>
          <table:table-cell office:value-type="float" office:value="-0.0102205">
            <text:p>-0.0102205</text:p>
          </table:table-cell>
          <table:table-cell table:number-columns-repeated="4"/>
        </table:table-row>
        <table:table-row table:style-name="ro1">
          <table:table-cell office:value-type="float" office:value="376.522247314453">
            <text:p>376.5222473145</text:p>
          </table:table-cell>
          <table:table-cell office:value-type="float" office:value="-0.0006794499">
            <text:p>-0.0006794499</text:p>
          </table:table-cell>
          <table:table-cell table:number-columns-repeated="4"/>
        </table:table-row>
        <table:table-row table:style-name="ro1">
          <table:table-cell office:value-type="float" office:value="376.633056640625">
            <text:p>376.6330566406</text:p>
          </table:table-cell>
          <table:table-cell office:value-type="float" office:value="-0.001141294">
            <text:p>-0.001141294</text:p>
          </table:table-cell>
          <table:table-cell table:number-columns-repeated="4"/>
        </table:table-row>
        <table:table-row table:style-name="ro1">
          <table:table-cell office:value-type="float" office:value="376.743865966797">
            <text:p>376.7438659668</text:p>
          </table:table-cell>
          <table:table-cell office:value-type="float" office:value="0.001944328">
            <text:p>0.001944328</text:p>
          </table:table-cell>
          <table:table-cell table:number-columns-repeated="4"/>
        </table:table-row>
        <table:table-row table:style-name="ro1">
          <table:table-cell office:value-type="float" office:value="376.854705810547">
            <text:p>376.8547058105</text:p>
          </table:table-cell>
          <table:table-cell office:value-type="float" office:value="0.01229912">
            <text:p>0.01229912</text:p>
          </table:table-cell>
          <table:table-cell table:number-columns-repeated="4"/>
        </table:table-row>
        <table:table-row table:style-name="ro1">
          <table:table-cell office:value-type="float" office:value="376.965515136719">
            <text:p>376.9655151367</text:p>
          </table:table-cell>
          <table:table-cell office:value-type="float" office:value="0.0144704">
            <text:p>0.0144704</text:p>
          </table:table-cell>
          <table:table-cell table:number-columns-repeated="4"/>
        </table:table-row>
        <table:table-row table:style-name="ro1">
          <table:table-cell office:value-type="float" office:value="377.076354980469">
            <text:p>377.0763549805</text:p>
          </table:table-cell>
          <table:table-cell office:value-type="float" office:value="-0.004882775">
            <text:p>-0.004882775</text:p>
          </table:table-cell>
          <table:table-cell table:number-columns-repeated="4"/>
        </table:table-row>
        <table:table-row table:style-name="ro1">
          <table:table-cell office:value-type="float" office:value="377.187194824219">
            <text:p>377.1871948242</text:p>
          </table:table-cell>
          <table:table-cell office:value-type="float" office:value="0.003967495">
            <text:p>0.003967495</text:p>
          </table:table-cell>
          <table:table-cell table:number-columns-repeated="4"/>
        </table:table-row>
        <table:table-row table:style-name="ro1">
          <table:table-cell office:value-type="float" office:value="377.298034667969">
            <text:p>377.298034668</text:p>
          </table:table-cell>
          <table:table-cell office:value-type="float" office:value="-0.006760215">
            <text:p>-0.006760215</text:p>
          </table:table-cell>
          <table:table-cell table:number-columns-repeated="4"/>
        </table:table-row>
        <table:table-row table:style-name="ro1">
          <table:table-cell office:value-type="float" office:value="377.408905029297">
            <text:p>377.4089050293</text:p>
          </table:table-cell>
          <table:table-cell office:value-type="float" office:value="0.007020959">
            <text:p>0.007020959</text:p>
          </table:table-cell>
          <table:table-cell table:number-columns-repeated="4"/>
        </table:table-row>
        <table:table-row table:style-name="ro1">
          <table:table-cell office:value-type="float" office:value="377.519744873047">
            <text:p>377.519744873</text:p>
          </table:table-cell>
          <table:table-cell office:value-type="float" office:value="-0.004140541">
            <text:p>-0.004140541</text:p>
          </table:table-cell>
          <table:table-cell table:number-columns-repeated="4"/>
        </table:table-row>
        <table:table-row table:style-name="ro1">
          <table:table-cell office:value-type="float" office:value="377.630615234375">
            <text:p>377.6306152344</text:p>
          </table:table-cell>
          <table:table-cell office:value-type="float" office:value="0.001867294">
            <text:p>0.001867294</text:p>
          </table:table-cell>
          <table:table-cell table:number-columns-repeated="4"/>
        </table:table-row>
        <table:table-row table:style-name="ro1">
          <table:table-cell office:value-type="float" office:value="377.741485595703">
            <text:p>377.7414855957</text:p>
          </table:table-cell>
          <table:table-cell office:value-type="float" office:value="-0.004853302">
            <text:p>-0.004853302</text:p>
          </table:table-cell>
          <table:table-cell table:number-columns-repeated="4"/>
        </table:table-row>
        <table:table-row table:style-name="ro1">
          <table:table-cell office:value-type="float" office:value="377.852355957031">
            <text:p>377.852355957</text:p>
          </table:table-cell>
          <table:table-cell office:value-type="float" office:value="-0.005748196">
            <text:p>-0.005748196</text:p>
          </table:table-cell>
          <table:table-cell table:number-columns-repeated="4"/>
        </table:table-row>
        <table:table-row table:style-name="ro1">
          <table:table-cell office:value-type="float" office:value="377.963256835938">
            <text:p>377.9632568359</text:p>
          </table:table-cell>
          <table:table-cell office:value-type="float" office:value="-0.00325452">
            <text:p>-0.00325452</text:p>
          </table:table-cell>
          <table:table-cell table:number-columns-repeated="4"/>
        </table:table-row>
        <table:table-row table:style-name="ro1">
          <table:table-cell office:value-type="float" office:value="378.074157714844">
            <text:p>378.0741577148</text:p>
          </table:table-cell>
          <table:table-cell office:value-type="float" office:value="0.01074728">
            <text:p>0.01074728</text:p>
          </table:table-cell>
          <table:table-cell table:number-columns-repeated="4"/>
        </table:table-row>
        <table:table-row table:style-name="ro1">
          <table:table-cell office:value-type="float" office:value="378.185028076172">
            <text:p>378.1850280762</text:p>
          </table:table-cell>
          <table:table-cell office:value-type="float" office:value="0.009431734">
            <text:p>0.009431734</text:p>
          </table:table-cell>
          <table:table-cell table:number-columns-repeated="4"/>
        </table:table-row>
        <table:table-row table:style-name="ro1">
          <table:table-cell office:value-type="float" office:value="378.295928955078">
            <text:p>378.2959289551</text:p>
          </table:table-cell>
          <table:table-cell office:value-type="float" office:value="-0.007268537">
            <text:p>-0.007268537</text:p>
          </table:table-cell>
          <table:table-cell table:number-columns-repeated="4"/>
        </table:table-row>
        <table:table-row table:style-name="ro1">
          <table:table-cell office:value-type="float" office:value="378.406860351563">
            <text:p>378.4068603516</text:p>
          </table:table-cell>
          <table:table-cell office:value-type="float" office:value="-0.0005357302">
            <text:p>-0.0005357302</text:p>
          </table:table-cell>
          <table:table-cell table:number-columns-repeated="4"/>
        </table:table-row>
        <table:table-row table:style-name="ro1">
          <table:table-cell office:value-type="float" office:value="378.517761230469">
            <text:p>378.5177612305</text:p>
          </table:table-cell>
          <table:table-cell office:value-type="float" office:value="0.004908003">
            <text:p>0.004908003</text:p>
          </table:table-cell>
          <table:table-cell table:number-columns-repeated="4"/>
        </table:table-row>
        <table:table-row table:style-name="ro1">
          <table:table-cell office:value-type="float" office:value="378.628692626953">
            <text:p>378.628692627</text:p>
          </table:table-cell>
          <table:table-cell office:value-type="float" office:value="0.0008968224">
            <text:p>0.0008968224</text:p>
          </table:table-cell>
          <table:table-cell table:number-columns-repeated="4"/>
        </table:table-row>
        <table:table-row table:style-name="ro1">
          <table:table-cell office:value-type="float" office:value="378.739593505859">
            <text:p>378.7395935059</text:p>
          </table:table-cell>
          <table:table-cell office:value-type="float" office:value="0.00188803">
            <text:p>0.00188803</text:p>
          </table:table-cell>
          <table:table-cell table:number-columns-repeated="4"/>
        </table:table-row>
        <table:table-row table:style-name="ro1">
          <table:table-cell office:value-type="float" office:value="378.850524902344">
            <text:p>378.8505249023</text:p>
          </table:table-cell>
          <table:table-cell office:value-type="float" office:value="0.002912558">
            <text:p>0.002912558</text:p>
          </table:table-cell>
          <table:table-cell table:number-columns-repeated="4"/>
        </table:table-row>
        <table:table-row table:style-name="ro1">
          <table:table-cell office:value-type="float" office:value="378.961486816406">
            <text:p>378.9614868164</text:p>
          </table:table-cell>
          <table:table-cell office:value-type="float" office:value="0.004932524">
            <text:p>0.004932524</text:p>
          </table:table-cell>
          <table:table-cell table:number-columns-repeated="4"/>
        </table:table-row>
        <table:table-row table:style-name="ro1">
          <table:table-cell office:value-type="float" office:value="379.072418212891">
            <text:p>379.0724182129</text:p>
          </table:table-cell>
          <table:table-cell office:value-type="float" office:value="0.009558653">
            <text:p>0.009558653</text:p>
          </table:table-cell>
          <table:table-cell table:number-columns-repeated="4"/>
        </table:table-row>
        <table:table-row table:style-name="ro1">
          <table:table-cell office:value-type="float" office:value="379.183380126953">
            <text:p>379.183380127</text:p>
          </table:table-cell>
          <table:table-cell office:value-type="float" office:value="-0.006145687">
            <text:p>-0.006145687</text:p>
          </table:table-cell>
          <table:table-cell table:number-columns-repeated="4"/>
        </table:table-row>
        <table:table-row table:style-name="ro1">
          <table:table-cell office:value-type="float" office:value="379.294311523438">
            <text:p>379.2943115234</text:p>
          </table:table-cell>
          <table:table-cell office:value-type="float" office:value="0.006352848">
            <text:p>0.006352848</text:p>
          </table:table-cell>
          <table:table-cell table:number-columns-repeated="4"/>
        </table:table-row>
        <table:table-row table:style-name="ro1">
          <table:table-cell office:value-type="float" office:value="379.4052734375">
            <text:p>379.4052734375</text:p>
          </table:table-cell>
          <table:table-cell office:value-type="float" office:value="-0.00959266">
            <text:p>-0.00959266</text:p>
          </table:table-cell>
          <table:table-cell table:number-columns-repeated="4"/>
        </table:table-row>
        <table:table-row table:style-name="ro1">
          <table:table-cell office:value-type="float" office:value="379.516235351563">
            <text:p>379.5162353516</text:p>
          </table:table-cell>
          <table:table-cell office:value-type="float" office:value="-0.006253847">
            <text:p>-0.006253847</text:p>
          </table:table-cell>
          <table:table-cell table:number-columns-repeated="4"/>
        </table:table-row>
        <table:table-row table:style-name="ro1">
          <table:table-cell office:value-type="float" office:value="379.627227783203">
            <text:p>379.6272277832</text:p>
          </table:table-cell>
          <table:table-cell office:value-type="float" office:value="-0.001918484">
            <text:p>-0.001918484</text:p>
          </table:table-cell>
          <table:table-cell table:number-columns-repeated="4"/>
        </table:table-row>
        <table:table-row table:style-name="ro1">
          <table:table-cell office:value-type="float" office:value="379.738189697266">
            <text:p>379.7381896973</text:p>
          </table:table-cell>
          <table:table-cell office:value-type="float" office:value="0.01072842">
            <text:p>0.01072842</text:p>
          </table:table-cell>
          <table:table-cell table:number-columns-repeated="4"/>
        </table:table-row>
        <table:table-row table:style-name="ro1">
          <table:table-cell office:value-type="float" office:value="379.849182128906">
            <text:p>379.8491821289</text:p>
          </table:table-cell>
          <table:table-cell office:value-type="float" office:value="-0.00503687">
            <text:p>-0.00503687</text:p>
          </table:table-cell>
          <table:table-cell table:number-columns-repeated="4"/>
        </table:table-row>
        <table:table-row table:style-name="ro1">
          <table:table-cell office:value-type="float" office:value="379.960174560547">
            <text:p>379.9601745605</text:p>
          </table:table-cell>
          <table:table-cell office:value-type="float" office:value="-0.00225891">
            <text:p>-0.00225891</text:p>
          </table:table-cell>
          <table:table-cell table:number-columns-repeated="4"/>
        </table:table-row>
        <table:table-row table:style-name="ro1">
          <table:table-cell office:value-type="float" office:value="380.071166992188">
            <text:p>380.0711669922</text:p>
          </table:table-cell>
          <table:table-cell office:value-type="float" office:value="-0.005315765">
            <text:p>-0.005315765</text:p>
          </table:table-cell>
          <table:table-cell table:number-columns-repeated="4"/>
        </table:table-row>
        <table:table-row table:style-name="ro1">
          <table:table-cell office:value-type="float" office:value="380.182189941406">
            <text:p>380.1821899414</text:p>
          </table:table-cell>
          <table:table-cell office:value-type="float" office:value="0.01031843">
            <text:p>0.01031843</text:p>
          </table:table-cell>
          <table:table-cell table:number-columns-repeated="4"/>
        </table:table-row>
        <table:table-row table:style-name="ro1">
          <table:table-cell office:value-type="float" office:value="380.293182373047">
            <text:p>380.293182373</text:p>
          </table:table-cell>
          <table:table-cell office:value-type="float" office:value="0.005846627">
            <text:p>0.005846627</text:p>
          </table:table-cell>
          <table:table-cell table:number-columns-repeated="4"/>
        </table:table-row>
        <table:table-row table:style-name="ro1">
          <table:table-cell office:value-type="float" office:value="380.404205322266">
            <text:p>380.4042053223</text:p>
          </table:table-cell>
          <table:table-cell office:value-type="float" office:value="-0.0112117">
            <text:p>-0.0112117</text:p>
          </table:table-cell>
          <table:table-cell table:number-columns-repeated="4"/>
        </table:table-row>
        <table:table-row table:style-name="ro1">
          <table:table-cell office:value-type="float" office:value="380.515228271484">
            <text:p>380.5152282715</text:p>
          </table:table-cell>
          <table:table-cell office:value-type="float" office:value="-0.007823836">
            <text:p>-0.007823836</text:p>
          </table:table-cell>
          <table:table-cell table:number-columns-repeated="4"/>
        </table:table-row>
        <table:table-row table:style-name="ro1">
          <table:table-cell office:value-type="float" office:value="380.626251220703">
            <text:p>380.6262512207</text:p>
          </table:table-cell>
          <table:table-cell office:value-type="float" office:value="-0.001136346">
            <text:p>-0.001136346</text:p>
          </table:table-cell>
          <table:table-cell table:number-columns-repeated="4"/>
        </table:table-row>
        <table:table-row table:style-name="ro1">
          <table:table-cell office:value-type="float" office:value="380.737274169922">
            <text:p>380.7372741699</text:p>
          </table:table-cell>
          <table:table-cell office:value-type="float" office:value="-0.008678377">
            <text:p>-0.008678377</text:p>
          </table:table-cell>
          <table:table-cell table:number-columns-repeated="4"/>
        </table:table-row>
        <table:table-row table:style-name="ro1">
          <table:table-cell office:value-type="float" office:value="380.848327636719">
            <text:p>380.8483276367</text:p>
          </table:table-cell>
          <table:table-cell office:value-type="float" office:value="0.01408558">
            <text:p>0.01408558</text:p>
          </table:table-cell>
          <table:table-cell table:number-columns-repeated="4"/>
        </table:table-row>
        <table:table-row table:style-name="ro1">
          <table:table-cell office:value-type="float" office:value="380.959381103516">
            <text:p>380.9593811035</text:p>
          </table:table-cell>
          <table:table-cell office:value-type="float" office:value="-0.001653036">
            <text:p>-0.001653036</text:p>
          </table:table-cell>
          <table:table-cell table:number-columns-repeated="4"/>
        </table:table-row>
        <table:table-row table:style-name="ro1">
          <table:table-cell office:value-type="float" office:value="381.070404052734">
            <text:p>381.0704040527</text:p>
          </table:table-cell>
          <table:table-cell office:value-type="float" office:value="-0.005128159">
            <text:p>-0.005128159</text:p>
          </table:table-cell>
          <table:table-cell table:number-columns-repeated="4"/>
        </table:table-row>
        <table:table-row table:style-name="ro1">
          <table:table-cell office:value-type="float" office:value="381.181488037109">
            <text:p>381.1814880371</text:p>
          </table:table-cell>
          <table:table-cell office:value-type="float" office:value="-0.002512683">
            <text:p>-0.002512683</text:p>
          </table:table-cell>
          <table:table-cell table:number-columns-repeated="4"/>
        </table:table-row>
        <table:table-row table:style-name="ro1">
          <table:table-cell office:value-type="float" office:value="381.292541503906">
            <text:p>381.2925415039</text:p>
          </table:table-cell>
          <table:table-cell office:value-type="float" office:value="-0.004457671">
            <text:p>-0.004457671</text:p>
          </table:table-cell>
          <table:table-cell table:number-columns-repeated="4"/>
        </table:table-row>
        <table:table-row table:style-name="ro1">
          <table:table-cell office:value-type="float" office:value="381.403594970703">
            <text:p>381.4035949707</text:p>
          </table:table-cell>
          <table:table-cell office:value-type="float" office:value="0.01074428">
            <text:p>0.01074428</text:p>
          </table:table-cell>
          <table:table-cell table:number-columns-repeated="4"/>
        </table:table-row>
        <table:table-row table:style-name="ro1">
          <table:table-cell office:value-type="float" office:value="381.514678955078">
            <text:p>381.5146789551</text:p>
          </table:table-cell>
          <table:table-cell office:value-type="float" office:value="0.01004421">
            <text:p>0.01004421</text:p>
          </table:table-cell>
          <table:table-cell table:number-columns-repeated="4"/>
        </table:table-row>
        <table:table-row table:style-name="ro1">
          <table:table-cell office:value-type="float" office:value="381.625762939453">
            <text:p>381.6257629395</text:p>
          </table:table-cell>
          <table:table-cell office:value-type="float" office:value="0.01160972">
            <text:p>0.01160972</text:p>
          </table:table-cell>
          <table:table-cell table:number-columns-repeated="4"/>
        </table:table-row>
        <table:table-row table:style-name="ro1">
          <table:table-cell office:value-type="float" office:value="381.736846923828">
            <text:p>381.7368469238</text:p>
          </table:table-cell>
          <table:table-cell office:value-type="float" office:value="0.008137154">
            <text:p>0.008137154</text:p>
          </table:table-cell>
          <table:table-cell table:number-columns-repeated="4"/>
        </table:table-row>
        <table:table-row table:style-name="ro1">
          <table:table-cell office:value-type="float" office:value="381.847930908203">
            <text:p>381.8479309082</text:p>
          </table:table-cell>
          <table:table-cell office:value-type="float" office:value="-0.005773976">
            <text:p>-0.005773976</text:p>
          </table:table-cell>
          <table:table-cell table:number-columns-repeated="4"/>
        </table:table-row>
        <table:table-row table:style-name="ro1">
          <table:table-cell office:value-type="float" office:value="381.959045410156">
            <text:p>381.9590454102</text:p>
          </table:table-cell>
          <table:table-cell office:value-type="float" office:value="0.007896638">
            <text:p>0.007896638</text:p>
          </table:table-cell>
          <table:table-cell table:number-columns-repeated="4"/>
        </table:table-row>
        <table:table-row table:style-name="ro1">
          <table:table-cell office:value-type="float" office:value="382.070129394531">
            <text:p>382.0701293945</text:p>
          </table:table-cell>
          <table:table-cell office:value-type="float" office:value="0.001764866">
            <text:p>0.001764866</text:p>
          </table:table-cell>
          <table:table-cell table:number-columns-repeated="4"/>
        </table:table-row>
        <table:table-row table:style-name="ro1">
          <table:table-cell office:value-type="float" office:value="382.181243896484">
            <text:p>382.1812438965</text:p>
          </table:table-cell>
          <table:table-cell office:value-type="float" office:value="0.004225091">
            <text:p>0.004225091</text:p>
          </table:table-cell>
          <table:table-cell table:number-columns-repeated="4"/>
        </table:table-row>
        <table:table-row table:style-name="ro1">
          <table:table-cell office:value-type="float" office:value="382.292358398438">
            <text:p>382.2923583984</text:p>
          </table:table-cell>
          <table:table-cell office:value-type="float" office:value="-0.004692879">
            <text:p>-0.004692879</text:p>
          </table:table-cell>
          <table:table-cell table:number-columns-repeated="4"/>
        </table:table-row>
        <table:table-row table:style-name="ro1">
          <table:table-cell office:value-type="float" office:value="382.403503417969">
            <text:p>382.403503418</text:p>
          </table:table-cell>
          <table:table-cell office:value-type="float" office:value="0.00397523">
            <text:p>0.00397523</text:p>
          </table:table-cell>
          <table:table-cell table:number-columns-repeated="4"/>
        </table:table-row>
        <table:table-row table:style-name="ro1">
          <table:table-cell office:value-type="float" office:value="382.514617919922">
            <text:p>382.5146179199</text:p>
          </table:table-cell>
          <table:table-cell office:value-type="float" office:value="0.01507538">
            <text:p>0.01507538</text:p>
          </table:table-cell>
          <table:table-cell table:number-columns-repeated="4"/>
        </table:table-row>
        <table:table-row table:style-name="ro1">
          <table:table-cell office:value-type="float" office:value="382.625762939453">
            <text:p>382.6257629395</text:p>
          </table:table-cell>
          <table:table-cell office:value-type="float" office:value="-0.002174295">
            <text:p>-0.002174295</text:p>
          </table:table-cell>
          <table:table-cell table:number-columns-repeated="4"/>
        </table:table-row>
        <table:table-row table:style-name="ro1">
          <table:table-cell office:value-type="float" office:value="382.736907958984">
            <text:p>382.736907959</text:p>
          </table:table-cell>
          <table:table-cell office:value-type="float" office:value="0.006674532">
            <text:p>0.006674532</text:p>
          </table:table-cell>
          <table:table-cell table:number-columns-repeated="4"/>
        </table:table-row>
        <table:table-row table:style-name="ro1">
          <table:table-cell office:value-type="float" office:value="382.848052978516">
            <text:p>382.8480529785</text:p>
          </table:table-cell>
          <table:table-cell office:value-type="float" office:value="0.002638303">
            <text:p>0.002638303</text:p>
          </table:table-cell>
          <table:table-cell table:number-columns-repeated="4"/>
        </table:table-row>
        <table:table-row table:style-name="ro1">
          <table:table-cell office:value-type="float" office:value="382.959197998047">
            <text:p>382.959197998</text:p>
          </table:table-cell>
          <table:table-cell office:value-type="float" office:value="0.008343224">
            <text:p>0.008343224</text:p>
          </table:table-cell>
          <table:table-cell table:number-columns-repeated="4"/>
        </table:table-row>
        <table:table-row table:style-name="ro1">
          <table:table-cell office:value-type="float" office:value="383.070343017578">
            <text:p>383.0703430176</text:p>
          </table:table-cell>
          <table:table-cell office:value-type="float" office:value="0.003547058">
            <text:p>0.003547058</text:p>
          </table:table-cell>
          <table:table-cell table:number-columns-repeated="4"/>
        </table:table-row>
        <table:table-row table:style-name="ro1">
          <table:table-cell office:value-type="float" office:value="383.181518554688">
            <text:p>383.1815185547</text:p>
          </table:table-cell>
          <table:table-cell office:value-type="float" office:value="0.0127517">
            <text:p>0.0127517</text:p>
          </table:table-cell>
          <table:table-cell table:number-columns-repeated="4"/>
        </table:table-row>
        <table:table-row table:style-name="ro1">
          <table:table-cell office:value-type="float" office:value="383.292694091797">
            <text:p>383.2926940918</text:p>
          </table:table-cell>
          <table:table-cell office:value-type="float" office:value="0.003008823">
            <text:p>0.003008823</text:p>
          </table:table-cell>
          <table:table-cell table:number-columns-repeated="4"/>
        </table:table-row>
        <table:table-row table:style-name="ro1">
          <table:table-cell office:value-type="float" office:value="383.403869628906">
            <text:p>383.4038696289</text:p>
          </table:table-cell>
          <table:table-cell office:value-type="float" office:value="-0.001632684">
            <text:p>-0.001632684</text:p>
          </table:table-cell>
          <table:table-cell table:number-columns-repeated="4"/>
        </table:table-row>
        <table:table-row table:style-name="ro1">
          <table:table-cell office:value-type="float" office:value="383.515045166016">
            <text:p>383.515045166</text:p>
          </table:table-cell>
          <table:table-cell office:value-type="float" office:value="-0.001191448">
            <text:p>-0.001191448</text:p>
          </table:table-cell>
          <table:table-cell table:number-columns-repeated="4"/>
        </table:table-row>
        <table:table-row table:style-name="ro1">
          <table:table-cell office:value-type="float" office:value="383.626220703125">
            <text:p>383.6262207031</text:p>
          </table:table-cell>
          <table:table-cell office:value-type="float" office:value="0.0103637">
            <text:p>0.0103637</text:p>
          </table:table-cell>
          <table:table-cell table:number-columns-repeated="4"/>
        </table:table-row>
        <table:table-row table:style-name="ro1">
          <table:table-cell office:value-type="float" office:value="383.737426757813">
            <text:p>383.7374267578</text:p>
          </table:table-cell>
          <table:table-cell office:value-type="float" office:value="0.01247538">
            <text:p>0.01247538</text:p>
          </table:table-cell>
          <table:table-cell table:number-columns-repeated="4"/>
        </table:table-row>
        <table:table-row table:style-name="ro1">
          <table:table-cell office:value-type="float" office:value="383.8486328125">
            <text:p>383.8486328125</text:p>
          </table:table-cell>
          <table:table-cell office:value-type="float" office:value="0.0001609174">
            <text:p>0.0001609174</text:p>
          </table:table-cell>
          <table:table-cell table:number-columns-repeated="4"/>
        </table:table-row>
        <table:table-row table:style-name="ro1">
          <table:table-cell office:value-type="float" office:value="383.959838867188">
            <text:p>383.9598388672</text:p>
          </table:table-cell>
          <table:table-cell office:value-type="float" office:value="-0.0007150389">
            <text:p>-0.0007150389</text:p>
          </table:table-cell>
          <table:table-cell table:number-columns-repeated="4"/>
        </table:table-row>
        <table:table-row table:style-name="ro1">
          <table:table-cell office:value-type="float" office:value="384.071044921875">
            <text:p>384.0710449219</text:p>
          </table:table-cell>
          <table:table-cell office:value-type="float" office:value="-0.008008822">
            <text:p>-0.008008822</text:p>
          </table:table-cell>
          <table:table-cell table:number-columns-repeated="4"/>
        </table:table-row>
        <table:table-row table:style-name="ro1">
          <table:table-cell office:value-type="float" office:value="384.182250976563">
            <text:p>384.1822509766</text:p>
          </table:table-cell>
          <table:table-cell office:value-type="float" office:value="0.01033099">
            <text:p>0.01033099</text:p>
          </table:table-cell>
          <table:table-cell table:number-columns-repeated="4"/>
        </table:table-row>
        <table:table-row table:style-name="ro1">
          <table:table-cell office:value-type="float" office:value="384.293487548828">
            <text:p>384.2934875488</text:p>
          </table:table-cell>
          <table:table-cell office:value-type="float" office:value="-0.006808662">
            <text:p>-0.006808662</text:p>
          </table:table-cell>
          <table:table-cell table:number-columns-repeated="4"/>
        </table:table-row>
        <table:table-row table:style-name="ro1">
          <table:table-cell office:value-type="float" office:value="384.404693603516">
            <text:p>384.4046936035</text:p>
          </table:table-cell>
          <table:table-cell office:value-type="float" office:value="0.01041901">
            <text:p>0.01041901</text:p>
          </table:table-cell>
          <table:table-cell table:number-columns-repeated="4"/>
        </table:table-row>
        <table:table-row table:style-name="ro1">
          <table:table-cell office:value-type="float" office:value="384.515930175781">
            <text:p>384.5159301758</text:p>
          </table:table-cell>
          <table:table-cell office:value-type="float" office:value="0.01048447">
            <text:p>0.01048447</text:p>
          </table:table-cell>
          <table:table-cell table:number-columns-repeated="4"/>
        </table:table-row>
        <table:table-row table:style-name="ro1">
          <table:table-cell office:value-type="float" office:value="384.627197265625">
            <text:p>384.6271972656</text:p>
          </table:table-cell>
          <table:table-cell office:value-type="float" office:value="-0.008566332">
            <text:p>-0.008566332</text:p>
          </table:table-cell>
          <table:table-cell table:number-columns-repeated="4"/>
        </table:table-row>
        <table:table-row table:style-name="ro1">
          <table:table-cell office:value-type="float" office:value="384.738433837891">
            <text:p>384.7384338379</text:p>
          </table:table-cell>
          <table:table-cell office:value-type="float" office:value="-0.003472763">
            <text:p>-0.003472763</text:p>
          </table:table-cell>
          <table:table-cell table:number-columns-repeated="4"/>
        </table:table-row>
        <table:table-row table:style-name="ro1">
          <table:table-cell office:value-type="float" office:value="384.849670410156">
            <text:p>384.8496704102</text:p>
          </table:table-cell>
          <table:table-cell office:value-type="float" office:value="0.01597525">
            <text:p>0.01597525</text:p>
          </table:table-cell>
          <table:table-cell table:number-columns-repeated="4"/>
        </table:table-row>
        <table:table-row table:style-name="ro1">
          <table:table-cell office:value-type="float" office:value="384.9609375">
            <text:p>384.9609375</text:p>
          </table:table-cell>
          <table:table-cell office:value-type="float" office:value="0.01373468">
            <text:p>0.01373468</text:p>
          </table:table-cell>
          <table:table-cell table:number-columns-repeated="4"/>
        </table:table-row>
        <table:table-row table:style-name="ro1">
          <table:table-cell office:value-type="float" office:value="385.072204589844">
            <text:p>385.0722045898</text:p>
          </table:table-cell>
          <table:table-cell office:value-type="float" office:value="-0.004843402">
            <text:p>-0.004843402</text:p>
          </table:table-cell>
          <table:table-cell table:number-columns-repeated="4"/>
        </table:table-row>
        <table:table-row table:style-name="ro1">
          <table:table-cell office:value-type="float" office:value="385.183471679688">
            <text:p>385.1834716797</text:p>
          </table:table-cell>
          <table:table-cell office:value-type="float" office:value="0.01363646">
            <text:p>0.01363646</text:p>
          </table:table-cell>
          <table:table-cell table:number-columns-repeated="4"/>
        </table:table-row>
        <table:table-row table:style-name="ro1">
          <table:table-cell office:value-type="float" office:value="385.294738769531">
            <text:p>385.2947387695</text:p>
          </table:table-cell>
          <table:table-cell office:value-type="float" office:value="0.008079476">
            <text:p>0.008079476</text:p>
          </table:table-cell>
          <table:table-cell table:number-columns-repeated="4"/>
        </table:table-row>
        <table:table-row table:style-name="ro1">
          <table:table-cell office:value-type="float" office:value="385.406036376953">
            <text:p>385.406036377</text:p>
          </table:table-cell>
          <table:table-cell office:value-type="float" office:value="-0.002622572">
            <text:p>-0.002622572</text:p>
          </table:table-cell>
          <table:table-cell table:number-columns-repeated="4"/>
        </table:table-row>
        <table:table-row table:style-name="ro1">
          <table:table-cell office:value-type="float" office:value="385.517333984375">
            <text:p>385.5173339844</text:p>
          </table:table-cell>
          <table:table-cell office:value-type="float" office:value="0.004121152">
            <text:p>0.004121152</text:p>
          </table:table-cell>
          <table:table-cell table:number-columns-repeated="4"/>
        </table:table-row>
        <table:table-row table:style-name="ro1">
          <table:table-cell office:value-type="float" office:value="385.628601074219">
            <text:p>385.6286010742</text:p>
          </table:table-cell>
          <table:table-cell office:value-type="float" office:value="-0.004063627">
            <text:p>-0.004063627</text:p>
          </table:table-cell>
          <table:table-cell table:number-columns-repeated="4"/>
        </table:table-row>
        <table:table-row table:style-name="ro1">
          <table:table-cell office:value-type="float" office:value="385.739898681641">
            <text:p>385.7398986816</text:p>
          </table:table-cell>
          <table:table-cell office:value-type="float" office:value="-0.007666876">
            <text:p>-0.007666876</text:p>
          </table:table-cell>
          <table:table-cell table:number-columns-repeated="4"/>
        </table:table-row>
        <table:table-row table:style-name="ro1">
          <table:table-cell office:value-type="float" office:value="385.851226806641">
            <text:p>385.8512268066</text:p>
          </table:table-cell>
          <table:table-cell office:value-type="float" office:value="0.01215574">
            <text:p>0.01215574</text:p>
          </table:table-cell>
          <table:table-cell table:number-columns-repeated="4"/>
        </table:table-row>
        <table:table-row table:style-name="ro1">
          <table:table-cell office:value-type="float" office:value="385.962524414063">
            <text:p>385.9625244141</text:p>
          </table:table-cell>
          <table:table-cell office:value-type="float" office:value="-0.003518534">
            <text:p>-0.003518534</text:p>
          </table:table-cell>
          <table:table-cell table:number-columns-repeated="4"/>
        </table:table-row>
        <table:table-row table:style-name="ro1">
          <table:table-cell office:value-type="float" office:value="386.073852539063">
            <text:p>386.0738525391</text:p>
          </table:table-cell>
          <table:table-cell office:value-type="float" office:value="0.0112041">
            <text:p>0.0112041</text:p>
          </table:table-cell>
          <table:table-cell table:number-columns-repeated="4"/>
        </table:table-row>
        <table:table-row table:style-name="ro1">
          <table:table-cell office:value-type="float" office:value="386.185180664063">
            <text:p>386.1851806641</text:p>
          </table:table-cell>
          <table:table-cell office:value-type="float" office:value="0.0007032637">
            <text:p>0.0007032637</text:p>
          </table:table-cell>
          <table:table-cell table:number-columns-repeated="4"/>
        </table:table-row>
        <table:table-row table:style-name="ro1">
          <table:table-cell office:value-type="float" office:value="386.296508789063">
            <text:p>386.2965087891</text:p>
          </table:table-cell>
          <table:table-cell office:value-type="float" office:value="0.006817081">
            <text:p>0.006817081</text:p>
          </table:table-cell>
          <table:table-cell table:number-columns-repeated="4"/>
        </table:table-row>
        <table:table-row table:style-name="ro1">
          <table:table-cell office:value-type="float" office:value="386.407836914063">
            <text:p>386.4078369141</text:p>
          </table:table-cell>
          <table:table-cell office:value-type="float" office:value="0.002258403">
            <text:p>0.002258403</text:p>
          </table:table-cell>
          <table:table-cell table:number-columns-repeated="4"/>
        </table:table-row>
        <table:table-row table:style-name="ro1">
          <table:table-cell office:value-type="float" office:value="386.519165039063">
            <text:p>386.5191650391</text:p>
          </table:table-cell>
          <table:table-cell office:value-type="float" office:value="0.003354141">
            <text:p>0.003354141</text:p>
          </table:table-cell>
          <table:table-cell table:number-columns-repeated="4"/>
        </table:table-row>
        <table:table-row table:style-name="ro1">
          <table:table-cell office:value-type="float" office:value="386.630523681641">
            <text:p>386.6305236816</text:p>
          </table:table-cell>
          <table:table-cell office:value-type="float" office:value="0.003585635">
            <text:p>0.003585635</text:p>
          </table:table-cell>
          <table:table-cell table:number-columns-repeated="4"/>
        </table:table-row>
        <table:table-row table:style-name="ro1">
          <table:table-cell office:value-type="float" office:value="386.741882324219">
            <text:p>386.7418823242</text:p>
          </table:table-cell>
          <table:table-cell office:value-type="float" office:value="0.001583287">
            <text:p>0.001583287</text:p>
          </table:table-cell>
          <table:table-cell table:number-columns-repeated="4"/>
        </table:table-row>
        <table:table-row table:style-name="ro1">
          <table:table-cell office:value-type="float" office:value="386.853240966797">
            <text:p>386.8532409668</text:p>
          </table:table-cell>
          <table:table-cell office:value-type="float" office:value="-0.002885706">
            <text:p>-0.002885706</text:p>
          </table:table-cell>
          <table:table-cell table:number-columns-repeated="4"/>
        </table:table-row>
        <table:table-row table:style-name="ro1">
          <table:table-cell office:value-type="float" office:value="386.964599609375">
            <text:p>386.9645996094</text:p>
          </table:table-cell>
          <table:table-cell office:value-type="float" office:value="-0.00454649">
            <text:p>-0.00454649</text:p>
          </table:table-cell>
          <table:table-cell table:number-columns-repeated="4"/>
        </table:table-row>
        <table:table-row table:style-name="ro1">
          <table:table-cell office:value-type="float" office:value="387.075958251953">
            <text:p>387.075958252</text:p>
          </table:table-cell>
          <table:table-cell office:value-type="float" office:value="0.008000894">
            <text:p>0.008000894</text:p>
          </table:table-cell>
          <table:table-cell table:number-columns-repeated="4"/>
        </table:table-row>
        <table:table-row table:style-name="ro1">
          <table:table-cell office:value-type="float" office:value="387.187347412109">
            <text:p>387.1873474121</text:p>
          </table:table-cell>
          <table:table-cell office:value-type="float" office:value="-0.004996207">
            <text:p>-0.004996207</text:p>
          </table:table-cell>
          <table:table-cell table:number-columns-repeated="4"/>
        </table:table-row>
        <table:table-row table:style-name="ro1">
          <table:table-cell office:value-type="float" office:value="387.298736572266">
            <text:p>387.2987365723</text:p>
          </table:table-cell>
          <table:table-cell office:value-type="float" office:value="0.01400804">
            <text:p>0.01400804</text:p>
          </table:table-cell>
          <table:table-cell table:number-columns-repeated="4"/>
        </table:table-row>
        <table:table-row table:style-name="ro1">
          <table:table-cell office:value-type="float" office:value="387.410095214844">
            <text:p>387.4100952148</text:p>
          </table:table-cell>
          <table:table-cell office:value-type="float" office:value="0.004504434">
            <text:p>0.004504434</text:p>
          </table:table-cell>
          <table:table-cell table:number-columns-repeated="4"/>
        </table:table-row>
        <table:table-row table:style-name="ro1">
          <table:table-cell office:value-type="float" office:value="387.521514892578">
            <text:p>387.5215148926</text:p>
          </table:table-cell>
          <table:table-cell office:value-type="float" office:value="-0.0009762677">
            <text:p>-0.0009762677</text:p>
          </table:table-cell>
          <table:table-cell table:number-columns-repeated="4"/>
        </table:table-row>
        <table:table-row table:style-name="ro1">
          <table:table-cell office:value-type="float" office:value="387.632904052734">
            <text:p>387.6329040527</text:p>
          </table:table-cell>
          <table:table-cell office:value-type="float" office:value="0.0001724996">
            <text:p>0.0001724996</text:p>
          </table:table-cell>
          <table:table-cell table:number-columns-repeated="4"/>
        </table:table-row>
        <table:table-row table:style-name="ro1">
          <table:table-cell office:value-type="float" office:value="387.744293212891">
            <text:p>387.7442932129</text:p>
          </table:table-cell>
          <table:table-cell office:value-type="float" office:value="0.0126047">
            <text:p>0.0126047</text:p>
          </table:table-cell>
          <table:table-cell table:number-columns-repeated="4"/>
        </table:table-row>
        <table:table-row table:style-name="ro1">
          <table:table-cell office:value-type="float" office:value="387.855712890625">
            <text:p>387.8557128906</text:p>
          </table:table-cell>
          <table:table-cell office:value-type="float" office:value="0.00201965">
            <text:p>0.00201965</text:p>
          </table:table-cell>
          <table:table-cell table:number-columns-repeated="4"/>
        </table:table-row>
        <table:table-row table:style-name="ro1">
          <table:table-cell office:value-type="float" office:value="387.967132568359">
            <text:p>387.9671325684</text:p>
          </table:table-cell>
          <table:table-cell office:value-type="float" office:value="0.004312103">
            <text:p>0.004312103</text:p>
          </table:table-cell>
          <table:table-cell table:number-columns-repeated="4"/>
        </table:table-row>
        <table:table-row table:style-name="ro1">
          <table:table-cell office:value-type="float" office:value="388.078552246094">
            <text:p>388.0785522461</text:p>
          </table:table-cell>
          <table:table-cell office:value-type="float" office:value="0.002007147">
            <text:p>0.002007147</text:p>
          </table:table-cell>
          <table:table-cell table:number-columns-repeated="4"/>
        </table:table-row>
        <table:table-row table:style-name="ro1">
          <table:table-cell office:value-type="float" office:value="388.189971923828">
            <text:p>388.1899719238</text:p>
          </table:table-cell>
          <table:table-cell office:value-type="float" office:value="0.0007130978">
            <text:p>0.0007130978</text:p>
          </table:table-cell>
          <table:table-cell table:number-columns-repeated="4"/>
        </table:table-row>
        <table:table-row table:style-name="ro1">
          <table:table-cell office:value-type="float" office:value="388.301422119141">
            <text:p>388.3014221191</text:p>
          </table:table-cell>
          <table:table-cell office:value-type="float" office:value="-0.004634261">
            <text:p>-0.004634261</text:p>
          </table:table-cell>
          <table:table-cell table:number-columns-repeated="4"/>
        </table:table-row>
        <table:table-row table:style-name="ro1">
          <table:table-cell office:value-type="float" office:value="388.412872314453">
            <text:p>388.4128723145</text:p>
          </table:table-cell>
          <table:table-cell office:value-type="float" office:value="-0.008100717">
            <text:p>-0.008100717</text:p>
          </table:table-cell>
          <table:table-cell table:number-columns-repeated="4"/>
        </table:table-row>
        <table:table-row table:style-name="ro1">
          <table:table-cell office:value-type="float" office:value="388.524291992188">
            <text:p>388.5242919922</text:p>
          </table:table-cell>
          <table:table-cell office:value-type="float" office:value="0.005576947">
            <text:p>0.005576947</text:p>
          </table:table-cell>
          <table:table-cell table:number-columns-repeated="4"/>
        </table:table-row>
        <table:table-row table:style-name="ro1">
          <table:table-cell office:value-type="float" office:value="388.635772705078">
            <text:p>388.6357727051</text:p>
          </table:table-cell>
          <table:table-cell office:value-type="float" office:value="0.004406986">
            <text:p>0.004406986</text:p>
          </table:table-cell>
          <table:table-cell table:number-columns-repeated="4"/>
        </table:table-row>
        <table:table-row table:style-name="ro1">
          <table:table-cell office:value-type="float" office:value="388.747222900391">
            <text:p>388.7472229004</text:p>
          </table:table-cell>
          <table:table-cell office:value-type="string">
            <text:p>-5.630432E-05</text:p>
          </table:table-cell>
          <table:table-cell table:number-columns-repeated="4"/>
        </table:table-row>
        <table:table-row table:style-name="ro1">
          <table:table-cell office:value-type="float" office:value="388.858673095703">
            <text:p>388.8586730957</text:p>
          </table:table-cell>
          <table:table-cell office:value-type="float" office:value="-0.007033429">
            <text:p>-0.007033429</text:p>
          </table:table-cell>
          <table:table-cell table:number-columns-repeated="4"/>
        </table:table-row>
        <table:table-row table:style-name="ro1">
          <table:table-cell office:value-type="float" office:value="388.970153808594">
            <text:p>388.9701538086</text:p>
          </table:table-cell>
          <table:table-cell office:value-type="float" office:value="0.002922933">
            <text:p>0.002922933</text:p>
          </table:table-cell>
          <table:table-cell table:number-columns-repeated="4"/>
        </table:table-row>
        <table:table-row table:style-name="ro1">
          <table:table-cell office:value-type="float" office:value="389.081634521484">
            <text:p>389.0816345215</text:p>
          </table:table-cell>
          <table:table-cell office:value-type="float" office:value="-0.001659683">
            <text:p>-0.001659683</text:p>
          </table:table-cell>
          <table:table-cell table:number-columns-repeated="4"/>
        </table:table-row>
        <table:table-row table:style-name="ro1">
          <table:table-cell office:value-type="float" office:value="389.193115234375">
            <text:p>389.1931152344</text:p>
          </table:table-cell>
          <table:table-cell office:value-type="float" office:value="0.001921741">
            <text:p>0.001921741</text:p>
          </table:table-cell>
          <table:table-cell table:number-columns-repeated="4"/>
        </table:table-row>
        <table:table-row table:style-name="ro1">
          <table:table-cell office:value-type="float" office:value="389.304595947266">
            <text:p>389.3045959473</text:p>
          </table:table-cell>
          <table:table-cell office:value-type="float" office:value="-0.001267309">
            <text:p>-0.001267309</text:p>
          </table:table-cell>
          <table:table-cell table:number-columns-repeated="4"/>
        </table:table-row>
        <table:table-row table:style-name="ro1">
          <table:table-cell office:value-type="float" office:value="389.416076660156">
            <text:p>389.4160766602</text:p>
          </table:table-cell>
          <table:table-cell office:value-type="float" office:value="0.003492811">
            <text:p>0.003492811</text:p>
          </table:table-cell>
          <table:table-cell table:number-columns-repeated="4"/>
        </table:table-row>
        <table:table-row table:style-name="ro1">
          <table:table-cell office:value-type="float" office:value="389.527587890625">
            <text:p>389.5275878906</text:p>
          </table:table-cell>
          <table:table-cell office:value-type="float" office:value="-0.003100353">
            <text:p>-0.003100353</text:p>
          </table:table-cell>
          <table:table-cell table:number-columns-repeated="4"/>
        </table:table-row>
        <table:table-row table:style-name="ro1">
          <table:table-cell office:value-type="float" office:value="389.639099121094">
            <text:p>389.6390991211</text:p>
          </table:table-cell>
          <table:table-cell office:value-type="float" office:value="0.01248987">
            <text:p>0.01248987</text:p>
          </table:table-cell>
          <table:table-cell table:number-columns-repeated="4"/>
        </table:table-row>
        <table:table-row table:style-name="ro1">
          <table:table-cell office:value-type="float" office:value="389.750610351563">
            <text:p>389.7506103516</text:p>
          </table:table-cell>
          <table:table-cell office:value-type="float" office:value="-0.0026753">
            <text:p>-0.0026753</text:p>
          </table:table-cell>
          <table:table-cell table:number-columns-repeated="4"/>
        </table:table-row>
        <table:table-row table:style-name="ro1">
          <table:table-cell office:value-type="float" office:value="389.862121582031">
            <text:p>389.862121582</text:p>
          </table:table-cell>
          <table:table-cell office:value-type="float" office:value="-0.003640512">
            <text:p>-0.003640512</text:p>
          </table:table-cell>
          <table:table-cell table:number-columns-repeated="4"/>
        </table:table-row>
        <table:table-row table:style-name="ro1">
          <table:table-cell office:value-type="float" office:value="389.9736328125">
            <text:p>389.9736328125</text:p>
          </table:table-cell>
          <table:table-cell office:value-type="float" office:value="-0.002218727">
            <text:p>-0.002218727</text:p>
          </table:table-cell>
          <table:table-cell table:number-columns-repeated="4"/>
        </table:table-row>
        <table:table-row table:style-name="ro1">
          <table:table-cell office:value-type="float" office:value="390.085174560547">
            <text:p>390.0851745605</text:p>
          </table:table-cell>
          <table:table-cell office:value-type="float" office:value="-0.002948195">
            <text:p>-0.002948195</text:p>
          </table:table-cell>
          <table:table-cell table:number-columns-repeated="4"/>
        </table:table-row>
        <table:table-row table:style-name="ro1">
          <table:table-cell office:value-type="float" office:value="390.196685791016">
            <text:p>390.196685791</text:p>
          </table:table-cell>
          <table:table-cell office:value-type="float" office:value="0.01321788">
            <text:p>0.01321788</text:p>
          </table:table-cell>
          <table:table-cell table:number-columns-repeated="4"/>
        </table:table-row>
        <table:table-row table:style-name="ro1">
          <table:table-cell office:value-type="float" office:value="390.308227539063">
            <text:p>390.3082275391</text:p>
          </table:table-cell>
          <table:table-cell office:value-type="float" office:value="0.0003699141">
            <text:p>0.0003699141</text:p>
          </table:table-cell>
          <table:table-cell table:number-columns-repeated="4"/>
        </table:table-row>
        <table:table-row table:style-name="ro1">
          <table:table-cell office:value-type="float" office:value="390.419769287109">
            <text:p>390.4197692871</text:p>
          </table:table-cell>
          <table:table-cell office:value-type="float" office:value="0.0006744493">
            <text:p>0.0006744493</text:p>
          </table:table-cell>
          <table:table-cell table:number-columns-repeated="4"/>
        </table:table-row>
        <table:table-row table:style-name="ro1">
          <table:table-cell office:value-type="float" office:value="390.531341552734">
            <text:p>390.5313415527</text:p>
          </table:table-cell>
          <table:table-cell office:value-type="float" office:value="0.0009477033">
            <text:p>0.0009477033</text:p>
          </table:table-cell>
          <table:table-cell table:number-columns-repeated="4"/>
        </table:table-row>
        <table:table-row table:style-name="ro1">
          <table:table-cell office:value-type="float" office:value="390.642883300781">
            <text:p>390.6428833008</text:p>
          </table:table-cell>
          <table:table-cell office:value-type="float" office:value="-0.004192341">
            <text:p>-0.004192341</text:p>
          </table:table-cell>
          <table:table-cell table:number-columns-repeated="4"/>
        </table:table-row>
        <table:table-row table:style-name="ro1">
          <table:table-cell office:value-type="float" office:value="390.754455566406">
            <text:p>390.7544555664</text:p>
          </table:table-cell>
          <table:table-cell office:value-type="float" office:value="0.01461254">
            <text:p>0.01461254</text:p>
          </table:table-cell>
          <table:table-cell table:number-columns-repeated="4"/>
        </table:table-row>
        <table:table-row table:style-name="ro1">
          <table:table-cell office:value-type="float" office:value="390.866027832031">
            <text:p>390.866027832</text:p>
          </table:table-cell>
          <table:table-cell office:value-type="float" office:value="0.0007644378">
            <text:p>0.0007644378</text:p>
          </table:table-cell>
          <table:table-cell table:number-columns-repeated="4"/>
        </table:table-row>
        <table:table-row table:style-name="ro1">
          <table:table-cell office:value-type="float" office:value="390.977600097656">
            <text:p>390.9776000977</text:p>
          </table:table-cell>
          <table:table-cell office:value-type="float" office:value="-0.0001230448">
            <text:p>-0.0001230448</text:p>
          </table:table-cell>
          <table:table-cell table:number-columns-repeated="4"/>
        </table:table-row>
        <table:table-row table:style-name="ro1">
          <table:table-cell office:value-type="float" office:value="391.089172363281">
            <text:p>391.0891723633</text:p>
          </table:table-cell>
          <table:table-cell office:value-type="float" office:value="-0.005402333">
            <text:p>-0.005402333</text:p>
          </table:table-cell>
          <table:table-cell table:number-columns-repeated="4"/>
        </table:table-row>
        <table:table-row table:style-name="ro1">
          <table:table-cell office:value-type="float" office:value="391.200744628906">
            <text:p>391.2007446289</text:p>
          </table:table-cell>
          <table:table-cell office:value-type="float" office:value="0.01509878">
            <text:p>0.01509878</text:p>
          </table:table-cell>
          <table:table-cell table:number-columns-repeated="4"/>
        </table:table-row>
        <table:table-row table:style-name="ro1">
          <table:table-cell office:value-type="float" office:value="391.312347412109">
            <text:p>391.3123474121</text:p>
          </table:table-cell>
          <table:table-cell office:value-type="float" office:value="-0.0009375585">
            <text:p>-0.0009375585</text:p>
          </table:table-cell>
          <table:table-cell table:number-columns-repeated="4"/>
        </table:table-row>
        <table:table-row table:style-name="ro1">
          <table:table-cell office:value-type="float" office:value="391.423950195313">
            <text:p>391.4239501953</text:p>
          </table:table-cell>
          <table:table-cell office:value-type="float" office:value="0.01133335">
            <text:p>0.01133335</text:p>
          </table:table-cell>
          <table:table-cell table:number-columns-repeated="4"/>
        </table:table-row>
        <table:table-row table:style-name="ro1">
          <table:table-cell office:value-type="float" office:value="391.535552978516">
            <text:p>391.5355529785</text:p>
          </table:table-cell>
          <table:table-cell office:value-type="float" office:value="-0.008722377">
            <text:p>-0.008722377</text:p>
          </table:table-cell>
          <table:table-cell table:number-columns-repeated="4"/>
        </table:table-row>
        <table:table-row table:style-name="ro1">
          <table:table-cell office:value-type="float" office:value="391.647155761719">
            <text:p>391.6471557617</text:p>
          </table:table-cell>
          <table:table-cell office:value-type="float" office:value="0.004119307">
            <text:p>0.004119307</text:p>
          </table:table-cell>
          <table:table-cell table:number-columns-repeated="4"/>
        </table:table-row>
        <table:table-row table:style-name="ro1">
          <table:table-cell office:value-type="float" office:value="391.758758544922">
            <text:p>391.7587585449</text:p>
          </table:table-cell>
          <table:table-cell office:value-type="float" office:value="-0.00901875">
            <text:p>-0.00901875</text:p>
          </table:table-cell>
          <table:table-cell table:number-columns-repeated="4"/>
        </table:table-row>
        <table:table-row table:style-name="ro1">
          <table:table-cell office:value-type="float" office:value="391.870391845703">
            <text:p>391.8703918457</text:p>
          </table:table-cell>
          <table:table-cell office:value-type="float" office:value="0.01162372">
            <text:p>0.01162372</text:p>
          </table:table-cell>
          <table:table-cell table:number-columns-repeated="4"/>
        </table:table-row>
        <table:table-row table:style-name="ro1">
          <table:table-cell office:value-type="float" office:value="391.982025146484">
            <text:p>391.9820251465</text:p>
          </table:table-cell>
          <table:table-cell office:value-type="float" office:value="0.001628729">
            <text:p>0.001628729</text:p>
          </table:table-cell>
          <table:table-cell table:number-columns-repeated="4"/>
        </table:table-row>
        <table:table-row table:style-name="ro1">
          <table:table-cell office:value-type="float" office:value="392.093658447266">
            <text:p>392.0936584473</text:p>
          </table:table-cell>
          <table:table-cell office:value-type="float" office:value="-0.007398235">
            <text:p>-0.007398235</text:p>
          </table:table-cell>
          <table:table-cell table:number-columns-repeated="4"/>
        </table:table-row>
        <table:table-row table:style-name="ro1">
          <table:table-cell office:value-type="float" office:value="392.205291748047">
            <text:p>392.205291748</text:p>
          </table:table-cell>
          <table:table-cell office:value-type="float" office:value="0.00019076">
            <text:p>0.00019076</text:p>
          </table:table-cell>
          <table:table-cell table:number-columns-repeated="4"/>
        </table:table-row>
        <table:table-row table:style-name="ro1">
          <table:table-cell office:value-type="float" office:value="392.316925048828">
            <text:p>392.3169250488</text:p>
          </table:table-cell>
          <table:table-cell office:value-type="float" office:value="0.01454087">
            <text:p>0.01454087</text:p>
          </table:table-cell>
          <table:table-cell table:number-columns-repeated="4"/>
        </table:table-row>
        <table:table-row table:style-name="ro1">
          <table:table-cell office:value-type="float" office:value="392.428558349609">
            <text:p>392.4285583496</text:p>
          </table:table-cell>
          <table:table-cell office:value-type="float" office:value="0.01008641">
            <text:p>0.01008641</text:p>
          </table:table-cell>
          <table:table-cell table:number-columns-repeated="4"/>
        </table:table-row>
        <table:table-row table:style-name="ro1">
          <table:table-cell office:value-type="float" office:value="392.540222167969">
            <text:p>392.540222168</text:p>
          </table:table-cell>
          <table:table-cell office:value-type="float" office:value="-0.003385925">
            <text:p>-0.003385925</text:p>
          </table:table-cell>
          <table:table-cell table:number-columns-repeated="4"/>
        </table:table-row>
        <table:table-row table:style-name="ro1">
          <table:table-cell office:value-type="float" office:value="392.651885986328">
            <text:p>392.6518859863</text:p>
          </table:table-cell>
          <table:table-cell office:value-type="float" office:value="-0.00772514">
            <text:p>-0.00772514</text:p>
          </table:table-cell>
          <table:table-cell table:number-columns-repeated="4"/>
        </table:table-row>
        <table:table-row table:style-name="ro1">
          <table:table-cell office:value-type="float" office:value="392.763549804688">
            <text:p>392.7635498047</text:p>
          </table:table-cell>
          <table:table-cell office:value-type="string">
            <text:p>-2.196618E-05</text:p>
          </table:table-cell>
          <table:table-cell table:number-columns-repeated="4"/>
        </table:table-row>
        <table:table-row table:style-name="ro1">
          <table:table-cell office:value-type="float" office:value="392.875213623047">
            <text:p>392.875213623</text:p>
          </table:table-cell>
          <table:table-cell office:value-type="float" office:value="0.0003387722">
            <text:p>0.0003387722</text:p>
          </table:table-cell>
          <table:table-cell table:number-columns-repeated="4"/>
        </table:table-row>
        <table:table-row table:style-name="ro1">
          <table:table-cell office:value-type="float" office:value="392.986907958984">
            <text:p>392.986907959</text:p>
          </table:table-cell>
          <table:table-cell office:value-type="float" office:value="0.004265742">
            <text:p>0.004265742</text:p>
          </table:table-cell>
          <table:table-cell table:number-columns-repeated="4"/>
        </table:table-row>
        <table:table-row table:style-name="ro1">
          <table:table-cell office:value-type="float" office:value="393.098602294922">
            <text:p>393.0986022949</text:p>
          </table:table-cell>
          <table:table-cell office:value-type="float" office:value="0.01309011">
            <text:p>0.01309011</text:p>
          </table:table-cell>
          <table:table-cell table:number-columns-repeated="4"/>
        </table:table-row>
        <table:table-row table:style-name="ro1">
          <table:table-cell office:value-type="float" office:value="393.210266113281">
            <text:p>393.2102661133</text:p>
          </table:table-cell>
          <table:table-cell office:value-type="float" office:value="-0.003056992">
            <text:p>-0.003056992</text:p>
          </table:table-cell>
          <table:table-cell table:number-columns-repeated="4"/>
        </table:table-row>
        <table:table-row table:style-name="ro1">
          <table:table-cell office:value-type="float" office:value="393.321960449219">
            <text:p>393.3219604492</text:p>
          </table:table-cell>
          <table:table-cell office:value-type="float" office:value="-0.001365955">
            <text:p>-0.001365955</text:p>
          </table:table-cell>
          <table:table-cell table:number-columns-repeated="4"/>
        </table:table-row>
        <table:table-row table:style-name="ro1">
          <table:table-cell office:value-type="float" office:value="393.433685302734">
            <text:p>393.4336853027</text:p>
          </table:table-cell>
          <table:table-cell office:value-type="float" office:value="-0.00466807">
            <text:p>-0.00466807</text:p>
          </table:table-cell>
          <table:table-cell table:number-columns-repeated="4"/>
        </table:table-row>
        <table:table-row table:style-name="ro1">
          <table:table-cell office:value-type="float" office:value="393.545379638672">
            <text:p>393.5453796387</text:p>
          </table:table-cell>
          <table:table-cell office:value-type="float" office:value="-0.009779768">
            <text:p>-0.009779768</text:p>
          </table:table-cell>
          <table:table-cell table:number-columns-repeated="4"/>
        </table:table-row>
        <table:table-row table:style-name="ro1">
          <table:table-cell office:value-type="float" office:value="393.657104492188">
            <text:p>393.6571044922</text:p>
          </table:table-cell>
          <table:table-cell office:value-type="float" office:value="0.0005926623">
            <text:p>0.0005926623</text:p>
          </table:table-cell>
          <table:table-cell table:number-columns-repeated="4"/>
        </table:table-row>
        <table:table-row table:style-name="ro1">
          <table:table-cell office:value-type="float" office:value="393.768798828125">
            <text:p>393.7687988281</text:p>
          </table:table-cell>
          <table:table-cell office:value-type="float" office:value="-0.005488812">
            <text:p>-0.005488812</text:p>
          </table:table-cell>
          <table:table-cell table:number-columns-repeated="4"/>
        </table:table-row>
        <table:table-row table:style-name="ro1">
          <table:table-cell office:value-type="float" office:value="393.880523681641">
            <text:p>393.8805236816</text:p>
          </table:table-cell>
          <table:table-cell office:value-type="float" office:value="0.01084016">
            <text:p>0.01084016</text:p>
          </table:table-cell>
          <table:table-cell table:number-columns-repeated="4"/>
        </table:table-row>
        <table:table-row table:style-name="ro1">
          <table:table-cell office:value-type="float" office:value="393.992248535156">
            <text:p>393.9922485352</text:p>
          </table:table-cell>
          <table:table-cell office:value-type="float" office:value="0.01983054">
            <text:p>0.01983054</text:p>
          </table:table-cell>
          <table:table-cell table:number-columns-repeated="4"/>
        </table:table-row>
        <table:table-row table:style-name="ro1">
          <table:table-cell office:value-type="float" office:value="394.10400390625">
            <text:p>394.1040039063</text:p>
          </table:table-cell>
          <table:table-cell office:value-type="float" office:value="-0.005514052">
            <text:p>-0.005514052</text:p>
          </table:table-cell>
          <table:table-cell table:number-columns-repeated="4"/>
        </table:table-row>
        <table:table-row table:style-name="ro1">
          <table:table-cell office:value-type="float" office:value="394.215728759766">
            <text:p>394.2157287598</text:p>
          </table:table-cell>
          <table:table-cell office:value-type="float" office:value="0.001199497">
            <text:p>0.001199497</text:p>
          </table:table-cell>
          <table:table-cell table:number-columns-repeated="4"/>
        </table:table-row>
        <table:table-row table:style-name="ro1">
          <table:table-cell office:value-type="float" office:value="394.327484130859">
            <text:p>394.3274841309</text:p>
          </table:table-cell>
          <table:table-cell office:value-type="float" office:value="0.005740118">
            <text:p>0.005740118</text:p>
          </table:table-cell>
          <table:table-cell table:number-columns-repeated="4"/>
        </table:table-row>
        <table:table-row table:style-name="ro1">
          <table:table-cell office:value-type="float" office:value="394.439239501953">
            <text:p>394.439239502</text:p>
          </table:table-cell>
          <table:table-cell office:value-type="float" office:value="-0.002497548">
            <text:p>-0.002497548</text:p>
          </table:table-cell>
          <table:table-cell table:number-columns-repeated="4"/>
        </table:table-row>
        <table:table-row table:style-name="ro1">
          <table:table-cell office:value-type="float" office:value="394.550994873047">
            <text:p>394.550994873</text:p>
          </table:table-cell>
          <table:table-cell office:value-type="float" office:value="-0.007724472">
            <text:p>-0.007724472</text:p>
          </table:table-cell>
          <table:table-cell table:number-columns-repeated="4"/>
        </table:table-row>
        <table:table-row table:style-name="ro1">
          <table:table-cell office:value-type="float" office:value="394.662750244141">
            <text:p>394.6627502441</text:p>
          </table:table-cell>
          <table:table-cell office:value-type="float" office:value="0.002964543">
            <text:p>0.002964543</text:p>
          </table:table-cell>
          <table:table-cell table:number-columns-repeated="4"/>
        </table:table-row>
        <table:table-row table:style-name="ro1">
          <table:table-cell office:value-type="float" office:value="394.774536132813">
            <text:p>394.7745361328</text:p>
          </table:table-cell>
          <table:table-cell office:value-type="float" office:value="-0.002464626">
            <text:p>-0.002464626</text:p>
          </table:table-cell>
          <table:table-cell table:number-columns-repeated="4"/>
        </table:table-row>
        <table:table-row table:style-name="ro1">
          <table:table-cell office:value-type="float" office:value="394.886291503906">
            <text:p>394.8862915039</text:p>
          </table:table-cell>
          <table:table-cell office:value-type="float" office:value="0.007537233">
            <text:p>0.007537233</text:p>
          </table:table-cell>
          <table:table-cell table:number-columns-repeated="4"/>
        </table:table-row>
        <table:table-row table:style-name="ro1">
          <table:table-cell office:value-type="float" office:value="394.998077392578">
            <text:p>394.9980773926</text:p>
          </table:table-cell>
          <table:table-cell office:value-type="float" office:value="-0.001666407">
            <text:p>-0.001666407</text:p>
          </table:table-cell>
          <table:table-cell table:number-columns-repeated="4"/>
        </table:table-row>
        <table:table-row table:style-name="ro1">
          <table:table-cell office:value-type="float" office:value="395.10986328125">
            <text:p>395.1098632813</text:p>
          </table:table-cell>
          <table:table-cell office:value-type="float" office:value="0.0087771">
            <text:p>0.0087771</text:p>
          </table:table-cell>
          <table:table-cell table:number-columns-repeated="4"/>
        </table:table-row>
        <table:table-row table:style-name="ro1">
          <table:table-cell office:value-type="float" office:value="395.221649169922">
            <text:p>395.2216491699</text:p>
          </table:table-cell>
          <table:table-cell office:value-type="float" office:value="-0.00208676">
            <text:p>-0.00208676</text:p>
          </table:table-cell>
          <table:table-cell table:number-columns-repeated="4"/>
        </table:table-row>
        <table:table-row table:style-name="ro1">
          <table:table-cell office:value-type="float" office:value="395.333465576172">
            <text:p>395.3334655762</text:p>
          </table:table-cell>
          <table:table-cell office:value-type="float" office:value="-0.007702942">
            <text:p>-0.007702942</text:p>
          </table:table-cell>
          <table:table-cell table:number-columns-repeated="4"/>
        </table:table-row>
        <table:table-row table:style-name="ro1">
          <table:table-cell office:value-type="float" office:value="395.445251464844">
            <text:p>395.4452514648</text:p>
          </table:table-cell>
          <table:table-cell office:value-type="float" office:value="-0.001601825">
            <text:p>-0.001601825</text:p>
          </table:table-cell>
          <table:table-cell table:number-columns-repeated="4"/>
        </table:table-row>
        <table:table-row table:style-name="ro1">
          <table:table-cell office:value-type="float" office:value="395.557067871094">
            <text:p>395.5570678711</text:p>
          </table:table-cell>
          <table:table-cell office:value-type="float" office:value="-0.005550078">
            <text:p>-0.005550078</text:p>
          </table:table-cell>
          <table:table-cell table:number-columns-repeated="4"/>
        </table:table-row>
        <table:table-row table:style-name="ro1">
          <table:table-cell office:value-type="float" office:value="395.668884277344">
            <text:p>395.6688842773</text:p>
          </table:table-cell>
          <table:table-cell office:value-type="float" office:value="0.04065116">
            <text:p>0.04065116</text:p>
          </table:table-cell>
          <table:table-cell table:number-columns-repeated="4"/>
        </table:table-row>
        <table:table-row table:style-name="ro1">
          <table:table-cell office:value-type="float" office:value="395.780700683594">
            <text:p>395.7807006836</text:p>
          </table:table-cell>
          <table:table-cell office:value-type="float" office:value="-0.002739261">
            <text:p>-0.002739261</text:p>
          </table:table-cell>
          <table:table-cell table:number-columns-repeated="4"/>
        </table:table-row>
        <table:table-row table:style-name="ro1">
          <table:table-cell office:value-type="float" office:value="395.892547607422">
            <text:p>395.8925476074</text:p>
          </table:table-cell>
          <table:table-cell office:value-type="float" office:value="0.003140185">
            <text:p>0.003140185</text:p>
          </table:table-cell>
          <table:table-cell table:number-columns-repeated="4"/>
        </table:table-row>
        <table:table-row table:style-name="ro1">
          <table:table-cell office:value-type="float" office:value="396.004364013672">
            <text:p>396.0043640137</text:p>
          </table:table-cell>
          <table:table-cell office:value-type="float" office:value="0.001573955">
            <text:p>0.001573955</text:p>
          </table:table-cell>
          <table:table-cell table:number-columns-repeated="4"/>
        </table:table-row>
        <table:table-row table:style-name="ro1">
          <table:table-cell office:value-type="float" office:value="396.1162109375">
            <text:p>396.1162109375</text:p>
          </table:table-cell>
          <table:table-cell office:value-type="float" office:value="0.04412733">
            <text:p>0.04412733</text:p>
          </table:table-cell>
          <table:table-cell table:number-columns-repeated="4"/>
        </table:table-row>
        <table:table-row table:style-name="ro1">
          <table:table-cell office:value-type="float" office:value="396.228057861328">
            <text:p>396.2280578613</text:p>
          </table:table-cell>
          <table:table-cell office:value-type="float" office:value="-0.0006208958">
            <text:p>-0.0006208958</text:p>
          </table:table-cell>
          <table:table-cell table:number-columns-repeated="4"/>
        </table:table-row>
        <table:table-row table:style-name="ro1">
          <table:table-cell office:value-type="float" office:value="396.339904785156">
            <text:p>396.3399047852</text:p>
          </table:table-cell>
          <table:table-cell office:value-type="float" office:value="-0.001932222">
            <text:p>-0.001932222</text:p>
          </table:table-cell>
          <table:table-cell table:number-columns-repeated="4"/>
        </table:table-row>
        <table:table-row table:style-name="ro1">
          <table:table-cell office:value-type="float" office:value="396.451751708984">
            <text:p>396.451751709</text:p>
          </table:table-cell>
          <table:table-cell office:value-type="float" office:value="-0.004323825">
            <text:p>-0.004323825</text:p>
          </table:table-cell>
          <table:table-cell table:number-columns-repeated="4"/>
        </table:table-row>
        <table:table-row table:style-name="ro1">
          <table:table-cell office:value-type="float" office:value="396.563629150391">
            <text:p>396.5636291504</text:p>
          </table:table-cell>
          <table:table-cell office:value-type="float" office:value="-0.006739893">
            <text:p>-0.006739893</text:p>
          </table:table-cell>
          <table:table-cell table:number-columns-repeated="4"/>
        </table:table-row>
        <table:table-row table:style-name="ro1">
          <table:table-cell office:value-type="float" office:value="396.675476074219">
            <text:p>396.6754760742</text:p>
          </table:table-cell>
          <table:table-cell office:value-type="float" office:value="-0.002947641">
            <text:p>-0.002947641</text:p>
          </table:table-cell>
          <table:table-cell table:number-columns-repeated="4"/>
        </table:table-row>
        <table:table-row table:style-name="ro1">
          <table:table-cell office:value-type="float" office:value="396.787353515625">
            <text:p>396.7873535156</text:p>
          </table:table-cell>
          <table:table-cell office:value-type="float" office:value="0.01093022">
            <text:p>0.01093022</text:p>
          </table:table-cell>
          <table:table-cell table:number-columns-repeated="4"/>
        </table:table-row>
        <table:table-row table:style-name="ro1">
          <table:table-cell office:value-type="float" office:value="396.899230957031">
            <text:p>396.899230957</text:p>
          </table:table-cell>
          <table:table-cell office:value-type="float" office:value="-0.004444666">
            <text:p>-0.004444666</text:p>
          </table:table-cell>
          <table:table-cell table:number-columns-repeated="4"/>
        </table:table-row>
        <table:table-row table:style-name="ro1">
          <table:table-cell office:value-type="float" office:value="397.011108398438">
            <text:p>397.0111083984</text:p>
          </table:table-cell>
          <table:table-cell office:value-type="float" office:value="0.001919488">
            <text:p>0.001919488</text:p>
          </table:table-cell>
          <table:table-cell table:number-columns-repeated="4"/>
        </table:table-row>
        <table:table-row table:style-name="ro1">
          <table:table-cell office:value-type="float" office:value="397.123016357422">
            <text:p>397.1230163574</text:p>
          </table:table-cell>
          <table:table-cell office:value-type="float" office:value="-0.003316376">
            <text:p>-0.003316376</text:p>
          </table:table-cell>
          <table:table-cell table:number-columns-repeated="4"/>
        </table:table-row>
        <table:table-row table:style-name="ro1">
          <table:table-cell office:value-type="float" office:value="397.234893798828">
            <text:p>397.2348937988</text:p>
          </table:table-cell>
          <table:table-cell office:value-type="float" office:value="0.005102121">
            <text:p>0.005102121</text:p>
          </table:table-cell>
          <table:table-cell table:number-columns-repeated="4"/>
        </table:table-row>
        <table:table-row table:style-name="ro1">
          <table:table-cell office:value-type="float" office:value="397.346801757813">
            <text:p>397.3468017578</text:p>
          </table:table-cell>
          <table:table-cell office:value-type="float" office:value="0.003642402">
            <text:p>0.003642402</text:p>
          </table:table-cell>
          <table:table-cell table:number-columns-repeated="4"/>
        </table:table-row>
        <table:table-row table:style-name="ro1">
          <table:table-cell office:value-type="float" office:value="397.458709716797">
            <text:p>397.4587097168</text:p>
          </table:table-cell>
          <table:table-cell office:value-type="float" office:value="-0.001850399">
            <text:p>-0.001850399</text:p>
          </table:table-cell>
          <table:table-cell table:number-columns-repeated="4"/>
        </table:table-row>
        <table:table-row table:style-name="ro1">
          <table:table-cell office:value-type="float" office:value="397.570617675781">
            <text:p>397.5706176758</text:p>
          </table:table-cell>
          <table:table-cell office:value-type="float" office:value="0.004914308">
            <text:p>0.004914308</text:p>
          </table:table-cell>
          <table:table-cell table:number-columns-repeated="4"/>
        </table:table-row>
        <table:table-row table:style-name="ro1">
          <table:table-cell office:value-type="float" office:value="397.682525634766">
            <text:p>397.6825256348</text:p>
          </table:table-cell>
          <table:table-cell office:value-type="float" office:value="-0.002216878">
            <text:p>-0.002216878</text:p>
          </table:table-cell>
          <table:table-cell table:number-columns-repeated="4"/>
        </table:table-row>
        <table:table-row table:style-name="ro1">
          <table:table-cell office:value-type="float" office:value="397.794464111328">
            <text:p>397.7944641113</text:p>
          </table:table-cell>
          <table:table-cell office:value-type="float" office:value="0.001893295">
            <text:p>0.001893295</text:p>
          </table:table-cell>
          <table:table-cell table:number-columns-repeated="4"/>
        </table:table-row>
        <table:table-row table:style-name="ro1">
          <table:table-cell office:value-type="float" office:value="397.906402587891">
            <text:p>397.9064025879</text:p>
          </table:table-cell>
          <table:table-cell office:value-type="float" office:value="0.0008281753">
            <text:p>0.0008281753</text:p>
          </table:table-cell>
          <table:table-cell table:number-columns-repeated="4"/>
        </table:table-row>
        <table:table-row table:style-name="ro1">
          <table:table-cell office:value-type="float" office:value="398.018310546875">
            <text:p>398.0183105469</text:p>
          </table:table-cell>
          <table:table-cell office:value-type="float" office:value="0.006137384">
            <text:p>0.006137384</text:p>
          </table:table-cell>
          <table:table-cell table:number-columns-repeated="4"/>
        </table:table-row>
        <table:table-row table:style-name="ro1">
          <table:table-cell office:value-type="float" office:value="398.130249023438">
            <text:p>398.1302490234</text:p>
          </table:table-cell>
          <table:table-cell office:value-type="float" office:value="-0.003167049">
            <text:p>-0.003167049</text:p>
          </table:table-cell>
          <table:table-cell table:number-columns-repeated="4"/>
        </table:table-row>
        <table:table-row table:style-name="ro1">
          <table:table-cell office:value-type="float" office:value="398.242218017578">
            <text:p>398.2422180176</text:p>
          </table:table-cell>
          <table:table-cell office:value-type="float" office:value="-0.0008509887">
            <text:p>-0.0008509887</text:p>
          </table:table-cell>
          <table:table-cell table:number-columns-repeated="4"/>
        </table:table-row>
        <table:table-row table:style-name="ro1">
          <table:table-cell office:value-type="float" office:value="398.354156494141">
            <text:p>398.3541564941</text:p>
          </table:table-cell>
          <table:table-cell office:value-type="float" office:value="-0.002034237">
            <text:p>-0.002034237</text:p>
          </table:table-cell>
          <table:table-cell table:number-columns-repeated="4"/>
        </table:table-row>
        <table:table-row table:style-name="ro1">
          <table:table-cell office:value-type="float" office:value="398.466125488281">
            <text:p>398.4661254883</text:p>
          </table:table-cell>
          <table:table-cell office:value-type="float" office:value="-0.001903119">
            <text:p>-0.001903119</text:p>
          </table:table-cell>
          <table:table-cell table:number-columns-repeated="4"/>
        </table:table-row>
        <table:table-row table:style-name="ro1">
          <table:table-cell office:value-type="float" office:value="398.578094482422">
            <text:p>398.5780944824</text:p>
          </table:table-cell>
          <table:table-cell office:value-type="float" office:value="-0.002086826">
            <text:p>-0.002086826</text:p>
          </table:table-cell>
          <table:table-cell table:number-columns-repeated="4"/>
        </table:table-row>
        <table:table-row table:style-name="ro1">
          <table:table-cell office:value-type="float" office:value="398.690063476563">
            <text:p>398.6900634766</text:p>
          </table:table-cell>
          <table:table-cell office:value-type="float" office:value="-0.006792925">
            <text:p>-0.006792925</text:p>
          </table:table-cell>
          <table:table-cell table:number-columns-repeated="4"/>
        </table:table-row>
        <table:table-row table:style-name="ro1">
          <table:table-cell office:value-type="float" office:value="398.802032470703">
            <text:p>398.8020324707</text:p>
          </table:table-cell>
          <table:table-cell office:value-type="float" office:value="-0.006094085">
            <text:p>-0.006094085</text:p>
          </table:table-cell>
          <table:table-cell table:number-columns-repeated="4"/>
        </table:table-row>
        <table:table-row table:style-name="ro1">
          <table:table-cell office:value-type="float" office:value="398.914001464844">
            <text:p>398.9140014648</text:p>
          </table:table-cell>
          <table:table-cell office:value-type="float" office:value="-0.003996748">
            <text:p>-0.003996748</text:p>
          </table:table-cell>
          <table:table-cell table:number-columns-repeated="4"/>
        </table:table-row>
        <table:table-row table:style-name="ro1">
          <table:table-cell office:value-type="float" office:value="399.026000976563">
            <text:p>399.0260009766</text:p>
          </table:table-cell>
          <table:table-cell office:value-type="float" office:value="0.01976613">
            <text:p>0.01976613</text:p>
          </table:table-cell>
          <table:table-cell table:number-columns-repeated="4"/>
        </table:table-row>
        <table:table-row table:style-name="ro1">
          <table:table-cell office:value-type="float" office:value="399.137969970703">
            <text:p>399.1379699707</text:p>
          </table:table-cell>
          <table:table-cell office:value-type="float" office:value="-0.001750137">
            <text:p>-0.001750137</text:p>
          </table:table-cell>
          <table:table-cell table:number-columns-repeated="4"/>
        </table:table-row>
        <table:table-row table:style-name="ro1">
          <table:table-cell office:value-type="float" office:value="399.249969482422">
            <text:p>399.2499694824</text:p>
          </table:table-cell>
          <table:table-cell office:value-type="float" office:value="0.01597134">
            <text:p>0.01597134</text:p>
          </table:table-cell>
          <table:table-cell table:number-columns-repeated="4"/>
        </table:table-row>
        <table:table-row table:style-name="ro1">
          <table:table-cell office:value-type="float" office:value="399.361968994141">
            <text:p>399.3619689941</text:p>
          </table:table-cell>
          <table:table-cell office:value-type="float" office:value="-0.003029104">
            <text:p>-0.003029104</text:p>
          </table:table-cell>
          <table:table-cell table:number-columns-repeated="4"/>
        </table:table-row>
        <table:table-row table:style-name="ro1">
          <table:table-cell office:value-type="float" office:value="399.473999023438">
            <text:p>399.4739990234</text:p>
          </table:table-cell>
          <table:table-cell office:value-type="float" office:value="0.008129994">
            <text:p>0.008129994</text:p>
          </table:table-cell>
          <table:table-cell table:number-columns-repeated="4"/>
        </table:table-row>
        <table:table-row table:style-name="ro1">
          <table:table-cell office:value-type="float" office:value="399.585998535156">
            <text:p>399.5859985352</text:p>
          </table:table-cell>
          <table:table-cell office:value-type="float" office:value="-0.0005586824">
            <text:p>-0.0005586824</text:p>
          </table:table-cell>
          <table:table-cell table:number-columns-repeated="4"/>
        </table:table-row>
        <table:table-row table:style-name="ro1">
          <table:table-cell office:value-type="float" office:value="399.698028564453">
            <text:p>399.6980285645</text:p>
          </table:table-cell>
          <table:table-cell office:value-type="float" office:value="-0.00197236">
            <text:p>-0.00197236</text:p>
          </table:table-cell>
          <table:table-cell table:number-columns-repeated="4"/>
        </table:table-row>
        <table:table-row table:style-name="ro1">
          <table:table-cell office:value-type="float" office:value="399.81005859375">
            <text:p>399.8100585938</text:p>
          </table:table-cell>
          <table:table-cell office:value-type="float" office:value="-0.005591767">
            <text:p>-0.005591767</text:p>
          </table:table-cell>
          <table:table-cell table:number-columns-repeated="4"/>
        </table:table-row>
        <table:table-row table:style-name="ro1">
          <table:table-cell office:value-type="float" office:value="399.922088623047">
            <text:p>399.922088623</text:p>
          </table:table-cell>
          <table:table-cell office:value-type="float" office:value="-0.002060589">
            <text:p>-0.002060589</text:p>
          </table:table-cell>
          <table:table-cell table:number-columns-repeated="4"/>
        </table:table-row>
        <table:table-row table:style-name="ro1">
          <table:table-cell office:value-type="float" office:value="400.034118652344">
            <text:p>400.0341186523</text:p>
          </table:table-cell>
          <table:table-cell office:value-type="float" office:value="-0.006547102">
            <text:p>-0.006547102</text:p>
          </table:table-cell>
          <table:table-cell table:number-columns-repeated="4"/>
        </table:table-row>
        <table:table-row table:style-name="ro1">
          <table:table-cell office:value-type="float" office:value="400.146148681641">
            <text:p>400.1461486816</text:p>
          </table:table-cell>
          <table:table-cell office:value-type="float" office:value="-0.0003101036">
            <text:p>-0.0003101036</text:p>
          </table:table-cell>
          <table:table-cell table:number-columns-repeated="4"/>
        </table:table-row>
        <table:table-row table:style-name="ro1">
          <table:table-cell office:value-type="float" office:value="400.258209228516">
            <text:p>400.2582092285</text:p>
          </table:table-cell>
          <table:table-cell office:value-type="float" office:value="-0.002940008">
            <text:p>-0.002940008</text:p>
          </table:table-cell>
          <table:table-cell table:number-columns-repeated="4"/>
        </table:table-row>
        <table:table-row table:style-name="ro1">
          <table:table-cell office:value-type="float" office:value="400.370269775391">
            <text:p>400.3702697754</text:p>
          </table:table-cell>
          <table:table-cell office:value-type="float" office:value="0.002900318">
            <text:p>0.002900318</text:p>
          </table:table-cell>
          <table:table-cell table:number-columns-repeated="4"/>
        </table:table-row>
        <table:table-row table:style-name="ro1">
          <table:table-cell office:value-type="float" office:value="400.482330322266">
            <text:p>400.4823303223</text:p>
          </table:table-cell>
          <table:table-cell office:value-type="float" office:value="-0.001862839">
            <text:p>-0.001862839</text:p>
          </table:table-cell>
          <table:table-cell table:number-columns-repeated="4"/>
        </table:table-row>
        <table:table-row table:style-name="ro1">
          <table:table-cell office:value-type="float" office:value="400.594390869141">
            <text:p>400.5943908691</text:p>
          </table:table-cell>
          <table:table-cell office:value-type="float" office:value="0.005919852">
            <text:p>0.005919852</text:p>
          </table:table-cell>
          <table:table-cell table:number-columns-repeated="4"/>
        </table:table-row>
        <table:table-row table:style-name="ro1">
          <table:table-cell office:value-type="float" office:value="400.706451416016">
            <text:p>400.706451416</text:p>
          </table:table-cell>
          <table:table-cell office:value-type="float" office:value="-0.003676619">
            <text:p>-0.003676619</text:p>
          </table:table-cell>
          <table:table-cell table:number-columns-repeated="4"/>
        </table:table-row>
        <table:table-row table:style-name="ro1">
          <table:table-cell office:value-type="float" office:value="400.818511962891">
            <text:p>400.8185119629</text:p>
          </table:table-cell>
          <table:table-cell office:value-type="float" office:value="0.005922914">
            <text:p>0.005922914</text:p>
          </table:table-cell>
          <table:table-cell table:number-columns-repeated="4"/>
        </table:table-row>
        <table:table-row table:style-name="ro1">
          <table:table-cell office:value-type="float" office:value="400.930603027344">
            <text:p>400.9306030273</text:p>
          </table:table-cell>
          <table:table-cell office:value-type="float" office:value="0.006136345">
            <text:p>0.006136345</text:p>
          </table:table-cell>
          <table:table-cell table:number-columns-repeated="4"/>
        </table:table-row>
        <table:table-row table:style-name="ro1">
          <table:table-cell office:value-type="float" office:value="401.042694091797">
            <text:p>401.0426940918</text:p>
          </table:table-cell>
          <table:table-cell office:value-type="float" office:value="-0.001002539">
            <text:p>-0.001002539</text:p>
          </table:table-cell>
          <table:table-cell table:number-columns-repeated="4"/>
        </table:table-row>
        <table:table-row table:style-name="ro1">
          <table:table-cell office:value-type="float" office:value="401.15478515625">
            <text:p>401.1547851563</text:p>
          </table:table-cell>
          <table:table-cell office:value-type="float" office:value="0.005240931">
            <text:p>0.005240931</text:p>
          </table:table-cell>
          <table:table-cell table:number-columns-repeated="4"/>
        </table:table-row>
        <table:table-row table:style-name="ro1">
          <table:table-cell office:value-type="float" office:value="401.266876220703">
            <text:p>401.2668762207</text:p>
          </table:table-cell>
          <table:table-cell office:value-type="float" office:value="0.00429769">
            <text:p>0.00429769</text:p>
          </table:table-cell>
          <table:table-cell table:number-columns-repeated="4"/>
        </table:table-row>
        <table:table-row table:style-name="ro1">
          <table:table-cell office:value-type="float" office:value="401.378997802734">
            <text:p>401.3789978027</text:p>
          </table:table-cell>
          <table:table-cell office:value-type="float" office:value="0.001052024">
            <text:p>0.001052024</text:p>
          </table:table-cell>
          <table:table-cell table:number-columns-repeated="4"/>
        </table:table-row>
        <table:table-row table:style-name="ro1">
          <table:table-cell office:value-type="float" office:value="401.491088867188">
            <text:p>401.4910888672</text:p>
          </table:table-cell>
          <table:table-cell office:value-type="float" office:value="-0.0007534073">
            <text:p>-0.0007534073</text:p>
          </table:table-cell>
          <table:table-cell table:number-columns-repeated="4"/>
        </table:table-row>
        <table:table-row table:style-name="ro1">
          <table:table-cell office:value-type="float" office:value="401.603210449219">
            <text:p>401.6032104492</text:p>
          </table:table-cell>
          <table:table-cell office:value-type="string">
            <text:p>3.240676E-05</text:p>
          </table:table-cell>
          <table:table-cell table:number-columns-repeated="4"/>
        </table:table-row>
        <table:table-row table:style-name="ro1">
          <table:table-cell office:value-type="float" office:value="401.71533203125">
            <text:p>401.7153320313</text:p>
          </table:table-cell>
          <table:table-cell office:value-type="float" office:value="-0.00260911">
            <text:p>-0.00260911</text:p>
          </table:table-cell>
          <table:table-cell table:number-columns-repeated="4"/>
        </table:table-row>
        <table:table-row table:style-name="ro1">
          <table:table-cell office:value-type="float" office:value="401.827453613281">
            <text:p>401.8274536133</text:p>
          </table:table-cell>
          <table:table-cell office:value-type="float" office:value="0.0007931492">
            <text:p>0.0007931492</text:p>
          </table:table-cell>
          <table:table-cell table:number-columns-repeated="4"/>
        </table:table-row>
        <table:table-row table:style-name="ro1">
          <table:table-cell office:value-type="float" office:value="401.939605712891">
            <text:p>401.9396057129</text:p>
          </table:table-cell>
          <table:table-cell office:value-type="float" office:value="0.002215838">
            <text:p>0.002215838</text:p>
          </table:table-cell>
          <table:table-cell table:number-columns-repeated="4"/>
        </table:table-row>
        <table:table-row table:style-name="ro1">
          <table:table-cell office:value-type="float" office:value="402.051727294922">
            <text:p>402.0517272949</text:p>
          </table:table-cell>
          <table:table-cell office:value-type="float" office:value="-0.004493394">
            <text:p>-0.004493394</text:p>
          </table:table-cell>
          <table:table-cell table:number-columns-repeated="4"/>
        </table:table-row>
        <table:table-row table:style-name="ro1">
          <table:table-cell office:value-type="float" office:value="402.163879394531">
            <text:p>402.1638793945</text:p>
          </table:table-cell>
          <table:table-cell office:value-type="float" office:value="0.01021261">
            <text:p>0.01021261</text:p>
          </table:table-cell>
          <table:table-cell table:number-columns-repeated="4"/>
        </table:table-row>
        <table:table-row table:style-name="ro1">
          <table:table-cell office:value-type="float" office:value="402.276031494141">
            <text:p>402.2760314941</text:p>
          </table:table-cell>
          <table:table-cell office:value-type="float" office:value="-0.002122323">
            <text:p>-0.002122323</text:p>
          </table:table-cell>
          <table:table-cell table:number-columns-repeated="4"/>
        </table:table-row>
        <table:table-row table:style-name="ro1">
          <table:table-cell office:value-type="float" office:value="402.38818359375">
            <text:p>402.3881835938</text:p>
          </table:table-cell>
          <table:table-cell office:value-type="float" office:value="-0.001250076">
            <text:p>-0.001250076</text:p>
          </table:table-cell>
          <table:table-cell table:number-columns-repeated="4"/>
        </table:table-row>
        <table:table-row table:style-name="ro1">
          <table:table-cell office:value-type="float" office:value="402.500335693359">
            <text:p>402.5003356934</text:p>
          </table:table-cell>
          <table:table-cell office:value-type="float" office:value="0.000502668">
            <text:p>0.000502668</text:p>
          </table:table-cell>
          <table:table-cell table:number-columns-repeated="4"/>
        </table:table-row>
        <table:table-row table:style-name="ro1">
          <table:table-cell office:value-type="float" office:value="402.612487792969">
            <text:p>402.612487793</text:p>
          </table:table-cell>
          <table:table-cell office:value-type="float" office:value="0.005472088">
            <text:p>0.005472088</text:p>
          </table:table-cell>
          <table:table-cell table:number-columns-repeated="4"/>
        </table:table-row>
        <table:table-row table:style-name="ro1">
          <table:table-cell office:value-type="float" office:value="402.724670410156">
            <text:p>402.7246704102</text:p>
          </table:table-cell>
          <table:table-cell office:value-type="float" office:value="0.005202703">
            <text:p>0.005202703</text:p>
          </table:table-cell>
          <table:table-cell table:number-columns-repeated="4"/>
        </table:table-row>
        <table:table-row table:style-name="ro1">
          <table:table-cell office:value-type="float" office:value="402.836853027344">
            <text:p>402.8368530273</text:p>
          </table:table-cell>
          <table:table-cell office:value-type="float" office:value="0.003750339">
            <text:p>0.003750339</text:p>
          </table:table-cell>
          <table:table-cell table:number-columns-repeated="4"/>
        </table:table-row>
        <table:table-row table:style-name="ro1">
          <table:table-cell office:value-type="float" office:value="402.949035644531">
            <text:p>402.9490356445</text:p>
          </table:table-cell>
          <table:table-cell office:value-type="float" office:value="0.01246867">
            <text:p>0.01246867</text:p>
          </table:table-cell>
          <table:table-cell table:number-columns-repeated="4"/>
        </table:table-row>
        <table:table-row table:style-name="ro1">
          <table:table-cell office:value-type="float" office:value="403.061218261719">
            <text:p>403.0612182617</text:p>
          </table:table-cell>
          <table:table-cell office:value-type="float" office:value="0.00215409">
            <text:p>0.00215409</text:p>
          </table:table-cell>
          <table:table-cell table:number-columns-repeated="4"/>
        </table:table-row>
        <table:table-row table:style-name="ro1">
          <table:table-cell office:value-type="float" office:value="403.173400878906">
            <text:p>403.1734008789</text:p>
          </table:table-cell>
          <table:table-cell office:value-type="float" office:value="0.01200745">
            <text:p>0.01200745</text:p>
          </table:table-cell>
          <table:table-cell table:number-columns-repeated="4"/>
        </table:table-row>
        <table:table-row table:style-name="ro1">
          <table:table-cell office:value-type="float" office:value="403.285614013672">
            <text:p>403.2856140137</text:p>
          </table:table-cell>
          <table:table-cell office:value-type="float" office:value="-0.001156635">
            <text:p>-0.001156635</text:p>
          </table:table-cell>
          <table:table-cell table:number-columns-repeated="4"/>
        </table:table-row>
        <table:table-row table:style-name="ro1">
          <table:table-cell office:value-type="float" office:value="403.397827148438">
            <text:p>403.3978271484</text:p>
          </table:table-cell>
          <table:table-cell office:value-type="float" office:value="-0.004843495">
            <text:p>-0.004843495</text:p>
          </table:table-cell>
          <table:table-cell table:number-columns-repeated="4"/>
        </table:table-row>
        <table:table-row table:style-name="ro1">
          <table:table-cell office:value-type="float" office:value="403.510040283203">
            <text:p>403.5100402832</text:p>
          </table:table-cell>
          <table:table-cell office:value-type="float" office:value="0.00166361">
            <text:p>0.00166361</text:p>
          </table:table-cell>
          <table:table-cell table:number-columns-repeated="4"/>
        </table:table-row>
        <table:table-row table:style-name="ro1">
          <table:table-cell office:value-type="float" office:value="403.622253417969">
            <text:p>403.622253418</text:p>
          </table:table-cell>
          <table:table-cell office:value-type="float" office:value="-0.00605566">
            <text:p>-0.00605566</text:p>
          </table:table-cell>
          <table:table-cell table:number-columns-repeated="4"/>
        </table:table-row>
        <table:table-row table:style-name="ro1">
          <table:table-cell office:value-type="float" office:value="403.734466552734">
            <text:p>403.7344665527</text:p>
          </table:table-cell>
          <table:table-cell office:value-type="float" office:value="0.002085158">
            <text:p>0.002085158</text:p>
          </table:table-cell>
          <table:table-cell table:number-columns-repeated="4"/>
        </table:table-row>
        <table:table-row table:style-name="ro1">
          <table:table-cell office:value-type="float" office:value="403.8466796875">
            <text:p>403.8466796875</text:p>
          </table:table-cell>
          <table:table-cell office:value-type="float" office:value="-0.00219963">
            <text:p>-0.00219963</text:p>
          </table:table-cell>
          <table:table-cell table:number-columns-repeated="4"/>
        </table:table-row>
        <table:table-row table:style-name="ro1">
          <table:table-cell office:value-type="float" office:value="403.958923339844">
            <text:p>403.9589233398</text:p>
          </table:table-cell>
          <table:table-cell office:value-type="float" office:value="-0.0003901542">
            <text:p>-0.0003901542</text:p>
          </table:table-cell>
          <table:table-cell table:number-columns-repeated="4"/>
        </table:table-row>
        <table:table-row table:style-name="ro1">
          <table:table-cell office:value-type="float" office:value="404.071166992188">
            <text:p>404.0711669922</text:p>
          </table:table-cell>
          <table:table-cell office:value-type="float" office:value="-0.0007602132">
            <text:p>-0.0007602132</text:p>
          </table:table-cell>
          <table:table-cell table:number-columns-repeated="4"/>
        </table:table-row>
        <table:table-row table:style-name="ro1">
          <table:table-cell office:value-type="float" office:value="404.183410644531">
            <text:p>404.1834106445</text:p>
          </table:table-cell>
          <table:table-cell office:value-type="float" office:value="-0.008425815">
            <text:p>-0.008425815</text:p>
          </table:table-cell>
          <table:table-cell table:number-columns-repeated="4"/>
        </table:table-row>
        <table:table-row table:style-name="ro1">
          <table:table-cell office:value-type="float" office:value="404.295654296875">
            <text:p>404.2956542969</text:p>
          </table:table-cell>
          <table:table-cell office:value-type="float" office:value="0.009474095">
            <text:p>0.009474095</text:p>
          </table:table-cell>
          <table:table-cell table:number-columns-repeated="4"/>
        </table:table-row>
        <table:table-row table:style-name="ro1">
          <table:table-cell office:value-type="float" office:value="404.407897949219">
            <text:p>404.4078979492</text:p>
          </table:table-cell>
          <table:table-cell office:value-type="float" office:value="-0.00904215">
            <text:p>-0.00904215</text:p>
          </table:table-cell>
          <table:table-cell table:number-columns-repeated="4"/>
        </table:table-row>
        <table:table-row table:style-name="ro1">
          <table:table-cell office:value-type="float" office:value="404.520172119141">
            <text:p>404.5201721191</text:p>
          </table:table-cell>
          <table:table-cell office:value-type="float" office:value="0.00514323">
            <text:p>0.00514323</text:p>
          </table:table-cell>
          <table:table-cell table:number-columns-repeated="4"/>
        </table:table-row>
        <table:table-row table:style-name="ro1">
          <table:table-cell office:value-type="float" office:value="404.632446289063">
            <text:p>404.6324462891</text:p>
          </table:table-cell>
          <table:table-cell office:value-type="float" office:value="0.005460206">
            <text:p>0.005460206</text:p>
          </table:table-cell>
          <table:table-cell table:number-columns-repeated="4"/>
        </table:table-row>
        <table:table-row table:style-name="ro1">
          <table:table-cell office:value-type="float" office:value="404.744689941406">
            <text:p>404.7446899414</text:p>
          </table:table-cell>
          <table:table-cell office:value-type="float" office:value="0.004932304">
            <text:p>0.004932304</text:p>
          </table:table-cell>
          <table:table-cell table:number-columns-repeated="4"/>
        </table:table-row>
        <table:table-row table:style-name="ro1">
          <table:table-cell office:value-type="float" office:value="404.856994628906">
            <text:p>404.8569946289</text:p>
          </table:table-cell>
          <table:table-cell office:value-type="float" office:value="-0.008586825">
            <text:p>-0.008586825</text:p>
          </table:table-cell>
          <table:table-cell table:number-columns-repeated="4"/>
        </table:table-row>
        <table:table-row table:style-name="ro1">
          <table:table-cell office:value-type="float" office:value="404.969268798828">
            <text:p>404.9692687988</text:p>
          </table:table-cell>
          <table:table-cell office:value-type="float" office:value="0.002872703">
            <text:p>0.002872703</text:p>
          </table:table-cell>
          <table:table-cell table:number-columns-repeated="4"/>
        </table:table-row>
        <table:table-row table:style-name="ro1">
          <table:table-cell office:value-type="float" office:value="405.08154296875">
            <text:p>405.0815429688</text:p>
          </table:table-cell>
          <table:table-cell office:value-type="float" office:value="0.01312189">
            <text:p>0.01312189</text:p>
          </table:table-cell>
          <table:table-cell table:number-columns-repeated="4"/>
        </table:table-row>
        <table:table-row table:style-name="ro1">
          <table:table-cell office:value-type="float" office:value="405.19384765625">
            <text:p>405.1938476563</text:p>
          </table:table-cell>
          <table:table-cell office:value-type="float" office:value="-0.003940846">
            <text:p>-0.003940846</text:p>
          </table:table-cell>
          <table:table-cell table:number-columns-repeated="4"/>
        </table:table-row>
        <table:table-row table:style-name="ro1">
          <table:table-cell office:value-type="float" office:value="405.30615234375">
            <text:p>405.3061523438</text:p>
          </table:table-cell>
          <table:table-cell office:value-type="float" office:value="0.001070897">
            <text:p>0.001070897</text:p>
          </table:table-cell>
          <table:table-cell table:number-columns-repeated="4"/>
        </table:table-row>
        <table:table-row table:style-name="ro1">
          <table:table-cell office:value-type="float" office:value="405.41845703125">
            <text:p>405.4184570313</text:p>
          </table:table-cell>
          <table:table-cell office:value-type="float" office:value="-0.001357441">
            <text:p>-0.001357441</text:p>
          </table:table-cell>
          <table:table-cell table:number-columns-repeated="4"/>
        </table:table-row>
        <table:table-row table:style-name="ro1">
          <table:table-cell office:value-type="float" office:value="405.53076171875">
            <text:p>405.5307617188</text:p>
          </table:table-cell>
          <table:table-cell office:value-type="float" office:value="0.00975543">
            <text:p>0.00975543</text:p>
          </table:table-cell>
          <table:table-cell table:number-columns-repeated="4"/>
        </table:table-row>
        <table:table-row table:style-name="ro1">
          <table:table-cell office:value-type="float" office:value="405.64306640625">
            <text:p>405.6430664063</text:p>
          </table:table-cell>
          <table:table-cell office:value-type="float" office:value="-0.002349384">
            <text:p>-0.002349384</text:p>
          </table:table-cell>
          <table:table-cell table:number-columns-repeated="4"/>
        </table:table-row>
        <table:table-row table:style-name="ro1">
          <table:table-cell office:value-type="float" office:value="405.755401611328">
            <text:p>405.7554016113</text:p>
          </table:table-cell>
          <table:table-cell office:value-type="float" office:value="-0.001840526">
            <text:p>-0.001840526</text:p>
          </table:table-cell>
          <table:table-cell table:number-columns-repeated="4"/>
        </table:table-row>
        <table:table-row table:style-name="ro1">
          <table:table-cell office:value-type="float" office:value="405.867706298828">
            <text:p>405.8677062988</text:p>
          </table:table-cell>
          <table:table-cell office:value-type="float" office:value="-0.002796807">
            <text:p>-0.002796807</text:p>
          </table:table-cell>
          <table:table-cell table:number-columns-repeated="4"/>
        </table:table-row>
        <table:table-row table:style-name="ro1">
          <table:table-cell office:value-type="float" office:value="405.980041503906">
            <text:p>405.9800415039</text:p>
          </table:table-cell>
          <table:table-cell office:value-type="float" office:value="0.01536435">
            <text:p>0.01536435</text:p>
          </table:table-cell>
          <table:table-cell table:number-columns-repeated="4"/>
        </table:table-row>
        <table:table-row table:style-name="ro1">
          <table:table-cell office:value-type="float" office:value="406.092376708984">
            <text:p>406.092376709</text:p>
          </table:table-cell>
          <table:table-cell office:value-type="float" office:value="-0.006918815">
            <text:p>-0.006918815</text:p>
          </table:table-cell>
          <table:table-cell table:number-columns-repeated="4"/>
        </table:table-row>
        <table:table-row table:style-name="ro1">
          <table:table-cell office:value-type="float" office:value="406.204742431641">
            <text:p>406.2047424316</text:p>
          </table:table-cell>
          <table:table-cell office:value-type="float" office:value="0.006658091">
            <text:p>0.006658091</text:p>
          </table:table-cell>
          <table:table-cell table:number-columns-repeated="4"/>
        </table:table-row>
        <table:table-row table:style-name="ro1">
          <table:table-cell office:value-type="float" office:value="406.317077636719">
            <text:p>406.3170776367</text:p>
          </table:table-cell>
          <table:table-cell office:value-type="float" office:value="-0.0004466599">
            <text:p>-0.0004466599</text:p>
          </table:table-cell>
          <table:table-cell table:number-columns-repeated="4"/>
        </table:table-row>
        <table:table-row table:style-name="ro1">
          <table:table-cell office:value-type="float" office:value="406.429443359375">
            <text:p>406.4294433594</text:p>
          </table:table-cell>
          <table:table-cell office:value-type="float" office:value="-0.006404632">
            <text:p>-0.006404632</text:p>
          </table:table-cell>
          <table:table-cell table:number-columns-repeated="4"/>
        </table:table-row>
        <table:table-row table:style-name="ro1">
          <table:table-cell office:value-type="float" office:value="406.541809082031">
            <text:p>406.541809082</text:p>
          </table:table-cell>
          <table:table-cell office:value-type="float" office:value="0.00033001">
            <text:p>0.00033001</text:p>
          </table:table-cell>
          <table:table-cell table:number-columns-repeated="4"/>
        </table:table-row>
        <table:table-row table:style-name="ro1">
          <table:table-cell office:value-type="float" office:value="406.654174804688">
            <text:p>406.6541748047</text:p>
          </table:table-cell>
          <table:table-cell office:value-type="float" office:value="-0.006597058">
            <text:p>-0.006597058</text:p>
          </table:table-cell>
          <table:table-cell table:number-columns-repeated="4"/>
        </table:table-row>
        <table:table-row table:style-name="ro1">
          <table:table-cell office:value-type="float" office:value="406.766540527344">
            <text:p>406.7665405273</text:p>
          </table:table-cell>
          <table:table-cell office:value-type="float" office:value="-0.007269971">
            <text:p>-0.007269971</text:p>
          </table:table-cell>
          <table:table-cell table:number-columns-repeated="4"/>
        </table:table-row>
        <table:table-row table:style-name="ro1">
          <table:table-cell office:value-type="float" office:value="406.87890625">
            <text:p>406.87890625</text:p>
          </table:table-cell>
          <table:table-cell office:value-type="float" office:value="-0.004359734">
            <text:p>-0.004359734</text:p>
          </table:table-cell>
          <table:table-cell table:number-columns-repeated="4"/>
        </table:table-row>
        <table:table-row table:style-name="ro1">
          <table:table-cell office:value-type="float" office:value="406.991302490234">
            <text:p>406.9913024902</text:p>
          </table:table-cell>
          <table:table-cell office:value-type="float" office:value="0.001020037">
            <text:p>0.001020037</text:p>
          </table:table-cell>
          <table:table-cell table:number-columns-repeated="4"/>
        </table:table-row>
        <table:table-row table:style-name="ro1">
          <table:table-cell office:value-type="float" office:value="407.103668212891">
            <text:p>407.1036682129</text:p>
          </table:table-cell>
          <table:table-cell office:value-type="float" office:value="-0.003809834">
            <text:p>-0.003809834</text:p>
          </table:table-cell>
          <table:table-cell table:number-columns-repeated="4"/>
        </table:table-row>
        <table:table-row table:style-name="ro1">
          <table:table-cell office:value-type="float" office:value="407.216064453125">
            <text:p>407.2160644531</text:p>
          </table:table-cell>
          <table:table-cell office:value-type="float" office:value="0.01623707">
            <text:p>0.01623707</text:p>
          </table:table-cell>
          <table:table-cell table:number-columns-repeated="4"/>
        </table:table-row>
        <table:table-row table:style-name="ro1">
          <table:table-cell office:value-type="float" office:value="407.328460693359">
            <text:p>407.3284606934</text:p>
          </table:table-cell>
          <table:table-cell office:value-type="float" office:value="0.004570515">
            <text:p>0.004570515</text:p>
          </table:table-cell>
          <table:table-cell table:number-columns-repeated="4"/>
        </table:table-row>
        <table:table-row table:style-name="ro1">
          <table:table-cell office:value-type="float" office:value="407.440887451172">
            <text:p>407.4408874512</text:p>
          </table:table-cell>
          <table:table-cell office:value-type="float" office:value="-0.00187234">
            <text:p>-0.00187234</text:p>
          </table:table-cell>
          <table:table-cell table:number-columns-repeated="4"/>
        </table:table-row>
        <table:table-row table:style-name="ro1">
          <table:table-cell office:value-type="float" office:value="407.553283691406">
            <text:p>407.5532836914</text:p>
          </table:table-cell>
          <table:table-cell office:value-type="float" office:value="0.008645408">
            <text:p>0.008645408</text:p>
          </table:table-cell>
          <table:table-cell table:number-columns-repeated="4"/>
        </table:table-row>
        <table:table-row table:style-name="ro1">
          <table:table-cell office:value-type="float" office:value="407.665710449219">
            <text:p>407.6657104492</text:p>
          </table:table-cell>
          <table:table-cell office:value-type="float" office:value="-0.002659629">
            <text:p>-0.002659629</text:p>
          </table:table-cell>
          <table:table-cell table:number-columns-repeated="4"/>
        </table:table-row>
        <table:table-row table:style-name="ro1">
          <table:table-cell office:value-type="float" office:value="407.778106689453">
            <text:p>407.7781066895</text:p>
          </table:table-cell>
          <table:table-cell office:value-type="float" office:value="0.01226521">
            <text:p>0.01226521</text:p>
          </table:table-cell>
          <table:table-cell table:number-columns-repeated="4"/>
        </table:table-row>
        <table:table-row table:style-name="ro1">
          <table:table-cell office:value-type="float" office:value="407.890533447266">
            <text:p>407.8905334473</text:p>
          </table:table-cell>
          <table:table-cell office:value-type="float" office:value="0.005542635">
            <text:p>0.005542635</text:p>
          </table:table-cell>
          <table:table-cell table:number-columns-repeated="4"/>
        </table:table-row>
        <table:table-row table:style-name="ro1">
          <table:table-cell office:value-type="float" office:value="408.002990722656">
            <text:p>408.0029907227</text:p>
          </table:table-cell>
          <table:table-cell office:value-type="float" office:value="0.007352609">
            <text:p>0.007352609</text:p>
          </table:table-cell>
          <table:table-cell table:number-columns-repeated="4"/>
        </table:table-row>
        <table:table-row table:style-name="ro1">
          <table:table-cell office:value-type="float" office:value="408.115417480469">
            <text:p>408.1154174805</text:p>
          </table:table-cell>
          <table:table-cell office:value-type="float" office:value="0.003195104">
            <text:p>0.003195104</text:p>
          </table:table-cell>
          <table:table-cell table:number-columns-repeated="4"/>
        </table:table-row>
        <table:table-row table:style-name="ro1">
          <table:table-cell office:value-type="float" office:value="408.227844238281">
            <text:p>408.2278442383</text:p>
          </table:table-cell>
          <table:table-cell office:value-type="float" office:value="0.01881975">
            <text:p>0.01881975</text:p>
          </table:table-cell>
          <table:table-cell table:number-columns-repeated="4"/>
        </table:table-row>
        <table:table-row table:style-name="ro1">
          <table:table-cell office:value-type="float" office:value="408.340301513672">
            <text:p>408.3403015137</text:p>
          </table:table-cell>
          <table:table-cell office:value-type="float" office:value="-0.01031598">
            <text:p>-0.01031598</text:p>
          </table:table-cell>
          <table:table-cell table:number-columns-repeated="4"/>
        </table:table-row>
        <table:table-row table:style-name="ro1">
          <table:table-cell office:value-type="float" office:value="408.452758789063">
            <text:p>408.4527587891</text:p>
          </table:table-cell>
          <table:table-cell office:value-type="float" office:value="-0.002655177">
            <text:p>-0.002655177</text:p>
          </table:table-cell>
          <table:table-cell table:number-columns-repeated="4"/>
        </table:table-row>
        <table:table-row table:style-name="ro1">
          <table:table-cell office:value-type="float" office:value="408.565216064453">
            <text:p>408.5652160645</text:p>
          </table:table-cell>
          <table:table-cell office:value-type="float" office:value="-0.005560177">
            <text:p>-0.005560177</text:p>
          </table:table-cell>
          <table:table-cell table:number-columns-repeated="4"/>
        </table:table-row>
        <table:table-row table:style-name="ro1">
          <table:table-cell office:value-type="float" office:value="408.677673339844">
            <text:p>408.6776733398</text:p>
          </table:table-cell>
          <table:table-cell office:value-type="float" office:value="-0.001798418">
            <text:p>-0.001798418</text:p>
          </table:table-cell>
          <table:table-cell table:number-columns-repeated="4"/>
        </table:table-row>
        <table:table-row table:style-name="ro1">
          <table:table-cell office:value-type="float" office:value="408.790161132813">
            <text:p>408.7901611328</text:p>
          </table:table-cell>
          <table:table-cell office:value-type="float" office:value="-0.00336171">
            <text:p>-0.00336171</text:p>
          </table:table-cell>
          <table:table-cell table:number-columns-repeated="4"/>
        </table:table-row>
        <table:table-row table:style-name="ro1">
          <table:table-cell office:value-type="float" office:value="408.902618408203">
            <text:p>408.9026184082</text:p>
          </table:table-cell>
          <table:table-cell office:value-type="float" office:value="-0.002262749">
            <text:p>-0.002262749</text:p>
          </table:table-cell>
          <table:table-cell table:number-columns-repeated="4"/>
        </table:table-row>
        <table:table-row table:style-name="ro1">
          <table:table-cell office:value-type="float" office:value="409.015106201172">
            <text:p>409.0151062012</text:p>
          </table:table-cell>
          <table:table-cell office:value-type="float" office:value="-0.005801648">
            <text:p>-0.005801648</text:p>
          </table:table-cell>
          <table:table-cell table:number-columns-repeated="4"/>
        </table:table-row>
        <table:table-row table:style-name="ro1">
          <table:table-cell office:value-type="float" office:value="409.127593994141">
            <text:p>409.1275939941</text:p>
          </table:table-cell>
          <table:table-cell office:value-type="float" office:value="0.001707977">
            <text:p>0.001707977</text:p>
          </table:table-cell>
          <table:table-cell table:number-columns-repeated="4"/>
        </table:table-row>
        <table:table-row table:style-name="ro1">
          <table:table-cell office:value-type="float" office:value="409.240081787109">
            <text:p>409.2400817871</text:p>
          </table:table-cell>
          <table:table-cell office:value-type="float" office:value="0.001742249">
            <text:p>0.001742249</text:p>
          </table:table-cell>
          <table:table-cell table:number-columns-repeated="4"/>
        </table:table-row>
        <table:table-row table:style-name="ro1">
          <table:table-cell office:value-type="float" office:value="409.352569580078">
            <text:p>409.3525695801</text:p>
          </table:table-cell>
          <table:table-cell office:value-type="float" office:value="-0.007741627">
            <text:p>-0.007741627</text:p>
          </table:table-cell>
          <table:table-cell table:number-columns-repeated="4"/>
        </table:table-row>
        <table:table-row table:style-name="ro1">
          <table:table-cell office:value-type="float" office:value="409.465087890625">
            <text:p>409.4650878906</text:p>
          </table:table-cell>
          <table:table-cell office:value-type="float" office:value="-0.002519548">
            <text:p>-0.002519548</text:p>
          </table:table-cell>
          <table:table-cell table:number-columns-repeated="4"/>
        </table:table-row>
        <table:table-row table:style-name="ro1">
          <table:table-cell office:value-type="float" office:value="409.577606201172">
            <text:p>409.5776062012</text:p>
          </table:table-cell>
          <table:table-cell office:value-type="float" office:value="-0.005854581">
            <text:p>-0.005854581</text:p>
          </table:table-cell>
          <table:table-cell table:number-columns-repeated="4"/>
        </table:table-row>
        <table:table-row table:style-name="ro1">
          <table:table-cell office:value-type="float" office:value="409.690093994141">
            <text:p>409.6900939941</text:p>
          </table:table-cell>
          <table:table-cell office:value-type="float" office:value="0.001658488">
            <text:p>0.001658488</text:p>
          </table:table-cell>
          <table:table-cell table:number-columns-repeated="4"/>
        </table:table-row>
        <table:table-row table:style-name="ro1">
          <table:table-cell office:value-type="float" office:value="409.802612304688">
            <text:p>409.8026123047</text:p>
          </table:table-cell>
          <table:table-cell office:value-type="string">
            <text:p>3.622544E-05</text:p>
          </table:table-cell>
          <table:table-cell table:number-columns-repeated="4"/>
        </table:table-row>
        <table:table-row table:style-name="ro1">
          <table:table-cell office:value-type="float" office:value="409.915161132813">
            <text:p>409.9151611328</text:p>
          </table:table-cell>
          <table:table-cell office:value-type="float" office:value="0.00210081">
            <text:p>0.00210081</text:p>
          </table:table-cell>
          <table:table-cell table:number-columns-repeated="4"/>
        </table:table-row>
        <table:table-row table:style-name="ro1">
          <table:table-cell office:value-type="float" office:value="410.027679443359">
            <text:p>410.0276794434</text:p>
          </table:table-cell>
          <table:table-cell office:value-type="float" office:value="-0.001332854">
            <text:p>-0.001332854</text:p>
          </table:table-cell>
          <table:table-cell table:number-columns-repeated="4"/>
        </table:table-row>
        <table:table-row table:style-name="ro1">
          <table:table-cell office:value-type="float" office:value="410.140228271484">
            <text:p>410.1402282715</text:p>
          </table:table-cell>
          <table:table-cell office:value-type="float" office:value="0.003974861">
            <text:p>0.003974861</text:p>
          </table:table-cell>
          <table:table-cell table:number-columns-repeated="4"/>
        </table:table-row>
        <table:table-row table:style-name="ro1">
          <table:table-cell office:value-type="float" office:value="410.252746582031">
            <text:p>410.252746582</text:p>
          </table:table-cell>
          <table:table-cell office:value-type="float" office:value="0.001951983">
            <text:p>0.001951983</text:p>
          </table:table-cell>
          <table:table-cell table:number-columns-repeated="4"/>
        </table:table-row>
        <table:table-row table:style-name="ro1">
          <table:table-cell office:value-type="float" office:value="410.365295410156">
            <text:p>410.3652954102</text:p>
          </table:table-cell>
          <table:table-cell office:value-type="float" office:value="-0.002254097">
            <text:p>-0.002254097</text:p>
          </table:table-cell>
          <table:table-cell table:number-columns-repeated="4"/>
        </table:table-row>
        <table:table-row table:style-name="ro1">
          <table:table-cell office:value-type="float" office:value="410.477844238281">
            <text:p>410.4778442383</text:p>
          </table:table-cell>
          <table:table-cell office:value-type="float" office:value="0.01862349">
            <text:p>0.01862349</text:p>
          </table:table-cell>
          <table:table-cell table:number-columns-repeated="4"/>
        </table:table-row>
        <table:table-row table:style-name="ro1">
          <table:table-cell office:value-type="float" office:value="410.590423583984">
            <text:p>410.590423584</text:p>
          </table:table-cell>
          <table:table-cell office:value-type="float" office:value="0.006946163">
            <text:p>0.006946163</text:p>
          </table:table-cell>
          <table:table-cell table:number-columns-repeated="4"/>
        </table:table-row>
        <table:table-row table:style-name="ro1">
          <table:table-cell office:value-type="float" office:value="410.702972412109">
            <text:p>410.7029724121</text:p>
          </table:table-cell>
          <table:table-cell office:value-type="float" office:value="-0.004020905">
            <text:p>-0.004020905</text:p>
          </table:table-cell>
          <table:table-cell table:number-columns-repeated="4"/>
        </table:table-row>
        <table:table-row table:style-name="ro1">
          <table:table-cell office:value-type="float" office:value="410.815551757813">
            <text:p>410.8155517578</text:p>
          </table:table-cell>
          <table:table-cell office:value-type="float" office:value="0.001279468">
            <text:p>0.001279468</text:p>
          </table:table-cell>
          <table:table-cell table:number-columns-repeated="4"/>
        </table:table-row>
        <table:table-row table:style-name="ro1">
          <table:table-cell office:value-type="float" office:value="410.928131103516">
            <text:p>410.9281311035</text:p>
          </table:table-cell>
          <table:table-cell office:value-type="float" office:value="0.02486424">
            <text:p>0.02486424</text:p>
          </table:table-cell>
          <table:table-cell table:number-columns-repeated="4"/>
        </table:table-row>
        <table:table-row table:style-name="ro1">
          <table:table-cell office:value-type="float" office:value="411.040679931641">
            <text:p>411.0406799316</text:p>
          </table:table-cell>
          <table:table-cell office:value-type="float" office:value="0.006084586">
            <text:p>0.006084586</text:p>
          </table:table-cell>
          <table:table-cell table:number-columns-repeated="4"/>
        </table:table-row>
        <table:table-row table:style-name="ro1">
          <table:table-cell office:value-type="float" office:value="411.153289794922">
            <text:p>411.1532897949</text:p>
          </table:table-cell>
          <table:table-cell office:value-type="float" office:value="0.01268629">
            <text:p>0.01268629</text:p>
          </table:table-cell>
          <table:table-cell table:number-columns-repeated="4"/>
        </table:table-row>
        <table:table-row table:style-name="ro1">
          <table:table-cell office:value-type="float" office:value="411.265869140625">
            <text:p>411.2658691406</text:p>
          </table:table-cell>
          <table:table-cell office:value-type="float" office:value="0.006412814">
            <text:p>0.006412814</text:p>
          </table:table-cell>
          <table:table-cell table:number-columns-repeated="4"/>
        </table:table-row>
        <table:table-row table:style-name="ro1">
          <table:table-cell office:value-type="float" office:value="411.378479003906">
            <text:p>411.3784790039</text:p>
          </table:table-cell>
          <table:table-cell office:value-type="float" office:value="0.003366066">
            <text:p>0.003366066</text:p>
          </table:table-cell>
          <table:table-cell table:number-columns-repeated="4"/>
        </table:table-row>
        <table:table-row table:style-name="ro1">
          <table:table-cell office:value-type="float" office:value="411.491058349609">
            <text:p>411.4910583496</text:p>
          </table:table-cell>
          <table:table-cell office:value-type="float" office:value="0.023371">
            <text:p>0.023371</text:p>
          </table:table-cell>
          <table:table-cell table:number-columns-repeated="4"/>
        </table:table-row>
        <table:table-row table:style-name="ro1">
          <table:table-cell office:value-type="float" office:value="411.603668212891">
            <text:p>411.6036682129</text:p>
          </table:table-cell>
          <table:table-cell office:value-type="float" office:value="0.003241121">
            <text:p>0.003241121</text:p>
          </table:table-cell>
          <table:table-cell table:number-columns-repeated="4"/>
        </table:table-row>
        <table:table-row table:style-name="ro1">
          <table:table-cell office:value-type="float" office:value="411.716278076172">
            <text:p>411.7162780762</text:p>
          </table:table-cell>
          <table:table-cell office:value-type="float" office:value="0.02173392">
            <text:p>0.02173392</text:p>
          </table:table-cell>
          <table:table-cell table:number-columns-repeated="4"/>
        </table:table-row>
        <table:table-row table:style-name="ro1">
          <table:table-cell office:value-type="float" office:value="411.828887939453">
            <text:p>411.8288879395</text:p>
          </table:table-cell>
          <table:table-cell office:value-type="float" office:value="0.0009622041">
            <text:p>0.0009622041</text:p>
          </table:table-cell>
          <table:table-cell table:number-columns-repeated="4"/>
        </table:table-row>
        <table:table-row table:style-name="ro1">
          <table:table-cell office:value-type="float" office:value="411.941528320313">
            <text:p>411.9415283203</text:p>
          </table:table-cell>
          <table:table-cell office:value-type="float" office:value="0.002706596">
            <text:p>0.002706596</text:p>
          </table:table-cell>
          <table:table-cell table:number-columns-repeated="4"/>
        </table:table-row>
        <table:table-row table:style-name="ro1">
          <table:table-cell office:value-type="float" office:value="412.054138183594">
            <text:p>412.0541381836</text:p>
          </table:table-cell>
          <table:table-cell office:value-type="float" office:value="0.0006839517">
            <text:p>0.0006839517</text:p>
          </table:table-cell>
          <table:table-cell table:number-columns-repeated="4"/>
        </table:table-row>
        <table:table-row table:style-name="ro1">
          <table:table-cell office:value-type="float" office:value="412.166778564453">
            <text:p>412.1667785645</text:p>
          </table:table-cell>
          <table:table-cell office:value-type="float" office:value="-0.007501615">
            <text:p>-0.007501615</text:p>
          </table:table-cell>
          <table:table-cell table:number-columns-repeated="4"/>
        </table:table-row>
        <table:table-row table:style-name="ro1">
          <table:table-cell office:value-type="float" office:value="412.279418945313">
            <text:p>412.2794189453</text:p>
          </table:table-cell>
          <table:table-cell office:value-type="float" office:value="0.00841374">
            <text:p>0.00841374</text:p>
          </table:table-cell>
          <table:table-cell table:number-columns-repeated="4"/>
        </table:table-row>
        <table:table-row table:style-name="ro1">
          <table:table-cell office:value-type="float" office:value="412.392059326172">
            <text:p>412.3920593262</text:p>
          </table:table-cell>
          <table:table-cell office:value-type="float" office:value="0.002286759">
            <text:p>0.002286759</text:p>
          </table:table-cell>
          <table:table-cell table:number-columns-repeated="4"/>
        </table:table-row>
        <table:table-row table:style-name="ro1">
          <table:table-cell office:value-type="float" office:value="412.504730224609">
            <text:p>412.5047302246</text:p>
          </table:table-cell>
          <table:table-cell office:value-type="float" office:value="-0.007876458">
            <text:p>-0.007876458</text:p>
          </table:table-cell>
          <table:table-cell table:number-columns-repeated="4"/>
        </table:table-row>
        <table:table-row table:style-name="ro1">
          <table:table-cell office:value-type="float" office:value="412.617370605469">
            <text:p>412.6173706055</text:p>
          </table:table-cell>
          <table:table-cell office:value-type="float" office:value="-0.003267456">
            <text:p>-0.003267456</text:p>
          </table:table-cell>
          <table:table-cell table:number-columns-repeated="4"/>
        </table:table-row>
        <table:table-row table:style-name="ro1">
          <table:table-cell office:value-type="float" office:value="412.730041503906">
            <text:p>412.7300415039</text:p>
          </table:table-cell>
          <table:table-cell office:value-type="string">
            <text:p>-1.680826E-05</text:p>
          </table:table-cell>
          <table:table-cell table:number-columns-repeated="4"/>
        </table:table-row>
        <table:table-row table:style-name="ro1">
          <table:table-cell office:value-type="float" office:value="412.842712402344">
            <text:p>412.8427124023</text:p>
          </table:table-cell>
          <table:table-cell office:value-type="float" office:value="-0.0005591544">
            <text:p>-0.0005591544</text:p>
          </table:table-cell>
          <table:table-cell table:number-columns-repeated="4"/>
        </table:table-row>
        <table:table-row table:style-name="ro1">
          <table:table-cell office:value-type="float" office:value="412.955383300781">
            <text:p>412.9553833008</text:p>
          </table:table-cell>
          <table:table-cell office:value-type="float" office:value="-0.008948393">
            <text:p>-0.008948393</text:p>
          </table:table-cell>
          <table:table-cell table:number-columns-repeated="4"/>
        </table:table-row>
        <table:table-row table:style-name="ro1">
          <table:table-cell office:value-type="float" office:value="413.068054199219">
            <text:p>413.0680541992</text:p>
          </table:table-cell>
          <table:table-cell office:value-type="float" office:value="-0.005386319">
            <text:p>-0.005386319</text:p>
          </table:table-cell>
          <table:table-cell table:number-columns-repeated="4"/>
        </table:table-row>
        <table:table-row table:style-name="ro1">
          <table:table-cell office:value-type="float" office:value="413.180725097656">
            <text:p>413.1807250977</text:p>
          </table:table-cell>
          <table:table-cell office:value-type="string">
            <text:p>-5.466413E-05</text:p>
          </table:table-cell>
          <table:table-cell table:number-columns-repeated="4"/>
        </table:table-row>
        <table:table-row table:style-name="ro1">
          <table:table-cell office:value-type="float" office:value="413.293426513672">
            <text:p>413.2934265137</text:p>
          </table:table-cell>
          <table:table-cell office:value-type="float" office:value="0.0003789598">
            <text:p>0.0003789598</text:p>
          </table:table-cell>
          <table:table-cell table:number-columns-repeated="4"/>
        </table:table-row>
        <table:table-row table:style-name="ro1">
          <table:table-cell office:value-type="float" office:value="413.406097412109">
            <text:p>413.4060974121</text:p>
          </table:table-cell>
          <table:table-cell office:value-type="float" office:value="-0.003492808">
            <text:p>-0.003492808</text:p>
          </table:table-cell>
          <table:table-cell table:number-columns-repeated="4"/>
        </table:table-row>
        <table:table-row table:style-name="ro1">
          <table:table-cell office:value-type="float" office:value="413.518798828125">
            <text:p>413.5187988281</text:p>
          </table:table-cell>
          <table:table-cell office:value-type="float" office:value="-0.001271441">
            <text:p>-0.001271441</text:p>
          </table:table-cell>
          <table:table-cell table:number-columns-repeated="4"/>
        </table:table-row>
        <table:table-row table:style-name="ro1">
          <table:table-cell office:value-type="float" office:value="413.631500244141">
            <text:p>413.6315002441</text:p>
          </table:table-cell>
          <table:table-cell office:value-type="float" office:value="-0.006364803">
            <text:p>-0.006364803</text:p>
          </table:table-cell>
          <table:table-cell table:number-columns-repeated="4"/>
        </table:table-row>
        <table:table-row table:style-name="ro1">
          <table:table-cell office:value-type="float" office:value="413.744232177734">
            <text:p>413.7442321777</text:p>
          </table:table-cell>
          <table:table-cell office:value-type="float" office:value="0.002456604">
            <text:p>0.002456604</text:p>
          </table:table-cell>
          <table:table-cell table:number-columns-repeated="4"/>
        </table:table-row>
        <table:table-row table:style-name="ro1">
          <table:table-cell office:value-type="float" office:value="413.85693359375">
            <text:p>413.8569335938</text:p>
          </table:table-cell>
          <table:table-cell office:value-type="float" office:value="0.002583601">
            <text:p>0.002583601</text:p>
          </table:table-cell>
          <table:table-cell table:number-columns-repeated="4"/>
        </table:table-row>
        <table:table-row table:style-name="ro1">
          <table:table-cell office:value-type="float" office:value="413.969665527344">
            <text:p>413.9696655273</text:p>
          </table:table-cell>
          <table:table-cell office:value-type="float" office:value="-0.001900832">
            <text:p>-0.001900832</text:p>
          </table:table-cell>
          <table:table-cell table:number-columns-repeated="4"/>
        </table:table-row>
        <table:table-row table:style-name="ro1">
          <table:table-cell office:value-type="float" office:value="414.082366943359">
            <text:p>414.0823669434</text:p>
          </table:table-cell>
          <table:table-cell office:value-type="float" office:value="0.01186692">
            <text:p>0.01186692</text:p>
          </table:table-cell>
          <table:table-cell table:number-columns-repeated="4"/>
        </table:table-row>
        <table:table-row table:style-name="ro1">
          <table:table-cell office:value-type="float" office:value="414.195098876953">
            <text:p>414.195098877</text:p>
          </table:table-cell>
          <table:table-cell office:value-type="float" office:value="0.001904761">
            <text:p>0.001904761</text:p>
          </table:table-cell>
          <table:table-cell table:number-columns-repeated="4"/>
        </table:table-row>
        <table:table-row table:style-name="ro1">
          <table:table-cell office:value-type="float" office:value="414.307861328125">
            <text:p>414.3078613281</text:p>
          </table:table-cell>
          <table:table-cell office:value-type="float" office:value="0.008163231">
            <text:p>0.008163231</text:p>
          </table:table-cell>
          <table:table-cell table:number-columns-repeated="4"/>
        </table:table-row>
        <table:table-row table:style-name="ro1">
          <table:table-cell office:value-type="float" office:value="414.420593261719">
            <text:p>414.4205932617</text:p>
          </table:table-cell>
          <table:table-cell office:value-type="float" office:value="-0.00904452">
            <text:p>-0.00904452</text:p>
          </table:table-cell>
          <table:table-cell table:number-columns-repeated="4"/>
        </table:table-row>
        <table:table-row table:style-name="ro1">
          <table:table-cell office:value-type="float" office:value="414.533325195313">
            <text:p>414.5333251953</text:p>
          </table:table-cell>
          <table:table-cell office:value-type="float" office:value="0.00608933">
            <text:p>0.00608933</text:p>
          </table:table-cell>
          <table:table-cell table:number-columns-repeated="4"/>
        </table:table-row>
        <table:table-row table:style-name="ro1">
          <table:table-cell office:value-type="float" office:value="414.646087646484">
            <text:p>414.6460876465</text:p>
          </table:table-cell>
          <table:table-cell office:value-type="float" office:value="-0.003926279">
            <text:p>-0.003926279</text:p>
          </table:table-cell>
          <table:table-cell table:number-columns-repeated="4"/>
        </table:table-row>
        <table:table-row table:style-name="ro1">
          <table:table-cell office:value-type="float" office:value="414.758850097656">
            <text:p>414.7588500977</text:p>
          </table:table-cell>
          <table:table-cell office:value-type="float" office:value="-0.002779468">
            <text:p>-0.002779468</text:p>
          </table:table-cell>
          <table:table-cell table:number-columns-repeated="4"/>
        </table:table-row>
        <table:table-row table:style-name="ro1">
          <table:table-cell office:value-type="float" office:value="414.871612548828">
            <text:p>414.8716125488</text:p>
          </table:table-cell>
          <table:table-cell office:value-type="float" office:value="0.003585109">
            <text:p>0.003585109</text:p>
          </table:table-cell>
          <table:table-cell table:number-columns-repeated="4"/>
        </table:table-row>
        <table:table-row table:style-name="ro1">
          <table:table-cell office:value-type="float" office:value="414.984375">
            <text:p>414.984375</text:p>
          </table:table-cell>
          <table:table-cell office:value-type="float" office:value="0.002312343">
            <text:p>0.002312343</text:p>
          </table:table-cell>
          <table:table-cell table:number-columns-repeated="4"/>
        </table:table-row>
        <table:table-row table:style-name="ro1">
          <table:table-cell office:value-type="float" office:value="415.09716796875">
            <text:p>415.0971679688</text:p>
          </table:table-cell>
          <table:table-cell office:value-type="string">
            <text:p>-1.731358E-06</text:p>
          </table:table-cell>
          <table:table-cell table:number-columns-repeated="4"/>
        </table:table-row>
        <table:table-row table:style-name="ro1">
          <table:table-cell office:value-type="float" office:value="415.209930419922">
            <text:p>415.2099304199</text:p>
          </table:table-cell>
          <table:table-cell office:value-type="float" office:value="-0.004048962">
            <text:p>-0.004048962</text:p>
          </table:table-cell>
          <table:table-cell table:number-columns-repeated="4"/>
        </table:table-row>
        <table:table-row table:style-name="ro1">
          <table:table-cell office:value-type="float" office:value="415.322723388672">
            <text:p>415.3227233887</text:p>
          </table:table-cell>
          <table:table-cell office:value-type="float" office:value="-0.002934619">
            <text:p>-0.002934619</text:p>
          </table:table-cell>
          <table:table-cell table:number-columns-repeated="4"/>
        </table:table-row>
        <table:table-row table:style-name="ro1">
          <table:table-cell office:value-type="float" office:value="415.435516357422">
            <text:p>415.4355163574</text:p>
          </table:table-cell>
          <table:table-cell office:value-type="float" office:value="-0.004017936">
            <text:p>-0.004017936</text:p>
          </table:table-cell>
          <table:table-cell table:number-columns-repeated="4"/>
        </table:table-row>
        <table:table-row table:style-name="ro1">
          <table:table-cell office:value-type="float" office:value="415.548309326172">
            <text:p>415.5483093262</text:p>
          </table:table-cell>
          <table:table-cell office:value-type="float" office:value="0.000943541">
            <text:p>0.000943541</text:p>
          </table:table-cell>
          <table:table-cell table:number-columns-repeated="4"/>
        </table:table-row>
        <table:table-row table:style-name="ro1">
          <table:table-cell office:value-type="float" office:value="415.661102294922">
            <text:p>415.6611022949</text:p>
          </table:table-cell>
          <table:table-cell office:value-type="float" office:value="-0.005485013">
            <text:p>-0.005485013</text:p>
          </table:table-cell>
          <table:table-cell table:number-columns-repeated="4"/>
        </table:table-row>
        <table:table-row table:style-name="ro1">
          <table:table-cell office:value-type="float" office:value="415.773895263672">
            <text:p>415.7738952637</text:p>
          </table:table-cell>
          <table:table-cell office:value-type="float" office:value="0.006254607">
            <text:p>0.006254607</text:p>
          </table:table-cell>
          <table:table-cell table:number-columns-repeated="4"/>
        </table:table-row>
        <table:table-row table:style-name="ro1">
          <table:table-cell office:value-type="float" office:value="415.88671875">
            <text:p>415.88671875</text:p>
          </table:table-cell>
          <table:table-cell office:value-type="float" office:value="-0.004976781">
            <text:p>-0.004976781</text:p>
          </table:table-cell>
          <table:table-cell table:number-columns-repeated="4"/>
        </table:table-row>
        <table:table-row table:style-name="ro1">
          <table:table-cell office:value-type="float" office:value="415.999542236328">
            <text:p>415.9995422363</text:p>
          </table:table-cell>
          <table:table-cell office:value-type="float" office:value="-0.008537057">
            <text:p>-0.008537057</text:p>
          </table:table-cell>
          <table:table-cell table:number-columns-repeated="4"/>
        </table:table-row>
        <table:table-row table:style-name="ro1">
          <table:table-cell office:value-type="float" office:value="416.112365722656">
            <text:p>416.1123657227</text:p>
          </table:table-cell>
          <table:table-cell office:value-type="float" office:value="-0.00803657">
            <text:p>-0.00803657</text:p>
          </table:table-cell>
          <table:table-cell table:number-columns-repeated="4"/>
        </table:table-row>
        <table:table-row table:style-name="ro1">
          <table:table-cell office:value-type="float" office:value="416.225189208984">
            <text:p>416.225189209</text:p>
          </table:table-cell>
          <table:table-cell office:value-type="float" office:value="-0.0003287432">
            <text:p>-0.0003287432</text:p>
          </table:table-cell>
          <table:table-cell table:number-columns-repeated="4"/>
        </table:table-row>
        <table:table-row table:style-name="ro1">
          <table:table-cell office:value-type="float" office:value="416.338012695313">
            <text:p>416.3380126953</text:p>
          </table:table-cell>
          <table:table-cell office:value-type="float" office:value="-0.002559078">
            <text:p>-0.002559078</text:p>
          </table:table-cell>
          <table:table-cell table:number-columns-repeated="4"/>
        </table:table-row>
        <table:table-row table:style-name="ro1">
          <table:table-cell office:value-type="float" office:value="416.450866699219">
            <text:p>416.4508666992</text:p>
          </table:table-cell>
          <table:table-cell office:value-type="float" office:value="0.0007860159">
            <text:p>0.0007860159</text:p>
          </table:table-cell>
          <table:table-cell table:number-columns-repeated="4"/>
        </table:table-row>
        <table:table-row table:style-name="ro1">
          <table:table-cell office:value-type="float" office:value="416.563690185547">
            <text:p>416.5636901855</text:p>
          </table:table-cell>
          <table:table-cell office:value-type="float" office:value="-0.003929992">
            <text:p>-0.003929992</text:p>
          </table:table-cell>
          <table:table-cell table:number-columns-repeated="4"/>
        </table:table-row>
        <table:table-row table:style-name="ro1">
          <table:table-cell office:value-type="float" office:value="416.676544189453">
            <text:p>416.6765441895</text:p>
          </table:table-cell>
          <table:table-cell office:value-type="float" office:value="-0.004309207">
            <text:p>-0.004309207</text:p>
          </table:table-cell>
          <table:table-cell table:number-columns-repeated="4"/>
        </table:table-row>
        <table:table-row table:style-name="ro1">
          <table:table-cell office:value-type="float" office:value="416.789398193359">
            <text:p>416.7893981934</text:p>
          </table:table-cell>
          <table:table-cell office:value-type="float" office:value="0.0002765161">
            <text:p>0.0002765161</text:p>
          </table:table-cell>
          <table:table-cell table:number-columns-repeated="4"/>
        </table:table-row>
        <table:table-row table:style-name="ro1">
          <table:table-cell office:value-type="float" office:value="416.902252197266">
            <text:p>416.9022521973</text:p>
          </table:table-cell>
          <table:table-cell office:value-type="float" office:value="-0.003317324">
            <text:p>-0.003317324</text:p>
          </table:table-cell>
          <table:table-cell table:number-columns-repeated="4"/>
        </table:table-row>
        <table:table-row table:style-name="ro1">
          <table:table-cell office:value-type="float" office:value="417.01513671875">
            <text:p>417.0151367188</text:p>
          </table:table-cell>
          <table:table-cell office:value-type="float" office:value="-0.002663995">
            <text:p>-0.002663995</text:p>
          </table:table-cell>
          <table:table-cell table:number-columns-repeated="4"/>
        </table:table-row>
        <table:table-row table:style-name="ro1">
          <table:table-cell office:value-type="float" office:value="417.127990722656">
            <text:p>417.1279907227</text:p>
          </table:table-cell>
          <table:table-cell office:value-type="float" office:value="0.01072634">
            <text:p>0.01072634</text:p>
          </table:table-cell>
          <table:table-cell table:number-columns-repeated="4"/>
        </table:table-row>
        <table:table-row table:style-name="ro1">
          <table:table-cell office:value-type="float" office:value="417.240875244141">
            <text:p>417.2408752441</text:p>
          </table:table-cell>
          <table:table-cell office:value-type="float" office:value="0.003269362">
            <text:p>0.003269362</text:p>
          </table:table-cell>
          <table:table-cell table:number-columns-repeated="4"/>
        </table:table-row>
        <table:table-row table:style-name="ro1">
          <table:table-cell office:value-type="float" office:value="417.353759765625">
            <text:p>417.3537597656</text:p>
          </table:table-cell>
          <table:table-cell office:value-type="float" office:value="0.01935383">
            <text:p>0.01935383</text:p>
          </table:table-cell>
          <table:table-cell table:number-columns-repeated="4"/>
        </table:table-row>
        <table:table-row table:style-name="ro1">
          <table:table-cell office:value-type="float" office:value="417.466644287109">
            <text:p>417.4666442871</text:p>
          </table:table-cell>
          <table:table-cell office:value-type="float" office:value="-0.01002991">
            <text:p>-0.01002991</text:p>
          </table:table-cell>
          <table:table-cell table:number-columns-repeated="4"/>
        </table:table-row>
        <table:table-row table:style-name="ro1">
          <table:table-cell office:value-type="float" office:value="417.579528808594">
            <text:p>417.5795288086</text:p>
          </table:table-cell>
          <table:table-cell office:value-type="float" office:value="-0.005862804">
            <text:p>-0.005862804</text:p>
          </table:table-cell>
          <table:table-cell table:number-columns-repeated="4"/>
        </table:table-row>
        <table:table-row table:style-name="ro1">
          <table:table-cell office:value-type="float" office:value="417.692443847656">
            <text:p>417.6924438477</text:p>
          </table:table-cell>
          <table:table-cell office:value-type="float" office:value="0.001009225">
            <text:p>0.001009225</text:p>
          </table:table-cell>
          <table:table-cell table:number-columns-repeated="4"/>
        </table:table-row>
        <table:table-row table:style-name="ro1">
          <table:table-cell office:value-type="float" office:value="417.805328369141">
            <text:p>417.8053283691</text:p>
          </table:table-cell>
          <table:table-cell office:value-type="float" office:value="0.00363021">
            <text:p>0.00363021</text:p>
          </table:table-cell>
          <table:table-cell table:number-columns-repeated="4"/>
        </table:table-row>
        <table:table-row table:style-name="ro1">
          <table:table-cell office:value-type="float" office:value="417.918243408203">
            <text:p>417.9182434082</text:p>
          </table:table-cell>
          <table:table-cell office:value-type="float" office:value="-0.01460902">
            <text:p>-0.01460902</text:p>
          </table:table-cell>
          <table:table-cell table:number-columns-repeated="4"/>
        </table:table-row>
        <table:table-row table:style-name="ro1">
          <table:table-cell office:value-type="float" office:value="418.031158447266">
            <text:p>418.0311584473</text:p>
          </table:table-cell>
          <table:table-cell office:value-type="float" office:value="-0.007732789">
            <text:p>-0.007732789</text:p>
          </table:table-cell>
          <table:table-cell table:number-columns-repeated="4"/>
        </table:table-row>
        <table:table-row table:style-name="ro1">
          <table:table-cell office:value-type="float" office:value="418.144073486328">
            <text:p>418.1440734863</text:p>
          </table:table-cell>
          <table:table-cell office:value-type="float" office:value="0.02879669">
            <text:p>0.02879669</text:p>
          </table:table-cell>
          <table:table-cell table:number-columns-repeated="4"/>
        </table:table-row>
        <table:table-row table:style-name="ro1">
          <table:table-cell office:value-type="float" office:value="418.256988525391">
            <text:p>418.2569885254</text:p>
          </table:table-cell>
          <table:table-cell office:value-type="float" office:value="0.01507789">
            <text:p>0.01507789</text:p>
          </table:table-cell>
          <table:table-cell table:number-columns-repeated="4"/>
        </table:table-row>
        <table:table-row table:style-name="ro1">
          <table:table-cell office:value-type="float" office:value="418.369934082031">
            <text:p>418.369934082</text:p>
          </table:table-cell>
          <table:table-cell office:value-type="float" office:value="0.004684399">
            <text:p>0.004684399</text:p>
          </table:table-cell>
          <table:table-cell table:number-columns-repeated="4"/>
        </table:table-row>
        <table:table-row table:style-name="ro1">
          <table:table-cell office:value-type="float" office:value="418.482849121094">
            <text:p>418.4828491211</text:p>
          </table:table-cell>
          <table:table-cell office:value-type="float" office:value="0.004283962">
            <text:p>0.004283962</text:p>
          </table:table-cell>
          <table:table-cell table:number-columns-repeated="4"/>
        </table:table-row>
        <table:table-row table:style-name="ro1">
          <table:table-cell office:value-type="float" office:value="418.595794677734">
            <text:p>418.5957946777</text:p>
          </table:table-cell>
          <table:table-cell office:value-type="float" office:value="0.0009648731">
            <text:p>0.0009648731</text:p>
          </table:table-cell>
          <table:table-cell table:number-columns-repeated="4"/>
        </table:table-row>
        <table:table-row table:style-name="ro1">
          <table:table-cell office:value-type="float" office:value="418.708740234375">
            <text:p>418.7087402344</text:p>
          </table:table-cell>
          <table:table-cell office:value-type="float" office:value="0.001390925">
            <text:p>0.001390925</text:p>
          </table:table-cell>
          <table:table-cell table:number-columns-repeated="4"/>
        </table:table-row>
        <table:table-row table:style-name="ro1">
          <table:table-cell office:value-type="float" office:value="418.821685791016">
            <text:p>418.821685791</text:p>
          </table:table-cell>
          <table:table-cell office:value-type="float" office:value="0.0006449132">
            <text:p>0.0006449132</text:p>
          </table:table-cell>
          <table:table-cell table:number-columns-repeated="4"/>
        </table:table-row>
        <table:table-row table:style-name="ro1">
          <table:table-cell office:value-type="float" office:value="418.934661865234">
            <text:p>418.9346618652</text:p>
          </table:table-cell>
          <table:table-cell office:value-type="float" office:value="0.003365079">
            <text:p>0.003365079</text:p>
          </table:table-cell>
          <table:table-cell table:number-columns-repeated="4"/>
        </table:table-row>
        <table:table-row table:style-name="ro1">
          <table:table-cell office:value-type="float" office:value="419.047607421875">
            <text:p>419.0476074219</text:p>
          </table:table-cell>
          <table:table-cell office:value-type="float" office:value="-0.003726489">
            <text:p>-0.003726489</text:p>
          </table:table-cell>
          <table:table-cell table:number-columns-repeated="4"/>
        </table:table-row>
        <table:table-row table:style-name="ro1">
          <table:table-cell office:value-type="float" office:value="419.160583496094">
            <text:p>419.1605834961</text:p>
          </table:table-cell>
          <table:table-cell office:value-type="float" office:value="-0.008341698">
            <text:p>-0.008341698</text:p>
          </table:table-cell>
          <table:table-cell table:number-columns-repeated="4"/>
        </table:table-row>
        <table:table-row table:style-name="ro1">
          <table:table-cell office:value-type="float" office:value="419.273559570313">
            <text:p>419.2735595703</text:p>
          </table:table-cell>
          <table:table-cell office:value-type="float" office:value="-0.005334455">
            <text:p>-0.005334455</text:p>
          </table:table-cell>
          <table:table-cell table:number-columns-repeated="4"/>
        </table:table-row>
        <table:table-row table:style-name="ro1">
          <table:table-cell office:value-type="float" office:value="419.386535644531">
            <text:p>419.3865356445</text:p>
          </table:table-cell>
          <table:table-cell office:value-type="float" office:value="-0.001410037">
            <text:p>-0.001410037</text:p>
          </table:table-cell>
          <table:table-cell table:number-columns-repeated="4"/>
        </table:table-row>
        <table:table-row table:style-name="ro1">
          <table:table-cell office:value-type="float" office:value="419.49951171875">
            <text:p>419.4995117188</text:p>
          </table:table-cell>
          <table:table-cell office:value-type="float" office:value="0.009062653">
            <text:p>0.009062653</text:p>
          </table:table-cell>
          <table:table-cell table:number-columns-repeated="4"/>
        </table:table-row>
        <table:table-row table:style-name="ro1">
          <table:table-cell office:value-type="float" office:value="419.612487792969">
            <text:p>419.612487793</text:p>
          </table:table-cell>
          <table:table-cell office:value-type="float" office:value="0.005849409">
            <text:p>0.005849409</text:p>
          </table:table-cell>
          <table:table-cell table:number-columns-repeated="4"/>
        </table:table-row>
        <table:table-row table:style-name="ro1">
          <table:table-cell office:value-type="float" office:value="419.725494384766">
            <text:p>419.7254943848</text:p>
          </table:table-cell>
          <table:table-cell office:value-type="float" office:value="0.008280137">
            <text:p>0.008280137</text:p>
          </table:table-cell>
          <table:table-cell table:number-columns-repeated="4"/>
        </table:table-row>
        <table:table-row table:style-name="ro1">
          <table:table-cell office:value-type="float" office:value="419.838470458984">
            <text:p>419.838470459</text:p>
          </table:table-cell>
          <table:table-cell office:value-type="float" office:value="0.001483603">
            <text:p>0.001483603</text:p>
          </table:table-cell>
          <table:table-cell table:number-columns-repeated="4"/>
        </table:table-row>
        <table:table-row table:style-name="ro1">
          <table:table-cell office:value-type="float" office:value="419.951477050781">
            <text:p>419.9514770508</text:p>
          </table:table-cell>
          <table:table-cell office:value-type="float" office:value="0.01245526">
            <text:p>0.01245526</text:p>
          </table:table-cell>
          <table:table-cell table:number-columns-repeated="4"/>
        </table:table-row>
        <table:table-row table:style-name="ro1">
          <table:table-cell office:value-type="float" office:value="420.064483642578">
            <text:p>420.0644836426</text:p>
          </table:table-cell>
          <table:table-cell office:value-type="float" office:value="-0.002355589">
            <text:p>-0.002355589</text:p>
          </table:table-cell>
          <table:table-cell table:number-columns-repeated="4"/>
        </table:table-row>
        <table:table-row table:style-name="ro1">
          <table:table-cell office:value-type="float" office:value="420.177520751953">
            <text:p>420.177520752</text:p>
          </table:table-cell>
          <table:table-cell office:value-type="float" office:value="0.0004636144">
            <text:p>0.0004636144</text:p>
          </table:table-cell>
          <table:table-cell table:number-columns-repeated="4"/>
        </table:table-row>
        <table:table-row table:style-name="ro1">
          <table:table-cell office:value-type="float" office:value="420.29052734375">
            <text:p>420.2905273438</text:p>
          </table:table-cell>
          <table:table-cell office:value-type="float" office:value="-0.006802317">
            <text:p>-0.006802317</text:p>
          </table:table-cell>
          <table:table-cell table:number-columns-repeated="4"/>
        </table:table-row>
        <table:table-row table:style-name="ro1">
          <table:table-cell office:value-type="float" office:value="420.403564453125">
            <text:p>420.4035644531</text:p>
          </table:table-cell>
          <table:table-cell office:value-type="float" office:value="-0.005377057">
            <text:p>-0.005377057</text:p>
          </table:table-cell>
          <table:table-cell table:number-columns-repeated="4"/>
        </table:table-row>
        <table:table-row table:style-name="ro1">
          <table:table-cell office:value-type="float" office:value="420.516571044922">
            <text:p>420.5165710449</text:p>
          </table:table-cell>
          <table:table-cell office:value-type="float" office:value="-0.00339159">
            <text:p>-0.00339159</text:p>
          </table:table-cell>
          <table:table-cell table:number-columns-repeated="4"/>
        </table:table-row>
        <table:table-row table:style-name="ro1">
          <table:table-cell office:value-type="float" office:value="420.629608154297">
            <text:p>420.6296081543</text:p>
          </table:table-cell>
          <table:table-cell office:value-type="float" office:value="0.001984089">
            <text:p>0.001984089</text:p>
          </table:table-cell>
          <table:table-cell table:number-columns-repeated="4"/>
        </table:table-row>
        <table:table-row table:style-name="ro1">
          <table:table-cell office:value-type="float" office:value="420.742645263672">
            <text:p>420.7426452637</text:p>
          </table:table-cell>
          <table:table-cell office:value-type="float" office:value="0.003805234">
            <text:p>0.003805234</text:p>
          </table:table-cell>
          <table:table-cell table:number-columns-repeated="4"/>
        </table:table-row>
        <table:table-row table:style-name="ro1">
          <table:table-cell office:value-type="float" office:value="420.855712890625">
            <text:p>420.8557128906</text:p>
          </table:table-cell>
          <table:table-cell office:value-type="float" office:value="0.004709058">
            <text:p>0.004709058</text:p>
          </table:table-cell>
          <table:table-cell table:number-columns-repeated="4"/>
        </table:table-row>
        <table:table-row table:style-name="ro1">
          <table:table-cell office:value-type="float" office:value="420.96875">
            <text:p>420.96875</text:p>
          </table:table-cell>
          <table:table-cell office:value-type="float" office:value="0.01298311">
            <text:p>0.01298311</text:p>
          </table:table-cell>
          <table:table-cell table:number-columns-repeated="4"/>
        </table:table-row>
        <table:table-row table:style-name="ro1">
          <table:table-cell office:value-type="float" office:value="421.081817626953">
            <text:p>421.081817627</text:p>
          </table:table-cell>
          <table:table-cell office:value-type="float" office:value="-0.003285284">
            <text:p>-0.003285284</text:p>
          </table:table-cell>
          <table:table-cell table:number-columns-repeated="4"/>
        </table:table-row>
        <table:table-row table:style-name="ro1">
          <table:table-cell office:value-type="float" office:value="421.194854736328">
            <text:p>421.1948547363</text:p>
          </table:table-cell>
          <table:table-cell office:value-type="float" office:value="-0.005091345">
            <text:p>-0.005091345</text:p>
          </table:table-cell>
          <table:table-cell table:number-columns-repeated="4"/>
        </table:table-row>
        <table:table-row table:style-name="ro1">
          <table:table-cell office:value-type="float" office:value="421.307922363281">
            <text:p>421.3079223633</text:p>
          </table:table-cell>
          <table:table-cell office:value-type="float" office:value="0.002179806">
            <text:p>0.002179806</text:p>
          </table:table-cell>
          <table:table-cell table:number-columns-repeated="4"/>
        </table:table-row>
        <table:table-row table:style-name="ro1">
          <table:table-cell office:value-type="float" office:value="421.421020507813">
            <text:p>421.4210205078</text:p>
          </table:table-cell>
          <table:table-cell office:value-type="float" office:value="0.01072853">
            <text:p>0.01072853</text:p>
          </table:table-cell>
          <table:table-cell table:number-columns-repeated="4"/>
        </table:table-row>
        <table:table-row table:style-name="ro1">
          <table:table-cell office:value-type="float" office:value="421.534088134766">
            <text:p>421.5340881348</text:p>
          </table:table-cell>
          <table:table-cell office:value-type="float" office:value="-0.007773614">
            <text:p>-0.007773614</text:p>
          </table:table-cell>
          <table:table-cell table:number-columns-repeated="4"/>
        </table:table-row>
        <table:table-row table:style-name="ro1">
          <table:table-cell office:value-type="float" office:value="421.647155761719">
            <text:p>421.6471557617</text:p>
          </table:table-cell>
          <table:table-cell office:value-type="float" office:value="0.002725166">
            <text:p>0.002725166</text:p>
          </table:table-cell>
          <table:table-cell table:number-columns-repeated="4"/>
        </table:table-row>
        <table:table-row table:style-name="ro1">
          <table:table-cell office:value-type="float" office:value="421.76025390625">
            <text:p>421.7602539063</text:p>
          </table:table-cell>
          <table:table-cell office:value-type="float" office:value="-0.001733919">
            <text:p>-0.001733919</text:p>
          </table:table-cell>
          <table:table-cell table:number-columns-repeated="4"/>
        </table:table-row>
        <table:table-row table:style-name="ro1">
          <table:table-cell office:value-type="float" office:value="421.873352050781">
            <text:p>421.8733520508</text:p>
          </table:table-cell>
          <table:table-cell office:value-type="float" office:value="0.007166074">
            <text:p>0.007166074</text:p>
          </table:table-cell>
          <table:table-cell table:number-columns-repeated="4"/>
        </table:table-row>
        <table:table-row table:style-name="ro1">
          <table:table-cell office:value-type="float" office:value="421.986450195313">
            <text:p>421.9864501953</text:p>
          </table:table-cell>
          <table:table-cell office:value-type="float" office:value="0.005698862">
            <text:p>0.005698862</text:p>
          </table:table-cell>
          <table:table-cell table:number-columns-repeated="4"/>
        </table:table-row>
        <table:table-row table:style-name="ro1">
          <table:table-cell office:value-type="float" office:value="422.099548339844">
            <text:p>422.0995483398</text:p>
          </table:table-cell>
          <table:table-cell office:value-type="float" office:value="-0.00104043">
            <text:p>-0.00104043</text:p>
          </table:table-cell>
          <table:table-cell table:number-columns-repeated="4"/>
        </table:table-row>
        <table:table-row table:style-name="ro1">
          <table:table-cell office:value-type="float" office:value="422.212646484375">
            <text:p>422.2126464844</text:p>
          </table:table-cell>
          <table:table-cell office:value-type="float" office:value="0.02082422">
            <text:p>0.02082422</text:p>
          </table:table-cell>
          <table:table-cell table:number-columns-repeated="4"/>
        </table:table-row>
        <table:table-row table:style-name="ro1">
          <table:table-cell office:value-type="float" office:value="422.325775146484">
            <text:p>422.3257751465</text:p>
          </table:table-cell>
          <table:table-cell office:value-type="float" office:value="-0.002618086">
            <text:p>-0.002618086</text:p>
          </table:table-cell>
          <table:table-cell table:number-columns-repeated="4"/>
        </table:table-row>
        <table:table-row table:style-name="ro1">
          <table:table-cell office:value-type="float" office:value="422.438903808594">
            <text:p>422.4389038086</text:p>
          </table:table-cell>
          <table:table-cell office:value-type="float" office:value="-0.00758489">
            <text:p>-0.00758489</text:p>
          </table:table-cell>
          <table:table-cell table:number-columns-repeated="4"/>
        </table:table-row>
        <table:table-row table:style-name="ro1">
          <table:table-cell office:value-type="float" office:value="422.552001953125">
            <text:p>422.5520019531</text:p>
          </table:table-cell>
          <table:table-cell office:value-type="float" office:value="-0.007800569">
            <text:p>-0.007800569</text:p>
          </table:table-cell>
          <table:table-cell table:number-columns-repeated="4"/>
        </table:table-row>
        <table:table-row table:style-name="ro1">
          <table:table-cell office:value-type="float" office:value="422.665130615234">
            <text:p>422.6651306152</text:p>
          </table:table-cell>
          <table:table-cell office:value-type="float" office:value="0.008366105">
            <text:p>0.008366105</text:p>
          </table:table-cell>
          <table:table-cell table:number-columns-repeated="4"/>
        </table:table-row>
        <table:table-row table:style-name="ro1">
          <table:table-cell office:value-type="float" office:value="422.778289794922">
            <text:p>422.7782897949</text:p>
          </table:table-cell>
          <table:table-cell office:value-type="float" office:value="-0.005486204">
            <text:p>-0.005486204</text:p>
          </table:table-cell>
          <table:table-cell table:number-columns-repeated="4"/>
        </table:table-row>
        <table:table-row table:style-name="ro1">
          <table:table-cell office:value-type="float" office:value="422.891418457031">
            <text:p>422.891418457</text:p>
          </table:table-cell>
          <table:table-cell office:value-type="float" office:value="0.0107504">
            <text:p>0.0107504</text:p>
          </table:table-cell>
          <table:table-cell table:number-columns-repeated="4"/>
        </table:table-row>
        <table:table-row table:style-name="ro1">
          <table:table-cell office:value-type="float" office:value="423.004577636719">
            <text:p>423.0045776367</text:p>
          </table:table-cell>
          <table:table-cell office:value-type="float" office:value="0.005992326">
            <text:p>0.005992326</text:p>
          </table:table-cell>
          <table:table-cell table:number-columns-repeated="4"/>
        </table:table-row>
        <table:table-row table:style-name="ro1">
          <table:table-cell office:value-type="float" office:value="423.117706298828">
            <text:p>423.1177062988</text:p>
          </table:table-cell>
          <table:table-cell office:value-type="float" office:value="-0.002865244">
            <text:p>-0.002865244</text:p>
          </table:table-cell>
          <table:table-cell table:number-columns-repeated="4"/>
        </table:table-row>
        <table:table-row table:style-name="ro1">
          <table:table-cell office:value-type="float" office:value="423.230865478516">
            <text:p>423.2308654785</text:p>
          </table:table-cell>
          <table:table-cell office:value-type="float" office:value="-0.003652791">
            <text:p>-0.003652791</text:p>
          </table:table-cell>
          <table:table-cell table:number-columns-repeated="4"/>
        </table:table-row>
        <table:table-row table:style-name="ro1">
          <table:table-cell office:value-type="float" office:value="423.344024658203">
            <text:p>423.3440246582</text:p>
          </table:table-cell>
          <table:table-cell office:value-type="float" office:value="0.002241041">
            <text:p>0.002241041</text:p>
          </table:table-cell>
          <table:table-cell table:number-columns-repeated="4"/>
        </table:table-row>
        <table:table-row table:style-name="ro1">
          <table:table-cell office:value-type="float" office:value="423.457183837891">
            <text:p>423.4571838379</text:p>
          </table:table-cell>
          <table:table-cell office:value-type="float" office:value="-0.008603296">
            <text:p>-0.008603296</text:p>
          </table:table-cell>
          <table:table-cell table:number-columns-repeated="4"/>
        </table:table-row>
        <table:table-row table:style-name="ro1">
          <table:table-cell office:value-type="float" office:value="423.570373535156">
            <text:p>423.5703735352</text:p>
          </table:table-cell>
          <table:table-cell office:value-type="float" office:value="0.01018757">
            <text:p>0.01018757</text:p>
          </table:table-cell>
          <table:table-cell table:number-columns-repeated="4"/>
        </table:table-row>
        <table:table-row table:style-name="ro1">
          <table:table-cell office:value-type="float" office:value="423.683532714844">
            <text:p>423.6835327148</text:p>
          </table:table-cell>
          <table:table-cell office:value-type="float" office:value="-0.0007630957">
            <text:p>-0.0007630957</text:p>
          </table:table-cell>
          <table:table-cell table:number-columns-repeated="4"/>
        </table:table-row>
        <table:table-row table:style-name="ro1">
          <table:table-cell office:value-type="float" office:value="423.796722412109">
            <text:p>423.7967224121</text:p>
          </table:table-cell>
          <table:table-cell office:value-type="float" office:value="-0.003323">
            <text:p>-0.003323</text:p>
          </table:table-cell>
          <table:table-cell table:number-columns-repeated="4"/>
        </table:table-row>
        <table:table-row table:style-name="ro1">
          <table:table-cell office:value-type="float" office:value="423.909912109375">
            <text:p>423.9099121094</text:p>
          </table:table-cell>
          <table:table-cell office:value-type="float" office:value="-0.009775368">
            <text:p>-0.009775368</text:p>
          </table:table-cell>
          <table:table-cell table:number-columns-repeated="4"/>
        </table:table-row>
        <table:table-row table:style-name="ro1">
          <table:table-cell office:value-type="float" office:value="424.023101806641">
            <text:p>424.0231018066</text:p>
          </table:table-cell>
          <table:table-cell office:value-type="float" office:value="0.004737529">
            <text:p>0.004737529</text:p>
          </table:table-cell>
          <table:table-cell table:number-columns-repeated="4"/>
        </table:table-row>
        <table:table-row table:style-name="ro1">
          <table:table-cell office:value-type="float" office:value="424.136291503906">
            <text:p>424.1362915039</text:p>
          </table:table-cell>
          <table:table-cell office:value-type="float" office:value="0.009896347">
            <text:p>0.009896347</text:p>
          </table:table-cell>
          <table:table-cell table:number-columns-repeated="4"/>
        </table:table-row>
        <table:table-row table:style-name="ro1">
          <table:table-cell office:value-type="float" office:value="424.24951171875">
            <text:p>424.2495117188</text:p>
          </table:table-cell>
          <table:table-cell office:value-type="float" office:value="0.00604505">
            <text:p>0.00604505</text:p>
          </table:table-cell>
          <table:table-cell table:number-columns-repeated="4"/>
        </table:table-row>
        <table:table-row table:style-name="ro1">
          <table:table-cell office:value-type="float" office:value="424.362701416016">
            <text:p>424.362701416</text:p>
          </table:table-cell>
          <table:table-cell office:value-type="float" office:value="-0.004050718">
            <text:p>-0.004050718</text:p>
          </table:table-cell>
          <table:table-cell table:number-columns-repeated="4"/>
        </table:table-row>
        <table:table-row table:style-name="ro1">
          <table:table-cell office:value-type="float" office:value="424.475921630859">
            <text:p>424.4759216309</text:p>
          </table:table-cell>
          <table:table-cell office:value-type="float" office:value="0.002085492">
            <text:p>0.002085492</text:p>
          </table:table-cell>
          <table:table-cell table:number-columns-repeated="4"/>
        </table:table-row>
        <table:table-row table:style-name="ro1">
          <table:table-cell office:value-type="float" office:value="424.589141845703">
            <text:p>424.5891418457</text:p>
          </table:table-cell>
          <table:table-cell office:value-type="float" office:value="-0.0002386621">
            <text:p>-0.0002386621</text:p>
          </table:table-cell>
          <table:table-cell table:number-columns-repeated="4"/>
        </table:table-row>
        <table:table-row table:style-name="ro1">
          <table:table-cell office:value-type="float" office:value="424.702362060547">
            <text:p>424.7023620605</text:p>
          </table:table-cell>
          <table:table-cell office:value-type="float" office:value="-0.00682213">
            <text:p>-0.00682213</text:p>
          </table:table-cell>
          <table:table-cell table:number-columns-repeated="4"/>
        </table:table-row>
        <table:table-row table:style-name="ro1">
          <table:table-cell office:value-type="float" office:value="424.815612792969">
            <text:p>424.815612793</text:p>
          </table:table-cell>
          <table:table-cell office:value-type="float" office:value="-0.002438184">
            <text:p>-0.002438184</text:p>
          </table:table-cell>
          <table:table-cell table:number-columns-repeated="4"/>
        </table:table-row>
        <table:table-row table:style-name="ro1">
          <table:table-cell office:value-type="float" office:value="424.928833007813">
            <text:p>424.9288330078</text:p>
          </table:table-cell>
          <table:table-cell office:value-type="float" office:value="0.01389579">
            <text:p>0.01389579</text:p>
          </table:table-cell>
          <table:table-cell table:number-columns-repeated="4"/>
        </table:table-row>
        <table:table-row table:style-name="ro1">
          <table:table-cell office:value-type="float" office:value="425.042083740234">
            <text:p>425.0420837402</text:p>
          </table:table-cell>
          <table:table-cell office:value-type="float" office:value="-0.004584293">
            <text:p>-0.004584293</text:p>
          </table:table-cell>
          <table:table-cell table:number-columns-repeated="4"/>
        </table:table-row>
        <table:table-row table:style-name="ro1">
          <table:table-cell office:value-type="float" office:value="425.155303955078">
            <text:p>425.1553039551</text:p>
          </table:table-cell>
          <table:table-cell office:value-type="float" office:value="-0.003342864">
            <text:p>-0.003342864</text:p>
          </table:table-cell>
          <table:table-cell table:number-columns-repeated="4"/>
        </table:table-row>
        <table:table-row table:style-name="ro1">
          <table:table-cell office:value-type="float" office:value="425.2685546875">
            <text:p>425.2685546875</text:p>
          </table:table-cell>
          <table:table-cell office:value-type="float" office:value="-0.01326958">
            <text:p>-0.01326958</text:p>
          </table:table-cell>
          <table:table-cell table:number-columns-repeated="4"/>
        </table:table-row>
        <table:table-row table:style-name="ro1">
          <table:table-cell office:value-type="float" office:value="425.3818359375">
            <text:p>425.3818359375</text:p>
          </table:table-cell>
          <table:table-cell office:value-type="float" office:value="-0.001082158">
            <text:p>-0.001082158</text:p>
          </table:table-cell>
          <table:table-cell table:number-columns-repeated="4"/>
        </table:table-row>
        <table:table-row table:style-name="ro1">
          <table:table-cell office:value-type="float" office:value="425.495086669922">
            <text:p>425.4950866699</text:p>
          </table:table-cell>
          <table:table-cell office:value-type="float" office:value="0.005282981">
            <text:p>0.005282981</text:p>
          </table:table-cell>
          <table:table-cell table:number-columns-repeated="4"/>
        </table:table-row>
        <table:table-row table:style-name="ro1">
          <table:table-cell office:value-type="float" office:value="425.608337402344">
            <text:p>425.6083374023</text:p>
          </table:table-cell>
          <table:table-cell office:value-type="float" office:value="0.004695087">
            <text:p>0.004695087</text:p>
          </table:table-cell>
          <table:table-cell table:number-columns-repeated="4"/>
        </table:table-row>
        <table:table-row table:style-name="ro1">
          <table:table-cell office:value-type="float" office:value="425.721618652344">
            <text:p>425.7216186523</text:p>
          </table:table-cell>
          <table:table-cell office:value-type="float" office:value="-0.005324311">
            <text:p>-0.005324311</text:p>
          </table:table-cell>
          <table:table-cell table:number-columns-repeated="4"/>
        </table:table-row>
        <table:table-row table:style-name="ro1">
          <table:table-cell office:value-type="float" office:value="425.834899902344">
            <text:p>425.8348999023</text:p>
          </table:table-cell>
          <table:table-cell office:value-type="float" office:value="-0.005979368">
            <text:p>-0.005979368</text:p>
          </table:table-cell>
          <table:table-cell table:number-columns-repeated="4"/>
        </table:table-row>
        <table:table-row table:style-name="ro1">
          <table:table-cell office:value-type="float" office:value="425.948181152344">
            <text:p>425.9481811523</text:p>
          </table:table-cell>
          <table:table-cell office:value-type="float" office:value="0.003758837">
            <text:p>0.003758837</text:p>
          </table:table-cell>
          <table:table-cell table:number-columns-repeated="4"/>
        </table:table-row>
        <table:table-row table:style-name="ro1">
          <table:table-cell office:value-type="float" office:value="426.061462402344">
            <text:p>426.0614624023</text:p>
          </table:table-cell>
          <table:table-cell office:value-type="float" office:value="0.01025913">
            <text:p>0.01025913</text:p>
          </table:table-cell>
          <table:table-cell table:number-columns-repeated="4"/>
        </table:table-row>
        <table:table-row table:style-name="ro1">
          <table:table-cell office:value-type="float" office:value="426.174743652344">
            <text:p>426.1747436523</text:p>
          </table:table-cell>
          <table:table-cell office:value-type="float" office:value="-0.00488819">
            <text:p>-0.00488819</text:p>
          </table:table-cell>
          <table:table-cell table:number-columns-repeated="4"/>
        </table:table-row>
        <table:table-row table:style-name="ro1">
          <table:table-cell office:value-type="float" office:value="426.288055419922">
            <text:p>426.2880554199</text:p>
          </table:table-cell>
          <table:table-cell office:value-type="float" office:value="0.009507929">
            <text:p>0.009507929</text:p>
          </table:table-cell>
          <table:table-cell table:number-columns-repeated="4"/>
        </table:table-row>
        <table:table-row table:style-name="ro1">
          <table:table-cell office:value-type="float" office:value="426.401336669922">
            <text:p>426.4013366699</text:p>
          </table:table-cell>
          <table:table-cell office:value-type="float" office:value="-0.0002166578">
            <text:p>-0.0002166578</text:p>
          </table:table-cell>
          <table:table-cell table:number-columns-repeated="4"/>
        </table:table-row>
        <table:table-row table:style-name="ro1">
          <table:table-cell office:value-type="float" office:value="426.5146484375">
            <text:p>426.5146484375</text:p>
          </table:table-cell>
          <table:table-cell office:value-type="float" office:value="-0.002577569">
            <text:p>-0.002577569</text:p>
          </table:table-cell>
          <table:table-cell table:number-columns-repeated="4"/>
        </table:table-row>
        <table:table-row table:style-name="ro1">
          <table:table-cell office:value-type="float" office:value="426.627960205078">
            <text:p>426.6279602051</text:p>
          </table:table-cell>
          <table:table-cell office:value-type="float" office:value="0.002946789">
            <text:p>0.002946789</text:p>
          </table:table-cell>
          <table:table-cell table:number-columns-repeated="4"/>
        </table:table-row>
        <table:table-row table:style-name="ro1">
          <table:table-cell office:value-type="float" office:value="426.741271972656">
            <text:p>426.7412719727</text:p>
          </table:table-cell>
          <table:table-cell office:value-type="float" office:value="0.00844756">
            <text:p>0.00844756</text:p>
          </table:table-cell>
          <table:table-cell table:number-columns-repeated="4"/>
        </table:table-row>
        <table:table-row table:style-name="ro1">
          <table:table-cell office:value-type="float" office:value="426.854614257813">
            <text:p>426.8546142578</text:p>
          </table:table-cell>
          <table:table-cell office:value-type="float" office:value="0.008563942">
            <text:p>0.008563942</text:p>
          </table:table-cell>
          <table:table-cell table:number-columns-repeated="4"/>
        </table:table-row>
        <table:table-row table:style-name="ro1">
          <table:table-cell office:value-type="float" office:value="426.967926025391">
            <text:p>426.9679260254</text:p>
          </table:table-cell>
          <table:table-cell office:value-type="float" office:value="-0.004102508">
            <text:p>-0.004102508</text:p>
          </table:table-cell>
          <table:table-cell table:number-columns-repeated="4"/>
        </table:table-row>
        <table:table-row table:style-name="ro1">
          <table:table-cell office:value-type="float" office:value="427.081268310547">
            <text:p>427.0812683105</text:p>
          </table:table-cell>
          <table:table-cell office:value-type="float" office:value="-0.004708798">
            <text:p>-0.004708798</text:p>
          </table:table-cell>
          <table:table-cell table:number-columns-repeated="4"/>
        </table:table-row>
        <table:table-row table:style-name="ro1">
          <table:table-cell office:value-type="float" office:value="427.194610595703">
            <text:p>427.1946105957</text:p>
          </table:table-cell>
          <table:table-cell office:value-type="float" office:value="0.003672916">
            <text:p>0.003672916</text:p>
          </table:table-cell>
          <table:table-cell table:number-columns-repeated="4"/>
        </table:table-row>
        <table:table-row table:style-name="ro1">
          <table:table-cell office:value-type="float" office:value="427.307952880859">
            <text:p>427.3079528809</text:p>
          </table:table-cell>
          <table:table-cell office:value-type="float" office:value="0.002995955">
            <text:p>0.002995955</text:p>
          </table:table-cell>
          <table:table-cell table:number-columns-repeated="4"/>
        </table:table-row>
        <table:table-row table:style-name="ro1">
          <table:table-cell office:value-type="float" office:value="427.421295166016">
            <text:p>427.421295166</text:p>
          </table:table-cell>
          <table:table-cell office:value-type="float" office:value="0.0001664654">
            <text:p>0.0001664654</text:p>
          </table:table-cell>
          <table:table-cell table:number-columns-repeated="4"/>
        </table:table-row>
        <table:table-row table:style-name="ro1">
          <table:table-cell office:value-type="float" office:value="427.534637451172">
            <text:p>427.5346374512</text:p>
          </table:table-cell>
          <table:table-cell office:value-type="float" office:value="-0.009662193">
            <text:p>-0.009662193</text:p>
          </table:table-cell>
          <table:table-cell table:number-columns-repeated="4"/>
        </table:table-row>
        <table:table-row table:style-name="ro1">
          <table:table-cell office:value-type="float" office:value="427.648010253906">
            <text:p>427.6480102539</text:p>
          </table:table-cell>
          <table:table-cell office:value-type="float" office:value="0.002252087">
            <text:p>0.002252087</text:p>
          </table:table-cell>
          <table:table-cell table:number-columns-repeated="4"/>
        </table:table-row>
        <table:table-row table:style-name="ro1">
          <table:table-cell office:value-type="float" office:value="427.761383056641">
            <text:p>427.7613830566</text:p>
          </table:table-cell>
          <table:table-cell office:value-type="float" office:value="0.004317291">
            <text:p>0.004317291</text:p>
          </table:table-cell>
          <table:table-cell table:number-columns-repeated="4"/>
        </table:table-row>
        <table:table-row table:style-name="ro1">
          <table:table-cell office:value-type="float" office:value="427.874755859375">
            <text:p>427.8747558594</text:p>
          </table:table-cell>
          <table:table-cell office:value-type="float" office:value="-0.006799466">
            <text:p>-0.006799466</text:p>
          </table:table-cell>
          <table:table-cell table:number-columns-repeated="4"/>
        </table:table-row>
        <table:table-row table:style-name="ro1">
          <table:table-cell office:value-type="float" office:value="427.988128662109">
            <text:p>427.9881286621</text:p>
          </table:table-cell>
          <table:table-cell office:value-type="float" office:value="-0.009746322">
            <text:p>-0.009746322</text:p>
          </table:table-cell>
          <table:table-cell table:number-columns-repeated="4"/>
        </table:table-row>
        <table:table-row table:style-name="ro1">
          <table:table-cell office:value-type="float" office:value="428.101501464844">
            <text:p>428.1015014648</text:p>
          </table:table-cell>
          <table:table-cell office:value-type="float" office:value="-0.0003581657">
            <text:p>-0.0003581657</text:p>
          </table:table-cell>
          <table:table-cell table:number-columns-repeated="4"/>
        </table:table-row>
        <table:table-row table:style-name="ro1">
          <table:table-cell office:value-type="float" office:value="428.214874267578">
            <text:p>428.2148742676</text:p>
          </table:table-cell>
          <table:table-cell office:value-type="float" office:value="0.007916297">
            <text:p>0.007916297</text:p>
          </table:table-cell>
          <table:table-cell table:number-columns-repeated="4"/>
        </table:table-row>
        <table:table-row table:style-name="ro1">
          <table:table-cell office:value-type="float" office:value="428.328277587891">
            <text:p>428.3282775879</text:p>
          </table:table-cell>
          <table:table-cell office:value-type="float" office:value="-0.002222846">
            <text:p>-0.002222846</text:p>
          </table:table-cell>
          <table:table-cell table:number-columns-repeated="4"/>
        </table:table-row>
        <table:table-row table:style-name="ro1">
          <table:table-cell office:value-type="float" office:value="428.441650390625">
            <text:p>428.4416503906</text:p>
          </table:table-cell>
          <table:table-cell office:value-type="float" office:value="-0.005780923">
            <text:p>-0.005780923</text:p>
          </table:table-cell>
          <table:table-cell table:number-columns-repeated="4"/>
        </table:table-row>
        <table:table-row table:style-name="ro1">
          <table:table-cell office:value-type="float" office:value="428.555053710938">
            <text:p>428.5550537109</text:p>
          </table:table-cell>
          <table:table-cell office:value-type="float" office:value="-0.003357438">
            <text:p>-0.003357438</text:p>
          </table:table-cell>
          <table:table-cell table:number-columns-repeated="4"/>
        </table:table-row>
        <table:table-row table:style-name="ro1">
          <table:table-cell office:value-type="float" office:value="428.66845703125">
            <text:p>428.6684570313</text:p>
          </table:table-cell>
          <table:table-cell office:value-type="float" office:value="0.00351348">
            <text:p>0.00351348</text:p>
          </table:table-cell>
          <table:table-cell table:number-columns-repeated="4"/>
        </table:table-row>
        <table:table-row table:style-name="ro1">
          <table:table-cell office:value-type="float" office:value="428.781890869141">
            <text:p>428.7818908691</text:p>
          </table:table-cell>
          <table:table-cell office:value-type="float" office:value="-0.0001608435">
            <text:p>-0.0001608435</text:p>
          </table:table-cell>
          <table:table-cell table:number-columns-repeated="4"/>
        </table:table-row>
        <table:table-row table:style-name="ro1">
          <table:table-cell office:value-type="float" office:value="428.895294189453">
            <text:p>428.8952941895</text:p>
          </table:table-cell>
          <table:table-cell office:value-type="float" office:value="0.006797289">
            <text:p>0.006797289</text:p>
          </table:table-cell>
          <table:table-cell table:number-columns-repeated="4"/>
        </table:table-row>
        <table:table-row table:style-name="ro1">
          <table:table-cell office:value-type="float" office:value="429.008728027344">
            <text:p>429.0087280273</text:p>
          </table:table-cell>
          <table:table-cell office:value-type="float" office:value="-0.006795669">
            <text:p>-0.006795669</text:p>
          </table:table-cell>
          <table:table-cell table:number-columns-repeated="4"/>
        </table:table-row>
        <table:table-row table:style-name="ro1">
          <table:table-cell office:value-type="float" office:value="429.122131347656">
            <text:p>429.1221313477</text:p>
          </table:table-cell>
          <table:table-cell office:value-type="float" office:value="-0.004509868">
            <text:p>-0.004509868</text:p>
          </table:table-cell>
          <table:table-cell table:number-columns-repeated="4"/>
        </table:table-row>
        <table:table-row table:style-name="ro1">
          <table:table-cell office:value-type="float" office:value="429.235565185547">
            <text:p>429.2355651855</text:p>
          </table:table-cell>
          <table:table-cell office:value-type="float" office:value="-0.005445322">
            <text:p>-0.005445322</text:p>
          </table:table-cell>
          <table:table-cell table:number-columns-repeated="4"/>
        </table:table-row>
        <table:table-row table:style-name="ro1">
          <table:table-cell office:value-type="float" office:value="429.348999023438">
            <text:p>429.3489990234</text:p>
          </table:table-cell>
          <table:table-cell office:value-type="float" office:value="0.01580795">
            <text:p>0.01580795</text:p>
          </table:table-cell>
          <table:table-cell table:number-columns-repeated="4"/>
        </table:table-row>
        <table:table-row table:style-name="ro1">
          <table:table-cell office:value-type="float" office:value="429.462432861328">
            <text:p>429.4624328613</text:p>
          </table:table-cell>
          <table:table-cell office:value-type="float" office:value="0.02340482">
            <text:p>0.02340482</text:p>
          </table:table-cell>
          <table:table-cell table:number-columns-repeated="4"/>
        </table:table-row>
        <table:table-row table:style-name="ro1">
          <table:table-cell office:value-type="float" office:value="429.575897216797">
            <text:p>429.5758972168</text:p>
          </table:table-cell>
          <table:table-cell office:value-type="float" office:value="-0.001056401">
            <text:p>-0.001056401</text:p>
          </table:table-cell>
          <table:table-cell table:number-columns-repeated="4"/>
        </table:table-row>
        <table:table-row table:style-name="ro1">
          <table:table-cell office:value-type="float" office:value="429.689331054688">
            <text:p>429.6893310547</text:p>
          </table:table-cell>
          <table:table-cell office:value-type="float" office:value="-0.005278558">
            <text:p>-0.005278558</text:p>
          </table:table-cell>
          <table:table-cell table:number-columns-repeated="4"/>
        </table:table-row>
        <table:table-row table:style-name="ro1">
          <table:table-cell office:value-type="float" office:value="429.802795410156">
            <text:p>429.8027954102</text:p>
          </table:table-cell>
          <table:table-cell office:value-type="float" office:value="0.006785534">
            <text:p>0.006785534</text:p>
          </table:table-cell>
          <table:table-cell table:number-columns-repeated="4"/>
        </table:table-row>
        <table:table-row table:style-name="ro1">
          <table:table-cell office:value-type="float" office:value="429.916259765625">
            <text:p>429.9162597656</text:p>
          </table:table-cell>
          <table:table-cell office:value-type="float" office:value="-0.0002595284">
            <text:p>-0.0002595284</text:p>
          </table:table-cell>
          <table:table-cell table:number-columns-repeated="4"/>
        </table:table-row>
        <table:table-row table:style-name="ro1">
          <table:table-cell office:value-type="float" office:value="430.029724121094">
            <text:p>430.0297241211</text:p>
          </table:table-cell>
          <table:table-cell office:value-type="float" office:value="0.007332973">
            <text:p>0.007332973</text:p>
          </table:table-cell>
          <table:table-cell table:number-columns-repeated="4"/>
        </table:table-row>
        <table:table-row table:style-name="ro1">
          <table:table-cell office:value-type="float" office:value="430.143188476563">
            <text:p>430.1431884766</text:p>
          </table:table-cell>
          <table:table-cell office:value-type="float" office:value="0.008207746">
            <text:p>0.008207746</text:p>
          </table:table-cell>
          <table:table-cell table:number-columns-repeated="4"/>
        </table:table-row>
        <table:table-row table:style-name="ro1">
          <table:table-cell office:value-type="float" office:value="430.256683349609">
            <text:p>430.2566833496</text:p>
          </table:table-cell>
          <table:table-cell office:value-type="float" office:value="-0.00289935">
            <text:p>-0.00289935</text:p>
          </table:table-cell>
          <table:table-cell table:number-columns-repeated="4"/>
        </table:table-row>
        <table:table-row table:style-name="ro1">
          <table:table-cell office:value-type="float" office:value="430.370147705078">
            <text:p>430.3701477051</text:p>
          </table:table-cell>
          <table:table-cell office:value-type="float" office:value="0.01087658">
            <text:p>0.01087658</text:p>
          </table:table-cell>
          <table:table-cell table:number-columns-repeated="4"/>
        </table:table-row>
        <table:table-row table:style-name="ro1">
          <table:table-cell office:value-type="float" office:value="430.483642578125">
            <text:p>430.4836425781</text:p>
          </table:table-cell>
          <table:table-cell office:value-type="float" office:value="-0.002246679">
            <text:p>-0.002246679</text:p>
          </table:table-cell>
          <table:table-cell table:number-columns-repeated="4"/>
        </table:table-row>
        <table:table-row table:style-name="ro1">
          <table:table-cell office:value-type="float" office:value="430.597137451172">
            <text:p>430.5971374512</text:p>
          </table:table-cell>
          <table:table-cell office:value-type="float" office:value="0.0005925459">
            <text:p>0.0005925459</text:p>
          </table:table-cell>
          <table:table-cell table:number-columns-repeated="4"/>
        </table:table-row>
        <table:table-row table:style-name="ro1">
          <table:table-cell office:value-type="float" office:value="430.710632324219">
            <text:p>430.7106323242</text:p>
          </table:table-cell>
          <table:table-cell office:value-type="float" office:value="-0.002628342">
            <text:p>-0.002628342</text:p>
          </table:table-cell>
          <table:table-cell table:number-columns-repeated="4"/>
        </table:table-row>
        <table:table-row table:style-name="ro1">
          <table:table-cell office:value-type="float" office:value="430.824127197266">
            <text:p>430.8241271973</text:p>
          </table:table-cell>
          <table:table-cell office:value-type="float" office:value="0.005736238">
            <text:p>0.005736238</text:p>
          </table:table-cell>
          <table:table-cell table:number-columns-repeated="4"/>
        </table:table-row>
        <table:table-row table:style-name="ro1">
          <table:table-cell office:value-type="float" office:value="430.937652587891">
            <text:p>430.9376525879</text:p>
          </table:table-cell>
          <table:table-cell office:value-type="float" office:value="-0.001000253">
            <text:p>-0.001000253</text:p>
          </table:table-cell>
          <table:table-cell table:number-columns-repeated="4"/>
        </table:table-row>
        <table:table-row table:style-name="ro1">
          <table:table-cell office:value-type="float" office:value="431.051147460938">
            <text:p>431.0511474609</text:p>
          </table:table-cell>
          <table:table-cell office:value-type="float" office:value="-0.004052809">
            <text:p>-0.004052809</text:p>
          </table:table-cell>
          <table:table-cell table:number-columns-repeated="4"/>
        </table:table-row>
        <table:table-row table:style-name="ro1">
          <table:table-cell office:value-type="float" office:value="431.164672851563">
            <text:p>431.1646728516</text:p>
          </table:table-cell>
          <table:table-cell office:value-type="float" office:value="-0.005941731">
            <text:p>-0.005941731</text:p>
          </table:table-cell>
          <table:table-cell table:number-columns-repeated="4"/>
        </table:table-row>
        <table:table-row table:style-name="ro1">
          <table:table-cell office:value-type="float" office:value="431.278198242188">
            <text:p>431.2781982422</text:p>
          </table:table-cell>
          <table:table-cell office:value-type="float" office:value="0.003124722">
            <text:p>0.003124722</text:p>
          </table:table-cell>
          <table:table-cell table:number-columns-repeated="4"/>
        </table:table-row>
        <table:table-row table:style-name="ro1">
          <table:table-cell office:value-type="float" office:value="431.391723632813">
            <text:p>431.3917236328</text:p>
          </table:table-cell>
          <table:table-cell office:value-type="float" office:value="-0.005522159">
            <text:p>-0.005522159</text:p>
          </table:table-cell>
          <table:table-cell table:number-columns-repeated="4"/>
        </table:table-row>
        <table:table-row table:style-name="ro1">
          <table:table-cell office:value-type="float" office:value="431.505249023438">
            <text:p>431.5052490234</text:p>
          </table:table-cell>
          <table:table-cell office:value-type="float" office:value="-0.002634642">
            <text:p>-0.002634642</text:p>
          </table:table-cell>
          <table:table-cell table:number-columns-repeated="4"/>
        </table:table-row>
        <table:table-row table:style-name="ro1">
          <table:table-cell office:value-type="float" office:value="431.618804931641">
            <text:p>431.6188049316</text:p>
          </table:table-cell>
          <table:table-cell office:value-type="float" office:value="-0.002967956">
            <text:p>-0.002967956</text:p>
          </table:table-cell>
          <table:table-cell table:number-columns-repeated="4"/>
        </table:table-row>
        <table:table-row table:style-name="ro1">
          <table:table-cell office:value-type="float" office:value="431.732330322266">
            <text:p>431.7323303223</text:p>
          </table:table-cell>
          <table:table-cell office:value-type="float" office:value="0.007795229">
            <text:p>0.007795229</text:p>
          </table:table-cell>
          <table:table-cell table:number-columns-repeated="4"/>
        </table:table-row>
        <table:table-row table:style-name="ro1">
          <table:table-cell office:value-type="float" office:value="431.845886230469">
            <text:p>431.8458862305</text:p>
          </table:table-cell>
          <table:table-cell office:value-type="float" office:value="0.00961719">
            <text:p>0.00961719</text:p>
          </table:table-cell>
          <table:table-cell table:number-columns-repeated="4"/>
        </table:table-row>
        <table:table-row table:style-name="ro1">
          <table:table-cell office:value-type="float" office:value="431.959442138672">
            <text:p>431.9594421387</text:p>
          </table:table-cell>
          <table:table-cell office:value-type="float" office:value="0.005778282">
            <text:p>0.005778282</text:p>
          </table:table-cell>
          <table:table-cell table:number-columns-repeated="4"/>
        </table:table-row>
        <table:table-row table:style-name="ro1">
          <table:table-cell office:value-type="float" office:value="432.072998046875">
            <text:p>432.0729980469</text:p>
          </table:table-cell>
          <table:table-cell office:value-type="float" office:value="0.01859538">
            <text:p>0.01859538</text:p>
          </table:table-cell>
          <table:table-cell table:number-columns-repeated="4"/>
        </table:table-row>
        <table:table-row table:style-name="ro1">
          <table:table-cell office:value-type="float" office:value="432.186553955078">
            <text:p>432.1865539551</text:p>
          </table:table-cell>
          <table:table-cell office:value-type="float" office:value="-0.005234691">
            <text:p>-0.005234691</text:p>
          </table:table-cell>
          <table:table-cell table:number-columns-repeated="4"/>
        </table:table-row>
        <table:table-row table:style-name="ro1">
          <table:table-cell office:value-type="float" office:value="432.300140380859">
            <text:p>432.3001403809</text:p>
          </table:table-cell>
          <table:table-cell office:value-type="float" office:value="-0.002374038">
            <text:p>-0.002374038</text:p>
          </table:table-cell>
          <table:table-cell table:number-columns-repeated="4"/>
        </table:table-row>
        <table:table-row table:style-name="ro1">
          <table:table-cell office:value-type="float" office:value="432.413696289063">
            <text:p>432.4136962891</text:p>
          </table:table-cell>
          <table:table-cell office:value-type="float" office:value="0.000310585">
            <text:p>0.000310585</text:p>
          </table:table-cell>
          <table:table-cell table:number-columns-repeated="4"/>
        </table:table-row>
        <table:table-row table:style-name="ro1">
          <table:table-cell office:value-type="float" office:value="432.527282714844">
            <text:p>432.5272827148</text:p>
          </table:table-cell>
          <table:table-cell office:value-type="float" office:value="0.004153586">
            <text:p>0.004153586</text:p>
          </table:table-cell>
          <table:table-cell table:number-columns-repeated="4"/>
        </table:table-row>
        <table:table-row table:style-name="ro1">
          <table:table-cell office:value-type="float" office:value="432.640869140625">
            <text:p>432.6408691406</text:p>
          </table:table-cell>
          <table:table-cell office:value-type="float" office:value="-0.002639231">
            <text:p>-0.002639231</text:p>
          </table:table-cell>
          <table:table-cell table:number-columns-repeated="4"/>
        </table:table-row>
        <table:table-row table:style-name="ro1">
          <table:table-cell office:value-type="float" office:value="432.754455566406">
            <text:p>432.7544555664</text:p>
          </table:table-cell>
          <table:table-cell office:value-type="float" office:value="0.01092467">
            <text:p>0.01092467</text:p>
          </table:table-cell>
          <table:table-cell table:number-columns-repeated="4"/>
        </table:table-row>
        <table:table-row table:style-name="ro1">
          <table:table-cell office:value-type="float" office:value="432.868041992188">
            <text:p>432.8680419922</text:p>
          </table:table-cell>
          <table:table-cell office:value-type="float" office:value="0.01562642">
            <text:p>0.01562642</text:p>
          </table:table-cell>
          <table:table-cell table:number-columns-repeated="4"/>
        </table:table-row>
        <table:table-row table:style-name="ro1">
          <table:table-cell office:value-type="float" office:value="432.981658935547">
            <text:p>432.9816589355</text:p>
          </table:table-cell>
          <table:table-cell office:value-type="float" office:value="0.008445967">
            <text:p>0.008445967</text:p>
          </table:table-cell>
          <table:table-cell table:number-columns-repeated="4"/>
        </table:table-row>
        <table:table-row table:style-name="ro1">
          <table:table-cell office:value-type="float" office:value="433.095245361328">
            <text:p>433.0952453613</text:p>
          </table:table-cell>
          <table:table-cell office:value-type="float" office:value="0.00278876">
            <text:p>0.00278876</text:p>
          </table:table-cell>
          <table:table-cell table:number-columns-repeated="4"/>
        </table:table-row>
        <table:table-row table:style-name="ro1">
          <table:table-cell office:value-type="float" office:value="433.208862304688">
            <text:p>433.2088623047</text:p>
          </table:table-cell>
          <table:table-cell office:value-type="float" office:value="0.002546223">
            <text:p>0.002546223</text:p>
          </table:table-cell>
          <table:table-cell table:number-columns-repeated="4"/>
        </table:table-row>
        <table:table-row table:style-name="ro1">
          <table:table-cell office:value-type="float" office:value="433.322479248047">
            <text:p>433.322479248</text:p>
          </table:table-cell>
          <table:table-cell office:value-type="float" office:value="-0.00163297">
            <text:p>-0.00163297</text:p>
          </table:table-cell>
          <table:table-cell table:number-columns-repeated="4"/>
        </table:table-row>
        <table:table-row table:style-name="ro1">
          <table:table-cell office:value-type="float" office:value="433.436096191406">
            <text:p>433.4360961914</text:p>
          </table:table-cell>
          <table:table-cell office:value-type="float" office:value="0.00408432">
            <text:p>0.00408432</text:p>
          </table:table-cell>
          <table:table-cell table:number-columns-repeated="4"/>
        </table:table-row>
        <table:table-row table:style-name="ro1">
          <table:table-cell office:value-type="float" office:value="433.549713134766">
            <text:p>433.5497131348</text:p>
          </table:table-cell>
          <table:table-cell office:value-type="float" office:value="-0.002582033">
            <text:p>-0.002582033</text:p>
          </table:table-cell>
          <table:table-cell table:number-columns-repeated="4"/>
        </table:table-row>
        <table:table-row table:style-name="ro1">
          <table:table-cell office:value-type="float" office:value="433.663330078125">
            <text:p>433.6633300781</text:p>
          </table:table-cell>
          <table:table-cell office:value-type="float" office:value="-0.004730284">
            <text:p>-0.004730284</text:p>
          </table:table-cell>
          <table:table-cell table:number-columns-repeated="4"/>
        </table:table-row>
        <table:table-row table:style-name="ro1">
          <table:table-cell office:value-type="float" office:value="433.776977539063">
            <text:p>433.7769775391</text:p>
          </table:table-cell>
          <table:table-cell office:value-type="float" office:value="-0.005261178">
            <text:p>-0.005261178</text:p>
          </table:table-cell>
          <table:table-cell table:number-columns-repeated="4"/>
        </table:table-row>
        <table:table-row table:style-name="ro1">
          <table:table-cell office:value-type="float" office:value="433.890625">
            <text:p>433.890625</text:p>
          </table:table-cell>
          <table:table-cell office:value-type="float" office:value="0.01395557">
            <text:p>0.01395557</text:p>
          </table:table-cell>
          <table:table-cell table:number-columns-repeated="4"/>
        </table:table-row>
        <table:table-row table:style-name="ro1">
          <table:table-cell office:value-type="float" office:value="434.004272460938">
            <text:p>434.0042724609</text:p>
          </table:table-cell>
          <table:table-cell office:value-type="float" office:value="-0.001228921">
            <text:p>-0.001228921</text:p>
          </table:table-cell>
          <table:table-cell table:number-columns-repeated="4"/>
        </table:table-row>
        <table:table-row table:style-name="ro1">
          <table:table-cell office:value-type="float" office:value="434.117919921875">
            <text:p>434.1179199219</text:p>
          </table:table-cell>
          <table:table-cell office:value-type="float" office:value="0.002266301">
            <text:p>0.002266301</text:p>
          </table:table-cell>
          <table:table-cell table:number-columns-repeated="4"/>
        </table:table-row>
        <table:table-row table:style-name="ro1">
          <table:table-cell office:value-type="float" office:value="434.231567382813">
            <text:p>434.2315673828</text:p>
          </table:table-cell>
          <table:table-cell office:value-type="float" office:value="-0.008652764">
            <text:p>-0.008652764</text:p>
          </table:table-cell>
          <table:table-cell table:number-columns-repeated="4"/>
        </table:table-row>
        <table:table-row table:style-name="ro1">
          <table:table-cell office:value-type="float" office:value="434.34521484375">
            <text:p>434.3452148438</text:p>
          </table:table-cell>
          <table:table-cell office:value-type="float" office:value="-0.005564789">
            <text:p>-0.005564789</text:p>
          </table:table-cell>
          <table:table-cell table:number-columns-repeated="4"/>
        </table:table-row>
        <table:table-row table:style-name="ro1">
          <table:table-cell office:value-type="float" office:value="434.458892822266">
            <text:p>434.4588928223</text:p>
          </table:table-cell>
          <table:table-cell office:value-type="float" office:value="0.02015986">
            <text:p>0.02015986</text:p>
          </table:table-cell>
          <table:table-cell table:number-columns-repeated="4"/>
        </table:table-row>
        <table:table-row table:style-name="ro1">
          <table:table-cell office:value-type="float" office:value="434.572570800781">
            <text:p>434.5725708008</text:p>
          </table:table-cell>
          <table:table-cell office:value-type="float" office:value="-0.003536801">
            <text:p>-0.003536801</text:p>
          </table:table-cell>
          <table:table-cell table:number-columns-repeated="4"/>
        </table:table-row>
        <table:table-row table:style-name="ro1">
          <table:table-cell office:value-type="float" office:value="434.686248779297">
            <text:p>434.6862487793</text:p>
          </table:table-cell>
          <table:table-cell office:value-type="float" office:value="-0.002274469">
            <text:p>-0.002274469</text:p>
          </table:table-cell>
          <table:table-cell table:number-columns-repeated="4"/>
        </table:table-row>
        <table:table-row table:style-name="ro1">
          <table:table-cell office:value-type="float" office:value="434.799926757813">
            <text:p>434.7999267578</text:p>
          </table:table-cell>
          <table:table-cell office:value-type="float" office:value="-0.003165868">
            <text:p>-0.003165868</text:p>
          </table:table-cell>
          <table:table-cell table:number-columns-repeated="4"/>
        </table:table-row>
        <table:table-row table:style-name="ro1">
          <table:table-cell office:value-type="float" office:value="434.913604736328">
            <text:p>434.9136047363</text:p>
          </table:table-cell>
          <table:table-cell office:value-type="float" office:value="0.002706408">
            <text:p>0.002706408</text:p>
          </table:table-cell>
          <table:table-cell table:number-columns-repeated="4"/>
        </table:table-row>
        <table:table-row table:style-name="ro1">
          <table:table-cell office:value-type="float" office:value="435.027282714844">
            <text:p>435.0272827148</text:p>
          </table:table-cell>
          <table:table-cell office:value-type="float" office:value="-0.002174431">
            <text:p>-0.002174431</text:p>
          </table:table-cell>
          <table:table-cell table:number-columns-repeated="4"/>
        </table:table-row>
        <table:table-row table:style-name="ro1">
          <table:table-cell office:value-type="float" office:value="435.140991210938">
            <text:p>435.1409912109</text:p>
          </table:table-cell>
          <table:table-cell office:value-type="float" office:value="-0.002072204">
            <text:p>-0.002072204</text:p>
          </table:table-cell>
          <table:table-cell table:number-columns-repeated="4"/>
        </table:table-row>
        <table:table-row table:style-name="ro1">
          <table:table-cell office:value-type="float" office:value="435.254669189453">
            <text:p>435.2546691895</text:p>
          </table:table-cell>
          <table:table-cell office:value-type="float" office:value="0.005912667">
            <text:p>0.005912667</text:p>
          </table:table-cell>
          <table:table-cell table:number-columns-repeated="4"/>
        </table:table-row>
        <table:table-row table:style-name="ro1">
          <table:table-cell office:value-type="float" office:value="435.368377685547">
            <text:p>435.3683776855</text:p>
          </table:table-cell>
          <table:table-cell office:value-type="float" office:value="-0.008524331">
            <text:p>-0.008524331</text:p>
          </table:table-cell>
          <table:table-cell table:number-columns-repeated="4"/>
        </table:table-row>
        <table:table-row table:style-name="ro1">
          <table:table-cell office:value-type="float" office:value="435.482086181641">
            <text:p>435.4820861816</text:p>
          </table:table-cell>
          <table:table-cell office:value-type="float" office:value="-0.008389914">
            <text:p>-0.008389914</text:p>
          </table:table-cell>
          <table:table-cell table:number-columns-repeated="4"/>
        </table:table-row>
        <table:table-row table:style-name="ro1">
          <table:table-cell office:value-type="float" office:value="435.595825195313">
            <text:p>435.5958251953</text:p>
          </table:table-cell>
          <table:table-cell office:value-type="float" office:value="-0.005117176">
            <text:p>-0.005117176</text:p>
          </table:table-cell>
          <table:table-cell table:number-columns-repeated="4"/>
        </table:table-row>
        <table:table-row table:style-name="ro1">
          <table:table-cell office:value-type="float" office:value="435.709533691406">
            <text:p>435.7095336914</text:p>
          </table:table-cell>
          <table:table-cell office:value-type="float" office:value="0.01073958">
            <text:p>0.01073958</text:p>
          </table:table-cell>
          <table:table-cell table:number-columns-repeated="4"/>
        </table:table-row>
        <table:table-row table:style-name="ro1">
          <table:table-cell office:value-type="float" office:value="435.823272705078">
            <text:p>435.8232727051</text:p>
          </table:table-cell>
          <table:table-cell office:value-type="float" office:value="0.002455171">
            <text:p>0.002455171</text:p>
          </table:table-cell>
          <table:table-cell table:number-columns-repeated="4"/>
        </table:table-row>
        <table:table-row table:style-name="ro1">
          <table:table-cell office:value-type="float" office:value="435.936981201172">
            <text:p>435.9369812012</text:p>
          </table:table-cell>
          <table:table-cell office:value-type="float" office:value="-0.009550724">
            <text:p>-0.009550724</text:p>
          </table:table-cell>
          <table:table-cell table:number-columns-repeated="4"/>
        </table:table-row>
        <table:table-row table:style-name="ro1">
          <table:table-cell office:value-type="float" office:value="436.050720214844">
            <text:p>436.0507202148</text:p>
          </table:table-cell>
          <table:table-cell office:value-type="float" office:value="0.001960948">
            <text:p>0.001960948</text:p>
          </table:table-cell>
          <table:table-cell table:number-columns-repeated="4"/>
        </table:table-row>
        <table:table-row table:style-name="ro1">
          <table:table-cell office:value-type="float" office:value="436.164459228516">
            <text:p>436.1644592285</text:p>
          </table:table-cell>
          <table:table-cell office:value-type="float" office:value="-0.001824962">
            <text:p>-0.001824962</text:p>
          </table:table-cell>
          <table:table-cell table:number-columns-repeated="4"/>
        </table:table-row>
        <table:table-row table:style-name="ro1">
          <table:table-cell office:value-type="float" office:value="436.278198242188">
            <text:p>436.2781982422</text:p>
          </table:table-cell>
          <table:table-cell office:value-type="float" office:value="0.0243249">
            <text:p>0.0243249</text:p>
          </table:table-cell>
          <table:table-cell table:number-columns-repeated="4"/>
        </table:table-row>
        <table:table-row table:style-name="ro1">
          <table:table-cell office:value-type="float" office:value="436.391967773438">
            <text:p>436.3919677734</text:p>
          </table:table-cell>
          <table:table-cell office:value-type="float" office:value="-0.001117388">
            <text:p>-0.001117388</text:p>
          </table:table-cell>
          <table:table-cell table:number-columns-repeated="4"/>
        </table:table-row>
        <table:table-row table:style-name="ro1">
          <table:table-cell office:value-type="float" office:value="436.505706787109">
            <text:p>436.5057067871</text:p>
          </table:table-cell>
          <table:table-cell office:value-type="float" office:value="-0.001934109">
            <text:p>-0.001934109</text:p>
          </table:table-cell>
          <table:table-cell table:number-columns-repeated="4"/>
        </table:table-row>
        <table:table-row table:style-name="ro1">
          <table:table-cell office:value-type="float" office:value="436.619476318359">
            <text:p>436.6194763184</text:p>
          </table:table-cell>
          <table:table-cell office:value-type="float" office:value="0.00505925">
            <text:p>0.00505925</text:p>
          </table:table-cell>
          <table:table-cell table:number-columns-repeated="4"/>
        </table:table-row>
        <table:table-row table:style-name="ro1">
          <table:table-cell office:value-type="float" office:value="436.733245849609">
            <text:p>436.7332458496</text:p>
          </table:table-cell>
          <table:table-cell office:value-type="float" office:value="0.002809684">
            <text:p>0.002809684</text:p>
          </table:table-cell>
          <table:table-cell table:number-columns-repeated="4"/>
        </table:table-row>
        <table:table-row table:style-name="ro1">
          <table:table-cell office:value-type="float" office:value="436.847015380859">
            <text:p>436.8470153809</text:p>
          </table:table-cell>
          <table:table-cell office:value-type="float" office:value="-0.008415791">
            <text:p>-0.008415791</text:p>
          </table:table-cell>
          <table:table-cell table:number-columns-repeated="4"/>
        </table:table-row>
        <table:table-row table:style-name="ro1">
          <table:table-cell office:value-type="float" office:value="436.960784912109">
            <text:p>436.9607849121</text:p>
          </table:table-cell>
          <table:table-cell office:value-type="float" office:value="0.004682455">
            <text:p>0.004682455</text:p>
          </table:table-cell>
          <table:table-cell table:number-columns-repeated="4"/>
        </table:table-row>
        <table:table-row table:style-name="ro1">
          <table:table-cell office:value-type="float" office:value="437.074554443359">
            <text:p>437.0745544434</text:p>
          </table:table-cell>
          <table:table-cell office:value-type="float" office:value="0.003043304">
            <text:p>0.003043304</text:p>
          </table:table-cell>
          <table:table-cell table:number-columns-repeated="4"/>
        </table:table-row>
        <table:table-row table:style-name="ro1">
          <table:table-cell office:value-type="float" office:value="437.188354492188">
            <text:p>437.1883544922</text:p>
          </table:table-cell>
          <table:table-cell office:value-type="float" office:value="-0.0006391149">
            <text:p>-0.0006391149</text:p>
          </table:table-cell>
          <table:table-cell table:number-columns-repeated="4"/>
        </table:table-row>
        <table:table-row table:style-name="ro1">
          <table:table-cell office:value-type="float" office:value="437.302154541016">
            <text:p>437.302154541</text:p>
          </table:table-cell>
          <table:table-cell office:value-type="float" office:value="0.002153268">
            <text:p>0.002153268</text:p>
          </table:table-cell>
          <table:table-cell table:number-columns-repeated="4"/>
        </table:table-row>
        <table:table-row table:style-name="ro1">
          <table:table-cell office:value-type="float" office:value="437.415924072266">
            <text:p>437.4159240723</text:p>
          </table:table-cell>
          <table:table-cell office:value-type="float" office:value="0.002669105">
            <text:p>0.002669105</text:p>
          </table:table-cell>
          <table:table-cell table:number-columns-repeated="4"/>
        </table:table-row>
        <table:table-row table:style-name="ro1">
          <table:table-cell office:value-type="float" office:value="437.529724121094">
            <text:p>437.5297241211</text:p>
          </table:table-cell>
          <table:table-cell office:value-type="float" office:value="-0.0007104871">
            <text:p>-0.0007104871</text:p>
          </table:table-cell>
          <table:table-cell table:number-columns-repeated="4"/>
        </table:table-row>
        <table:table-row table:style-name="ro1">
          <table:table-cell office:value-type="float" office:value="437.6435546875">
            <text:p>437.6435546875</text:p>
          </table:table-cell>
          <table:table-cell office:value-type="float" office:value="-0.00109325">
            <text:p>-0.00109325</text:p>
          </table:table-cell>
          <table:table-cell table:number-columns-repeated="4"/>
        </table:table-row>
        <table:table-row table:style-name="ro1">
          <table:table-cell office:value-type="float" office:value="437.757354736328">
            <text:p>437.7573547363</text:p>
          </table:table-cell>
          <table:table-cell office:value-type="float" office:value="0.003774578">
            <text:p>0.003774578</text:p>
          </table:table-cell>
          <table:table-cell table:number-columns-repeated="4"/>
        </table:table-row>
        <table:table-row table:style-name="ro1">
          <table:table-cell office:value-type="float" office:value="437.871154785156">
            <text:p>437.8711547852</text:p>
          </table:table-cell>
          <table:table-cell office:value-type="float" office:value="-0.003891951">
            <text:p>-0.003891951</text:p>
          </table:table-cell>
          <table:table-cell table:number-columns-repeated="4"/>
        </table:table-row>
        <table:table-row table:style-name="ro1">
          <table:table-cell office:value-type="float" office:value="437.984985351563">
            <text:p>437.9849853516</text:p>
          </table:table-cell>
          <table:table-cell office:value-type="float" office:value="0.01359054">
            <text:p>0.01359054</text:p>
          </table:table-cell>
          <table:table-cell table:number-columns-repeated="4"/>
        </table:table-row>
        <table:table-row table:style-name="ro1">
          <table:table-cell office:value-type="float" office:value="438.098815917969">
            <text:p>438.098815918</text:p>
          </table:table-cell>
          <table:table-cell office:value-type="float" office:value="0.003873171">
            <text:p>0.003873171</text:p>
          </table:table-cell>
          <table:table-cell table:number-columns-repeated="4"/>
        </table:table-row>
        <table:table-row table:style-name="ro1">
          <table:table-cell office:value-type="float" office:value="438.212646484375">
            <text:p>438.2126464844</text:p>
          </table:table-cell>
          <table:table-cell office:value-type="float" office:value="-0.006743235">
            <text:p>-0.006743235</text:p>
          </table:table-cell>
          <table:table-cell table:number-columns-repeated="4"/>
        </table:table-row>
        <table:table-row table:style-name="ro1">
          <table:table-cell office:value-type="float" office:value="438.326477050781">
            <text:p>438.3264770508</text:p>
          </table:table-cell>
          <table:table-cell office:value-type="float" office:value="-0.0101918">
            <text:p>-0.0101918</text:p>
          </table:table-cell>
          <table:table-cell table:number-columns-repeated="4"/>
        </table:table-row>
        <table:table-row table:style-name="ro1">
          <table:table-cell office:value-type="float" office:value="438.440307617188">
            <text:p>438.4403076172</text:p>
          </table:table-cell>
          <table:table-cell office:value-type="float" office:value="-0.0005045105">
            <text:p>-0.0005045105</text:p>
          </table:table-cell>
          <table:table-cell table:number-columns-repeated="4"/>
        </table:table-row>
        <table:table-row table:style-name="ro1">
          <table:table-cell office:value-type="float" office:value="438.554168701172">
            <text:p>438.5541687012</text:p>
          </table:table-cell>
          <table:table-cell office:value-type="float" office:value="0.006374553">
            <text:p>0.006374553</text:p>
          </table:table-cell>
          <table:table-cell table:number-columns-repeated="4"/>
        </table:table-row>
        <table:table-row table:style-name="ro1">
          <table:table-cell office:value-type="float" office:value="438.667999267578">
            <text:p>438.6679992676</text:p>
          </table:table-cell>
          <table:table-cell office:value-type="float" office:value="-0.00847951">
            <text:p>-0.00847951</text:p>
          </table:table-cell>
          <table:table-cell table:number-columns-repeated="4"/>
        </table:table-row>
        <table:table-row table:style-name="ro1">
          <table:table-cell office:value-type="float" office:value="438.781860351563">
            <text:p>438.7818603516</text:p>
          </table:table-cell>
          <table:table-cell office:value-type="float" office:value="-0.01154691">
            <text:p>-0.01154691</text:p>
          </table:table-cell>
          <table:table-cell table:number-columns-repeated="4"/>
        </table:table-row>
        <table:table-row table:style-name="ro1">
          <table:table-cell office:value-type="float" office:value="438.895721435547">
            <text:p>438.8957214355</text:p>
          </table:table-cell>
          <table:table-cell office:value-type="float" office:value="-0.002633133">
            <text:p>-0.002633133</text:p>
          </table:table-cell>
          <table:table-cell table:number-columns-repeated="4"/>
        </table:table-row>
        <table:table-row table:style-name="ro1">
          <table:table-cell office:value-type="float" office:value="439.009582519531">
            <text:p>439.0095825195</text:p>
          </table:table-cell>
          <table:table-cell office:value-type="float" office:value="0.002789063">
            <text:p>0.002789063</text:p>
          </table:table-cell>
          <table:table-cell table:number-columns-repeated="4"/>
        </table:table-row>
        <table:table-row table:style-name="ro1">
          <table:table-cell office:value-type="float" office:value="439.123474121094">
            <text:p>439.1234741211</text:p>
          </table:table-cell>
          <table:table-cell office:value-type="float" office:value="-0.008835759">
            <text:p>-0.008835759</text:p>
          </table:table-cell>
          <table:table-cell table:number-columns-repeated="4"/>
        </table:table-row>
        <table:table-row table:style-name="ro1">
          <table:table-cell office:value-type="float" office:value="439.237335205078">
            <text:p>439.2373352051</text:p>
          </table:table-cell>
          <table:table-cell office:value-type="float" office:value="-0.007686448">
            <text:p>-0.007686448</text:p>
          </table:table-cell>
          <table:table-cell table:number-columns-repeated="4"/>
        </table:table-row>
        <table:table-row table:style-name="ro1">
          <table:table-cell office:value-type="float" office:value="439.351226806641">
            <text:p>439.3512268066</text:p>
          </table:table-cell>
          <table:table-cell office:value-type="float" office:value="0.002778466">
            <text:p>0.002778466</text:p>
          </table:table-cell>
          <table:table-cell table:number-columns-repeated="4"/>
        </table:table-row>
        <table:table-row table:style-name="ro1">
          <table:table-cell office:value-type="float" office:value="439.465087890625">
            <text:p>439.4650878906</text:p>
          </table:table-cell>
          <table:table-cell office:value-type="float" office:value="0.01994432">
            <text:p>0.01994432</text:p>
          </table:table-cell>
          <table:table-cell table:number-columns-repeated="4"/>
        </table:table-row>
        <table:table-row table:style-name="ro1">
          <table:table-cell office:value-type="float" office:value="439.578979492188">
            <text:p>439.5789794922</text:p>
          </table:table-cell>
          <table:table-cell office:value-type="float" office:value="-0.005583206">
            <text:p>-0.005583206</text:p>
          </table:table-cell>
          <table:table-cell table:number-columns-repeated="4"/>
        </table:table-row>
        <table:table-row table:style-name="ro1">
          <table:table-cell office:value-type="float" office:value="439.69287109375">
            <text:p>439.6928710938</text:p>
          </table:table-cell>
          <table:table-cell office:value-type="float" office:value="-0.008898235">
            <text:p>-0.008898235</text:p>
          </table:table-cell>
          <table:table-cell table:number-columns-repeated="4"/>
        </table:table-row>
        <table:table-row table:style-name="ro1">
          <table:table-cell office:value-type="float" office:value="439.806793212891">
            <text:p>439.8067932129</text:p>
          </table:table-cell>
          <table:table-cell office:value-type="float" office:value="-0.006398039">
            <text:p>-0.006398039</text:p>
          </table:table-cell>
          <table:table-cell table:number-columns-repeated="4"/>
        </table:table-row>
        <table:table-row table:style-name="ro1">
          <table:table-cell office:value-type="float" office:value="439.920684814453">
            <text:p>439.9206848145</text:p>
          </table:table-cell>
          <table:table-cell office:value-type="float" office:value="0.05443946">
            <text:p>0.05443946</text:p>
          </table:table-cell>
          <table:table-cell table:number-columns-repeated="4"/>
        </table:table-row>
        <table:table-row table:style-name="ro1">
          <table:table-cell office:value-type="float" office:value="440.034606933594">
            <text:p>440.0346069336</text:p>
          </table:table-cell>
          <table:table-cell office:value-type="float" office:value="-0.001484454">
            <text:p>-0.001484454</text:p>
          </table:table-cell>
          <table:table-cell table:number-columns-repeated="4"/>
        </table:table-row>
        <table:table-row table:style-name="ro1">
          <table:table-cell office:value-type="float" office:value="440.148498535156">
            <text:p>440.1484985352</text:p>
          </table:table-cell>
          <table:table-cell office:value-type="float" office:value="-0.003883255">
            <text:p>-0.003883255</text:p>
          </table:table-cell>
          <table:table-cell table:number-columns-repeated="4"/>
        </table:table-row>
        <table:table-row table:style-name="ro1">
          <table:table-cell office:value-type="float" office:value="440.262420654297">
            <text:p>440.2624206543</text:p>
          </table:table-cell>
          <table:table-cell office:value-type="float" office:value="0.006301928">
            <text:p>0.006301928</text:p>
          </table:table-cell>
          <table:table-cell table:number-columns-repeated="4"/>
        </table:table-row>
        <table:table-row table:style-name="ro1">
          <table:table-cell office:value-type="float" office:value="440.376342773438">
            <text:p>440.3763427734</text:p>
          </table:table-cell>
          <table:table-cell office:value-type="float" office:value="0.02934662">
            <text:p>0.02934662</text:p>
          </table:table-cell>
          <table:table-cell table:number-columns-repeated="4"/>
        </table:table-row>
        <table:table-row table:style-name="ro1">
          <table:table-cell office:value-type="float" office:value="440.490295410156">
            <text:p>440.4902954102</text:p>
          </table:table-cell>
          <table:table-cell office:value-type="float" office:value="-0.001052855">
            <text:p>-0.001052855</text:p>
          </table:table-cell>
          <table:table-cell table:number-columns-repeated="4"/>
        </table:table-row>
        <table:table-row table:style-name="ro1">
          <table:table-cell office:value-type="float" office:value="440.604217529297">
            <text:p>440.6042175293</text:p>
          </table:table-cell>
          <table:table-cell office:value-type="float" office:value="-0.0162295">
            <text:p>-0.0162295</text:p>
          </table:table-cell>
          <table:table-cell table:number-columns-repeated="4"/>
        </table:table-row>
        <table:table-row table:style-name="ro1">
          <table:table-cell office:value-type="float" office:value="440.718170166016">
            <text:p>440.718170166</text:p>
          </table:table-cell>
          <table:table-cell office:value-type="float" office:value="0.01931707">
            <text:p>0.01931707</text:p>
          </table:table-cell>
          <table:table-cell table:number-columns-repeated="4"/>
        </table:table-row>
        <table:table-row table:style-name="ro1">
          <table:table-cell office:value-type="float" office:value="440.832092285156">
            <text:p>440.8320922852</text:p>
          </table:table-cell>
          <table:table-cell office:value-type="float" office:value="0.01022736">
            <text:p>0.01022736</text:p>
          </table:table-cell>
          <table:table-cell table:number-columns-repeated="4"/>
        </table:table-row>
        <table:table-row table:style-name="ro1">
          <table:table-cell office:value-type="float" office:value="440.946044921875">
            <text:p>440.9460449219</text:p>
          </table:table-cell>
          <table:table-cell office:value-type="float" office:value="-0.002693189">
            <text:p>-0.002693189</text:p>
          </table:table-cell>
          <table:table-cell table:number-columns-repeated="4"/>
        </table:table-row>
        <table:table-row table:style-name="ro1">
          <table:table-cell office:value-type="float" office:value="441.059997558594">
            <text:p>441.0599975586</text:p>
          </table:table-cell>
          <table:table-cell office:value-type="float" office:value="-0.00249237">
            <text:p>-0.00249237</text:p>
          </table:table-cell>
          <table:table-cell table:number-columns-repeated="4"/>
        </table:table-row>
        <table:table-row table:style-name="ro1">
          <table:table-cell office:value-type="float" office:value="441.173950195313">
            <text:p>441.1739501953</text:p>
          </table:table-cell>
          <table:table-cell office:value-type="float" office:value="0.00570466">
            <text:p>0.00570466</text:p>
          </table:table-cell>
          <table:table-cell table:number-columns-repeated="4"/>
        </table:table-row>
        <table:table-row table:style-name="ro1">
          <table:table-cell office:value-type="float" office:value="441.287933349609">
            <text:p>441.2879333496</text:p>
          </table:table-cell>
          <table:table-cell office:value-type="string">
            <text:p>-4.069431E-05</text:p>
          </table:table-cell>
          <table:table-cell table:number-columns-repeated="4"/>
        </table:table-row>
        <table:table-row table:style-name="ro1">
          <table:table-cell office:value-type="float" office:value="441.401885986328">
            <text:p>441.4018859863</text:p>
          </table:table-cell>
          <table:table-cell office:value-type="float" office:value="0.0003703348">
            <text:p>0.0003703348</text:p>
          </table:table-cell>
          <table:table-cell table:number-columns-repeated="4"/>
        </table:table-row>
        <table:table-row table:style-name="ro1">
          <table:table-cell office:value-type="float" office:value="441.515869140625">
            <text:p>441.5158691406</text:p>
          </table:table-cell>
          <table:table-cell office:value-type="float" office:value="0.01335926">
            <text:p>0.01335926</text:p>
          </table:table-cell>
          <table:table-cell table:number-columns-repeated="4"/>
        </table:table-row>
        <table:table-row table:style-name="ro1">
          <table:table-cell office:value-type="float" office:value="441.629852294922">
            <text:p>441.6298522949</text:p>
          </table:table-cell>
          <table:table-cell office:value-type="float" office:value="0.001350608">
            <text:p>0.001350608</text:p>
          </table:table-cell>
          <table:table-cell table:number-columns-repeated="4"/>
        </table:table-row>
        <table:table-row table:style-name="ro1">
          <table:table-cell office:value-type="float" office:value="441.743835449219">
            <text:p>441.7438354492</text:p>
          </table:table-cell>
          <table:table-cell office:value-type="float" office:value="0.005895067">
            <text:p>0.005895067</text:p>
          </table:table-cell>
          <table:table-cell table:number-columns-repeated="4"/>
        </table:table-row>
        <table:table-row table:style-name="ro1">
          <table:table-cell office:value-type="float" office:value="441.857818603516">
            <text:p>441.8578186035</text:p>
          </table:table-cell>
          <table:table-cell office:value-type="float" office:value="-0.01105634">
            <text:p>-0.01105634</text:p>
          </table:table-cell>
          <table:table-cell table:number-columns-repeated="4"/>
        </table:table-row>
        <table:table-row table:style-name="ro1">
          <table:table-cell office:value-type="float" office:value="441.971801757813">
            <text:p>441.9718017578</text:p>
          </table:table-cell>
          <table:table-cell office:value-type="float" office:value="0.0003958625">
            <text:p>0.0003958625</text:p>
          </table:table-cell>
          <table:table-cell table:number-columns-repeated="4"/>
        </table:table-row>
        <table:table-row table:style-name="ro1">
          <table:table-cell office:value-type="float" office:value="442.085815429688">
            <text:p>442.0858154297</text:p>
          </table:table-cell>
          <table:table-cell office:value-type="float" office:value="0.00714434">
            <text:p>0.00714434</text:p>
          </table:table-cell>
          <table:table-cell table:number-columns-repeated="4"/>
        </table:table-row>
        <table:table-row table:style-name="ro1">
          <table:table-cell office:value-type="float" office:value="442.199829101563">
            <text:p>442.1998291016</text:p>
          </table:table-cell>
          <table:table-cell office:value-type="float" office:value="-0.005654004">
            <text:p>-0.005654004</text:p>
          </table:table-cell>
          <table:table-cell table:number-columns-repeated="4"/>
        </table:table-row>
        <table:table-row table:style-name="ro1">
          <table:table-cell office:value-type="float" office:value="442.313812255859">
            <text:p>442.3138122559</text:p>
          </table:table-cell>
          <table:table-cell office:value-type="float" office:value="-0.001261682">
            <text:p>-0.001261682</text:p>
          </table:table-cell>
          <table:table-cell table:number-columns-repeated="4"/>
        </table:table-row>
        <table:table-row table:style-name="ro1">
          <table:table-cell office:value-type="float" office:value="442.427825927734">
            <text:p>442.4278259277</text:p>
          </table:table-cell>
          <table:table-cell office:value-type="float" office:value="0.01783371">
            <text:p>0.01783371</text:p>
          </table:table-cell>
          <table:table-cell table:number-columns-repeated="4"/>
        </table:table-row>
        <table:table-row table:style-name="ro1">
          <table:table-cell office:value-type="float" office:value="442.541839599609">
            <text:p>442.5418395996</text:p>
          </table:table-cell>
          <table:table-cell office:value-type="float" office:value="0.001559035">
            <text:p>0.001559035</text:p>
          </table:table-cell>
          <table:table-cell table:number-columns-repeated="4"/>
        </table:table-row>
        <table:table-row table:style-name="ro1">
          <table:table-cell office:value-type="float" office:value="442.655883789063">
            <text:p>442.6558837891</text:p>
          </table:table-cell>
          <table:table-cell office:value-type="float" office:value="-0.001821305">
            <text:p>-0.001821305</text:p>
          </table:table-cell>
          <table:table-cell table:number-columns-repeated="4"/>
        </table:table-row>
        <table:table-row table:style-name="ro1">
          <table:table-cell office:value-type="float" office:value="442.769897460938">
            <text:p>442.7698974609</text:p>
          </table:table-cell>
          <table:table-cell office:value-type="string">
            <text:p>-7.182822E-05</text:p>
          </table:table-cell>
          <table:table-cell table:number-columns-repeated="4"/>
        </table:table-row>
        <table:table-row table:style-name="ro1">
          <table:table-cell office:value-type="float" office:value="442.883941650391">
            <text:p>442.8839416504</text:p>
          </table:table-cell>
          <table:table-cell office:value-type="float" office:value="-0.003184563">
            <text:p>-0.003184563</text:p>
          </table:table-cell>
          <table:table-cell table:number-columns-repeated="4"/>
        </table:table-row>
        <table:table-row table:style-name="ro1">
          <table:table-cell office:value-type="float" office:value="442.997985839844">
            <text:p>442.9979858398</text:p>
          </table:table-cell>
          <table:table-cell office:value-type="float" office:value="0.007364143">
            <text:p>0.007364143</text:p>
          </table:table-cell>
          <table:table-cell table:number-columns-repeated="4"/>
        </table:table-row>
        <table:table-row table:style-name="ro1">
          <table:table-cell office:value-type="float" office:value="443.112030029297">
            <text:p>443.1120300293</text:p>
          </table:table-cell>
          <table:table-cell office:value-type="float" office:value="0.003399163">
            <text:p>0.003399163</text:p>
          </table:table-cell>
          <table:table-cell table:number-columns-repeated="4"/>
        </table:table-row>
        <table:table-row table:style-name="ro1">
          <table:table-cell office:value-type="float" office:value="443.22607421875">
            <text:p>443.2260742188</text:p>
          </table:table-cell>
          <table:table-cell office:value-type="float" office:value="-0.005014939">
            <text:p>-0.005014939</text:p>
          </table:table-cell>
          <table:table-cell table:number-columns-repeated="4"/>
        </table:table-row>
        <table:table-row table:style-name="ro1">
          <table:table-cell office:value-type="float" office:value="443.340118408203">
            <text:p>443.3401184082</text:p>
          </table:table-cell>
          <table:table-cell office:value-type="float" office:value="-0.0005147989">
            <text:p>-0.0005147989</text:p>
          </table:table-cell>
          <table:table-cell table:number-columns-repeated="4"/>
        </table:table-row>
        <table:table-row table:style-name="ro1">
          <table:table-cell office:value-type="float" office:value="443.454162597656">
            <text:p>443.4541625977</text:p>
          </table:table-cell>
          <table:table-cell office:value-type="float" office:value="0.002669932">
            <text:p>0.002669932</text:p>
          </table:table-cell>
          <table:table-cell table:number-columns-repeated="4"/>
        </table:table-row>
        <table:table-row table:style-name="ro1">
          <table:table-cell office:value-type="float" office:value="443.568237304688">
            <text:p>443.5682373047</text:p>
          </table:table-cell>
          <table:table-cell office:value-type="float" office:value="-0.004702702">
            <text:p>-0.004702702</text:p>
          </table:table-cell>
          <table:table-cell table:number-columns-repeated="4"/>
        </table:table-row>
        <table:table-row table:style-name="ro1">
          <table:table-cell office:value-type="float" office:value="443.682312011719">
            <text:p>443.6823120117</text:p>
          </table:table-cell>
          <table:table-cell office:value-type="float" office:value="-0.009788257">
            <text:p>-0.009788257</text:p>
          </table:table-cell>
          <table:table-cell table:number-columns-repeated="4"/>
        </table:table-row>
        <table:table-row table:style-name="ro1">
          <table:table-cell office:value-type="float" office:value="443.79638671875">
            <text:p>443.7963867188</text:p>
          </table:table-cell>
          <table:table-cell office:value-type="float" office:value="0.001687847">
            <text:p>0.001687847</text:p>
          </table:table-cell>
          <table:table-cell table:number-columns-repeated="4"/>
        </table:table-row>
        <table:table-row table:style-name="ro1">
          <table:table-cell office:value-type="float" office:value="443.910461425781">
            <text:p>443.9104614258</text:p>
          </table:table-cell>
          <table:table-cell office:value-type="float" office:value="-0.003803054">
            <text:p>-0.003803054</text:p>
          </table:table-cell>
          <table:table-cell table:number-columns-repeated="4"/>
        </table:table-row>
        <table:table-row table:style-name="ro1">
          <table:table-cell office:value-type="float" office:value="444.024536132813">
            <text:p>444.0245361328</text:p>
          </table:table-cell>
          <table:table-cell office:value-type="float" office:value="0.003624708">
            <text:p>0.003624708</text:p>
          </table:table-cell>
          <table:table-cell table:number-columns-repeated="4"/>
        </table:table-row>
        <table:table-row table:style-name="ro1">
          <table:table-cell office:value-type="float" office:value="444.138610839844">
            <text:p>444.1386108398</text:p>
          </table:table-cell>
          <table:table-cell office:value-type="float" office:value="0.02279014">
            <text:p>0.02279014</text:p>
          </table:table-cell>
          <table:table-cell table:number-columns-repeated="4"/>
        </table:table-row>
        <table:table-row table:style-name="ro1">
          <table:table-cell office:value-type="float" office:value="444.252716064453">
            <text:p>444.2527160645</text:p>
          </table:table-cell>
          <table:table-cell office:value-type="float" office:value="-0.004726256">
            <text:p>-0.004726256</text:p>
          </table:table-cell>
          <table:table-cell table:number-columns-repeated="4"/>
        </table:table-row>
        <table:table-row table:style-name="ro1">
          <table:table-cell office:value-type="float" office:value="444.366821289063">
            <text:p>444.3668212891</text:p>
          </table:table-cell>
          <table:table-cell office:value-type="float" office:value="-0.0006635096">
            <text:p>-0.0006635096</text:p>
          </table:table-cell>
          <table:table-cell table:number-columns-repeated="4"/>
        </table:table-row>
        <table:table-row table:style-name="ro1">
          <table:table-cell office:value-type="float" office:value="444.480895996094">
            <text:p>444.4808959961</text:p>
          </table:table-cell>
          <table:table-cell office:value-type="float" office:value="0.0008896635">
            <text:p>0.0008896635</text:p>
          </table:table-cell>
          <table:table-cell table:number-columns-repeated="4"/>
        </table:table-row>
        <table:table-row table:style-name="ro1">
          <table:table-cell office:value-type="float" office:value="444.595001220703">
            <text:p>444.5950012207</text:p>
          </table:table-cell>
          <table:table-cell office:value-type="float" office:value="-0.005041293">
            <text:p>-0.005041293</text:p>
          </table:table-cell>
          <table:table-cell table:number-columns-repeated="4"/>
        </table:table-row>
        <table:table-row table:style-name="ro1">
          <table:table-cell office:value-type="float" office:value="444.709136962891">
            <text:p>444.7091369629</text:p>
          </table:table-cell>
          <table:table-cell office:value-type="float" office:value="-0.002935334">
            <text:p>-0.002935334</text:p>
          </table:table-cell>
          <table:table-cell table:number-columns-repeated="4"/>
        </table:table-row>
        <table:table-row table:style-name="ro1">
          <table:table-cell office:value-type="float" office:value="444.8232421875">
            <text:p>444.8232421875</text:p>
          </table:table-cell>
          <table:table-cell office:value-type="float" office:value="0.004267086">
            <text:p>0.004267086</text:p>
          </table:table-cell>
          <table:table-cell table:number-columns-repeated="4"/>
        </table:table-row>
        <table:table-row table:style-name="ro1">
          <table:table-cell office:value-type="float" office:value="444.937347412109">
            <text:p>444.9373474121</text:p>
          </table:table-cell>
          <table:table-cell office:value-type="float" office:value="0.006266281">
            <text:p>0.006266281</text:p>
          </table:table-cell>
          <table:table-cell table:number-columns-repeated="4"/>
        </table:table-row>
        <table:table-row table:style-name="ro1">
          <table:table-cell office:value-type="float" office:value="445.051483154297">
            <text:p>445.0514831543</text:p>
          </table:table-cell>
          <table:table-cell office:value-type="float" office:value="-0.003307489">
            <text:p>-0.003307489</text:p>
          </table:table-cell>
          <table:table-cell table:number-columns-repeated="4"/>
        </table:table-row>
        <table:table-row table:style-name="ro1">
          <table:table-cell office:value-type="float" office:value="445.165618896484">
            <text:p>445.1656188965</text:p>
          </table:table-cell>
          <table:table-cell office:value-type="float" office:value="-0.009830818">
            <text:p>-0.009830818</text:p>
          </table:table-cell>
          <table:table-cell table:number-columns-repeated="4"/>
        </table:table-row>
        <table:table-row table:style-name="ro1">
          <table:table-cell office:value-type="float" office:value="445.279754638672">
            <text:p>445.2797546387</text:p>
          </table:table-cell>
          <table:table-cell office:value-type="float" office:value="0.005874892">
            <text:p>0.005874892</text:p>
          </table:table-cell>
          <table:table-cell table:number-columns-repeated="4"/>
        </table:table-row>
        <table:table-row table:style-name="ro1">
          <table:table-cell office:value-type="float" office:value="445.393890380859">
            <text:p>445.3938903809</text:p>
          </table:table-cell>
          <table:table-cell office:value-type="float" office:value="-0.0004494902">
            <text:p>-0.0004494902</text:p>
          </table:table-cell>
          <table:table-cell table:number-columns-repeated="4"/>
        </table:table-row>
        <table:table-row table:style-name="ro1">
          <table:table-cell office:value-type="float" office:value="445.508026123047">
            <text:p>445.508026123</text:p>
          </table:table-cell>
          <table:table-cell office:value-type="float" office:value="-0.005767825">
            <text:p>-0.005767825</text:p>
          </table:table-cell>
          <table:table-cell table:number-columns-repeated="4"/>
        </table:table-row>
        <table:table-row table:style-name="ro1">
          <table:table-cell office:value-type="float" office:value="445.622192382813">
            <text:p>445.6221923828</text:p>
          </table:table-cell>
          <table:table-cell office:value-type="float" office:value="0.0003117993">
            <text:p>0.0003117993</text:p>
          </table:table-cell>
          <table:table-cell table:number-columns-repeated="4"/>
        </table:table-row>
        <table:table-row table:style-name="ro1">
          <table:table-cell office:value-type="float" office:value="445.736328125">
            <text:p>445.736328125</text:p>
          </table:table-cell>
          <table:table-cell office:value-type="float" office:value="0.001124375">
            <text:p>0.001124375</text:p>
          </table:table-cell>
          <table:table-cell table:number-columns-repeated="4"/>
        </table:table-row>
        <table:table-row table:style-name="ro1">
          <table:table-cell office:value-type="float" office:value="445.850494384766">
            <text:p>445.8504943848</text:p>
          </table:table-cell>
          <table:table-cell office:value-type="float" office:value="0.004283194">
            <text:p>0.004283194</text:p>
          </table:table-cell>
          <table:table-cell table:number-columns-repeated="4"/>
        </table:table-row>
        <table:table-row table:style-name="ro1">
          <table:table-cell office:value-type="float" office:value="445.964660644531">
            <text:p>445.9646606445</text:p>
          </table:table-cell>
          <table:table-cell office:value-type="float" office:value="-0.005392509">
            <text:p>-0.005392509</text:p>
          </table:table-cell>
          <table:table-cell table:number-columns-repeated="4"/>
        </table:table-row>
        <table:table-row table:style-name="ro1">
          <table:table-cell office:value-type="float" office:value="446.078826904297">
            <text:p>446.0788269043</text:p>
          </table:table-cell>
          <table:table-cell office:value-type="float" office:value="-0.001780537">
            <text:p>-0.001780537</text:p>
          </table:table-cell>
          <table:table-cell table:number-columns-repeated="4"/>
        </table:table-row>
        <table:table-row table:style-name="ro1">
          <table:table-cell office:value-type="float" office:value="446.192993164063">
            <text:p>446.1929931641</text:p>
          </table:table-cell>
          <table:table-cell office:value-type="float" office:value="0.003605516">
            <text:p>0.003605516</text:p>
          </table:table-cell>
          <table:table-cell table:number-columns-repeated="4"/>
        </table:table-row>
        <table:table-row table:style-name="ro1">
          <table:table-cell office:value-type="float" office:value="446.307189941406">
            <text:p>446.3071899414</text:p>
          </table:table-cell>
          <table:table-cell office:value-type="float" office:value="0.003215412">
            <text:p>0.003215412</text:p>
          </table:table-cell>
          <table:table-cell table:number-columns-repeated="4"/>
        </table:table-row>
        <table:table-row table:style-name="ro1">
          <table:table-cell office:value-type="float" office:value="446.421356201172">
            <text:p>446.4213562012</text:p>
          </table:table-cell>
          <table:table-cell office:value-type="float" office:value="-0.005071553">
            <text:p>-0.005071553</text:p>
          </table:table-cell>
          <table:table-cell table:number-columns-repeated="4"/>
        </table:table-row>
        <table:table-row table:style-name="ro1">
          <table:table-cell office:value-type="float" office:value="446.535552978516">
            <text:p>446.5355529785</text:p>
          </table:table-cell>
          <table:table-cell office:value-type="float" office:value="-0.0002886018">
            <text:p>-0.0002886018</text:p>
          </table:table-cell>
          <table:table-cell table:number-columns-repeated="4"/>
        </table:table-row>
        <table:table-row table:style-name="ro1">
          <table:table-cell office:value-type="float" office:value="446.649749755859">
            <text:p>446.6497497559</text:p>
          </table:table-cell>
          <table:table-cell office:value-type="float" office:value="0.01168242">
            <text:p>0.01168242</text:p>
          </table:table-cell>
          <table:table-cell table:number-columns-repeated="4"/>
        </table:table-row>
        <table:table-row table:style-name="ro1">
          <table:table-cell office:value-type="float" office:value="446.763946533203">
            <text:p>446.7639465332</text:p>
          </table:table-cell>
          <table:table-cell office:value-type="float" office:value="-0.003143676">
            <text:p>-0.003143676</text:p>
          </table:table-cell>
          <table:table-cell table:number-columns-repeated="4"/>
        </table:table-row>
        <table:table-row table:style-name="ro1">
          <table:table-cell office:value-type="float" office:value="446.878143310547">
            <text:p>446.8781433105</text:p>
          </table:table-cell>
          <table:table-cell office:value-type="float" office:value="-0.002278224">
            <text:p>-0.002278224</text:p>
          </table:table-cell>
          <table:table-cell table:number-columns-repeated="4"/>
        </table:table-row>
        <table:table-row table:style-name="ro1">
          <table:table-cell office:value-type="float" office:value="446.992370605469">
            <text:p>446.9923706055</text:p>
          </table:table-cell>
          <table:table-cell office:value-type="float" office:value="-0.003414779">
            <text:p>-0.003414779</text:p>
          </table:table-cell>
          <table:table-cell table:number-columns-repeated="4"/>
        </table:table-row>
        <table:table-row table:style-name="ro1">
          <table:table-cell office:value-type="float" office:value="447.106567382813">
            <text:p>447.1065673828</text:p>
          </table:table-cell>
          <table:table-cell office:value-type="float" office:value="0.01376073">
            <text:p>0.01376073</text:p>
          </table:table-cell>
          <table:table-cell table:number-columns-repeated="4"/>
        </table:table-row>
        <table:table-row table:style-name="ro1">
          <table:table-cell office:value-type="float" office:value="447.220794677734">
            <text:p>447.2207946777</text:p>
          </table:table-cell>
          <table:table-cell office:value-type="float" office:value="0.001628909">
            <text:p>0.001628909</text:p>
          </table:table-cell>
          <table:table-cell table:number-columns-repeated="4"/>
        </table:table-row>
        <table:table-row table:style-name="ro1">
          <table:table-cell office:value-type="float" office:value="447.335021972656">
            <text:p>447.3350219727</text:p>
          </table:table-cell>
          <table:table-cell office:value-type="float" office:value="0.003658637">
            <text:p>0.003658637</text:p>
          </table:table-cell>
          <table:table-cell table:number-columns-repeated="4"/>
        </table:table-row>
        <table:table-row table:style-name="ro1">
          <table:table-cell office:value-type="float" office:value="447.449249267578">
            <text:p>447.4492492676</text:p>
          </table:table-cell>
          <table:table-cell office:value-type="float" office:value="0.008316315">
            <text:p>0.008316315</text:p>
          </table:table-cell>
          <table:table-cell table:number-columns-repeated="4"/>
        </table:table-row>
        <table:table-row table:style-name="ro1">
          <table:table-cell office:value-type="float" office:value="447.5634765625">
            <text:p>447.5634765625</text:p>
          </table:table-cell>
          <table:table-cell office:value-type="float" office:value="0.001684143">
            <text:p>0.001684143</text:p>
          </table:table-cell>
          <table:table-cell table:number-columns-repeated="4"/>
        </table:table-row>
        <table:table-row table:style-name="ro1">
          <table:table-cell office:value-type="float" office:value="447.677703857422">
            <text:p>447.6777038574</text:p>
          </table:table-cell>
          <table:table-cell office:value-type="float" office:value="0.003965256">
            <text:p>0.003965256</text:p>
          </table:table-cell>
          <table:table-cell table:number-columns-repeated="4"/>
        </table:table-row>
        <table:table-row table:style-name="ro1">
          <table:table-cell office:value-type="float" office:value="447.791961669922">
            <text:p>447.7919616699</text:p>
          </table:table-cell>
          <table:table-cell office:value-type="float" office:value="-0.005942089">
            <text:p>-0.005942089</text:p>
          </table:table-cell>
          <table:table-cell table:number-columns-repeated="4"/>
        </table:table-row>
        <table:table-row table:style-name="ro1">
          <table:table-cell office:value-type="float" office:value="447.906188964844">
            <text:p>447.9061889648</text:p>
          </table:table-cell>
          <table:table-cell office:value-type="float" office:value="-0.008573061">
            <text:p>-0.008573061</text:p>
          </table:table-cell>
          <table:table-cell table:number-columns-repeated="4"/>
        </table:table-row>
        <table:table-row table:style-name="ro1">
          <table:table-cell office:value-type="float" office:value="448.020446777344">
            <text:p>448.0204467773</text:p>
          </table:table-cell>
          <table:table-cell office:value-type="float" office:value="-0.006058322">
            <text:p>-0.006058322</text:p>
          </table:table-cell>
          <table:table-cell table:number-columns-repeated="4"/>
        </table:table-row>
        <table:table-row table:style-name="ro1">
          <table:table-cell office:value-type="float" office:value="448.134704589844">
            <text:p>448.1347045898</text:p>
          </table:table-cell>
          <table:table-cell office:value-type="float" office:value="0.01052307">
            <text:p>0.01052307</text:p>
          </table:table-cell>
          <table:table-cell table:number-columns-repeated="4"/>
        </table:table-row>
        <table:table-row table:style-name="ro1">
          <table:table-cell office:value-type="float" office:value="448.248962402344">
            <text:p>448.2489624023</text:p>
          </table:table-cell>
          <table:table-cell office:value-type="float" office:value="-0.008443099">
            <text:p>-0.008443099</text:p>
          </table:table-cell>
          <table:table-cell table:number-columns-repeated="4"/>
        </table:table-row>
        <table:table-row table:style-name="ro1">
          <table:table-cell office:value-type="float" office:value="448.363220214844">
            <text:p>448.3632202148</text:p>
          </table:table-cell>
          <table:table-cell office:value-type="float" office:value="-0.002804497">
            <text:p>-0.002804497</text:p>
          </table:table-cell>
          <table:table-cell table:number-columns-repeated="4"/>
        </table:table-row>
        <table:table-row table:style-name="ro1">
          <table:table-cell office:value-type="float" office:value="448.477508544922">
            <text:p>448.4775085449</text:p>
          </table:table-cell>
          <table:table-cell office:value-type="float" office:value="0.006089745">
            <text:p>0.006089745</text:p>
          </table:table-cell>
          <table:table-cell table:number-columns-repeated="4"/>
        </table:table-row>
        <table:table-row table:style-name="ro1">
          <table:table-cell office:value-type="float" office:value="448.591766357422">
            <text:p>448.5917663574</text:p>
          </table:table-cell>
          <table:table-cell office:value-type="float" office:value="0.008921531">
            <text:p>0.008921531</text:p>
          </table:table-cell>
          <table:table-cell table:number-columns-repeated="4"/>
        </table:table-row>
        <table:table-row table:style-name="ro1">
          <table:table-cell office:value-type="float" office:value="448.7060546875">
            <text:p>448.7060546875</text:p>
          </table:table-cell>
          <table:table-cell office:value-type="float" office:value="0.009209607">
            <text:p>0.009209607</text:p>
          </table:table-cell>
          <table:table-cell table:number-columns-repeated="4"/>
        </table:table-row>
        <table:table-row table:style-name="ro1">
          <table:table-cell office:value-type="float" office:value="448.820343017578">
            <text:p>448.8203430176</text:p>
          </table:table-cell>
          <table:table-cell office:value-type="float" office:value="-0.009139988">
            <text:p>-0.009139988</text:p>
          </table:table-cell>
          <table:table-cell table:number-columns-repeated="4"/>
        </table:table-row>
        <table:table-row table:style-name="ro1">
          <table:table-cell office:value-type="float" office:value="448.934631347656">
            <text:p>448.9346313477</text:p>
          </table:table-cell>
          <table:table-cell office:value-type="float" office:value="-0.00194347">
            <text:p>-0.00194347</text:p>
          </table:table-cell>
          <table:table-cell table:number-columns-repeated="4"/>
        </table:table-row>
        <table:table-row table:style-name="ro1">
          <table:table-cell office:value-type="float" office:value="449.048919677734">
            <text:p>449.0489196777</text:p>
          </table:table-cell>
          <table:table-cell office:value-type="float" office:value="-0.002015305">
            <text:p>-0.002015305</text:p>
          </table:table-cell>
          <table:table-cell table:number-columns-repeated="4"/>
        </table:table-row>
        <table:table-row table:style-name="ro1">
          <table:table-cell office:value-type="float" office:value="449.163238525391">
            <text:p>449.1632385254</text:p>
          </table:table-cell>
          <table:table-cell office:value-type="float" office:value="-0.0112617">
            <text:p>-0.0112617</text:p>
          </table:table-cell>
          <table:table-cell table:number-columns-repeated="4"/>
        </table:table-row>
        <table:table-row table:style-name="ro1">
          <table:table-cell office:value-type="float" office:value="449.277526855469">
            <text:p>449.2775268555</text:p>
          </table:table-cell>
          <table:table-cell office:value-type="float" office:value="-0.000293482">
            <text:p>-0.000293482</text:p>
          </table:table-cell>
          <table:table-cell table:number-columns-repeated="4"/>
        </table:table-row>
        <table:table-row table:style-name="ro1">
          <table:table-cell office:value-type="float" office:value="449.391845703125">
            <text:p>449.3918457031</text:p>
          </table:table-cell>
          <table:table-cell office:value-type="float" office:value="0.01394316">
            <text:p>0.01394316</text:p>
          </table:table-cell>
          <table:table-cell table:number-columns-repeated="4"/>
        </table:table-row>
        <table:table-row table:style-name="ro1">
          <table:table-cell office:value-type="float" office:value="449.506164550781">
            <text:p>449.5061645508</text:p>
          </table:table-cell>
          <table:table-cell office:value-type="float" office:value="0.001532043">
            <text:p>0.001532043</text:p>
          </table:table-cell>
          <table:table-cell table:number-columns-repeated="4"/>
        </table:table-row>
        <table:table-row table:style-name="ro1">
          <table:table-cell office:value-type="float" office:value="449.620483398438">
            <text:p>449.6204833984</text:p>
          </table:table-cell>
          <table:table-cell office:value-type="float" office:value="0.009742033">
            <text:p>0.009742033</text:p>
          </table:table-cell>
          <table:table-cell table:number-columns-repeated="4"/>
        </table:table-row>
        <table:table-row table:style-name="ro1">
          <table:table-cell office:value-type="float" office:value="449.734802246094">
            <text:p>449.7348022461</text:p>
          </table:table-cell>
          <table:table-cell office:value-type="float" office:value="-0.009819541">
            <text:p>-0.009819541</text:p>
          </table:table-cell>
          <table:table-cell table:number-columns-repeated="4"/>
        </table:table-row>
        <table:table-row table:style-name="ro1">
          <table:table-cell office:value-type="float" office:value="449.84912109375">
            <text:p>449.8491210938</text:p>
          </table:table-cell>
          <table:table-cell office:value-type="float" office:value="0.006284469">
            <text:p>0.006284469</text:p>
          </table:table-cell>
          <table:table-cell table:number-columns-repeated="4"/>
        </table:table-row>
        <table:table-row table:style-name="ro1">
          <table:table-cell office:value-type="float" office:value="449.963439941406">
            <text:p>449.9634399414</text:p>
          </table:table-cell>
          <table:table-cell office:value-type="float" office:value="-0.004239182">
            <text:p>-0.004239182</text:p>
          </table:table-cell>
          <table:table-cell table:number-columns-repeated="4"/>
        </table:table-row>
        <table:table-row table:style-name="ro1">
          <table:table-cell office:value-type="float" office:value="450.077789306641">
            <text:p>450.0777893066</text:p>
          </table:table-cell>
          <table:table-cell office:value-type="float" office:value="-0.00229372">
            <text:p>-0.00229372</text:p>
          </table:table-cell>
          <table:table-cell table:number-columns-repeated="4"/>
        </table:table-row>
        <table:table-row table:style-name="ro1">
          <table:table-cell office:value-type="float" office:value="450.192138671875">
            <text:p>450.1921386719</text:p>
          </table:table-cell>
          <table:table-cell office:value-type="float" office:value="-0.01327731">
            <text:p>-0.01327731</text:p>
          </table:table-cell>
          <table:table-cell table:number-columns-repeated="4"/>
        </table:table-row>
        <table:table-row table:style-name="ro1">
          <table:table-cell office:value-type="float" office:value="450.306488037109">
            <text:p>450.3064880371</text:p>
          </table:table-cell>
          <table:table-cell office:value-type="float" office:value="0.005678939">
            <text:p>0.005678939</text:p>
          </table:table-cell>
          <table:table-cell table:number-columns-repeated="4"/>
        </table:table-row>
        <table:table-row table:style-name="ro1">
          <table:table-cell office:value-type="float" office:value="450.420837402344">
            <text:p>450.4208374023</text:p>
          </table:table-cell>
          <table:table-cell office:value-type="float" office:value="0.001684377">
            <text:p>0.001684377</text:p>
          </table:table-cell>
          <table:table-cell table:number-columns-repeated="4"/>
        </table:table-row>
        <table:table-row table:style-name="ro1">
          <table:table-cell office:value-type="float" office:value="450.535186767578">
            <text:p>450.5351867676</text:p>
          </table:table-cell>
          <table:table-cell office:value-type="float" office:value="-0.0007983968">
            <text:p>-0.0007983968</text:p>
          </table:table-cell>
          <table:table-cell table:number-columns-repeated="4"/>
        </table:table-row>
        <table:table-row table:style-name="ro1">
          <table:table-cell office:value-type="float" office:value="450.649536132813">
            <text:p>450.6495361328</text:p>
          </table:table-cell>
          <table:table-cell office:value-type="float" office:value="-0.01328226">
            <text:p>-0.01328226</text:p>
          </table:table-cell>
          <table:table-cell table:number-columns-repeated="4"/>
        </table:table-row>
        <table:table-row table:style-name="ro1">
          <table:table-cell office:value-type="float" office:value="450.763916015625">
            <text:p>450.7639160156</text:p>
          </table:table-cell>
          <table:table-cell office:value-type="float" office:value="0.006734628">
            <text:p>0.006734628</text:p>
          </table:table-cell>
          <table:table-cell table:number-columns-repeated="4"/>
        </table:table-row>
        <table:table-row table:style-name="ro1">
          <table:table-cell office:value-type="float" office:value="450.878295898438">
            <text:p>450.8782958984</text:p>
          </table:table-cell>
          <table:table-cell office:value-type="float" office:value="-0.005892704">
            <text:p>-0.005892704</text:p>
          </table:table-cell>
          <table:table-cell table:number-columns-repeated="4"/>
        </table:table-row>
        <table:table-row table:style-name="ro1">
          <table:table-cell office:value-type="float" office:value="450.99267578125">
            <text:p>450.9926757813</text:p>
          </table:table-cell>
          <table:table-cell office:value-type="float" office:value="-0.002014212">
            <text:p>-0.002014212</text:p>
          </table:table-cell>
          <table:table-cell table:number-columns-repeated="4"/>
        </table:table-row>
        <table:table-row table:style-name="ro1">
          <table:table-cell office:value-type="float" office:value="451.107055664063">
            <text:p>451.1070556641</text:p>
          </table:table-cell>
          <table:table-cell office:value-type="float" office:value="-0.01446843">
            <text:p>-0.01446843</text:p>
          </table:table-cell>
          <table:table-cell table:number-columns-repeated="4"/>
        </table:table-row>
        <table:table-row table:style-name="ro1">
          <table:table-cell office:value-type="float" office:value="451.221435546875">
            <text:p>451.2214355469</text:p>
          </table:table-cell>
          <table:table-cell office:value-type="float" office:value="-0.0001046549">
            <text:p>-0.0001046549</text:p>
          </table:table-cell>
          <table:table-cell table:number-columns-repeated="4"/>
        </table:table-row>
        <table:table-row table:style-name="ro1">
          <table:table-cell office:value-type="float" office:value="451.335815429688">
            <text:p>451.3358154297</text:p>
          </table:table-cell>
          <table:table-cell office:value-type="float" office:value="0.01150456">
            <text:p>0.01150456</text:p>
          </table:table-cell>
          <table:table-cell table:number-columns-repeated="4"/>
        </table:table-row>
        <table:table-row table:style-name="ro1">
          <table:table-cell office:value-type="float" office:value="451.450225830078">
            <text:p>451.4502258301</text:p>
          </table:table-cell>
          <table:table-cell office:value-type="float" office:value="0.001397436">
            <text:p>0.001397436</text:p>
          </table:table-cell>
          <table:table-cell table:number-columns-repeated="4"/>
        </table:table-row>
        <table:table-row table:style-name="ro1">
          <table:table-cell office:value-type="float" office:value="451.564605712891">
            <text:p>451.5646057129</text:p>
          </table:table-cell>
          <table:table-cell office:value-type="float" office:value="-0.01243253">
            <text:p>-0.01243253</text:p>
          </table:table-cell>
          <table:table-cell table:number-columns-repeated="4"/>
        </table:table-row>
        <table:table-row table:style-name="ro1">
          <table:table-cell office:value-type="float" office:value="451.679016113281">
            <text:p>451.6790161133</text:p>
          </table:table-cell>
          <table:table-cell office:value-type="float" office:value="0.007790238">
            <text:p>0.007790238</text:p>
          </table:table-cell>
          <table:table-cell table:number-columns-repeated="4"/>
        </table:table-row>
        <table:table-row table:style-name="ro1">
          <table:table-cell office:value-type="float" office:value="451.793426513672">
            <text:p>451.7934265137</text:p>
          </table:table-cell>
          <table:table-cell office:value-type="float" office:value="0.008957445">
            <text:p>0.008957445</text:p>
          </table:table-cell>
          <table:table-cell table:number-columns-repeated="4"/>
        </table:table-row>
        <table:table-row table:style-name="ro1">
          <table:table-cell office:value-type="float" office:value="451.907836914063">
            <text:p>451.9078369141</text:p>
          </table:table-cell>
          <table:table-cell office:value-type="float" office:value="-0.007173148">
            <text:p>-0.007173148</text:p>
          </table:table-cell>
          <table:table-cell table:number-columns-repeated="4"/>
        </table:table-row>
        <table:table-row table:style-name="ro1">
          <table:table-cell office:value-type="float" office:value="452.022247314453">
            <text:p>452.0222473145</text:p>
          </table:table-cell>
          <table:table-cell office:value-type="float" office:value="-0.003080152">
            <text:p>-0.003080152</text:p>
          </table:table-cell>
          <table:table-cell table:number-columns-repeated="4"/>
        </table:table-row>
        <table:table-row table:style-name="ro1">
          <table:table-cell office:value-type="float" office:value="452.136688232422">
            <text:p>452.1366882324</text:p>
          </table:table-cell>
          <table:table-cell office:value-type="float" office:value="0.002142261">
            <text:p>0.002142261</text:p>
          </table:table-cell>
          <table:table-cell table:number-columns-repeated="4"/>
        </table:table-row>
        <table:table-row table:style-name="ro1">
          <table:table-cell office:value-type="float" office:value="452.251098632813">
            <text:p>452.2510986328</text:p>
          </table:table-cell>
          <table:table-cell office:value-type="float" office:value="0.00723548">
            <text:p>0.00723548</text:p>
          </table:table-cell>
          <table:table-cell table:number-columns-repeated="4"/>
        </table:table-row>
        <table:table-row table:style-name="ro1">
          <table:table-cell office:value-type="float" office:value="452.365539550781">
            <text:p>452.3655395508</text:p>
          </table:table-cell>
          <table:table-cell office:value-type="float" office:value="-0.01038793">
            <text:p>-0.01038793</text:p>
          </table:table-cell>
          <table:table-cell table:number-columns-repeated="4"/>
        </table:table-row>
        <table:table-row table:style-name="ro1">
          <table:table-cell office:value-type="float" office:value="452.47998046875">
            <text:p>452.4799804688</text:p>
          </table:table-cell>
          <table:table-cell office:value-type="float" office:value="0.001171937">
            <text:p>0.001171937</text:p>
          </table:table-cell>
          <table:table-cell table:number-columns-repeated="4"/>
        </table:table-row>
        <table:table-row table:style-name="ro1">
          <table:table-cell office:value-type="float" office:value="452.594421386719">
            <text:p>452.5944213867</text:p>
          </table:table-cell>
          <table:table-cell office:value-type="float" office:value="0.008140818">
            <text:p>0.008140818</text:p>
          </table:table-cell>
          <table:table-cell table:number-columns-repeated="4"/>
        </table:table-row>
        <table:table-row table:style-name="ro1">
          <table:table-cell office:value-type="float" office:value="452.708862304688">
            <text:p>452.7088623047</text:p>
          </table:table-cell>
          <table:table-cell office:value-type="float" office:value="0.005254027">
            <text:p>0.005254027</text:p>
          </table:table-cell>
          <table:table-cell table:number-columns-repeated="4"/>
        </table:table-row>
        <table:table-row table:style-name="ro1">
          <table:table-cell office:value-type="float" office:value="452.823333740234">
            <text:p>452.8233337402</text:p>
          </table:table-cell>
          <table:table-cell office:value-type="float" office:value="0.007371502">
            <text:p>0.007371502</text:p>
          </table:table-cell>
          <table:table-cell table:number-columns-repeated="4"/>
        </table:table-row>
        <table:table-row table:style-name="ro1">
          <table:table-cell office:value-type="float" office:value="452.937774658203">
            <text:p>452.9377746582</text:p>
          </table:table-cell>
          <table:table-cell office:value-type="float" office:value="-0.007275134">
            <text:p>-0.007275134</text:p>
          </table:table-cell>
          <table:table-cell table:number-columns-repeated="4"/>
        </table:table-row>
        <table:table-row table:style-name="ro1">
          <table:table-cell office:value-type="float" office:value="453.05224609375">
            <text:p>453.0522460938</text:p>
          </table:table-cell>
          <table:table-cell office:value-type="float" office:value="-0.002374755">
            <text:p>-0.002374755</text:p>
          </table:table-cell>
          <table:table-cell table:number-columns-repeated="4"/>
        </table:table-row>
        <table:table-row table:style-name="ro1">
          <table:table-cell office:value-type="float" office:value="453.166717529297">
            <text:p>453.1667175293</text:p>
          </table:table-cell>
          <table:table-cell office:value-type="float" office:value="0.005887326">
            <text:p>0.005887326</text:p>
          </table:table-cell>
          <table:table-cell table:number-columns-repeated="4"/>
        </table:table-row>
        <table:table-row table:style-name="ro1">
          <table:table-cell office:value-type="float" office:value="453.281188964844">
            <text:p>453.2811889648</text:p>
          </table:table-cell>
          <table:table-cell office:value-type="float" office:value="-0.01091558">
            <text:p>-0.01091558</text:p>
          </table:table-cell>
          <table:table-cell table:number-columns-repeated="4"/>
        </table:table-row>
        <table:table-row table:style-name="ro1">
          <table:table-cell office:value-type="float" office:value="453.395660400391">
            <text:p>453.3956604004</text:p>
          </table:table-cell>
          <table:table-cell office:value-type="float" office:value="-0.003927571">
            <text:p>-0.003927571</text:p>
          </table:table-cell>
          <table:table-cell table:number-columns-repeated="4"/>
        </table:table-row>
        <table:table-row table:style-name="ro1">
          <table:table-cell office:value-type="float" office:value="453.510131835938">
            <text:p>453.5101318359</text:p>
          </table:table-cell>
          <table:table-cell office:value-type="float" office:value="0.0146989">
            <text:p>0.0146989</text:p>
          </table:table-cell>
          <table:table-cell table:number-columns-repeated="4"/>
        </table:table-row>
        <table:table-row table:style-name="ro1">
          <table:table-cell office:value-type="float" office:value="453.624603271484">
            <text:p>453.6246032715</text:p>
          </table:table-cell>
          <table:table-cell office:value-type="float" office:value="-0.006149996">
            <text:p>-0.006149996</text:p>
          </table:table-cell>
          <table:table-cell table:number-columns-repeated="4"/>
        </table:table-row>
        <table:table-row table:style-name="ro1">
          <table:table-cell office:value-type="float" office:value="453.739105224609">
            <text:p>453.7391052246</text:p>
          </table:table-cell>
          <table:table-cell office:value-type="float" office:value="-0.003991386">
            <text:p>-0.003991386</text:p>
          </table:table-cell>
          <table:table-cell table:number-columns-repeated="4"/>
        </table:table-row>
        <table:table-row table:style-name="ro1">
          <table:table-cell office:value-type="float" office:value="453.853607177734">
            <text:p>453.8536071777</text:p>
          </table:table-cell>
          <table:table-cell office:value-type="float" office:value="-0.003514254">
            <text:p>-0.003514254</text:p>
          </table:table-cell>
          <table:table-cell table:number-columns-repeated="4"/>
        </table:table-row>
        <table:table-row table:style-name="ro1">
          <table:table-cell office:value-type="float" office:value="453.968109130859">
            <text:p>453.9681091309</text:p>
          </table:table-cell>
          <table:table-cell office:value-type="float" office:value="0.002416109">
            <text:p>0.002416109</text:p>
          </table:table-cell>
          <table:table-cell table:number-columns-repeated="4"/>
        </table:table-row>
        <table:table-row table:style-name="ro1">
          <table:table-cell office:value-type="float" office:value="454.082611083984">
            <text:p>454.082611084</text:p>
          </table:table-cell>
          <table:table-cell office:value-type="float" office:value="-0.001667686">
            <text:p>-0.001667686</text:p>
          </table:table-cell>
          <table:table-cell table:number-columns-repeated="4"/>
        </table:table-row>
        <table:table-row table:style-name="ro1">
          <table:table-cell office:value-type="float" office:value="454.197113037109">
            <text:p>454.1971130371</text:p>
          </table:table-cell>
          <table:table-cell office:value-type="float" office:value="-0.01080773">
            <text:p>-0.01080773</text:p>
          </table:table-cell>
          <table:table-cell table:number-columns-repeated="4"/>
        </table:table-row>
        <table:table-row table:style-name="ro1">
          <table:table-cell office:value-type="float" office:value="454.311614990234">
            <text:p>454.3116149902</text:p>
          </table:table-cell>
          <table:table-cell office:value-type="float" office:value="-0.01504449">
            <text:p>-0.01504449</text:p>
          </table:table-cell>
          <table:table-cell table:number-columns-repeated="4"/>
        </table:table-row>
        <table:table-row table:style-name="ro1">
          <table:table-cell office:value-type="float" office:value="454.426147460938">
            <text:p>454.4261474609</text:p>
          </table:table-cell>
          <table:table-cell office:value-type="float" office:value="0.005620252">
            <text:p>0.005620252</text:p>
          </table:table-cell>
          <table:table-cell table:number-columns-repeated="4"/>
        </table:table-row>
        <table:table-row table:style-name="ro1">
          <table:table-cell office:value-type="float" office:value="454.540649414063">
            <text:p>454.5406494141</text:p>
          </table:table-cell>
          <table:table-cell office:value-type="float" office:value="0.008408736">
            <text:p>0.008408736</text:p>
          </table:table-cell>
          <table:table-cell table:number-columns-repeated="4"/>
        </table:table-row>
        <table:table-row table:style-name="ro1">
          <table:table-cell office:value-type="float" office:value="454.655181884766">
            <text:p>454.6551818848</text:p>
          </table:table-cell>
          <table:table-cell office:value-type="float" office:value="-0.006902692">
            <text:p>-0.006902692</text:p>
          </table:table-cell>
          <table:table-cell table:number-columns-repeated="4"/>
        </table:table-row>
        <table:table-row table:style-name="ro1">
          <table:table-cell office:value-type="float" office:value="454.769714355469">
            <text:p>454.7697143555</text:p>
          </table:table-cell>
          <table:table-cell office:value-type="float" office:value="-0.003128961">
            <text:p>-0.003128961</text:p>
          </table:table-cell>
          <table:table-cell table:number-columns-repeated="4"/>
        </table:table-row>
        <table:table-row table:style-name="ro1">
          <table:table-cell office:value-type="float" office:value="454.884246826172">
            <text:p>454.8842468262</text:p>
          </table:table-cell>
          <table:table-cell office:value-type="float" office:value="0.009631867">
            <text:p>0.009631867</text:p>
          </table:table-cell>
          <table:table-cell table:number-columns-repeated="4"/>
        </table:table-row>
        <table:table-row table:style-name="ro1">
          <table:table-cell office:value-type="float" office:value="454.998809814453">
            <text:p>454.9988098145</text:p>
          </table:table-cell>
          <table:table-cell office:value-type="float" office:value="0.01036544">
            <text:p>0.01036544</text:p>
          </table:table-cell>
          <table:table-cell table:number-columns-repeated="4"/>
        </table:table-row>
        <table:table-row table:style-name="ro1">
          <table:table-cell office:value-type="float" office:value="455.113342285156">
            <text:p>455.1133422852</text:p>
          </table:table-cell>
          <table:table-cell office:value-type="float" office:value="-0.007474666">
            <text:p>-0.007474666</text:p>
          </table:table-cell>
          <table:table-cell table:number-columns-repeated="4"/>
        </table:table-row>
        <table:table-row table:style-name="ro1">
          <table:table-cell office:value-type="float" office:value="455.227905273438">
            <text:p>455.2279052734</text:p>
          </table:table-cell>
          <table:table-cell office:value-type="float" office:value="-0.005281152">
            <text:p>-0.005281152</text:p>
          </table:table-cell>
          <table:table-cell table:number-columns-repeated="4"/>
        </table:table-row>
        <table:table-row table:style-name="ro1">
          <table:table-cell office:value-type="float" office:value="455.342468261719">
            <text:p>455.3424682617</text:p>
          </table:table-cell>
          <table:table-cell office:value-type="float" office:value="0.006389515">
            <text:p>0.006389515</text:p>
          </table:table-cell>
          <table:table-cell table:number-columns-repeated="4"/>
        </table:table-row>
        <table:table-row table:style-name="ro1">
          <table:table-cell office:value-type="float" office:value="455.457000732422">
            <text:p>455.4570007324</text:p>
          </table:table-cell>
          <table:table-cell office:value-type="float" office:value="0.007726752">
            <text:p>0.007726752</text:p>
          </table:table-cell>
          <table:table-cell table:number-columns-repeated="4"/>
        </table:table-row>
        <table:table-row table:style-name="ro1">
          <table:table-cell office:value-type="float" office:value="455.571563720703">
            <text:p>455.5715637207</text:p>
          </table:table-cell>
          <table:table-cell office:value-type="float" office:value="-0.009456315">
            <text:p>-0.009456315</text:p>
          </table:table-cell>
          <table:table-cell table:number-columns-repeated="4"/>
        </table:table-row>
        <table:table-row table:style-name="ro1">
          <table:table-cell office:value-type="float" office:value="455.686157226563">
            <text:p>455.6861572266</text:p>
          </table:table-cell>
          <table:table-cell office:value-type="float" office:value="-0.010574">
            <text:p>-0.010574</text:p>
          </table:table-cell>
          <table:table-cell table:number-columns-repeated="4"/>
        </table:table-row>
        <table:table-row table:style-name="ro1">
          <table:table-cell office:value-type="float" office:value="455.800720214844">
            <text:p>455.8007202148</text:p>
          </table:table-cell>
          <table:table-cell office:value-type="float" office:value="0.01045143">
            <text:p>0.01045143</text:p>
          </table:table-cell>
          <table:table-cell table:number-columns-repeated="4"/>
        </table:table-row>
        <table:table-row table:style-name="ro1">
          <table:table-cell office:value-type="float" office:value="455.915313720703">
            <text:p>455.9153137207</text:p>
          </table:table-cell>
          <table:table-cell office:value-type="float" office:value="-0.0003310733">
            <text:p>-0.0003310733</text:p>
          </table:table-cell>
          <table:table-cell table:number-columns-repeated="4"/>
        </table:table-row>
        <table:table-row table:style-name="ro1">
          <table:table-cell office:value-type="float" office:value="456.029876708984">
            <text:p>456.029876709</text:p>
          </table:table-cell>
          <table:table-cell office:value-type="float" office:value="-0.006576283">
            <text:p>-0.006576283</text:p>
          </table:table-cell>
          <table:table-cell table:number-columns-repeated="4"/>
        </table:table-row>
        <table:table-row table:style-name="ro1">
          <table:table-cell office:value-type="float" office:value="456.144470214844">
            <text:p>456.1444702148</text:p>
          </table:table-cell>
          <table:table-cell office:value-type="float" office:value="-0.005038429">
            <text:p>-0.005038429</text:p>
          </table:table-cell>
          <table:table-cell table:number-columns-repeated="4"/>
        </table:table-row>
        <table:table-row table:style-name="ro1">
          <table:table-cell office:value-type="float" office:value="456.259063720703">
            <text:p>456.2590637207</text:p>
          </table:table-cell>
          <table:table-cell office:value-type="float" office:value="-0.003757153">
            <text:p>-0.003757153</text:p>
          </table:table-cell>
          <table:table-cell table:number-columns-repeated="4"/>
        </table:table-row>
        <table:table-row table:style-name="ro1">
          <table:table-cell office:value-type="float" office:value="456.373657226563">
            <text:p>456.3736572266</text:p>
          </table:table-cell>
          <table:table-cell office:value-type="float" office:value="0.008311377">
            <text:p>0.008311377</text:p>
          </table:table-cell>
          <table:table-cell table:number-columns-repeated="4"/>
        </table:table-row>
        <table:table-row table:style-name="ro1">
          <table:table-cell office:value-type="float" office:value="456.488250732422">
            <text:p>456.4882507324</text:p>
          </table:table-cell>
          <table:table-cell office:value-type="float" office:value="-0.005883589">
            <text:p>-0.005883589</text:p>
          </table:table-cell>
          <table:table-cell table:number-columns-repeated="4"/>
        </table:table-row>
        <table:table-row table:style-name="ro1">
          <table:table-cell office:value-type="float" office:value="456.602874755859">
            <text:p>456.6028747559</text:p>
          </table:table-cell>
          <table:table-cell office:value-type="float" office:value="-0.01416888">
            <text:p>-0.01416888</text:p>
          </table:table-cell>
          <table:table-cell table:number-columns-repeated="4"/>
        </table:table-row>
        <table:table-row table:style-name="ro1">
          <table:table-cell office:value-type="float" office:value="456.717468261719">
            <text:p>456.7174682617</text:p>
          </table:table-cell>
          <table:table-cell office:value-type="float" office:value="0.01327003">
            <text:p>0.01327003</text:p>
          </table:table-cell>
          <table:table-cell table:number-columns-repeated="4"/>
        </table:table-row>
        <table:table-row table:style-name="ro1">
          <table:table-cell office:value-type="float" office:value="456.832092285156">
            <text:p>456.8320922852</text:p>
          </table:table-cell>
          <table:table-cell office:value-type="float" office:value="-0.0007033913">
            <text:p>-0.0007033913</text:p>
          </table:table-cell>
          <table:table-cell table:number-columns-repeated="4"/>
        </table:table-row>
        <table:table-row table:style-name="ro1">
          <table:table-cell office:value-type="float" office:value="456.946716308594">
            <text:p>456.9467163086</text:p>
          </table:table-cell>
          <table:table-cell office:value-type="float" office:value="-0.01113233">
            <text:p>-0.01113233</text:p>
          </table:table-cell>
          <table:table-cell table:number-columns-repeated="4"/>
        </table:table-row>
        <table:table-row table:style-name="ro1">
          <table:table-cell office:value-type="float" office:value="457.061340332031">
            <text:p>457.061340332</text:p>
          </table:table-cell>
          <table:table-cell office:value-type="float" office:value="0.006801946">
            <text:p>0.006801946</text:p>
          </table:table-cell>
          <table:table-cell table:number-columns-repeated="4"/>
        </table:table-row>
        <table:table-row table:style-name="ro1">
          <table:table-cell office:value-type="float" office:value="457.175964355469">
            <text:p>457.1759643555</text:p>
          </table:table-cell>
          <table:table-cell office:value-type="float" office:value="0.002593881">
            <text:p>0.002593881</text:p>
          </table:table-cell>
          <table:table-cell table:number-columns-repeated="4"/>
        </table:table-row>
        <table:table-row table:style-name="ro1">
          <table:table-cell office:value-type="float" office:value="457.290618896484">
            <text:p>457.2906188965</text:p>
          </table:table-cell>
          <table:table-cell office:value-type="float" office:value="0.001925219">
            <text:p>0.001925219</text:p>
          </table:table-cell>
          <table:table-cell table:number-columns-repeated="4"/>
        </table:table-row>
        <table:table-row table:style-name="ro1">
          <table:table-cell office:value-type="float" office:value="457.405242919922">
            <text:p>457.4052429199</text:p>
          </table:table-cell>
          <table:table-cell office:value-type="float" office:value="-0.01368804">
            <text:p>-0.01368804</text:p>
          </table:table-cell>
          <table:table-cell table:number-columns-repeated="4"/>
        </table:table-row>
        <table:table-row table:style-name="ro1">
          <table:table-cell office:value-type="float" office:value="457.519897460938">
            <text:p>457.5198974609</text:p>
          </table:table-cell>
          <table:table-cell office:value-type="float" office:value="0.01575142">
            <text:p>0.01575142</text:p>
          </table:table-cell>
          <table:table-cell table:number-columns-repeated="4"/>
        </table:table-row>
        <table:table-row table:style-name="ro1">
          <table:table-cell office:value-type="float" office:value="457.634552001953">
            <text:p>457.634552002</text:p>
          </table:table-cell>
          <table:table-cell office:value-type="float" office:value="0.008087429">
            <text:p>0.008087429</text:p>
          </table:table-cell>
          <table:table-cell table:number-columns-repeated="4"/>
        </table:table-row>
        <table:table-row table:style-name="ro1">
          <table:table-cell office:value-type="float" office:value="457.749206542969">
            <text:p>457.749206543</text:p>
          </table:table-cell>
          <table:table-cell office:value-type="float" office:value="0.01063144">
            <text:p>0.01063144</text:p>
          </table:table-cell>
          <table:table-cell table:number-columns-repeated="4"/>
        </table:table-row>
        <table:table-row table:style-name="ro1">
          <table:table-cell office:value-type="float" office:value="457.863861083984">
            <text:p>457.863861084</text:p>
          </table:table-cell>
          <table:table-cell office:value-type="float" office:value="-0.001638718">
            <text:p>-0.001638718</text:p>
          </table:table-cell>
          <table:table-cell table:number-columns-repeated="4"/>
        </table:table-row>
        <table:table-row table:style-name="ro1">
          <table:table-cell office:value-type="float" office:value="457.978515625">
            <text:p>457.978515625</text:p>
          </table:table-cell>
          <table:table-cell office:value-type="float" office:value="-0.001806285">
            <text:p>-0.001806285</text:p>
          </table:table-cell>
          <table:table-cell table:number-columns-repeated="4"/>
        </table:table-row>
        <table:table-row table:style-name="ro1">
          <table:table-cell office:value-type="float" office:value="458.093200683594">
            <text:p>458.0932006836</text:p>
          </table:table-cell>
          <table:table-cell office:value-type="float" office:value="-0.002267575">
            <text:p>-0.002267575</text:p>
          </table:table-cell>
          <table:table-cell table:number-columns-repeated="4"/>
        </table:table-row>
        <table:table-row table:style-name="ro1">
          <table:table-cell office:value-type="float" office:value="458.207855224609">
            <text:p>458.2078552246</text:p>
          </table:table-cell>
          <table:table-cell office:value-type="float" office:value="0.006221638">
            <text:p>0.006221638</text:p>
          </table:table-cell>
          <table:table-cell table:number-columns-repeated="4"/>
        </table:table-row>
        <table:table-row table:style-name="ro1">
          <table:table-cell office:value-type="float" office:value="458.322540283203">
            <text:p>458.3225402832</text:p>
          </table:table-cell>
          <table:table-cell office:value-type="float" office:value="0.01087523">
            <text:p>0.01087523</text:p>
          </table:table-cell>
          <table:table-cell table:number-columns-repeated="4"/>
        </table:table-row>
        <table:table-row table:style-name="ro1">
          <table:table-cell office:value-type="float" office:value="458.437225341797">
            <text:p>458.4372253418</text:p>
          </table:table-cell>
          <table:table-cell office:value-type="float" office:value="0.0003747106">
            <text:p>0.0003747106</text:p>
          </table:table-cell>
          <table:table-cell table:number-columns-repeated="4"/>
        </table:table-row>
        <table:table-row table:style-name="ro1">
          <table:table-cell office:value-type="float" office:value="458.551910400391">
            <text:p>458.5519104004</text:p>
          </table:table-cell>
          <table:table-cell office:value-type="float" office:value="0.00705204">
            <text:p>0.00705204</text:p>
          </table:table-cell>
          <table:table-cell table:number-columns-repeated="4"/>
        </table:table-row>
        <table:table-row table:style-name="ro1">
          <table:table-cell office:value-type="float" office:value="458.666595458984">
            <text:p>458.666595459</text:p>
          </table:table-cell>
          <table:table-cell office:value-type="float" office:value="0.01541513">
            <text:p>0.01541513</text:p>
          </table:table-cell>
          <table:table-cell table:number-columns-repeated="4"/>
        </table:table-row>
        <table:table-row table:style-name="ro1">
          <table:table-cell office:value-type="float" office:value="458.781280517578">
            <text:p>458.7812805176</text:p>
          </table:table-cell>
          <table:table-cell office:value-type="float" office:value="-0.00717909">
            <text:p>-0.00717909</text:p>
          </table:table-cell>
          <table:table-cell table:number-columns-repeated="4"/>
        </table:table-row>
        <table:table-row table:style-name="ro1">
          <table:table-cell office:value-type="float" office:value="458.89599609375">
            <text:p>458.8959960938</text:p>
          </table:table-cell>
          <table:table-cell office:value-type="float" office:value="-0.002690719">
            <text:p>-0.002690719</text:p>
          </table:table-cell>
          <table:table-cell table:number-columns-repeated="4"/>
        </table:table-row>
        <table:table-row table:style-name="ro1">
          <table:table-cell office:value-type="float" office:value="459.010681152344">
            <text:p>459.0106811523</text:p>
          </table:table-cell>
          <table:table-cell office:value-type="float" office:value="0.01015931">
            <text:p>0.01015931</text:p>
          </table:table-cell>
          <table:table-cell table:number-columns-repeated="4"/>
        </table:table-row>
        <table:table-row table:style-name="ro1">
          <table:table-cell office:value-type="float" office:value="459.125396728516">
            <text:p>459.1253967285</text:p>
          </table:table-cell>
          <table:table-cell office:value-type="float" office:value="0.03052315">
            <text:p>0.03052315</text:p>
          </table:table-cell>
          <table:table-cell table:number-columns-repeated="4"/>
        </table:table-row>
        <table:table-row table:style-name="ro1">
          <table:table-cell office:value-type="float" office:value="459.240112304688">
            <text:p>459.2401123047</text:p>
          </table:table-cell>
          <table:table-cell office:value-type="float" office:value="0.008913919">
            <text:p>0.008913919</text:p>
          </table:table-cell>
          <table:table-cell table:number-columns-repeated="4"/>
        </table:table-row>
        <table:table-row table:style-name="ro1">
          <table:table-cell office:value-type="float" office:value="459.354827880859">
            <text:p>459.3548278809</text:p>
          </table:table-cell>
          <table:table-cell office:value-type="float" office:value="-0.007627261">
            <text:p>-0.007627261</text:p>
          </table:table-cell>
          <table:table-cell table:number-columns-repeated="4"/>
        </table:table-row>
        <table:table-row table:style-name="ro1">
          <table:table-cell office:value-type="float" office:value="459.469543457031">
            <text:p>459.469543457</text:p>
          </table:table-cell>
          <table:table-cell office:value-type="float" office:value="0.003514771">
            <text:p>0.003514771</text:p>
          </table:table-cell>
          <table:table-cell table:number-columns-repeated="4"/>
        </table:table-row>
        <table:table-row table:style-name="ro1">
          <table:table-cell office:value-type="float" office:value="459.584289550781">
            <text:p>459.5842895508</text:p>
          </table:table-cell>
          <table:table-cell office:value-type="float" office:value="-0.000441581">
            <text:p>-0.000441581</text:p>
          </table:table-cell>
          <table:table-cell table:number-columns-repeated="4"/>
        </table:table-row>
        <table:table-row table:style-name="ro1">
          <table:table-cell office:value-type="float" office:value="459.699005126953">
            <text:p>459.699005127</text:p>
          </table:table-cell>
          <table:table-cell office:value-type="float" office:value="0.005433553">
            <text:p>0.005433553</text:p>
          </table:table-cell>
          <table:table-cell table:number-columns-repeated="4"/>
        </table:table-row>
        <table:table-row table:style-name="ro1">
          <table:table-cell office:value-type="float" office:value="459.813751220703">
            <text:p>459.8137512207</text:p>
          </table:table-cell>
          <table:table-cell office:value-type="float" office:value="-0.005150628">
            <text:p>-0.005150628</text:p>
          </table:table-cell>
          <table:table-cell table:number-columns-repeated="4"/>
        </table:table-row>
        <table:table-row table:style-name="ro1">
          <table:table-cell office:value-type="float" office:value="459.928497314453">
            <text:p>459.9284973145</text:p>
          </table:table-cell>
          <table:table-cell office:value-type="float" office:value="0.007314384">
            <text:p>0.007314384</text:p>
          </table:table-cell>
          <table:table-cell table:number-columns-repeated="4"/>
        </table:table-row>
        <table:table-row table:style-name="ro1">
          <table:table-cell office:value-type="float" office:value="460.043243408203">
            <text:p>460.0432434082</text:p>
          </table:table-cell>
          <table:table-cell office:value-type="float" office:value="0.0341741">
            <text:p>0.0341741</text:p>
          </table:table-cell>
          <table:table-cell table:number-columns-repeated="4"/>
        </table:table-row>
        <table:table-row table:style-name="ro1">
          <table:table-cell office:value-type="float" office:value="460.157989501953">
            <text:p>460.157989502</text:p>
          </table:table-cell>
          <table:table-cell office:value-type="float" office:value="0.01287163">
            <text:p>0.01287163</text:p>
          </table:table-cell>
          <table:table-cell table:number-columns-repeated="4"/>
        </table:table-row>
        <table:table-row table:style-name="ro1">
          <table:table-cell office:value-type="float" office:value="460.272735595703">
            <text:p>460.2727355957</text:p>
          </table:table-cell>
          <table:table-cell office:value-type="float" office:value="-0.01072583">
            <text:p>-0.01072583</text:p>
          </table:table-cell>
          <table:table-cell table:number-columns-repeated="4"/>
        </table:table-row>
        <table:table-row table:style-name="ro1">
          <table:table-cell office:value-type="float" office:value="460.387512207031">
            <text:p>460.387512207</text:p>
          </table:table-cell>
          <table:table-cell office:value-type="float" office:value="-0.003029363">
            <text:p>-0.003029363</text:p>
          </table:table-cell>
          <table:table-cell table:number-columns-repeated="4"/>
        </table:table-row>
        <table:table-row table:style-name="ro1">
          <table:table-cell office:value-type="float" office:value="460.502258300781">
            <text:p>460.5022583008</text:p>
          </table:table-cell>
          <table:table-cell office:value-type="float" office:value="0.01050816">
            <text:p>0.01050816</text:p>
          </table:table-cell>
          <table:table-cell table:number-columns-repeated="4"/>
        </table:table-row>
        <table:table-row table:style-name="ro1">
          <table:table-cell office:value-type="float" office:value="460.617034912109">
            <text:p>460.6170349121</text:p>
          </table:table-cell>
          <table:table-cell office:value-type="float" office:value="-0.002621374">
            <text:p>-0.002621374</text:p>
          </table:table-cell>
          <table:table-cell table:number-columns-repeated="4"/>
        </table:table-row>
        <table:table-row table:style-name="ro1">
          <table:table-cell office:value-type="float" office:value="460.731811523438">
            <text:p>460.7318115234</text:p>
          </table:table-cell>
          <table:table-cell office:value-type="float" office:value="0.008263496">
            <text:p>0.008263496</text:p>
          </table:table-cell>
          <table:table-cell table:number-columns-repeated="4"/>
        </table:table-row>
        <table:table-row table:style-name="ro1">
          <table:table-cell office:value-type="float" office:value="460.846588134766">
            <text:p>460.8465881348</text:p>
          </table:table-cell>
          <table:table-cell office:value-type="float" office:value="0.01241118">
            <text:p>0.01241118</text:p>
          </table:table-cell>
          <table:table-cell table:number-columns-repeated="4"/>
        </table:table-row>
        <table:table-row table:style-name="ro1">
          <table:table-cell office:value-type="float" office:value="460.961364746094">
            <text:p>460.9613647461</text:p>
          </table:table-cell>
          <table:table-cell office:value-type="float" office:value="-0.002032928">
            <text:p>-0.002032928</text:p>
          </table:table-cell>
          <table:table-cell table:number-columns-repeated="4"/>
        </table:table-row>
        <table:table-row table:style-name="ro1">
          <table:table-cell office:value-type="float" office:value="461.076171875">
            <text:p>461.076171875</text:p>
          </table:table-cell>
          <table:table-cell office:value-type="float" office:value="-0.01099688">
            <text:p>-0.01099688</text:p>
          </table:table-cell>
          <table:table-cell table:number-columns-repeated="4"/>
        </table:table-row>
        <table:table-row table:style-name="ro1">
          <table:table-cell office:value-type="float" office:value="461.190948486328">
            <text:p>461.1909484863</text:p>
          </table:table-cell>
          <table:table-cell office:value-type="float" office:value="-0.0007936918">
            <text:p>-0.0007936918</text:p>
          </table:table-cell>
          <table:table-cell table:number-columns-repeated="4"/>
        </table:table-row>
        <table:table-row table:style-name="ro1">
          <table:table-cell office:value-type="float" office:value="461.305755615234">
            <text:p>461.3057556152</text:p>
          </table:table-cell>
          <table:table-cell office:value-type="float" office:value="0.005047862">
            <text:p>0.005047862</text:p>
          </table:table-cell>
          <table:table-cell table:number-columns-repeated="4"/>
        </table:table-row>
        <table:table-row table:style-name="ro1">
          <table:table-cell office:value-type="float" office:value="461.420562744141">
            <text:p>461.4205627441</text:p>
          </table:table-cell>
          <table:table-cell office:value-type="float" office:value="-0.002264537">
            <text:p>-0.002264537</text:p>
          </table:table-cell>
          <table:table-cell table:number-columns-repeated="4"/>
        </table:table-row>
        <table:table-row table:style-name="ro1">
          <table:table-cell office:value-type="float" office:value="461.535369873047">
            <text:p>461.535369873</text:p>
          </table:table-cell>
          <table:table-cell office:value-type="float" office:value="-0.009248879">
            <text:p>-0.009248879</text:p>
          </table:table-cell>
          <table:table-cell table:number-columns-repeated="4"/>
        </table:table-row>
        <table:table-row table:style-name="ro1">
          <table:table-cell office:value-type="float" office:value="461.650177001953">
            <text:p>461.650177002</text:p>
          </table:table-cell>
          <table:table-cell office:value-type="float" office:value="0.007142593">
            <text:p>0.007142593</text:p>
          </table:table-cell>
          <table:table-cell table:number-columns-repeated="4"/>
        </table:table-row>
        <table:table-row table:style-name="ro1">
          <table:table-cell office:value-type="float" office:value="461.764984130859">
            <text:p>461.7649841309</text:p>
          </table:table-cell>
          <table:table-cell office:value-type="float" office:value="0.002452967">
            <text:p>0.002452967</text:p>
          </table:table-cell>
          <table:table-cell table:number-columns-repeated="4"/>
        </table:table-row>
        <table:table-row table:style-name="ro1">
          <table:table-cell office:value-type="float" office:value="461.879791259766">
            <text:p>461.8797912598</text:p>
          </table:table-cell>
          <table:table-cell office:value-type="float" office:value="0.005222845">
            <text:p>0.005222845</text:p>
          </table:table-cell>
          <table:table-cell table:number-columns-repeated="4"/>
        </table:table-row>
        <table:table-row table:style-name="ro1">
          <table:table-cell office:value-type="float" office:value="461.99462890625">
            <text:p>461.9946289063</text:p>
          </table:table-cell>
          <table:table-cell office:value-type="float" office:value="-0.003896644">
            <text:p>-0.003896644</text:p>
          </table:table-cell>
          <table:table-cell table:number-columns-repeated="4"/>
        </table:table-row>
        <table:table-row table:style-name="ro1">
          <table:table-cell office:value-type="float" office:value="462.109466552734">
            <text:p>462.1094665527</text:p>
          </table:table-cell>
          <table:table-cell office:value-type="float" office:value="0.005684953">
            <text:p>0.005684953</text:p>
          </table:table-cell>
          <table:table-cell table:number-columns-repeated="4"/>
        </table:table-row>
        <table:table-row table:style-name="ro1">
          <table:table-cell office:value-type="float" office:value="462.224304199219">
            <text:p>462.2243041992</text:p>
          </table:table-cell>
          <table:table-cell office:value-type="float" office:value="0.0009217234">
            <text:p>0.0009217234</text:p>
          </table:table-cell>
          <table:table-cell table:number-columns-repeated="4"/>
        </table:table-row>
        <table:table-row table:style-name="ro1">
          <table:table-cell office:value-type="float" office:value="462.339141845703">
            <text:p>462.3391418457</text:p>
          </table:table-cell>
          <table:table-cell office:value-type="float" office:value="0.009114132">
            <text:p>0.009114132</text:p>
          </table:table-cell>
          <table:table-cell table:number-columns-repeated="4"/>
        </table:table-row>
        <table:table-row table:style-name="ro1">
          <table:table-cell office:value-type="float" office:value="462.453979492188">
            <text:p>462.4539794922</text:p>
          </table:table-cell>
          <table:table-cell office:value-type="float" office:value="-0.0008078323">
            <text:p>-0.0008078323</text:p>
          </table:table-cell>
          <table:table-cell table:number-columns-repeated="4"/>
        </table:table-row>
        <table:table-row table:style-name="ro1">
          <table:table-cell office:value-type="float" office:value="462.568817138672">
            <text:p>462.5688171387</text:p>
          </table:table-cell>
          <table:table-cell office:value-type="float" office:value="0.003162839">
            <text:p>0.003162839</text:p>
          </table:table-cell>
          <table:table-cell table:number-columns-repeated="4"/>
        </table:table-row>
        <table:table-row table:style-name="ro1">
          <table:table-cell office:value-type="float" office:value="462.683654785156">
            <text:p>462.6836547852</text:p>
          </table:table-cell>
          <table:table-cell office:value-type="float" office:value="0.01199392">
            <text:p>0.01199392</text:p>
          </table:table-cell>
          <table:table-cell table:number-columns-repeated="4"/>
        </table:table-row>
        <table:table-row table:style-name="ro1">
          <table:table-cell office:value-type="float" office:value="462.798522949219">
            <text:p>462.7985229492</text:p>
          </table:table-cell>
          <table:table-cell office:value-type="float" office:value="-0.008212658">
            <text:p>-0.008212658</text:p>
          </table:table-cell>
          <table:table-cell table:number-columns-repeated="4"/>
        </table:table-row>
        <table:table-row table:style-name="ro1">
          <table:table-cell office:value-type="float" office:value="462.913391113281">
            <text:p>462.9133911133</text:p>
          </table:table-cell>
          <table:table-cell office:value-type="float" office:value="-0.005574293">
            <text:p>-0.005574293</text:p>
          </table:table-cell>
          <table:table-cell table:number-columns-repeated="4"/>
        </table:table-row>
        <table:table-row table:style-name="ro1">
          <table:table-cell office:value-type="float" office:value="463.028259277344">
            <text:p>463.0282592773</text:p>
          </table:table-cell>
          <table:table-cell office:value-type="float" office:value="0.006461391">
            <text:p>0.006461391</text:p>
          </table:table-cell>
          <table:table-cell table:number-columns-repeated="4"/>
        </table:table-row>
        <table:table-row table:style-name="ro1">
          <table:table-cell office:value-type="float" office:value="463.143127441406">
            <text:p>463.1431274414</text:p>
          </table:table-cell>
          <table:table-cell office:value-type="float" office:value="0.004938282">
            <text:p>0.004938282</text:p>
          </table:table-cell>
          <table:table-cell table:number-columns-repeated="4"/>
        </table:table-row>
        <table:table-row table:style-name="ro1">
          <table:table-cell office:value-type="float" office:value="463.257995605469">
            <text:p>463.2579956055</text:p>
          </table:table-cell>
          <table:table-cell office:value-type="float" office:value="-0.008321301">
            <text:p>-0.008321301</text:p>
          </table:table-cell>
          <table:table-cell table:number-columns-repeated="4"/>
        </table:table-row>
        <table:table-row table:style-name="ro1">
          <table:table-cell office:value-type="float" office:value="463.372863769531">
            <text:p>463.3728637695</text:p>
          </table:table-cell>
          <table:table-cell office:value-type="float" office:value="0.01177063">
            <text:p>0.01177063</text:p>
          </table:table-cell>
          <table:table-cell table:number-columns-repeated="4"/>
        </table:table-row>
        <table:table-row table:style-name="ro1">
          <table:table-cell office:value-type="float" office:value="463.487762451172">
            <text:p>463.4877624512</text:p>
          </table:table-cell>
          <table:table-cell office:value-type="float" office:value="0.006414396">
            <text:p>0.006414396</text:p>
          </table:table-cell>
          <table:table-cell table:number-columns-repeated="4"/>
        </table:table-row>
        <table:table-row table:style-name="ro1">
          <table:table-cell office:value-type="float" office:value="463.602661132813">
            <text:p>463.6026611328</text:p>
          </table:table-cell>
          <table:table-cell office:value-type="float" office:value="0.006041646">
            <text:p>0.006041646</text:p>
          </table:table-cell>
          <table:table-cell table:number-columns-repeated="4"/>
        </table:table-row>
        <table:table-row table:style-name="ro1">
          <table:table-cell office:value-type="float" office:value="463.717529296875">
            <text:p>463.7175292969</text:p>
          </table:table-cell>
          <table:table-cell office:value-type="float" office:value="-0.001428245">
            <text:p>-0.001428245</text:p>
          </table:table-cell>
          <table:table-cell table:number-columns-repeated="4"/>
        </table:table-row>
        <table:table-row table:style-name="ro1">
          <table:table-cell office:value-type="float" office:value="463.832427978516">
            <text:p>463.8324279785</text:p>
          </table:table-cell>
          <table:table-cell office:value-type="float" office:value="-0.01103623">
            <text:p>-0.01103623</text:p>
          </table:table-cell>
          <table:table-cell table:number-columns-repeated="4"/>
        </table:table-row>
        <table:table-row table:style-name="ro1">
          <table:table-cell office:value-type="float" office:value="463.947326660156">
            <text:p>463.9473266602</text:p>
          </table:table-cell>
          <table:table-cell office:value-type="float" office:value="0.001781727">
            <text:p>0.001781727</text:p>
          </table:table-cell>
          <table:table-cell table:number-columns-repeated="4"/>
        </table:table-row>
        <table:table-row table:style-name="ro1">
          <table:table-cell office:value-type="float" office:value="464.062255859375">
            <text:p>464.0622558594</text:p>
          </table:table-cell>
          <table:table-cell office:value-type="float" office:value="-0.004299573">
            <text:p>-0.004299573</text:p>
          </table:table-cell>
          <table:table-cell table:number-columns-repeated="4"/>
        </table:table-row>
        <table:table-row table:style-name="ro1">
          <table:table-cell office:value-type="float" office:value="464.177154541016">
            <text:p>464.177154541</text:p>
          </table:table-cell>
          <table:table-cell office:value-type="float" office:value="-0.005627305">
            <text:p>-0.005627305</text:p>
          </table:table-cell>
          <table:table-cell table:number-columns-repeated="4"/>
        </table:table-row>
        <table:table-row table:style-name="ro1">
          <table:table-cell office:value-type="float" office:value="464.292083740234">
            <text:p>464.2920837402</text:p>
          </table:table-cell>
          <table:table-cell office:value-type="float" office:value="-0.009464276">
            <text:p>-0.009464276</text:p>
          </table:table-cell>
          <table:table-cell table:number-columns-repeated="4"/>
        </table:table-row>
        <table:table-row table:style-name="ro1">
          <table:table-cell office:value-type="float" office:value="464.406982421875">
            <text:p>464.4069824219</text:p>
          </table:table-cell>
          <table:table-cell office:value-type="float" office:value="0.005923919">
            <text:p>0.005923919</text:p>
          </table:table-cell>
          <table:table-cell table:number-columns-repeated="4"/>
        </table:table-row>
        <table:table-row table:style-name="ro1">
          <table:table-cell office:value-type="float" office:value="464.521911621094">
            <text:p>464.5219116211</text:p>
          </table:table-cell>
          <table:table-cell office:value-type="float" office:value="-0.003215646">
            <text:p>-0.003215646</text:p>
          </table:table-cell>
          <table:table-cell table:number-columns-repeated="4"/>
        </table:table-row>
        <table:table-row table:style-name="ro1">
          <table:table-cell office:value-type="float" office:value="464.636840820313">
            <text:p>464.6368408203</text:p>
          </table:table-cell>
          <table:table-cell office:value-type="float" office:value="-0.003216033">
            <text:p>-0.003216033</text:p>
          </table:table-cell>
          <table:table-cell table:number-columns-repeated="4"/>
        </table:table-row>
        <table:table-row table:style-name="ro1">
          <table:table-cell office:value-type="float" office:value="464.751770019531">
            <text:p>464.7517700195</text:p>
          </table:table-cell>
          <table:table-cell office:value-type="float" office:value="-0.007468838">
            <text:p>-0.007468838</text:p>
          </table:table-cell>
          <table:table-cell table:number-columns-repeated="4"/>
        </table:table-row>
        <table:table-row table:style-name="ro1">
          <table:table-cell office:value-type="float" office:value="464.866729736328">
            <text:p>464.8667297363</text:p>
          </table:table-cell>
          <table:table-cell office:value-type="float" office:value="0.003609071">
            <text:p>0.003609071</text:p>
          </table:table-cell>
          <table:table-cell table:number-columns-repeated="4"/>
        </table:table-row>
        <table:table-row table:style-name="ro1">
          <table:table-cell office:value-type="float" office:value="464.981658935547">
            <text:p>464.9816589355</text:p>
          </table:table-cell>
          <table:table-cell office:value-type="float" office:value="0.01276778">
            <text:p>0.01276778</text:p>
          </table:table-cell>
          <table:table-cell table:number-columns-repeated="4"/>
        </table:table-row>
        <table:table-row table:style-name="ro1">
          <table:table-cell office:value-type="float" office:value="465.096618652344">
            <text:p>465.0966186523</text:p>
          </table:table-cell>
          <table:table-cell office:value-type="float" office:value="-0.007262347">
            <text:p>-0.007262347</text:p>
          </table:table-cell>
          <table:table-cell table:number-columns-repeated="4"/>
        </table:table-row>
        <table:table-row table:style-name="ro1">
          <table:table-cell office:value-type="float" office:value="465.211547851563">
            <text:p>465.2115478516</text:p>
          </table:table-cell>
          <table:table-cell office:value-type="float" office:value="-0.01322661">
            <text:p>-0.01322661</text:p>
          </table:table-cell>
          <table:table-cell table:number-columns-repeated="4"/>
        </table:table-row>
        <table:table-row table:style-name="ro1">
          <table:table-cell office:value-type="float" office:value="465.326507568359">
            <text:p>465.3265075684</text:p>
          </table:table-cell>
          <table:table-cell office:value-type="float" office:value="-0.0082727">
            <text:p>-0.0082727</text:p>
          </table:table-cell>
          <table:table-cell table:number-columns-repeated="4"/>
        </table:table-row>
        <table:table-row table:style-name="ro1">
          <table:table-cell office:value-type="float" office:value="465.441467285156">
            <text:p>465.4414672852</text:p>
          </table:table-cell>
          <table:table-cell office:value-type="float" office:value="0.001873252">
            <text:p>0.001873252</text:p>
          </table:table-cell>
          <table:table-cell table:number-columns-repeated="4"/>
        </table:table-row>
        <table:table-row table:style-name="ro1">
          <table:table-cell office:value-type="float" office:value="465.556427001953">
            <text:p>465.556427002</text:p>
          </table:table-cell>
          <table:table-cell office:value-type="float" office:value="-0.00445588">
            <text:p>-0.00445588</text:p>
          </table:table-cell>
          <table:table-cell table:number-columns-repeated="4"/>
        </table:table-row>
        <table:table-row table:style-name="ro1">
          <table:table-cell office:value-type="float" office:value="465.671417236328">
            <text:p>465.6714172363</text:p>
          </table:table-cell>
          <table:table-cell office:value-type="float" office:value="-0.006887108">
            <text:p>-0.006887108</text:p>
          </table:table-cell>
          <table:table-cell table:number-columns-repeated="4"/>
        </table:table-row>
        <table:table-row table:style-name="ro1">
          <table:table-cell office:value-type="float" office:value="465.786376953125">
            <text:p>465.7863769531</text:p>
          </table:table-cell>
          <table:table-cell office:value-type="float" office:value="0.003841557">
            <text:p>0.003841557</text:p>
          </table:table-cell>
          <table:table-cell table:number-columns-repeated="4"/>
        </table:table-row>
        <table:table-row table:style-name="ro1">
          <table:table-cell office:value-type="float" office:value="465.9013671875">
            <text:p>465.9013671875</text:p>
          </table:table-cell>
          <table:table-cell office:value-type="float" office:value="0.004476801">
            <text:p>0.004476801</text:p>
          </table:table-cell>
          <table:table-cell table:number-columns-repeated="4"/>
        </table:table-row>
        <table:table-row table:style-name="ro1">
          <table:table-cell office:value-type="float" office:value="466.016357421875">
            <text:p>466.0163574219</text:p>
          </table:table-cell>
          <table:table-cell office:value-type="float" office:value="-0.00278217">
            <text:p>-0.00278217</text:p>
          </table:table-cell>
          <table:table-cell table:number-columns-repeated="4"/>
        </table:table-row>
        <table:table-row table:style-name="ro1">
          <table:table-cell office:value-type="float" office:value="466.13134765625">
            <text:p>466.1313476563</text:p>
          </table:table-cell>
          <table:table-cell office:value-type="float" office:value="-0.0118376">
            <text:p>-0.0118376</text:p>
          </table:table-cell>
          <table:table-cell table:number-columns-repeated="4"/>
        </table:table-row>
        <table:table-row table:style-name="ro1">
          <table:table-cell office:value-type="float" office:value="466.246337890625">
            <text:p>466.2463378906</text:p>
          </table:table-cell>
          <table:table-cell office:value-type="float" office:value="0.01564148">
            <text:p>0.01564148</text:p>
          </table:table-cell>
          <table:table-cell table:number-columns-repeated="4"/>
        </table:table-row>
        <table:table-row table:style-name="ro1">
          <table:table-cell office:value-type="float" office:value="466.361328125">
            <text:p>466.361328125</text:p>
          </table:table-cell>
          <table:table-cell office:value-type="float" office:value="-0.002295572">
            <text:p>-0.002295572</text:p>
          </table:table-cell>
          <table:table-cell table:number-columns-repeated="4"/>
        </table:table-row>
        <table:table-row table:style-name="ro1">
          <table:table-cell office:value-type="float" office:value="466.476318359375">
            <text:p>466.4763183594</text:p>
          </table:table-cell>
          <table:table-cell office:value-type="float" office:value="-0.01220826">
            <text:p>-0.01220826</text:p>
          </table:table-cell>
          <table:table-cell table:number-columns-repeated="4"/>
        </table:table-row>
        <table:table-row table:style-name="ro1">
          <table:table-cell office:value-type="float" office:value="466.591339111328">
            <text:p>466.5913391113</text:p>
          </table:table-cell>
          <table:table-cell office:value-type="float" office:value="0.003660548">
            <text:p>0.003660548</text:p>
          </table:table-cell>
          <table:table-cell table:number-columns-repeated="4"/>
        </table:table-row>
        <table:table-row table:style-name="ro1">
          <table:table-cell office:value-type="float" office:value="466.706329345703">
            <text:p>466.7063293457</text:p>
          </table:table-cell>
          <table:table-cell office:value-type="float" office:value="0.02331363">
            <text:p>0.02331363</text:p>
          </table:table-cell>
          <table:table-cell table:number-columns-repeated="4"/>
        </table:table-row>
        <table:table-row table:style-name="ro1">
          <table:table-cell office:value-type="float" office:value="466.821350097656">
            <text:p>466.8213500977</text:p>
          </table:table-cell>
          <table:table-cell office:value-type="float" office:value="-0.0007724591">
            <text:p>-0.0007724591</text:p>
          </table:table-cell>
          <table:table-cell table:number-columns-repeated="4"/>
        </table:table-row>
        <table:table-row table:style-name="ro1">
          <table:table-cell office:value-type="float" office:value="466.936370849609">
            <text:p>466.9363708496</text:p>
          </table:table-cell>
          <table:table-cell office:value-type="float" office:value="-0.005691805">
            <text:p>-0.005691805</text:p>
          </table:table-cell>
          <table:table-cell table:number-columns-repeated="4"/>
        </table:table-row>
        <table:table-row table:style-name="ro1">
          <table:table-cell office:value-type="float" office:value="467.051391601563">
            <text:p>467.0513916016</text:p>
          </table:table-cell>
          <table:table-cell office:value-type="float" office:value="0.00767522">
            <text:p>0.00767522</text:p>
          </table:table-cell>
          <table:table-cell table:number-columns-repeated="4"/>
        </table:table-row>
        <table:table-row table:style-name="ro1">
          <table:table-cell office:value-type="float" office:value="467.166442871094">
            <text:p>467.1664428711</text:p>
          </table:table-cell>
          <table:table-cell office:value-type="float" office:value="-0.004669667">
            <text:p>-0.004669667</text:p>
          </table:table-cell>
          <table:table-cell table:number-columns-repeated="4"/>
        </table:table-row>
        <table:table-row table:style-name="ro1">
          <table:table-cell office:value-type="float" office:value="467.281463623047">
            <text:p>467.281463623</text:p>
          </table:table-cell>
          <table:table-cell office:value-type="float" office:value="0.001475617">
            <text:p>0.001475617</text:p>
          </table:table-cell>
          <table:table-cell table:number-columns-repeated="4"/>
        </table:table-row>
        <table:table-row table:style-name="ro1">
          <table:table-cell office:value-type="float" office:value="467.396484375">
            <text:p>467.396484375</text:p>
          </table:table-cell>
          <table:table-cell office:value-type="float" office:value="-0.006647902">
            <text:p>-0.006647902</text:p>
          </table:table-cell>
          <table:table-cell table:number-columns-repeated="4"/>
        </table:table-row>
        <table:table-row table:style-name="ro1">
          <table:table-cell office:value-type="float" office:value="467.511535644531">
            <text:p>467.5115356445</text:p>
          </table:table-cell>
          <table:table-cell office:value-type="float" office:value="-0.008697974">
            <text:p>-0.008697974</text:p>
          </table:table-cell>
          <table:table-cell table:number-columns-repeated="4"/>
        </table:table-row>
        <table:table-row table:style-name="ro1">
          <table:table-cell office:value-type="float" office:value="467.626586914063">
            <text:p>467.6265869141</text:p>
          </table:table-cell>
          <table:table-cell office:value-type="float" office:value="0.001992114">
            <text:p>0.001992114</text:p>
          </table:table-cell>
          <table:table-cell table:number-columns-repeated="4"/>
        </table:table-row>
        <table:table-row table:style-name="ro1">
          <table:table-cell office:value-type="float" office:value="467.741638183594">
            <text:p>467.7416381836</text:p>
          </table:table-cell>
          <table:table-cell office:value-type="float" office:value="-0.009780631">
            <text:p>-0.009780631</text:p>
          </table:table-cell>
          <table:table-cell table:number-columns-repeated="4"/>
        </table:table-row>
        <table:table-row table:style-name="ro1">
          <table:table-cell office:value-type="float" office:value="467.856689453125">
            <text:p>467.8566894531</text:p>
          </table:table-cell>
          <table:table-cell office:value-type="float" office:value="-0.006683584">
            <text:p>-0.006683584</text:p>
          </table:table-cell>
          <table:table-cell table:number-columns-repeated="4"/>
        </table:table-row>
        <table:table-row table:style-name="ro1">
          <table:table-cell office:value-type="float" office:value="467.971740722656">
            <text:p>467.9717407227</text:p>
          </table:table-cell>
          <table:table-cell office:value-type="float" office:value="-0.008089771">
            <text:p>-0.008089771</text:p>
          </table:table-cell>
          <table:table-cell table:number-columns-repeated="4"/>
        </table:table-row>
        <table:table-row table:style-name="ro1">
          <table:table-cell office:value-type="float" office:value="468.086822509766">
            <text:p>468.0868225098</text:p>
          </table:table-cell>
          <table:table-cell office:value-type="float" office:value="-0.0009308069">
            <text:p>-0.0009308069</text:p>
          </table:table-cell>
          <table:table-cell table:number-columns-repeated="4"/>
        </table:table-row>
        <table:table-row table:style-name="ro1">
          <table:table-cell office:value-type="float" office:value="468.201873779297">
            <text:p>468.2018737793</text:p>
          </table:table-cell>
          <table:table-cell office:value-type="float" office:value="0.008869859">
            <text:p>0.008869859</text:p>
          </table:table-cell>
          <table:table-cell table:number-columns-repeated="4"/>
        </table:table-row>
        <table:table-row table:style-name="ro1">
          <table:table-cell office:value-type="float" office:value="468.316955566406">
            <text:p>468.3169555664</text:p>
          </table:table-cell>
          <table:table-cell office:value-type="float" office:value="-0.002105377">
            <text:p>-0.002105377</text:p>
          </table:table-cell>
          <table:table-cell table:number-columns-repeated="4"/>
        </table:table-row>
        <table:table-row table:style-name="ro1">
          <table:table-cell office:value-type="float" office:value="468.432037353516">
            <text:p>468.4320373535</text:p>
          </table:table-cell>
          <table:table-cell office:value-type="float" office:value="-0.003627988">
            <text:p>-0.003627988</text:p>
          </table:table-cell>
          <table:table-cell table:number-columns-repeated="4"/>
        </table:table-row>
        <table:table-row table:style-name="ro1">
          <table:table-cell office:value-type="float" office:value="468.547119140625">
            <text:p>468.5471191406</text:p>
          </table:table-cell>
          <table:table-cell office:value-type="float" office:value="-0.0004364612">
            <text:p>-0.0004364612</text:p>
          </table:table-cell>
          <table:table-cell table:number-columns-repeated="4"/>
        </table:table-row>
        <table:table-row table:style-name="ro1">
          <table:table-cell office:value-type="float" office:value="468.662200927734">
            <text:p>468.6622009277</text:p>
          </table:table-cell>
          <table:table-cell office:value-type="float" office:value="-0.00568984">
            <text:p>-0.00568984</text:p>
          </table:table-cell>
          <table:table-cell table:number-columns-repeated="4"/>
        </table:table-row>
        <table:table-row table:style-name="ro1">
          <table:table-cell office:value-type="float" office:value="468.777282714844">
            <text:p>468.7772827148</text:p>
          </table:table-cell>
          <table:table-cell office:value-type="float" office:value="-0.006807892">
            <text:p>-0.006807892</text:p>
          </table:table-cell>
          <table:table-cell table:number-columns-repeated="4"/>
        </table:table-row>
        <table:table-row table:style-name="ro1">
          <table:table-cell office:value-type="float" office:value="468.892395019531">
            <text:p>468.8923950195</text:p>
          </table:table-cell>
          <table:table-cell office:value-type="float" office:value="-0.005183733">
            <text:p>-0.005183733</text:p>
          </table:table-cell>
          <table:table-cell table:number-columns-repeated="4"/>
        </table:table-row>
        <table:table-row table:style-name="ro1">
          <table:table-cell office:value-type="float" office:value="469.007476806641">
            <text:p>469.0074768066</text:p>
          </table:table-cell>
          <table:table-cell office:value-type="float" office:value="0.02341672">
            <text:p>0.02341672</text:p>
          </table:table-cell>
          <table:table-cell table:number-columns-repeated="4"/>
        </table:table-row>
        <table:table-row table:style-name="ro1">
          <table:table-cell office:value-type="float" office:value="469.122589111328">
            <text:p>469.1225891113</text:p>
          </table:table-cell>
          <table:table-cell office:value-type="float" office:value="-0.0005946443">
            <text:p>-0.0005946443</text:p>
          </table:table-cell>
          <table:table-cell table:number-columns-repeated="4"/>
        </table:table-row>
        <table:table-row table:style-name="ro1">
          <table:table-cell office:value-type="float" office:value="469.237701416016">
            <text:p>469.237701416</text:p>
          </table:table-cell>
          <table:table-cell office:value-type="float" office:value="0.00232369">
            <text:p>0.00232369</text:p>
          </table:table-cell>
          <table:table-cell table:number-columns-repeated="4"/>
        </table:table-row>
        <table:table-row table:style-name="ro1">
          <table:table-cell office:value-type="float" office:value="469.352813720703">
            <text:p>469.3528137207</text:p>
          </table:table-cell>
          <table:table-cell office:value-type="float" office:value="0.008716545">
            <text:p>0.008716545</text:p>
          </table:table-cell>
          <table:table-cell table:number-columns-repeated="4"/>
        </table:table-row>
        <table:table-row table:style-name="ro1">
          <table:table-cell office:value-type="float" office:value="469.467926025391">
            <text:p>469.4679260254</text:p>
          </table:table-cell>
          <table:table-cell office:value-type="float" office:value="0.008685123">
            <text:p>0.008685123</text:p>
          </table:table-cell>
          <table:table-cell table:number-columns-repeated="4"/>
        </table:table-row>
        <table:table-row table:style-name="ro1">
          <table:table-cell office:value-type="float" office:value="469.583068847656">
            <text:p>469.5830688477</text:p>
          </table:table-cell>
          <table:table-cell office:value-type="float" office:value="0.008160839">
            <text:p>0.008160839</text:p>
          </table:table-cell>
          <table:table-cell table:number-columns-repeated="4"/>
        </table:table-row>
        <table:table-row table:style-name="ro1">
          <table:table-cell office:value-type="float" office:value="469.698181152344">
            <text:p>469.6981811523</text:p>
          </table:table-cell>
          <table:table-cell office:value-type="float" office:value="0.0007746649">
            <text:p>0.0007746649</text:p>
          </table:table-cell>
          <table:table-cell table:number-columns-repeated="4"/>
        </table:table-row>
        <table:table-row table:style-name="ro1">
          <table:table-cell office:value-type="float" office:value="469.813323974609">
            <text:p>469.8133239746</text:p>
          </table:table-cell>
          <table:table-cell office:value-type="float" office:value="-0.006136218">
            <text:p>-0.006136218</text:p>
          </table:table-cell>
          <table:table-cell table:number-columns-repeated="4"/>
        </table:table-row>
        <table:table-row table:style-name="ro1">
          <table:table-cell office:value-type="float" office:value="469.928436279297">
            <text:p>469.9284362793</text:p>
          </table:table-cell>
          <table:table-cell office:value-type="float" office:value="-0.003090223">
            <text:p>-0.003090223</text:p>
          </table:table-cell>
          <table:table-cell table:number-columns-repeated="4"/>
        </table:table-row>
        <table:table-row table:style-name="ro1">
          <table:table-cell office:value-type="float" office:value="470.043579101563">
            <text:p>470.0435791016</text:p>
          </table:table-cell>
          <table:table-cell office:value-type="float" office:value="0.005013313">
            <text:p>0.005013313</text:p>
          </table:table-cell>
          <table:table-cell table:number-columns-repeated="4"/>
        </table:table-row>
        <table:table-row table:style-name="ro1">
          <table:table-cell office:value-type="float" office:value="470.158721923828">
            <text:p>470.1587219238</text:p>
          </table:table-cell>
          <table:table-cell office:value-type="float" office:value="-0.009950207">
            <text:p>-0.009950207</text:p>
          </table:table-cell>
          <table:table-cell table:number-columns-repeated="4"/>
        </table:table-row>
        <table:table-row table:style-name="ro1">
          <table:table-cell office:value-type="float" office:value="470.273895263672">
            <text:p>470.2738952637</text:p>
          </table:table-cell>
          <table:table-cell office:value-type="float" office:value="0.004049913">
            <text:p>0.004049913</text:p>
          </table:table-cell>
          <table:table-cell table:number-columns-repeated="4"/>
        </table:table-row>
        <table:table-row table:style-name="ro1">
          <table:table-cell office:value-type="float" office:value="470.389038085938">
            <text:p>470.3890380859</text:p>
          </table:table-cell>
          <table:table-cell office:value-type="float" office:value="0.004260612">
            <text:p>0.004260612</text:p>
          </table:table-cell>
          <table:table-cell table:number-columns-repeated="4"/>
        </table:table-row>
        <table:table-row table:style-name="ro1">
          <table:table-cell office:value-type="float" office:value="470.504180908203">
            <text:p>470.5041809082</text:p>
          </table:table-cell>
          <table:table-cell office:value-type="float" office:value="-0.0007517922">
            <text:p>-0.0007517922</text:p>
          </table:table-cell>
          <table:table-cell table:number-columns-repeated="4"/>
        </table:table-row>
        <table:table-row table:style-name="ro1">
          <table:table-cell office:value-type="float" office:value="470.619354248047">
            <text:p>470.619354248</text:p>
          </table:table-cell>
          <table:table-cell office:value-type="float" office:value="-0.008838843">
            <text:p>-0.008838843</text:p>
          </table:table-cell>
          <table:table-cell table:number-columns-repeated="4"/>
        </table:table-row>
        <table:table-row table:style-name="ro1">
          <table:table-cell office:value-type="float" office:value="470.734527587891">
            <text:p>470.7345275879</text:p>
          </table:table-cell>
          <table:table-cell office:value-type="float" office:value="0.009248072">
            <text:p>0.009248072</text:p>
          </table:table-cell>
          <table:table-cell table:number-columns-repeated="4"/>
        </table:table-row>
        <table:table-row table:style-name="ro1">
          <table:table-cell office:value-type="float" office:value="470.849700927734">
            <text:p>470.8497009277</text:p>
          </table:table-cell>
          <table:table-cell office:value-type="float" office:value="0.04161338">
            <text:p>0.04161338</text:p>
          </table:table-cell>
          <table:table-cell table:number-columns-repeated="4"/>
        </table:table-row>
        <table:table-row table:style-name="ro1">
          <table:table-cell office:value-type="float" office:value="470.964874267578">
            <text:p>470.9648742676</text:p>
          </table:table-cell>
          <table:table-cell office:value-type="float" office:value="0.002037835">
            <text:p>0.002037835</text:p>
          </table:table-cell>
          <table:table-cell table:number-columns-repeated="4"/>
        </table:table-row>
        <table:table-row table:style-name="ro1">
          <table:table-cell office:value-type="float" office:value="471.080047607422">
            <text:p>471.0800476074</text:p>
          </table:table-cell>
          <table:table-cell office:value-type="float" office:value="0.01540929">
            <text:p>0.01540929</text:p>
          </table:table-cell>
          <table:table-cell table:number-columns-repeated="4"/>
        </table:table-row>
        <table:table-row table:style-name="ro1">
          <table:table-cell office:value-type="float" office:value="471.195220947266">
            <text:p>471.1952209473</text:p>
          </table:table-cell>
          <table:table-cell office:value-type="float" office:value="-0.01090808">
            <text:p>-0.01090808</text:p>
          </table:table-cell>
          <table:table-cell table:number-columns-repeated="4"/>
        </table:table-row>
        <table:table-row table:style-name="ro1">
          <table:table-cell office:value-type="float" office:value="471.310424804688">
            <text:p>471.3104248047</text:p>
          </table:table-cell>
          <table:table-cell office:value-type="float" office:value="0.006083207">
            <text:p>0.006083207</text:p>
          </table:table-cell>
          <table:table-cell table:number-columns-repeated="4"/>
        </table:table-row>
        <table:table-row table:style-name="ro1">
          <table:table-cell office:value-type="float" office:value="471.425628662109">
            <text:p>471.4256286621</text:p>
          </table:table-cell>
          <table:table-cell office:value-type="float" office:value="0.004020422">
            <text:p>0.004020422</text:p>
          </table:table-cell>
          <table:table-cell table:number-columns-repeated="4"/>
        </table:table-row>
        <table:table-row table:style-name="ro1">
          <table:table-cell office:value-type="float" office:value="471.540802001953">
            <text:p>471.540802002</text:p>
          </table:table-cell>
          <table:table-cell office:value-type="float" office:value="0.0149302">
            <text:p>0.0149302</text:p>
          </table:table-cell>
          <table:table-cell table:number-columns-repeated="4"/>
        </table:table-row>
        <table:table-row table:style-name="ro1">
          <table:table-cell office:value-type="float" office:value="471.656005859375">
            <text:p>471.6560058594</text:p>
          </table:table-cell>
          <table:table-cell office:value-type="float" office:value="-0.00186998">
            <text:p>-0.00186998</text:p>
          </table:table-cell>
          <table:table-cell table:number-columns-repeated="4"/>
        </table:table-row>
        <table:table-row table:style-name="ro1">
          <table:table-cell office:value-type="float" office:value="471.771209716797">
            <text:p>471.7712097168</text:p>
          </table:table-cell>
          <table:table-cell office:value-type="float" office:value="0.01899439">
            <text:p>0.01899439</text:p>
          </table:table-cell>
          <table:table-cell table:number-columns-repeated="4"/>
        </table:table-row>
        <table:table-row table:style-name="ro1">
          <table:table-cell office:value-type="float" office:value="471.886444091797">
            <text:p>471.8864440918</text:p>
          </table:table-cell>
          <table:table-cell office:value-type="float" office:value="0.01368714">
            <text:p>0.01368714</text:p>
          </table:table-cell>
          <table:table-cell table:number-columns-repeated="4"/>
        </table:table-row>
        <table:table-row table:style-name="ro1">
          <table:table-cell office:value-type="float" office:value="472.001647949219">
            <text:p>472.0016479492</text:p>
          </table:table-cell>
          <table:table-cell office:value-type="float" office:value="0.004940889">
            <text:p>0.004940889</text:p>
          </table:table-cell>
          <table:table-cell table:number-columns-repeated="4"/>
        </table:table-row>
        <table:table-row table:style-name="ro1">
          <table:table-cell office:value-type="float" office:value="472.116882324219">
            <text:p>472.1168823242</text:p>
          </table:table-cell>
          <table:table-cell office:value-type="float" office:value="-0.009324157">
            <text:p>-0.009324157</text:p>
          </table:table-cell>
          <table:table-cell table:number-columns-repeated="4"/>
        </table:table-row>
        <table:table-row table:style-name="ro1">
          <table:table-cell office:value-type="float" office:value="472.232086181641">
            <text:p>472.2320861816</text:p>
          </table:table-cell>
          <table:table-cell office:value-type="float" office:value="0.002186619">
            <text:p>0.002186619</text:p>
          </table:table-cell>
          <table:table-cell table:number-columns-repeated="4"/>
        </table:table-row>
        <table:table-row table:style-name="ro1">
          <table:table-cell office:value-type="float" office:value="472.347320556641">
            <text:p>472.3473205566</text:p>
          </table:table-cell>
          <table:table-cell office:value-type="float" office:value="0.001683493">
            <text:p>0.001683493</text:p>
          </table:table-cell>
          <table:table-cell table:number-columns-repeated="4"/>
        </table:table-row>
        <table:table-row table:style-name="ro1">
          <table:table-cell office:value-type="float" office:value="472.462554931641">
            <text:p>472.4625549316</text:p>
          </table:table-cell>
          <table:table-cell office:value-type="float" office:value="-0.01338053">
            <text:p>-0.01338053</text:p>
          </table:table-cell>
          <table:table-cell table:number-columns-repeated="4"/>
        </table:table-row>
        <table:table-row table:style-name="ro1">
          <table:table-cell office:value-type="float" office:value="472.577789306641">
            <text:p>472.5777893066</text:p>
          </table:table-cell>
          <table:table-cell office:value-type="float" office:value="-0.008889786">
            <text:p>-0.008889786</text:p>
          </table:table-cell>
          <table:table-cell table:number-columns-repeated="4"/>
        </table:table-row>
        <table:table-row table:style-name="ro1">
          <table:table-cell office:value-type="float" office:value="472.693023681641">
            <text:p>472.6930236816</text:p>
          </table:table-cell>
          <table:table-cell office:value-type="float" office:value="0.008310548">
            <text:p>0.008310548</text:p>
          </table:table-cell>
          <table:table-cell table:number-columns-repeated="4"/>
        </table:table-row>
        <table:table-row table:style-name="ro1">
          <table:table-cell office:value-type="float" office:value="472.808288574219">
            <text:p>472.8082885742</text:p>
          </table:table-cell>
          <table:table-cell office:value-type="float" office:value="-0.0008977543">
            <text:p>-0.0008977543</text:p>
          </table:table-cell>
          <table:table-cell table:number-columns-repeated="4"/>
        </table:table-row>
        <table:table-row table:style-name="ro1">
          <table:table-cell office:value-type="float" office:value="472.923522949219">
            <text:p>472.9235229492</text:p>
          </table:table-cell>
          <table:table-cell office:value-type="float" office:value="-0.007505673">
            <text:p>-0.007505673</text:p>
          </table:table-cell>
          <table:table-cell table:number-columns-repeated="4"/>
        </table:table-row>
        <table:table-row table:style-name="ro1">
          <table:table-cell office:value-type="float" office:value="473.038787841797">
            <text:p>473.0387878418</text:p>
          </table:table-cell>
          <table:table-cell office:value-type="float" office:value="-0.01135152">
            <text:p>-0.01135152</text:p>
          </table:table-cell>
          <table:table-cell table:number-columns-repeated="4"/>
        </table:table-row>
        <table:table-row table:style-name="ro1">
          <table:table-cell office:value-type="float" office:value="473.154052734375">
            <text:p>473.1540527344</text:p>
          </table:table-cell>
          <table:table-cell office:value-type="float" office:value="0.01278735">
            <text:p>0.01278735</text:p>
          </table:table-cell>
          <table:table-cell table:number-columns-repeated="4"/>
        </table:table-row>
        <table:table-row table:style-name="ro1">
          <table:table-cell office:value-type="float" office:value="473.269317626953">
            <text:p>473.269317627</text:p>
          </table:table-cell>
          <table:table-cell office:value-type="float" office:value="0.006392346">
            <text:p>0.006392346</text:p>
          </table:table-cell>
          <table:table-cell table:number-columns-repeated="4"/>
        </table:table-row>
        <table:table-row table:style-name="ro1">
          <table:table-cell office:value-type="float" office:value="473.384582519531">
            <text:p>473.3845825195</text:p>
          </table:table-cell>
          <table:table-cell office:value-type="float" office:value="-0.005640634">
            <text:p>-0.005640634</text:p>
          </table:table-cell>
          <table:table-cell table:number-columns-repeated="4"/>
        </table:table-row>
        <table:table-row table:style-name="ro1">
          <table:table-cell office:value-type="float" office:value="473.499847412109">
            <text:p>473.4998474121</text:p>
          </table:table-cell>
          <table:table-cell office:value-type="float" office:value="-0.002402652">
            <text:p>-0.002402652</text:p>
          </table:table-cell>
          <table:table-cell table:number-columns-repeated="4"/>
        </table:table-row>
        <table:table-row table:style-name="ro1">
          <table:table-cell office:value-type="float" office:value="473.615112304688">
            <text:p>473.6151123047</text:p>
          </table:table-cell>
          <table:table-cell office:value-type="float" office:value="0.0143944">
            <text:p>0.0143944</text:p>
          </table:table-cell>
          <table:table-cell table:number-columns-repeated="4"/>
        </table:table-row>
        <table:table-row table:style-name="ro1">
          <table:table-cell office:value-type="float" office:value="473.730407714844">
            <text:p>473.7304077148</text:p>
          </table:table-cell>
          <table:table-cell office:value-type="float" office:value="0.02450683">
            <text:p>0.02450683</text:p>
          </table:table-cell>
          <table:table-cell table:number-columns-repeated="4"/>
        </table:table-row>
        <table:table-row table:style-name="ro1">
          <table:table-cell office:value-type="float" office:value="473.845703125">
            <text:p>473.845703125</text:p>
          </table:table-cell>
          <table:table-cell office:value-type="float" office:value="-0.00397072">
            <text:p>-0.00397072</text:p>
          </table:table-cell>
          <table:table-cell table:number-columns-repeated="4"/>
        </table:table-row>
        <table:table-row table:style-name="ro1">
          <table:table-cell office:value-type="float" office:value="473.960998535156">
            <text:p>473.9609985352</text:p>
          </table:table-cell>
          <table:table-cell office:value-type="float" office:value="0.00202523">
            <text:p>0.00202523</text:p>
          </table:table-cell>
          <table:table-cell table:number-columns-repeated="4"/>
        </table:table-row>
        <table:table-row table:style-name="ro1">
          <table:table-cell office:value-type="float" office:value="474.076263427734">
            <text:p>474.0762634277</text:p>
          </table:table-cell>
          <table:table-cell office:value-type="float" office:value="0.002774145">
            <text:p>0.002774145</text:p>
          </table:table-cell>
          <table:table-cell table:number-columns-repeated="4"/>
        </table:table-row>
        <table:table-row table:style-name="ro1">
          <table:table-cell office:value-type="float" office:value="474.191589355469">
            <text:p>474.1915893555</text:p>
          </table:table-cell>
          <table:table-cell office:value-type="float" office:value="0.01797236">
            <text:p>0.01797236</text:p>
          </table:table-cell>
          <table:table-cell table:number-columns-repeated="4"/>
        </table:table-row>
        <table:table-row table:style-name="ro1">
          <table:table-cell office:value-type="float" office:value="474.306884765625">
            <text:p>474.3068847656</text:p>
          </table:table-cell>
          <table:table-cell office:value-type="float" office:value="0.01966707">
            <text:p>0.01966707</text:p>
          </table:table-cell>
          <table:table-cell table:number-columns-repeated="4"/>
        </table:table-row>
        <table:table-row table:style-name="ro1">
          <table:table-cell office:value-type="float" office:value="474.422180175781">
            <text:p>474.4221801758</text:p>
          </table:table-cell>
          <table:table-cell office:value-type="float" office:value="-0.01247876">
            <text:p>-0.01247876</text:p>
          </table:table-cell>
          <table:table-cell table:number-columns-repeated="4"/>
        </table:table-row>
        <table:table-row table:style-name="ro1">
          <table:table-cell office:value-type="float" office:value="474.537506103516">
            <text:p>474.5375061035</text:p>
          </table:table-cell>
          <table:table-cell office:value-type="float" office:value="0.005231704">
            <text:p>0.005231704</text:p>
          </table:table-cell>
          <table:table-cell table:number-columns-repeated="4"/>
        </table:table-row>
        <table:table-row table:style-name="ro1">
          <table:table-cell office:value-type="float" office:value="474.652801513672">
            <text:p>474.6528015137</text:p>
          </table:table-cell>
          <table:table-cell office:value-type="float" office:value="-0.004784051">
            <text:p>-0.004784051</text:p>
          </table:table-cell>
          <table:table-cell table:number-columns-repeated="4"/>
        </table:table-row>
        <table:table-row table:style-name="ro1">
          <table:table-cell office:value-type="float" office:value="474.768127441406">
            <text:p>474.7681274414</text:p>
          </table:table-cell>
          <table:table-cell office:value-type="float" office:value="-0.008888728">
            <text:p>-0.008888728</text:p>
          </table:table-cell>
          <table:table-cell table:number-columns-repeated="4"/>
        </table:table-row>
        <table:table-row table:style-name="ro1">
          <table:table-cell office:value-type="float" office:value="474.883453369141">
            <text:p>474.8834533691</text:p>
          </table:table-cell>
          <table:table-cell office:value-type="float" office:value="-0.007851596">
            <text:p>-0.007851596</text:p>
          </table:table-cell>
          <table:table-cell table:number-columns-repeated="4"/>
        </table:table-row>
        <table:table-row table:style-name="ro1">
          <table:table-cell office:value-type="float" office:value="474.998779296875">
            <text:p>474.9987792969</text:p>
          </table:table-cell>
          <table:table-cell office:value-type="float" office:value="0.004513724">
            <text:p>0.004513724</text:p>
          </table:table-cell>
          <table:table-cell table:number-columns-repeated="4"/>
        </table:table-row>
        <table:table-row table:style-name="ro1">
          <table:table-cell office:value-type="float" office:value="475.114135742188">
            <text:p>475.1141357422</text:p>
          </table:table-cell>
          <table:table-cell office:value-type="float" office:value="-0.00624915">
            <text:p>-0.00624915</text:p>
          </table:table-cell>
          <table:table-cell table:number-columns-repeated="4"/>
        </table:table-row>
        <table:table-row table:style-name="ro1">
          <table:table-cell office:value-type="float" office:value="475.229461669922">
            <text:p>475.2294616699</text:p>
          </table:table-cell>
          <table:table-cell office:value-type="float" office:value="-0.00617173">
            <text:p>-0.00617173</text:p>
          </table:table-cell>
          <table:table-cell table:number-columns-repeated="4"/>
        </table:table-row>
        <table:table-row table:style-name="ro1">
          <table:table-cell office:value-type="float" office:value="475.344818115234">
            <text:p>475.3448181152</text:p>
          </table:table-cell>
          <table:table-cell office:value-type="float" office:value="0.002037697">
            <text:p>0.002037697</text:p>
          </table:table-cell>
          <table:table-cell table:number-columns-repeated="4"/>
        </table:table-row>
        <table:table-row table:style-name="ro1">
          <table:table-cell office:value-type="float" office:value="475.460144042969">
            <text:p>475.460144043</text:p>
          </table:table-cell>
          <table:table-cell office:value-type="float" office:value="0.008292192">
            <text:p>0.008292192</text:p>
          </table:table-cell>
          <table:table-cell table:number-columns-repeated="4"/>
        </table:table-row>
        <table:table-row table:style-name="ro1">
          <table:table-cell office:value-type="float" office:value="475.575500488281">
            <text:p>475.5755004883</text:p>
          </table:table-cell>
          <table:table-cell office:value-type="float" office:value="0.002170821">
            <text:p>0.002170821</text:p>
          </table:table-cell>
          <table:table-cell table:number-columns-repeated="4"/>
        </table:table-row>
        <table:table-row table:style-name="ro1">
          <table:table-cell office:value-type="float" office:value="475.690856933594">
            <text:p>475.6908569336</text:p>
          </table:table-cell>
          <table:table-cell office:value-type="float" office:value="-0.01074848">
            <text:p>-0.01074848</text:p>
          </table:table-cell>
          <table:table-cell table:number-columns-repeated="4"/>
        </table:table-row>
        <table:table-row table:style-name="ro1">
          <table:table-cell office:value-type="float" office:value="475.806213378906">
            <text:p>475.8062133789</text:p>
          </table:table-cell>
          <table:table-cell office:value-type="float" office:value="-0.01144532">
            <text:p>-0.01144532</text:p>
          </table:table-cell>
          <table:table-cell table:number-columns-repeated="4"/>
        </table:table-row>
        <table:table-row table:style-name="ro1">
          <table:table-cell office:value-type="float" office:value="475.921569824219">
            <text:p>475.9215698242</text:p>
          </table:table-cell>
          <table:table-cell office:value-type="float" office:value="0.001885023">
            <text:p>0.001885023</text:p>
          </table:table-cell>
          <table:table-cell table:number-columns-repeated="4"/>
        </table:table-row>
        <table:table-row table:style-name="ro1">
          <table:table-cell office:value-type="float" office:value="476.036956787109">
            <text:p>476.0369567871</text:p>
          </table:table-cell>
          <table:table-cell office:value-type="float" office:value="0.006632393">
            <text:p>0.006632393</text:p>
          </table:table-cell>
          <table:table-cell table:number-columns-repeated="4"/>
        </table:table-row>
        <table:table-row table:style-name="ro1">
          <table:table-cell office:value-type="float" office:value="476.152313232422">
            <text:p>476.1523132324</text:p>
          </table:table-cell>
          <table:table-cell office:value-type="float" office:value="0.006073717">
            <text:p>0.006073717</text:p>
          </table:table-cell>
          <table:table-cell table:number-columns-repeated="4"/>
        </table:table-row>
        <table:table-row table:style-name="ro1">
          <table:table-cell office:value-type="float" office:value="476.267700195313">
            <text:p>476.2677001953</text:p>
          </table:table-cell>
          <table:table-cell office:value-type="float" office:value="-0.0118519">
            <text:p>-0.0118519</text:p>
          </table:table-cell>
          <table:table-cell table:number-columns-repeated="4"/>
        </table:table-row>
        <table:table-row table:style-name="ro1">
          <table:table-cell office:value-type="float" office:value="476.383087158203">
            <text:p>476.3830871582</text:p>
          </table:table-cell>
          <table:table-cell office:value-type="float" office:value="0.01369157">
            <text:p>0.01369157</text:p>
          </table:table-cell>
          <table:table-cell table:number-columns-repeated="4"/>
        </table:table-row>
        <table:table-row table:style-name="ro1">
          <table:table-cell office:value-type="float" office:value="476.498474121094">
            <text:p>476.4984741211</text:p>
          </table:table-cell>
          <table:table-cell office:value-type="float" office:value="0.0008071872">
            <text:p>0.0008071872</text:p>
          </table:table-cell>
          <table:table-cell table:number-columns-repeated="4"/>
        </table:table-row>
        <table:table-row table:style-name="ro1">
          <table:table-cell office:value-type="float" office:value="476.613861083984">
            <text:p>476.613861084</text:p>
          </table:table-cell>
          <table:table-cell office:value-type="float" office:value="-0.00838583">
            <text:p>-0.00838583</text:p>
          </table:table-cell>
          <table:table-cell table:number-columns-repeated="4"/>
        </table:table-row>
        <table:table-row table:style-name="ro1">
          <table:table-cell office:value-type="float" office:value="476.729248046875">
            <text:p>476.7292480469</text:p>
          </table:table-cell>
          <table:table-cell office:value-type="float" office:value="-0.006571181">
            <text:p>-0.006571181</text:p>
          </table:table-cell>
          <table:table-cell table:number-columns-repeated="4"/>
        </table:table-row>
        <table:table-row table:style-name="ro1">
          <table:table-cell office:value-type="float" office:value="476.844665527344">
            <text:p>476.8446655273</text:p>
          </table:table-cell>
          <table:table-cell office:value-type="float" office:value="0.01454142">
            <text:p>0.01454142</text:p>
          </table:table-cell>
          <table:table-cell table:number-columns-repeated="4"/>
        </table:table-row>
        <table:table-row table:style-name="ro1">
          <table:table-cell office:value-type="float" office:value="476.960052490234">
            <text:p>476.9600524902</text:p>
          </table:table-cell>
          <table:table-cell office:value-type="float" office:value="0.002034178">
            <text:p>0.002034178</text:p>
          </table:table-cell>
          <table:table-cell table:number-columns-repeated="4"/>
        </table:table-row>
        <table:table-row table:style-name="ro1">
          <table:table-cell office:value-type="float" office:value="477.075469970703">
            <text:p>477.0754699707</text:p>
          </table:table-cell>
          <table:table-cell office:value-type="float" office:value="-0.01274223">
            <text:p>-0.01274223</text:p>
          </table:table-cell>
          <table:table-cell table:number-columns-repeated="4"/>
        </table:table-row>
        <table:table-row table:style-name="ro1">
          <table:table-cell office:value-type="float" office:value="477.190887451172">
            <text:p>477.1908874512</text:p>
          </table:table-cell>
          <table:table-cell office:value-type="float" office:value="-0.008206444">
            <text:p>-0.008206444</text:p>
          </table:table-cell>
          <table:table-cell table:number-columns-repeated="4"/>
        </table:table-row>
        <table:table-row table:style-name="ro1">
          <table:table-cell office:value-type="float" office:value="477.306304931641">
            <text:p>477.3063049316</text:p>
          </table:table-cell>
          <table:table-cell office:value-type="float" office:value="0.01494964">
            <text:p>0.01494964</text:p>
          </table:table-cell>
          <table:table-cell table:number-columns-repeated="4"/>
        </table:table-row>
        <table:table-row table:style-name="ro1">
          <table:table-cell office:value-type="float" office:value="477.421722412109">
            <text:p>477.4217224121</text:p>
          </table:table-cell>
          <table:table-cell office:value-type="float" office:value="-0.007465377">
            <text:p>-0.007465377</text:p>
          </table:table-cell>
          <table:table-cell table:number-columns-repeated="4"/>
        </table:table-row>
        <table:table-row table:style-name="ro1">
          <table:table-cell office:value-type="float" office:value="477.537139892578">
            <text:p>477.5371398926</text:p>
          </table:table-cell>
          <table:table-cell office:value-type="float" office:value="-0.004994184">
            <text:p>-0.004994184</text:p>
          </table:table-cell>
          <table:table-cell table:number-columns-repeated="4"/>
        </table:table-row>
        <table:table-row table:style-name="ro1">
          <table:table-cell office:value-type="float" office:value="477.652557373047">
            <text:p>477.652557373</text:p>
          </table:table-cell>
          <table:table-cell office:value-type="float" office:value="-0.01291061">
            <text:p>-0.01291061</text:p>
          </table:table-cell>
          <table:table-cell table:number-columns-repeated="4"/>
        </table:table-row>
        <table:table-row table:style-name="ro1">
          <table:table-cell office:value-type="float" office:value="477.768005371094">
            <text:p>477.7680053711</text:p>
          </table:table-cell>
          <table:table-cell office:value-type="float" office:value="-0.005165294">
            <text:p>-0.005165294</text:p>
          </table:table-cell>
          <table:table-cell table:number-columns-repeated="4"/>
        </table:table-row>
        <table:table-row table:style-name="ro1">
          <table:table-cell office:value-type="float" office:value="477.883422851563">
            <text:p>477.8834228516</text:p>
          </table:table-cell>
          <table:table-cell office:value-type="float" office:value="0.01079703">
            <text:p>0.01079703</text:p>
          </table:table-cell>
          <table:table-cell table:number-columns-repeated="4"/>
        </table:table-row>
        <table:table-row table:style-name="ro1">
          <table:table-cell office:value-type="float" office:value="477.998870849609">
            <text:p>477.9988708496</text:p>
          </table:table-cell>
          <table:table-cell office:value-type="float" office:value="-0.01372255">
            <text:p>-0.01372255</text:p>
          </table:table-cell>
          <table:table-cell table:number-columns-repeated="4"/>
        </table:table-row>
        <table:table-row table:style-name="ro1">
          <table:table-cell office:value-type="float" office:value="478.114318847656">
            <text:p>478.1143188477</text:p>
          </table:table-cell>
          <table:table-cell office:value-type="float" office:value="-0.006040017">
            <text:p>-0.006040017</text:p>
          </table:table-cell>
          <table:table-cell table:number-columns-repeated="4"/>
        </table:table-row>
        <table:table-row table:style-name="ro1">
          <table:table-cell office:value-type="float" office:value="478.229766845703">
            <text:p>478.2297668457</text:p>
          </table:table-cell>
          <table:table-cell office:value-type="float" office:value="0.003646149">
            <text:p>0.003646149</text:p>
          </table:table-cell>
          <table:table-cell table:number-columns-repeated="4"/>
        </table:table-row>
        <table:table-row table:style-name="ro1">
          <table:table-cell office:value-type="float" office:value="478.345245361328">
            <text:p>478.3452453613</text:p>
          </table:table-cell>
          <table:table-cell office:value-type="float" office:value="0.0006001825">
            <text:p>0.0006001825</text:p>
          </table:table-cell>
          <table:table-cell table:number-columns-repeated="4"/>
        </table:table-row>
        <table:table-row table:style-name="ro1">
          <table:table-cell office:value-type="float" office:value="478.460693359375">
            <text:p>478.4606933594</text:p>
          </table:table-cell>
          <table:table-cell office:value-type="float" office:value="-0.01188495">
            <text:p>-0.01188495</text:p>
          </table:table-cell>
          <table:table-cell table:number-columns-repeated="4"/>
        </table:table-row>
        <table:table-row table:style-name="ro1">
          <table:table-cell office:value-type="float" office:value="478.576141357422">
            <text:p>478.5761413574</text:p>
          </table:table-cell>
          <table:table-cell office:value-type="float" office:value="-0.005651701">
            <text:p>-0.005651701</text:p>
          </table:table-cell>
          <table:table-cell table:number-columns-repeated="4"/>
        </table:table-row>
        <table:table-row table:style-name="ro1">
          <table:table-cell office:value-type="float" office:value="478.691619873047">
            <text:p>478.691619873</text:p>
          </table:table-cell>
          <table:table-cell office:value-type="float" office:value="0.01080431">
            <text:p>0.01080431</text:p>
          </table:table-cell>
          <table:table-cell table:number-columns-repeated="4"/>
        </table:table-row>
        <table:table-row table:style-name="ro1">
          <table:table-cell office:value-type="float" office:value="478.807098388672">
            <text:p>478.8070983887</text:p>
          </table:table-cell>
          <table:table-cell office:value-type="float" office:value="-0.002013804">
            <text:p>-0.002013804</text:p>
          </table:table-cell>
          <table:table-cell table:number-columns-repeated="4"/>
        </table:table-row>
        <table:table-row table:style-name="ro1">
          <table:table-cell office:value-type="float" office:value="478.922576904297">
            <text:p>478.9225769043</text:p>
          </table:table-cell>
          <table:table-cell office:value-type="float" office:value="-0.004491114">
            <text:p>-0.004491114</text:p>
          </table:table-cell>
          <table:table-cell table:number-columns-repeated="4"/>
        </table:table-row>
        <table:table-row table:style-name="ro1">
          <table:table-cell office:value-type="float" office:value="479.038055419922">
            <text:p>479.0380554199</text:p>
          </table:table-cell>
          <table:table-cell office:value-type="float" office:value="-0.01192815">
            <text:p>-0.01192815</text:p>
          </table:table-cell>
          <table:table-cell table:number-columns-repeated="4"/>
        </table:table-row>
        <table:table-row table:style-name="ro1">
          <table:table-cell office:value-type="float" office:value="479.153533935547">
            <text:p>479.1535339355</text:p>
          </table:table-cell>
          <table:table-cell office:value-type="float" office:value="-0.002234171">
            <text:p>-0.002234171</text:p>
          </table:table-cell>
          <table:table-cell table:number-columns-repeated="4"/>
        </table:table-row>
        <table:table-row table:style-name="ro1">
          <table:table-cell office:value-type="float" office:value="479.269012451172">
            <text:p>479.2690124512</text:p>
          </table:table-cell>
          <table:table-cell office:value-type="float" office:value="0.01855696">
            <text:p>0.01855696</text:p>
          </table:table-cell>
          <table:table-cell table:number-columns-repeated="4"/>
        </table:table-row>
        <table:table-row table:style-name="ro1">
          <table:table-cell office:value-type="float" office:value="479.384521484375">
            <text:p>479.3845214844</text:p>
          </table:table-cell>
          <table:table-cell office:value-type="float" office:value="-0.008456572">
            <text:p>-0.008456572</text:p>
          </table:table-cell>
          <table:table-cell table:number-columns-repeated="4"/>
        </table:table-row>
        <table:table-row table:style-name="ro1">
          <table:table-cell office:value-type="float" office:value="479.500030517578">
            <text:p>479.5000305176</text:p>
          </table:table-cell>
          <table:table-cell office:value-type="float" office:value="-0.005983317">
            <text:p>-0.005983317</text:p>
          </table:table-cell>
          <table:table-cell table:number-columns-repeated="4"/>
        </table:table-row>
        <table:table-row table:style-name="ro1">
          <table:table-cell office:value-type="float" office:value="479.615509033203">
            <text:p>479.6155090332</text:p>
          </table:table-cell>
          <table:table-cell office:value-type="float" office:value="0.002297605">
            <text:p>0.002297605</text:p>
          </table:table-cell>
          <table:table-cell table:number-columns-repeated="4"/>
        </table:table-row>
        <table:table-row table:style-name="ro1">
          <table:table-cell office:value-type="float" office:value="479.731018066406">
            <text:p>479.7310180664</text:p>
          </table:table-cell>
          <table:table-cell office:value-type="float" office:value="0.002247605">
            <text:p>0.002247605</text:p>
          </table:table-cell>
          <table:table-cell table:number-columns-repeated="4"/>
        </table:table-row>
        <table:table-row table:style-name="ro1">
          <table:table-cell office:value-type="float" office:value="479.846527099609">
            <text:p>479.8465270996</text:p>
          </table:table-cell>
          <table:table-cell office:value-type="float" office:value="-0.006686769">
            <text:p>-0.006686769</text:p>
          </table:table-cell>
          <table:table-cell table:number-columns-repeated="4"/>
        </table:table-row>
        <table:table-row table:style-name="ro1">
          <table:table-cell office:value-type="float" office:value="479.962066650391">
            <text:p>479.9620666504</text:p>
          </table:table-cell>
          <table:table-cell office:value-type="float" office:value="-0.004500518">
            <text:p>-0.004500518</text:p>
          </table:table-cell>
          <table:table-cell table:number-columns-repeated="4"/>
        </table:table-row>
        <table:table-row table:style-name="ro1">
          <table:table-cell office:value-type="float" office:value="480.077575683594">
            <text:p>480.0775756836</text:p>
          </table:table-cell>
          <table:table-cell office:value-type="float" office:value="0.003102444">
            <text:p>0.003102444</text:p>
          </table:table-cell>
          <table:table-cell table:number-columns-repeated="4"/>
        </table:table-row>
        <table:table-row table:style-name="ro1">
          <table:table-cell office:value-type="float" office:value="480.193084716797">
            <text:p>480.1930847168</text:p>
          </table:table-cell>
          <table:table-cell office:value-type="float" office:value="0.01278913">
            <text:p>0.01278913</text:p>
          </table:table-cell>
          <table:table-cell table:number-columns-repeated="4"/>
        </table:table-row>
        <table:table-row table:style-name="ro1">
          <table:table-cell office:value-type="float" office:value="480.308624267578">
            <text:p>480.3086242676</text:p>
          </table:table-cell>
          <table:table-cell office:value-type="float" office:value="-0.005974129">
            <text:p>-0.005974129</text:p>
          </table:table-cell>
          <table:table-cell table:number-columns-repeated="4"/>
        </table:table-row>
        <table:table-row table:style-name="ro1">
          <table:table-cell office:value-type="float" office:value="480.424163818359">
            <text:p>480.4241638184</text:p>
          </table:table-cell>
          <table:table-cell office:value-type="float" office:value="-0.005341843">
            <text:p>-0.005341843</text:p>
          </table:table-cell>
          <table:table-cell table:number-columns-repeated="4"/>
        </table:table-row>
        <table:table-row table:style-name="ro1">
          <table:table-cell office:value-type="float" office:value="480.539703369141">
            <text:p>480.5397033691</text:p>
          </table:table-cell>
          <table:table-cell office:value-type="float" office:value="0.006563678">
            <text:p>0.006563678</text:p>
          </table:table-cell>
          <table:table-cell table:number-columns-repeated="4"/>
        </table:table-row>
        <table:table-row table:style-name="ro1">
          <table:table-cell office:value-type="float" office:value="480.655242919922">
            <text:p>480.6552429199</text:p>
          </table:table-cell>
          <table:table-cell office:value-type="float" office:value="-0.003719901">
            <text:p>-0.003719901</text:p>
          </table:table-cell>
          <table:table-cell table:number-columns-repeated="4"/>
        </table:table-row>
        <table:table-row table:style-name="ro1">
          <table:table-cell office:value-type="float" office:value="480.770782470703">
            <text:p>480.7707824707</text:p>
          </table:table-cell>
          <table:table-cell office:value-type="float" office:value="-0.009215103">
            <text:p>-0.009215103</text:p>
          </table:table-cell>
          <table:table-cell table:number-columns-repeated="4"/>
        </table:table-row>
        <table:table-row table:style-name="ro1">
          <table:table-cell office:value-type="float" office:value="480.886322021484">
            <text:p>480.8863220215</text:p>
          </table:table-cell>
          <table:table-cell office:value-type="float" office:value="-0.006304163">
            <text:p>-0.006304163</text:p>
          </table:table-cell>
          <table:table-cell table:number-columns-repeated="4"/>
        </table:table-row>
        <table:table-row table:style-name="ro1">
          <table:table-cell office:value-type="float" office:value="481.001892089844">
            <text:p>481.0018920898</text:p>
          </table:table-cell>
          <table:table-cell office:value-type="float" office:value="0.001244906">
            <text:p>0.001244906</text:p>
          </table:table-cell>
          <table:table-cell table:number-columns-repeated="4"/>
        </table:table-row>
        <table:table-row table:style-name="ro1">
          <table:table-cell office:value-type="float" office:value="481.117431640625">
            <text:p>481.1174316406</text:p>
          </table:table-cell>
          <table:table-cell office:value-type="float" office:value="0.003740138">
            <text:p>0.003740138</text:p>
          </table:table-cell>
          <table:table-cell table:number-columns-repeated="4"/>
        </table:table-row>
        <table:table-row table:style-name="ro1">
          <table:table-cell office:value-type="float" office:value="481.233001708984">
            <text:p>481.233001709</text:p>
          </table:table-cell>
          <table:table-cell office:value-type="float" office:value="0.002454274">
            <text:p>0.002454274</text:p>
          </table:table-cell>
          <table:table-cell table:number-columns-repeated="4"/>
        </table:table-row>
        <table:table-row table:style-name="ro1">
          <table:table-cell office:value-type="float" office:value="481.348571777344">
            <text:p>481.3485717773</text:p>
          </table:table-cell>
          <table:table-cell office:value-type="float" office:value="-0.01095046">
            <text:p>-0.01095046</text:p>
          </table:table-cell>
          <table:table-cell table:number-columns-repeated="4"/>
        </table:table-row>
        <table:table-row table:style-name="ro1">
          <table:table-cell office:value-type="float" office:value="481.464141845703">
            <text:p>481.4641418457</text:p>
          </table:table-cell>
          <table:table-cell office:value-type="float" office:value="-0.004125202">
            <text:p>-0.004125202</text:p>
          </table:table-cell>
          <table:table-cell table:number-columns-repeated="4"/>
        </table:table-row>
        <table:table-row table:style-name="ro1">
          <table:table-cell office:value-type="float" office:value="481.579711914063">
            <text:p>481.5797119141</text:p>
          </table:table-cell>
          <table:table-cell office:value-type="float" office:value="0.003609092">
            <text:p>0.003609092</text:p>
          </table:table-cell>
          <table:table-cell table:number-columns-repeated="4"/>
        </table:table-row>
        <table:table-row table:style-name="ro1">
          <table:table-cell office:value-type="float" office:value="481.695281982422">
            <text:p>481.6952819824</text:p>
          </table:table-cell>
          <table:table-cell office:value-type="float" office:value="-0.01002705">
            <text:p>-0.01002705</text:p>
          </table:table-cell>
          <table:table-cell table:number-columns-repeated="4"/>
        </table:table-row>
        <table:table-row table:style-name="ro1">
          <table:table-cell office:value-type="float" office:value="481.810882568359">
            <text:p>481.8108825684</text:p>
          </table:table-cell>
          <table:table-cell office:value-type="float" office:value="-0.005220038">
            <text:p>-0.005220038</text:p>
          </table:table-cell>
          <table:table-cell table:number-columns-repeated="4"/>
        </table:table-row>
        <table:table-row table:style-name="ro1">
          <table:table-cell office:value-type="float" office:value="481.926452636719">
            <text:p>481.9264526367</text:p>
          </table:table-cell>
          <table:table-cell office:value-type="float" office:value="-0.002643853">
            <text:p>-0.002643853</text:p>
          </table:table-cell>
          <table:table-cell table:number-columns-repeated="4"/>
        </table:table-row>
        <table:table-row table:style-name="ro1">
          <table:table-cell office:value-type="float" office:value="482.042053222656">
            <text:p>482.0420532227</text:p>
          </table:table-cell>
          <table:table-cell office:value-type="float" office:value="0.01432529">
            <text:p>0.01432529</text:p>
          </table:table-cell>
          <table:table-cell table:number-columns-repeated="4"/>
        </table:table-row>
        <table:table-row table:style-name="ro1">
          <table:table-cell office:value-type="float" office:value="482.157653808594">
            <text:p>482.1576538086</text:p>
          </table:table-cell>
          <table:table-cell office:value-type="float" office:value="-0.008557987">
            <text:p>-0.008557987</text:p>
          </table:table-cell>
          <table:table-cell table:number-columns-repeated="4"/>
        </table:table-row>
        <table:table-row table:style-name="ro1">
          <table:table-cell office:value-type="float" office:value="482.273254394531">
            <text:p>482.2732543945</text:p>
          </table:table-cell>
          <table:table-cell office:value-type="float" office:value="-0.004087843">
            <text:p>-0.004087843</text:p>
          </table:table-cell>
          <table:table-cell table:number-columns-repeated="4"/>
        </table:table-row>
        <table:table-row table:style-name="ro1">
          <table:table-cell office:value-type="float" office:value="482.388854980469">
            <text:p>482.3888549805</text:p>
          </table:table-cell>
          <table:table-cell office:value-type="float" office:value="0.01136475">
            <text:p>0.01136475</text:p>
          </table:table-cell>
          <table:table-cell table:number-columns-repeated="4"/>
        </table:table-row>
        <table:table-row table:style-name="ro1">
          <table:table-cell office:value-type="float" office:value="482.504455566406">
            <text:p>482.5044555664</text:p>
          </table:table-cell>
          <table:table-cell office:value-type="float" office:value="0.01590153">
            <text:p>0.01590153</text:p>
          </table:table-cell>
          <table:table-cell table:number-columns-repeated="4"/>
        </table:table-row>
        <table:table-row table:style-name="ro1">
          <table:table-cell office:value-type="float" office:value="482.620086669922">
            <text:p>482.6200866699</text:p>
          </table:table-cell>
          <table:table-cell office:value-type="float" office:value="-0.007770496">
            <text:p>-0.007770496</text:p>
          </table:table-cell>
          <table:table-cell table:number-columns-repeated="4"/>
        </table:table-row>
        <table:table-row table:style-name="ro1">
          <table:table-cell office:value-type="float" office:value="482.735687255859">
            <text:p>482.7356872559</text:p>
          </table:table-cell>
          <table:table-cell office:value-type="float" office:value="0.001719333">
            <text:p>0.001719333</text:p>
          </table:table-cell>
          <table:table-cell table:number-columns-repeated="4"/>
        </table:table-row>
        <table:table-row table:style-name="ro1">
          <table:table-cell office:value-type="float" office:value="482.851318359375">
            <text:p>482.8513183594</text:p>
          </table:table-cell>
          <table:table-cell office:value-type="float" office:value="-0.005284817">
            <text:p>-0.005284817</text:p>
          </table:table-cell>
          <table:table-cell table:number-columns-repeated="4"/>
        </table:table-row>
        <table:table-row table:style-name="ro1">
          <table:table-cell office:value-type="float" office:value="482.966949462891">
            <text:p>482.9669494629</text:p>
          </table:table-cell>
          <table:table-cell office:value-type="float" office:value="0.006874052">
            <text:p>0.006874052</text:p>
          </table:table-cell>
          <table:table-cell table:number-columns-repeated="4"/>
        </table:table-row>
        <table:table-row table:style-name="ro1">
          <table:table-cell office:value-type="float" office:value="483.082580566406">
            <text:p>483.0825805664</text:p>
          </table:table-cell>
          <table:table-cell office:value-type="float" office:value="-0.0147999">
            <text:p>-0.0147999</text:p>
          </table:table-cell>
          <table:table-cell table:number-columns-repeated="4"/>
        </table:table-row>
        <table:table-row table:style-name="ro1">
          <table:table-cell office:value-type="float" office:value="483.198211669922">
            <text:p>483.1982116699</text:p>
          </table:table-cell>
          <table:table-cell office:value-type="float" office:value="-0.0006039437">
            <text:p>-0.0006039437</text:p>
          </table:table-cell>
          <table:table-cell table:number-columns-repeated="4"/>
        </table:table-row>
        <table:table-row table:style-name="ro1">
          <table:table-cell office:value-type="float" office:value="483.313842773438">
            <text:p>483.3138427734</text:p>
          </table:table-cell>
          <table:table-cell office:value-type="float" office:value="0.004049937">
            <text:p>0.004049937</text:p>
          </table:table-cell>
          <table:table-cell table:number-columns-repeated="4"/>
        </table:table-row>
        <table:table-row table:style-name="ro1">
          <table:table-cell office:value-type="float" office:value="483.429473876953">
            <text:p>483.429473877</text:p>
          </table:table-cell>
          <table:table-cell office:value-type="float" office:value="0.009735615">
            <text:p>0.009735615</text:p>
          </table:table-cell>
          <table:table-cell table:number-columns-repeated="4"/>
        </table:table-row>
        <table:table-row table:style-name="ro1">
          <table:table-cell office:value-type="float" office:value="483.545135498047">
            <text:p>483.545135498</text:p>
          </table:table-cell>
          <table:table-cell office:value-type="float" office:value="-0.00199272">
            <text:p>-0.00199272</text:p>
          </table:table-cell>
          <table:table-cell table:number-columns-repeated="4"/>
        </table:table-row>
        <table:table-row table:style-name="ro1">
          <table:table-cell office:value-type="float" office:value="483.660797119141">
            <text:p>483.6607971191</text:p>
          </table:table-cell>
          <table:table-cell office:value-type="float" office:value="-0.007856593">
            <text:p>-0.007856593</text:p>
          </table:table-cell>
          <table:table-cell table:number-columns-repeated="4"/>
        </table:table-row>
        <table:table-row table:style-name="ro1">
          <table:table-cell office:value-type="float" office:value="483.776428222656">
            <text:p>483.7764282227</text:p>
          </table:table-cell>
          <table:table-cell office:value-type="float" office:value="0.002251429">
            <text:p>0.002251429</text:p>
          </table:table-cell>
          <table:table-cell table:number-columns-repeated="4"/>
        </table:table-row>
        <table:table-row table:style-name="ro1">
          <table:table-cell office:value-type="float" office:value="483.89208984375">
            <text:p>483.8920898438</text:p>
          </table:table-cell>
          <table:table-cell office:value-type="float" office:value="0.01602441">
            <text:p>0.01602441</text:p>
          </table:table-cell>
          <table:table-cell table:number-columns-repeated="4"/>
        </table:table-row>
        <table:table-row table:style-name="ro1">
          <table:table-cell office:value-type="float" office:value="484.007751464844">
            <text:p>484.0077514648</text:p>
          </table:table-cell>
          <table:table-cell office:value-type="float" office:value="-0.01101474">
            <text:p>-0.01101474</text:p>
          </table:table-cell>
          <table:table-cell table:number-columns-repeated="4"/>
        </table:table-row>
        <table:table-row table:style-name="ro1">
          <table:table-cell office:value-type="float" office:value="484.123413085938">
            <text:p>484.1234130859</text:p>
          </table:table-cell>
          <table:table-cell office:value-type="float" office:value="-0.01456324">
            <text:p>-0.01456324</text:p>
          </table:table-cell>
          <table:table-cell table:number-columns-repeated="4"/>
        </table:table-row>
        <table:table-row table:style-name="ro1">
          <table:table-cell office:value-type="float" office:value="484.239105224609">
            <text:p>484.2391052246</text:p>
          </table:table-cell>
          <table:table-cell office:value-type="float" office:value="0.007798387">
            <text:p>0.007798387</text:p>
          </table:table-cell>
          <table:table-cell table:number-columns-repeated="4"/>
        </table:table-row>
        <table:table-row table:style-name="ro1">
          <table:table-cell office:value-type="float" office:value="484.354766845703">
            <text:p>484.3547668457</text:p>
          </table:table-cell>
          <table:table-cell office:value-type="float" office:value="-0.0009119601">
            <text:p>-0.0009119601</text:p>
          </table:table-cell>
          <table:table-cell table:number-columns-repeated="4"/>
        </table:table-row>
        <table:table-row table:style-name="ro1">
          <table:table-cell office:value-type="float" office:value="484.470458984375">
            <text:p>484.4704589844</text:p>
          </table:table-cell>
          <table:table-cell office:value-type="float" office:value="-0.003884554">
            <text:p>-0.003884554</text:p>
          </table:table-cell>
          <table:table-cell table:number-columns-repeated="4"/>
        </table:table-row>
        <table:table-row table:style-name="ro1">
          <table:table-cell office:value-type="float" office:value="484.586151123047">
            <text:p>484.586151123</text:p>
          </table:table-cell>
          <table:table-cell office:value-type="float" office:value="-0.01081141">
            <text:p>-0.01081141</text:p>
          </table:table-cell>
          <table:table-cell table:number-columns-repeated="4"/>
        </table:table-row>
        <table:table-row table:style-name="ro1">
          <table:table-cell office:value-type="float" office:value="484.701843261719">
            <text:p>484.7018432617</text:p>
          </table:table-cell>
          <table:table-cell office:value-type="float" office:value="-0.002253464">
            <text:p>-0.002253464</text:p>
          </table:table-cell>
          <table:table-cell table:number-columns-repeated="4"/>
        </table:table-row>
        <table:table-row table:style-name="ro1">
          <table:table-cell office:value-type="float" office:value="484.817535400391">
            <text:p>484.8175354004</text:p>
          </table:table-cell>
          <table:table-cell office:value-type="float" office:value="0.003633368">
            <text:p>0.003633368</text:p>
          </table:table-cell>
          <table:table-cell table:number-columns-repeated="4"/>
        </table:table-row>
        <table:table-row table:style-name="ro1">
          <table:table-cell office:value-type="float" office:value="484.933227539063">
            <text:p>484.9332275391</text:p>
          </table:table-cell>
          <table:table-cell office:value-type="float" office:value="-0.01207927">
            <text:p>-0.01207927</text:p>
          </table:table-cell>
          <table:table-cell table:number-columns-repeated="4"/>
        </table:table-row>
        <table:table-row table:style-name="ro1">
          <table:table-cell office:value-type="float" office:value="485.048919677734">
            <text:p>485.0489196777</text:p>
          </table:table-cell>
          <table:table-cell office:value-type="float" office:value="-0.006053942">
            <text:p>-0.006053942</text:p>
          </table:table-cell>
          <table:table-cell table:number-columns-repeated="4"/>
        </table:table-row>
        <table:table-row table:style-name="ro1">
          <table:table-cell office:value-type="float" office:value="485.164642333984">
            <text:p>485.164642334</text:p>
          </table:table-cell>
          <table:table-cell office:value-type="float" office:value="0.01204849">
            <text:p>0.01204849</text:p>
          </table:table-cell>
          <table:table-cell table:number-columns-repeated="4"/>
        </table:table-row>
        <table:table-row table:style-name="ro1">
          <table:table-cell office:value-type="float" office:value="485.280334472656">
            <text:p>485.2803344727</text:p>
          </table:table-cell>
          <table:table-cell office:value-type="float" office:value="0.001595591">
            <text:p>0.001595591</text:p>
          </table:table-cell>
          <table:table-cell table:number-columns-repeated="4"/>
        </table:table-row>
        <table:table-row table:style-name="ro1">
          <table:table-cell office:value-type="float" office:value="485.396057128906">
            <text:p>485.3960571289</text:p>
          </table:table-cell>
          <table:table-cell office:value-type="float" office:value="0.005821015">
            <text:p>0.005821015</text:p>
          </table:table-cell>
          <table:table-cell table:number-columns-repeated="4"/>
        </table:table-row>
        <table:table-row table:style-name="ro1">
          <table:table-cell office:value-type="float" office:value="485.511779785156">
            <text:p>485.5117797852</text:p>
          </table:table-cell>
          <table:table-cell office:value-type="float" office:value="-0.007735755">
            <text:p>-0.007735755</text:p>
          </table:table-cell>
          <table:table-cell table:number-columns-repeated="4"/>
        </table:table-row>
        <table:table-row table:style-name="ro1">
          <table:table-cell office:value-type="float" office:value="485.627502441406">
            <text:p>485.6275024414</text:p>
          </table:table-cell>
          <table:table-cell office:value-type="float" office:value="-0.001564925">
            <text:p>-0.001564925</text:p>
          </table:table-cell>
          <table:table-cell table:number-columns-repeated="4"/>
        </table:table-row>
        <table:table-row table:style-name="ro1">
          <table:table-cell office:value-type="float" office:value="485.743225097656">
            <text:p>485.7432250977</text:p>
          </table:table-cell>
          <table:table-cell office:value-type="float" office:value="0.02149228">
            <text:p>0.02149228</text:p>
          </table:table-cell>
          <table:table-cell table:number-columns-repeated="4"/>
        </table:table-row>
        <table:table-row table:style-name="ro1">
          <table:table-cell office:value-type="float" office:value="485.858947753906">
            <text:p>485.8589477539</text:p>
          </table:table-cell>
          <table:table-cell office:value-type="float" office:value="-0.01066712">
            <text:p>-0.01066712</text:p>
          </table:table-cell>
          <table:table-cell table:number-columns-repeated="4"/>
        </table:table-row>
        <table:table-row table:style-name="ro1">
          <table:table-cell office:value-type="float" office:value="485.974670410156">
            <text:p>485.9746704102</text:p>
          </table:table-cell>
          <table:table-cell office:value-type="float" office:value="-0.007835157">
            <text:p>-0.007835157</text:p>
          </table:table-cell>
          <table:table-cell table:number-columns-repeated="4"/>
        </table:table-row>
        <table:table-row table:style-name="ro1">
          <table:table-cell office:value-type="float" office:value="486.090423583984">
            <text:p>486.090423584</text:p>
          </table:table-cell>
          <table:table-cell office:value-type="float" office:value="0.01995829">
            <text:p>0.01995829</text:p>
          </table:table-cell>
          <table:table-cell table:number-columns-repeated="4"/>
        </table:table-row>
        <table:table-row table:style-name="ro1">
          <table:table-cell office:value-type="float" office:value="486.206176757813">
            <text:p>486.2061767578</text:p>
          </table:table-cell>
          <table:table-cell office:value-type="float" office:value="0.001316748">
            <text:p>0.001316748</text:p>
          </table:table-cell>
          <table:table-cell table:number-columns-repeated="4"/>
        </table:table-row>
        <table:table-row table:style-name="ro1">
          <table:table-cell office:value-type="float" office:value="486.321899414063">
            <text:p>486.3218994141</text:p>
          </table:table-cell>
          <table:table-cell office:value-type="float" office:value="-0.002910825">
            <text:p>-0.002910825</text:p>
          </table:table-cell>
          <table:table-cell table:number-columns-repeated="4"/>
        </table:table-row>
        <table:table-row table:style-name="ro1">
          <table:table-cell office:value-type="float" office:value="486.437652587891">
            <text:p>486.4376525879</text:p>
          </table:table-cell>
          <table:table-cell office:value-type="float" office:value="-0.00191209">
            <text:p>-0.00191209</text:p>
          </table:table-cell>
          <table:table-cell table:number-columns-repeated="4"/>
        </table:table-row>
        <table:table-row table:style-name="ro1">
          <table:table-cell office:value-type="float" office:value="486.553436279297">
            <text:p>486.5534362793</text:p>
          </table:table-cell>
          <table:table-cell office:value-type="float" office:value="0.004953602">
            <text:p>0.004953602</text:p>
          </table:table-cell>
          <table:table-cell table:number-columns-repeated="4"/>
        </table:table-row>
        <table:table-row table:style-name="ro1">
          <table:table-cell office:value-type="float" office:value="486.669189453125">
            <text:p>486.6691894531</text:p>
          </table:table-cell>
          <table:table-cell office:value-type="float" office:value="0.00202846">
            <text:p>0.00202846</text:p>
          </table:table-cell>
          <table:table-cell table:number-columns-repeated="4"/>
        </table:table-row>
        <table:table-row table:style-name="ro1">
          <table:table-cell office:value-type="float" office:value="486.784942626953">
            <text:p>486.784942627</text:p>
          </table:table-cell>
          <table:table-cell office:value-type="float" office:value="0.0006924928">
            <text:p>0.0006924928</text:p>
          </table:table-cell>
          <table:table-cell table:number-columns-repeated="4"/>
        </table:table-row>
        <table:table-row table:style-name="ro1">
          <table:table-cell office:value-type="float" office:value="486.900726318359">
            <text:p>486.9007263184</text:p>
          </table:table-cell>
          <table:table-cell office:value-type="float" office:value="-0.005287666">
            <text:p>-0.005287666</text:p>
          </table:table-cell>
          <table:table-cell table:number-columns-repeated="4"/>
        </table:table-row>
        <table:table-row table:style-name="ro1">
          <table:table-cell office:value-type="float" office:value="487.016479492188">
            <text:p>487.0164794922</text:p>
          </table:table-cell>
          <table:table-cell office:value-type="float" office:value="0.00886299">
            <text:p>0.00886299</text:p>
          </table:table-cell>
          <table:table-cell table:number-columns-repeated="4"/>
        </table:table-row>
        <table:table-row table:style-name="ro1">
          <table:table-cell office:value-type="float" office:value="487.132263183594">
            <text:p>487.1322631836</text:p>
          </table:table-cell>
          <table:table-cell office:value-type="float" office:value="-0.003231006">
            <text:p>-0.003231006</text:p>
          </table:table-cell>
          <table:table-cell table:number-columns-repeated="4"/>
        </table:table-row>
        <table:table-row table:style-name="ro1">
          <table:table-cell office:value-type="float" office:value="487.248046875">
            <text:p>487.248046875</text:p>
          </table:table-cell>
          <table:table-cell office:value-type="float" office:value="0.009541547">
            <text:p>0.009541547</text:p>
          </table:table-cell>
          <table:table-cell table:number-columns-repeated="4"/>
        </table:table-row>
        <table:table-row table:style-name="ro1">
          <table:table-cell office:value-type="float" office:value="487.363830566406">
            <text:p>487.3638305664</text:p>
          </table:table-cell>
          <table:table-cell office:value-type="float" office:value="0.0007350463">
            <text:p>0.0007350463</text:p>
          </table:table-cell>
          <table:table-cell table:number-columns-repeated="4"/>
        </table:table-row>
        <table:table-row table:style-name="ro1">
          <table:table-cell office:value-type="float" office:value="487.479614257813">
            <text:p>487.4796142578</text:p>
          </table:table-cell>
          <table:table-cell office:value-type="float" office:value="0.006620809">
            <text:p>0.006620809</text:p>
          </table:table-cell>
          <table:table-cell table:number-columns-repeated="4"/>
        </table:table-row>
        <table:table-row table:style-name="ro1">
          <table:table-cell office:value-type="float" office:value="487.595397949219">
            <text:p>487.5953979492</text:p>
          </table:table-cell>
          <table:table-cell office:value-type="float" office:value="0.00644041">
            <text:p>0.00644041</text:p>
          </table:table-cell>
          <table:table-cell table:number-columns-repeated="4"/>
        </table:table-row>
        <table:table-row table:style-name="ro1">
          <table:table-cell office:value-type="float" office:value="487.711212158203">
            <text:p>487.7112121582</text:p>
          </table:table-cell>
          <table:table-cell office:value-type="float" office:value="0.005905974">
            <text:p>0.005905974</text:p>
          </table:table-cell>
          <table:table-cell table:number-columns-repeated="4"/>
        </table:table-row>
        <table:table-row table:style-name="ro1">
          <table:table-cell office:value-type="float" office:value="487.826995849609">
            <text:p>487.8269958496</text:p>
          </table:table-cell>
          <table:table-cell office:value-type="float" office:value="-0.009509174">
            <text:p>-0.009509174</text:p>
          </table:table-cell>
          <table:table-cell table:number-columns-repeated="4"/>
        </table:table-row>
        <table:table-row table:style-name="ro1">
          <table:table-cell office:value-type="float" office:value="487.942810058594">
            <text:p>487.9428100586</text:p>
          </table:table-cell>
          <table:table-cell office:value-type="float" office:value="0.005269387">
            <text:p>0.005269387</text:p>
          </table:table-cell>
          <table:table-cell table:number-columns-repeated="4"/>
        </table:table-row>
        <table:table-row table:style-name="ro1">
          <table:table-cell office:value-type="float" office:value="488.058624267578">
            <text:p>488.0586242676</text:p>
          </table:table-cell>
          <table:table-cell office:value-type="float" office:value="0.01633631">
            <text:p>0.01633631</text:p>
          </table:table-cell>
          <table:table-cell table:number-columns-repeated="4"/>
        </table:table-row>
        <table:table-row table:style-name="ro1">
          <table:table-cell office:value-type="float" office:value="488.174438476563">
            <text:p>488.1744384766</text:p>
          </table:table-cell>
          <table:table-cell office:value-type="float" office:value="-0.005124574">
            <text:p>-0.005124574</text:p>
          </table:table-cell>
          <table:table-cell table:number-columns-repeated="4"/>
        </table:table-row>
        <table:table-row table:style-name="ro1">
          <table:table-cell office:value-type="float" office:value="488.290252685547">
            <text:p>488.2902526855</text:p>
          </table:table-cell>
          <table:table-cell office:value-type="float" office:value="-0.01126307">
            <text:p>-0.01126307</text:p>
          </table:table-cell>
          <table:table-cell table:number-columns-repeated="4"/>
        </table:table-row>
        <table:table-row table:style-name="ro1">
          <table:table-cell office:value-type="float" office:value="488.406066894531">
            <text:p>488.4060668945</text:p>
          </table:table-cell>
          <table:table-cell office:value-type="float" office:value="0.005670672">
            <text:p>0.005670672</text:p>
          </table:table-cell>
          <table:table-cell table:number-columns-repeated="4"/>
        </table:table-row>
        <table:table-row table:style-name="ro1">
          <table:table-cell office:value-type="float" office:value="488.521911621094">
            <text:p>488.5219116211</text:p>
          </table:table-cell>
          <table:table-cell office:value-type="float" office:value="-0.0008890626">
            <text:p>-0.0008890626</text:p>
          </table:table-cell>
          <table:table-cell table:number-columns-repeated="4"/>
        </table:table-row>
        <table:table-row table:style-name="ro1">
          <table:table-cell office:value-type="float" office:value="488.637725830078">
            <text:p>488.6377258301</text:p>
          </table:table-cell>
          <table:table-cell office:value-type="float" office:value="-0.01318607">
            <text:p>-0.01318607</text:p>
          </table:table-cell>
          <table:table-cell table:number-columns-repeated="4"/>
        </table:table-row>
        <table:table-row table:style-name="ro1">
          <table:table-cell office:value-type="float" office:value="488.753570556641">
            <text:p>488.7535705566</text:p>
          </table:table-cell>
          <table:table-cell office:value-type="float" office:value="-0.01210616">
            <text:p>-0.01210616</text:p>
          </table:table-cell>
          <table:table-cell table:number-columns-repeated="4"/>
        </table:table-row>
        <table:table-row table:style-name="ro1">
          <table:table-cell office:value-type="float" office:value="488.869415283203">
            <text:p>488.8694152832</text:p>
          </table:table-cell>
          <table:table-cell office:value-type="float" office:value="0.007051815">
            <text:p>0.007051815</text:p>
          </table:table-cell>
          <table:table-cell table:number-columns-repeated="4"/>
        </table:table-row>
        <table:table-row table:style-name="ro1">
          <table:table-cell office:value-type="float" office:value="488.985260009766">
            <text:p>488.9852600098</text:p>
          </table:table-cell>
          <table:table-cell office:value-type="float" office:value="-0.002186463">
            <text:p>-0.002186463</text:p>
          </table:table-cell>
          <table:table-cell table:number-columns-repeated="4"/>
        </table:table-row>
        <table:table-row table:style-name="ro1">
          <table:table-cell office:value-type="float" office:value="489.101104736328">
            <text:p>489.1011047363</text:p>
          </table:table-cell>
          <table:table-cell office:value-type="float" office:value="-0.001788478">
            <text:p>-0.001788478</text:p>
          </table:table-cell>
          <table:table-cell table:number-columns-repeated="4"/>
        </table:table-row>
        <table:table-row table:style-name="ro1">
          <table:table-cell office:value-type="float" office:value="489.216949462891">
            <text:p>489.2169494629</text:p>
          </table:table-cell>
          <table:table-cell office:value-type="float" office:value="-0.008335183">
            <text:p>-0.008335183</text:p>
          </table:table-cell>
          <table:table-cell table:number-columns-repeated="4"/>
        </table:table-row>
        <table:table-row table:style-name="ro1">
          <table:table-cell office:value-type="float" office:value="489.332794189453">
            <text:p>489.3327941895</text:p>
          </table:table-cell>
          <table:table-cell office:value-type="float" office:value="0.004375943">
            <text:p>0.004375943</text:p>
          </table:table-cell>
          <table:table-cell table:number-columns-repeated="4"/>
        </table:table-row>
        <table:table-row table:style-name="ro1">
          <table:table-cell office:value-type="float" office:value="489.448669433594">
            <text:p>489.4486694336</text:p>
          </table:table-cell>
          <table:table-cell office:value-type="float" office:value="0.00387308">
            <text:p>0.00387308</text:p>
          </table:table-cell>
          <table:table-cell table:number-columns-repeated="4"/>
        </table:table-row>
        <table:table-row table:style-name="ro1">
          <table:table-cell office:value-type="float" office:value="489.564544677734">
            <text:p>489.5645446777</text:p>
          </table:table-cell>
          <table:table-cell office:value-type="float" office:value="-0.01410884">
            <text:p>-0.01410884</text:p>
          </table:table-cell>
          <table:table-cell table:number-columns-repeated="4"/>
        </table:table-row>
        <table:table-row table:style-name="ro1">
          <table:table-cell office:value-type="float" office:value="489.680389404297">
            <text:p>489.6803894043</text:p>
          </table:table-cell>
          <table:table-cell office:value-type="float" office:value="-0.006013635">
            <text:p>-0.006013635</text:p>
          </table:table-cell>
          <table:table-cell table:number-columns-repeated="4"/>
        </table:table-row>
        <table:table-row table:style-name="ro1">
          <table:table-cell office:value-type="float" office:value="489.796264648438">
            <text:p>489.7962646484</text:p>
          </table:table-cell>
          <table:table-cell office:value-type="float" office:value="0.005832433">
            <text:p>0.005832433</text:p>
          </table:table-cell>
          <table:table-cell table:number-columns-repeated="4"/>
        </table:table-row>
        <table:table-row table:style-name="ro1">
          <table:table-cell office:value-type="float" office:value="489.912139892578">
            <text:p>489.9121398926</text:p>
          </table:table-cell>
          <table:table-cell office:value-type="float" office:value="0.001227672">
            <text:p>0.001227672</text:p>
          </table:table-cell>
          <table:table-cell table:number-columns-repeated="4"/>
        </table:table-row>
        <table:table-row table:style-name="ro1">
          <table:table-cell office:value-type="float" office:value="490.028015136719">
            <text:p>490.0280151367</text:p>
          </table:table-cell>
          <table:table-cell office:value-type="float" office:value="-0.01127133">
            <text:p>-0.01127133</text:p>
          </table:table-cell>
          <table:table-cell table:number-columns-repeated="4"/>
        </table:table-row>
        <table:table-row table:style-name="ro1">
          <table:table-cell office:value-type="float" office:value="490.143920898438">
            <text:p>490.1439208984</text:p>
          </table:table-cell>
          <table:table-cell office:value-type="float" office:value="0.01216192">
            <text:p>0.01216192</text:p>
          </table:table-cell>
          <table:table-cell table:number-columns-repeated="4"/>
        </table:table-row>
        <table:table-row table:style-name="ro1">
          <table:table-cell office:value-type="float" office:value="490.259796142578">
            <text:p>490.2597961426</text:p>
          </table:table-cell>
          <table:table-cell office:value-type="float" office:value="0.006001584">
            <text:p>0.006001584</text:p>
          </table:table-cell>
          <table:table-cell table:number-columns-repeated="4"/>
        </table:table-row>
        <table:table-row table:style-name="ro1">
          <table:table-cell office:value-type="float" office:value="490.375701904297">
            <text:p>490.3757019043</text:p>
          </table:table-cell>
          <table:table-cell office:value-type="float" office:value="-0.01187036">
            <text:p>-0.01187036</text:p>
          </table:table-cell>
          <table:table-cell table:number-columns-repeated="4"/>
        </table:table-row>
        <table:table-row table:style-name="ro1">
          <table:table-cell office:value-type="float" office:value="490.491577148438">
            <text:p>490.4915771484</text:p>
          </table:table-cell>
          <table:table-cell office:value-type="float" office:value="-0.001627528">
            <text:p>-0.001627528</text:p>
          </table:table-cell>
          <table:table-cell table:number-columns-repeated="4"/>
        </table:table-row>
        <table:table-row table:style-name="ro1">
          <table:table-cell office:value-type="float" office:value="490.607482910156">
            <text:p>490.6074829102</text:p>
          </table:table-cell>
          <table:table-cell office:value-type="float" office:value="-0.004444521">
            <text:p>-0.004444521</text:p>
          </table:table-cell>
          <table:table-cell table:number-columns-repeated="4"/>
        </table:table-row>
        <table:table-row table:style-name="ro1">
          <table:table-cell office:value-type="float" office:value="490.723388671875">
            <text:p>490.7233886719</text:p>
          </table:table-cell>
          <table:table-cell office:value-type="float" office:value="0.008958383">
            <text:p>0.008958383</text:p>
          </table:table-cell>
          <table:table-cell table:number-columns-repeated="4"/>
        </table:table-row>
        <table:table-row table:style-name="ro1">
          <table:table-cell office:value-type="float" office:value="490.839294433594">
            <text:p>490.8392944336</text:p>
          </table:table-cell>
          <table:table-cell office:value-type="float" office:value="-0.0001083654">
            <text:p>-0.0001083654</text:p>
          </table:table-cell>
          <table:table-cell table:number-columns-repeated="4"/>
        </table:table-row>
        <table:table-row table:style-name="ro1">
          <table:table-cell office:value-type="float" office:value="490.955200195313">
            <text:p>490.9552001953</text:p>
          </table:table-cell>
          <table:table-cell office:value-type="float" office:value="-0.003630918">
            <text:p>-0.003630918</text:p>
          </table:table-cell>
          <table:table-cell table:number-columns-repeated="4"/>
        </table:table-row>
        <table:table-row table:style-name="ro1">
          <table:table-cell office:value-type="float" office:value="491.071136474609">
            <text:p>491.0711364746</text:p>
          </table:table-cell>
          <table:table-cell office:value-type="float" office:value="0.0009231861">
            <text:p>0.0009231861</text:p>
          </table:table-cell>
          <table:table-cell table:number-columns-repeated="4"/>
        </table:table-row>
        <table:table-row table:style-name="ro1">
          <table:table-cell office:value-type="float" office:value="491.187042236328">
            <text:p>491.1870422363</text:p>
          </table:table-cell>
          <table:table-cell office:value-type="float" office:value="0.01020026">
            <text:p>0.01020026</text:p>
          </table:table-cell>
          <table:table-cell table:number-columns-repeated="4"/>
        </table:table-row>
        <table:table-row table:style-name="ro1">
          <table:table-cell office:value-type="float" office:value="491.302978515625">
            <text:p>491.3029785156</text:p>
          </table:table-cell>
          <table:table-cell office:value-type="float" office:value="-0.004325714">
            <text:p>-0.004325714</text:p>
          </table:table-cell>
          <table:table-cell table:number-columns-repeated="4"/>
        </table:table-row>
        <table:table-row table:style-name="ro1">
          <table:table-cell office:value-type="float" office:value="491.418914794922">
            <text:p>491.4189147949</text:p>
          </table:table-cell>
          <table:table-cell office:value-type="float" office:value="-0.01037865">
            <text:p>-0.01037865</text:p>
          </table:table-cell>
          <table:table-cell table:number-columns-repeated="4"/>
        </table:table-row>
        <table:table-row table:style-name="ro1">
          <table:table-cell office:value-type="float" office:value="491.534851074219">
            <text:p>491.5348510742</text:p>
          </table:table-cell>
          <table:table-cell office:value-type="float" office:value="0.008312228">
            <text:p>0.008312228</text:p>
          </table:table-cell>
          <table:table-cell table:number-columns-repeated="4"/>
        </table:table-row>
        <table:table-row table:style-name="ro1">
          <table:table-cell office:value-type="float" office:value="491.650787353516">
            <text:p>491.6507873535</text:p>
          </table:table-cell>
          <table:table-cell office:value-type="float" office:value="0.000313783">
            <text:p>0.000313783</text:p>
          </table:table-cell>
          <table:table-cell table:number-columns-repeated="4"/>
        </table:table-row>
        <table:table-row table:style-name="ro1">
          <table:table-cell office:value-type="float" office:value="491.766723632813">
            <text:p>491.7667236328</text:p>
          </table:table-cell>
          <table:table-cell office:value-type="float" office:value="-0.004894353">
            <text:p>-0.004894353</text:p>
          </table:table-cell>
          <table:table-cell table:number-columns-repeated="4"/>
        </table:table-row>
        <table:table-row table:style-name="ro1">
          <table:table-cell office:value-type="float" office:value="491.882659912109">
            <text:p>491.8826599121</text:p>
          </table:table-cell>
          <table:table-cell office:value-type="float" office:value="-0.01112561">
            <text:p>-0.01112561</text:p>
          </table:table-cell>
          <table:table-cell table:number-columns-repeated="4"/>
        </table:table-row>
        <table:table-row table:style-name="ro1">
          <table:table-cell office:value-type="float" office:value="491.998596191406">
            <text:p>491.9985961914</text:p>
          </table:table-cell>
          <table:table-cell office:value-type="float" office:value="0.005020414">
            <text:p>0.005020414</text:p>
          </table:table-cell>
          <table:table-cell table:number-columns-repeated="4"/>
        </table:table-row>
        <table:table-row table:style-name="ro1">
          <table:table-cell office:value-type="float" office:value="492.114562988281">
            <text:p>492.1145629883</text:p>
          </table:table-cell>
          <table:table-cell office:value-type="float" office:value="0.003934422">
            <text:p>0.003934422</text:p>
          </table:table-cell>
          <table:table-cell table:number-columns-repeated="4"/>
        </table:table-row>
        <table:table-row table:style-name="ro1">
          <table:table-cell office:value-type="float" office:value="492.230529785156">
            <text:p>492.2305297852</text:p>
          </table:table-cell>
          <table:table-cell office:value-type="float" office:value="-0.01042905">
            <text:p>-0.01042905</text:p>
          </table:table-cell>
          <table:table-cell table:number-columns-repeated="4"/>
        </table:table-row>
        <table:table-row table:style-name="ro1">
          <table:table-cell office:value-type="float" office:value="492.346496582031">
            <text:p>492.346496582</text:p>
          </table:table-cell>
          <table:table-cell office:value-type="float" office:value="0.001681908">
            <text:p>0.001681908</text:p>
          </table:table-cell>
          <table:table-cell table:number-columns-repeated="4"/>
        </table:table-row>
        <table:table-row table:style-name="ro1">
          <table:table-cell office:value-type="float" office:value="492.462463378906">
            <text:p>492.4624633789</text:p>
          </table:table-cell>
          <table:table-cell office:value-type="float" office:value="0.001465994">
            <text:p>0.001465994</text:p>
          </table:table-cell>
          <table:table-cell table:number-columns-repeated="4"/>
        </table:table-row>
        <table:table-row table:style-name="ro1">
          <table:table-cell office:value-type="float" office:value="492.578430175781">
            <text:p>492.5784301758</text:p>
          </table:table-cell>
          <table:table-cell office:value-type="float" office:value="0.002612611">
            <text:p>0.002612611</text:p>
          </table:table-cell>
          <table:table-cell table:number-columns-repeated="4"/>
        </table:table-row>
        <table:table-row table:style-name="ro1">
          <table:table-cell office:value-type="float" office:value="492.694396972656">
            <text:p>492.6943969727</text:p>
          </table:table-cell>
          <table:table-cell office:value-type="float" office:value="-0.005766142">
            <text:p>-0.005766142</text:p>
          </table:table-cell>
          <table:table-cell table:number-columns-repeated="4"/>
        </table:table-row>
        <table:table-row table:style-name="ro1">
          <table:table-cell office:value-type="float" office:value="492.810363769531">
            <text:p>492.8103637695</text:p>
          </table:table-cell>
          <table:table-cell office:value-type="float" office:value="-0.008218537">
            <text:p>-0.008218537</text:p>
          </table:table-cell>
          <table:table-cell table:number-columns-repeated="4"/>
        </table:table-row>
        <table:table-row table:style-name="ro1">
          <table:table-cell office:value-type="float" office:value="492.926361083984">
            <text:p>492.926361084</text:p>
          </table:table-cell>
          <table:table-cell office:value-type="float" office:value="0.009869503">
            <text:p>0.009869503</text:p>
          </table:table-cell>
          <table:table-cell table:number-columns-repeated="4"/>
        </table:table-row>
        <table:table-row table:style-name="ro1">
          <table:table-cell office:value-type="float" office:value="493.042327880859">
            <text:p>493.0423278809</text:p>
          </table:table-cell>
          <table:table-cell office:value-type="float" office:value="-0.003715644">
            <text:p>-0.003715644</text:p>
          </table:table-cell>
          <table:table-cell table:number-columns-repeated="4"/>
        </table:table-row>
        <table:table-row table:style-name="ro1">
          <table:table-cell office:value-type="float" office:value="493.158325195313">
            <text:p>493.1583251953</text:p>
          </table:table-cell>
          <table:table-cell office:value-type="float" office:value="-0.00846837">
            <text:p>-0.00846837</text:p>
          </table:table-cell>
          <table:table-cell table:number-columns-repeated="4"/>
        </table:table-row>
        <table:table-row table:style-name="ro1">
          <table:table-cell office:value-type="float" office:value="493.274322509766">
            <text:p>493.2743225098</text:p>
          </table:table-cell>
          <table:table-cell office:value-type="float" office:value="-0.0007123831">
            <text:p>-0.0007123831</text:p>
          </table:table-cell>
          <table:table-cell table:number-columns-repeated="4"/>
        </table:table-row>
        <table:table-row table:style-name="ro1">
          <table:table-cell office:value-type="float" office:value="493.390319824219">
            <text:p>493.3903198242</text:p>
          </table:table-cell>
          <table:table-cell office:value-type="float" office:value="0.01060933">
            <text:p>0.01060933</text:p>
          </table:table-cell>
          <table:table-cell table:number-columns-repeated="4"/>
        </table:table-row>
        <table:table-row table:style-name="ro1">
          <table:table-cell office:value-type="float" office:value="493.506317138672">
            <text:p>493.5063171387</text:p>
          </table:table-cell>
          <table:table-cell office:value-type="float" office:value="0.003519066">
            <text:p>0.003519066</text:p>
          </table:table-cell>
          <table:table-cell table:number-columns-repeated="4"/>
        </table:table-row>
        <table:table-row table:style-name="ro1">
          <table:table-cell office:value-type="float" office:value="493.622344970703">
            <text:p>493.6223449707</text:p>
          </table:table-cell>
          <table:table-cell office:value-type="float" office:value="0.0005186337">
            <text:p>0.0005186337</text:p>
          </table:table-cell>
          <table:table-cell table:number-columns-repeated="4"/>
        </table:table-row>
        <table:table-row table:style-name="ro1">
          <table:table-cell office:value-type="float" office:value="493.738342285156">
            <text:p>493.7383422852</text:p>
          </table:table-cell>
          <table:table-cell office:value-type="float" office:value="-0.01096037">
            <text:p>-0.01096037</text:p>
          </table:table-cell>
          <table:table-cell table:number-columns-repeated="4"/>
        </table:table-row>
        <table:table-row table:style-name="ro1">
          <table:table-cell office:value-type="float" office:value="493.854370117188">
            <text:p>493.8543701172</text:p>
          </table:table-cell>
          <table:table-cell office:value-type="float" office:value="-0.004291357">
            <text:p>-0.004291357</text:p>
          </table:table-cell>
          <table:table-cell table:number-columns-repeated="4"/>
        </table:table-row>
        <table:table-row table:style-name="ro1">
          <table:table-cell office:value-type="float" office:value="493.970367431641">
            <text:p>493.9703674316</text:p>
          </table:table-cell>
          <table:table-cell office:value-type="float" office:value="0.005104855">
            <text:p>0.005104855</text:p>
          </table:table-cell>
          <table:table-cell table:number-columns-repeated="4"/>
        </table:table-row>
        <table:table-row table:style-name="ro1">
          <table:table-cell office:value-type="float" office:value="494.086395263672">
            <text:p>494.0863952637</text:p>
          </table:table-cell>
          <table:table-cell office:value-type="float" office:value="0.000946931">
            <text:p>0.000946931</text:p>
          </table:table-cell>
          <table:table-cell table:number-columns-repeated="4"/>
        </table:table-row>
        <table:table-row table:style-name="ro1">
          <table:table-cell office:value-type="float" office:value="494.202423095703">
            <text:p>494.2024230957</text:p>
          </table:table-cell>
          <table:table-cell office:value-type="float" office:value="-0.002152027">
            <text:p>-0.002152027</text:p>
          </table:table-cell>
          <table:table-cell table:number-columns-repeated="4"/>
        </table:table-row>
        <table:table-row table:style-name="ro1">
          <table:table-cell office:value-type="float" office:value="494.318450927734">
            <text:p>494.3184509277</text:p>
          </table:table-cell>
          <table:table-cell office:value-type="float" office:value="-0.002733281">
            <text:p>-0.002733281</text:p>
          </table:table-cell>
          <table:table-cell table:number-columns-repeated="4"/>
        </table:table-row>
        <table:table-row table:style-name="ro1">
          <table:table-cell office:value-type="float" office:value="494.434478759766">
            <text:p>494.4344787598</text:p>
          </table:table-cell>
          <table:table-cell office:value-type="float" office:value="-0.0007727774">
            <text:p>-0.0007727774</text:p>
          </table:table-cell>
          <table:table-cell table:number-columns-repeated="4"/>
        </table:table-row>
        <table:table-row table:style-name="ro1">
          <table:table-cell office:value-type="float" office:value="494.550537109375">
            <text:p>494.5505371094</text:p>
          </table:table-cell>
          <table:table-cell office:value-type="float" office:value="-0.0062843">
            <text:p>-0.0062843</text:p>
          </table:table-cell>
          <table:table-cell table:number-columns-repeated="4"/>
        </table:table-row>
        <table:table-row table:style-name="ro1">
          <table:table-cell office:value-type="float" office:value="494.666564941406">
            <text:p>494.6665649414</text:p>
          </table:table-cell>
          <table:table-cell office:value-type="float" office:value="-0.005685373">
            <text:p>-0.005685373</text:p>
          </table:table-cell>
          <table:table-cell table:number-columns-repeated="4"/>
        </table:table-row>
        <table:table-row table:style-name="ro1">
          <table:table-cell office:value-type="float" office:value="494.782623291016">
            <text:p>494.782623291</text:p>
          </table:table-cell>
          <table:table-cell office:value-type="float" office:value="-0.001406927">
            <text:p>-0.001406927</text:p>
          </table:table-cell>
          <table:table-cell table:number-columns-repeated="4"/>
        </table:table-row>
        <table:table-row table:style-name="ro1">
          <table:table-cell office:value-type="float" office:value="494.898681640625">
            <text:p>494.8986816406</text:p>
          </table:table-cell>
          <table:table-cell office:value-type="float" office:value="0.005590427">
            <text:p>0.005590427</text:p>
          </table:table-cell>
          <table:table-cell table:number-columns-repeated="4"/>
        </table:table-row>
        <table:table-row table:style-name="ro1">
          <table:table-cell office:value-type="float" office:value="495.014739990234">
            <text:p>495.0147399902</text:p>
          </table:table-cell>
          <table:table-cell office:value-type="float" office:value="-0.01164125">
            <text:p>-0.01164125</text:p>
          </table:table-cell>
          <table:table-cell table:number-columns-repeated="4"/>
        </table:table-row>
        <table:table-row table:style-name="ro1">
          <table:table-cell office:value-type="float" office:value="495.130798339844">
            <text:p>495.1307983398</text:p>
          </table:table-cell>
          <table:table-cell office:value-type="float" office:value="-0.01077587">
            <text:p>-0.01077587</text:p>
          </table:table-cell>
          <table:table-cell table:number-columns-repeated="4"/>
        </table:table-row>
        <table:table-row table:style-name="ro1">
          <table:table-cell office:value-type="float" office:value="495.246856689453">
            <text:p>495.2468566895</text:p>
          </table:table-cell>
          <table:table-cell office:value-type="float" office:value="0.004131497">
            <text:p>0.004131497</text:p>
          </table:table-cell>
          <table:table-cell table:number-columns-repeated="4"/>
        </table:table-row>
        <table:table-row table:style-name="ro1">
          <table:table-cell office:value-type="float" office:value="495.362915039063">
            <text:p>495.3629150391</text:p>
          </table:table-cell>
          <table:table-cell office:value-type="float" office:value="0.007399699">
            <text:p>0.007399699</text:p>
          </table:table-cell>
          <table:table-cell table:number-columns-repeated="4"/>
        </table:table-row>
        <table:table-row table:style-name="ro1">
          <table:table-cell office:value-type="float" office:value="495.478973388672">
            <text:p>495.4789733887</text:p>
          </table:table-cell>
          <table:table-cell office:value-type="float" office:value="-0.01195874">
            <text:p>-0.01195874</text:p>
          </table:table-cell>
          <table:table-cell table:number-columns-repeated="4"/>
        </table:table-row>
        <table:table-row table:style-name="ro1">
          <table:table-cell office:value-type="float" office:value="495.595062255859">
            <text:p>495.5950622559</text:p>
          </table:table-cell>
          <table:table-cell office:value-type="float" office:value="0.003993055">
            <text:p>0.003993055</text:p>
          </table:table-cell>
          <table:table-cell table:number-columns-repeated="4"/>
        </table:table-row>
        <table:table-row table:style-name="ro1">
          <table:table-cell office:value-type="float" office:value="495.711151123047">
            <text:p>495.711151123</text:p>
          </table:table-cell>
          <table:table-cell office:value-type="float" office:value="-0.003365073">
            <text:p>-0.003365073</text:p>
          </table:table-cell>
          <table:table-cell table:number-columns-repeated="4"/>
        </table:table-row>
        <table:table-row table:style-name="ro1">
          <table:table-cell office:value-type="float" office:value="495.827209472656">
            <text:p>495.8272094727</text:p>
          </table:table-cell>
          <table:table-cell office:value-type="float" office:value="0.02479688">
            <text:p>0.02479688</text:p>
          </table:table-cell>
          <table:table-cell table:number-columns-repeated="4"/>
        </table:table-row>
        <table:table-row table:style-name="ro1">
          <table:table-cell office:value-type="float" office:value="495.943298339844">
            <text:p>495.9432983398</text:p>
          </table:table-cell>
          <table:table-cell office:value-type="float" office:value="-0.001411978">
            <text:p>-0.001411978</text:p>
          </table:table-cell>
          <table:table-cell table:number-columns-repeated="4"/>
        </table:table-row>
        <table:table-row table:style-name="ro1">
          <table:table-cell office:value-type="float" office:value="496.059387207031">
            <text:p>496.059387207</text:p>
          </table:table-cell>
          <table:table-cell office:value-type="float" office:value="0.008920812">
            <text:p>0.008920812</text:p>
          </table:table-cell>
          <table:table-cell table:number-columns-repeated="4"/>
        </table:table-row>
        <table:table-row table:style-name="ro1">
          <table:table-cell office:value-type="float" office:value="496.175506591797">
            <text:p>496.1755065918</text:p>
          </table:table-cell>
          <table:table-cell office:value-type="float" office:value="-0.003519577">
            <text:p>-0.003519577</text:p>
          </table:table-cell>
          <table:table-cell table:number-columns-repeated="4"/>
        </table:table-row>
        <table:table-row table:style-name="ro1">
          <table:table-cell office:value-type="float" office:value="496.291595458984">
            <text:p>496.291595459</text:p>
          </table:table-cell>
          <table:table-cell office:value-type="float" office:value="-0.005680225">
            <text:p>-0.005680225</text:p>
          </table:table-cell>
          <table:table-cell table:number-columns-repeated="4"/>
        </table:table-row>
        <table:table-row table:style-name="ro1">
          <table:table-cell office:value-type="float" office:value="496.407684326172">
            <text:p>496.4076843262</text:p>
          </table:table-cell>
          <table:table-cell office:value-type="float" office:value="0.0108357">
            <text:p>0.0108357</text:p>
          </table:table-cell>
          <table:table-cell table:number-columns-repeated="4"/>
        </table:table-row>
        <table:table-row table:style-name="ro1">
          <table:table-cell office:value-type="float" office:value="496.523803710938">
            <text:p>496.5238037109</text:p>
          </table:table-cell>
          <table:table-cell office:value-type="float" office:value="-0.009240724">
            <text:p>-0.009240724</text:p>
          </table:table-cell>
          <table:table-cell table:number-columns-repeated="4"/>
        </table:table-row>
        <table:table-row table:style-name="ro1">
          <table:table-cell office:value-type="float" office:value="496.639923095703">
            <text:p>496.6399230957</text:p>
          </table:table-cell>
          <table:table-cell office:value-type="float" office:value="0.008355985">
            <text:p>0.008355985</text:p>
          </table:table-cell>
          <table:table-cell table:number-columns-repeated="4"/>
        </table:table-row>
        <table:table-row table:style-name="ro1">
          <table:table-cell office:value-type="float" office:value="496.756042480469">
            <text:p>496.7560424805</text:p>
          </table:table-cell>
          <table:table-cell office:value-type="float" office:value="0.005176373">
            <text:p>0.005176373</text:p>
          </table:table-cell>
          <table:table-cell table:number-columns-repeated="4"/>
        </table:table-row>
        <table:table-row table:style-name="ro1">
          <table:table-cell office:value-type="float" office:value="496.872161865234">
            <text:p>496.8721618652</text:p>
          </table:table-cell>
          <table:table-cell office:value-type="float" office:value="-0.004085396">
            <text:p>-0.004085396</text:p>
          </table:table-cell>
          <table:table-cell table:number-columns-repeated="4"/>
        </table:table-row>
        <table:table-row table:style-name="ro1">
          <table:table-cell office:value-type="float" office:value="496.98828125">
            <text:p>496.98828125</text:p>
          </table:table-cell>
          <table:table-cell office:value-type="float" office:value="0.002933208">
            <text:p>0.002933208</text:p>
          </table:table-cell>
          <table:table-cell table:number-columns-repeated="4"/>
        </table:table-row>
        <table:table-row table:style-name="ro1">
          <table:table-cell office:value-type="float" office:value="497.104400634766">
            <text:p>497.1044006348</text:p>
          </table:table-cell>
          <table:table-cell office:value-type="float" office:value="0.01974485">
            <text:p>0.01974485</text:p>
          </table:table-cell>
          <table:table-cell table:number-columns-repeated="4"/>
        </table:table-row>
        <table:table-row table:style-name="ro1">
          <table:table-cell office:value-type="float" office:value="497.220520019531">
            <text:p>497.2205200195</text:p>
          </table:table-cell>
          <table:table-cell office:value-type="float" office:value="0.003539562">
            <text:p>0.003539562</text:p>
          </table:table-cell>
          <table:table-cell table:number-columns-repeated="4"/>
        </table:table-row>
        <table:table-row table:style-name="ro1">
          <table:table-cell office:value-type="float" office:value="497.336669921875">
            <text:p>497.3366699219</text:p>
          </table:table-cell>
          <table:table-cell office:value-type="float" office:value="-0.003056231">
            <text:p>-0.003056231</text:p>
          </table:table-cell>
          <table:table-cell table:number-columns-repeated="4"/>
        </table:table-row>
        <table:table-row table:style-name="ro1">
          <table:table-cell office:value-type="float" office:value="497.452819824219">
            <text:p>497.4528198242</text:p>
          </table:table-cell>
          <table:table-cell office:value-type="float" office:value="-0.009062743">
            <text:p>-0.009062743</text:p>
          </table:table-cell>
          <table:table-cell table:number-columns-repeated="4"/>
        </table:table-row>
        <table:table-row table:style-name="ro1">
          <table:table-cell office:value-type="float" office:value="497.568939208984">
            <text:p>497.568939209</text:p>
          </table:table-cell>
          <table:table-cell office:value-type="float" office:value="0.005201141">
            <text:p>0.005201141</text:p>
          </table:table-cell>
          <table:table-cell table:number-columns-repeated="4"/>
        </table:table-row>
        <table:table-row table:style-name="ro1">
          <table:table-cell office:value-type="float" office:value="497.685089111328">
            <text:p>497.6850891113</text:p>
          </table:table-cell>
          <table:table-cell office:value-type="float" office:value="0.005781129">
            <text:p>0.005781129</text:p>
          </table:table-cell>
          <table:table-cell table:number-columns-repeated="4"/>
        </table:table-row>
        <table:table-row table:style-name="ro1">
          <table:table-cell office:value-type="float" office:value="497.801239013672">
            <text:p>497.8012390137</text:p>
          </table:table-cell>
          <table:table-cell office:value-type="float" office:value="0.000386175">
            <text:p>0.000386175</text:p>
          </table:table-cell>
          <table:table-cell table:number-columns-repeated="4"/>
        </table:table-row>
        <table:table-row table:style-name="ro1">
          <table:table-cell office:value-type="float" office:value="497.917388916016">
            <text:p>497.917388916</text:p>
          </table:table-cell>
          <table:table-cell office:value-type="float" office:value="-0.01045559">
            <text:p>-0.01045559</text:p>
          </table:table-cell>
          <table:table-cell table:number-columns-repeated="4"/>
        </table:table-row>
        <table:table-row table:style-name="ro1">
          <table:table-cell office:value-type="float" office:value="498.033569335938">
            <text:p>498.0335693359</text:p>
          </table:table-cell>
          <table:table-cell office:value-type="float" office:value="0.005646711">
            <text:p>0.005646711</text:p>
          </table:table-cell>
          <table:table-cell table:number-columns-repeated="4"/>
        </table:table-row>
        <table:table-row table:style-name="ro1">
          <table:table-cell office:value-type="float" office:value="498.149719238281">
            <text:p>498.1497192383</text:p>
          </table:table-cell>
          <table:table-cell office:value-type="float" office:value="0.0164303">
            <text:p>0.0164303</text:p>
          </table:table-cell>
          <table:table-cell table:number-columns-repeated="4"/>
        </table:table-row>
        <table:table-row table:style-name="ro1">
          <table:table-cell office:value-type="float" office:value="498.265899658203">
            <text:p>498.2658996582</text:p>
          </table:table-cell>
          <table:table-cell office:value-type="float" office:value="-0.00432714">
            <text:p>-0.00432714</text:p>
          </table:table-cell>
          <table:table-cell table:number-columns-repeated="4"/>
        </table:table-row>
        <table:table-row table:style-name="ro1">
          <table:table-cell office:value-type="float" office:value="498.382049560547">
            <text:p>498.3820495605</text:p>
          </table:table-cell>
          <table:table-cell office:value-type="float" office:value="-0.001843891">
            <text:p>-0.001843891</text:p>
          </table:table-cell>
          <table:table-cell table:number-columns-repeated="4"/>
        </table:table-row>
        <table:table-row table:style-name="ro1">
          <table:table-cell office:value-type="float" office:value="498.498229980469">
            <text:p>498.4982299805</text:p>
          </table:table-cell>
          <table:table-cell office:value-type="float" office:value="0.01398079">
            <text:p>0.01398079</text:p>
          </table:table-cell>
          <table:table-cell table:number-columns-repeated="4"/>
        </table:table-row>
        <table:table-row table:style-name="ro1">
          <table:table-cell office:value-type="float" office:value="498.614410400391">
            <text:p>498.6144104004</text:p>
          </table:table-cell>
          <table:table-cell office:value-type="string">
            <text:p>9.094353E-05</text:p>
          </table:table-cell>
          <table:table-cell table:number-columns-repeated="4"/>
        </table:table-row>
        <table:table-row table:style-name="ro1">
          <table:table-cell office:value-type="float" office:value="498.730590820313">
            <text:p>498.7305908203</text:p>
          </table:table-cell>
          <table:table-cell office:value-type="float" office:value="0.002862443">
            <text:p>0.002862443</text:p>
          </table:table-cell>
          <table:table-cell table:number-columns-repeated="4"/>
        </table:table-row>
        <table:table-row table:style-name="ro1">
          <table:table-cell office:value-type="float" office:value="498.846771240234">
            <text:p>498.8467712402</text:p>
          </table:table-cell>
          <table:table-cell office:value-type="float" office:value="-0.01219437">
            <text:p>-0.01219437</text:p>
          </table:table-cell>
          <table:table-cell table:number-columns-repeated="4"/>
        </table:table-row>
        <table:table-row table:style-name="ro1">
          <table:table-cell office:value-type="float" office:value="498.962982177734">
            <text:p>498.9629821777</text:p>
          </table:table-cell>
          <table:table-cell office:value-type="float" office:value="0.003682673">
            <text:p>0.003682673</text:p>
          </table:table-cell>
          <table:table-cell table:number-columns-repeated="4"/>
        </table:table-row>
        <table:table-row table:style-name="ro1">
          <table:table-cell office:value-type="float" office:value="499.079162597656">
            <text:p>499.0791625977</text:p>
          </table:table-cell>
          <table:table-cell office:value-type="float" office:value="0.02588698">
            <text:p>0.02588698</text:p>
          </table:table-cell>
          <table:table-cell table:number-columns-repeated="4"/>
        </table:table-row>
        <table:table-row table:style-name="ro1">
          <table:table-cell office:value-type="float" office:value="499.195373535156">
            <text:p>499.1953735352</text:p>
          </table:table-cell>
          <table:table-cell office:value-type="float" office:value="-0.006754959">
            <text:p>-0.006754959</text:p>
          </table:table-cell>
          <table:table-cell table:number-columns-repeated="4"/>
        </table:table-row>
        <table:table-row table:style-name="ro1">
          <table:table-cell office:value-type="float" office:value="499.311584472656">
            <text:p>499.3115844727</text:p>
          </table:table-cell>
          <table:table-cell office:value-type="float" office:value="-0.006413232">
            <text:p>-0.006413232</text:p>
          </table:table-cell>
          <table:table-cell table:number-columns-repeated="4"/>
        </table:table-row>
        <table:table-row table:style-name="ro1">
          <table:table-cell office:value-type="float" office:value="499.427764892578">
            <text:p>499.4277648926</text:p>
          </table:table-cell>
          <table:table-cell office:value-type="float" office:value="0.008040852">
            <text:p>0.008040852</text:p>
          </table:table-cell>
          <table:table-cell table:number-columns-repeated="4"/>
        </table:table-row>
        <table:table-row table:style-name="ro1">
          <table:table-cell office:value-type="float" office:value="499.543975830078">
            <text:p>499.5439758301</text:p>
          </table:table-cell>
          <table:table-cell office:value-type="float" office:value="-0.00155952">
            <text:p>-0.00155952</text:p>
          </table:table-cell>
          <table:table-cell table:number-columns-repeated="4"/>
        </table:table-row>
        <table:table-row table:style-name="ro1">
          <table:table-cell office:value-type="float" office:value="499.660217285156">
            <text:p>499.6602172852</text:p>
          </table:table-cell>
          <table:table-cell office:value-type="float" office:value="-0.006813366">
            <text:p>-0.006813366</text:p>
          </table:table-cell>
          <table:table-cell table:number-columns-repeated="4"/>
        </table:table-row>
        <table:table-row table:style-name="ro1">
          <table:table-cell office:value-type="float" office:value="499.776428222656">
            <text:p>499.7764282227</text:p>
          </table:table-cell>
          <table:table-cell office:value-type="float" office:value="-0.01307622">
            <text:p>-0.01307622</text:p>
          </table:table-cell>
          <table:table-cell table:number-columns-repeated="4"/>
        </table:table-row>
        <table:table-row table:style-name="ro1">
          <table:table-cell office:value-type="float" office:value="499.892639160156">
            <text:p>499.8926391602</text:p>
          </table:table-cell>
          <table:table-cell office:value-type="float" office:value="0.0007774198">
            <text:p>0.0007774198</text:p>
          </table:table-cell>
          <table:table-cell table:number-columns-repeated="4"/>
        </table:table-row>
        <table:table-row table:style-name="ro1">
          <table:table-cell office:value-type="float" office:value="500.008880615234">
            <text:p>500.0088806152</text:p>
          </table:table-cell>
          <table:table-cell office:value-type="float" office:value="0.02468361">
            <text:p>0.02468361</text:p>
          </table:table-cell>
          <table:table-cell table:number-columns-repeated="4"/>
        </table:table-row>
        <table:table-row table:style-name="ro1">
          <table:table-cell office:value-type="float" office:value="500.125091552734">
            <text:p>500.1250915527</text:p>
          </table:table-cell>
          <table:table-cell office:value-type="float" office:value="-0.003786045">
            <text:p>-0.003786045</text:p>
          </table:table-cell>
          <table:table-cell table:number-columns-repeated="4"/>
        </table:table-row>
        <table:table-row table:style-name="ro1">
          <table:table-cell office:value-type="float" office:value="500.241333007813">
            <text:p>500.2413330078</text:p>
          </table:table-cell>
          <table:table-cell office:value-type="float" office:value="0.001613445">
            <text:p>0.001613445</text:p>
          </table:table-cell>
          <table:table-cell table:number-columns-repeated="4"/>
        </table:table-row>
        <table:table-row table:style-name="ro1">
          <table:table-cell office:value-type="float" office:value="500.357574462891">
            <text:p>500.3575744629</text:p>
          </table:table-cell>
          <table:table-cell office:value-type="float" office:value="0.002262797">
            <text:p>0.002262797</text:p>
          </table:table-cell>
          <table:table-cell table:number-columns-repeated="4"/>
        </table:table-row>
        <table:table-row table:style-name="ro1">
          <table:table-cell office:value-type="float" office:value="500.473815917969">
            <text:p>500.473815918</text:p>
          </table:table-cell>
          <table:table-cell office:value-type="float" office:value="0.001665016">
            <text:p>0.001665016</text:p>
          </table:table-cell>
          <table:table-cell table:number-columns-repeated="4"/>
        </table:table-row>
        <table:table-row table:style-name="ro1">
          <table:table-cell office:value-type="float" office:value="500.590057373047">
            <text:p>500.590057373</text:p>
          </table:table-cell>
          <table:table-cell office:value-type="float" office:value="-0.009090562">
            <text:p>-0.009090562</text:p>
          </table:table-cell>
          <table:table-cell table:number-columns-repeated="4"/>
        </table:table-row>
        <table:table-row table:style-name="ro1">
          <table:table-cell office:value-type="float" office:value="500.706298828125">
            <text:p>500.7062988281</text:p>
          </table:table-cell>
          <table:table-cell office:value-type="float" office:value="-0.009524034">
            <text:p>-0.009524034</text:p>
          </table:table-cell>
          <table:table-cell table:number-columns-repeated="4"/>
        </table:table-row>
        <table:table-row table:style-name="ro1">
          <table:table-cell office:value-type="float" office:value="500.822570800781">
            <text:p>500.8225708008</text:p>
          </table:table-cell>
          <table:table-cell office:value-type="float" office:value="0.0007581829">
            <text:p>0.0007581829</text:p>
          </table:table-cell>
          <table:table-cell table:number-columns-repeated="4"/>
        </table:table-row>
        <table:table-row table:style-name="ro1">
          <table:table-cell office:value-type="float" office:value="500.938812255859">
            <text:p>500.9388122559</text:p>
          </table:table-cell>
          <table:table-cell office:value-type="float" office:value="0.003621838">
            <text:p>0.003621838</text:p>
          </table:table-cell>
          <table:table-cell table:number-columns-repeated="4"/>
        </table:table-row>
        <table:table-row table:style-name="ro1">
          <table:table-cell office:value-type="float" office:value="501.055084228516">
            <text:p>501.0550842285</text:p>
          </table:table-cell>
          <table:table-cell office:value-type="float" office:value="-0.01151074">
            <text:p>-0.01151074</text:p>
          </table:table-cell>
          <table:table-cell table:number-columns-repeated="4"/>
        </table:table-row>
        <table:table-row table:style-name="ro1">
          <table:table-cell office:value-type="float" office:value="501.171356201172">
            <text:p>501.1713562012</text:p>
          </table:table-cell>
          <table:table-cell office:value-type="float" office:value="-0.003619039">
            <text:p>-0.003619039</text:p>
          </table:table-cell>
          <table:table-cell table:number-columns-repeated="4"/>
        </table:table-row>
        <table:table-row table:style-name="ro1">
          <table:table-cell office:value-type="float" office:value="501.287628173828">
            <text:p>501.2876281738</text:p>
          </table:table-cell>
          <table:table-cell office:value-type="float" office:value="0.00688757">
            <text:p>0.00688757</text:p>
          </table:table-cell>
          <table:table-cell table:number-columns-repeated="4"/>
        </table:table-row>
        <table:table-row table:style-name="ro1">
          <table:table-cell office:value-type="float" office:value="501.403900146484">
            <text:p>501.4039001465</text:p>
          </table:table-cell>
          <table:table-cell office:value-type="float" office:value="0.001515734">
            <text:p>0.001515734</text:p>
          </table:table-cell>
          <table:table-cell table:number-columns-repeated="4"/>
        </table:table-row>
        <table:table-row table:style-name="ro1">
          <table:table-cell office:value-type="float" office:value="501.520172119141">
            <text:p>501.5201721191</text:p>
          </table:table-cell>
          <table:table-cell office:value-type="float" office:value="-0.003311668">
            <text:p>-0.003311668</text:p>
          </table:table-cell>
          <table:table-cell table:number-columns-repeated="4"/>
        </table:table-row>
        <table:table-row table:style-name="ro1">
          <table:table-cell office:value-type="float" office:value="501.636444091797">
            <text:p>501.6364440918</text:p>
          </table:table-cell>
          <table:table-cell office:value-type="float" office:value="0.05987405">
            <text:p>0.05987405</text:p>
          </table:table-cell>
          <table:table-cell table:number-columns-repeated="4"/>
        </table:table-row>
        <table:table-row table:style-name="ro1">
          <table:table-cell office:value-type="float" office:value="501.752746582031">
            <text:p>501.752746582</text:p>
          </table:table-cell>
          <table:table-cell office:value-type="float" office:value="0.0002985203">
            <text:p>0.0002985203</text:p>
          </table:table-cell>
          <table:table-cell table:number-columns-repeated="4"/>
        </table:table-row>
        <table:table-row table:style-name="ro1">
          <table:table-cell office:value-type="float" office:value="501.869018554688">
            <text:p>501.8690185547</text:p>
          </table:table-cell>
          <table:table-cell office:value-type="float" office:value="-0.0007605864">
            <text:p>-0.0007605864</text:p>
          </table:table-cell>
          <table:table-cell table:number-columns-repeated="4"/>
        </table:table-row>
        <table:table-row table:style-name="ro1">
          <table:table-cell office:value-type="float" office:value="501.985321044922">
            <text:p>501.9853210449</text:p>
          </table:table-cell>
          <table:table-cell office:value-type="float" office:value="0.003109199">
            <text:p>0.003109199</text:p>
          </table:table-cell>
          <table:table-cell table:number-columns-repeated="4"/>
        </table:table-row>
        <table:table-row table:style-name="ro1">
          <table:table-cell office:value-type="float" office:value="502.101623535156">
            <text:p>502.1016235352</text:p>
          </table:table-cell>
          <table:table-cell office:value-type="float" office:value="-0.009965683">
            <text:p>-0.009965683</text:p>
          </table:table-cell>
          <table:table-cell table:number-columns-repeated="4"/>
        </table:table-row>
        <table:table-row table:style-name="ro1">
          <table:table-cell office:value-type="float" office:value="502.217926025391">
            <text:p>502.2179260254</text:p>
          </table:table-cell>
          <table:table-cell office:value-type="float" office:value="0.00220925">
            <text:p>0.00220925</text:p>
          </table:table-cell>
          <table:table-cell table:number-columns-repeated="4"/>
        </table:table-row>
        <table:table-row table:style-name="ro1">
          <table:table-cell office:value-type="float" office:value="502.334228515625">
            <text:p>502.3342285156</text:p>
          </table:table-cell>
          <table:table-cell office:value-type="float" office:value="-0.002667832">
            <text:p>-0.002667832</text:p>
          </table:table-cell>
          <table:table-cell table:number-columns-repeated="4"/>
        </table:table-row>
        <table:table-row table:style-name="ro1">
          <table:table-cell office:value-type="float" office:value="502.450531005859">
            <text:p>502.4505310059</text:p>
          </table:table-cell>
          <table:table-cell office:value-type="float" office:value="-0.008724832">
            <text:p>-0.008724832</text:p>
          </table:table-cell>
          <table:table-cell table:number-columns-repeated="4"/>
        </table:table-row>
        <table:table-row table:style-name="ro1">
          <table:table-cell office:value-type="float" office:value="502.566833496094">
            <text:p>502.5668334961</text:p>
          </table:table-cell>
          <table:table-cell office:value-type="float" office:value="0.0001379976">
            <text:p>0.0001379976</text:p>
          </table:table-cell>
          <table:table-cell table:number-columns-repeated="4"/>
        </table:table-row>
        <table:table-row table:style-name="ro1">
          <table:table-cell office:value-type="float" office:value="502.683166503906">
            <text:p>502.6831665039</text:p>
          </table:table-cell>
          <table:table-cell office:value-type="float" office:value="0.004119418">
            <text:p>0.004119418</text:p>
          </table:table-cell>
          <table:table-cell table:number-columns-repeated="4"/>
        </table:table-row>
        <table:table-row table:style-name="ro1">
          <table:table-cell office:value-type="float" office:value="502.799468994141">
            <text:p>502.7994689941</text:p>
          </table:table-cell>
          <table:table-cell office:value-type="float" office:value="-0.000983425">
            <text:p>-0.000983425</text:p>
          </table:table-cell>
          <table:table-cell table:number-columns-repeated="4"/>
        </table:table-row>
        <table:table-row table:style-name="ro1">
          <table:table-cell office:value-type="float" office:value="502.915802001953">
            <text:p>502.915802002</text:p>
          </table:table-cell>
          <table:table-cell office:value-type="float" office:value="-0.005374307">
            <text:p>-0.005374307</text:p>
          </table:table-cell>
          <table:table-cell table:number-columns-repeated="4"/>
        </table:table-row>
        <table:table-row table:style-name="ro1">
          <table:table-cell office:value-type="float" office:value="503.032135009766">
            <text:p>503.0321350098</text:p>
          </table:table-cell>
          <table:table-cell office:value-type="float" office:value="-0.008257302">
            <text:p>-0.008257302</text:p>
          </table:table-cell>
          <table:table-cell table:number-columns-repeated="4"/>
        </table:table-row>
        <table:table-row table:style-name="ro1">
          <table:table-cell office:value-type="float" office:value="503.148468017578">
            <text:p>503.1484680176</text:p>
          </table:table-cell>
          <table:table-cell office:value-type="float" office:value="-0.001456497">
            <text:p>-0.001456497</text:p>
          </table:table-cell>
          <table:table-cell table:number-columns-repeated="4"/>
        </table:table-row>
        <table:table-row table:style-name="ro1">
          <table:table-cell office:value-type="float" office:value="503.264801025391">
            <text:p>503.2648010254</text:p>
          </table:table-cell>
          <table:table-cell office:value-type="float" office:value="0.006154581">
            <text:p>0.006154581</text:p>
          </table:table-cell>
          <table:table-cell table:number-columns-repeated="4"/>
        </table:table-row>
        <table:table-row table:style-name="ro1">
          <table:table-cell office:value-type="float" office:value="503.381134033203">
            <text:p>503.3811340332</text:p>
          </table:table-cell>
          <table:table-cell office:value-type="float" office:value="-0.008250756">
            <text:p>-0.008250756</text:p>
          </table:table-cell>
          <table:table-cell table:number-columns-repeated="4"/>
        </table:table-row>
        <table:table-row table:style-name="ro1">
          <table:table-cell office:value-type="float" office:value="503.497497558594">
            <text:p>503.4974975586</text:p>
          </table:table-cell>
          <table:table-cell office:value-type="float" office:value="-0.005538395">
            <text:p>-0.005538395</text:p>
          </table:table-cell>
          <table:table-cell table:number-columns-repeated="4"/>
        </table:table-row>
        <table:table-row table:style-name="ro1">
          <table:table-cell office:value-type="float" office:value="503.613830566406">
            <text:p>503.6138305664</text:p>
          </table:table-cell>
          <table:table-cell office:value-type="float" office:value="0.0003855758">
            <text:p>0.0003855758</text:p>
          </table:table-cell>
          <table:table-cell table:number-columns-repeated="4"/>
        </table:table-row>
        <table:table-row table:style-name="ro1">
          <table:table-cell office:value-type="float" office:value="503.730194091797">
            <text:p>503.7301940918</text:p>
          </table:table-cell>
          <table:table-cell office:value-type="float" office:value="-0.002375942">
            <text:p>-0.002375942</text:p>
          </table:table-cell>
          <table:table-cell table:number-columns-repeated="4"/>
        </table:table-row>
        <table:table-row table:style-name="ro1">
          <table:table-cell office:value-type="float" office:value="503.846527099609">
            <text:p>503.8465270996</text:p>
          </table:table-cell>
          <table:table-cell office:value-type="float" office:value="-0.000977457">
            <text:p>-0.000977457</text:p>
          </table:table-cell>
          <table:table-cell table:number-columns-repeated="4"/>
        </table:table-row>
        <table:table-row table:style-name="ro1">
          <table:table-cell office:value-type="float" office:value="503.962890625">
            <text:p>503.962890625</text:p>
          </table:table-cell>
          <table:table-cell office:value-type="float" office:value="-0.01101709">
            <text:p>-0.01101709</text:p>
          </table:table-cell>
          <table:table-cell table:number-columns-repeated="4"/>
        </table:table-row>
        <table:table-row table:style-name="ro1">
          <table:table-cell office:value-type="float" office:value="504.079254150391">
            <text:p>504.0792541504</text:p>
          </table:table-cell>
          <table:table-cell office:value-type="float" office:value="0.0004948046">
            <text:p>0.0004948046</text:p>
          </table:table-cell>
          <table:table-cell table:number-columns-repeated="4"/>
        </table:table-row>
        <table:table-row table:style-name="ro1">
          <table:table-cell office:value-type="float" office:value="504.195617675781">
            <text:p>504.1956176758</text:p>
          </table:table-cell>
          <table:table-cell office:value-type="float" office:value="0.004986916">
            <text:p>0.004986916</text:p>
          </table:table-cell>
          <table:table-cell table:number-columns-repeated="4"/>
        </table:table-row>
        <table:table-row table:style-name="ro1">
          <table:table-cell office:value-type="float" office:value="504.31201171875">
            <text:p>504.3120117188</text:p>
          </table:table-cell>
          <table:table-cell office:value-type="float" office:value="0.004713517">
            <text:p>0.004713517</text:p>
          </table:table-cell>
          <table:table-cell table:number-columns-repeated="4"/>
        </table:table-row>
        <table:table-row table:style-name="ro1">
          <table:table-cell office:value-type="float" office:value="504.428375244141">
            <text:p>504.4283752441</text:p>
          </table:table-cell>
          <table:table-cell office:value-type="float" office:value="-0.007139998">
            <text:p>-0.007139998</text:p>
          </table:table-cell>
          <table:table-cell table:number-columns-repeated="4"/>
        </table:table-row>
        <table:table-row table:style-name="ro1">
          <table:table-cell office:value-type="float" office:value="504.544738769531">
            <text:p>504.5447387695</text:p>
          </table:table-cell>
          <table:table-cell office:value-type="float" office:value="-0.0016253">
            <text:p>-0.0016253</text:p>
          </table:table-cell>
          <table:table-cell table:number-columns-repeated="4"/>
        </table:table-row>
        <table:table-row table:style-name="ro1">
          <table:table-cell office:value-type="float" office:value="504.6611328125">
            <text:p>504.6611328125</text:p>
          </table:table-cell>
          <table:table-cell office:value-type="float" office:value="0.0007888077">
            <text:p>0.0007888077</text:p>
          </table:table-cell>
          <table:table-cell table:number-columns-repeated="4"/>
        </table:table-row>
        <table:table-row table:style-name="ro1">
          <table:table-cell office:value-type="float" office:value="504.777526855469">
            <text:p>504.7775268555</text:p>
          </table:table-cell>
          <table:table-cell office:value-type="float" office:value="-0.002087396">
            <text:p>-0.002087396</text:p>
          </table:table-cell>
          <table:table-cell table:number-columns-repeated="4"/>
        </table:table-row>
        <table:table-row table:style-name="ro1">
          <table:table-cell office:value-type="float" office:value="504.893920898438">
            <text:p>504.8939208984</text:p>
          </table:table-cell>
          <table:table-cell office:value-type="float" office:value="-0.001916137">
            <text:p>-0.001916137</text:p>
          </table:table-cell>
          <table:table-cell table:number-columns-repeated="4"/>
        </table:table-row>
        <table:table-row table:style-name="ro1">
          <table:table-cell office:value-type="float" office:value="505.010314941406">
            <text:p>505.0103149414</text:p>
          </table:table-cell>
          <table:table-cell office:value-type="float" office:value="0.008268374">
            <text:p>0.008268374</text:p>
          </table:table-cell>
          <table:table-cell table:number-columns-repeated="4"/>
        </table:table-row>
        <table:table-row table:style-name="ro1">
          <table:table-cell office:value-type="float" office:value="505.126708984375">
            <text:p>505.1267089844</text:p>
          </table:table-cell>
          <table:table-cell office:value-type="float" office:value="0.02224128">
            <text:p>0.02224128</text:p>
          </table:table-cell>
          <table:table-cell table:number-columns-repeated="4"/>
        </table:table-row>
        <table:table-row table:style-name="ro1">
          <table:table-cell office:value-type="float" office:value="505.243103027344">
            <text:p>505.2431030273</text:p>
          </table:table-cell>
          <table:table-cell office:value-type="float" office:value="-0.0008128414">
            <text:p>-0.0008128414</text:p>
          </table:table-cell>
          <table:table-cell table:number-columns-repeated="4"/>
        </table:table-row>
        <table:table-row table:style-name="ro1">
          <table:table-cell office:value-type="float" office:value="505.359497070313">
            <text:p>505.3594970703</text:p>
          </table:table-cell>
          <table:table-cell office:value-type="float" office:value="-0.004725337">
            <text:p>-0.004725337</text:p>
          </table:table-cell>
          <table:table-cell table:number-columns-repeated="4"/>
        </table:table-row>
        <table:table-row table:style-name="ro1">
          <table:table-cell office:value-type="float" office:value="505.475921630859">
            <text:p>505.4759216309</text:p>
          </table:table-cell>
          <table:table-cell office:value-type="float" office:value="0.002800486">
            <text:p>0.002800486</text:p>
          </table:table-cell>
          <table:table-cell table:number-columns-repeated="4"/>
        </table:table-row>
        <table:table-row table:style-name="ro1">
          <table:table-cell office:value-type="float" office:value="505.592346191406">
            <text:p>505.5923461914</text:p>
          </table:table-cell>
          <table:table-cell office:value-type="float" office:value="0.01088279">
            <text:p>0.01088279</text:p>
          </table:table-cell>
          <table:table-cell table:number-columns-repeated="4"/>
        </table:table-row>
        <table:table-row table:style-name="ro1">
          <table:table-cell office:value-type="float" office:value="505.708740234375">
            <text:p>505.7087402344</text:p>
          </table:table-cell>
          <table:table-cell office:value-type="float" office:value="-0.006970427">
            <text:p>-0.006970427</text:p>
          </table:table-cell>
          <table:table-cell table:number-columns-repeated="4"/>
        </table:table-row>
        <table:table-row table:style-name="ro1">
          <table:table-cell office:value-type="float" office:value="505.825164794922">
            <text:p>505.8251647949</text:p>
          </table:table-cell>
          <table:table-cell office:value-type="float" office:value="-0.005309667">
            <text:p>-0.005309667</text:p>
          </table:table-cell>
          <table:table-cell table:number-columns-repeated="4"/>
        </table:table-row>
        <table:table-row table:style-name="ro1">
          <table:table-cell office:value-type="float" office:value="505.941589355469">
            <text:p>505.9415893555</text:p>
          </table:table-cell>
          <table:table-cell office:value-type="float" office:value="0.001189208">
            <text:p>0.001189208</text:p>
          </table:table-cell>
          <table:table-cell table:number-columns-repeated="4"/>
        </table:table-row>
        <table:table-row table:style-name="ro1">
          <table:table-cell office:value-type="float" office:value="506.058013916016">
            <text:p>506.058013916</text:p>
          </table:table-cell>
          <table:table-cell office:value-type="float" office:value="0.001594353">
            <text:p>0.001594353</text:p>
          </table:table-cell>
          <table:table-cell table:number-columns-repeated="4"/>
        </table:table-row>
        <table:table-row table:style-name="ro1">
          <table:table-cell office:value-type="float" office:value="506.174468994141">
            <text:p>506.1744689941</text:p>
          </table:table-cell>
          <table:table-cell office:value-type="float" office:value="0.001478407">
            <text:p>0.001478407</text:p>
          </table:table-cell>
          <table:table-cell table:number-columns-repeated="4"/>
        </table:table-row>
        <table:table-row table:style-name="ro1">
          <table:table-cell office:value-type="float" office:value="506.290893554688">
            <text:p>506.2908935547</text:p>
          </table:table-cell>
          <table:table-cell office:value-type="float" office:value="-0.004181646">
            <text:p>-0.004181646</text:p>
          </table:table-cell>
          <table:table-cell table:number-columns-repeated="4"/>
        </table:table-row>
        <table:table-row table:style-name="ro1">
          <table:table-cell office:value-type="float" office:value="506.407348632813">
            <text:p>506.4073486328</text:p>
          </table:table-cell>
          <table:table-cell office:value-type="float" office:value="0.007559607">
            <text:p>0.007559607</text:p>
          </table:table-cell>
          <table:table-cell table:number-columns-repeated="4"/>
        </table:table-row>
        <table:table-row table:style-name="ro1">
          <table:table-cell office:value-type="float" office:value="506.523773193359">
            <text:p>506.5237731934</text:p>
          </table:table-cell>
          <table:table-cell office:value-type="float" office:value="0.001105676">
            <text:p>0.001105676</text:p>
          </table:table-cell>
          <table:table-cell table:number-columns-repeated="4"/>
        </table:table-row>
        <table:table-row table:style-name="ro1">
          <table:table-cell office:value-type="float" office:value="506.640228271484">
            <text:p>506.6402282715</text:p>
          </table:table-cell>
          <table:table-cell office:value-type="float" office:value="0.0001028322">
            <text:p>0.0001028322</text:p>
          </table:table-cell>
          <table:table-cell table:number-columns-repeated="4"/>
        </table:table-row>
        <table:table-row table:style-name="ro1">
          <table:table-cell office:value-type="float" office:value="506.756683349609">
            <text:p>506.7566833496</text:p>
          </table:table-cell>
          <table:table-cell office:value-type="float" office:value="0.003418362">
            <text:p>0.003418362</text:p>
          </table:table-cell>
          <table:table-cell table:number-columns-repeated="4"/>
        </table:table-row>
        <table:table-row table:style-name="ro1">
          <table:table-cell office:value-type="float" office:value="506.873138427734">
            <text:p>506.8731384277</text:p>
          </table:table-cell>
          <table:table-cell office:value-type="float" office:value="0.008629066">
            <text:p>0.008629066</text:p>
          </table:table-cell>
          <table:table-cell table:number-columns-repeated="4"/>
        </table:table-row>
        <table:table-row table:style-name="ro1">
          <table:table-cell office:value-type="float" office:value="506.989593505859">
            <text:p>506.9895935059</text:p>
          </table:table-cell>
          <table:table-cell office:value-type="float" office:value="-0.0007244824">
            <text:p>-0.0007244824</text:p>
          </table:table-cell>
          <table:table-cell table:number-columns-repeated="4"/>
        </table:table-row>
        <table:table-row table:style-name="ro1">
          <table:table-cell office:value-type="float" office:value="507.106048583984">
            <text:p>507.106048584</text:p>
          </table:table-cell>
          <table:table-cell office:value-type="float" office:value="-0.00465782">
            <text:p>-0.00465782</text:p>
          </table:table-cell>
          <table:table-cell table:number-columns-repeated="4"/>
        </table:table-row>
        <table:table-row table:style-name="ro1">
          <table:table-cell office:value-type="float" office:value="507.222534179688">
            <text:p>507.2225341797</text:p>
          </table:table-cell>
          <table:table-cell office:value-type="float" office:value="-0.01208535">
            <text:p>-0.01208535</text:p>
          </table:table-cell>
          <table:table-cell table:number-columns-repeated="4"/>
        </table:table-row>
        <table:table-row table:style-name="ro1">
          <table:table-cell office:value-type="float" office:value="507.338989257813">
            <text:p>507.3389892578</text:p>
          </table:table-cell>
          <table:table-cell office:value-type="float" office:value="-0.003830777">
            <text:p>-0.003830777</text:p>
          </table:table-cell>
          <table:table-cell table:number-columns-repeated="4"/>
        </table:table-row>
        <table:table-row table:style-name="ro1">
          <table:table-cell office:value-type="float" office:value="507.455474853516">
            <text:p>507.4554748535</text:p>
          </table:table-cell>
          <table:table-cell office:value-type="float" office:value="-0.000581908">
            <text:p>-0.000581908</text:p>
          </table:table-cell>
          <table:table-cell table:number-columns-repeated="4"/>
        </table:table-row>
        <table:table-row table:style-name="ro1">
          <table:table-cell office:value-type="float" office:value="507.571960449219">
            <text:p>507.5719604492</text:p>
          </table:table-cell>
          <table:table-cell office:value-type="float" office:value="-0.01102429">
            <text:p>-0.01102429</text:p>
          </table:table-cell>
          <table:table-cell table:number-columns-repeated="4"/>
        </table:table-row>
        <table:table-row table:style-name="ro1">
          <table:table-cell office:value-type="float" office:value="507.688446044922">
            <text:p>507.6884460449</text:p>
          </table:table-cell>
          <table:table-cell office:value-type="float" office:value="-0.008302399">
            <text:p>-0.008302399</text:p>
          </table:table-cell>
          <table:table-cell table:number-columns-repeated="4"/>
        </table:table-row>
        <table:table-row table:style-name="ro1">
          <table:table-cell office:value-type="float" office:value="507.804931640625">
            <text:p>507.8049316406</text:p>
          </table:table-cell>
          <table:table-cell office:value-type="float" office:value="-0.0007223395">
            <text:p>-0.0007223395</text:p>
          </table:table-cell>
          <table:table-cell table:number-columns-repeated="4"/>
        </table:table-row>
        <table:table-row table:style-name="ro1">
          <table:table-cell office:value-type="float" office:value="507.921417236328">
            <text:p>507.9214172363</text:p>
          </table:table-cell>
          <table:table-cell office:value-type="float" office:value="-0.0007581087">
            <text:p>-0.0007581087</text:p>
          </table:table-cell>
          <table:table-cell table:number-columns-repeated="4"/>
        </table:table-row>
        <table:table-row table:style-name="ro1">
          <table:table-cell office:value-type="float" office:value="508.037902832031">
            <text:p>508.037902832</text:p>
          </table:table-cell>
          <table:table-cell office:value-type="float" office:value="-0.004739875">
            <text:p>-0.004739875</text:p>
          </table:table-cell>
          <table:table-cell table:number-columns-repeated="4"/>
        </table:table-row>
        <table:table-row table:style-name="ro1">
          <table:table-cell office:value-type="float" office:value="508.154388427734">
            <text:p>508.1543884277</text:p>
          </table:table-cell>
          <table:table-cell office:value-type="float" office:value="-0.000114115">
            <text:p>-0.000114115</text:p>
          </table:table-cell>
          <table:table-cell table:number-columns-repeated="4"/>
        </table:table-row>
        <table:table-row table:style-name="ro1">
          <table:table-cell office:value-type="float" office:value="508.270904541016">
            <text:p>508.270904541</text:p>
          </table:table-cell>
          <table:table-cell office:value-type="float" office:value="0.001281525">
            <text:p>0.001281525</text:p>
          </table:table-cell>
          <table:table-cell table:number-columns-repeated="4"/>
        </table:table-row>
        <table:table-row table:style-name="ro1">
          <table:table-cell office:value-type="float" office:value="508.387420654297">
            <text:p>508.3874206543</text:p>
          </table:table-cell>
          <table:table-cell office:value-type="float" office:value="-0.003967895">
            <text:p>-0.003967895</text:p>
          </table:table-cell>
          <table:table-cell table:number-columns-repeated="4"/>
        </table:table-row>
        <table:table-row table:style-name="ro1">
          <table:table-cell office:value-type="float" office:value="508.50390625">
            <text:p>508.50390625</text:p>
          </table:table-cell>
          <table:table-cell office:value-type="float" office:value="-0.005733976">
            <text:p>-0.005733976</text:p>
          </table:table-cell>
          <table:table-cell table:number-columns-repeated="4"/>
        </table:table-row>
        <table:table-row table:style-name="ro1">
          <table:table-cell office:value-type="float" office:value="508.620422363281">
            <text:p>508.6204223633</text:p>
          </table:table-cell>
          <table:table-cell office:value-type="float" office:value="-0.008126372">
            <text:p>-0.008126372</text:p>
          </table:table-cell>
          <table:table-cell table:number-columns-repeated="4"/>
        </table:table-row>
        <table:table-row table:style-name="ro1">
          <table:table-cell office:value-type="float" office:value="508.736938476563">
            <text:p>508.7369384766</text:p>
          </table:table-cell>
          <table:table-cell office:value-type="float" office:value="0.01840464">
            <text:p>0.01840464</text:p>
          </table:table-cell>
          <table:table-cell table:number-columns-repeated="4"/>
        </table:table-row>
        <table:table-row table:style-name="ro1">
          <table:table-cell office:value-type="float" office:value="508.853454589844">
            <text:p>508.8534545898</text:p>
          </table:table-cell>
          <table:table-cell office:value-type="float" office:value="0.0041402">
            <text:p>0.0041402</text:p>
          </table:table-cell>
          <table:table-cell table:number-columns-repeated="4"/>
        </table:table-row>
        <table:table-row table:style-name="ro1">
          <table:table-cell office:value-type="float" office:value="508.970001220703">
            <text:p>508.9700012207</text:p>
          </table:table-cell>
          <table:table-cell office:value-type="float" office:value="-0.005290775">
            <text:p>-0.005290775</text:p>
          </table:table-cell>
          <table:table-cell table:number-columns-repeated="4"/>
        </table:table-row>
        <table:table-row table:style-name="ro1">
          <table:table-cell office:value-type="float" office:value="509.086517333984">
            <text:p>509.086517334</text:p>
          </table:table-cell>
          <table:table-cell office:value-type="float" office:value="-0.001659951">
            <text:p>-0.001659951</text:p>
          </table:table-cell>
          <table:table-cell table:number-columns-repeated="4"/>
        </table:table-row>
        <table:table-row table:style-name="ro1">
          <table:table-cell office:value-type="float" office:value="509.203063964844">
            <text:p>509.2030639648</text:p>
          </table:table-cell>
          <table:table-cell office:value-type="float" office:value="0.01269598">
            <text:p>0.01269598</text:p>
          </table:table-cell>
          <table:table-cell table:number-columns-repeated="4"/>
        </table:table-row>
        <table:table-row table:style-name="ro1">
          <table:table-cell office:value-type="float" office:value="509.319580078125">
            <text:p>509.3195800781</text:p>
          </table:table-cell>
          <table:table-cell office:value-type="float" office:value="-0.00116941">
            <text:p>-0.00116941</text:p>
          </table:table-cell>
          <table:table-cell table:number-columns-repeated="4"/>
        </table:table-row>
        <table:table-row table:style-name="ro1">
          <table:table-cell office:value-type="float" office:value="509.436126708984">
            <text:p>509.436126709</text:p>
          </table:table-cell>
          <table:table-cell office:value-type="float" office:value="-0.003427976">
            <text:p>-0.003427976</text:p>
          </table:table-cell>
          <table:table-cell table:number-columns-repeated="4"/>
        </table:table-row>
        <table:table-row table:style-name="ro1">
          <table:table-cell office:value-type="float" office:value="509.552673339844">
            <text:p>509.5526733398</text:p>
          </table:table-cell>
          <table:table-cell office:value-type="float" office:value="-0.004442543">
            <text:p>-0.004442543</text:p>
          </table:table-cell>
          <table:table-cell table:number-columns-repeated="4"/>
        </table:table-row>
        <table:table-row table:style-name="ro1">
          <table:table-cell office:value-type="float" office:value="509.669219970703">
            <text:p>509.6692199707</text:p>
          </table:table-cell>
          <table:table-cell office:value-type="float" office:value="0.007848962">
            <text:p>0.007848962</text:p>
          </table:table-cell>
          <table:table-cell table:number-columns-repeated="4"/>
        </table:table-row>
        <table:table-row table:style-name="ro1">
          <table:table-cell office:value-type="float" office:value="509.785766601563">
            <text:p>509.7857666016</text:p>
          </table:table-cell>
          <table:table-cell office:value-type="float" office:value="0.003678875">
            <text:p>0.003678875</text:p>
          </table:table-cell>
          <table:table-cell table:number-columns-repeated="4"/>
        </table:table-row>
        <table:table-row table:style-name="ro1">
          <table:table-cell office:value-type="float" office:value="509.902313232422">
            <text:p>509.9023132324</text:p>
          </table:table-cell>
          <table:table-cell office:value-type="float" office:value="-0.001240278">
            <text:p>-0.001240278</text:p>
          </table:table-cell>
          <table:table-cell table:number-columns-repeated="4"/>
        </table:table-row>
        <table:table-row table:style-name="ro1">
          <table:table-cell office:value-type="float" office:value="510.018890380859">
            <text:p>510.0188903809</text:p>
          </table:table-cell>
          <table:table-cell office:value-type="float" office:value="-0.008494597">
            <text:p>-0.008494597</text:p>
          </table:table-cell>
          <table:table-cell table:number-columns-repeated="4"/>
        </table:table-row>
        <table:table-row table:style-name="ro1">
          <table:table-cell office:value-type="float" office:value="510.135437011719">
            <text:p>510.1354370117</text:p>
          </table:table-cell>
          <table:table-cell office:value-type="float" office:value="-0.00202218">
            <text:p>-0.00202218</text:p>
          </table:table-cell>
          <table:table-cell table:number-columns-repeated="4"/>
        </table:table-row>
        <table:table-row table:style-name="ro1">
          <table:table-cell office:value-type="float" office:value="510.252014160156">
            <text:p>510.2520141602</text:p>
          </table:table-cell>
          <table:table-cell office:value-type="float" office:value="0.003526056">
            <text:p>0.003526056</text:p>
          </table:table-cell>
          <table:table-cell table:number-columns-repeated="4"/>
        </table:table-row>
        <table:table-row table:style-name="ro1">
          <table:table-cell office:value-type="float" office:value="510.368560791016">
            <text:p>510.368560791</text:p>
          </table:table-cell>
          <table:table-cell office:value-type="float" office:value="-0.003491686">
            <text:p>-0.003491686</text:p>
          </table:table-cell>
          <table:table-cell table:number-columns-repeated="4"/>
        </table:table-row>
        <table:table-row table:style-name="ro1">
          <table:table-cell office:value-type="float" office:value="510.485137939453">
            <text:p>510.4851379395</text:p>
          </table:table-cell>
          <table:table-cell office:value-type="float" office:value="-0.01019522">
            <text:p>-0.01019522</text:p>
          </table:table-cell>
          <table:table-cell table:number-columns-repeated="4"/>
        </table:table-row>
        <table:table-row table:style-name="ro1">
          <table:table-cell office:value-type="float" office:value="510.601715087891">
            <text:p>510.6017150879</text:p>
          </table:table-cell>
          <table:table-cell office:value-type="float" office:value="0.005505182">
            <text:p>0.005505182</text:p>
          </table:table-cell>
          <table:table-cell table:number-columns-repeated="4"/>
        </table:table-row>
        <table:table-row table:style-name="ro1">
          <table:table-cell office:value-type="float" office:value="510.718322753906">
            <text:p>510.7183227539</text:p>
          </table:table-cell>
          <table:table-cell office:value-type="float" office:value="0.002363113">
            <text:p>0.002363113</text:p>
          </table:table-cell>
          <table:table-cell table:number-columns-repeated="4"/>
        </table:table-row>
        <table:table-row table:style-name="ro1">
          <table:table-cell office:value-type="float" office:value="510.834899902344">
            <text:p>510.8348999023</text:p>
          </table:table-cell>
          <table:table-cell office:value-type="float" office:value="-0.01082637">
            <text:p>-0.01082637</text:p>
          </table:table-cell>
          <table:table-cell table:number-columns-repeated="4"/>
        </table:table-row>
        <table:table-row table:style-name="ro1">
          <table:table-cell office:value-type="float" office:value="510.951477050781">
            <text:p>510.9514770508</text:p>
          </table:table-cell>
          <table:table-cell office:value-type="float" office:value="0.007980647">
            <text:p>0.007980647</text:p>
          </table:table-cell>
          <table:table-cell table:number-columns-repeated="4"/>
        </table:table-row>
        <table:table-row table:style-name="ro1">
          <table:table-cell office:value-type="float" office:value="511.068084716797">
            <text:p>511.0680847168</text:p>
          </table:table-cell>
          <table:table-cell office:value-type="float" office:value="-0.002324972">
            <text:p>-0.002324972</text:p>
          </table:table-cell>
          <table:table-cell table:number-columns-repeated="4"/>
        </table:table-row>
        <table:table-row table:style-name="ro1">
          <table:table-cell office:value-type="float" office:value="511.184661865234">
            <text:p>511.1846618652</text:p>
          </table:table-cell>
          <table:table-cell office:value-type="float" office:value="-0.003855637">
            <text:p>-0.003855637</text:p>
          </table:table-cell>
          <table:table-cell table:number-columns-repeated="4"/>
        </table:table-row>
        <table:table-row table:style-name="ro1">
          <table:table-cell office:value-type="float" office:value="511.30126953125">
            <text:p>511.3012695313</text:p>
          </table:table-cell>
          <table:table-cell office:value-type="float" office:value="-0.01028636">
            <text:p>-0.01028636</text:p>
          </table:table-cell>
          <table:table-cell table:number-columns-repeated="4"/>
        </table:table-row>
        <table:table-row table:style-name="ro1">
          <table:table-cell office:value-type="float" office:value="511.417877197266">
            <text:p>511.4178771973</text:p>
          </table:table-cell>
          <table:table-cell office:value-type="float" office:value="-0.01165192">
            <text:p>-0.01165192</text:p>
          </table:table-cell>
          <table:table-cell table:number-columns-repeated="4"/>
        </table:table-row>
        <table:table-row table:style-name="ro1">
          <table:table-cell office:value-type="float" office:value="511.534484863281">
            <text:p>511.5344848633</text:p>
          </table:table-cell>
          <table:table-cell office:value-type="float" office:value="-0.002671601">
            <text:p>-0.002671601</text:p>
          </table:table-cell>
          <table:table-cell table:number-columns-repeated="4"/>
        </table:table-row>
        <table:table-row table:style-name="ro1">
          <table:table-cell office:value-type="float" office:value="511.651092529297">
            <text:p>511.6510925293</text:p>
          </table:table-cell>
          <table:table-cell office:value-type="float" office:value="-0.004575451">
            <text:p>-0.004575451</text:p>
          </table:table-cell>
          <table:table-cell table:number-columns-repeated="4"/>
        </table:table-row>
        <table:table-row table:style-name="ro1">
          <table:table-cell office:value-type="float" office:value="511.767700195313">
            <text:p>511.7677001953</text:p>
          </table:table-cell>
          <table:table-cell office:value-type="float" office:value="-0.002073077">
            <text:p>-0.002073077</text:p>
          </table:table-cell>
          <table:table-cell table:number-columns-repeated="4"/>
        </table:table-row>
        <table:table-row table:style-name="ro1">
          <table:table-cell office:value-type="float" office:value="511.884338378906">
            <text:p>511.8843383789</text:p>
          </table:table-cell>
          <table:table-cell office:value-type="float" office:value="-0.003482527">
            <text:p>-0.003482527</text:p>
          </table:table-cell>
          <table:table-cell table:number-columns-repeated="4"/>
        </table:table-row>
        <table:table-row table:style-name="ro1">
          <table:table-cell office:value-type="float" office:value="512.0009765625">
            <text:p>512.0009765625</text:p>
          </table:table-cell>
          <table:table-cell office:value-type="float" office:value="-0.003395493">
            <text:p>-0.003395493</text:p>
          </table:table-cell>
          <table:table-cell table:number-columns-repeated="4"/>
        </table:table-row>
        <table:table-row table:style-name="ro1">
          <table:table-cell office:value-type="float" office:value="512.117553710938">
            <text:p>512.1175537109</text:p>
          </table:table-cell>
          <table:table-cell office:value-type="float" office:value="0.005786362">
            <text:p>0.005786362</text:p>
          </table:table-cell>
          <table:table-cell table:number-columns-repeated="4"/>
        </table:table-row>
        <table:table-row table:style-name="ro1">
          <table:table-cell office:value-type="float" office:value="512.234191894531">
            <text:p>512.2341918945</text:p>
          </table:table-cell>
          <table:table-cell office:value-type="float" office:value="0.04600916">
            <text:p>0.04600916</text:p>
          </table:table-cell>
          <table:table-cell table:number-columns-repeated="4"/>
        </table:table-row>
        <table:table-row table:style-name="ro1">
          <table:table-cell office:value-type="float" office:value="512.350830078125">
            <text:p>512.3508300781</text:p>
          </table:table-cell>
          <table:table-cell office:value-type="float" office:value="-0.001746035">
            <text:p>-0.001746035</text:p>
          </table:table-cell>
          <table:table-cell table:number-columns-repeated="4"/>
        </table:table-row>
        <table:table-row table:style-name="ro1">
          <table:table-cell office:value-type="float" office:value="512.467468261719">
            <text:p>512.4674682617</text:p>
          </table:table-cell>
          <table:table-cell office:value-type="float" office:value="0.009738958">
            <text:p>0.009738958</text:p>
          </table:table-cell>
          <table:table-cell table:number-columns-repeated="4"/>
        </table:table-row>
        <table:table-row table:style-name="ro1">
          <table:table-cell office:value-type="float" office:value="512.584106445313">
            <text:p>512.5841064453</text:p>
          </table:table-cell>
          <table:table-cell office:value-type="float" office:value="-0.001620631">
            <text:p>-0.001620631</text:p>
          </table:table-cell>
          <table:table-cell table:number-columns-repeated="4"/>
        </table:table-row>
        <table:table-row table:style-name="ro1">
          <table:table-cell office:value-type="float" office:value="512.700744628906">
            <text:p>512.7007446289</text:p>
          </table:table-cell>
          <table:table-cell office:value-type="float" office:value="0.01778171">
            <text:p>0.01778171</text:p>
          </table:table-cell>
          <table:table-cell table:number-columns-repeated="4"/>
        </table:table-row>
        <table:table-row table:style-name="ro1">
          <table:table-cell office:value-type="float" office:value="512.8173828125">
            <text:p>512.8173828125</text:p>
          </table:table-cell>
          <table:table-cell office:value-type="float" office:value="-0.009704601">
            <text:p>-0.009704601</text:p>
          </table:table-cell>
          <table:table-cell table:number-columns-repeated="4"/>
        </table:table-row>
        <table:table-row table:style-name="ro1">
          <table:table-cell office:value-type="float" office:value="512.93408203125">
            <text:p>512.9340820313</text:p>
          </table:table-cell>
          <table:table-cell office:value-type="float" office:value="0.005528385">
            <text:p>0.005528385</text:p>
          </table:table-cell>
          <table:table-cell table:number-columns-repeated="4"/>
        </table:table-row>
        <table:table-row table:style-name="ro1">
          <table:table-cell office:value-type="float" office:value="513.050720214844">
            <text:p>513.0507202148</text:p>
          </table:table-cell>
          <table:table-cell office:value-type="float" office:value="0.005244849">
            <text:p>0.005244849</text:p>
          </table:table-cell>
          <table:table-cell table:number-columns-repeated="4"/>
        </table:table-row>
        <table:table-row table:style-name="ro1">
          <table:table-cell office:value-type="float" office:value="513.167358398438">
            <text:p>513.1673583984</text:p>
          </table:table-cell>
          <table:table-cell office:value-type="float" office:value="-0.008728932">
            <text:p>-0.008728932</text:p>
          </table:table-cell>
          <table:table-cell table:number-columns-repeated="4"/>
        </table:table-row>
        <table:table-row table:style-name="ro1">
          <table:table-cell office:value-type="float" office:value="513.284057617188">
            <text:p>513.2840576172</text:p>
          </table:table-cell>
          <table:table-cell office:value-type="float" office:value="-0.009692984">
            <text:p>-0.009692984</text:p>
          </table:table-cell>
          <table:table-cell table:number-columns-repeated="4"/>
        </table:table-row>
        <table:table-row table:style-name="ro1">
          <table:table-cell office:value-type="float" office:value="513.400695800781">
            <text:p>513.4006958008</text:p>
          </table:table-cell>
          <table:table-cell office:value-type="float" office:value="0.008453946">
            <text:p>0.008453946</text:p>
          </table:table-cell>
          <table:table-cell table:number-columns-repeated="4"/>
        </table:table-row>
        <table:table-row table:style-name="ro1">
          <table:table-cell office:value-type="float" office:value="513.517395019531">
            <text:p>513.5173950195</text:p>
          </table:table-cell>
          <table:table-cell office:value-type="float" office:value="0.005726516">
            <text:p>0.005726516</text:p>
          </table:table-cell>
          <table:table-cell table:number-columns-repeated="4"/>
        </table:table-row>
        <table:table-row table:style-name="ro1">
          <table:table-cell office:value-type="float" office:value="513.634033203125">
            <text:p>513.6340332031</text:p>
          </table:table-cell>
          <table:table-cell office:value-type="float" office:value="-0.00484506">
            <text:p>-0.00484506</text:p>
          </table:table-cell>
          <table:table-cell table:number-columns-repeated="4"/>
        </table:table-row>
        <table:table-row table:style-name="ro1">
          <table:table-cell office:value-type="float" office:value="513.750732421875">
            <text:p>513.7507324219</text:p>
          </table:table-cell>
          <table:table-cell office:value-type="float" office:value="0.006238082">
            <text:p>0.006238082</text:p>
          </table:table-cell>
          <table:table-cell table:number-columns-repeated="4"/>
        </table:table-row>
        <table:table-row table:style-name="ro1">
          <table:table-cell office:value-type="float" office:value="513.867431640625">
            <text:p>513.8674316406</text:p>
          </table:table-cell>
          <table:table-cell office:value-type="float" office:value="0.006255488">
            <text:p>0.006255488</text:p>
          </table:table-cell>
          <table:table-cell table:number-columns-repeated="4"/>
        </table:table-row>
        <table:table-row table:style-name="ro1">
          <table:table-cell office:value-type="float" office:value="513.984069824219">
            <text:p>513.9840698242</text:p>
          </table:table-cell>
          <table:table-cell office:value-type="float" office:value="0.007310867">
            <text:p>0.007310867</text:p>
          </table:table-cell>
          <table:table-cell table:number-columns-repeated="4"/>
        </table:table-row>
        <table:table-row table:style-name="ro1">
          <table:table-cell office:value-type="float" office:value="514.100769042969">
            <text:p>514.100769043</text:p>
          </table:table-cell>
          <table:table-cell office:value-type="float" office:value="0.00785497">
            <text:p>0.00785497</text:p>
          </table:table-cell>
          <table:table-cell table:number-columns-repeated="4"/>
        </table:table-row>
        <table:table-row table:style-name="ro1">
          <table:table-cell office:value-type="float" office:value="514.217468261719">
            <text:p>514.2174682617</text:p>
          </table:table-cell>
          <table:table-cell office:value-type="float" office:value="-0.003676708">
            <text:p>-0.003676708</text:p>
          </table:table-cell>
          <table:table-cell table:number-columns-repeated="4"/>
        </table:table-row>
        <table:table-row table:style-name="ro1">
          <table:table-cell office:value-type="float" office:value="514.334167480469">
            <text:p>514.3341674805</text:p>
          </table:table-cell>
          <table:table-cell office:value-type="float" office:value="0.001656291">
            <text:p>0.001656291</text:p>
          </table:table-cell>
          <table:table-cell table:number-columns-repeated="4"/>
        </table:table-row>
        <table:table-row table:style-name="ro1">
          <table:table-cell office:value-type="float" office:value="514.450866699219">
            <text:p>514.4508666992</text:p>
          </table:table-cell>
          <table:table-cell office:value-type="float" office:value="0.006980942">
            <text:p>0.006980942</text:p>
          </table:table-cell>
          <table:table-cell table:number-columns-repeated="4"/>
        </table:table-row>
        <table:table-row table:style-name="ro1">
          <table:table-cell office:value-type="float" office:value="514.567565917969">
            <text:p>514.567565918</text:p>
          </table:table-cell>
          <table:table-cell office:value-type="float" office:value="-0.006196976">
            <text:p>-0.006196976</text:p>
          </table:table-cell>
          <table:table-cell table:number-columns-repeated="4"/>
        </table:table-row>
        <table:table-row table:style-name="ro1">
          <table:table-cell office:value-type="float" office:value="514.684265136719">
            <text:p>514.6842651367</text:p>
          </table:table-cell>
          <table:table-cell office:value-type="float" office:value="0.001675371">
            <text:p>0.001675371</text:p>
          </table:table-cell>
          <table:table-cell table:number-columns-repeated="4"/>
        </table:table-row>
        <table:table-row table:style-name="ro1">
          <table:table-cell office:value-type="float" office:value="514.801025390625">
            <text:p>514.8010253906</text:p>
          </table:table-cell>
          <table:table-cell office:value-type="float" office:value="0.0003449217">
            <text:p>0.0003449217</text:p>
          </table:table-cell>
          <table:table-cell table:number-columns-repeated="4"/>
        </table:table-row>
        <table:table-row table:style-name="ro1">
          <table:table-cell office:value-type="float" office:value="514.917724609375">
            <text:p>514.9177246094</text:p>
          </table:table-cell>
          <table:table-cell office:value-type="float" office:value="0.004032675">
            <text:p>0.004032675</text:p>
          </table:table-cell>
          <table:table-cell table:number-columns-repeated="4"/>
        </table:table-row>
        <table:table-row table:style-name="ro1">
          <table:table-cell office:value-type="float" office:value="515.034423828125">
            <text:p>515.0344238281</text:p>
          </table:table-cell>
          <table:table-cell office:value-type="float" office:value="-0.003927285">
            <text:p>-0.003927285</text:p>
          </table:table-cell>
          <table:table-cell table:number-columns-repeated="4"/>
        </table:table-row>
        <table:table-row table:style-name="ro1">
          <table:table-cell office:value-type="float" office:value="515.151184082031">
            <text:p>515.151184082</text:p>
          </table:table-cell>
          <table:table-cell office:value-type="float" office:value="-0.01177736">
            <text:p>-0.01177736</text:p>
          </table:table-cell>
          <table:table-cell table:number-columns-repeated="4"/>
        </table:table-row>
        <table:table-row table:style-name="ro1">
          <table:table-cell office:value-type="float" office:value="515.267883300781">
            <text:p>515.2678833008</text:p>
          </table:table-cell>
          <table:table-cell office:value-type="float" office:value="-0.001289723">
            <text:p>-0.001289723</text:p>
          </table:table-cell>
          <table:table-cell table:number-columns-repeated="4"/>
        </table:table-row>
        <table:table-row table:style-name="ro1">
          <table:table-cell office:value-type="float" office:value="515.384643554688">
            <text:p>515.3846435547</text:p>
          </table:table-cell>
          <table:table-cell office:value-type="float" office:value="0.00504497">
            <text:p>0.00504497</text:p>
          </table:table-cell>
          <table:table-cell table:number-columns-repeated="4"/>
        </table:table-row>
        <table:table-row table:style-name="ro1">
          <table:table-cell office:value-type="float" office:value="515.501342773438">
            <text:p>515.5013427734</text:p>
          </table:table-cell>
          <table:table-cell office:value-type="float" office:value="-0.0008909016">
            <text:p>-0.0008909016</text:p>
          </table:table-cell>
          <table:table-cell table:number-columns-repeated="4"/>
        </table:table-row>
        <table:table-row table:style-name="ro1">
          <table:table-cell office:value-type="float" office:value="515.618103027344">
            <text:p>515.6181030273</text:p>
          </table:table-cell>
          <table:table-cell office:value-type="float" office:value="0.0016009">
            <text:p>0.0016009</text:p>
          </table:table-cell>
          <table:table-cell table:number-columns-repeated="4"/>
        </table:table-row>
        <table:table-row table:style-name="ro1">
          <table:table-cell office:value-type="float" office:value="515.734802246094">
            <text:p>515.7348022461</text:p>
          </table:table-cell>
          <table:table-cell office:value-type="float" office:value="-0.001441982">
            <text:p>-0.001441982</text:p>
          </table:table-cell>
          <table:table-cell table:number-columns-repeated="4"/>
        </table:table-row>
        <table:table-row table:style-name="ro1">
          <table:table-cell office:value-type="float" office:value="515.8515625">
            <text:p>515.8515625</text:p>
          </table:table-cell>
          <table:table-cell office:value-type="float" office:value="0.01211779">
            <text:p>0.01211779</text:p>
          </table:table-cell>
          <table:table-cell table:number-columns-repeated="4"/>
        </table:table-row>
        <table:table-row table:style-name="ro1">
          <table:table-cell office:value-type="float" office:value="515.968322753906">
            <text:p>515.9683227539</text:p>
          </table:table-cell>
          <table:table-cell office:value-type="string">
            <text:p>6.703009E-05</text:p>
          </table:table-cell>
          <table:table-cell table:number-columns-repeated="4"/>
        </table:table-row>
        <table:table-row table:style-name="ro1">
          <table:table-cell office:value-type="float" office:value="516.085083007813">
            <text:p>516.0850830078</text:p>
          </table:table-cell>
          <table:table-cell office:value-type="float" office:value="0.001718871">
            <text:p>0.001718871</text:p>
          </table:table-cell>
          <table:table-cell table:number-columns-repeated="4"/>
        </table:table-row>
        <table:table-row table:style-name="ro1">
          <table:table-cell office:value-type="float" office:value="516.201843261719">
            <text:p>516.2018432617</text:p>
          </table:table-cell>
          <table:table-cell office:value-type="float" office:value="-0.001680033">
            <text:p>-0.001680033</text:p>
          </table:table-cell>
          <table:table-cell table:number-columns-repeated="4"/>
        </table:table-row>
        <table:table-row table:style-name="ro1">
          <table:table-cell office:value-type="float" office:value="516.318603515625">
            <text:p>516.3186035156</text:p>
          </table:table-cell>
          <table:table-cell office:value-type="float" office:value="-0.003459717">
            <text:p>-0.003459717</text:p>
          </table:table-cell>
          <table:table-cell table:number-columns-repeated="4"/>
        </table:table-row>
        <table:table-row table:style-name="ro1">
          <table:table-cell office:value-type="float" office:value="516.435363769531">
            <text:p>516.4353637695</text:p>
          </table:table-cell>
          <table:table-cell office:value-type="float" office:value="-0.006762146">
            <text:p>-0.006762146</text:p>
          </table:table-cell>
          <table:table-cell table:number-columns-repeated="4"/>
        </table:table-row>
        <table:table-row table:style-name="ro1">
          <table:table-cell office:value-type="float" office:value="516.552124023438">
            <text:p>516.5521240234</text:p>
          </table:table-cell>
          <table:table-cell office:value-type="float" office:value="-0.002551448">
            <text:p>-0.002551448</text:p>
          </table:table-cell>
          <table:table-cell table:number-columns-repeated="4"/>
        </table:table-row>
        <table:table-row table:style-name="ro1">
          <table:table-cell office:value-type="float" office:value="516.668884277344">
            <text:p>516.6688842773</text:p>
          </table:table-cell>
          <table:table-cell office:value-type="float" office:value="-0.001733454">
            <text:p>-0.001733454</text:p>
          </table:table-cell>
          <table:table-cell table:number-columns-repeated="4"/>
        </table:table-row>
        <table:table-row table:style-name="ro1">
          <table:table-cell office:value-type="float" office:value="516.78564453125">
            <text:p>516.7856445313</text:p>
          </table:table-cell>
          <table:table-cell office:value-type="float" office:value="0.01173173">
            <text:p>0.01173173</text:p>
          </table:table-cell>
          <table:table-cell table:number-columns-repeated="4"/>
        </table:table-row>
        <table:table-row table:style-name="ro1">
          <table:table-cell office:value-type="float" office:value="516.902465820313">
            <text:p>516.9024658203</text:p>
          </table:table-cell>
          <table:table-cell office:value-type="float" office:value="0.02735765">
            <text:p>0.02735765</text:p>
          </table:table-cell>
          <table:table-cell table:number-columns-repeated="4"/>
        </table:table-row>
        <table:table-row table:style-name="ro1">
          <table:table-cell office:value-type="float" office:value="517.019226074219">
            <text:p>517.0192260742</text:p>
          </table:table-cell>
          <table:table-cell office:value-type="float" office:value="-0.006328115">
            <text:p>-0.006328115</text:p>
          </table:table-cell>
          <table:table-cell table:number-columns-repeated="4"/>
        </table:table-row>
        <table:table-row table:style-name="ro1">
          <table:table-cell office:value-type="float" office:value="517.135986328125">
            <text:p>517.1359863281</text:p>
          </table:table-cell>
          <table:table-cell office:value-type="float" office:value="0.0009589653">
            <text:p>0.0009589653</text:p>
          </table:table-cell>
          <table:table-cell table:number-columns-repeated="4"/>
        </table:table-row>
        <table:table-row table:style-name="ro1">
          <table:table-cell office:value-type="float" office:value="517.252807617188">
            <text:p>517.2528076172</text:p>
          </table:table-cell>
          <table:table-cell office:value-type="float" office:value="0.005282">
            <text:p>0.005282</text:p>
          </table:table-cell>
          <table:table-cell table:number-columns-repeated="4"/>
        </table:table-row>
        <table:table-row table:style-name="ro1">
          <table:table-cell office:value-type="float" office:value="517.369567871094">
            <text:p>517.3695678711</text:p>
          </table:table-cell>
          <table:table-cell office:value-type="float" office:value="-0.005656297">
            <text:p>-0.005656297</text:p>
          </table:table-cell>
          <table:table-cell table:number-columns-repeated="4"/>
        </table:table-row>
        <table:table-row table:style-name="ro1">
          <table:table-cell office:value-type="float" office:value="517.486389160156">
            <text:p>517.4863891602</text:p>
          </table:table-cell>
          <table:table-cell office:value-type="float" office:value="0.0007480255">
            <text:p>0.0007480255</text:p>
          </table:table-cell>
          <table:table-cell table:number-columns-repeated="4"/>
        </table:table-row>
        <table:table-row table:style-name="ro1">
          <table:table-cell office:value-type="float" office:value="517.603210449219">
            <text:p>517.6032104492</text:p>
          </table:table-cell>
          <table:table-cell office:value-type="float" office:value="0.01165256">
            <text:p>0.01165256</text:p>
          </table:table-cell>
          <table:table-cell table:number-columns-repeated="4"/>
        </table:table-row>
        <table:table-row table:style-name="ro1">
          <table:table-cell office:value-type="float" office:value="517.719970703125">
            <text:p>517.7199707031</text:p>
          </table:table-cell>
          <table:table-cell office:value-type="float" office:value="0.001096598">
            <text:p>0.001096598</text:p>
          </table:table-cell>
          <table:table-cell table:number-columns-repeated="4"/>
        </table:table-row>
        <table:table-row table:style-name="ro1">
          <table:table-cell office:value-type="float" office:value="517.836791992188">
            <text:p>517.8367919922</text:p>
          </table:table-cell>
          <table:table-cell office:value-type="float" office:value="0.003352791">
            <text:p>0.003352791</text:p>
          </table:table-cell>
          <table:table-cell table:number-columns-repeated="4"/>
        </table:table-row>
        <table:table-row table:style-name="ro1">
          <table:table-cell office:value-type="float" office:value="517.95361328125">
            <text:p>517.9536132813</text:p>
          </table:table-cell>
          <table:table-cell office:value-type="float" office:value="0.0007079247">
            <text:p>0.0007079247</text:p>
          </table:table-cell>
          <table:table-cell table:number-columns-repeated="4"/>
        </table:table-row>
        <table:table-row table:style-name="ro1">
          <table:table-cell office:value-type="float" office:value="518.070434570313">
            <text:p>518.0704345703</text:p>
          </table:table-cell>
          <table:table-cell office:value-type="float" office:value="-0.002459685">
            <text:p>-0.002459685</text:p>
          </table:table-cell>
          <table:table-cell table:number-columns-repeated="4"/>
        </table:table-row>
        <table:table-row table:style-name="ro1">
          <table:table-cell office:value-type="float" office:value="518.187255859375">
            <text:p>518.1872558594</text:p>
          </table:table-cell>
          <table:table-cell office:value-type="float" office:value="0.005333783">
            <text:p>0.005333783</text:p>
          </table:table-cell>
          <table:table-cell table:number-columns-repeated="4"/>
        </table:table-row>
        <table:table-row table:style-name="ro1">
          <table:table-cell office:value-type="float" office:value="518.304077148438">
            <text:p>518.3040771484</text:p>
          </table:table-cell>
          <table:table-cell office:value-type="float" office:value="0.01154728">
            <text:p>0.01154728</text:p>
          </table:table-cell>
          <table:table-cell table:number-columns-repeated="4"/>
        </table:table-row>
        <table:table-row table:style-name="ro1">
          <table:table-cell office:value-type="float" office:value="518.4208984375">
            <text:p>518.4208984375</text:p>
          </table:table-cell>
          <table:table-cell office:value-type="float" office:value="0.004422083">
            <text:p>0.004422083</text:p>
          </table:table-cell>
          <table:table-cell table:number-columns-repeated="4"/>
        </table:table-row>
        <table:table-row table:style-name="ro1">
          <table:table-cell office:value-type="float" office:value="518.537719726563">
            <text:p>518.5377197266</text:p>
          </table:table-cell>
          <table:table-cell office:value-type="float" office:value="0.01876318">
            <text:p>0.01876318</text:p>
          </table:table-cell>
          <table:table-cell table:number-columns-repeated="4"/>
        </table:table-row>
        <table:table-row table:style-name="ro1">
          <table:table-cell office:value-type="float" office:value="518.654541015625">
            <text:p>518.6545410156</text:p>
          </table:table-cell>
          <table:table-cell office:value-type="float" office:value="0.007600367">
            <text:p>0.007600367</text:p>
          </table:table-cell>
          <table:table-cell table:number-columns-repeated="4"/>
        </table:table-row>
        <table:table-row table:style-name="ro1">
          <table:table-cell office:value-type="float" office:value="518.771362304688">
            <text:p>518.7713623047</text:p>
          </table:table-cell>
          <table:table-cell office:value-type="float" office:value="-0.008228621">
            <text:p>-0.008228621</text:p>
          </table:table-cell>
          <table:table-cell table:number-columns-repeated="4"/>
        </table:table-row>
        <table:table-row table:style-name="ro1">
          <table:table-cell office:value-type="float" office:value="518.888244628906">
            <text:p>518.8882446289</text:p>
          </table:table-cell>
          <table:table-cell office:value-type="float" office:value="-0.008643593">
            <text:p>-0.008643593</text:p>
          </table:table-cell>
          <table:table-cell table:number-columns-repeated="4"/>
        </table:table-row>
        <table:table-row table:style-name="ro1">
          <table:table-cell office:value-type="float" office:value="519.005065917969">
            <text:p>519.005065918</text:p>
          </table:table-cell>
          <table:table-cell office:value-type="float" office:value="0.002552024">
            <text:p>0.002552024</text:p>
          </table:table-cell>
          <table:table-cell table:number-columns-repeated="4"/>
        </table:table-row>
        <table:table-row table:style-name="ro1">
          <table:table-cell office:value-type="float" office:value="519.121887207031">
            <text:p>519.121887207</text:p>
          </table:table-cell>
          <table:table-cell office:value-type="float" office:value="-0.0007174853">
            <text:p>-0.0007174853</text:p>
          </table:table-cell>
          <table:table-cell table:number-columns-repeated="4"/>
        </table:table-row>
        <table:table-row table:style-name="ro1">
          <table:table-cell office:value-type="float" office:value="519.23876953125">
            <text:p>519.2387695313</text:p>
          </table:table-cell>
          <table:table-cell office:value-type="float" office:value="0.003628718">
            <text:p>0.003628718</text:p>
          </table:table-cell>
          <table:table-cell table:number-columns-repeated="4"/>
        </table:table-row>
        <table:table-row table:style-name="ro1">
          <table:table-cell office:value-type="float" office:value="519.355590820313">
            <text:p>519.3555908203</text:p>
          </table:table-cell>
          <table:table-cell office:value-type="float" office:value="-0.002943168">
            <text:p>-0.002943168</text:p>
          </table:table-cell>
          <table:table-cell table:number-columns-repeated="4"/>
        </table:table-row>
        <table:table-row table:style-name="ro1">
          <table:table-cell office:value-type="float" office:value="519.472473144531">
            <text:p>519.4724731445</text:p>
          </table:table-cell>
          <table:table-cell office:value-type="float" office:value="0.003066584">
            <text:p>0.003066584</text:p>
          </table:table-cell>
          <table:table-cell table:number-columns-repeated="4"/>
        </table:table-row>
        <table:table-row table:style-name="ro1">
          <table:table-cell office:value-type="float" office:value="519.58935546875">
            <text:p>519.5893554688</text:p>
          </table:table-cell>
          <table:table-cell office:value-type="float" office:value="0.001914555">
            <text:p>0.001914555</text:p>
          </table:table-cell>
          <table:table-cell table:number-columns-repeated="4"/>
        </table:table-row>
        <table:table-row table:style-name="ro1">
          <table:table-cell office:value-type="float" office:value="519.706176757813">
            <text:p>519.7061767578</text:p>
          </table:table-cell>
          <table:table-cell office:value-type="float" office:value="-0.003550638">
            <text:p>-0.003550638</text:p>
          </table:table-cell>
          <table:table-cell table:number-columns-repeated="4"/>
        </table:table-row>
        <table:table-row table:style-name="ro1">
          <table:table-cell office:value-type="float" office:value="519.823059082031">
            <text:p>519.823059082</text:p>
          </table:table-cell>
          <table:table-cell office:value-type="float" office:value="-0.007015017">
            <text:p>-0.007015017</text:p>
          </table:table-cell>
          <table:table-cell table:number-columns-repeated="4"/>
        </table:table-row>
        <table:table-row table:style-name="ro1">
          <table:table-cell office:value-type="float" office:value="519.93994140625">
            <text:p>519.9399414063</text:p>
          </table:table-cell>
          <table:table-cell office:value-type="float" office:value="0.01478108">
            <text:p>0.01478108</text:p>
          </table:table-cell>
          <table:table-cell table:number-columns-repeated="4"/>
        </table:table-row>
        <table:table-row table:style-name="ro1">
          <table:table-cell office:value-type="float" office:value="520.056823730469">
            <text:p>520.0568237305</text:p>
          </table:table-cell>
          <table:table-cell office:value-type="float" office:value="-0.003941025">
            <text:p>-0.003941025</text:p>
          </table:table-cell>
          <table:table-cell table:number-columns-repeated="4"/>
        </table:table-row>
        <table:table-row table:style-name="ro1">
          <table:table-cell office:value-type="float" office:value="520.173706054688">
            <text:p>520.1737060547</text:p>
          </table:table-cell>
          <table:table-cell office:value-type="float" office:value="-0.0001009896">
            <text:p>-0.0001009896</text:p>
          </table:table-cell>
          <table:table-cell table:number-columns-repeated="4"/>
        </table:table-row>
        <table:table-row table:style-name="ro1">
          <table:table-cell office:value-type="float" office:value="520.290588378906">
            <text:p>520.2905883789</text:p>
          </table:table-cell>
          <table:table-cell office:value-type="float" office:value="-0.004228328">
            <text:p>-0.004228328</text:p>
          </table:table-cell>
          <table:table-cell table:number-columns-repeated="4"/>
        </table:table-row>
        <table:table-row table:style-name="ro1">
          <table:table-cell office:value-type="float" office:value="520.407470703125">
            <text:p>520.4074707031</text:p>
          </table:table-cell>
          <table:table-cell office:value-type="float" office:value="-0.001646322">
            <text:p>-0.001646322</text:p>
          </table:table-cell>
          <table:table-cell table:number-columns-repeated="4"/>
        </table:table-row>
        <table:table-row table:style-name="ro1">
          <table:table-cell office:value-type="float" office:value="520.524353027344">
            <text:p>520.5243530273</text:p>
          </table:table-cell>
          <table:table-cell office:value-type="float" office:value="-0.005067723">
            <text:p>-0.005067723</text:p>
          </table:table-cell>
          <table:table-cell table:number-columns-repeated="4"/>
        </table:table-row>
        <table:table-row table:style-name="ro1">
          <table:table-cell office:value-type="float" office:value="520.641235351563">
            <text:p>520.6412353516</text:p>
          </table:table-cell>
          <table:table-cell office:value-type="float" office:value="-0.007522918">
            <text:p>-0.007522918</text:p>
          </table:table-cell>
          <table:table-cell table:number-columns-repeated="4"/>
        </table:table-row>
        <table:table-row table:style-name="ro1">
          <table:table-cell office:value-type="float" office:value="520.758178710938">
            <text:p>520.7581787109</text:p>
          </table:table-cell>
          <table:table-cell office:value-type="float" office:value="-0.00116706">
            <text:p>-0.00116706</text:p>
          </table:table-cell>
          <table:table-cell table:number-columns-repeated="4"/>
        </table:table-row>
        <table:table-row table:style-name="ro1">
          <table:table-cell office:value-type="float" office:value="520.875061035156">
            <text:p>520.8750610352</text:p>
          </table:table-cell>
          <table:table-cell office:value-type="float" office:value="0.02064618">
            <text:p>0.02064618</text:p>
          </table:table-cell>
          <table:table-cell table:number-columns-repeated="4"/>
        </table:table-row>
        <table:table-row table:style-name="ro1">
          <table:table-cell office:value-type="float" office:value="520.991943359375">
            <text:p>520.9919433594</text:p>
          </table:table-cell>
          <table:table-cell office:value-type="float" office:value="0.001914139">
            <text:p>0.001914139</text:p>
          </table:table-cell>
          <table:table-cell table:number-columns-repeated="4"/>
        </table:table-row>
        <table:table-row table:style-name="ro1">
          <table:table-cell office:value-type="float" office:value="521.10888671875">
            <text:p>521.1088867188</text:p>
          </table:table-cell>
          <table:table-cell office:value-type="float" office:value="-0.007321382">
            <text:p>-0.007321382</text:p>
          </table:table-cell>
          <table:table-cell table:number-columns-repeated="4"/>
        </table:table-row>
        <table:table-row table:style-name="ro1">
          <table:table-cell office:value-type="float" office:value="521.225769042969">
            <text:p>521.225769043</text:p>
          </table:table-cell>
          <table:table-cell office:value-type="float" office:value="0.001523959">
            <text:p>0.001523959</text:p>
          </table:table-cell>
          <table:table-cell table:number-columns-repeated="4"/>
        </table:table-row>
        <table:table-row table:style-name="ro1">
          <table:table-cell office:value-type="float" office:value="521.342712402344">
            <text:p>521.3427124023</text:p>
          </table:table-cell>
          <table:table-cell office:value-type="float" office:value="0.007069938">
            <text:p>0.007069938</text:p>
          </table:table-cell>
          <table:table-cell table:number-columns-repeated="4"/>
        </table:table-row>
        <table:table-row table:style-name="ro1">
          <table:table-cell office:value-type="float" office:value="521.459594726563">
            <text:p>521.4595947266</text:p>
          </table:table-cell>
          <table:table-cell office:value-type="float" office:value="-0.005643846">
            <text:p>-0.005643846</text:p>
          </table:table-cell>
          <table:table-cell table:number-columns-repeated="4"/>
        </table:table-row>
        <table:table-row table:style-name="ro1">
          <table:table-cell office:value-type="float" office:value="521.576538085938">
            <text:p>521.5765380859</text:p>
          </table:table-cell>
          <table:table-cell office:value-type="float" office:value="-0.00489967">
            <text:p>-0.00489967</text:p>
          </table:table-cell>
          <table:table-cell table:number-columns-repeated="4"/>
        </table:table-row>
        <table:table-row table:style-name="ro1">
          <table:table-cell office:value-type="float" office:value="521.693481445313">
            <text:p>521.6934814453</text:p>
          </table:table-cell>
          <table:table-cell office:value-type="float" office:value="-0.001106766">
            <text:p>-0.001106766</text:p>
          </table:table-cell>
          <table:table-cell table:number-columns-repeated="4"/>
        </table:table-row>
        <table:table-row table:style-name="ro1">
          <table:table-cell office:value-type="float" office:value="521.810424804688">
            <text:p>521.8104248047</text:p>
          </table:table-cell>
          <table:table-cell office:value-type="float" office:value="-0.005387533">
            <text:p>-0.005387533</text:p>
          </table:table-cell>
          <table:table-cell table:number-columns-repeated="4"/>
        </table:table-row>
        <table:table-row table:style-name="ro1">
          <table:table-cell office:value-type="float" office:value="521.927307128906">
            <text:p>521.9273071289</text:p>
          </table:table-cell>
          <table:table-cell office:value-type="float" office:value="0.01044196">
            <text:p>0.01044196</text:p>
          </table:table-cell>
          <table:table-cell table:number-columns-repeated="4"/>
        </table:table-row>
        <table:table-row table:style-name="ro1">
          <table:table-cell office:value-type="float" office:value="522.044250488281">
            <text:p>522.0442504883</text:p>
          </table:table-cell>
          <table:table-cell office:value-type="float" office:value="0.001056746">
            <text:p>0.001056746</text:p>
          </table:table-cell>
          <table:table-cell table:number-columns-repeated="4"/>
        </table:table-row>
        <table:table-row table:style-name="ro1">
          <table:table-cell office:value-type="float" office:value="522.161193847656">
            <text:p>522.1611938477</text:p>
          </table:table-cell>
          <table:table-cell office:value-type="float" office:value="0.03610873">
            <text:p>0.03610873</text:p>
          </table:table-cell>
          <table:table-cell table:number-columns-repeated="4"/>
        </table:table-row>
        <table:table-row table:style-name="ro1">
          <table:table-cell office:value-type="float" office:value="522.278137207031">
            <text:p>522.278137207</text:p>
          </table:table-cell>
          <table:table-cell office:value-type="float" office:value="0.009582758">
            <text:p>0.009582758</text:p>
          </table:table-cell>
          <table:table-cell table:number-columns-repeated="4"/>
        </table:table-row>
        <table:table-row table:style-name="ro1">
          <table:table-cell office:value-type="float" office:value="522.395080566406">
            <text:p>522.3950805664</text:p>
          </table:table-cell>
          <table:table-cell office:value-type="float" office:value="0.00122779">
            <text:p>0.00122779</text:p>
          </table:table-cell>
          <table:table-cell table:number-columns-repeated="4"/>
        </table:table-row>
        <table:table-row table:style-name="ro1">
          <table:table-cell office:value-type="float" office:value="522.512023925781">
            <text:p>522.5120239258</text:p>
          </table:table-cell>
          <table:table-cell office:value-type="float" office:value="-0.004656456">
            <text:p>-0.004656456</text:p>
          </table:table-cell>
          <table:table-cell table:number-columns-repeated="4"/>
        </table:table-row>
        <table:table-row table:style-name="ro1">
          <table:table-cell office:value-type="float" office:value="522.629028320313">
            <text:p>522.6290283203</text:p>
          </table:table-cell>
          <table:table-cell office:value-type="float" office:value="0.003497544">
            <text:p>0.003497544</text:p>
          </table:table-cell>
          <table:table-cell table:number-columns-repeated="4"/>
        </table:table-row>
        <table:table-row table:style-name="ro1">
          <table:table-cell office:value-type="float" office:value="522.745971679688">
            <text:p>522.7459716797</text:p>
          </table:table-cell>
          <table:table-cell office:value-type="float" office:value="0.001640217">
            <text:p>0.001640217</text:p>
          </table:table-cell>
          <table:table-cell table:number-columns-repeated="4"/>
        </table:table-row>
        <table:table-row table:style-name="ro1">
          <table:table-cell office:value-type="float" office:value="522.862915039063">
            <text:p>522.8629150391</text:p>
          </table:table-cell>
          <table:table-cell office:value-type="float" office:value="0.01465572">
            <text:p>0.01465572</text:p>
          </table:table-cell>
          <table:table-cell table:number-columns-repeated="4"/>
        </table:table-row>
        <table:table-row table:style-name="ro1">
          <table:table-cell office:value-type="float" office:value="522.979919433594">
            <text:p>522.9799194336</text:p>
          </table:table-cell>
          <table:table-cell office:value-type="float" office:value="-0.009274954">
            <text:p>-0.009274954</text:p>
          </table:table-cell>
          <table:table-cell table:number-columns-repeated="4"/>
        </table:table-row>
        <table:table-row table:style-name="ro1">
          <table:table-cell office:value-type="float" office:value="523.096862792969">
            <text:p>523.096862793</text:p>
          </table:table-cell>
          <table:table-cell office:value-type="float" office:value="0.0159469">
            <text:p>0.0159469</text:p>
          </table:table-cell>
          <table:table-cell table:number-columns-repeated="4"/>
        </table:table-row>
        <table:table-row table:style-name="ro1">
          <table:table-cell office:value-type="float" office:value="523.2138671875">
            <text:p>523.2138671875</text:p>
          </table:table-cell>
          <table:table-cell office:value-type="float" office:value="0.005731919">
            <text:p>0.005731919</text:p>
          </table:table-cell>
          <table:table-cell table:number-columns-repeated="4"/>
        </table:table-row>
        <table:table-row table:style-name="ro1">
          <table:table-cell office:value-type="float" office:value="523.330810546875">
            <text:p>523.3308105469</text:p>
          </table:table-cell>
          <table:table-cell office:value-type="float" office:value="0.001641509">
            <text:p>0.001641509</text:p>
          </table:table-cell>
          <table:table-cell table:number-columns-repeated="4"/>
        </table:table-row>
        <table:table-row table:style-name="ro1">
          <table:table-cell office:value-type="float" office:value="523.447814941406">
            <text:p>523.4478149414</text:p>
          </table:table-cell>
          <table:table-cell office:value-type="float" office:value="0.0005100393">
            <text:p>0.0005100393</text:p>
          </table:table-cell>
          <table:table-cell table:number-columns-repeated="4"/>
        </table:table-row>
        <table:table-row table:style-name="ro1">
          <table:table-cell office:value-type="float" office:value="523.564758300781">
            <text:p>523.5647583008</text:p>
          </table:table-cell>
          <table:table-cell office:value-type="float" office:value="0.002117469">
            <text:p>0.002117469</text:p>
          </table:table-cell>
          <table:table-cell table:number-columns-repeated="4"/>
        </table:table-row>
        <table:table-row table:style-name="ro1">
          <table:table-cell office:value-type="float" office:value="523.681762695313">
            <text:p>523.6817626953</text:p>
          </table:table-cell>
          <table:table-cell office:value-type="float" office:value="-0.002275862">
            <text:p>-0.002275862</text:p>
          </table:table-cell>
          <table:table-cell table:number-columns-repeated="4"/>
        </table:table-row>
        <table:table-row table:style-name="ro1">
          <table:table-cell office:value-type="float" office:value="523.798767089844">
            <text:p>523.7987670898</text:p>
          </table:table-cell>
          <table:table-cell office:value-type="float" office:value="-0.006610855">
            <text:p>-0.006610855</text:p>
          </table:table-cell>
          <table:table-cell table:number-columns-repeated="4"/>
        </table:table-row>
        <table:table-row table:style-name="ro1">
          <table:table-cell office:value-type="float" office:value="523.915771484375">
            <text:p>523.9157714844</text:p>
          </table:table-cell>
          <table:table-cell office:value-type="float" office:value="-0.009911179">
            <text:p>-0.009911179</text:p>
          </table:table-cell>
          <table:table-cell table:number-columns-repeated="4"/>
        </table:table-row>
        <table:table-row table:style-name="ro1">
          <table:table-cell office:value-type="float" office:value="524.032775878906">
            <text:p>524.0327758789</text:p>
          </table:table-cell>
          <table:table-cell office:value-type="float" office:value="0.00803763">
            <text:p>0.00803763</text:p>
          </table:table-cell>
          <table:table-cell table:number-columns-repeated="4"/>
        </table:table-row>
        <table:table-row table:style-name="ro1">
          <table:table-cell office:value-type="float" office:value="524.149719238281">
            <text:p>524.1497192383</text:p>
          </table:table-cell>
          <table:table-cell office:value-type="float" office:value="0.003624082">
            <text:p>0.003624082</text:p>
          </table:table-cell>
          <table:table-cell table:number-columns-repeated="4"/>
        </table:table-row>
        <table:table-row table:style-name="ro1">
          <table:table-cell office:value-type="float" office:value="524.266723632813">
            <text:p>524.2667236328</text:p>
          </table:table-cell>
          <table:table-cell office:value-type="float" office:value="0.004002319">
            <text:p>0.004002319</text:p>
          </table:table-cell>
          <table:table-cell table:number-columns-repeated="4"/>
        </table:table-row>
        <table:table-row table:style-name="ro1">
          <table:table-cell office:value-type="float" office:value="524.3837890625">
            <text:p>524.3837890625</text:p>
          </table:table-cell>
          <table:table-cell office:value-type="float" office:value="-0.009936328">
            <text:p>-0.009936328</text:p>
          </table:table-cell>
          <table:table-cell table:number-columns-repeated="4"/>
        </table:table-row>
        <table:table-row table:style-name="ro1">
          <table:table-cell office:value-type="float" office:value="524.500793457031">
            <text:p>524.500793457</text:p>
          </table:table-cell>
          <table:table-cell office:value-type="float" office:value="0.01831963">
            <text:p>0.01831963</text:p>
          </table:table-cell>
          <table:table-cell table:number-columns-repeated="4"/>
        </table:table-row>
        <table:table-row table:style-name="ro1">
          <table:table-cell office:value-type="float" office:value="524.617797851563">
            <text:p>524.6177978516</text:p>
          </table:table-cell>
          <table:table-cell office:value-type="float" office:value="0.006073471">
            <text:p>0.006073471</text:p>
          </table:table-cell>
          <table:table-cell table:number-columns-repeated="4"/>
        </table:table-row>
        <table:table-row table:style-name="ro1">
          <table:table-cell office:value-type="float" office:value="524.734802246094">
            <text:p>524.7348022461</text:p>
          </table:table-cell>
          <table:table-cell office:value-type="float" office:value="-0.007287508">
            <text:p>-0.007287508</text:p>
          </table:table-cell>
          <table:table-cell table:number-columns-repeated="4"/>
        </table:table-row>
        <table:table-row table:style-name="ro1">
          <table:table-cell office:value-type="float" office:value="524.851806640625">
            <text:p>524.8518066406</text:p>
          </table:table-cell>
          <table:table-cell office:value-type="float" office:value="-0.005886105">
            <text:p>-0.005886105</text:p>
          </table:table-cell>
          <table:table-cell table:number-columns-repeated="4"/>
        </table:table-row>
        <table:table-row table:style-name="ro1">
          <table:table-cell office:value-type="float" office:value="524.968872070313">
            <text:p>524.9688720703</text:p>
          </table:table-cell>
          <table:table-cell office:value-type="float" office:value="0.002329432">
            <text:p>0.002329432</text:p>
          </table:table-cell>
          <table:table-cell table:number-columns-repeated="4"/>
        </table:table-row>
        <table:table-row table:style-name="ro1">
          <table:table-cell office:value-type="float" office:value="525.085876464844">
            <text:p>525.0858764648</text:p>
          </table:table-cell>
          <table:table-cell office:value-type="float" office:value="0.01879838">
            <text:p>0.01879838</text:p>
          </table:table-cell>
          <table:table-cell table:number-columns-repeated="4"/>
        </table:table-row>
        <table:table-row table:style-name="ro1">
          <table:table-cell office:value-type="float" office:value="525.202941894531">
            <text:p>525.2029418945</text:p>
          </table:table-cell>
          <table:table-cell office:value-type="float" office:value="-0.004583838">
            <text:p>-0.004583838</text:p>
          </table:table-cell>
          <table:table-cell table:number-columns-repeated="4"/>
        </table:table-row>
        <table:table-row table:style-name="ro1">
          <table:table-cell office:value-type="float" office:value="525.319946289063">
            <text:p>525.3199462891</text:p>
          </table:table-cell>
          <table:table-cell office:value-type="float" office:value="-0.003782427">
            <text:p>-0.003782427</text:p>
          </table:table-cell>
          <table:table-cell table:number-columns-repeated="4"/>
        </table:table-row>
        <table:table-row table:style-name="ro1">
          <table:table-cell office:value-type="float" office:value="525.43701171875">
            <text:p>525.4370117188</text:p>
          </table:table-cell>
          <table:table-cell office:value-type="float" office:value="0.005884656">
            <text:p>0.005884656</text:p>
          </table:table-cell>
          <table:table-cell table:number-columns-repeated="4"/>
        </table:table-row>
        <table:table-row table:style-name="ro1">
          <table:table-cell office:value-type="float" office:value="525.554016113281">
            <text:p>525.5540161133</text:p>
          </table:table-cell>
          <table:table-cell office:value-type="float" office:value="0.005436445">
            <text:p>0.005436445</text:p>
          </table:table-cell>
          <table:table-cell table:number-columns-repeated="4"/>
        </table:table-row>
        <table:table-row table:style-name="ro1">
          <table:table-cell office:value-type="float" office:value="525.671081542969">
            <text:p>525.671081543</text:p>
          </table:table-cell>
          <table:table-cell office:value-type="float" office:value="-0.004201102">
            <text:p>-0.004201102</text:p>
          </table:table-cell>
          <table:table-cell table:number-columns-repeated="4"/>
        </table:table-row>
        <table:table-row table:style-name="ro1">
          <table:table-cell office:value-type="float" office:value="525.788146972656">
            <text:p>525.7881469727</text:p>
          </table:table-cell>
          <table:table-cell office:value-type="float" office:value="-0.01314088">
            <text:p>-0.01314088</text:p>
          </table:table-cell>
          <table:table-cell table:number-columns-repeated="4"/>
        </table:table-row>
        <table:table-row table:style-name="ro1">
          <table:table-cell office:value-type="float" office:value="525.905212402344">
            <text:p>525.9052124023</text:p>
          </table:table-cell>
          <table:table-cell office:value-type="float" office:value="-0.002308057">
            <text:p>-0.002308057</text:p>
          </table:table-cell>
          <table:table-cell table:number-columns-repeated="4"/>
        </table:table-row>
        <table:table-row table:style-name="ro1">
          <table:table-cell office:value-type="float" office:value="526.022277832031">
            <text:p>526.022277832</text:p>
          </table:table-cell>
          <table:table-cell office:value-type="float" office:value="-0.005323318">
            <text:p>-0.005323318</text:p>
          </table:table-cell>
          <table:table-cell table:number-columns-repeated="4"/>
        </table:table-row>
        <table:table-row table:style-name="ro1">
          <table:table-cell office:value-type="float" office:value="526.139282226563">
            <text:p>526.1392822266</text:p>
          </table:table-cell>
          <table:table-cell office:value-type="float" office:value="-0.004912174">
            <text:p>-0.004912174</text:p>
          </table:table-cell>
          <table:table-cell table:number-columns-repeated="4"/>
        </table:table-row>
        <table:table-row table:style-name="ro1">
          <table:table-cell office:value-type="float" office:value="526.25634765625">
            <text:p>526.2563476563</text:p>
          </table:table-cell>
          <table:table-cell office:value-type="float" office:value="0.01066495">
            <text:p>0.01066495</text:p>
          </table:table-cell>
          <table:table-cell table:number-columns-repeated="4"/>
        </table:table-row>
        <table:table-row table:style-name="ro1">
          <table:table-cell office:value-type="float" office:value="526.373474121094">
            <text:p>526.3734741211</text:p>
          </table:table-cell>
          <table:table-cell office:value-type="float" office:value="-0.005458734">
            <text:p>-0.005458734</text:p>
          </table:table-cell>
          <table:table-cell table:number-columns-repeated="4"/>
        </table:table-row>
        <table:table-row table:style-name="ro1">
          <table:table-cell office:value-type="float" office:value="526.490539550781">
            <text:p>526.4905395508</text:p>
          </table:table-cell>
          <table:table-cell office:value-type="float" office:value="0.01207091">
            <text:p>0.01207091</text:p>
          </table:table-cell>
          <table:table-cell table:number-columns-repeated="4"/>
        </table:table-row>
        <table:table-row table:style-name="ro1">
          <table:table-cell office:value-type="float" office:value="526.607604980469">
            <text:p>526.6076049805</text:p>
          </table:table-cell>
          <table:table-cell office:value-type="float" office:value="-0.005620567">
            <text:p>-0.005620567</text:p>
          </table:table-cell>
          <table:table-cell table:number-columns-repeated="4"/>
        </table:table-row>
        <table:table-row table:style-name="ro1">
          <table:table-cell office:value-type="float" office:value="526.724670410156">
            <text:p>526.7246704102</text:p>
          </table:table-cell>
          <table:table-cell office:value-type="float" office:value="0.005864774">
            <text:p>0.005864774</text:p>
          </table:table-cell>
          <table:table-cell table:number-columns-repeated="4"/>
        </table:table-row>
        <table:table-row table:style-name="ro1">
          <table:table-cell office:value-type="float" office:value="526.841735839844">
            <text:p>526.8417358398</text:p>
          </table:table-cell>
          <table:table-cell office:value-type="float" office:value="0.01163679">
            <text:p>0.01163679</text:p>
          </table:table-cell>
          <table:table-cell table:number-columns-repeated="4"/>
        </table:table-row>
        <table:table-row table:style-name="ro1">
          <table:table-cell office:value-type="float" office:value="526.958862304688">
            <text:p>526.9588623047</text:p>
          </table:table-cell>
          <table:table-cell office:value-type="float" office:value="0.001888605">
            <text:p>0.001888605</text:p>
          </table:table-cell>
          <table:table-cell table:number-columns-repeated="4"/>
        </table:table-row>
        <table:table-row table:style-name="ro1">
          <table:table-cell office:value-type="float" office:value="527.075927734375">
            <text:p>527.0759277344</text:p>
          </table:table-cell>
          <table:table-cell office:value-type="float" office:value="0.01625358">
            <text:p>0.01625358</text:p>
          </table:table-cell>
          <table:table-cell table:number-columns-repeated="4"/>
        </table:table-row>
        <table:table-row table:style-name="ro1">
          <table:table-cell office:value-type="float" office:value="527.192993164063">
            <text:p>527.1929931641</text:p>
          </table:table-cell>
          <table:table-cell office:value-type="float" office:value="-0.007492637">
            <text:p>-0.007492637</text:p>
          </table:table-cell>
          <table:table-cell table:number-columns-repeated="4"/>
        </table:table-row>
        <table:table-row table:style-name="ro1">
          <table:table-cell office:value-type="float" office:value="527.310119628906">
            <text:p>527.3101196289</text:p>
          </table:table-cell>
          <table:table-cell office:value-type="float" office:value="0.003394094">
            <text:p>0.003394094</text:p>
          </table:table-cell>
          <table:table-cell table:number-columns-repeated="4"/>
        </table:table-row>
        <table:table-row table:style-name="ro1">
          <table:table-cell office:value-type="float" office:value="527.42724609375">
            <text:p>527.4272460938</text:p>
          </table:table-cell>
          <table:table-cell office:value-type="float" office:value="-0.001198091">
            <text:p>-0.001198091</text:p>
          </table:table-cell>
          <table:table-cell table:number-columns-repeated="4"/>
        </table:table-row>
        <table:table-row table:style-name="ro1">
          <table:table-cell office:value-type="float" office:value="527.544311523438">
            <text:p>527.5443115234</text:p>
          </table:table-cell>
          <table:table-cell office:value-type="float" office:value="-0.007528973">
            <text:p>-0.007528973</text:p>
          </table:table-cell>
          <table:table-cell table:number-columns-repeated="4"/>
        </table:table-row>
        <table:table-row table:style-name="ro1">
          <table:table-cell office:value-type="float" office:value="527.661437988281">
            <text:p>527.6614379883</text:p>
          </table:table-cell>
          <table:table-cell office:value-type="float" office:value="-0.01181444">
            <text:p>-0.01181444</text:p>
          </table:table-cell>
          <table:table-cell table:number-columns-repeated="4"/>
        </table:table-row>
        <table:table-row table:style-name="ro1">
          <table:table-cell office:value-type="float" office:value="527.778564453125">
            <text:p>527.7785644531</text:p>
          </table:table-cell>
          <table:table-cell office:value-type="float" office:value="0.006324569">
            <text:p>0.006324569</text:p>
          </table:table-cell>
          <table:table-cell table:number-columns-repeated="4"/>
        </table:table-row>
        <table:table-row table:style-name="ro1">
          <table:table-cell office:value-type="float" office:value="527.895629882813">
            <text:p>527.8956298828</text:p>
          </table:table-cell>
          <table:table-cell office:value-type="float" office:value="0.00334994">
            <text:p>0.00334994</text:p>
          </table:table-cell>
          <table:table-cell table:number-columns-repeated="4"/>
        </table:table-row>
        <table:table-row table:style-name="ro1">
          <table:table-cell office:value-type="float" office:value="528.012756347656">
            <text:p>528.0127563477</text:p>
          </table:table-cell>
          <table:table-cell office:value-type="float" office:value="-0.00705262">
            <text:p>-0.00705262</text:p>
          </table:table-cell>
          <table:table-cell table:number-columns-repeated="4"/>
        </table:table-row>
        <table:table-row table:style-name="ro1">
          <table:table-cell office:value-type="float" office:value="528.1298828125">
            <text:p>528.1298828125</text:p>
          </table:table-cell>
          <table:table-cell office:value-type="float" office:value="-0.002989512">
            <text:p>-0.002989512</text:p>
          </table:table-cell>
          <table:table-cell table:number-columns-repeated="4"/>
        </table:table-row>
        <table:table-row table:style-name="ro1">
          <table:table-cell office:value-type="float" office:value="528.247009277344">
            <text:p>528.2470092773</text:p>
          </table:table-cell>
          <table:table-cell office:value-type="float" office:value="0.008574484">
            <text:p>0.008574484</text:p>
          </table:table-cell>
          <table:table-cell table:number-columns-repeated="4"/>
        </table:table-row>
        <table:table-row table:style-name="ro1">
          <table:table-cell office:value-type="float" office:value="528.364135742188">
            <text:p>528.3641357422</text:p>
          </table:table-cell>
          <table:table-cell office:value-type="float" office:value="-0.005962081">
            <text:p>-0.005962081</text:p>
          </table:table-cell>
          <table:table-cell table:number-columns-repeated="4"/>
        </table:table-row>
        <table:table-row table:style-name="ro1">
          <table:table-cell office:value-type="float" office:value="528.481262207031">
            <text:p>528.481262207</text:p>
          </table:table-cell>
          <table:table-cell office:value-type="float" office:value="0.01523955">
            <text:p>0.01523955</text:p>
          </table:table-cell>
          <table:table-cell table:number-columns-repeated="4"/>
        </table:table-row>
        <table:table-row table:style-name="ro1">
          <table:table-cell office:value-type="float" office:value="528.598388671875">
            <text:p>528.5983886719</text:p>
          </table:table-cell>
          <table:table-cell office:value-type="float" office:value="0.0105486">
            <text:p>0.0105486</text:p>
          </table:table-cell>
          <table:table-cell table:number-columns-repeated="4"/>
        </table:table-row>
        <table:table-row table:style-name="ro1">
          <table:table-cell office:value-type="float" office:value="528.715576171875">
            <text:p>528.7155761719</text:p>
          </table:table-cell>
          <table:table-cell office:value-type="float" office:value="0.002032128">
            <text:p>0.002032128</text:p>
          </table:table-cell>
          <table:table-cell table:number-columns-repeated="4"/>
        </table:table-row>
        <table:table-row table:style-name="ro1">
          <table:table-cell office:value-type="float" office:value="528.832702636719">
            <text:p>528.8327026367</text:p>
          </table:table-cell>
          <table:table-cell office:value-type="float" office:value="0.0008776253">
            <text:p>0.0008776253</text:p>
          </table:table-cell>
          <table:table-cell table:number-columns-repeated="4"/>
        </table:table-row>
        <table:table-row table:style-name="ro1">
          <table:table-cell office:value-type="float" office:value="528.949829101563">
            <text:p>528.9498291016</text:p>
          </table:table-cell>
          <table:table-cell office:value-type="float" office:value="-0.003957291">
            <text:p>-0.003957291</text:p>
          </table:table-cell>
          <table:table-cell table:number-columns-repeated="4"/>
        </table:table-row>
        <table:table-row table:style-name="ro1">
          <table:table-cell office:value-type="float" office:value="529.066955566406">
            <text:p>529.0669555664</text:p>
          </table:table-cell>
          <table:table-cell office:value-type="float" office:value="-0.01161427">
            <text:p>-0.01161427</text:p>
          </table:table-cell>
          <table:table-cell table:number-columns-repeated="4"/>
        </table:table-row>
        <table:table-row table:style-name="ro1">
          <table:table-cell office:value-type="float" office:value="529.184143066406">
            <text:p>529.1841430664</text:p>
          </table:table-cell>
          <table:table-cell office:value-type="float" office:value="0.004391328">
            <text:p>0.004391328</text:p>
          </table:table-cell>
          <table:table-cell table:number-columns-repeated="4"/>
        </table:table-row>
        <table:table-row table:style-name="ro1">
          <table:table-cell office:value-type="float" office:value="529.30126953125">
            <text:p>529.3012695313</text:p>
          </table:table-cell>
          <table:table-cell office:value-type="float" office:value="0.0106894">
            <text:p>0.0106894</text:p>
          </table:table-cell>
          <table:table-cell table:number-columns-repeated="4"/>
        </table:table-row>
        <table:table-row table:style-name="ro1">
          <table:table-cell office:value-type="float" office:value="529.41845703125">
            <text:p>529.4184570313</text:p>
          </table:table-cell>
          <table:table-cell office:value-type="float" office:value="-0.002109486">
            <text:p>-0.002109486</text:p>
          </table:table-cell>
          <table:table-cell table:number-columns-repeated="4"/>
        </table:table-row>
        <table:table-row table:style-name="ro1">
          <table:table-cell office:value-type="float" office:value="529.535583496094">
            <text:p>529.5355834961</text:p>
          </table:table-cell>
          <table:table-cell office:value-type="float" office:value="0.002695094">
            <text:p>0.002695094</text:p>
          </table:table-cell>
          <table:table-cell table:number-columns-repeated="4"/>
        </table:table-row>
        <table:table-row table:style-name="ro1">
          <table:table-cell office:value-type="float" office:value="529.652770996094">
            <text:p>529.6527709961</text:p>
          </table:table-cell>
          <table:table-cell office:value-type="float" office:value="-0.0001152617">
            <text:p>-0.0001152617</text:p>
          </table:table-cell>
          <table:table-cell table:number-columns-repeated="4"/>
        </table:table-row>
        <table:table-row table:style-name="ro1">
          <table:table-cell office:value-type="float" office:value="529.769958496094">
            <text:p>529.7699584961</text:p>
          </table:table-cell>
          <table:table-cell office:value-type="float" office:value="0.0008457326">
            <text:p>0.0008457326</text:p>
          </table:table-cell>
          <table:table-cell table:number-columns-repeated="4"/>
        </table:table-row>
        <table:table-row table:style-name="ro1">
          <table:table-cell office:value-type="float" office:value="529.887145996094">
            <text:p>529.8871459961</text:p>
          </table:table-cell>
          <table:table-cell office:value-type="float" office:value="-0.0005173864">
            <text:p>-0.0005173864</text:p>
          </table:table-cell>
          <table:table-cell table:number-columns-repeated="4"/>
        </table:table-row>
        <table:table-row table:style-name="ro1">
          <table:table-cell office:value-type="float" office:value="530.004272460938">
            <text:p>530.0042724609</text:p>
          </table:table-cell>
          <table:table-cell office:value-type="string">
            <text:p>6.674422E-05</text:p>
          </table:table-cell>
          <table:table-cell table:number-columns-repeated="4"/>
        </table:table-row>
        <table:table-row table:style-name="ro1">
          <table:table-cell office:value-type="float" office:value="530.121459960938">
            <text:p>530.1214599609</text:p>
          </table:table-cell>
          <table:table-cell office:value-type="float" office:value="0.001323693">
            <text:p>0.001323693</text:p>
          </table:table-cell>
          <table:table-cell table:number-columns-repeated="4"/>
        </table:table-row>
        <table:table-row table:style-name="ro1">
          <table:table-cell office:value-type="float" office:value="530.238647460938">
            <text:p>530.2386474609</text:p>
          </table:table-cell>
          <table:table-cell office:value-type="float" office:value="-0.00125918">
            <text:p>-0.00125918</text:p>
          </table:table-cell>
          <table:table-cell table:number-columns-repeated="4"/>
        </table:table-row>
        <table:table-row table:style-name="ro1">
          <table:table-cell office:value-type="float" office:value="530.355834960938">
            <text:p>530.3558349609</text:p>
          </table:table-cell>
          <table:table-cell office:value-type="float" office:value="-0.006777521">
            <text:p>-0.006777521</text:p>
          </table:table-cell>
          <table:table-cell table:number-columns-repeated="4"/>
        </table:table-row>
        <table:table-row table:style-name="ro1">
          <table:table-cell office:value-type="float" office:value="530.473022460938">
            <text:p>530.4730224609</text:p>
          </table:table-cell>
          <table:table-cell office:value-type="float" office:value="-0.009970008">
            <text:p>-0.009970008</text:p>
          </table:table-cell>
          <table:table-cell table:number-columns-repeated="4"/>
        </table:table-row>
        <table:table-row table:style-name="ro1">
          <table:table-cell office:value-type="float" office:value="530.590209960938">
            <text:p>530.5902099609</text:p>
          </table:table-cell>
          <table:table-cell office:value-type="float" office:value="0.002511009">
            <text:p>0.002511009</text:p>
          </table:table-cell>
          <table:table-cell table:number-columns-repeated="4"/>
        </table:table-row>
        <table:table-row table:style-name="ro1">
          <table:table-cell office:value-type="float" office:value="530.707397460938">
            <text:p>530.7073974609</text:p>
          </table:table-cell>
          <table:table-cell office:value-type="float" office:value="0.0461322">
            <text:p>0.0461322</text:p>
          </table:table-cell>
          <table:table-cell table:number-columns-repeated="4"/>
        </table:table-row>
        <table:table-row table:style-name="ro1">
          <table:table-cell office:value-type="float" office:value="530.824645996094">
            <text:p>530.8246459961</text:p>
          </table:table-cell>
          <table:table-cell office:value-type="float" office:value="0.006453245">
            <text:p>0.006453245</text:p>
          </table:table-cell>
          <table:table-cell table:number-columns-repeated="4"/>
        </table:table-row>
        <table:table-row table:style-name="ro1">
          <table:table-cell office:value-type="float" office:value="530.941833496094">
            <text:p>530.9418334961</text:p>
          </table:table-cell>
          <table:table-cell office:value-type="float" office:value="0.002196723">
            <text:p>0.002196723</text:p>
          </table:table-cell>
          <table:table-cell table:number-columns-repeated="4"/>
        </table:table-row>
        <table:table-row table:style-name="ro1">
          <table:table-cell office:value-type="float" office:value="531.059020996094">
            <text:p>531.0590209961</text:p>
          </table:table-cell>
          <table:table-cell office:value-type="float" office:value="0.00322125">
            <text:p>0.00322125</text:p>
          </table:table-cell>
          <table:table-cell table:number-columns-repeated="4"/>
        </table:table-row>
        <table:table-row table:style-name="ro1">
          <table:table-cell office:value-type="float" office:value="531.17626953125">
            <text:p>531.1762695313</text:p>
          </table:table-cell>
          <table:table-cell office:value-type="float" office:value="-0.0005964644">
            <text:p>-0.0005964644</text:p>
          </table:table-cell>
          <table:table-cell table:number-columns-repeated="4"/>
        </table:table-row>
        <table:table-row table:style-name="ro1">
          <table:table-cell office:value-type="float" office:value="531.29345703125">
            <text:p>531.2934570313</text:p>
          </table:table-cell>
          <table:table-cell office:value-type="float" office:value="0.001484407">
            <text:p>0.001484407</text:p>
          </table:table-cell>
          <table:table-cell table:number-columns-repeated="4"/>
        </table:table-row>
        <table:table-row table:style-name="ro1">
          <table:table-cell office:value-type="float" office:value="531.410705566406">
            <text:p>531.4107055664</text:p>
          </table:table-cell>
          <table:table-cell office:value-type="float" office:value="0.002747336">
            <text:p>0.002747336</text:p>
          </table:table-cell>
          <table:table-cell table:number-columns-repeated="4"/>
        </table:table-row>
        <table:table-row table:style-name="ro1">
          <table:table-cell office:value-type="float" office:value="531.527893066406">
            <text:p>531.5278930664</text:p>
          </table:table-cell>
          <table:table-cell office:value-type="float" office:value="-0.002429047">
            <text:p>-0.002429047</text:p>
          </table:table-cell>
          <table:table-cell table:number-columns-repeated="4"/>
        </table:table-row>
        <table:table-row table:style-name="ro1">
          <table:table-cell office:value-type="float" office:value="531.645141601563">
            <text:p>531.6451416016</text:p>
          </table:table-cell>
          <table:table-cell office:value-type="float" office:value="-0.0009937267">
            <text:p>-0.0009937267</text:p>
          </table:table-cell>
          <table:table-cell table:number-columns-repeated="4"/>
        </table:table-row>
        <table:table-row table:style-name="ro1">
          <table:table-cell office:value-type="float" office:value="531.762329101563">
            <text:p>531.7623291016</text:p>
          </table:table-cell>
          <table:table-cell office:value-type="string">
            <text:p>-8.544936E-05</text:p>
          </table:table-cell>
          <table:table-cell table:number-columns-repeated="4"/>
        </table:table-row>
        <table:table-row table:style-name="ro1">
          <table:table-cell office:value-type="float" office:value="531.879577636719">
            <text:p>531.8795776367</text:p>
          </table:table-cell>
          <table:table-cell office:value-type="float" office:value="-0.003893275">
            <text:p>-0.003893275</text:p>
          </table:table-cell>
          <table:table-cell table:number-columns-repeated="4"/>
        </table:table-row>
        <table:table-row table:style-name="ro1">
          <table:table-cell office:value-type="float" office:value="531.996826171875">
            <text:p>531.9968261719</text:p>
          </table:table-cell>
          <table:table-cell office:value-type="float" office:value="0.003934541">
            <text:p>0.003934541</text:p>
          </table:table-cell>
          <table:table-cell table:number-columns-repeated="4"/>
        </table:table-row>
        <table:table-row table:style-name="ro1">
          <table:table-cell office:value-type="float" office:value="532.114074707031">
            <text:p>532.114074707</text:p>
          </table:table-cell>
          <table:table-cell office:value-type="float" office:value="0.0237925">
            <text:p>0.0237925</text:p>
          </table:table-cell>
          <table:table-cell table:number-columns-repeated="4"/>
        </table:table-row>
        <table:table-row table:style-name="ro1">
          <table:table-cell office:value-type="float" office:value="532.231323242188">
            <text:p>532.2313232422</text:p>
          </table:table-cell>
          <table:table-cell office:value-type="float" office:value="0.002061093">
            <text:p>0.002061093</text:p>
          </table:table-cell>
          <table:table-cell table:number-columns-repeated="4"/>
        </table:table-row>
        <table:table-row table:style-name="ro1">
          <table:table-cell office:value-type="float" office:value="532.348510742188">
            <text:p>532.3485107422</text:p>
          </table:table-cell>
          <table:table-cell office:value-type="float" office:value="0.01651339">
            <text:p>0.01651339</text:p>
          </table:table-cell>
          <table:table-cell table:number-columns-repeated="4"/>
        </table:table-row>
        <table:table-row table:style-name="ro1">
          <table:table-cell office:value-type="float" office:value="532.465759277344">
            <text:p>532.4657592773</text:p>
          </table:table-cell>
          <table:table-cell office:value-type="float" office:value="-0.005175488">
            <text:p>-0.005175488</text:p>
          </table:table-cell>
          <table:table-cell table:number-columns-repeated="4"/>
        </table:table-row>
        <table:table-row table:style-name="ro1">
          <table:table-cell office:value-type="float" office:value="532.583068847656">
            <text:p>532.5830688477</text:p>
          </table:table-cell>
          <table:table-cell office:value-type="float" office:value="-0.002759321">
            <text:p>-0.002759321</text:p>
          </table:table-cell>
          <table:table-cell table:number-columns-repeated="4"/>
        </table:table-row>
        <table:table-row table:style-name="ro1">
          <table:table-cell office:value-type="float" office:value="532.700317382813">
            <text:p>532.7003173828</text:p>
          </table:table-cell>
          <table:table-cell office:value-type="float" office:value="0.0002872991">
            <text:p>0.0002872991</text:p>
          </table:table-cell>
          <table:table-cell table:number-columns-repeated="4"/>
        </table:table-row>
        <table:table-row table:style-name="ro1">
          <table:table-cell office:value-type="float" office:value="532.817565917969">
            <text:p>532.817565918</text:p>
          </table:table-cell>
          <table:table-cell office:value-type="float" office:value="-0.008037353">
            <text:p>-0.008037353</text:p>
          </table:table-cell>
          <table:table-cell table:number-columns-repeated="4"/>
        </table:table-row>
        <table:table-row table:style-name="ro1">
          <table:table-cell office:value-type="float" office:value="532.934814453125">
            <text:p>532.9348144531</text:p>
          </table:table-cell>
          <table:table-cell office:value-type="float" office:value="0.007254271">
            <text:p>0.007254271</text:p>
          </table:table-cell>
          <table:table-cell table:number-columns-repeated="4"/>
        </table:table-row>
        <table:table-row table:style-name="ro1">
          <table:table-cell office:value-type="float" office:value="533.052062988281">
            <text:p>533.0520629883</text:p>
          </table:table-cell>
          <table:table-cell office:value-type="float" office:value="-0.004019666">
            <text:p>-0.004019666</text:p>
          </table:table-cell>
          <table:table-cell table:number-columns-repeated="4"/>
        </table:table-row>
        <table:table-row table:style-name="ro1">
          <table:table-cell office:value-type="float" office:value="533.169372558594">
            <text:p>533.1693725586</text:p>
          </table:table-cell>
          <table:table-cell office:value-type="float" office:value="-0.005042368">
            <text:p>-0.005042368</text:p>
          </table:table-cell>
          <table:table-cell table:number-columns-repeated="4"/>
        </table:table-row>
        <table:table-row table:style-name="ro1">
          <table:table-cell office:value-type="float" office:value="533.28662109375">
            <text:p>533.2866210938</text:p>
          </table:table-cell>
          <table:table-cell office:value-type="float" office:value="0.02125113">
            <text:p>0.02125113</text:p>
          </table:table-cell>
          <table:table-cell table:number-columns-repeated="4"/>
        </table:table-row>
        <table:table-row table:style-name="ro1">
          <table:table-cell office:value-type="float" office:value="533.403869628906">
            <text:p>533.4038696289</text:p>
          </table:table-cell>
          <table:table-cell office:value-type="float" office:value="-0.0006765294">
            <text:p>-0.0006765294</text:p>
          </table:table-cell>
          <table:table-cell table:number-columns-repeated="4"/>
        </table:table-row>
        <table:table-row table:style-name="ro1">
          <table:table-cell office:value-type="float" office:value="533.521179199219">
            <text:p>533.5211791992</text:p>
          </table:table-cell>
          <table:table-cell office:value-type="float" office:value="0.007523182">
            <text:p>0.007523182</text:p>
          </table:table-cell>
          <table:table-cell table:number-columns-repeated="4"/>
        </table:table-row>
        <table:table-row table:style-name="ro1">
          <table:table-cell office:value-type="float" office:value="533.638427734375">
            <text:p>533.6384277344</text:p>
          </table:table-cell>
          <table:table-cell office:value-type="float" office:value="0.004655103">
            <text:p>0.004655103</text:p>
          </table:table-cell>
          <table:table-cell table:number-columns-repeated="4"/>
        </table:table-row>
        <table:table-row table:style-name="ro1">
          <table:table-cell office:value-type="float" office:value="533.755737304688">
            <text:p>533.7557373047</text:p>
          </table:table-cell>
          <table:table-cell office:value-type="float" office:value="-0.006709318">
            <text:p>-0.006709318</text:p>
          </table:table-cell>
          <table:table-cell table:number-columns-repeated="4"/>
        </table:table-row>
        <table:table-row table:style-name="ro1">
          <table:table-cell office:value-type="float" office:value="533.873046875">
            <text:p>533.873046875</text:p>
          </table:table-cell>
          <table:table-cell office:value-type="float" office:value="0.01239384">
            <text:p>0.01239384</text:p>
          </table:table-cell>
          <table:table-cell table:number-columns-repeated="4"/>
        </table:table-row>
        <table:table-row table:style-name="ro1">
          <table:table-cell office:value-type="float" office:value="533.990295410156">
            <text:p>533.9902954102</text:p>
          </table:table-cell>
          <table:table-cell office:value-type="float" office:value="0.007087776">
            <text:p>0.007087776</text:p>
          </table:table-cell>
          <table:table-cell table:number-columns-repeated="4"/>
        </table:table-row>
        <table:table-row table:style-name="ro1">
          <table:table-cell office:value-type="float" office:value="534.107604980469">
            <text:p>534.1076049805</text:p>
          </table:table-cell>
          <table:table-cell office:value-type="float" office:value="-0.0002844717">
            <text:p>-0.0002844717</text:p>
          </table:table-cell>
          <table:table-cell table:number-columns-repeated="4"/>
        </table:table-row>
        <table:table-row table:style-name="ro1">
          <table:table-cell office:value-type="float" office:value="534.224914550781">
            <text:p>534.2249145508</text:p>
          </table:table-cell>
          <table:table-cell office:value-type="float" office:value="0.00504255">
            <text:p>0.00504255</text:p>
          </table:table-cell>
          <table:table-cell table:number-columns-repeated="4"/>
        </table:table-row>
        <table:table-row table:style-name="ro1">
          <table:table-cell office:value-type="float" office:value="534.342224121094">
            <text:p>534.3422241211</text:p>
          </table:table-cell>
          <table:table-cell office:value-type="float" office:value="-0.003550534">
            <text:p>-0.003550534</text:p>
          </table:table-cell>
          <table:table-cell table:number-columns-repeated="4"/>
        </table:table-row>
        <table:table-row table:style-name="ro1">
          <table:table-cell office:value-type="float" office:value="534.459533691406">
            <text:p>534.4595336914</text:p>
          </table:table-cell>
          <table:table-cell office:value-type="float" office:value="-0.003607025">
            <text:p>-0.003607025</text:p>
          </table:table-cell>
          <table:table-cell table:number-columns-repeated="4"/>
        </table:table-row>
        <table:table-row table:style-name="ro1">
          <table:table-cell office:value-type="float" office:value="534.576843261719">
            <text:p>534.5768432617</text:p>
          </table:table-cell>
          <table:table-cell office:value-type="float" office:value="0.006219801">
            <text:p>0.006219801</text:p>
          </table:table-cell>
          <table:table-cell table:number-columns-repeated="4"/>
        </table:table-row>
        <table:table-row table:style-name="ro1">
          <table:table-cell office:value-type="float" office:value="534.694152832031">
            <text:p>534.694152832</text:p>
          </table:table-cell>
          <table:table-cell office:value-type="float" office:value="-0.00911826">
            <text:p>-0.00911826</text:p>
          </table:table-cell>
          <table:table-cell table:number-columns-repeated="4"/>
        </table:table-row>
        <table:table-row table:style-name="ro1">
          <table:table-cell office:value-type="float" office:value="534.811462402344">
            <text:p>534.8114624023</text:p>
          </table:table-cell>
          <table:table-cell office:value-type="float" office:value="-0.001296982">
            <text:p>-0.001296982</text:p>
          </table:table-cell>
          <table:table-cell table:number-columns-repeated="4"/>
        </table:table-row>
        <table:table-row table:style-name="ro1">
          <table:table-cell office:value-type="float" office:value="534.928771972656">
            <text:p>534.9287719727</text:p>
          </table:table-cell>
          <table:table-cell office:value-type="float" office:value="-0.004316472">
            <text:p>-0.004316472</text:p>
          </table:table-cell>
          <table:table-cell table:number-columns-repeated="4"/>
        </table:table-row>
        <table:table-row table:style-name="ro1">
          <table:table-cell office:value-type="float" office:value="535.046081542969">
            <text:p>535.046081543</text:p>
          </table:table-cell>
          <table:table-cell office:value-type="float" office:value="-0.007032557">
            <text:p>-0.007032557</text:p>
          </table:table-cell>
          <table:table-cell table:number-columns-repeated="4"/>
        </table:table-row>
        <table:table-row table:style-name="ro1">
          <table:table-cell office:value-type="float" office:value="535.163452148438">
            <text:p>535.1634521484</text:p>
          </table:table-cell>
          <table:table-cell office:value-type="float" office:value="0.00389599">
            <text:p>0.00389599</text:p>
          </table:table-cell>
          <table:table-cell table:number-columns-repeated="4"/>
        </table:table-row>
        <table:table-row table:style-name="ro1">
          <table:table-cell office:value-type="float" office:value="535.28076171875">
            <text:p>535.2807617188</text:p>
          </table:table-cell>
          <table:table-cell office:value-type="float" office:value="0.001135149">
            <text:p>0.001135149</text:p>
          </table:table-cell>
          <table:table-cell table:number-columns-repeated="4"/>
        </table:table-row>
        <table:table-row table:style-name="ro1">
          <table:table-cell office:value-type="float" office:value="535.398071289063">
            <text:p>535.3980712891</text:p>
          </table:table-cell>
          <table:table-cell office:value-type="float" office:value="0.000925521">
            <text:p>0.000925521</text:p>
          </table:table-cell>
          <table:table-cell table:number-columns-repeated="4"/>
        </table:table-row>
        <table:table-row table:style-name="ro1">
          <table:table-cell office:value-type="float" office:value="535.515441894531">
            <text:p>535.5154418945</text:p>
          </table:table-cell>
          <table:table-cell office:value-type="float" office:value="-0.007798875">
            <text:p>-0.007798875</text:p>
          </table:table-cell>
          <table:table-cell table:number-columns-repeated="4"/>
        </table:table-row>
        <table:table-row table:style-name="ro1">
          <table:table-cell office:value-type="float" office:value="535.632751464844">
            <text:p>535.6327514648</text:p>
          </table:table-cell>
          <table:table-cell office:value-type="float" office:value="-0.003492783">
            <text:p>-0.003492783</text:p>
          </table:table-cell>
          <table:table-cell table:number-columns-repeated="4"/>
        </table:table-row>
        <table:table-row table:style-name="ro1">
          <table:table-cell office:value-type="float" office:value="535.750122070313">
            <text:p>535.7501220703</text:p>
          </table:table-cell>
          <table:table-cell office:value-type="float" office:value="-0.001908867">
            <text:p>-0.001908867</text:p>
          </table:table-cell>
          <table:table-cell table:number-columns-repeated="4"/>
        </table:table-row>
        <table:table-row table:style-name="ro1">
          <table:table-cell office:value-type="float" office:value="535.867431640625">
            <text:p>535.8674316406</text:p>
          </table:table-cell>
          <table:table-cell office:value-type="float" office:value="0.004980901">
            <text:p>0.004980901</text:p>
          </table:table-cell>
          <table:table-cell table:number-columns-repeated="4"/>
        </table:table-row>
        <table:table-row table:style-name="ro1">
          <table:table-cell office:value-type="float" office:value="535.984802246094">
            <text:p>535.9848022461</text:p>
          </table:table-cell>
          <table:table-cell office:value-type="float" office:value="0.008372805">
            <text:p>0.008372805</text:p>
          </table:table-cell>
          <table:table-cell table:number-columns-repeated="4"/>
        </table:table-row>
        <table:table-row table:style-name="ro1">
          <table:table-cell office:value-type="float" office:value="536.102172851563">
            <text:p>536.1021728516</text:p>
          </table:table-cell>
          <table:table-cell office:value-type="float" office:value="0.007610916">
            <text:p>0.007610916</text:p>
          </table:table-cell>
          <table:table-cell table:number-columns-repeated="4"/>
        </table:table-row>
        <table:table-row table:style-name="ro1">
          <table:table-cell office:value-type="float" office:value="536.219543457031">
            <text:p>536.219543457</text:p>
          </table:table-cell>
          <table:table-cell office:value-type="float" office:value="-0.0003747842">
            <text:p>-0.0003747842</text:p>
          </table:table-cell>
          <table:table-cell table:number-columns-repeated="4"/>
        </table:table-row>
        <table:table-row table:style-name="ro1">
          <table:table-cell office:value-type="float" office:value="536.336853027344">
            <text:p>536.3368530273</text:p>
          </table:table-cell>
          <table:table-cell office:value-type="float" office:value="-0.002228178">
            <text:p>-0.002228178</text:p>
          </table:table-cell>
          <table:table-cell table:number-columns-repeated="4"/>
        </table:table-row>
        <table:table-row table:style-name="ro1">
          <table:table-cell office:value-type="float" office:value="536.454223632813">
            <text:p>536.4542236328</text:p>
          </table:table-cell>
          <table:table-cell office:value-type="float" office:value="-0.0112963">
            <text:p>-0.0112963</text:p>
          </table:table-cell>
          <table:table-cell table:number-columns-repeated="4"/>
        </table:table-row>
        <table:table-row table:style-name="ro1">
          <table:table-cell office:value-type="float" office:value="536.571594238281">
            <text:p>536.5715942383</text:p>
          </table:table-cell>
          <table:table-cell office:value-type="float" office:value="-0.008710736">
            <text:p>-0.008710736</text:p>
          </table:table-cell>
          <table:table-cell table:number-columns-repeated="4"/>
        </table:table-row>
        <table:table-row table:style-name="ro1">
          <table:table-cell office:value-type="float" office:value="536.68896484375">
            <text:p>536.6889648438</text:p>
          </table:table-cell>
          <table:table-cell office:value-type="float" office:value="-0.002933187">
            <text:p>-0.002933187</text:p>
          </table:table-cell>
          <table:table-cell table:number-columns-repeated="4"/>
        </table:table-row>
        <table:table-row table:style-name="ro1">
          <table:table-cell office:value-type="float" office:value="536.806335449219">
            <text:p>536.8063354492</text:p>
          </table:table-cell>
          <table:table-cell office:value-type="string">
            <text:p>2.191242E-05</text:p>
          </table:table-cell>
          <table:table-cell table:number-columns-repeated="4"/>
        </table:table-row>
        <table:table-row table:style-name="ro1">
          <table:table-cell office:value-type="float" office:value="536.923706054688">
            <text:p>536.9237060547</text:p>
          </table:table-cell>
          <table:table-cell office:value-type="float" office:value="0.0181428">
            <text:p>0.0181428</text:p>
          </table:table-cell>
          <table:table-cell table:number-columns-repeated="4"/>
        </table:table-row>
        <table:table-row table:style-name="ro1">
          <table:table-cell office:value-type="float" office:value="537.041076660156">
            <text:p>537.0410766602</text:p>
          </table:table-cell>
          <table:table-cell office:value-type="float" office:value="-0.002122165">
            <text:p>-0.002122165</text:p>
          </table:table-cell>
          <table:table-cell table:number-columns-repeated="4"/>
        </table:table-row>
        <table:table-row table:style-name="ro1">
          <table:table-cell office:value-type="float" office:value="537.158508300781">
            <text:p>537.1585083008</text:p>
          </table:table-cell>
          <table:table-cell office:value-type="float" office:value="0.002003253">
            <text:p>0.002003253</text:p>
          </table:table-cell>
          <table:table-cell table:number-columns-repeated="4"/>
        </table:table-row>
        <table:table-row table:style-name="ro1">
          <table:table-cell office:value-type="float" office:value="537.27587890625">
            <text:p>537.2758789063</text:p>
          </table:table-cell>
          <table:table-cell office:value-type="float" office:value="-0.0004216804">
            <text:p>-0.0004216804</text:p>
          </table:table-cell>
          <table:table-cell table:number-columns-repeated="4"/>
        </table:table-row>
        <table:table-row table:style-name="ro1">
          <table:table-cell office:value-type="float" office:value="537.393249511719">
            <text:p>537.3932495117</text:p>
          </table:table-cell>
          <table:table-cell office:value-type="float" office:value="0.00284">
            <text:p>0.00284</text:p>
          </table:table-cell>
          <table:table-cell table:number-columns-repeated="4"/>
        </table:table-row>
        <table:table-row table:style-name="ro1">
          <table:table-cell office:value-type="float" office:value="537.510681152344">
            <text:p>537.5106811523</text:p>
          </table:table-cell>
          <table:table-cell office:value-type="float" office:value="-0.003766309">
            <text:p>-0.003766309</text:p>
          </table:table-cell>
          <table:table-cell table:number-columns-repeated="4"/>
        </table:table-row>
        <table:table-row table:style-name="ro1">
          <table:table-cell office:value-type="float" office:value="537.628051757813">
            <text:p>537.6280517578</text:p>
          </table:table-cell>
          <table:table-cell office:value-type="float" office:value="0.002962583">
            <text:p>0.002962583</text:p>
          </table:table-cell>
          <table:table-cell table:number-columns-repeated="4"/>
        </table:table-row>
        <table:table-row table:style-name="ro1">
          <table:table-cell office:value-type="float" office:value="537.745483398438">
            <text:p>537.7454833984</text:p>
          </table:table-cell>
          <table:table-cell office:value-type="float" office:value="-0.0009788476">
            <text:p>-0.0009788476</text:p>
          </table:table-cell>
          <table:table-cell table:number-columns-repeated="4"/>
        </table:table-row>
        <table:table-row table:style-name="ro1">
          <table:table-cell office:value-type="float" office:value="537.862854003906">
            <text:p>537.8628540039</text:p>
          </table:table-cell>
          <table:table-cell office:value-type="float" office:value="0.001312714">
            <text:p>0.001312714</text:p>
          </table:table-cell>
          <table:table-cell table:number-columns-repeated="4"/>
        </table:table-row>
        <table:table-row table:style-name="ro1">
          <table:table-cell office:value-type="float" office:value="537.980285644531">
            <text:p>537.9802856445</text:p>
          </table:table-cell>
          <table:table-cell office:value-type="float" office:value="-0.01125314">
            <text:p>-0.01125314</text:p>
          </table:table-cell>
          <table:table-cell table:number-columns-repeated="4"/>
        </table:table-row>
        <table:table-row table:style-name="ro1">
          <table:table-cell office:value-type="float" office:value="538.09765625">
            <text:p>538.09765625</text:p>
          </table:table-cell>
          <table:table-cell office:value-type="float" office:value="0.03022042">
            <text:p>0.03022042</text:p>
          </table:table-cell>
          <table:table-cell table:number-columns-repeated="4"/>
        </table:table-row>
        <table:table-row table:style-name="ro1">
          <table:table-cell office:value-type="float" office:value="538.215087890625">
            <text:p>538.2150878906</text:p>
          </table:table-cell>
          <table:table-cell office:value-type="float" office:value="0.002593701">
            <text:p>0.002593701</text:p>
          </table:table-cell>
          <table:table-cell table:number-columns-repeated="4"/>
        </table:table-row>
        <table:table-row table:style-name="ro1">
          <table:table-cell office:value-type="float" office:value="538.33251953125">
            <text:p>538.3325195313</text:p>
          </table:table-cell>
          <table:table-cell office:value-type="float" office:value="0.0253516">
            <text:p>0.0253516</text:p>
          </table:table-cell>
          <table:table-cell table:number-columns-repeated="4"/>
        </table:table-row>
        <table:table-row table:style-name="ro1">
          <table:table-cell office:value-type="float" office:value="538.449890136719">
            <text:p>538.4498901367</text:p>
          </table:table-cell>
          <table:table-cell office:value-type="float" office:value="0.0004433852">
            <text:p>0.0004433852</text:p>
          </table:table-cell>
          <table:table-cell table:number-columns-repeated="4"/>
        </table:table-row>
        <table:table-row table:style-name="ro1">
          <table:table-cell office:value-type="float" office:value="538.567321777344">
            <text:p>538.5673217773</text:p>
          </table:table-cell>
          <table:table-cell office:value-type="float" office:value="0.02930587">
            <text:p>0.02930587</text:p>
          </table:table-cell>
          <table:table-cell table:number-columns-repeated="4"/>
        </table:table-row>
        <table:table-row table:style-name="ro1">
          <table:table-cell office:value-type="float" office:value="538.684753417969">
            <text:p>538.684753418</text:p>
          </table:table-cell>
          <table:table-cell office:value-type="float" office:value="-0.0007881033">
            <text:p>-0.0007881033</text:p>
          </table:table-cell>
          <table:table-cell table:number-columns-repeated="4"/>
        </table:table-row>
        <table:table-row table:style-name="ro1">
          <table:table-cell office:value-type="float" office:value="538.802185058594">
            <text:p>538.8021850586</text:p>
          </table:table-cell>
          <table:table-cell office:value-type="float" office:value="0.003916102">
            <text:p>0.003916102</text:p>
          </table:table-cell>
          <table:table-cell table:number-columns-repeated="4"/>
        </table:table-row>
        <table:table-row table:style-name="ro1">
          <table:table-cell office:value-type="float" office:value="538.919616699219">
            <text:p>538.9196166992</text:p>
          </table:table-cell>
          <table:table-cell office:value-type="float" office:value="-0.009651623">
            <text:p>-0.009651623</text:p>
          </table:table-cell>
          <table:table-cell table:number-columns-repeated="4"/>
        </table:table-row>
        <table:table-row table:style-name="ro1">
          <table:table-cell office:value-type="float" office:value="539.037048339844">
            <text:p>539.0370483398</text:p>
          </table:table-cell>
          <table:table-cell office:value-type="float" office:value="0.006536839">
            <text:p>0.006536839</text:p>
          </table:table-cell>
          <table:table-cell table:number-columns-repeated="4"/>
        </table:table-row>
        <table:table-row table:style-name="ro1">
          <table:table-cell office:value-type="float" office:value="539.154479980469">
            <text:p>539.1544799805</text:p>
          </table:table-cell>
          <table:table-cell office:value-type="float" office:value="0.0008985467">
            <text:p>0.0008985467</text:p>
          </table:table-cell>
          <table:table-cell table:number-columns-repeated="4"/>
        </table:table-row>
        <table:table-row table:style-name="ro1">
          <table:table-cell office:value-type="float" office:value="539.27197265625">
            <text:p>539.2719726563</text:p>
          </table:table-cell>
          <table:table-cell office:value-type="float" office:value="-0.008142381">
            <text:p>-0.008142381</text:p>
          </table:table-cell>
          <table:table-cell table:number-columns-repeated="4"/>
        </table:table-row>
        <table:table-row table:style-name="ro1">
          <table:table-cell office:value-type="float" office:value="539.389404296875">
            <text:p>539.3894042969</text:p>
          </table:table-cell>
          <table:table-cell office:value-type="float" office:value="-0.0005290479">
            <text:p>-0.0005290479</text:p>
          </table:table-cell>
          <table:table-cell table:number-columns-repeated="4"/>
        </table:table-row>
        <table:table-row table:style-name="ro1">
          <table:table-cell office:value-type="float" office:value="539.5068359375">
            <text:p>539.5068359375</text:p>
          </table:table-cell>
          <table:table-cell office:value-type="float" office:value="-0.00205229">
            <text:p>-0.00205229</text:p>
          </table:table-cell>
          <table:table-cell table:number-columns-repeated="4"/>
        </table:table-row>
        <table:table-row table:style-name="ro1">
          <table:table-cell office:value-type="float" office:value="539.624267578125">
            <text:p>539.6242675781</text:p>
          </table:table-cell>
          <table:table-cell office:value-type="float" office:value="-0.001678543">
            <text:p>-0.001678543</text:p>
          </table:table-cell>
          <table:table-cell table:number-columns-repeated="4"/>
        </table:table-row>
        <table:table-row table:style-name="ro1">
          <table:table-cell office:value-type="float" office:value="539.741760253906">
            <text:p>539.7417602539</text:p>
          </table:table-cell>
          <table:table-cell office:value-type="float" office:value="-0.004323545">
            <text:p>-0.004323545</text:p>
          </table:table-cell>
          <table:table-cell table:number-columns-repeated="4"/>
        </table:table-row>
        <table:table-row table:style-name="ro1">
          <table:table-cell office:value-type="float" office:value="539.859191894531">
            <text:p>539.8591918945</text:p>
          </table:table-cell>
          <table:table-cell office:value-type="float" office:value="-0.01047793">
            <text:p>-0.01047793</text:p>
          </table:table-cell>
          <table:table-cell table:number-columns-repeated="4"/>
        </table:table-row>
        <table:table-row table:style-name="ro1">
          <table:table-cell office:value-type="float" office:value="539.976684570313">
            <text:p>539.9766845703</text:p>
          </table:table-cell>
          <table:table-cell office:value-type="float" office:value="0.006248209">
            <text:p>0.006248209</text:p>
          </table:table-cell>
          <table:table-cell table:number-columns-repeated="4"/>
        </table:table-row>
        <table:table-row table:style-name="ro1">
          <table:table-cell office:value-type="float" office:value="540.094116210938">
            <text:p>540.0941162109</text:p>
          </table:table-cell>
          <table:table-cell office:value-type="float" office:value="-0.007017708">
            <text:p>-0.007017708</text:p>
          </table:table-cell>
          <table:table-cell table:number-columns-repeated="4"/>
        </table:table-row>
        <table:table-row table:style-name="ro1">
          <table:table-cell office:value-type="float" office:value="540.211608886719">
            <text:p>540.2116088867</text:p>
          </table:table-cell>
          <table:table-cell office:value-type="float" office:value="-0.006865458">
            <text:p>-0.006865458</text:p>
          </table:table-cell>
          <table:table-cell table:number-columns-repeated="4"/>
        </table:table-row>
        <table:table-row table:style-name="ro1">
          <table:table-cell office:value-type="float" office:value="540.3291015625">
            <text:p>540.3291015625</text:p>
          </table:table-cell>
          <table:table-cell office:value-type="float" office:value="-0.001987116">
            <text:p>-0.001987116</text:p>
          </table:table-cell>
          <table:table-cell table:number-columns-repeated="4"/>
        </table:table-row>
        <table:table-row table:style-name="ro1">
          <table:table-cell office:value-type="float" office:value="540.446533203125">
            <text:p>540.4465332031</text:p>
          </table:table-cell>
          <table:table-cell office:value-type="float" office:value="-0.002469667">
            <text:p>-0.002469667</text:p>
          </table:table-cell>
          <table:table-cell table:number-columns-repeated="4"/>
        </table:table-row>
        <table:table-row table:style-name="ro1">
          <table:table-cell office:value-type="float" office:value="540.564025878906">
            <text:p>540.5640258789</text:p>
          </table:table-cell>
          <table:table-cell office:value-type="float" office:value="0.01132928">
            <text:p>0.01132928</text:p>
          </table:table-cell>
          <table:table-cell table:number-columns-repeated="4"/>
        </table:table-row>
        <table:table-row table:style-name="ro1">
          <table:table-cell office:value-type="float" office:value="540.681518554688">
            <text:p>540.6815185547</text:p>
          </table:table-cell>
          <table:table-cell office:value-type="float" office:value="-0.003742838">
            <text:p>-0.003742838</text:p>
          </table:table-cell>
          <table:table-cell table:number-columns-repeated="4"/>
        </table:table-row>
        <table:table-row table:style-name="ro1">
          <table:table-cell office:value-type="float" office:value="540.799011230469">
            <text:p>540.7990112305</text:p>
          </table:table-cell>
          <table:table-cell office:value-type="float" office:value="-0.003813974">
            <text:p>-0.003813974</text:p>
          </table:table-cell>
          <table:table-cell table:number-columns-repeated="4"/>
        </table:table-row>
        <table:table-row table:style-name="ro1">
          <table:table-cell office:value-type="float" office:value="540.91650390625">
            <text:p>540.9165039063</text:p>
          </table:table-cell>
          <table:table-cell office:value-type="float" office:value="-0.007482632">
            <text:p>-0.007482632</text:p>
          </table:table-cell>
          <table:table-cell table:number-columns-repeated="4"/>
        </table:table-row>
        <table:table-row table:style-name="ro1">
          <table:table-cell office:value-type="float" office:value="541.033996582031">
            <text:p>541.033996582</text:p>
          </table:table-cell>
          <table:table-cell office:value-type="float" office:value="-0.00183472">
            <text:p>-0.00183472</text:p>
          </table:table-cell>
          <table:table-cell table:number-columns-repeated="4"/>
        </table:table-row>
        <table:table-row table:style-name="ro1">
          <table:table-cell office:value-type="float" office:value="541.151489257813">
            <text:p>541.1514892578</text:p>
          </table:table-cell>
          <table:table-cell office:value-type="float" office:value="0.0003972936">
            <text:p>0.0003972936</text:p>
          </table:table-cell>
          <table:table-cell table:number-columns-repeated="4"/>
        </table:table-row>
        <table:table-row table:style-name="ro1">
          <table:table-cell office:value-type="float" office:value="541.268981933594">
            <text:p>541.2689819336</text:p>
          </table:table-cell>
          <table:table-cell office:value-type="float" office:value="-0.004447475">
            <text:p>-0.004447475</text:p>
          </table:table-cell>
          <table:table-cell table:number-columns-repeated="4"/>
        </table:table-row>
        <table:table-row table:style-name="ro1">
          <table:table-cell office:value-type="float" office:value="541.386474609375">
            <text:p>541.3864746094</text:p>
          </table:table-cell>
          <table:table-cell office:value-type="float" office:value="0.007442705">
            <text:p>0.007442705</text:p>
          </table:table-cell>
          <table:table-cell table:number-columns-repeated="4"/>
        </table:table-row>
        <table:table-row table:style-name="ro1">
          <table:table-cell office:value-type="float" office:value="541.503967285156">
            <text:p>541.5039672852</text:p>
          </table:table-cell>
          <table:table-cell office:value-type="float" office:value="-0.003508391">
            <text:p>-0.003508391</text:p>
          </table:table-cell>
          <table:table-cell table:number-columns-repeated="4"/>
        </table:table-row>
        <table:table-row table:style-name="ro1">
          <table:table-cell office:value-type="float" office:value="541.621459960938">
            <text:p>541.6214599609</text:p>
          </table:table-cell>
          <table:table-cell office:value-type="float" office:value="0.001002261">
            <text:p>0.001002261</text:p>
          </table:table-cell>
          <table:table-cell table:number-columns-repeated="4"/>
        </table:table-row>
        <table:table-row table:style-name="ro1">
          <table:table-cell office:value-type="float" office:value="541.739013671875">
            <text:p>541.7390136719</text:p>
          </table:table-cell>
          <table:table-cell office:value-type="float" office:value="0.01263868">
            <text:p>0.01263868</text:p>
          </table:table-cell>
          <table:table-cell table:number-columns-repeated="4"/>
        </table:table-row>
        <table:table-row table:style-name="ro1">
          <table:table-cell office:value-type="float" office:value="541.856506347656">
            <text:p>541.8565063477</text:p>
          </table:table-cell>
          <table:table-cell office:value-type="float" office:value="-0.00196454">
            <text:p>-0.00196454</text:p>
          </table:table-cell>
          <table:table-cell table:number-columns-repeated="4"/>
        </table:table-row>
        <table:table-row table:style-name="ro1">
          <table:table-cell office:value-type="float" office:value="541.974060058594">
            <text:p>541.9740600586</text:p>
          </table:table-cell>
          <table:table-cell office:value-type="float" office:value="-0.00993109">
            <text:p>-0.00993109</text:p>
          </table:table-cell>
          <table:table-cell table:number-columns-repeated="4"/>
        </table:table-row>
        <table:table-row table:style-name="ro1">
          <table:table-cell office:value-type="float" office:value="542.091552734375">
            <text:p>542.0915527344</text:p>
          </table:table-cell>
          <table:table-cell office:value-type="float" office:value="0.003002306">
            <text:p>0.003002306</text:p>
          </table:table-cell>
          <table:table-cell table:number-columns-repeated="4"/>
        </table:table-row>
        <table:table-row table:style-name="ro1">
          <table:table-cell office:value-type="float" office:value="542.209106445313">
            <text:p>542.2091064453</text:p>
          </table:table-cell>
          <table:table-cell office:value-type="float" office:value="0.001284065">
            <text:p>0.001284065</text:p>
          </table:table-cell>
          <table:table-cell table:number-columns-repeated="4"/>
        </table:table-row>
        <table:table-row table:style-name="ro1">
          <table:table-cell office:value-type="float" office:value="542.326599121094">
            <text:p>542.3265991211</text:p>
          </table:table-cell>
          <table:table-cell office:value-type="float" office:value="-0.005741227">
            <text:p>-0.005741227</text:p>
          </table:table-cell>
          <table:table-cell table:number-columns-repeated="4"/>
        </table:table-row>
        <table:table-row table:style-name="ro1">
          <table:table-cell office:value-type="float" office:value="542.444152832031">
            <text:p>542.444152832</text:p>
          </table:table-cell>
          <table:table-cell office:value-type="float" office:value="0.008148665">
            <text:p>0.008148665</text:p>
          </table:table-cell>
          <table:table-cell table:number-columns-repeated="4"/>
        </table:table-row>
        <table:table-row table:style-name="ro1">
          <table:table-cell office:value-type="float" office:value="542.561645507813">
            <text:p>542.5616455078</text:p>
          </table:table-cell>
          <table:table-cell office:value-type="float" office:value="-0.001825347">
            <text:p>-0.001825347</text:p>
          </table:table-cell>
          <table:table-cell table:number-columns-repeated="4"/>
        </table:table-row>
        <table:table-row table:style-name="ro1">
          <table:table-cell office:value-type="float" office:value="542.67919921875">
            <text:p>542.6791992188</text:p>
          </table:table-cell>
          <table:table-cell office:value-type="float" office:value="-0.006559336">
            <text:p>-0.006559336</text:p>
          </table:table-cell>
          <table:table-cell table:number-columns-repeated="4"/>
        </table:table-row>
        <table:table-row table:style-name="ro1">
          <table:table-cell office:value-type="float" office:value="542.796752929688">
            <text:p>542.7967529297</text:p>
          </table:table-cell>
          <table:table-cell office:value-type="float" office:value="0.007183907">
            <text:p>0.007183907</text:p>
          </table:table-cell>
          <table:table-cell table:number-columns-repeated="4"/>
        </table:table-row>
        <table:table-row table:style-name="ro1">
          <table:table-cell office:value-type="float" office:value="542.914306640625">
            <text:p>542.9143066406</text:p>
          </table:table-cell>
          <table:table-cell office:value-type="float" office:value="-0.00356289">
            <text:p>-0.00356289</text:p>
          </table:table-cell>
          <table:table-cell table:number-columns-repeated="4"/>
        </table:table-row>
        <table:table-row table:style-name="ro1">
          <table:table-cell office:value-type="float" office:value="543.031860351563">
            <text:p>543.0318603516</text:p>
          </table:table-cell>
          <table:table-cell office:value-type="float" office:value="0.004194118">
            <text:p>0.004194118</text:p>
          </table:table-cell>
          <table:table-cell table:number-columns-repeated="4"/>
        </table:table-row>
        <table:table-row table:style-name="ro1">
          <table:table-cell office:value-type="float" office:value="543.1494140625">
            <text:p>543.1494140625</text:p>
          </table:table-cell>
          <table:table-cell office:value-type="float" office:value="-0.01121306">
            <text:p>-0.01121306</text:p>
          </table:table-cell>
          <table:table-cell table:number-columns-repeated="4"/>
        </table:table-row>
        <table:table-row table:style-name="ro1">
          <table:table-cell office:value-type="float" office:value="543.266967773438">
            <text:p>543.2669677734</text:p>
          </table:table-cell>
          <table:table-cell office:value-type="float" office:value="0.001949802">
            <text:p>0.001949802</text:p>
          </table:table-cell>
          <table:table-cell table:number-columns-repeated="4"/>
        </table:table-row>
        <table:table-row table:style-name="ro1">
          <table:table-cell office:value-type="float" office:value="543.384521484375">
            <text:p>543.3845214844</text:p>
          </table:table-cell>
          <table:table-cell office:value-type="float" office:value="0.004290408">
            <text:p>0.004290408</text:p>
          </table:table-cell>
          <table:table-cell table:number-columns-repeated="4"/>
        </table:table-row>
        <table:table-row table:style-name="ro1">
          <table:table-cell office:value-type="float" office:value="543.502075195313">
            <text:p>543.5020751953</text:p>
          </table:table-cell>
          <table:table-cell office:value-type="float" office:value="-0.008742561">
            <text:p>-0.008742561</text:p>
          </table:table-cell>
          <table:table-cell table:number-columns-repeated="4"/>
        </table:table-row>
        <table:table-row table:style-name="ro1">
          <table:table-cell office:value-type="float" office:value="543.61962890625">
            <text:p>543.6196289063</text:p>
          </table:table-cell>
          <table:table-cell office:value-type="float" office:value="0.0003165263">
            <text:p>0.0003165263</text:p>
          </table:table-cell>
          <table:table-cell table:number-columns-repeated="4"/>
        </table:table-row>
        <table:table-row table:style-name="ro1">
          <table:table-cell office:value-type="float" office:value="543.737182617188">
            <text:p>543.7371826172</text:p>
          </table:table-cell>
          <table:table-cell office:value-type="float" office:value="-0.005266097">
            <text:p>-0.005266097</text:p>
          </table:table-cell>
          <table:table-cell table:number-columns-repeated="4"/>
        </table:table-row>
        <table:table-row table:style-name="ro1">
          <table:table-cell office:value-type="float" office:value="543.854736328125">
            <text:p>543.8547363281</text:p>
          </table:table-cell>
          <table:table-cell office:value-type="float" office:value="-0.004328465">
            <text:p>-0.004328465</text:p>
          </table:table-cell>
          <table:table-cell table:number-columns-repeated="4"/>
        </table:table-row>
        <table:table-row table:style-name="ro1">
          <table:table-cell office:value-type="float" office:value="543.972351074219">
            <text:p>543.9723510742</text:p>
          </table:table-cell>
          <table:table-cell office:value-type="float" office:value="-0.0003959053">
            <text:p>-0.0003959053</text:p>
          </table:table-cell>
          <table:table-cell table:number-columns-repeated="4"/>
        </table:table-row>
        <table:table-row table:style-name="ro1">
          <table:table-cell office:value-type="float" office:value="544.089904785156">
            <text:p>544.0899047852</text:p>
          </table:table-cell>
          <table:table-cell office:value-type="float" office:value="-0.003105046">
            <text:p>-0.003105046</text:p>
          </table:table-cell>
          <table:table-cell table:number-columns-repeated="4"/>
        </table:table-row>
        <table:table-row table:style-name="ro1">
          <table:table-cell office:value-type="float" office:value="544.207458496094">
            <text:p>544.2074584961</text:p>
          </table:table-cell>
          <table:table-cell office:value-type="float" office:value="0.0009215122">
            <text:p>0.0009215122</text:p>
          </table:table-cell>
          <table:table-cell table:number-columns-repeated="4"/>
        </table:table-row>
        <table:table-row table:style-name="ro1">
          <table:table-cell office:value-type="float" office:value="544.325073242188">
            <text:p>544.3250732422</text:p>
          </table:table-cell>
          <table:table-cell office:value-type="float" office:value="0.005908588">
            <text:p>0.005908588</text:p>
          </table:table-cell>
          <table:table-cell table:number-columns-repeated="4"/>
        </table:table-row>
        <table:table-row table:style-name="ro1">
          <table:table-cell office:value-type="float" office:value="544.442626953125">
            <text:p>544.4426269531</text:p>
          </table:table-cell>
          <table:table-cell office:value-type="float" office:value="-0.007221986">
            <text:p>-0.007221986</text:p>
          </table:table-cell>
          <table:table-cell table:number-columns-repeated="4"/>
        </table:table-row>
        <table:table-row table:style-name="ro1">
          <table:table-cell office:value-type="float" office:value="544.560241699219">
            <text:p>544.5602416992</text:p>
          </table:table-cell>
          <table:table-cell office:value-type="float" office:value="0.002456072">
            <text:p>0.002456072</text:p>
          </table:table-cell>
          <table:table-cell table:number-columns-repeated="4"/>
        </table:table-row>
        <table:table-row table:style-name="ro1">
          <table:table-cell office:value-type="float" office:value="544.677856445313">
            <text:p>544.6778564453</text:p>
          </table:table-cell>
          <table:table-cell office:value-type="float" office:value="0.001873633">
            <text:p>0.001873633</text:p>
          </table:table-cell>
          <table:table-cell table:number-columns-repeated="4"/>
        </table:table-row>
        <table:table-row table:style-name="ro1">
          <table:table-cell office:value-type="float" office:value="544.79541015625">
            <text:p>544.7954101563</text:p>
          </table:table-cell>
          <table:table-cell office:value-type="float" office:value="0.002973881">
            <text:p>0.002973881</text:p>
          </table:table-cell>
          <table:table-cell table:number-columns-repeated="4"/>
        </table:table-row>
        <table:table-row table:style-name="ro1">
          <table:table-cell office:value-type="float" office:value="544.913024902344">
            <text:p>544.9130249023</text:p>
          </table:table-cell>
          <table:table-cell office:value-type="float" office:value="-0.009229418">
            <text:p>-0.009229418</text:p>
          </table:table-cell>
          <table:table-cell table:number-columns-repeated="4"/>
        </table:table-row>
        <table:table-row table:style-name="ro1">
          <table:table-cell office:value-type="float" office:value="545.030639648438">
            <text:p>545.0306396484</text:p>
          </table:table-cell>
          <table:table-cell office:value-type="float" office:value="-0.0004462856">
            <text:p>-0.0004462856</text:p>
          </table:table-cell>
          <table:table-cell table:number-columns-repeated="4"/>
        </table:table-row>
        <table:table-row table:style-name="ro1">
          <table:table-cell office:value-type="float" office:value="545.148254394531">
            <text:p>545.1482543945</text:p>
          </table:table-cell>
          <table:table-cell office:value-type="float" office:value="0.001627772">
            <text:p>0.001627772</text:p>
          </table:table-cell>
          <table:table-cell table:number-columns-repeated="4"/>
        </table:table-row>
        <table:table-row table:style-name="ro1">
          <table:table-cell office:value-type="float" office:value="545.265869140625">
            <text:p>545.2658691406</text:p>
          </table:table-cell>
          <table:table-cell office:value-type="float" office:value="0.00211434">
            <text:p>0.00211434</text:p>
          </table:table-cell>
          <table:table-cell table:number-columns-repeated="4"/>
        </table:table-row>
        <table:table-row table:style-name="ro1">
          <table:table-cell office:value-type="float" office:value="545.383483886719">
            <text:p>545.3834838867</text:p>
          </table:table-cell>
          <table:table-cell office:value-type="float" office:value="-0.01172515">
            <text:p>-0.01172515</text:p>
          </table:table-cell>
          <table:table-cell table:number-columns-repeated="4"/>
        </table:table-row>
        <table:table-row table:style-name="ro1">
          <table:table-cell office:value-type="float" office:value="545.501098632813">
            <text:p>545.5010986328</text:p>
          </table:table-cell>
          <table:table-cell office:value-type="float" office:value="-0.0004165807">
            <text:p>-0.0004165807</text:p>
          </table:table-cell>
          <table:table-cell table:number-columns-repeated="4"/>
        </table:table-row>
        <table:table-row table:style-name="ro1">
          <table:table-cell office:value-type="float" office:value="545.618713378906">
            <text:p>545.6187133789</text:p>
          </table:table-cell>
          <table:table-cell office:value-type="float" office:value="0.005072857">
            <text:p>0.005072857</text:p>
          </table:table-cell>
          <table:table-cell table:number-columns-repeated="4"/>
        </table:table-row>
        <table:table-row table:style-name="ro1">
          <table:table-cell office:value-type="float" office:value="545.736328125">
            <text:p>545.736328125</text:p>
          </table:table-cell>
          <table:table-cell office:value-type="float" office:value="0.004389092">
            <text:p>0.004389092</text:p>
          </table:table-cell>
          <table:table-cell table:number-columns-repeated="4"/>
        </table:table-row>
        <table:table-row table:style-name="ro1">
          <table:table-cell office:value-type="float" office:value="545.853942871094">
            <text:p>545.8539428711</text:p>
          </table:table-cell>
          <table:table-cell office:value-type="float" office:value="0.0009437845">
            <text:p>0.0009437845</text:p>
          </table:table-cell>
          <table:table-cell table:number-columns-repeated="4"/>
        </table:table-row>
        <table:table-row table:style-name="ro1">
          <table:table-cell office:value-type="float" office:value="545.971557617188">
            <text:p>545.9715576172</text:p>
          </table:table-cell>
          <table:table-cell office:value-type="float" office:value="0.008706967">
            <text:p>0.008706967</text:p>
          </table:table-cell>
          <table:table-cell table:number-columns-repeated="4"/>
        </table:table-row>
        <table:table-row table:style-name="ro1">
          <table:table-cell office:value-type="float" office:value="546.089172363281">
            <text:p>546.0891723633</text:p>
          </table:table-cell>
          <table:table-cell office:value-type="float" office:value="0.009971537">
            <text:p>0.009971537</text:p>
          </table:table-cell>
          <table:table-cell table:number-columns-repeated="4"/>
        </table:table-row>
        <table:table-row table:style-name="ro1">
          <table:table-cell office:value-type="float" office:value="546.206848144531">
            <text:p>546.2068481445</text:p>
          </table:table-cell>
          <table:table-cell office:value-type="float" office:value="0.0103593">
            <text:p>0.0103593</text:p>
          </table:table-cell>
          <table:table-cell table:number-columns-repeated="4"/>
        </table:table-row>
        <table:table-row table:style-name="ro1">
          <table:table-cell office:value-type="float" office:value="546.324462890625">
            <text:p>546.3244628906</text:p>
          </table:table-cell>
          <table:table-cell office:value-type="float" office:value="-0.004571517">
            <text:p>-0.004571517</text:p>
          </table:table-cell>
          <table:table-cell table:number-columns-repeated="4"/>
        </table:table-row>
        <table:table-row table:style-name="ro1">
          <table:table-cell office:value-type="float" office:value="546.442077636719">
            <text:p>546.4420776367</text:p>
          </table:table-cell>
          <table:table-cell office:value-type="float" office:value="0.003338254">
            <text:p>0.003338254</text:p>
          </table:table-cell>
          <table:table-cell table:number-columns-repeated="4"/>
        </table:table-row>
        <table:table-row table:style-name="ro1">
          <table:table-cell office:value-type="float" office:value="546.559753417969">
            <text:p>546.559753418</text:p>
          </table:table-cell>
          <table:table-cell office:value-type="float" office:value="0.003880641">
            <text:p>0.003880641</text:p>
          </table:table-cell>
          <table:table-cell table:number-columns-repeated="4"/>
        </table:table-row>
        <table:table-row table:style-name="ro1">
          <table:table-cell office:value-type="float" office:value="546.677368164063">
            <text:p>546.6773681641</text:p>
          </table:table-cell>
          <table:table-cell office:value-type="float" office:value="0.0004315895">
            <text:p>0.0004315895</text:p>
          </table:table-cell>
          <table:table-cell table:number-columns-repeated="4"/>
        </table:table-row>
        <table:table-row table:style-name="ro1">
          <table:table-cell office:value-type="float" office:value="546.795043945313">
            <text:p>546.7950439453</text:p>
          </table:table-cell>
          <table:table-cell office:value-type="float" office:value="0.002227176">
            <text:p>0.002227176</text:p>
          </table:table-cell>
          <table:table-cell table:number-columns-repeated="4"/>
        </table:table-row>
        <table:table-row table:style-name="ro1">
          <table:table-cell office:value-type="float" office:value="546.912719726563">
            <text:p>546.9127197266</text:p>
          </table:table-cell>
          <table:table-cell office:value-type="float" office:value="0.004785815">
            <text:p>0.004785815</text:p>
          </table:table-cell>
          <table:table-cell table:number-columns-repeated="4"/>
        </table:table-row>
        <table:table-row table:style-name="ro1">
          <table:table-cell office:value-type="float" office:value="547.030334472656">
            <text:p>547.0303344727</text:p>
          </table:table-cell>
          <table:table-cell office:value-type="float" office:value="-0.001688867">
            <text:p>-0.001688867</text:p>
          </table:table-cell>
          <table:table-cell table:number-columns-repeated="4"/>
        </table:table-row>
        <table:table-row table:style-name="ro1">
          <table:table-cell office:value-type="float" office:value="547.148010253906">
            <text:p>547.1480102539</text:p>
          </table:table-cell>
          <table:table-cell office:value-type="float" office:value="0.004456277">
            <text:p>0.004456277</text:p>
          </table:table-cell>
          <table:table-cell table:number-columns-repeated="4"/>
        </table:table-row>
        <table:table-row table:style-name="ro1">
          <table:table-cell office:value-type="float" office:value="547.265686035156">
            <text:p>547.2656860352</text:p>
          </table:table-cell>
          <table:table-cell office:value-type="float" office:value="0.003547244">
            <text:p>0.003547244</text:p>
          </table:table-cell>
          <table:table-cell table:number-columns-repeated="4"/>
        </table:table-row>
        <table:table-row table:style-name="ro1">
          <table:table-cell office:value-type="float" office:value="547.383361816406">
            <text:p>547.3833618164</text:p>
          </table:table-cell>
          <table:table-cell office:value-type="float" office:value="0.005645601">
            <text:p>0.005645601</text:p>
          </table:table-cell>
          <table:table-cell table:number-columns-repeated="4"/>
        </table:table-row>
        <table:table-row table:style-name="ro1">
          <table:table-cell office:value-type="float" office:value="547.5009765625">
            <text:p>547.5009765625</text:p>
          </table:table-cell>
          <table:table-cell office:value-type="float" office:value="-0.005860678">
            <text:p>-0.005860678</text:p>
          </table:table-cell>
          <table:table-cell table:number-columns-repeated="4"/>
        </table:table-row>
        <table:table-row table:style-name="ro1">
          <table:table-cell office:value-type="float" office:value="547.61865234375">
            <text:p>547.6186523438</text:p>
          </table:table-cell>
          <table:table-cell office:value-type="float" office:value="0.001381493">
            <text:p>0.001381493</text:p>
          </table:table-cell>
          <table:table-cell table:number-columns-repeated="4"/>
        </table:table-row>
        <table:table-row table:style-name="ro1">
          <table:table-cell office:value-type="float" office:value="547.736328125">
            <text:p>547.736328125</text:p>
          </table:table-cell>
          <table:table-cell office:value-type="float" office:value="0.002202585">
            <text:p>0.002202585</text:p>
          </table:table-cell>
          <table:table-cell table:number-columns-repeated="4"/>
        </table:table-row>
        <table:table-row table:style-name="ro1">
          <table:table-cell office:value-type="float" office:value="547.85400390625">
            <text:p>547.8540039063</text:p>
          </table:table-cell>
          <table:table-cell office:value-type="float" office:value="-0.003242515">
            <text:p>-0.003242515</text:p>
          </table:table-cell>
          <table:table-cell table:number-columns-repeated="4"/>
        </table:table-row>
        <table:table-row table:style-name="ro1">
          <table:table-cell office:value-type="float" office:value="547.971740722656">
            <text:p>547.9717407227</text:p>
          </table:table-cell>
          <table:table-cell office:value-type="float" office:value="-0.01057845">
            <text:p>-0.01057845</text:p>
          </table:table-cell>
          <table:table-cell table:number-columns-repeated="4"/>
        </table:table-row>
        <table:table-row table:style-name="ro1">
          <table:table-cell office:value-type="float" office:value="548.089416503906">
            <text:p>548.0894165039</text:p>
          </table:table-cell>
          <table:table-cell office:value-type="float" office:value="-0.006188261">
            <text:p>-0.006188261</text:p>
          </table:table-cell>
          <table:table-cell table:number-columns-repeated="4"/>
        </table:table-row>
        <table:table-row table:style-name="ro1">
          <table:table-cell office:value-type="float" office:value="548.207092285156">
            <text:p>548.2070922852</text:p>
          </table:table-cell>
          <table:table-cell office:value-type="float" office:value="0.00730184">
            <text:p>0.00730184</text:p>
          </table:table-cell>
          <table:table-cell table:number-columns-repeated="4"/>
        </table:table-row>
        <table:table-row table:style-name="ro1">
          <table:table-cell office:value-type="float" office:value="548.324768066406">
            <text:p>548.3247680664</text:p>
          </table:table-cell>
          <table:table-cell office:value-type="float" office:value="-0.007448553">
            <text:p>-0.007448553</text:p>
          </table:table-cell>
          <table:table-cell table:number-columns-repeated="4"/>
        </table:table-row>
        <table:table-row table:style-name="ro1">
          <table:table-cell office:value-type="float" office:value="548.442443847656">
            <text:p>548.4424438477</text:p>
          </table:table-cell>
          <table:table-cell office:value-type="float" office:value="0.0006964096">
            <text:p>0.0006964096</text:p>
          </table:table-cell>
          <table:table-cell table:number-columns-repeated="4"/>
        </table:table-row>
        <table:table-row table:style-name="ro1">
          <table:table-cell office:value-type="float" office:value="548.560180664063">
            <text:p>548.5601806641</text:p>
          </table:table-cell>
          <table:table-cell office:value-type="float" office:value="-0.002538875">
            <text:p>-0.002538875</text:p>
          </table:table-cell>
          <table:table-cell table:number-columns-repeated="4"/>
        </table:table-row>
        <table:table-row table:style-name="ro1">
          <table:table-cell office:value-type="float" office:value="548.677856445313">
            <text:p>548.6778564453</text:p>
          </table:table-cell>
          <table:table-cell office:value-type="float" office:value="0.006649885">
            <text:p>0.006649885</text:p>
          </table:table-cell>
          <table:table-cell table:number-columns-repeated="4"/>
        </table:table-row>
        <table:table-row table:style-name="ro1">
          <table:table-cell office:value-type="float" office:value="548.795593261719">
            <text:p>548.7955932617</text:p>
          </table:table-cell>
          <table:table-cell office:value-type="float" office:value="-0.004573509">
            <text:p>-0.004573509</text:p>
          </table:table-cell>
          <table:table-cell table:number-columns-repeated="4"/>
        </table:table-row>
        <table:table-row table:style-name="ro1">
          <table:table-cell office:value-type="float" office:value="548.913269042969">
            <text:p>548.913269043</text:p>
          </table:table-cell>
          <table:table-cell office:value-type="float" office:value="-0.004574178">
            <text:p>-0.004574178</text:p>
          </table:table-cell>
          <table:table-cell table:number-columns-repeated="4"/>
        </table:table-row>
        <table:table-row table:style-name="ro1">
          <table:table-cell office:value-type="float" office:value="549.031005859375">
            <text:p>549.0310058594</text:p>
          </table:table-cell>
          <table:table-cell office:value-type="float" office:value="-0.001781713">
            <text:p>-0.001781713</text:p>
          </table:table-cell>
          <table:table-cell table:number-columns-repeated="4"/>
        </table:table-row>
        <table:table-row table:style-name="ro1">
          <table:table-cell office:value-type="float" office:value="549.148681640625">
            <text:p>549.1486816406</text:p>
          </table:table-cell>
          <table:table-cell office:value-type="float" office:value="-0.003491003">
            <text:p>-0.003491003</text:p>
          </table:table-cell>
          <table:table-cell table:number-columns-repeated="4"/>
        </table:table-row>
        <table:table-row table:style-name="ro1">
          <table:table-cell office:value-type="float" office:value="549.266418457031">
            <text:p>549.266418457</text:p>
          </table:table-cell>
          <table:table-cell office:value-type="float" office:value="0.004728603">
            <text:p>0.004728603</text:p>
          </table:table-cell>
          <table:table-cell table:number-columns-repeated="4"/>
        </table:table-row>
        <table:table-row table:style-name="ro1">
          <table:table-cell office:value-type="float" office:value="549.384155273438">
            <text:p>549.3841552734</text:p>
          </table:table-cell>
          <table:table-cell office:value-type="float" office:value="-0.0001624016">
            <text:p>-0.0001624016</text:p>
          </table:table-cell>
          <table:table-cell table:number-columns-repeated="4"/>
        </table:table-row>
        <table:table-row table:style-name="ro1">
          <table:table-cell office:value-type="float" office:value="549.501831054688">
            <text:p>549.5018310547</text:p>
          </table:table-cell>
          <table:table-cell office:value-type="float" office:value="0.002974237">
            <text:p>0.002974237</text:p>
          </table:table-cell>
          <table:table-cell table:number-columns-repeated="4"/>
        </table:table-row>
        <table:table-row table:style-name="ro1">
          <table:table-cell office:value-type="float" office:value="549.619567871094">
            <text:p>549.6195678711</text:p>
          </table:table-cell>
          <table:table-cell office:value-type="float" office:value="0.01281526">
            <text:p>0.01281526</text:p>
          </table:table-cell>
          <table:table-cell table:number-columns-repeated="4"/>
        </table:table-row>
        <table:table-row table:style-name="ro1">
          <table:table-cell office:value-type="float" office:value="549.7373046875">
            <text:p>549.7373046875</text:p>
          </table:table-cell>
          <table:table-cell office:value-type="float" office:value="0.005595216">
            <text:p>0.005595216</text:p>
          </table:table-cell>
          <table:table-cell table:number-columns-repeated="4"/>
        </table:table-row>
        <table:table-row table:style-name="ro1">
          <table:table-cell office:value-type="float" office:value="549.855041503906">
            <text:p>549.8550415039</text:p>
          </table:table-cell>
          <table:table-cell office:value-type="float" office:value="0.001441335">
            <text:p>0.001441335</text:p>
          </table:table-cell>
          <table:table-cell table:number-columns-repeated="4"/>
        </table:table-row>
        <table:table-row table:style-name="ro1">
          <table:table-cell office:value-type="float" office:value="549.972778320313">
            <text:p>549.9727783203</text:p>
          </table:table-cell>
          <table:table-cell office:value-type="float" office:value="0.00704211">
            <text:p>0.00704211</text:p>
          </table:table-cell>
          <table:table-cell table:number-columns-repeated="4"/>
        </table:table-row>
        <table:table-row table:style-name="ro1">
          <table:table-cell office:value-type="float" office:value="550.090515136719">
            <text:p>550.0905151367</text:p>
          </table:table-cell>
          <table:table-cell office:value-type="float" office:value="-0.00998241">
            <text:p>-0.00998241</text:p>
          </table:table-cell>
          <table:table-cell table:number-columns-repeated="4"/>
        </table:table-row>
        <table:table-row table:style-name="ro1">
          <table:table-cell office:value-type="float" office:value="550.208251953125">
            <text:p>550.2082519531</text:p>
          </table:table-cell>
          <table:table-cell office:value-type="float" office:value="0.002142572">
            <text:p>0.002142572</text:p>
          </table:table-cell>
          <table:table-cell table:number-columns-repeated="4"/>
        </table:table-row>
        <table:table-row table:style-name="ro1">
          <table:table-cell office:value-type="float" office:value="550.325988769531">
            <text:p>550.3259887695</text:p>
          </table:table-cell>
          <table:table-cell office:value-type="float" office:value="-0.004487137">
            <text:p>-0.004487137</text:p>
          </table:table-cell>
          <table:table-cell table:number-columns-repeated="4"/>
        </table:table-row>
        <table:table-row table:style-name="ro1">
          <table:table-cell office:value-type="float" office:value="550.443725585938">
            <text:p>550.4437255859</text:p>
          </table:table-cell>
          <table:table-cell office:value-type="string">
            <text:p>-1.410686E-06</text:p>
          </table:table-cell>
          <table:table-cell table:number-columns-repeated="4"/>
        </table:table-row>
        <table:table-row table:style-name="ro1">
          <table:table-cell office:value-type="float" office:value="550.561462402344">
            <text:p>550.5614624023</text:p>
          </table:table-cell>
          <table:table-cell office:value-type="float" office:value="0.008389252">
            <text:p>0.008389252</text:p>
          </table:table-cell>
          <table:table-cell table:number-columns-repeated="4"/>
        </table:table-row>
        <table:table-row table:style-name="ro1">
          <table:table-cell office:value-type="float" office:value="550.679260253906">
            <text:p>550.6792602539</text:p>
          </table:table-cell>
          <table:table-cell office:value-type="float" office:value="0.00396601">
            <text:p>0.00396601</text:p>
          </table:table-cell>
          <table:table-cell table:number-columns-repeated="4"/>
        </table:table-row>
        <table:table-row table:style-name="ro1">
          <table:table-cell office:value-type="float" office:value="550.796997070313">
            <text:p>550.7969970703</text:p>
          </table:table-cell>
          <table:table-cell office:value-type="float" office:value="0.000488042">
            <text:p>0.000488042</text:p>
          </table:table-cell>
          <table:table-cell table:number-columns-repeated="4"/>
        </table:table-row>
        <table:table-row table:style-name="ro1">
          <table:table-cell office:value-type="float" office:value="550.914733886719">
            <text:p>550.9147338867</text:p>
          </table:table-cell>
          <table:table-cell office:value-type="float" office:value="0.003116086">
            <text:p>0.003116086</text:p>
          </table:table-cell>
          <table:table-cell table:number-columns-repeated="4"/>
        </table:table-row>
        <table:table-row table:style-name="ro1">
          <table:table-cell office:value-type="float" office:value="551.032531738281">
            <text:p>551.0325317383</text:p>
          </table:table-cell>
          <table:table-cell office:value-type="float" office:value="-0.00372879">
            <text:p>-0.00372879</text:p>
          </table:table-cell>
          <table:table-cell table:number-columns-repeated="4"/>
        </table:table-row>
        <table:table-row table:style-name="ro1">
          <table:table-cell office:value-type="float" office:value="551.150268554688">
            <text:p>551.1502685547</text:p>
          </table:table-cell>
          <table:table-cell office:value-type="float" office:value="0.004754752">
            <text:p>0.004754752</text:p>
          </table:table-cell>
          <table:table-cell table:number-columns-repeated="4"/>
        </table:table-row>
        <table:table-row table:style-name="ro1">
          <table:table-cell office:value-type="float" office:value="551.26806640625">
            <text:p>551.2680664063</text:p>
          </table:table-cell>
          <table:table-cell office:value-type="float" office:value="-0.008321077">
            <text:p>-0.008321077</text:p>
          </table:table-cell>
          <table:table-cell table:number-columns-repeated="4"/>
        </table:table-row>
        <table:table-row table:style-name="ro1">
          <table:table-cell office:value-type="float" office:value="551.385803222656">
            <text:p>551.3858032227</text:p>
          </table:table-cell>
          <table:table-cell office:value-type="float" office:value="0.004331046">
            <text:p>0.004331046</text:p>
          </table:table-cell>
          <table:table-cell table:number-columns-repeated="4"/>
        </table:table-row>
        <table:table-row table:style-name="ro1">
          <table:table-cell office:value-type="float" office:value="551.503601074219">
            <text:p>551.5036010742</text:p>
          </table:table-cell>
          <table:table-cell office:value-type="float" office:value="-0.008263594">
            <text:p>-0.008263594</text:p>
          </table:table-cell>
          <table:table-cell table:number-columns-repeated="4"/>
        </table:table-row>
        <table:table-row table:style-name="ro1">
          <table:table-cell office:value-type="float" office:value="551.621398925781">
            <text:p>551.6213989258</text:p>
          </table:table-cell>
          <table:table-cell office:value-type="float" office:value="0.0129667">
            <text:p>0.0129667</text:p>
          </table:table-cell>
          <table:table-cell table:number-columns-repeated="4"/>
        </table:table-row>
        <table:table-row table:style-name="ro1">
          <table:table-cell office:value-type="float" office:value="551.739135742188">
            <text:p>551.7391357422</text:p>
          </table:table-cell>
          <table:table-cell office:value-type="float" office:value="-0.001616659">
            <text:p>-0.001616659</text:p>
          </table:table-cell>
          <table:table-cell table:number-columns-repeated="4"/>
        </table:table-row>
        <table:table-row table:style-name="ro1">
          <table:table-cell office:value-type="float" office:value="551.85693359375">
            <text:p>551.8569335938</text:p>
          </table:table-cell>
          <table:table-cell office:value-type="float" office:value="-0.00515799">
            <text:p>-0.00515799</text:p>
          </table:table-cell>
          <table:table-cell table:number-columns-repeated="4"/>
        </table:table-row>
        <table:table-row table:style-name="ro1">
          <table:table-cell office:value-type="float" office:value="551.974731445313">
            <text:p>551.9747314453</text:p>
          </table:table-cell>
          <table:table-cell office:value-type="float" office:value="0.003248104">
            <text:p>0.003248104</text:p>
          </table:table-cell>
          <table:table-cell table:number-columns-repeated="4"/>
        </table:table-row>
        <table:table-row table:style-name="ro1">
          <table:table-cell office:value-type="float" office:value="552.092529296875">
            <text:p>552.0925292969</text:p>
          </table:table-cell>
          <table:table-cell office:value-type="float" office:value="-0.004832084">
            <text:p>-0.004832084</text:p>
          </table:table-cell>
          <table:table-cell table:number-columns-repeated="4"/>
        </table:table-row>
        <table:table-row table:style-name="ro1">
          <table:table-cell office:value-type="float" office:value="552.210327148438">
            <text:p>552.2103271484</text:p>
          </table:table-cell>
          <table:table-cell office:value-type="float" office:value="0.009289008">
            <text:p>0.009289008</text:p>
          </table:table-cell>
          <table:table-cell table:number-columns-repeated="4"/>
        </table:table-row>
        <table:table-row table:style-name="ro1">
          <table:table-cell office:value-type="float" office:value="552.328125">
            <text:p>552.328125</text:p>
          </table:table-cell>
          <table:table-cell office:value-type="float" office:value="-0.00167452">
            <text:p>-0.00167452</text:p>
          </table:table-cell>
          <table:table-cell table:number-columns-repeated="4"/>
        </table:table-row>
        <table:table-row table:style-name="ro1">
          <table:table-cell office:value-type="float" office:value="552.445922851563">
            <text:p>552.4459228516</text:p>
          </table:table-cell>
          <table:table-cell office:value-type="string">
            <text:p>-1.991E-05</text:p>
          </table:table-cell>
          <table:table-cell table:number-columns-repeated="4"/>
        </table:table-row>
        <table:table-row table:style-name="ro1">
          <table:table-cell office:value-type="float" office:value="552.563720703125">
            <text:p>552.5637207031</text:p>
          </table:table-cell>
          <table:table-cell office:value-type="float" office:value="0.01222956">
            <text:p>0.01222956</text:p>
          </table:table-cell>
          <table:table-cell table:number-columns-repeated="4"/>
        </table:table-row>
        <table:table-row table:style-name="ro1">
          <table:table-cell office:value-type="float" office:value="552.681518554688">
            <text:p>552.6815185547</text:p>
          </table:table-cell>
          <table:table-cell office:value-type="float" office:value="-0.002522709">
            <text:p>-0.002522709</text:p>
          </table:table-cell>
          <table:table-cell table:number-columns-repeated="4"/>
        </table:table-row>
        <table:table-row table:style-name="ro1">
          <table:table-cell office:value-type="float" office:value="552.79931640625">
            <text:p>552.7993164063</text:p>
          </table:table-cell>
          <table:table-cell office:value-type="float" office:value="-0.001773159">
            <text:p>-0.001773159</text:p>
          </table:table-cell>
          <table:table-cell table:number-columns-repeated="4"/>
        </table:table-row>
        <table:table-row table:style-name="ro1">
          <table:table-cell office:value-type="float" office:value="552.917114257813">
            <text:p>552.9171142578</text:p>
          </table:table-cell>
          <table:table-cell office:value-type="float" office:value="-0.003427792">
            <text:p>-0.003427792</text:p>
          </table:table-cell>
          <table:table-cell table:number-columns-repeated="4"/>
        </table:table-row>
        <table:table-row table:style-name="ro1">
          <table:table-cell office:value-type="float" office:value="553.034973144531">
            <text:p>553.0349731445</text:p>
          </table:table-cell>
          <table:table-cell office:value-type="float" office:value="-0.001079813">
            <text:p>-0.001079813</text:p>
          </table:table-cell>
          <table:table-cell table:number-columns-repeated="4"/>
        </table:table-row>
        <table:table-row table:style-name="ro1">
          <table:table-cell office:value-type="float" office:value="553.152770996094">
            <text:p>553.1527709961</text:p>
          </table:table-cell>
          <table:table-cell office:value-type="float" office:value="0.002899757">
            <text:p>0.002899757</text:p>
          </table:table-cell>
          <table:table-cell table:number-columns-repeated="4"/>
        </table:table-row>
        <table:table-row table:style-name="ro1">
          <table:table-cell office:value-type="float" office:value="553.270568847656">
            <text:p>553.2705688477</text:p>
          </table:table-cell>
          <table:table-cell office:value-type="float" office:value="0.01637929">
            <text:p>0.01637929</text:p>
          </table:table-cell>
          <table:table-cell table:number-columns-repeated="4"/>
        </table:table-row>
        <table:table-row table:style-name="ro1">
          <table:table-cell office:value-type="float" office:value="553.388427734375">
            <text:p>553.3884277344</text:p>
          </table:table-cell>
          <table:table-cell office:value-type="float" office:value="-0.00622352">
            <text:p>-0.00622352</text:p>
          </table:table-cell>
          <table:table-cell table:number-columns-repeated="4"/>
        </table:table-row>
        <table:table-row table:style-name="ro1">
          <table:table-cell office:value-type="float" office:value="553.506225585938">
            <text:p>553.5062255859</text:p>
          </table:table-cell>
          <table:table-cell office:value-type="float" office:value="0.01107422">
            <text:p>0.01107422</text:p>
          </table:table-cell>
          <table:table-cell table:number-columns-repeated="4"/>
        </table:table-row>
        <table:table-row table:style-name="ro1">
          <table:table-cell office:value-type="float" office:value="553.624084472656">
            <text:p>553.6240844727</text:p>
          </table:table-cell>
          <table:table-cell office:value-type="float" office:value="0.001471966">
            <text:p>0.001471966</text:p>
          </table:table-cell>
          <table:table-cell table:number-columns-repeated="4"/>
        </table:table-row>
        <table:table-row table:style-name="ro1">
          <table:table-cell office:value-type="float" office:value="553.741882324219">
            <text:p>553.7418823242</text:p>
          </table:table-cell>
          <table:table-cell office:value-type="float" office:value="-0.002689627">
            <text:p>-0.002689627</text:p>
          </table:table-cell>
          <table:table-cell table:number-columns-repeated="4"/>
        </table:table-row>
        <table:table-row table:style-name="ro1">
          <table:table-cell office:value-type="float" office:value="553.859741210938">
            <text:p>553.8597412109</text:p>
          </table:table-cell>
          <table:table-cell office:value-type="float" office:value="-0.009341939">
            <text:p>-0.009341939</text:p>
          </table:table-cell>
          <table:table-cell table:number-columns-repeated="4"/>
        </table:table-row>
        <table:table-row table:style-name="ro1">
          <table:table-cell office:value-type="float" office:value="553.977600097656">
            <text:p>553.9776000977</text:p>
          </table:table-cell>
          <table:table-cell office:value-type="float" office:value="0.0006308014">
            <text:p>0.0006308014</text:p>
          </table:table-cell>
          <table:table-cell table:number-columns-repeated="4"/>
        </table:table-row>
        <table:table-row table:style-name="ro1">
          <table:table-cell office:value-type="float" office:value="554.095458984375">
            <text:p>554.0954589844</text:p>
          </table:table-cell>
          <table:table-cell office:value-type="float" office:value="-0.003284015">
            <text:p>-0.003284015</text:p>
          </table:table-cell>
          <table:table-cell table:number-columns-repeated="4"/>
        </table:table-row>
        <table:table-row table:style-name="ro1">
          <table:table-cell office:value-type="float" office:value="554.213256835938">
            <text:p>554.2132568359</text:p>
          </table:table-cell>
          <table:table-cell office:value-type="float" office:value="0.01638087">
            <text:p>0.01638087</text:p>
          </table:table-cell>
          <table:table-cell table:number-columns-repeated="4"/>
        </table:table-row>
        <table:table-row table:style-name="ro1">
          <table:table-cell office:value-type="float" office:value="554.331115722656">
            <text:p>554.3311157227</text:p>
          </table:table-cell>
          <table:table-cell office:value-type="float" office:value="0.0008085482">
            <text:p>0.0008085482</text:p>
          </table:table-cell>
          <table:table-cell table:number-columns-repeated="4"/>
        </table:table-row>
        <table:table-row table:style-name="ro1">
          <table:table-cell office:value-type="float" office:value="554.448974609375">
            <text:p>554.4489746094</text:p>
          </table:table-cell>
          <table:table-cell office:value-type="float" office:value="0.000701168">
            <text:p>0.000701168</text:p>
          </table:table-cell>
          <table:table-cell table:number-columns-repeated="4"/>
        </table:table-row>
        <table:table-row table:style-name="ro1">
          <table:table-cell office:value-type="float" office:value="554.566833496094">
            <text:p>554.5668334961</text:p>
          </table:table-cell>
          <table:table-cell office:value-type="float" office:value="0.0001340604">
            <text:p>0.0001340604</text:p>
          </table:table-cell>
          <table:table-cell table:number-columns-repeated="4"/>
        </table:table-row>
        <table:table-row table:style-name="ro1">
          <table:table-cell office:value-type="float" office:value="554.684692382813">
            <text:p>554.6846923828</text:p>
          </table:table-cell>
          <table:table-cell office:value-type="float" office:value="-0.004763332">
            <text:p>-0.004763332</text:p>
          </table:table-cell>
          <table:table-cell table:number-columns-repeated="4"/>
        </table:table-row>
        <table:table-row table:style-name="ro1">
          <table:table-cell office:value-type="float" office:value="554.802551269531">
            <text:p>554.8025512695</text:p>
          </table:table-cell>
          <table:table-cell office:value-type="float" office:value="-0.004474391">
            <text:p>-0.004474391</text:p>
          </table:table-cell>
          <table:table-cell table:number-columns-repeated="4"/>
        </table:table-row>
        <table:table-row table:style-name="ro1">
          <table:table-cell office:value-type="float" office:value="554.92041015625">
            <text:p>554.9204101563</text:p>
          </table:table-cell>
          <table:table-cell office:value-type="float" office:value="-0.005825037">
            <text:p>-0.005825037</text:p>
          </table:table-cell>
          <table:table-cell table:number-columns-repeated="4"/>
        </table:table-row>
        <table:table-row table:style-name="ro1">
          <table:table-cell office:value-type="float" office:value="555.038269042969">
            <text:p>555.038269043</text:p>
          </table:table-cell>
          <table:table-cell office:value-type="float" office:value="-0.0008434977">
            <text:p>-0.0008434977</text:p>
          </table:table-cell>
          <table:table-cell table:number-columns-repeated="4"/>
        </table:table-row>
        <table:table-row table:style-name="ro1">
          <table:table-cell office:value-type="float" office:value="555.156127929688">
            <text:p>555.1561279297</text:p>
          </table:table-cell>
          <table:table-cell office:value-type="float" office:value="-0.001268045">
            <text:p>-0.001268045</text:p>
          </table:table-cell>
          <table:table-cell table:number-columns-repeated="4"/>
        </table:table-row>
        <table:table-row table:style-name="ro1">
          <table:table-cell office:value-type="float" office:value="555.274047851563">
            <text:p>555.2740478516</text:p>
          </table:table-cell>
          <table:table-cell office:value-type="float" office:value="-0.0006996057">
            <text:p>-0.0006996057</text:p>
          </table:table-cell>
          <table:table-cell table:number-columns-repeated="4"/>
        </table:table-row>
        <table:table-row table:style-name="ro1">
          <table:table-cell office:value-type="float" office:value="555.391906738281">
            <text:p>555.3919067383</text:p>
          </table:table-cell>
          <table:table-cell office:value-type="float" office:value="0.002554773">
            <text:p>0.002554773</text:p>
          </table:table-cell>
          <table:table-cell table:number-columns-repeated="4"/>
        </table:table-row>
        <table:table-row table:style-name="ro1">
          <table:table-cell office:value-type="float" office:value="555.509765625">
            <text:p>555.509765625</text:p>
          </table:table-cell>
          <table:table-cell office:value-type="float" office:value="0.0008827266">
            <text:p>0.0008827266</text:p>
          </table:table-cell>
          <table:table-cell table:number-columns-repeated="4"/>
        </table:table-row>
        <table:table-row table:style-name="ro1">
          <table:table-cell office:value-type="float" office:value="555.627685546875">
            <text:p>555.6276855469</text:p>
          </table:table-cell>
          <table:table-cell office:value-type="float" office:value="0.007449271">
            <text:p>0.007449271</text:p>
          </table:table-cell>
          <table:table-cell table:number-columns-repeated="4"/>
        </table:table-row>
        <table:table-row table:style-name="ro1">
          <table:table-cell office:value-type="float" office:value="555.745544433594">
            <text:p>555.7455444336</text:p>
          </table:table-cell>
          <table:table-cell office:value-type="float" office:value="0.004325592">
            <text:p>0.004325592</text:p>
          </table:table-cell>
          <table:table-cell table:number-columns-repeated="4"/>
        </table:table-row>
        <table:table-row table:style-name="ro1">
          <table:table-cell office:value-type="float" office:value="555.863403320313">
            <text:p>555.8634033203</text:p>
          </table:table-cell>
          <table:table-cell office:value-type="float" office:value="-0.00547672">
            <text:p>-0.00547672</text:p>
          </table:table-cell>
          <table:table-cell table:number-columns-repeated="4"/>
        </table:table-row>
        <table:table-row table:style-name="ro1">
          <table:table-cell office:value-type="float" office:value="555.981323242188">
            <text:p>555.9813232422</text:p>
          </table:table-cell>
          <table:table-cell office:value-type="float" office:value="0.001335496">
            <text:p>0.001335496</text:p>
          </table:table-cell>
          <table:table-cell table:number-columns-repeated="4"/>
        </table:table-row>
        <table:table-row table:style-name="ro1">
          <table:table-cell office:value-type="float" office:value="556.099243164063">
            <text:p>556.0992431641</text:p>
          </table:table-cell>
          <table:table-cell office:value-type="float" office:value="-0.004327828">
            <text:p>-0.004327828</text:p>
          </table:table-cell>
          <table:table-cell table:number-columns-repeated="4"/>
        </table:table-row>
        <table:table-row table:style-name="ro1">
          <table:table-cell office:value-type="float" office:value="556.217102050781">
            <text:p>556.2171020508</text:p>
          </table:table-cell>
          <table:table-cell office:value-type="float" office:value="0.008162871">
            <text:p>0.008162871</text:p>
          </table:table-cell>
          <table:table-cell table:number-columns-repeated="4"/>
        </table:table-row>
        <table:table-row table:style-name="ro1">
          <table:table-cell office:value-type="float" office:value="556.335021972656">
            <text:p>556.3350219727</text:p>
          </table:table-cell>
          <table:table-cell office:value-type="float" office:value="0.009315418">
            <text:p>0.009315418</text:p>
          </table:table-cell>
          <table:table-cell table:number-columns-repeated="4"/>
        </table:table-row>
        <table:table-row table:style-name="ro1">
          <table:table-cell office:value-type="float" office:value="556.452941894531">
            <text:p>556.4529418945</text:p>
          </table:table-cell>
          <table:table-cell office:value-type="float" office:value="0.002694014">
            <text:p>0.002694014</text:p>
          </table:table-cell>
          <table:table-cell table:number-columns-repeated="4"/>
        </table:table-row>
        <table:table-row table:style-name="ro1">
          <table:table-cell office:value-type="float" office:value="556.57080078125">
            <text:p>556.5708007813</text:p>
          </table:table-cell>
          <table:table-cell office:value-type="float" office:value="0.001949944">
            <text:p>0.001949944</text:p>
          </table:table-cell>
          <table:table-cell table:number-columns-repeated="4"/>
        </table:table-row>
        <table:table-row table:style-name="ro1">
          <table:table-cell office:value-type="float" office:value="556.688720703125">
            <text:p>556.6887207031</text:p>
          </table:table-cell>
          <table:table-cell office:value-type="float" office:value="0.0005176856">
            <text:p>0.0005176856</text:p>
          </table:table-cell>
          <table:table-cell table:number-columns-repeated="4"/>
        </table:table-row>
        <table:table-row table:style-name="ro1">
          <table:table-cell office:value-type="float" office:value="556.806640625">
            <text:p>556.806640625</text:p>
          </table:table-cell>
          <table:table-cell office:value-type="float" office:value="0.0002701274">
            <text:p>0.0002701274</text:p>
          </table:table-cell>
          <table:table-cell table:number-columns-repeated="4"/>
        </table:table-row>
        <table:table-row table:style-name="ro1">
          <table:table-cell office:value-type="float" office:value="556.924560546875">
            <text:p>556.9245605469</text:p>
          </table:table-cell>
          <table:table-cell office:value-type="float" office:value="0.00586581">
            <text:p>0.00586581</text:p>
          </table:table-cell>
          <table:table-cell table:number-columns-repeated="4"/>
        </table:table-row>
        <table:table-row table:style-name="ro1">
          <table:table-cell office:value-type="float" office:value="557.04248046875">
            <text:p>557.0424804688</text:p>
          </table:table-cell>
          <table:table-cell office:value-type="float" office:value="0.0003297588">
            <text:p>0.0003297588</text:p>
          </table:table-cell>
          <table:table-cell table:number-columns-repeated="4"/>
        </table:table-row>
        <table:table-row table:style-name="ro1">
          <table:table-cell office:value-type="float" office:value="557.160400390625">
            <text:p>557.1604003906</text:p>
          </table:table-cell>
          <table:table-cell office:value-type="float" office:value="-0.004718232">
            <text:p>-0.004718232</text:p>
          </table:table-cell>
          <table:table-cell table:number-columns-repeated="4"/>
        </table:table-row>
        <table:table-row table:style-name="ro1">
          <table:table-cell office:value-type="float" office:value="557.2783203125">
            <text:p>557.2783203125</text:p>
          </table:table-cell>
          <table:table-cell office:value-type="float" office:value="0.01486246">
            <text:p>0.01486246</text:p>
          </table:table-cell>
          <table:table-cell table:number-columns-repeated="4"/>
        </table:table-row>
        <table:table-row table:style-name="ro1">
          <table:table-cell office:value-type="float" office:value="557.396240234375">
            <text:p>557.3962402344</text:p>
          </table:table-cell>
          <table:table-cell office:value-type="float" office:value="0.0008149464">
            <text:p>0.0008149464</text:p>
          </table:table-cell>
          <table:table-cell table:number-columns-repeated="4"/>
        </table:table-row>
        <table:table-row table:style-name="ro1">
          <table:table-cell office:value-type="float" office:value="557.51416015625">
            <text:p>557.5141601563</text:p>
          </table:table-cell>
          <table:table-cell office:value-type="float" office:value="-0.008019789">
            <text:p>-0.008019789</text:p>
          </table:table-cell>
          <table:table-cell table:number-columns-repeated="4"/>
        </table:table-row>
        <table:table-row table:style-name="ro1">
          <table:table-cell office:value-type="float" office:value="557.632141113281">
            <text:p>557.6321411133</text:p>
          </table:table-cell>
          <table:table-cell office:value-type="float" office:value="0.002420953">
            <text:p>0.002420953</text:p>
          </table:table-cell>
          <table:table-cell table:number-columns-repeated="4"/>
        </table:table-row>
        <table:table-row table:style-name="ro1">
          <table:table-cell office:value-type="float" office:value="557.750061035156">
            <text:p>557.7500610352</text:p>
          </table:table-cell>
          <table:table-cell office:value-type="float" office:value="-0.001730462">
            <text:p>-0.001730462</text:p>
          </table:table-cell>
          <table:table-cell table:number-columns-repeated="4"/>
        </table:table-row>
        <table:table-row table:style-name="ro1">
          <table:table-cell office:value-type="float" office:value="557.867980957031">
            <text:p>557.867980957</text:p>
          </table:table-cell>
          <table:table-cell office:value-type="float" office:value="0.00153663">
            <text:p>0.00153663</text:p>
          </table:table-cell>
          <table:table-cell table:number-columns-repeated="4"/>
        </table:table-row>
        <table:table-row table:style-name="ro1">
          <table:table-cell office:value-type="float" office:value="557.985961914063">
            <text:p>557.9859619141</text:p>
          </table:table-cell>
          <table:table-cell office:value-type="float" office:value="-0.00994073">
            <text:p>-0.00994073</text:p>
          </table:table-cell>
          <table:table-cell table:number-columns-repeated="4"/>
        </table:table-row>
        <table:table-row table:style-name="ro1">
          <table:table-cell office:value-type="float" office:value="558.103881835938">
            <text:p>558.1038818359</text:p>
          </table:table-cell>
          <table:table-cell office:value-type="float" office:value="-0.007103803">
            <text:p>-0.007103803</text:p>
          </table:table-cell>
          <table:table-cell table:number-columns-repeated="4"/>
        </table:table-row>
        <table:table-row table:style-name="ro1">
          <table:table-cell office:value-type="float" office:value="558.221801757813">
            <text:p>558.2218017578</text:p>
          </table:table-cell>
          <table:table-cell office:value-type="float" office:value="-0.002644551">
            <text:p>-0.002644551</text:p>
          </table:table-cell>
          <table:table-cell table:number-columns-repeated="4"/>
        </table:table-row>
        <table:table-row table:style-name="ro1">
          <table:table-cell office:value-type="float" office:value="558.339782714844">
            <text:p>558.3397827148</text:p>
          </table:table-cell>
          <table:table-cell office:value-type="float" office:value="0.006703396">
            <text:p>0.006703396</text:p>
          </table:table-cell>
          <table:table-cell table:number-columns-repeated="4"/>
        </table:table-row>
        <table:table-row table:style-name="ro1">
          <table:table-cell office:value-type="float" office:value="558.457702636719">
            <text:p>558.4577026367</text:p>
          </table:table-cell>
          <table:table-cell office:value-type="float" office:value="-0.00411939">
            <text:p>-0.00411939</text:p>
          </table:table-cell>
          <table:table-cell table:number-columns-repeated="4"/>
        </table:table-row>
        <table:table-row table:style-name="ro1">
          <table:table-cell office:value-type="float" office:value="558.57568359375">
            <text:p>558.5756835938</text:p>
          </table:table-cell>
          <table:table-cell office:value-type="float" office:value="-0.0001273362">
            <text:p>-0.0001273362</text:p>
          </table:table-cell>
          <table:table-cell table:number-columns-repeated="4"/>
        </table:table-row>
        <table:table-row table:style-name="ro1">
          <table:table-cell office:value-type="float" office:value="558.693664550781">
            <text:p>558.6936645508</text:p>
          </table:table-cell>
          <table:table-cell office:value-type="float" office:value="0.003906907">
            <text:p>0.003906907</text:p>
          </table:table-cell>
          <table:table-cell table:number-columns-repeated="4"/>
        </table:table-row>
        <table:table-row table:style-name="ro1">
          <table:table-cell office:value-type="float" office:value="558.811584472656">
            <text:p>558.8115844727</text:p>
          </table:table-cell>
          <table:table-cell office:value-type="float" office:value="0.005677859">
            <text:p>0.005677859</text:p>
          </table:table-cell>
          <table:table-cell table:number-columns-repeated="4"/>
        </table:table-row>
        <table:table-row table:style-name="ro1">
          <table:table-cell office:value-type="float" office:value="558.929565429688">
            <text:p>558.9295654297</text:p>
          </table:table-cell>
          <table:table-cell office:value-type="float" office:value="-0.00382745">
            <text:p>-0.00382745</text:p>
          </table:table-cell>
          <table:table-cell table:number-columns-repeated="4"/>
        </table:table-row>
        <table:table-row table:style-name="ro1">
          <table:table-cell office:value-type="float" office:value="559.047546386719">
            <text:p>559.0475463867</text:p>
          </table:table-cell>
          <table:table-cell office:value-type="float" office:value="0.001468824">
            <text:p>0.001468824</text:p>
          </table:table-cell>
          <table:table-cell table:number-columns-repeated="4"/>
        </table:table-row>
        <table:table-row table:style-name="ro1">
          <table:table-cell office:value-type="float" office:value="559.16552734375">
            <text:p>559.1655273438</text:p>
          </table:table-cell>
          <table:table-cell office:value-type="float" office:value="0.00143328">
            <text:p>0.00143328</text:p>
          </table:table-cell>
          <table:table-cell table:number-columns-repeated="4"/>
        </table:table-row>
        <table:table-row table:style-name="ro1">
          <table:table-cell office:value-type="float" office:value="559.283508300781">
            <text:p>559.2835083008</text:p>
          </table:table-cell>
          <table:table-cell office:value-type="float" office:value="-0.000881442">
            <text:p>-0.000881442</text:p>
          </table:table-cell>
          <table:table-cell table:number-columns-repeated="4"/>
        </table:table-row>
        <table:table-row table:style-name="ro1">
          <table:table-cell office:value-type="float" office:value="559.401489257813">
            <text:p>559.4014892578</text:p>
          </table:table-cell>
          <table:table-cell office:value-type="float" office:value="0.005334787">
            <text:p>0.005334787</text:p>
          </table:table-cell>
          <table:table-cell table:number-columns-repeated="4"/>
        </table:table-row>
        <table:table-row table:style-name="ro1">
          <table:table-cell office:value-type="float" office:value="559.519470214844">
            <text:p>559.5194702148</text:p>
          </table:table-cell>
          <table:table-cell office:value-type="float" office:value="-0.009498509">
            <text:p>-0.009498509</text:p>
          </table:table-cell>
          <table:table-cell table:number-columns-repeated="4"/>
        </table:table-row>
        <table:table-row table:style-name="ro1">
          <table:table-cell office:value-type="float" office:value="559.637451171875">
            <text:p>559.6374511719</text:p>
          </table:table-cell>
          <table:table-cell office:value-type="float" office:value="0.001662169">
            <text:p>0.001662169</text:p>
          </table:table-cell>
          <table:table-cell table:number-columns-repeated="4"/>
        </table:table-row>
        <table:table-row table:style-name="ro1">
          <table:table-cell office:value-type="float" office:value="559.755432128906">
            <text:p>559.7554321289</text:p>
          </table:table-cell>
          <table:table-cell office:value-type="float" office:value="0.007514605">
            <text:p>0.007514605</text:p>
          </table:table-cell>
          <table:table-cell table:number-columns-repeated="4"/>
        </table:table-row>
        <table:table-row table:style-name="ro1">
          <table:table-cell office:value-type="float" office:value="559.873413085938">
            <text:p>559.8734130859</text:p>
          </table:table-cell>
          <table:table-cell office:value-type="float" office:value="-0.001840642">
            <text:p>-0.001840642</text:p>
          </table:table-cell>
          <table:table-cell table:number-columns-repeated="4"/>
        </table:table-row>
        <table:table-row table:style-name="ro1">
          <table:table-cell office:value-type="float" office:value="559.991394042969">
            <text:p>559.991394043</text:p>
          </table:table-cell>
          <table:table-cell office:value-type="float" office:value="0.002325022">
            <text:p>0.002325022</text:p>
          </table:table-cell>
          <table:table-cell table:number-columns-repeated="4"/>
        </table:table-row>
        <table:table-row table:style-name="ro1">
          <table:table-cell office:value-type="float" office:value="560.109375">
            <text:p>560.109375</text:p>
          </table:table-cell>
          <table:table-cell office:value-type="float" office:value="0.004838862">
            <text:p>0.004838862</text:p>
          </table:table-cell>
          <table:table-cell table:number-columns-repeated="4"/>
        </table:table-row>
        <table:table-row table:style-name="ro1">
          <table:table-cell office:value-type="float" office:value="560.227416992188">
            <text:p>560.2274169922</text:p>
          </table:table-cell>
          <table:table-cell office:value-type="float" office:value="-0.001581785">
            <text:p>-0.001581785</text:p>
          </table:table-cell>
          <table:table-cell table:number-columns-repeated="4"/>
        </table:table-row>
        <table:table-row table:style-name="ro1">
          <table:table-cell office:value-type="float" office:value="560.345397949219">
            <text:p>560.3453979492</text:p>
          </table:table-cell>
          <table:table-cell office:value-type="float" office:value="-0.007732322">
            <text:p>-0.007732322</text:p>
          </table:table-cell>
          <table:table-cell table:number-columns-repeated="4"/>
        </table:table-row>
        <table:table-row table:style-name="ro1">
          <table:table-cell office:value-type="float" office:value="560.46337890625">
            <text:p>560.4633789063</text:p>
          </table:table-cell>
          <table:table-cell office:value-type="float" office:value="0.003850195">
            <text:p>0.003850195</text:p>
          </table:table-cell>
          <table:table-cell table:number-columns-repeated="4"/>
        </table:table-row>
        <table:table-row table:style-name="ro1">
          <table:table-cell office:value-type="float" office:value="560.581420898438">
            <text:p>560.5814208984</text:p>
          </table:table-cell>
          <table:table-cell office:value-type="float" office:value="0.02174265">
            <text:p>0.02174265</text:p>
          </table:table-cell>
          <table:table-cell table:number-columns-repeated="4"/>
        </table:table-row>
        <table:table-row table:style-name="ro1">
          <table:table-cell office:value-type="float" office:value="560.699401855469">
            <text:p>560.6994018555</text:p>
          </table:table-cell>
          <table:table-cell office:value-type="float" office:value="-0.006031958">
            <text:p>-0.006031958</text:p>
          </table:table-cell>
          <table:table-cell table:number-columns-repeated="4"/>
        </table:table-row>
        <table:table-row table:style-name="ro1">
          <table:table-cell office:value-type="float" office:value="560.817443847656">
            <text:p>560.8174438477</text:p>
          </table:table-cell>
          <table:table-cell office:value-type="float" office:value="-0.004520414">
            <text:p>-0.004520414</text:p>
          </table:table-cell>
          <table:table-cell table:number-columns-repeated="4"/>
        </table:table-row>
        <table:table-row table:style-name="ro1">
          <table:table-cell office:value-type="float" office:value="560.935424804688">
            <text:p>560.9354248047</text:p>
          </table:table-cell>
          <table:table-cell office:value-type="float" office:value="0.005073721">
            <text:p>0.005073721</text:p>
          </table:table-cell>
          <table:table-cell table:number-columns-repeated="4"/>
        </table:table-row>
        <table:table-row table:style-name="ro1">
          <table:table-cell office:value-type="float" office:value="561.053466796875">
            <text:p>561.0534667969</text:p>
          </table:table-cell>
          <table:table-cell office:value-type="float" office:value="-0.0005092752">
            <text:p>-0.0005092752</text:p>
          </table:table-cell>
          <table:table-cell table:number-columns-repeated="4"/>
        </table:table-row>
        <table:table-row table:style-name="ro1">
          <table:table-cell office:value-type="float" office:value="561.171508789063">
            <text:p>561.1715087891</text:p>
          </table:table-cell>
          <table:table-cell office:value-type="float" office:value="-0.003299959">
            <text:p>-0.003299959</text:p>
          </table:table-cell>
          <table:table-cell table:number-columns-repeated="4"/>
        </table:table-row>
        <table:table-row table:style-name="ro1">
          <table:table-cell office:value-type="float" office:value="561.289489746094">
            <text:p>561.2894897461</text:p>
          </table:table-cell>
          <table:table-cell office:value-type="float" office:value="0.005241655">
            <text:p>0.005241655</text:p>
          </table:table-cell>
          <table:table-cell table:number-columns-repeated="4"/>
        </table:table-row>
        <table:table-row table:style-name="ro1">
          <table:table-cell office:value-type="float" office:value="561.407531738281">
            <text:p>561.4075317383</text:p>
          </table:table-cell>
          <table:table-cell office:value-type="float" office:value="-0.002857919">
            <text:p>-0.002857919</text:p>
          </table:table-cell>
          <table:table-cell table:number-columns-repeated="4"/>
        </table:table-row>
        <table:table-row table:style-name="ro1">
          <table:table-cell office:value-type="float" office:value="561.525573730469">
            <text:p>561.5255737305</text:p>
          </table:table-cell>
          <table:table-cell office:value-type="float" office:value="0.01087099">
            <text:p>0.01087099</text:p>
          </table:table-cell>
          <table:table-cell table:number-columns-repeated="4"/>
        </table:table-row>
        <table:table-row table:style-name="ro1">
          <table:table-cell office:value-type="float" office:value="561.643615722656">
            <text:p>561.6436157227</text:p>
          </table:table-cell>
          <table:table-cell office:value-type="float" office:value="-0.003549787">
            <text:p>-0.003549787</text:p>
          </table:table-cell>
          <table:table-cell table:number-columns-repeated="4"/>
        </table:table-row>
        <table:table-row table:style-name="ro1">
          <table:table-cell office:value-type="float" office:value="561.761657714844">
            <text:p>561.7616577148</text:p>
          </table:table-cell>
          <table:table-cell office:value-type="float" office:value="-0.008321817">
            <text:p>-0.008321817</text:p>
          </table:table-cell>
          <table:table-cell table:number-columns-repeated="4"/>
        </table:table-row>
        <table:table-row table:style-name="ro1">
          <table:table-cell office:value-type="float" office:value="561.879699707031">
            <text:p>561.879699707</text:p>
          </table:table-cell>
          <table:table-cell office:value-type="float" office:value="0.008999454">
            <text:p>0.008999454</text:p>
          </table:table-cell>
          <table:table-cell table:number-columns-repeated="4"/>
        </table:table-row>
        <table:table-row table:style-name="ro1">
          <table:table-cell office:value-type="float" office:value="561.997741699219">
            <text:p>561.9977416992</text:p>
          </table:table-cell>
          <table:table-cell office:value-type="float" office:value="0.01694309">
            <text:p>0.01694309</text:p>
          </table:table-cell>
          <table:table-cell table:number-columns-repeated="4"/>
        </table:table-row>
        <table:table-row table:style-name="ro1">
          <table:table-cell office:value-type="float" office:value="562.115783691406">
            <text:p>562.1157836914</text:p>
          </table:table-cell>
          <table:table-cell office:value-type="float" office:value="-0.004738697">
            <text:p>-0.004738697</text:p>
          </table:table-cell>
          <table:table-cell table:number-columns-repeated="4"/>
        </table:table-row>
        <table:table-row table:style-name="ro1">
          <table:table-cell office:value-type="float" office:value="562.233825683594">
            <text:p>562.2338256836</text:p>
          </table:table-cell>
          <table:table-cell office:value-type="float" office:value="0.007644955">
            <text:p>0.007644955</text:p>
          </table:table-cell>
          <table:table-cell table:number-columns-repeated="4"/>
        </table:table-row>
        <table:table-row table:style-name="ro1">
          <table:table-cell office:value-type="float" office:value="562.351867675781">
            <text:p>562.3518676758</text:p>
          </table:table-cell>
          <table:table-cell office:value-type="float" office:value="0.004455969">
            <text:p>0.004455969</text:p>
          </table:table-cell>
          <table:table-cell table:number-columns-repeated="4"/>
        </table:table-row>
        <table:table-row table:style-name="ro1">
          <table:table-cell office:value-type="float" office:value="562.469909667969">
            <text:p>562.469909668</text:p>
          </table:table-cell>
          <table:table-cell office:value-type="float" office:value="0.003806331">
            <text:p>0.003806331</text:p>
          </table:table-cell>
          <table:table-cell table:number-columns-repeated="4"/>
        </table:table-row>
        <table:table-row table:style-name="ro1">
          <table:table-cell office:value-type="float" office:value="562.588012695313">
            <text:p>562.5880126953</text:p>
          </table:table-cell>
          <table:table-cell office:value-type="float" office:value="0.0009052055">
            <text:p>0.0009052055</text:p>
          </table:table-cell>
          <table:table-cell table:number-columns-repeated="4"/>
        </table:table-row>
        <table:table-row table:style-name="ro1">
          <table:table-cell office:value-type="float" office:value="562.7060546875">
            <text:p>562.7060546875</text:p>
          </table:table-cell>
          <table:table-cell office:value-type="float" office:value="-0.009622563">
            <text:p>-0.009622563</text:p>
          </table:table-cell>
          <table:table-cell table:number-columns-repeated="4"/>
        </table:table-row>
        <table:table-row table:style-name="ro1">
          <table:table-cell office:value-type="float" office:value="562.824096679688">
            <text:p>562.8240966797</text:p>
          </table:table-cell>
          <table:table-cell office:value-type="float" office:value="-0.00484927">
            <text:p>-0.00484927</text:p>
          </table:table-cell>
          <table:table-cell table:number-columns-repeated="4"/>
        </table:table-row>
        <table:table-row table:style-name="ro1">
          <table:table-cell office:value-type="float" office:value="562.942199707031">
            <text:p>562.942199707</text:p>
          </table:table-cell>
          <table:table-cell office:value-type="float" office:value="-0.005861079">
            <text:p>-0.005861079</text:p>
          </table:table-cell>
          <table:table-cell table:number-columns-repeated="4"/>
        </table:table-row>
        <table:table-row table:style-name="ro1">
          <table:table-cell office:value-type="float" office:value="563.060241699219">
            <text:p>563.0602416992</text:p>
          </table:table-cell>
          <table:table-cell office:value-type="float" office:value="0.002188812">
            <text:p>0.002188812</text:p>
          </table:table-cell>
          <table:table-cell table:number-columns-repeated="4"/>
        </table:table-row>
        <table:table-row table:style-name="ro1">
          <table:table-cell office:value-type="float" office:value="563.178344726563">
            <text:p>563.1783447266</text:p>
          </table:table-cell>
          <table:table-cell office:value-type="float" office:value="0.01205764">
            <text:p>0.01205764</text:p>
          </table:table-cell>
          <table:table-cell table:number-columns-repeated="4"/>
        </table:table-row>
        <table:table-row table:style-name="ro1">
          <table:table-cell office:value-type="float" office:value="563.29638671875">
            <text:p>563.2963867188</text:p>
          </table:table-cell>
          <table:table-cell office:value-type="float" office:value="-0.006854609">
            <text:p>-0.006854609</text:p>
          </table:table-cell>
          <table:table-cell table:number-columns-repeated="4"/>
        </table:table-row>
        <table:table-row table:style-name="ro1">
          <table:table-cell office:value-type="float" office:value="563.414489746094">
            <text:p>563.4144897461</text:p>
          </table:table-cell>
          <table:table-cell office:value-type="float" office:value="0.005186081">
            <text:p>0.005186081</text:p>
          </table:table-cell>
          <table:table-cell table:number-columns-repeated="4"/>
        </table:table-row>
        <table:table-row table:style-name="ro1">
          <table:table-cell office:value-type="float" office:value="563.532531738281">
            <text:p>563.5325317383</text:p>
          </table:table-cell>
          <table:table-cell office:value-type="float" office:value="0.01302559">
            <text:p>0.01302559</text:p>
          </table:table-cell>
          <table:table-cell table:number-columns-repeated="4"/>
        </table:table-row>
        <table:table-row table:style-name="ro1">
          <table:table-cell office:value-type="float" office:value="563.650634765625">
            <text:p>563.6506347656</text:p>
          </table:table-cell>
          <table:table-cell office:value-type="float" office:value="-0.004910944">
            <text:p>-0.004910944</text:p>
          </table:table-cell>
          <table:table-cell table:number-columns-repeated="4"/>
        </table:table-row>
        <table:table-row table:style-name="ro1">
          <table:table-cell office:value-type="float" office:value="563.768737792969">
            <text:p>563.768737793</text:p>
          </table:table-cell>
          <table:table-cell office:value-type="float" office:value="-0.004625401">
            <text:p>-0.004625401</text:p>
          </table:table-cell>
          <table:table-cell table:number-columns-repeated="4"/>
        </table:table-row>
        <table:table-row table:style-name="ro1">
          <table:table-cell office:value-type="float" office:value="563.886779785156">
            <text:p>563.8867797852</text:p>
          </table:table-cell>
          <table:table-cell office:value-type="float" office:value="0.002671518">
            <text:p>0.002671518</text:p>
          </table:table-cell>
          <table:table-cell table:number-columns-repeated="4"/>
        </table:table-row>
        <table:table-row table:style-name="ro1">
          <table:table-cell office:value-type="float" office:value="564.0048828125">
            <text:p>564.0048828125</text:p>
          </table:table-cell>
          <table:table-cell office:value-type="float" office:value="-0.004069417">
            <text:p>-0.004069417</text:p>
          </table:table-cell>
          <table:table-cell table:number-columns-repeated="4"/>
        </table:table-row>
        <table:table-row table:style-name="ro1">
          <table:table-cell office:value-type="float" office:value="564.122985839844">
            <text:p>564.1229858398</text:p>
          </table:table-cell>
          <table:table-cell office:value-type="float" office:value="-0.008095139">
            <text:p>-0.008095139</text:p>
          </table:table-cell>
          <table:table-cell table:number-columns-repeated="4"/>
        </table:table-row>
        <table:table-row table:style-name="ro1">
          <table:table-cell office:value-type="float" office:value="564.241088867188">
            <text:p>564.2410888672</text:p>
          </table:table-cell>
          <table:table-cell office:value-type="float" office:value="0.00906752">
            <text:p>0.00906752</text:p>
          </table:table-cell>
          <table:table-cell table:number-columns-repeated="4"/>
        </table:table-row>
        <table:table-row table:style-name="ro1">
          <table:table-cell office:value-type="float" office:value="564.359191894531">
            <text:p>564.3591918945</text:p>
          </table:table-cell>
          <table:table-cell office:value-type="float" office:value="0.007479591">
            <text:p>0.007479591</text:p>
          </table:table-cell>
          <table:table-cell table:number-columns-repeated="4"/>
        </table:table-row>
        <table:table-row table:style-name="ro1">
          <table:table-cell office:value-type="float" office:value="564.477294921875">
            <text:p>564.4772949219</text:p>
          </table:table-cell>
          <table:table-cell office:value-type="float" office:value="0.001583673">
            <text:p>0.001583673</text:p>
          </table:table-cell>
          <table:table-cell table:number-columns-repeated="4"/>
        </table:table-row>
        <table:table-row table:style-name="ro1">
          <table:table-cell office:value-type="float" office:value="564.595397949219">
            <text:p>564.5953979492</text:p>
          </table:table-cell>
          <table:table-cell office:value-type="float" office:value="0.00631486">
            <text:p>0.00631486</text:p>
          </table:table-cell>
          <table:table-cell table:number-columns-repeated="4"/>
        </table:table-row>
        <table:table-row table:style-name="ro1">
          <table:table-cell office:value-type="float" office:value="564.713500976563">
            <text:p>564.7135009766</text:p>
          </table:table-cell>
          <table:table-cell office:value-type="float" office:value="0.03365856">
            <text:p>0.03365856</text:p>
          </table:table-cell>
          <table:table-cell table:number-columns-repeated="4"/>
        </table:table-row>
        <table:table-row table:style-name="ro1">
          <table:table-cell office:value-type="float" office:value="564.831604003906">
            <text:p>564.8316040039</text:p>
          </table:table-cell>
          <table:table-cell office:value-type="float" office:value="0.002358776">
            <text:p>0.002358776</text:p>
          </table:table-cell>
          <table:table-cell table:number-columns-repeated="4"/>
        </table:table-row>
        <table:table-row table:style-name="ro1">
          <table:table-cell office:value-type="float" office:value="564.949768066406">
            <text:p>564.9497680664</text:p>
          </table:table-cell>
          <table:table-cell office:value-type="float" office:value="0.003514505">
            <text:p>0.003514505</text:p>
          </table:table-cell>
          <table:table-cell table:number-columns-repeated="4"/>
        </table:table-row>
        <table:table-row table:style-name="ro1">
          <table:table-cell office:value-type="float" office:value="565.06787109375">
            <text:p>565.0678710938</text:p>
          </table:table-cell>
          <table:table-cell office:value-type="float" office:value="0.009228157">
            <text:p>0.009228157</text:p>
          </table:table-cell>
          <table:table-cell table:number-columns-repeated="4"/>
        </table:table-row>
        <table:table-row table:style-name="ro1">
          <table:table-cell office:value-type="float" office:value="565.185974121094">
            <text:p>565.1859741211</text:p>
          </table:table-cell>
          <table:table-cell office:value-type="float" office:value="0.005184528">
            <text:p>0.005184528</text:p>
          </table:table-cell>
          <table:table-cell table:number-columns-repeated="4"/>
        </table:table-row>
        <table:table-row table:style-name="ro1">
          <table:table-cell office:value-type="float" office:value="565.304077148438">
            <text:p>565.3040771484</text:p>
          </table:table-cell>
          <table:table-cell office:value-type="float" office:value="-0.006101802">
            <text:p>-0.006101802</text:p>
          </table:table-cell>
          <table:table-cell table:number-columns-repeated="4"/>
        </table:table-row>
        <table:table-row table:style-name="ro1">
          <table:table-cell office:value-type="float" office:value="565.422241210938">
            <text:p>565.4222412109</text:p>
          </table:table-cell>
          <table:table-cell office:value-type="float" office:value="0.001257455">
            <text:p>0.001257455</text:p>
          </table:table-cell>
          <table:table-cell table:number-columns-repeated="4"/>
        </table:table-row>
        <table:table-row table:style-name="ro1">
          <table:table-cell office:value-type="float" office:value="565.540344238281">
            <text:p>565.5403442383</text:p>
          </table:table-cell>
          <table:table-cell office:value-type="float" office:value="-0.003930812">
            <text:p>-0.003930812</text:p>
          </table:table-cell>
          <table:table-cell table:number-columns-repeated="4"/>
        </table:table-row>
        <table:table-row table:style-name="ro1">
          <table:table-cell office:value-type="float" office:value="565.658508300781">
            <text:p>565.6585083008</text:p>
          </table:table-cell>
          <table:table-cell office:value-type="float" office:value="0.007192933">
            <text:p>0.007192933</text:p>
          </table:table-cell>
          <table:table-cell table:number-columns-repeated="4"/>
        </table:table-row>
        <table:table-row table:style-name="ro1">
          <table:table-cell office:value-type="float" office:value="565.776611328125">
            <text:p>565.7766113281</text:p>
          </table:table-cell>
          <table:table-cell office:value-type="float" office:value="0.003711606">
            <text:p>0.003711606</text:p>
          </table:table-cell>
          <table:table-cell table:number-columns-repeated="4"/>
        </table:table-row>
        <table:table-row table:style-name="ro1">
          <table:table-cell office:value-type="float" office:value="565.894775390625">
            <text:p>565.8947753906</text:p>
          </table:table-cell>
          <table:table-cell office:value-type="float" office:value="0.01420164">
            <text:p>0.01420164</text:p>
          </table:table-cell>
          <table:table-cell table:number-columns-repeated="4"/>
        </table:table-row>
        <table:table-row table:style-name="ro1">
          <table:table-cell office:value-type="float" office:value="566.012878417969">
            <text:p>566.012878418</text:p>
          </table:table-cell>
          <table:table-cell office:value-type="float" office:value="0.004530012">
            <text:p>0.004530012</text:p>
          </table:table-cell>
          <table:table-cell table:number-columns-repeated="4"/>
        </table:table-row>
        <table:table-row table:style-name="ro1">
          <table:table-cell office:value-type="float" office:value="566.131042480469">
            <text:p>566.1310424805</text:p>
          </table:table-cell>
          <table:table-cell office:value-type="float" office:value="0.00310672">
            <text:p>0.00310672</text:p>
          </table:table-cell>
          <table:table-cell table:number-columns-repeated="4"/>
        </table:table-row>
        <table:table-row table:style-name="ro1">
          <table:table-cell office:value-type="float" office:value="566.249206542969">
            <text:p>566.249206543</text:p>
          </table:table-cell>
          <table:table-cell office:value-type="float" office:value="0.005173945">
            <text:p>0.005173945</text:p>
          </table:table-cell>
          <table:table-cell table:number-columns-repeated="4"/>
        </table:table-row>
        <table:table-row table:style-name="ro1">
          <table:table-cell office:value-type="float" office:value="566.367370605469">
            <text:p>566.3673706055</text:p>
          </table:table-cell>
          <table:table-cell office:value-type="float" office:value="0.007457191">
            <text:p>0.007457191</text:p>
          </table:table-cell>
          <table:table-cell table:number-columns-repeated="4"/>
        </table:table-row>
        <table:table-row table:style-name="ro1">
          <table:table-cell office:value-type="float" office:value="566.485473632813">
            <text:p>566.4854736328</text:p>
          </table:table-cell>
          <table:table-cell office:value-type="float" office:value="-0.003018335">
            <text:p>-0.003018335</text:p>
          </table:table-cell>
          <table:table-cell table:number-columns-repeated="4"/>
        </table:table-row>
        <table:table-row table:style-name="ro1">
          <table:table-cell office:value-type="float" office:value="566.603637695313">
            <text:p>566.6036376953</text:p>
          </table:table-cell>
          <table:table-cell office:value-type="float" office:value="0.01884794">
            <text:p>0.01884794</text:p>
          </table:table-cell>
          <table:table-cell table:number-columns-repeated="4"/>
        </table:table-row>
        <table:table-row table:style-name="ro1">
          <table:table-cell office:value-type="float" office:value="566.721801757813">
            <text:p>566.7218017578</text:p>
          </table:table-cell>
          <table:table-cell office:value-type="float" office:value="0.007894679">
            <text:p>0.007894679</text:p>
          </table:table-cell>
          <table:table-cell table:number-columns-repeated="4"/>
        </table:table-row>
        <table:table-row table:style-name="ro1">
          <table:table-cell office:value-type="float" office:value="566.839965820313">
            <text:p>566.8399658203</text:p>
          </table:table-cell>
          <table:table-cell office:value-type="float" office:value="0.001464893">
            <text:p>0.001464893</text:p>
          </table:table-cell>
          <table:table-cell table:number-columns-repeated="4"/>
        </table:table-row>
        <table:table-row table:style-name="ro1">
          <table:table-cell office:value-type="float" office:value="566.958129882813">
            <text:p>566.9581298828</text:p>
          </table:table-cell>
          <table:table-cell office:value-type="float" office:value="0.00918952">
            <text:p>0.00918952</text:p>
          </table:table-cell>
          <table:table-cell table:number-columns-repeated="4"/>
        </table:table-row>
        <table:table-row table:style-name="ro1">
          <table:table-cell office:value-type="float" office:value="567.076293945313">
            <text:p>567.0762939453</text:p>
          </table:table-cell>
          <table:table-cell office:value-type="float" office:value="0.02184228">
            <text:p>0.02184228</text:p>
          </table:table-cell>
          <table:table-cell table:number-columns-repeated="4"/>
        </table:table-row>
        <table:table-row table:style-name="ro1">
          <table:table-cell office:value-type="float" office:value="567.194458007813">
            <text:p>567.1944580078</text:p>
          </table:table-cell>
          <table:table-cell office:value-type="float" office:value="0.01339031">
            <text:p>0.01339031</text:p>
          </table:table-cell>
          <table:table-cell table:number-columns-repeated="4"/>
        </table:table-row>
        <table:table-row table:style-name="ro1">
          <table:table-cell office:value-type="float" office:value="567.312622070313">
            <text:p>567.3126220703</text:p>
          </table:table-cell>
          <table:table-cell office:value-type="float" office:value="0.007552774">
            <text:p>0.007552774</text:p>
          </table:table-cell>
          <table:table-cell table:number-columns-repeated="4"/>
        </table:table-row>
        <table:table-row table:style-name="ro1">
          <table:table-cell office:value-type="float" office:value="567.430847167969">
            <text:p>567.430847168</text:p>
          </table:table-cell>
          <table:table-cell office:value-type="float" office:value="0.002252995">
            <text:p>0.002252995</text:p>
          </table:table-cell>
          <table:table-cell table:number-columns-repeated="4"/>
        </table:table-row>
        <table:table-row table:style-name="ro1">
          <table:table-cell office:value-type="float" office:value="567.549011230469">
            <text:p>567.5490112305</text:p>
          </table:table-cell>
          <table:table-cell office:value-type="float" office:value="0.01594688">
            <text:p>0.01594688</text:p>
          </table:table-cell>
          <table:table-cell table:number-columns-repeated="4"/>
        </table:table-row>
        <table:table-row table:style-name="ro1">
          <table:table-cell office:value-type="float" office:value="567.667175292969">
            <text:p>567.667175293</text:p>
          </table:table-cell>
          <table:table-cell office:value-type="float" office:value="0.008814855">
            <text:p>0.008814855</text:p>
          </table:table-cell>
          <table:table-cell table:number-columns-repeated="4"/>
        </table:table-row>
        <table:table-row table:style-name="ro1">
          <table:table-cell office:value-type="float" office:value="567.785339355469">
            <text:p>567.7853393555</text:p>
          </table:table-cell>
          <table:table-cell office:value-type="float" office:value="0.0109812">
            <text:p>0.0109812</text:p>
          </table:table-cell>
          <table:table-cell table:number-columns-repeated="4"/>
        </table:table-row>
        <table:table-row table:style-name="ro1">
          <table:table-cell office:value-type="float" office:value="567.903564453125">
            <text:p>567.9035644531</text:p>
          </table:table-cell>
          <table:table-cell office:value-type="float" office:value="0.003224174">
            <text:p>0.003224174</text:p>
          </table:table-cell>
          <table:table-cell table:number-columns-repeated="4"/>
        </table:table-row>
        <table:table-row table:style-name="ro1">
          <table:table-cell office:value-type="float" office:value="568.021728515625">
            <text:p>568.0217285156</text:p>
          </table:table-cell>
          <table:table-cell office:value-type="float" office:value="0.02872482">
            <text:p>0.02872482</text:p>
          </table:table-cell>
          <table:table-cell table:number-columns-repeated="4"/>
        </table:table-row>
        <table:table-row table:style-name="ro1">
          <table:table-cell office:value-type="float" office:value="568.139953613281">
            <text:p>568.1399536133</text:p>
          </table:table-cell>
          <table:table-cell office:value-type="float" office:value="0.03072432">
            <text:p>0.03072432</text:p>
          </table:table-cell>
          <table:table-cell table:number-columns-repeated="4"/>
        </table:table-row>
        <table:table-row table:style-name="ro1">
          <table:table-cell office:value-type="float" office:value="568.258117675781">
            <text:p>568.2581176758</text:p>
          </table:table-cell>
          <table:table-cell office:value-type="float" office:value="-0.000734726">
            <text:p>-0.000734726</text:p>
          </table:table-cell>
          <table:table-cell table:number-columns-repeated="4"/>
        </table:table-row>
        <table:table-row table:style-name="ro1">
          <table:table-cell office:value-type="float" office:value="568.376342773438">
            <text:p>568.3763427734</text:p>
          </table:table-cell>
          <table:table-cell office:value-type="float" office:value="0.004605775">
            <text:p>0.004605775</text:p>
          </table:table-cell>
          <table:table-cell table:number-columns-repeated="4"/>
        </table:table-row>
        <table:table-row table:style-name="ro1">
          <table:table-cell office:value-type="float" office:value="568.494506835938">
            <text:p>568.4945068359</text:p>
          </table:table-cell>
          <table:table-cell office:value-type="float" office:value="0.015197">
            <text:p>0.015197</text:p>
          </table:table-cell>
          <table:table-cell table:number-columns-repeated="4"/>
        </table:table-row>
        <table:table-row table:style-name="ro1">
          <table:table-cell office:value-type="float" office:value="568.612731933594">
            <text:p>568.6127319336</text:p>
          </table:table-cell>
          <table:table-cell office:value-type="float" office:value="0.01580719">
            <text:p>0.01580719</text:p>
          </table:table-cell>
          <table:table-cell table:number-columns-repeated="4"/>
        </table:table-row>
        <table:table-row table:style-name="ro1">
          <table:table-cell office:value-type="float" office:value="568.73095703125">
            <text:p>568.7309570313</text:p>
          </table:table-cell>
          <table:table-cell office:value-type="float" office:value="-0.005097935">
            <text:p>-0.005097935</text:p>
          </table:table-cell>
          <table:table-cell table:number-columns-repeated="4"/>
        </table:table-row>
        <table:table-row table:style-name="ro1">
          <table:table-cell office:value-type="float" office:value="568.84912109375">
            <text:p>568.8491210938</text:p>
          </table:table-cell>
          <table:table-cell office:value-type="float" office:value="0.0111774">
            <text:p>0.0111774</text:p>
          </table:table-cell>
          <table:table-cell table:number-columns-repeated="4"/>
        </table:table-row>
        <table:table-row table:style-name="ro1">
          <table:table-cell office:value-type="float" office:value="568.967346191406">
            <text:p>568.9673461914</text:p>
          </table:table-cell>
          <table:table-cell office:value-type="float" office:value="0.01335262">
            <text:p>0.01335262</text:p>
          </table:table-cell>
          <table:table-cell table:number-columns-repeated="4"/>
        </table:table-row>
        <table:table-row table:style-name="ro1">
          <table:table-cell office:value-type="float" office:value="569.085571289063">
            <text:p>569.0855712891</text:p>
          </table:table-cell>
          <table:table-cell office:value-type="float" office:value="0.02572207">
            <text:p>0.02572207</text:p>
          </table:table-cell>
          <table:table-cell table:number-columns-repeated="4"/>
        </table:table-row>
        <table:table-row table:style-name="ro1">
          <table:table-cell office:value-type="float" office:value="569.203796386719">
            <text:p>569.2037963867</text:p>
          </table:table-cell>
          <table:table-cell office:value-type="float" office:value="-0.003385564">
            <text:p>-0.003385564</text:p>
          </table:table-cell>
          <table:table-cell table:number-columns-repeated="4"/>
        </table:table-row>
        <table:table-row table:style-name="ro1">
          <table:table-cell office:value-type="float" office:value="569.322021484375">
            <text:p>569.3220214844</text:p>
          </table:table-cell>
          <table:table-cell office:value-type="float" office:value="0.008948199">
            <text:p>0.008948199</text:p>
          </table:table-cell>
          <table:table-cell table:number-columns-repeated="4"/>
        </table:table-row>
        <table:table-row table:style-name="ro1">
          <table:table-cell office:value-type="float" office:value="569.440246582031">
            <text:p>569.440246582</text:p>
          </table:table-cell>
          <table:table-cell office:value-type="float" office:value="0.009252636">
            <text:p>0.009252636</text:p>
          </table:table-cell>
          <table:table-cell table:number-columns-repeated="4"/>
        </table:table-row>
        <table:table-row table:style-name="ro1">
          <table:table-cell office:value-type="float" office:value="569.558471679688">
            <text:p>569.5584716797</text:p>
          </table:table-cell>
          <table:table-cell office:value-type="float" office:value="0.01666322">
            <text:p>0.01666322</text:p>
          </table:table-cell>
          <table:table-cell table:number-columns-repeated="4"/>
        </table:table-row>
        <table:table-row table:style-name="ro1">
          <table:table-cell office:value-type="float" office:value="569.676696777344">
            <text:p>569.6766967773</text:p>
          </table:table-cell>
          <table:table-cell office:value-type="float" office:value="0.01022512">
            <text:p>0.01022512</text:p>
          </table:table-cell>
          <table:table-cell table:number-columns-repeated="4"/>
        </table:table-row>
        <table:table-row table:style-name="ro1">
          <table:table-cell office:value-type="float" office:value="569.794921875">
            <text:p>569.794921875</text:p>
          </table:table-cell>
          <table:table-cell office:value-type="float" office:value="-0.0002703261">
            <text:p>-0.0002703261</text:p>
          </table:table-cell>
          <table:table-cell table:number-columns-repeated="4"/>
        </table:table-row>
        <table:table-row table:style-name="ro1">
          <table:table-cell office:value-type="float" office:value="569.913146972656">
            <text:p>569.9131469727</text:p>
          </table:table-cell>
          <table:table-cell office:value-type="float" office:value="-0.001818506">
            <text:p>-0.001818506</text:p>
          </table:table-cell>
          <table:table-cell table:number-columns-repeated="4"/>
        </table:table-row>
        <table:table-row table:style-name="ro1">
          <table:table-cell office:value-type="float" office:value="570.031372070313">
            <text:p>570.0313720703</text:p>
          </table:table-cell>
          <table:table-cell office:value-type="float" office:value="0.00536371">
            <text:p>0.00536371</text:p>
          </table:table-cell>
          <table:table-cell table:number-columns-repeated="4"/>
        </table:table-row>
        <table:table-row table:style-name="ro1">
          <table:table-cell office:value-type="float" office:value="570.149597167969">
            <text:p>570.149597168</text:p>
          </table:table-cell>
          <table:table-cell office:value-type="float" office:value="0.007052244">
            <text:p>0.007052244</text:p>
          </table:table-cell>
          <table:table-cell table:number-columns-repeated="4"/>
        </table:table-row>
        <table:table-row table:style-name="ro1">
          <table:table-cell office:value-type="float" office:value="570.267883300781">
            <text:p>570.2678833008</text:p>
          </table:table-cell>
          <table:table-cell office:value-type="float" office:value="-0.004825558">
            <text:p>-0.004825558</text:p>
          </table:table-cell>
          <table:table-cell table:number-columns-repeated="4"/>
        </table:table-row>
        <table:table-row table:style-name="ro1">
          <table:table-cell office:value-type="float" office:value="570.386108398438">
            <text:p>570.3861083984</text:p>
          </table:table-cell>
          <table:table-cell office:value-type="float" office:value="0.00682272">
            <text:p>0.00682272</text:p>
          </table:table-cell>
          <table:table-cell table:number-columns-repeated="4"/>
        </table:table-row>
        <table:table-row table:style-name="ro1">
          <table:table-cell office:value-type="float" office:value="570.504333496094">
            <text:p>570.5043334961</text:p>
          </table:table-cell>
          <table:table-cell office:value-type="float" office:value="0.0181697">
            <text:p>0.0181697</text:p>
          </table:table-cell>
          <table:table-cell table:number-columns-repeated="4"/>
        </table:table-row>
        <table:table-row table:style-name="ro1">
          <table:table-cell office:value-type="float" office:value="570.622619628906">
            <text:p>570.6226196289</text:p>
          </table:table-cell>
          <table:table-cell office:value-type="float" office:value="0.02080901">
            <text:p>0.02080901</text:p>
          </table:table-cell>
          <table:table-cell table:number-columns-repeated="4"/>
        </table:table-row>
        <table:table-row table:style-name="ro1">
          <table:table-cell office:value-type="float" office:value="570.740844726563">
            <text:p>570.7408447266</text:p>
          </table:table-cell>
          <table:table-cell office:value-type="float" office:value="0.005353363">
            <text:p>0.005353363</text:p>
          </table:table-cell>
          <table:table-cell table:number-columns-repeated="4"/>
        </table:table-row>
        <table:table-row table:style-name="ro1">
          <table:table-cell office:value-type="float" office:value="570.859130859375">
            <text:p>570.8591308594</text:p>
          </table:table-cell>
          <table:table-cell office:value-type="float" office:value="0.002254521">
            <text:p>0.002254521</text:p>
          </table:table-cell>
          <table:table-cell table:number-columns-repeated="4"/>
        </table:table-row>
        <table:table-row table:style-name="ro1">
          <table:table-cell office:value-type="float" office:value="570.977355957031">
            <text:p>570.977355957</text:p>
          </table:table-cell>
          <table:table-cell office:value-type="float" office:value="0.01067059">
            <text:p>0.01067059</text:p>
          </table:table-cell>
          <table:table-cell table:number-columns-repeated="4"/>
        </table:table-row>
        <table:table-row table:style-name="ro1">
          <table:table-cell office:value-type="float" office:value="571.095642089844">
            <text:p>571.0956420898</text:p>
          </table:table-cell>
          <table:table-cell office:value-type="float" office:value="0.000973351">
            <text:p>0.000973351</text:p>
          </table:table-cell>
          <table:table-cell table:number-columns-repeated="4"/>
        </table:table-row>
        <table:table-row table:style-name="ro1">
          <table:table-cell office:value-type="float" office:value="571.213928222656">
            <text:p>571.2139282227</text:p>
          </table:table-cell>
          <table:table-cell office:value-type="float" office:value="0.008911104">
            <text:p>0.008911104</text:p>
          </table:table-cell>
          <table:table-cell table:number-columns-repeated="4"/>
        </table:table-row>
        <table:table-row table:style-name="ro1">
          <table:table-cell office:value-type="float" office:value="571.332153320313">
            <text:p>571.3321533203</text:p>
          </table:table-cell>
          <table:table-cell office:value-type="float" office:value="0.01118596">
            <text:p>0.01118596</text:p>
          </table:table-cell>
          <table:table-cell table:number-columns-repeated="4"/>
        </table:table-row>
        <table:table-row table:style-name="ro1">
          <table:table-cell office:value-type="float" office:value="571.450439453125">
            <text:p>571.4504394531</text:p>
          </table:table-cell>
          <table:table-cell office:value-type="float" office:value="0.008854824">
            <text:p>0.008854824</text:p>
          </table:table-cell>
          <table:table-cell table:number-columns-repeated="4"/>
        </table:table-row>
        <table:table-row table:style-name="ro1">
          <table:table-cell office:value-type="float" office:value="571.568725585938">
            <text:p>571.5687255859</text:p>
          </table:table-cell>
          <table:table-cell office:value-type="float" office:value="-0.001208188">
            <text:p>-0.001208188</text:p>
          </table:table-cell>
          <table:table-cell table:number-columns-repeated="4"/>
        </table:table-row>
        <table:table-row table:style-name="ro1">
          <table:table-cell office:value-type="float" office:value="571.68701171875">
            <text:p>571.6870117188</text:p>
          </table:table-cell>
          <table:table-cell office:value-type="float" office:value="0.01501185">
            <text:p>0.01501185</text:p>
          </table:table-cell>
          <table:table-cell table:number-columns-repeated="4"/>
        </table:table-row>
        <table:table-row table:style-name="ro1">
          <table:table-cell office:value-type="float" office:value="571.805297851563">
            <text:p>571.8052978516</text:p>
          </table:table-cell>
          <table:table-cell office:value-type="float" office:value="0.004527583">
            <text:p>0.004527583</text:p>
          </table:table-cell>
          <table:table-cell table:number-columns-repeated="4"/>
        </table:table-row>
        <table:table-row table:style-name="ro1">
          <table:table-cell office:value-type="float" office:value="571.923583984375">
            <text:p>571.9235839844</text:p>
          </table:table-cell>
          <table:table-cell office:value-type="float" office:value="0.02557475">
            <text:p>0.02557475</text:p>
          </table:table-cell>
          <table:table-cell table:number-columns-repeated="4"/>
        </table:table-row>
        <table:table-row table:style-name="ro1">
          <table:table-cell office:value-type="float" office:value="572.041870117188">
            <text:p>572.0418701172</text:p>
          </table:table-cell>
          <table:table-cell office:value-type="float" office:value="0.006934643">
            <text:p>0.006934643</text:p>
          </table:table-cell>
          <table:table-cell table:number-columns-repeated="4"/>
        </table:table-row>
        <table:table-row table:style-name="ro1">
          <table:table-cell office:value-type="float" office:value="572.16015625">
            <text:p>572.16015625</text:p>
          </table:table-cell>
          <table:table-cell office:value-type="float" office:value="0.01686359">
            <text:p>0.01686359</text:p>
          </table:table-cell>
          <table:table-cell table:number-columns-repeated="4"/>
        </table:table-row>
        <table:table-row table:style-name="ro1">
          <table:table-cell office:value-type="float" office:value="572.278442382813">
            <text:p>572.2784423828</text:p>
          </table:table-cell>
          <table:table-cell office:value-type="float" office:value="0.004807181">
            <text:p>0.004807181</text:p>
          </table:table-cell>
          <table:table-cell table:number-columns-repeated="4"/>
        </table:table-row>
        <table:table-row table:style-name="ro1">
          <table:table-cell office:value-type="float" office:value="572.396728515625">
            <text:p>572.3967285156</text:p>
          </table:table-cell>
          <table:table-cell office:value-type="float" office:value="0.004396308">
            <text:p>0.004396308</text:p>
          </table:table-cell>
          <table:table-cell table:number-columns-repeated="4"/>
        </table:table-row>
        <table:table-row table:style-name="ro1">
          <table:table-cell office:value-type="float" office:value="572.515014648438">
            <text:p>572.5150146484</text:p>
          </table:table-cell>
          <table:table-cell office:value-type="float" office:value="0.001773702">
            <text:p>0.001773702</text:p>
          </table:table-cell>
          <table:table-cell table:number-columns-repeated="4"/>
        </table:table-row>
        <table:table-row table:style-name="ro1">
          <table:table-cell office:value-type="float" office:value="572.63330078125">
            <text:p>572.6333007813</text:p>
          </table:table-cell>
          <table:table-cell office:value-type="float" office:value="0.006925827">
            <text:p>0.006925827</text:p>
          </table:table-cell>
          <table:table-cell table:number-columns-repeated="4"/>
        </table:table-row>
        <table:table-row table:style-name="ro1">
          <table:table-cell office:value-type="float" office:value="572.751586914063">
            <text:p>572.7515869141</text:p>
          </table:table-cell>
          <table:table-cell office:value-type="float" office:value="0.01572285">
            <text:p>0.01572285</text:p>
          </table:table-cell>
          <table:table-cell table:number-columns-repeated="4"/>
        </table:table-row>
        <table:table-row table:style-name="ro1">
          <table:table-cell office:value-type="float" office:value="572.869934082031">
            <text:p>572.869934082</text:p>
          </table:table-cell>
          <table:table-cell office:value-type="float" office:value="0.003287853">
            <text:p>0.003287853</text:p>
          </table:table-cell>
          <table:table-cell table:number-columns-repeated="4"/>
        </table:table-row>
        <table:table-row table:style-name="ro1">
          <table:table-cell office:value-type="float" office:value="572.988220214844">
            <text:p>572.9882202148</text:p>
          </table:table-cell>
          <table:table-cell office:value-type="float" office:value="0.002719042">
            <text:p>0.002719042</text:p>
          </table:table-cell>
          <table:table-cell table:number-columns-repeated="4"/>
        </table:table-row>
        <table:table-row table:style-name="ro1">
          <table:table-cell office:value-type="float" office:value="573.106506347656">
            <text:p>573.1065063477</text:p>
          </table:table-cell>
          <table:table-cell office:value-type="float" office:value="0.01496624">
            <text:p>0.01496624</text:p>
          </table:table-cell>
          <table:table-cell table:number-columns-repeated="4"/>
        </table:table-row>
        <table:table-row table:style-name="ro1">
          <table:table-cell office:value-type="float" office:value="573.224853515625">
            <text:p>573.2248535156</text:p>
          </table:table-cell>
          <table:table-cell office:value-type="float" office:value="0.008267465">
            <text:p>0.008267465</text:p>
          </table:table-cell>
          <table:table-cell table:number-columns-repeated="4"/>
        </table:table-row>
        <table:table-row table:style-name="ro1">
          <table:table-cell office:value-type="float" office:value="573.343139648438">
            <text:p>573.3431396484</text:p>
          </table:table-cell>
          <table:table-cell office:value-type="float" office:value="0.009644401">
            <text:p>0.009644401</text:p>
          </table:table-cell>
          <table:table-cell table:number-columns-repeated="4"/>
        </table:table-row>
        <table:table-row table:style-name="ro1">
          <table:table-cell office:value-type="float" office:value="573.461486816406">
            <text:p>573.4614868164</text:p>
          </table:table-cell>
          <table:table-cell office:value-type="float" office:value="0.01798431">
            <text:p>0.01798431</text:p>
          </table:table-cell>
          <table:table-cell table:number-columns-repeated="4"/>
        </table:table-row>
        <table:table-row table:style-name="ro1">
          <table:table-cell office:value-type="float" office:value="573.579772949219">
            <text:p>573.5797729492</text:p>
          </table:table-cell>
          <table:table-cell office:value-type="float" office:value="0.007656906">
            <text:p>0.007656906</text:p>
          </table:table-cell>
          <table:table-cell table:number-columns-repeated="4"/>
        </table:table-row>
        <table:table-row table:style-name="ro1">
          <table:table-cell office:value-type="float" office:value="573.698120117188">
            <text:p>573.6981201172</text:p>
          </table:table-cell>
          <table:table-cell office:value-type="float" office:value="0.01354391">
            <text:p>0.01354391</text:p>
          </table:table-cell>
          <table:table-cell table:number-columns-repeated="4"/>
        </table:table-row>
        <table:table-row table:style-name="ro1">
          <table:table-cell office:value-type="float" office:value="573.81640625">
            <text:p>573.81640625</text:p>
          </table:table-cell>
          <table:table-cell office:value-type="float" office:value="0.006442624">
            <text:p>0.006442624</text:p>
          </table:table-cell>
          <table:table-cell table:number-columns-repeated="4"/>
        </table:table-row>
        <table:table-row table:style-name="ro1">
          <table:table-cell office:value-type="float" office:value="573.934753417969">
            <text:p>573.934753418</text:p>
          </table:table-cell>
          <table:table-cell office:value-type="float" office:value="0.009730147">
            <text:p>0.009730147</text:p>
          </table:table-cell>
          <table:table-cell table:number-columns-repeated="4"/>
        </table:table-row>
        <table:table-row table:style-name="ro1">
          <table:table-cell office:value-type="float" office:value="574.053100585938">
            <text:p>574.0531005859</text:p>
          </table:table-cell>
          <table:table-cell office:value-type="float" office:value="0.007302375">
            <text:p>0.007302375</text:p>
          </table:table-cell>
          <table:table-cell table:number-columns-repeated="4"/>
        </table:table-row>
        <table:table-row table:style-name="ro1">
          <table:table-cell office:value-type="float" office:value="574.171447753906">
            <text:p>574.1714477539</text:p>
          </table:table-cell>
          <table:table-cell office:value-type="float" office:value="0.008302222">
            <text:p>0.008302222</text:p>
          </table:table-cell>
          <table:table-cell table:number-columns-repeated="4"/>
        </table:table-row>
        <table:table-row table:style-name="ro1">
          <table:table-cell office:value-type="float" office:value="574.289733886719">
            <text:p>574.2897338867</text:p>
          </table:table-cell>
          <table:table-cell office:value-type="float" office:value="0.006496567">
            <text:p>0.006496567</text:p>
          </table:table-cell>
          <table:table-cell table:number-columns-repeated="4"/>
        </table:table-row>
        <table:table-row table:style-name="ro1">
          <table:table-cell office:value-type="float" office:value="574.408081054688">
            <text:p>574.4080810547</text:p>
          </table:table-cell>
          <table:table-cell office:value-type="float" office:value="0.015327">
            <text:p>0.015327</text:p>
          </table:table-cell>
          <table:table-cell table:number-columns-repeated="4"/>
        </table:table-row>
        <table:table-row table:style-name="ro1">
          <table:table-cell office:value-type="float" office:value="574.526428222656">
            <text:p>574.5264282227</text:p>
          </table:table-cell>
          <table:table-cell office:value-type="float" office:value="0.01428204">
            <text:p>0.01428204</text:p>
          </table:table-cell>
          <table:table-cell table:number-columns-repeated="4"/>
        </table:table-row>
        <table:table-row table:style-name="ro1">
          <table:table-cell office:value-type="float" office:value="574.644775390625">
            <text:p>574.6447753906</text:p>
          </table:table-cell>
          <table:table-cell office:value-type="float" office:value="0.01412115">
            <text:p>0.01412115</text:p>
          </table:table-cell>
          <table:table-cell table:number-columns-repeated="4"/>
        </table:table-row>
        <table:table-row table:style-name="ro1">
          <table:table-cell office:value-type="float" office:value="574.763122558594">
            <text:p>574.7631225586</text:p>
          </table:table-cell>
          <table:table-cell office:value-type="float" office:value="0.01762669">
            <text:p>0.01762669</text:p>
          </table:table-cell>
          <table:table-cell table:number-columns-repeated="4"/>
        </table:table-row>
        <table:table-row table:style-name="ro1">
          <table:table-cell office:value-type="float" office:value="574.881469726563">
            <text:p>574.8814697266</text:p>
          </table:table-cell>
          <table:table-cell office:value-type="float" office:value="0.01983782">
            <text:p>0.01983782</text:p>
          </table:table-cell>
          <table:table-cell table:number-columns-repeated="4"/>
        </table:table-row>
        <table:table-row table:style-name="ro1">
          <table:table-cell office:value-type="float" office:value="574.999816894531">
            <text:p>574.9998168945</text:p>
          </table:table-cell>
          <table:table-cell office:value-type="float" office:value="0.0100344">
            <text:p>0.0100344</text:p>
          </table:table-cell>
          <table:table-cell table:number-columns-repeated="4"/>
        </table:table-row>
        <table:table-row table:style-name="ro1">
          <table:table-cell office:value-type="float" office:value="575.1181640625">
            <text:p>575.1181640625</text:p>
          </table:table-cell>
          <table:table-cell office:value-type="float" office:value="0.03310785">
            <text:p>0.03310785</text:p>
          </table:table-cell>
          <table:table-cell table:number-columns-repeated="4"/>
        </table:table-row>
        <table:table-row table:style-name="ro1">
          <table:table-cell office:value-type="float" office:value="575.236572265625">
            <text:p>575.2365722656</text:p>
          </table:table-cell>
          <table:table-cell office:value-type="float" office:value="0.01039419">
            <text:p>0.01039419</text:p>
          </table:table-cell>
          <table:table-cell table:number-columns-repeated="4"/>
        </table:table-row>
        <table:table-row table:style-name="ro1">
          <table:table-cell office:value-type="float" office:value="575.354919433594">
            <text:p>575.3549194336</text:p>
          </table:table-cell>
          <table:table-cell office:value-type="float" office:value="0.02554869">
            <text:p>0.02554869</text:p>
          </table:table-cell>
          <table:table-cell table:number-columns-repeated="4"/>
        </table:table-row>
        <table:table-row table:style-name="ro1">
          <table:table-cell office:value-type="float" office:value="575.473266601563">
            <text:p>575.4732666016</text:p>
          </table:table-cell>
          <table:table-cell office:value-type="float" office:value="0.009851244">
            <text:p>0.009851244</text:p>
          </table:table-cell>
          <table:table-cell table:number-columns-repeated="4"/>
        </table:table-row>
        <table:table-row table:style-name="ro1">
          <table:table-cell office:value-type="float" office:value="575.591613769531">
            <text:p>575.5916137695</text:p>
          </table:table-cell>
          <table:table-cell office:value-type="float" office:value="0.009621486">
            <text:p>0.009621486</text:p>
          </table:table-cell>
          <table:table-cell table:number-columns-repeated="4"/>
        </table:table-row>
        <table:table-row table:style-name="ro1">
          <table:table-cell office:value-type="float" office:value="575.710021972656">
            <text:p>575.7100219727</text:p>
          </table:table-cell>
          <table:table-cell office:value-type="float" office:value="0.01036003">
            <text:p>0.01036003</text:p>
          </table:table-cell>
          <table:table-cell table:number-columns-repeated="4"/>
        </table:table-row>
        <table:table-row table:style-name="ro1">
          <table:table-cell office:value-type="float" office:value="575.828369140625">
            <text:p>575.8283691406</text:p>
          </table:table-cell>
          <table:table-cell office:value-type="float" office:value="0.01199512">
            <text:p>0.01199512</text:p>
          </table:table-cell>
          <table:table-cell table:number-columns-repeated="4"/>
        </table:table-row>
        <table:table-row table:style-name="ro1">
          <table:table-cell office:value-type="float" office:value="575.94677734375">
            <text:p>575.9467773438</text:p>
          </table:table-cell>
          <table:table-cell office:value-type="float" office:value="0.02049825">
            <text:p>0.02049825</text:p>
          </table:table-cell>
          <table:table-cell table:number-columns-repeated="4"/>
        </table:table-row>
        <table:table-row table:style-name="ro1">
          <table:table-cell office:value-type="float" office:value="576.065124511719">
            <text:p>576.0651245117</text:p>
          </table:table-cell>
          <table:table-cell office:value-type="float" office:value="0.01909444">
            <text:p>0.01909444</text:p>
          </table:table-cell>
          <table:table-cell table:number-columns-repeated="4"/>
        </table:table-row>
        <table:table-row table:style-name="ro1">
          <table:table-cell office:value-type="float" office:value="576.183532714844">
            <text:p>576.1835327148</text:p>
          </table:table-cell>
          <table:table-cell office:value-type="float" office:value="0.01101537">
            <text:p>0.01101537</text:p>
          </table:table-cell>
          <table:table-cell table:number-columns-repeated="4"/>
        </table:table-row>
        <table:table-row table:style-name="ro1">
          <table:table-cell office:value-type="float" office:value="576.301879882813">
            <text:p>576.3018798828</text:p>
          </table:table-cell>
          <table:table-cell office:value-type="float" office:value="0.02436921">
            <text:p>0.02436921</text:p>
          </table:table-cell>
          <table:table-cell table:number-columns-repeated="4"/>
        </table:table-row>
        <table:table-row table:style-name="ro1">
          <table:table-cell office:value-type="float" office:value="576.420288085938">
            <text:p>576.4202880859</text:p>
          </table:table-cell>
          <table:table-cell office:value-type="float" office:value="0.0270158">
            <text:p>0.0270158</text:p>
          </table:table-cell>
          <table:table-cell table:number-columns-repeated="4"/>
        </table:table-row>
        <table:table-row table:style-name="ro1">
          <table:table-cell office:value-type="float" office:value="576.538635253906">
            <text:p>576.5386352539</text:p>
          </table:table-cell>
          <table:table-cell office:value-type="float" office:value="0.01576319">
            <text:p>0.01576319</text:p>
          </table:table-cell>
          <table:table-cell table:number-columns-repeated="4"/>
        </table:table-row>
        <table:table-row table:style-name="ro1">
          <table:table-cell office:value-type="float" office:value="576.657043457031">
            <text:p>576.657043457</text:p>
          </table:table-cell>
          <table:table-cell office:value-type="float" office:value="0.03231828">
            <text:p>0.03231828</text:p>
          </table:table-cell>
          <table:table-cell table:number-columns-repeated="4"/>
        </table:table-row>
        <table:table-row table:style-name="ro1">
          <table:table-cell office:value-type="float" office:value="576.775451660156">
            <text:p>576.7754516602</text:p>
          </table:table-cell>
          <table:table-cell office:value-type="float" office:value="0.01186029">
            <text:p>0.01186029</text:p>
          </table:table-cell>
          <table:table-cell table:number-columns-repeated="4"/>
        </table:table-row>
        <table:table-row table:style-name="ro1">
          <table:table-cell office:value-type="float" office:value="576.893859863281">
            <text:p>576.8938598633</text:p>
          </table:table-cell>
          <table:table-cell office:value-type="float" office:value="0.01676976">
            <text:p>0.01676976</text:p>
          </table:table-cell>
          <table:table-cell table:number-columns-repeated="4"/>
        </table:table-row>
        <table:table-row table:style-name="ro1">
          <table:table-cell office:value-type="float" office:value="577.012268066406">
            <text:p>577.0122680664</text:p>
          </table:table-cell>
          <table:table-cell office:value-type="float" office:value="0.02866421">
            <text:p>0.02866421</text:p>
          </table:table-cell>
          <table:table-cell table:number-columns-repeated="4"/>
        </table:table-row>
        <table:table-row table:style-name="ro1">
          <table:table-cell office:value-type="float" office:value="577.130615234375">
            <text:p>577.1306152344</text:p>
          </table:table-cell>
          <table:table-cell office:value-type="float" office:value="0.02256024">
            <text:p>0.02256024</text:p>
          </table:table-cell>
          <table:table-cell table:number-columns-repeated="4"/>
        </table:table-row>
        <table:table-row table:style-name="ro1">
          <table:table-cell office:value-type="float" office:value="577.2490234375">
            <text:p>577.2490234375</text:p>
          </table:table-cell>
          <table:table-cell office:value-type="float" office:value="0.02670899">
            <text:p>0.02670899</text:p>
          </table:table-cell>
          <table:table-cell table:number-columns-repeated="4"/>
        </table:table-row>
        <table:table-row table:style-name="ro1">
          <table:table-cell office:value-type="float" office:value="577.367431640625">
            <text:p>577.3674316406</text:p>
          </table:table-cell>
          <table:table-cell office:value-type="float" office:value="0.01469229">
            <text:p>0.01469229</text:p>
          </table:table-cell>
          <table:table-cell table:number-columns-repeated="4"/>
        </table:table-row>
        <table:table-row table:style-name="ro1">
          <table:table-cell office:value-type="float" office:value="577.48583984375">
            <text:p>577.4858398438</text:p>
          </table:table-cell>
          <table:table-cell office:value-type="float" office:value="0.02856686">
            <text:p>0.02856686</text:p>
          </table:table-cell>
          <table:table-cell table:number-columns-repeated="4"/>
        </table:table-row>
        <table:table-row table:style-name="ro1">
          <table:table-cell office:value-type="float" office:value="577.604248046875">
            <text:p>577.6042480469</text:p>
          </table:table-cell>
          <table:table-cell office:value-type="float" office:value="0.01593">
            <text:p>0.01593</text:p>
          </table:table-cell>
          <table:table-cell table:number-columns-repeated="4"/>
        </table:table-row>
        <table:table-row table:style-name="ro1">
          <table:table-cell office:value-type="float" office:value="577.722717285156">
            <text:p>577.7227172852</text:p>
          </table:table-cell>
          <table:table-cell office:value-type="float" office:value="0.01933994">
            <text:p>0.01933994</text:p>
          </table:table-cell>
          <table:table-cell table:number-columns-repeated="4"/>
        </table:table-row>
        <table:table-row table:style-name="ro1">
          <table:table-cell office:value-type="float" office:value="577.841125488281">
            <text:p>577.8411254883</text:p>
          </table:table-cell>
          <table:table-cell office:value-type="float" office:value="0.02345504">
            <text:p>0.02345504</text:p>
          </table:table-cell>
          <table:table-cell table:number-columns-repeated="4"/>
        </table:table-row>
        <table:table-row table:style-name="ro1">
          <table:table-cell office:value-type="float" office:value="577.959533691406">
            <text:p>577.9595336914</text:p>
          </table:table-cell>
          <table:table-cell office:value-type="float" office:value="0.01864646">
            <text:p>0.01864646</text:p>
          </table:table-cell>
          <table:table-cell table:number-columns-repeated="4"/>
        </table:table-row>
        <table:table-row table:style-name="ro1">
          <table:table-cell office:value-type="float" office:value="578.077941894531">
            <text:p>578.0779418945</text:p>
          </table:table-cell>
          <table:table-cell office:value-type="float" office:value="0.03780632">
            <text:p>0.03780632</text:p>
          </table:table-cell>
          <table:table-cell table:number-columns-repeated="4"/>
        </table:table-row>
        <table:table-row table:style-name="ro1">
          <table:table-cell office:value-type="float" office:value="578.196350097656">
            <text:p>578.1963500977</text:p>
          </table:table-cell>
          <table:table-cell office:value-type="float" office:value="0.02103819">
            <text:p>0.02103819</text:p>
          </table:table-cell>
          <table:table-cell table:number-columns-repeated="4"/>
        </table:table-row>
        <table:table-row table:style-name="ro1">
          <table:table-cell office:value-type="float" office:value="578.314819335938">
            <text:p>578.3148193359</text:p>
          </table:table-cell>
          <table:table-cell office:value-type="float" office:value="0.02138789">
            <text:p>0.02138789</text:p>
          </table:table-cell>
          <table:table-cell table:number-columns-repeated="4"/>
        </table:table-row>
        <table:table-row table:style-name="ro1">
          <table:table-cell office:value-type="float" office:value="578.433227539063">
            <text:p>578.4332275391</text:p>
          </table:table-cell>
          <table:table-cell office:value-type="float" office:value="0.02454556">
            <text:p>0.02454556</text:p>
          </table:table-cell>
          <table:table-cell table:number-columns-repeated="4"/>
        </table:table-row>
        <table:table-row table:style-name="ro1">
          <table:table-cell office:value-type="float" office:value="578.551635742188">
            <text:p>578.5516357422</text:p>
          </table:table-cell>
          <table:table-cell office:value-type="float" office:value="0.0259928">
            <text:p>0.0259928</text:p>
          </table:table-cell>
          <table:table-cell table:number-columns-repeated="4"/>
        </table:table-row>
        <table:table-row table:style-name="ro1">
          <table:table-cell office:value-type="float" office:value="578.670104980469">
            <text:p>578.6701049805</text:p>
          </table:table-cell>
          <table:table-cell office:value-type="float" office:value="0.03571324">
            <text:p>0.03571324</text:p>
          </table:table-cell>
          <table:table-cell table:number-columns-repeated="4"/>
        </table:table-row>
        <table:table-row table:style-name="ro1">
          <table:table-cell office:value-type="float" office:value="578.788513183594">
            <text:p>578.7885131836</text:p>
          </table:table-cell>
          <table:table-cell office:value-type="float" office:value="0.05296338">
            <text:p>0.05296338</text:p>
          </table:table-cell>
          <table:table-cell table:number-columns-repeated="4"/>
        </table:table-row>
        <table:table-row table:style-name="ro1">
          <table:table-cell office:value-type="float" office:value="578.906982421875">
            <text:p>578.9069824219</text:p>
          </table:table-cell>
          <table:table-cell office:value-type="float" office:value="0.02088984">
            <text:p>0.02088984</text:p>
          </table:table-cell>
          <table:table-cell table:number-columns-repeated="4"/>
        </table:table-row>
        <table:table-row table:style-name="ro1">
          <table:table-cell office:value-type="float" office:value="579.025451660156">
            <text:p>579.0254516602</text:p>
          </table:table-cell>
          <table:table-cell office:value-type="float" office:value="0.02772673">
            <text:p>0.02772673</text:p>
          </table:table-cell>
          <table:table-cell table:number-columns-repeated="4"/>
        </table:table-row>
        <table:table-row table:style-name="ro1">
          <table:table-cell office:value-type="float" office:value="579.143859863281">
            <text:p>579.1438598633</text:p>
          </table:table-cell>
          <table:table-cell office:value-type="float" office:value="0.03263193">
            <text:p>0.03263193</text:p>
          </table:table-cell>
          <table:table-cell table:number-columns-repeated="4"/>
        </table:table-row>
        <table:table-row table:style-name="ro1">
          <table:table-cell office:value-type="float" office:value="579.262329101563">
            <text:p>579.2623291016</text:p>
          </table:table-cell>
          <table:table-cell office:value-type="float" office:value="0.02755616">
            <text:p>0.02755616</text:p>
          </table:table-cell>
          <table:table-cell table:number-columns-repeated="4"/>
        </table:table-row>
        <table:table-row table:style-name="ro1">
          <table:table-cell office:value-type="float" office:value="579.380798339844">
            <text:p>579.3807983398</text:p>
          </table:table-cell>
          <table:table-cell office:value-type="float" office:value="0.03250353">
            <text:p>0.03250353</text:p>
          </table:table-cell>
          <table:table-cell table:number-columns-repeated="4"/>
        </table:table-row>
        <table:table-row table:style-name="ro1">
          <table:table-cell office:value-type="float" office:value="579.499206542969">
            <text:p>579.499206543</text:p>
          </table:table-cell>
          <table:table-cell office:value-type="float" office:value="0.02771227">
            <text:p>0.02771227</text:p>
          </table:table-cell>
          <table:table-cell table:number-columns-repeated="4"/>
        </table:table-row>
        <table:table-row table:style-name="ro1">
          <table:table-cell office:value-type="float" office:value="579.61767578125">
            <text:p>579.6176757813</text:p>
          </table:table-cell>
          <table:table-cell office:value-type="float" office:value="0.02901425">
            <text:p>0.02901425</text:p>
          </table:table-cell>
          <table:table-cell table:number-columns-repeated="4"/>
        </table:table-row>
        <table:table-row table:style-name="ro1">
          <table:table-cell office:value-type="float" office:value="579.736145019531">
            <text:p>579.7361450195</text:p>
          </table:table-cell>
          <table:table-cell office:value-type="float" office:value="0.03191333">
            <text:p>0.03191333</text:p>
          </table:table-cell>
          <table:table-cell table:number-columns-repeated="4"/>
        </table:table-row>
        <table:table-row table:style-name="ro1">
          <table:table-cell office:value-type="float" office:value="579.854614257813">
            <text:p>579.8546142578</text:p>
          </table:table-cell>
          <table:table-cell office:value-type="float" office:value="0.02633094">
            <text:p>0.02633094</text:p>
          </table:table-cell>
          <table:table-cell table:number-columns-repeated="4"/>
        </table:table-row>
        <table:table-row table:style-name="ro1">
          <table:table-cell office:value-type="float" office:value="579.973083496094">
            <text:p>579.9730834961</text:p>
          </table:table-cell>
          <table:table-cell office:value-type="float" office:value="0.02674532">
            <text:p>0.02674532</text:p>
          </table:table-cell>
          <table:table-cell table:number-columns-repeated="4"/>
        </table:table-row>
        <table:table-row table:style-name="ro1">
          <table:table-cell office:value-type="float" office:value="580.091552734375">
            <text:p>580.0915527344</text:p>
          </table:table-cell>
          <table:table-cell office:value-type="float" office:value="0.03763353">
            <text:p>0.03763353</text:p>
          </table:table-cell>
          <table:table-cell table:number-columns-repeated="4"/>
        </table:table-row>
        <table:table-row table:style-name="ro1">
          <table:table-cell office:value-type="float" office:value="580.210021972656">
            <text:p>580.2100219727</text:p>
          </table:table-cell>
          <table:table-cell office:value-type="float" office:value="0.04874655">
            <text:p>0.04874655</text:p>
          </table:table-cell>
          <table:table-cell table:number-columns-repeated="4"/>
        </table:table-row>
        <table:table-row table:style-name="ro1">
          <table:table-cell office:value-type="float" office:value="580.328491210938">
            <text:p>580.3284912109</text:p>
          </table:table-cell>
          <table:table-cell office:value-type="float" office:value="0.03944986">
            <text:p>0.03944986</text:p>
          </table:table-cell>
          <table:table-cell table:number-columns-repeated="4"/>
        </table:table-row>
        <table:table-row table:style-name="ro1">
          <table:table-cell office:value-type="float" office:value="580.446960449219">
            <text:p>580.4469604492</text:p>
          </table:table-cell>
          <table:table-cell office:value-type="float" office:value="0.03454334">
            <text:p>0.03454334</text:p>
          </table:table-cell>
          <table:table-cell table:number-columns-repeated="4"/>
        </table:table-row>
        <table:table-row table:style-name="ro1">
          <table:table-cell office:value-type="float" office:value="580.5654296875">
            <text:p>580.5654296875</text:p>
          </table:table-cell>
          <table:table-cell office:value-type="float" office:value="0.03570574">
            <text:p>0.03570574</text:p>
          </table:table-cell>
          <table:table-cell table:number-columns-repeated="4"/>
        </table:table-row>
        <table:table-row table:style-name="ro1">
          <table:table-cell office:value-type="float" office:value="580.683898925781">
            <text:p>580.6838989258</text:p>
          </table:table-cell>
          <table:table-cell office:value-type="float" office:value="0.04623408">
            <text:p>0.04623408</text:p>
          </table:table-cell>
          <table:table-cell table:number-columns-repeated="4"/>
        </table:table-row>
        <table:table-row table:style-name="ro1">
          <table:table-cell office:value-type="float" office:value="580.802368164063">
            <text:p>580.8023681641</text:p>
          </table:table-cell>
          <table:table-cell office:value-type="float" office:value="0.0405584">
            <text:p>0.0405584</text:p>
          </table:table-cell>
          <table:table-cell table:number-columns-repeated="4"/>
        </table:table-row>
        <table:table-row table:style-name="ro1">
          <table:table-cell office:value-type="float" office:value="580.9208984375">
            <text:p>580.9208984375</text:p>
          </table:table-cell>
          <table:table-cell office:value-type="float" office:value="0.03946671">
            <text:p>0.03946671</text:p>
          </table:table-cell>
          <table:table-cell table:number-columns-repeated="4"/>
        </table:table-row>
        <table:table-row table:style-name="ro1">
          <table:table-cell office:value-type="float" office:value="581.039367675781">
            <text:p>581.0393676758</text:p>
          </table:table-cell>
          <table:table-cell office:value-type="float" office:value="0.03898182">
            <text:p>0.03898182</text:p>
          </table:table-cell>
          <table:table-cell table:number-columns-repeated="4"/>
        </table:table-row>
        <table:table-row table:style-name="ro1">
          <table:table-cell office:value-type="float" office:value="581.157836914063">
            <text:p>581.1578369141</text:p>
          </table:table-cell>
          <table:table-cell office:value-type="float" office:value="0.04964345">
            <text:p>0.04964345</text:p>
          </table:table-cell>
          <table:table-cell table:number-columns-repeated="4"/>
        </table:table-row>
        <table:table-row table:style-name="ro1">
          <table:table-cell office:value-type="float" office:value="581.2763671875">
            <text:p>581.2763671875</text:p>
          </table:table-cell>
          <table:table-cell office:value-type="float" office:value="0.05289155">
            <text:p>0.05289155</text:p>
          </table:table-cell>
          <table:table-cell table:number-columns-repeated="4"/>
        </table:table-row>
        <table:table-row table:style-name="ro1">
          <table:table-cell office:value-type="float" office:value="581.394836425781">
            <text:p>581.3948364258</text:p>
          </table:table-cell>
          <table:table-cell office:value-type="float" office:value="0.04544425">
            <text:p>0.04544425</text:p>
          </table:table-cell>
          <table:table-cell table:number-columns-repeated="4"/>
        </table:table-row>
        <table:table-row table:style-name="ro1">
          <table:table-cell office:value-type="float" office:value="581.513366699219">
            <text:p>581.5133666992</text:p>
          </table:table-cell>
          <table:table-cell office:value-type="float" office:value="0.0534572">
            <text:p>0.0534572</text:p>
          </table:table-cell>
          <table:table-cell table:number-columns-repeated="4"/>
        </table:table-row>
        <table:table-row table:style-name="ro1">
          <table:table-cell office:value-type="float" office:value="581.6318359375">
            <text:p>581.6318359375</text:p>
          </table:table-cell>
          <table:table-cell office:value-type="float" office:value="0.04125451">
            <text:p>0.04125451</text:p>
          </table:table-cell>
          <table:table-cell table:number-columns-repeated="4"/>
        </table:table-row>
        <table:table-row table:style-name="ro1">
          <table:table-cell office:value-type="float" office:value="581.750366210938">
            <text:p>581.7503662109</text:p>
          </table:table-cell>
          <table:table-cell office:value-type="float" office:value="0.03780295">
            <text:p>0.03780295</text:p>
          </table:table-cell>
          <table:table-cell table:number-columns-repeated="4"/>
        </table:table-row>
        <table:table-row table:style-name="ro1">
          <table:table-cell office:value-type="float" office:value="581.868835449219">
            <text:p>581.8688354492</text:p>
          </table:table-cell>
          <table:table-cell office:value-type="float" office:value="0.0412905">
            <text:p>0.0412905</text:p>
          </table:table-cell>
          <table:table-cell table:number-columns-repeated="4"/>
        </table:table-row>
        <table:table-row table:style-name="ro1">
          <table:table-cell office:value-type="float" office:value="581.987365722656">
            <text:p>581.9873657227</text:p>
          </table:table-cell>
          <table:table-cell office:value-type="float" office:value="0.0431765">
            <text:p>0.0431765</text:p>
          </table:table-cell>
          <table:table-cell table:number-columns-repeated="4"/>
        </table:table-row>
        <table:table-row table:style-name="ro1">
          <table:table-cell office:value-type="float" office:value="582.105895996094">
            <text:p>582.1058959961</text:p>
          </table:table-cell>
          <table:table-cell office:value-type="float" office:value="0.04708235">
            <text:p>0.04708235</text:p>
          </table:table-cell>
          <table:table-cell table:number-columns-repeated="4"/>
        </table:table-row>
        <table:table-row table:style-name="ro1">
          <table:table-cell office:value-type="float" office:value="582.224365234375">
            <text:p>582.2243652344</text:p>
          </table:table-cell>
          <table:table-cell office:value-type="float" office:value="0.05013025">
            <text:p>0.05013025</text:p>
          </table:table-cell>
          <table:table-cell table:number-columns-repeated="4"/>
        </table:table-row>
        <table:table-row table:style-name="ro1">
          <table:table-cell office:value-type="float" office:value="582.342895507813">
            <text:p>582.3428955078</text:p>
          </table:table-cell>
          <table:table-cell office:value-type="float" office:value="0.04621845">
            <text:p>0.04621845</text:p>
          </table:table-cell>
          <table:table-cell table:number-columns-repeated="4"/>
        </table:table-row>
        <table:table-row table:style-name="ro1">
          <table:table-cell office:value-type="float" office:value="582.46142578125">
            <text:p>582.4614257813</text:p>
          </table:table-cell>
          <table:table-cell office:value-type="float" office:value="0.04855125">
            <text:p>0.04855125</text:p>
          </table:table-cell>
          <table:table-cell table:number-columns-repeated="4"/>
        </table:table-row>
        <table:table-row table:style-name="ro1">
          <table:table-cell office:value-type="float" office:value="582.579956054688">
            <text:p>582.5799560547</text:p>
          </table:table-cell>
          <table:table-cell office:value-type="float" office:value="0.04481562">
            <text:p>0.04481562</text:p>
          </table:table-cell>
          <table:table-cell table:number-columns-repeated="4"/>
        </table:table-row>
        <table:table-row table:style-name="ro1">
          <table:table-cell office:value-type="float" office:value="582.698486328125">
            <text:p>582.6984863281</text:p>
          </table:table-cell>
          <table:table-cell office:value-type="float" office:value="0.04279147">
            <text:p>0.04279147</text:p>
          </table:table-cell>
          <table:table-cell table:number-columns-repeated="4"/>
        </table:table-row>
        <table:table-row table:style-name="ro1">
          <table:table-cell office:value-type="float" office:value="582.817016601563">
            <text:p>582.8170166016</text:p>
          </table:table-cell>
          <table:table-cell office:value-type="float" office:value="0.05186404">
            <text:p>0.05186404</text:p>
          </table:table-cell>
          <table:table-cell table:number-columns-repeated="4"/>
        </table:table-row>
        <table:table-row table:style-name="ro1">
          <table:table-cell office:value-type="float" office:value="582.935546875">
            <text:p>582.935546875</text:p>
          </table:table-cell>
          <table:table-cell office:value-type="float" office:value="0.04214725">
            <text:p>0.04214725</text:p>
          </table:table-cell>
          <table:table-cell table:number-columns-repeated="4"/>
        </table:table-row>
        <table:table-row table:style-name="ro1">
          <table:table-cell office:value-type="float" office:value="583.054077148438">
            <text:p>583.0540771484</text:p>
          </table:table-cell>
          <table:table-cell office:value-type="float" office:value="0.04744612">
            <text:p>0.04744612</text:p>
          </table:table-cell>
          <table:table-cell table:number-columns-repeated="4"/>
        </table:table-row>
        <table:table-row table:style-name="ro1">
          <table:table-cell office:value-type="float" office:value="583.172607421875">
            <text:p>583.1726074219</text:p>
          </table:table-cell>
          <table:table-cell office:value-type="float" office:value="0.07680093">
            <text:p>0.07680093</text:p>
          </table:table-cell>
          <table:table-cell table:number-columns-repeated="4"/>
        </table:table-row>
        <table:table-row table:style-name="ro1">
          <table:table-cell office:value-type="float" office:value="583.291137695313">
            <text:p>583.2911376953</text:p>
          </table:table-cell>
          <table:table-cell office:value-type="float" office:value="0.05151788">
            <text:p>0.05151788</text:p>
          </table:table-cell>
          <table:table-cell table:number-columns-repeated="4"/>
        </table:table-row>
        <table:table-row table:style-name="ro1">
          <table:table-cell office:value-type="float" office:value="583.40966796875">
            <text:p>583.4096679688</text:p>
          </table:table-cell>
          <table:table-cell office:value-type="float" office:value="0.0456991">
            <text:p>0.0456991</text:p>
          </table:table-cell>
          <table:table-cell table:number-columns-repeated="4"/>
        </table:table-row>
        <table:table-row table:style-name="ro1">
          <table:table-cell office:value-type="float" office:value="583.528198242188">
            <text:p>583.5281982422</text:p>
          </table:table-cell>
          <table:table-cell office:value-type="float" office:value="0.05300057">
            <text:p>0.05300057</text:p>
          </table:table-cell>
          <table:table-cell table:number-columns-repeated="4"/>
        </table:table-row>
        <table:table-row table:style-name="ro1">
          <table:table-cell office:value-type="float" office:value="583.646789550781">
            <text:p>583.6467895508</text:p>
          </table:table-cell>
          <table:table-cell office:value-type="float" office:value="0.04822384">
            <text:p>0.04822384</text:p>
          </table:table-cell>
          <table:table-cell table:number-columns-repeated="4"/>
        </table:table-row>
        <table:table-row table:style-name="ro1">
          <table:table-cell office:value-type="float" office:value="583.765319824219">
            <text:p>583.7653198242</text:p>
          </table:table-cell>
          <table:table-cell office:value-type="float" office:value="0.04726047">
            <text:p>0.04726047</text:p>
          </table:table-cell>
          <table:table-cell table:number-columns-repeated="4"/>
        </table:table-row>
        <table:table-row table:style-name="ro1">
          <table:table-cell office:value-type="float" office:value="583.883850097656">
            <text:p>583.8838500977</text:p>
          </table:table-cell>
          <table:table-cell office:value-type="float" office:value="0.06008912">
            <text:p>0.06008912</text:p>
          </table:table-cell>
          <table:table-cell table:number-columns-repeated="4"/>
        </table:table-row>
        <table:table-row table:style-name="ro1">
          <table:table-cell office:value-type="float" office:value="584.00244140625">
            <text:p>584.0024414063</text:p>
          </table:table-cell>
          <table:table-cell office:value-type="float" office:value="0.04613433">
            <text:p>0.04613433</text:p>
          </table:table-cell>
          <table:table-cell table:number-columns-repeated="4"/>
        </table:table-row>
        <table:table-row table:style-name="ro1">
          <table:table-cell office:value-type="float" office:value="584.120971679688">
            <text:p>584.1209716797</text:p>
          </table:table-cell>
          <table:table-cell office:value-type="float" office:value="0.0613111">
            <text:p>0.0613111</text:p>
          </table:table-cell>
          <table:table-cell table:number-columns-repeated="4"/>
        </table:table-row>
        <table:table-row table:style-name="ro1">
          <table:table-cell office:value-type="float" office:value="584.239501953125">
            <text:p>584.2395019531</text:p>
          </table:table-cell>
          <table:table-cell office:value-type="float" office:value="0.05741593">
            <text:p>0.05741593</text:p>
          </table:table-cell>
          <table:table-cell table:number-columns-repeated="4"/>
        </table:table-row>
        <table:table-row table:style-name="ro1">
          <table:table-cell office:value-type="float" office:value="584.358093261719">
            <text:p>584.3580932617</text:p>
          </table:table-cell>
          <table:table-cell office:value-type="float" office:value="0.05377517">
            <text:p>0.05377517</text:p>
          </table:table-cell>
          <table:table-cell table:number-columns-repeated="4"/>
        </table:table-row>
        <table:table-row table:style-name="ro1">
          <table:table-cell office:value-type="float" office:value="584.476623535156">
            <text:p>584.4766235352</text:p>
          </table:table-cell>
          <table:table-cell office:value-type="float" office:value="0.06222906">
            <text:p>0.06222906</text:p>
          </table:table-cell>
          <table:table-cell table:number-columns-repeated="4"/>
        </table:table-row>
        <table:table-row table:style-name="ro1">
          <table:table-cell office:value-type="float" office:value="584.59521484375">
            <text:p>584.5952148438</text:p>
          </table:table-cell>
          <table:table-cell office:value-type="float" office:value="0.06488871">
            <text:p>0.06488871</text:p>
          </table:table-cell>
          <table:table-cell table:number-columns-repeated="4"/>
        </table:table-row>
        <table:table-row table:style-name="ro1">
          <table:table-cell office:value-type="float" office:value="584.713806152344">
            <text:p>584.7138061523</text:p>
          </table:table-cell>
          <table:table-cell office:value-type="float" office:value="0.0581618">
            <text:p>0.0581618</text:p>
          </table:table-cell>
          <table:table-cell table:number-columns-repeated="4"/>
        </table:table-row>
        <table:table-row table:style-name="ro1">
          <table:table-cell office:value-type="float" office:value="584.832336425781">
            <text:p>584.8323364258</text:p>
          </table:table-cell>
          <table:table-cell office:value-type="float" office:value="0.05878642">
            <text:p>0.05878642</text:p>
          </table:table-cell>
          <table:table-cell table:number-columns-repeated="4"/>
        </table:table-row>
        <table:table-row table:style-name="ro1">
          <table:table-cell office:value-type="float" office:value="584.950927734375">
            <text:p>584.9509277344</text:p>
          </table:table-cell>
          <table:table-cell office:value-type="float" office:value="0.05775506">
            <text:p>0.05775506</text:p>
          </table:table-cell>
          <table:table-cell table:number-columns-repeated="4"/>
        </table:table-row>
        <table:table-row table:style-name="ro1">
          <table:table-cell office:value-type="float" office:value="585.069519042969">
            <text:p>585.069519043</text:p>
          </table:table-cell>
          <table:table-cell office:value-type="float" office:value="0.05044651">
            <text:p>0.05044651</text:p>
          </table:table-cell>
          <table:table-cell table:number-columns-repeated="4"/>
        </table:table-row>
        <table:table-row table:style-name="ro1">
          <table:table-cell office:value-type="float" office:value="585.188110351563">
            <text:p>585.1881103516</text:p>
          </table:table-cell>
          <table:table-cell office:value-type="float" office:value="0.06426763">
            <text:p>0.06426763</text:p>
          </table:table-cell>
          <table:table-cell table:number-columns-repeated="4"/>
        </table:table-row>
        <table:table-row table:style-name="ro1">
          <table:table-cell office:value-type="float" office:value="585.306640625">
            <text:p>585.306640625</text:p>
          </table:table-cell>
          <table:table-cell office:value-type="float" office:value="0.06563087">
            <text:p>0.06563087</text:p>
          </table:table-cell>
          <table:table-cell table:number-columns-repeated="4"/>
        </table:table-row>
        <table:table-row table:style-name="ro1">
          <table:table-cell office:value-type="float" office:value="585.425231933594">
            <text:p>585.4252319336</text:p>
          </table:table-cell>
          <table:table-cell office:value-type="float" office:value="0.05796794">
            <text:p>0.05796794</text:p>
          </table:table-cell>
          <table:table-cell table:number-columns-repeated="4"/>
        </table:table-row>
        <table:table-row table:style-name="ro1">
          <table:table-cell office:value-type="float" office:value="585.543823242188">
            <text:p>585.5438232422</text:p>
          </table:table-cell>
          <table:table-cell office:value-type="float" office:value="0.08122894">
            <text:p>0.08122894</text:p>
          </table:table-cell>
          <table:table-cell table:number-columns-repeated="4"/>
        </table:table-row>
        <table:table-row table:style-name="ro1">
          <table:table-cell office:value-type="float" office:value="585.662414550781">
            <text:p>585.6624145508</text:p>
          </table:table-cell>
          <table:table-cell office:value-type="float" office:value="0.05448441">
            <text:p>0.05448441</text:p>
          </table:table-cell>
          <table:table-cell table:number-columns-repeated="4"/>
        </table:table-row>
        <table:table-row table:style-name="ro1">
          <table:table-cell office:value-type="float" office:value="585.781005859375">
            <text:p>585.7810058594</text:p>
          </table:table-cell>
          <table:table-cell office:value-type="float" office:value="0.06261326">
            <text:p>0.06261326</text:p>
          </table:table-cell>
          <table:table-cell table:number-columns-repeated="4"/>
        </table:table-row>
        <table:table-row table:style-name="ro1">
          <table:table-cell office:value-type="float" office:value="585.899597167969">
            <text:p>585.899597168</text:p>
          </table:table-cell>
          <table:table-cell office:value-type="float" office:value="0.06846626">
            <text:p>0.06846626</text:p>
          </table:table-cell>
          <table:table-cell table:number-columns-repeated="4"/>
        </table:table-row>
        <table:table-row table:style-name="ro1">
          <table:table-cell office:value-type="float" office:value="586.018188476563">
            <text:p>586.0181884766</text:p>
          </table:table-cell>
          <table:table-cell office:value-type="float" office:value="0.05608315">
            <text:p>0.05608315</text:p>
          </table:table-cell>
          <table:table-cell table:number-columns-repeated="4"/>
        </table:table-row>
        <table:table-row table:style-name="ro1">
          <table:table-cell office:value-type="float" office:value="586.136779785156">
            <text:p>586.1367797852</text:p>
          </table:table-cell>
          <table:table-cell office:value-type="float" office:value="0.05915001">
            <text:p>0.05915001</text:p>
          </table:table-cell>
          <table:table-cell table:number-columns-repeated="4"/>
        </table:table-row>
        <table:table-row table:style-name="ro1">
          <table:table-cell office:value-type="float" office:value="586.255432128906">
            <text:p>586.2554321289</text:p>
          </table:table-cell>
          <table:table-cell office:value-type="float" office:value="0.06636225">
            <text:p>0.06636225</text:p>
          </table:table-cell>
          <table:table-cell table:number-columns-repeated="4"/>
        </table:table-row>
        <table:table-row table:style-name="ro1">
          <table:table-cell office:value-type="float" office:value="586.3740234375">
            <text:p>586.3740234375</text:p>
          </table:table-cell>
          <table:table-cell office:value-type="float" office:value="0.06695616">
            <text:p>0.06695616</text:p>
          </table:table-cell>
          <table:table-cell table:number-columns-repeated="4"/>
        </table:table-row>
        <table:table-row table:style-name="ro1">
          <table:table-cell office:value-type="float" office:value="586.492614746094">
            <text:p>586.4926147461</text:p>
          </table:table-cell>
          <table:table-cell office:value-type="float" office:value="0.06766279">
            <text:p>0.06766279</text:p>
          </table:table-cell>
          <table:table-cell table:number-columns-repeated="4"/>
        </table:table-row>
        <table:table-row table:style-name="ro1">
          <table:table-cell office:value-type="float" office:value="586.611206054688">
            <text:p>586.6112060547</text:p>
          </table:table-cell>
          <table:table-cell office:value-type="float" office:value="0.07582909">
            <text:p>0.07582909</text:p>
          </table:table-cell>
          <table:table-cell table:number-columns-repeated="4"/>
        </table:table-row>
        <table:table-row table:style-name="ro1">
          <table:table-cell office:value-type="float" office:value="586.729858398438">
            <text:p>586.7298583984</text:p>
          </table:table-cell>
          <table:table-cell office:value-type="float" office:value="0.0718713">
            <text:p>0.0718713</text:p>
          </table:table-cell>
          <table:table-cell table:number-columns-repeated="4"/>
        </table:table-row>
        <table:table-row table:style-name="ro1">
          <table:table-cell office:value-type="float" office:value="586.848449707031">
            <text:p>586.848449707</text:p>
          </table:table-cell>
          <table:table-cell office:value-type="float" office:value="0.07434464">
            <text:p>0.07434464</text:p>
          </table:table-cell>
          <table:table-cell table:number-columns-repeated="4"/>
        </table:table-row>
        <table:table-row table:style-name="ro1">
          <table:table-cell office:value-type="float" office:value="586.967041015625">
            <text:p>586.9670410156</text:p>
          </table:table-cell>
          <table:table-cell office:value-type="float" office:value="0.06342132">
            <text:p>0.06342132</text:p>
          </table:table-cell>
          <table:table-cell table:number-columns-repeated="4"/>
        </table:table-row>
        <table:table-row table:style-name="ro1">
          <table:table-cell office:value-type="float" office:value="587.085693359375">
            <text:p>587.0856933594</text:p>
          </table:table-cell>
          <table:table-cell office:value-type="float" office:value="0.06434488">
            <text:p>0.06434488</text:p>
          </table:table-cell>
          <table:table-cell table:number-columns-repeated="4"/>
        </table:table-row>
        <table:table-row table:style-name="ro1">
          <table:table-cell office:value-type="float" office:value="587.204284667969">
            <text:p>587.204284668</text:p>
          </table:table-cell>
          <table:table-cell office:value-type="float" office:value="0.07622367">
            <text:p>0.07622367</text:p>
          </table:table-cell>
          <table:table-cell table:number-columns-repeated="4"/>
        </table:table-row>
        <table:table-row table:style-name="ro1">
          <table:table-cell office:value-type="float" office:value="587.322937011719">
            <text:p>587.3229370117</text:p>
          </table:table-cell>
          <table:table-cell office:value-type="float" office:value="0.07102214">
            <text:p>0.07102214</text:p>
          </table:table-cell>
          <table:table-cell table:number-columns-repeated="4"/>
        </table:table-row>
        <table:table-row table:style-name="ro1">
          <table:table-cell office:value-type="float" office:value="587.441589355469">
            <text:p>587.4415893555</text:p>
          </table:table-cell>
          <table:table-cell office:value-type="float" office:value="0.07571339">
            <text:p>0.07571339</text:p>
          </table:table-cell>
          <table:table-cell table:number-columns-repeated="4"/>
        </table:table-row>
        <table:table-row table:style-name="ro1">
          <table:table-cell office:value-type="float" office:value="587.560180664063">
            <text:p>587.5601806641</text:p>
          </table:table-cell>
          <table:table-cell office:value-type="float" office:value="0.06208702">
            <text:p>0.06208702</text:p>
          </table:table-cell>
          <table:table-cell table:number-columns-repeated="4"/>
        </table:table-row>
        <table:table-row table:style-name="ro1">
          <table:table-cell office:value-type="float" office:value="587.678833007813">
            <text:p>587.6788330078</text:p>
          </table:table-cell>
          <table:table-cell office:value-type="float" office:value="0.07160524">
            <text:p>0.07160524</text:p>
          </table:table-cell>
          <table:table-cell table:number-columns-repeated="4"/>
        </table:table-row>
        <table:table-row table:style-name="ro1">
          <table:table-cell office:value-type="float" office:value="587.797424316406">
            <text:p>587.7974243164</text:p>
          </table:table-cell>
          <table:table-cell office:value-type="float" office:value="0.07685848">
            <text:p>0.07685848</text:p>
          </table:table-cell>
          <table:table-cell table:number-columns-repeated="4"/>
        </table:table-row>
        <table:table-row table:style-name="ro1">
          <table:table-cell office:value-type="float" office:value="587.916076660156">
            <text:p>587.9160766602</text:p>
          </table:table-cell>
          <table:table-cell office:value-type="float" office:value="0.08088773">
            <text:p>0.08088773</text:p>
          </table:table-cell>
          <table:table-cell table:number-columns-repeated="4"/>
        </table:table-row>
        <table:table-row table:style-name="ro1">
          <table:table-cell office:value-type="float" office:value="588.034729003906">
            <text:p>588.0347290039</text:p>
          </table:table-cell>
          <table:table-cell office:value-type="float" office:value="0.07246026">
            <text:p>0.07246026</text:p>
          </table:table-cell>
          <table:table-cell table:number-columns-repeated="4"/>
        </table:table-row>
        <table:table-row table:style-name="ro1">
          <table:table-cell office:value-type="float" office:value="588.153381347656">
            <text:p>588.1533813477</text:p>
          </table:table-cell>
          <table:table-cell office:value-type="float" office:value="0.07384806">
            <text:p>0.07384806</text:p>
          </table:table-cell>
          <table:table-cell table:number-columns-repeated="4"/>
        </table:table-row>
        <table:table-row table:style-name="ro1">
          <table:table-cell office:value-type="float" office:value="588.272033691406">
            <text:p>588.2720336914</text:p>
          </table:table-cell>
          <table:table-cell office:value-type="float" office:value="0.07430045">
            <text:p>0.07430045</text:p>
          </table:table-cell>
          <table:table-cell table:number-columns-repeated="4"/>
        </table:table-row>
        <table:table-row table:style-name="ro1">
          <table:table-cell office:value-type="float" office:value="588.390686035156">
            <text:p>588.3906860352</text:p>
          </table:table-cell>
          <table:table-cell office:value-type="float" office:value="0.08354826">
            <text:p>0.08354826</text:p>
          </table:table-cell>
          <table:table-cell table:number-columns-repeated="4"/>
        </table:table-row>
        <table:table-row table:style-name="ro1">
          <table:table-cell office:value-type="float" office:value="588.509338378906">
            <text:p>588.5093383789</text:p>
          </table:table-cell>
          <table:table-cell office:value-type="float" office:value="0.07346274">
            <text:p>0.07346274</text:p>
          </table:table-cell>
          <table:table-cell table:number-columns-repeated="4"/>
        </table:table-row>
        <table:table-row table:style-name="ro1">
          <table:table-cell office:value-type="float" office:value="588.627990722656">
            <text:p>588.6279907227</text:p>
          </table:table-cell>
          <table:table-cell office:value-type="float" office:value="0.0692514">
            <text:p>0.0692514</text:p>
          </table:table-cell>
          <table:table-cell table:number-columns-repeated="4"/>
        </table:table-row>
        <table:table-row table:style-name="ro1">
          <table:table-cell office:value-type="float" office:value="588.746643066406">
            <text:p>588.7466430664</text:p>
          </table:table-cell>
          <table:table-cell office:value-type="float" office:value="0.06892563">
            <text:p>0.06892563</text:p>
          </table:table-cell>
          <table:table-cell table:number-columns-repeated="4"/>
        </table:table-row>
        <table:table-row table:style-name="ro1">
          <table:table-cell office:value-type="float" office:value="588.865295410156">
            <text:p>588.8652954102</text:p>
          </table:table-cell>
          <table:table-cell office:value-type="float" office:value="0.07144646">
            <text:p>0.07144646</text:p>
          </table:table-cell>
          <table:table-cell table:number-columns-repeated="4"/>
        </table:table-row>
        <table:table-row table:style-name="ro1">
          <table:table-cell office:value-type="float" office:value="588.983947753906">
            <text:p>588.9839477539</text:p>
          </table:table-cell>
          <table:table-cell office:value-type="float" office:value="0.06903376">
            <text:p>0.06903376</text:p>
          </table:table-cell>
          <table:table-cell table:number-columns-repeated="4"/>
        </table:table-row>
        <table:table-row table:style-name="ro1">
          <table:table-cell office:value-type="float" office:value="589.102600097656">
            <text:p>589.1026000977</text:p>
          </table:table-cell>
          <table:table-cell office:value-type="float" office:value="0.07934191">
            <text:p>0.07934191</text:p>
          </table:table-cell>
          <table:table-cell table:number-columns-repeated="4"/>
        </table:table-row>
        <table:table-row table:style-name="ro1">
          <table:table-cell office:value-type="float" office:value="589.221252441406">
            <text:p>589.2212524414</text:p>
          </table:table-cell>
          <table:table-cell office:value-type="float" office:value="0.06638607">
            <text:p>0.06638607</text:p>
          </table:table-cell>
          <table:table-cell table:number-columns-repeated="4"/>
        </table:table-row>
        <table:table-row table:style-name="ro1">
          <table:table-cell office:value-type="float" office:value="589.339904785156">
            <text:p>589.3399047852</text:p>
          </table:table-cell>
          <table:table-cell office:value-type="float" office:value="0.07176413">
            <text:p>0.07176413</text:p>
          </table:table-cell>
          <table:table-cell table:number-columns-repeated="4"/>
        </table:table-row>
        <table:table-row table:style-name="ro1">
          <table:table-cell office:value-type="float" office:value="589.458618164063">
            <text:p>589.4586181641</text:p>
          </table:table-cell>
          <table:table-cell office:value-type="float" office:value="0.07043135">
            <text:p>0.07043135</text:p>
          </table:table-cell>
          <table:table-cell table:number-columns-repeated="4"/>
        </table:table-row>
        <table:table-row table:style-name="ro1">
          <table:table-cell office:value-type="float" office:value="589.577270507813">
            <text:p>589.5772705078</text:p>
          </table:table-cell>
          <table:table-cell office:value-type="float" office:value="0.06721576">
            <text:p>0.06721576</text:p>
          </table:table-cell>
          <table:table-cell table:number-columns-repeated="4"/>
        </table:table-row>
        <table:table-row table:style-name="ro1">
          <table:table-cell office:value-type="float" office:value="589.695922851563">
            <text:p>589.6959228516</text:p>
          </table:table-cell>
          <table:table-cell office:value-type="float" office:value="0.08045437">
            <text:p>0.08045437</text:p>
          </table:table-cell>
          <table:table-cell table:number-columns-repeated="4"/>
        </table:table-row>
        <table:table-row table:style-name="ro1">
          <table:table-cell office:value-type="float" office:value="589.814636230469">
            <text:p>589.8146362305</text:p>
          </table:table-cell>
          <table:table-cell office:value-type="float" office:value="0.06763867">
            <text:p>0.06763867</text:p>
          </table:table-cell>
          <table:table-cell table:number-columns-repeated="4"/>
        </table:table-row>
        <table:table-row table:style-name="ro1">
          <table:table-cell office:value-type="float" office:value="589.933288574219">
            <text:p>589.9332885742</text:p>
          </table:table-cell>
          <table:table-cell office:value-type="float" office:value="0.07538771">
            <text:p>0.07538771</text:p>
          </table:table-cell>
          <table:table-cell table:number-columns-repeated="4"/>
        </table:table-row>
        <table:table-row table:style-name="ro1">
          <table:table-cell office:value-type="float" office:value="590.052001953125">
            <text:p>590.0520019531</text:p>
          </table:table-cell>
          <table:table-cell office:value-type="float" office:value="0.07009449">
            <text:p>0.07009449</text:p>
          </table:table-cell>
          <table:table-cell table:number-columns-repeated="4"/>
        </table:table-row>
        <table:table-row table:style-name="ro1">
          <table:table-cell office:value-type="float" office:value="590.170654296875">
            <text:p>590.1706542969</text:p>
          </table:table-cell>
          <table:table-cell office:value-type="float" office:value="0.07584747">
            <text:p>0.07584747</text:p>
          </table:table-cell>
          <table:table-cell table:number-columns-repeated="4"/>
        </table:table-row>
        <table:table-row table:style-name="ro1">
          <table:table-cell office:value-type="float" office:value="590.289367675781">
            <text:p>590.2893676758</text:p>
          </table:table-cell>
          <table:table-cell office:value-type="float" office:value="0.06675515">
            <text:p>0.06675515</text:p>
          </table:table-cell>
          <table:table-cell table:number-columns-repeated="4"/>
        </table:table-row>
        <table:table-row table:style-name="ro1">
          <table:table-cell office:value-type="float" office:value="590.408020019531">
            <text:p>590.4080200195</text:p>
          </table:table-cell>
          <table:table-cell office:value-type="float" office:value="0.110978">
            <text:p>0.110978</text:p>
          </table:table-cell>
          <table:table-cell table:number-columns-repeated="4"/>
        </table:table-row>
        <table:table-row table:style-name="ro1">
          <table:table-cell office:value-type="float" office:value="590.526733398438">
            <text:p>590.5267333984</text:p>
          </table:table-cell>
          <table:table-cell office:value-type="float" office:value="0.08119351">
            <text:p>0.08119351</text:p>
          </table:table-cell>
          <table:table-cell table:number-columns-repeated="4"/>
        </table:table-row>
        <table:table-row table:style-name="ro1">
          <table:table-cell office:value-type="float" office:value="590.645446777344">
            <text:p>590.6454467773</text:p>
          </table:table-cell>
          <table:table-cell office:value-type="float" office:value="0.07169659">
            <text:p>0.07169659</text:p>
          </table:table-cell>
          <table:table-cell table:number-columns-repeated="4"/>
        </table:table-row>
        <table:table-row table:style-name="ro1">
          <table:table-cell office:value-type="float" office:value="590.764099121094">
            <text:p>590.7640991211</text:p>
          </table:table-cell>
          <table:table-cell office:value-type="float" office:value="0.07238472">
            <text:p>0.07238472</text:p>
          </table:table-cell>
          <table:table-cell table:number-columns-repeated="4"/>
        </table:table-row>
        <table:table-row table:style-name="ro1">
          <table:table-cell office:value-type="float" office:value="590.8828125">
            <text:p>590.8828125</text:p>
          </table:table-cell>
          <table:table-cell office:value-type="float" office:value="0.08199774">
            <text:p>0.08199774</text:p>
          </table:table-cell>
          <table:table-cell table:number-columns-repeated="4"/>
        </table:table-row>
        <table:table-row table:style-name="ro1">
          <table:table-cell office:value-type="float" office:value="591.001525878906">
            <text:p>591.0015258789</text:p>
          </table:table-cell>
          <table:table-cell office:value-type="float" office:value="0.08361977">
            <text:p>0.08361977</text:p>
          </table:table-cell>
          <table:table-cell table:number-columns-repeated="4"/>
        </table:table-row>
        <table:table-row table:style-name="ro1">
          <table:table-cell office:value-type="float" office:value="591.120239257813">
            <text:p>591.1202392578</text:p>
          </table:table-cell>
          <table:table-cell office:value-type="float" office:value="0.07082599">
            <text:p>0.07082599</text:p>
          </table:table-cell>
          <table:table-cell table:number-columns-repeated="4"/>
        </table:table-row>
        <table:table-row table:style-name="ro1">
          <table:table-cell office:value-type="float" office:value="591.238891601563">
            <text:p>591.2388916016</text:p>
          </table:table-cell>
          <table:table-cell office:value-type="float" office:value="0.07128605">
            <text:p>0.07128605</text:p>
          </table:table-cell>
          <table:table-cell table:number-columns-repeated="4"/>
        </table:table-row>
        <table:table-row table:style-name="ro1">
          <table:table-cell office:value-type="float" office:value="591.357604980469">
            <text:p>591.3576049805</text:p>
          </table:table-cell>
          <table:table-cell office:value-type="float" office:value="0.08139445">
            <text:p>0.08139445</text:p>
          </table:table-cell>
          <table:table-cell table:number-columns-repeated="4"/>
        </table:table-row>
        <table:table-row table:style-name="ro1">
          <table:table-cell office:value-type="float" office:value="591.476318359375">
            <text:p>591.4763183594</text:p>
          </table:table-cell>
          <table:table-cell office:value-type="float" office:value="0.07322076">
            <text:p>0.07322076</text:p>
          </table:table-cell>
          <table:table-cell table:number-columns-repeated="4"/>
        </table:table-row>
        <table:table-row table:style-name="ro1">
          <table:table-cell office:value-type="float" office:value="591.595031738281">
            <text:p>591.5950317383</text:p>
          </table:table-cell>
          <table:table-cell office:value-type="float" office:value="0.08901983">
            <text:p>0.08901983</text:p>
          </table:table-cell>
          <table:table-cell table:number-columns-repeated="4"/>
        </table:table-row>
        <table:table-row table:style-name="ro1">
          <table:table-cell office:value-type="float" office:value="591.713745117188">
            <text:p>591.7137451172</text:p>
          </table:table-cell>
          <table:table-cell office:value-type="float" office:value="0.07538237">
            <text:p>0.07538237</text:p>
          </table:table-cell>
          <table:table-cell table:number-columns-repeated="4"/>
        </table:table-row>
        <table:table-row table:style-name="ro1">
          <table:table-cell office:value-type="float" office:value="591.832458496094">
            <text:p>591.8324584961</text:p>
          </table:table-cell>
          <table:table-cell office:value-type="float" office:value="0.08717962">
            <text:p>0.08717962</text:p>
          </table:table-cell>
          <table:table-cell table:number-columns-repeated="4"/>
        </table:table-row>
        <table:table-row table:style-name="ro1">
          <table:table-cell office:value-type="float" office:value="591.951232910156">
            <text:p>591.9512329102</text:p>
          </table:table-cell>
          <table:table-cell office:value-type="float" office:value="0.07707258">
            <text:p>0.07707258</text:p>
          </table:table-cell>
          <table:table-cell table:number-columns-repeated="4"/>
        </table:table-row>
        <table:table-row table:style-name="ro1">
          <table:table-cell office:value-type="float" office:value="592.069946289063">
            <text:p>592.0699462891</text:p>
          </table:table-cell>
          <table:table-cell office:value-type="float" office:value="0.07892475">
            <text:p>0.07892475</text:p>
          </table:table-cell>
          <table:table-cell table:number-columns-repeated="4"/>
        </table:table-row>
        <table:table-row table:style-name="ro1">
          <table:table-cell office:value-type="float" office:value="592.188659667969">
            <text:p>592.188659668</text:p>
          </table:table-cell>
          <table:table-cell office:value-type="float" office:value="0.06991798">
            <text:p>0.06991798</text:p>
          </table:table-cell>
          <table:table-cell table:number-columns-repeated="4"/>
        </table:table-row>
        <table:table-row table:style-name="ro1">
          <table:table-cell office:value-type="float" office:value="592.307373046875">
            <text:p>592.3073730469</text:p>
          </table:table-cell>
          <table:table-cell office:value-type="float" office:value="0.07195407">
            <text:p>0.07195407</text:p>
          </table:table-cell>
          <table:table-cell table:number-columns-repeated="4"/>
        </table:table-row>
        <table:table-row table:style-name="ro1">
          <table:table-cell office:value-type="float" office:value="592.426086425781">
            <text:p>592.4260864258</text:p>
          </table:table-cell>
          <table:table-cell office:value-type="float" office:value="0.09327196">
            <text:p>0.09327196</text:p>
          </table:table-cell>
          <table:table-cell table:number-columns-repeated="4"/>
        </table:table-row>
        <table:table-row table:style-name="ro1">
          <table:table-cell office:value-type="float" office:value="592.544860839844">
            <text:p>592.5448608398</text:p>
          </table:table-cell>
          <table:table-cell office:value-type="float" office:value="0.07309394">
            <text:p>0.07309394</text:p>
          </table:table-cell>
          <table:table-cell table:number-columns-repeated="4"/>
        </table:table-row>
        <table:table-row table:style-name="ro1">
          <table:table-cell office:value-type="float" office:value="592.66357421875">
            <text:p>592.6635742188</text:p>
          </table:table-cell>
          <table:table-cell office:value-type="float" office:value="0.06840932">
            <text:p>0.06840932</text:p>
          </table:table-cell>
          <table:table-cell table:number-columns-repeated="4"/>
        </table:table-row>
        <table:table-row table:style-name="ro1">
          <table:table-cell office:value-type="float" office:value="592.782348632813">
            <text:p>592.7823486328</text:p>
          </table:table-cell>
          <table:table-cell office:value-type="float" office:value="0.07007326">
            <text:p>0.07007326</text:p>
          </table:table-cell>
          <table:table-cell table:number-columns-repeated="4"/>
        </table:table-row>
        <table:table-row table:style-name="ro1">
          <table:table-cell office:value-type="float" office:value="592.901062011719">
            <text:p>592.9010620117</text:p>
          </table:table-cell>
          <table:table-cell office:value-type="float" office:value="0.07571002">
            <text:p>0.07571002</text:p>
          </table:table-cell>
          <table:table-cell table:number-columns-repeated="4"/>
        </table:table-row>
        <table:table-row table:style-name="ro1">
          <table:table-cell office:value-type="float" office:value="593.019775390625">
            <text:p>593.0197753906</text:p>
          </table:table-cell>
          <table:table-cell office:value-type="float" office:value="0.07166715">
            <text:p>0.07166715</text:p>
          </table:table-cell>
          <table:table-cell table:number-columns-repeated="4"/>
        </table:table-row>
        <table:table-row table:style-name="ro1">
          <table:table-cell office:value-type="float" office:value="593.138549804688">
            <text:p>593.1385498047</text:p>
          </table:table-cell>
          <table:table-cell office:value-type="float" office:value="0.06794086">
            <text:p>0.06794086</text:p>
          </table:table-cell>
          <table:table-cell table:number-columns-repeated="4"/>
        </table:table-row>
        <table:table-row table:style-name="ro1">
          <table:table-cell office:value-type="float" office:value="593.257263183594">
            <text:p>593.2572631836</text:p>
          </table:table-cell>
          <table:table-cell office:value-type="float" office:value="0.06715466">
            <text:p>0.06715466</text:p>
          </table:table-cell>
          <table:table-cell table:number-columns-repeated="4"/>
        </table:table-row>
        <table:table-row table:style-name="ro1">
          <table:table-cell office:value-type="float" office:value="593.376037597656">
            <text:p>593.3760375977</text:p>
          </table:table-cell>
          <table:table-cell office:value-type="float" office:value="0.06473645">
            <text:p>0.06473645</text:p>
          </table:table-cell>
          <table:table-cell table:number-columns-repeated="4"/>
        </table:table-row>
        <table:table-row table:style-name="ro1">
          <table:table-cell office:value-type="float" office:value="593.494812011719">
            <text:p>593.4948120117</text:p>
          </table:table-cell>
          <table:table-cell office:value-type="float" office:value="0.08026909">
            <text:p>0.08026909</text:p>
          </table:table-cell>
          <table:table-cell table:number-columns-repeated="4"/>
        </table:table-row>
        <table:table-row table:style-name="ro1">
          <table:table-cell office:value-type="float" office:value="593.613525390625">
            <text:p>593.6135253906</text:p>
          </table:table-cell>
          <table:table-cell office:value-type="float" office:value="0.07048456">
            <text:p>0.07048456</text:p>
          </table:table-cell>
          <table:table-cell table:number-columns-repeated="4"/>
        </table:table-row>
        <table:table-row table:style-name="ro1">
          <table:table-cell office:value-type="float" office:value="593.732299804688">
            <text:p>593.7322998047</text:p>
          </table:table-cell>
          <table:table-cell office:value-type="float" office:value="0.07243033">
            <text:p>0.07243033</text:p>
          </table:table-cell>
          <table:table-cell table:number-columns-repeated="4"/>
        </table:table-row>
        <table:table-row table:style-name="ro1">
          <table:table-cell office:value-type="float" office:value="593.85107421875">
            <text:p>593.8510742188</text:p>
          </table:table-cell>
          <table:table-cell office:value-type="float" office:value="0.07491228">
            <text:p>0.07491228</text:p>
          </table:table-cell>
          <table:table-cell table:number-columns-repeated="4"/>
        </table:table-row>
        <table:table-row table:style-name="ro1">
          <table:table-cell office:value-type="float" office:value="593.969848632813">
            <text:p>593.9698486328</text:p>
          </table:table-cell>
          <table:table-cell office:value-type="float" office:value="0.07239053">
            <text:p>0.07239053</text:p>
          </table:table-cell>
          <table:table-cell table:number-columns-repeated="4"/>
        </table:table-row>
        <table:table-row table:style-name="ro1">
          <table:table-cell office:value-type="float" office:value="594.088562011719">
            <text:p>594.0885620117</text:p>
          </table:table-cell>
          <table:table-cell office:value-type="float" office:value="0.07196144">
            <text:p>0.07196144</text:p>
          </table:table-cell>
          <table:table-cell table:number-columns-repeated="4"/>
        </table:table-row>
        <table:table-row table:style-name="ro1">
          <table:table-cell office:value-type="float" office:value="594.207336425781">
            <text:p>594.2073364258</text:p>
          </table:table-cell>
          <table:table-cell office:value-type="float" office:value="0.07426002">
            <text:p>0.07426002</text:p>
          </table:table-cell>
          <table:table-cell table:number-columns-repeated="4"/>
        </table:table-row>
        <table:table-row table:style-name="ro1">
          <table:table-cell office:value-type="float" office:value="594.326110839844">
            <text:p>594.3261108398</text:p>
          </table:table-cell>
          <table:table-cell office:value-type="float" office:value="0.07904654">
            <text:p>0.07904654</text:p>
          </table:table-cell>
          <table:table-cell table:number-columns-repeated="4"/>
        </table:table-row>
        <table:table-row table:style-name="ro1">
          <table:table-cell office:value-type="float" office:value="594.444885253906">
            <text:p>594.4448852539</text:p>
          </table:table-cell>
          <table:table-cell office:value-type="float" office:value="0.06817103">
            <text:p>0.06817103</text:p>
          </table:table-cell>
          <table:table-cell table:number-columns-repeated="4"/>
        </table:table-row>
        <table:table-row table:style-name="ro1">
          <table:table-cell office:value-type="float" office:value="594.563659667969">
            <text:p>594.563659668</text:p>
          </table:table-cell>
          <table:table-cell office:value-type="float" office:value="0.07263615">
            <text:p>0.07263615</text:p>
          </table:table-cell>
          <table:table-cell table:number-columns-repeated="4"/>
        </table:table-row>
        <table:table-row table:style-name="ro1">
          <table:table-cell office:value-type="float" office:value="594.682434082031">
            <text:p>594.682434082</text:p>
          </table:table-cell>
          <table:table-cell office:value-type="float" office:value="0.07798494">
            <text:p>0.07798494</text:p>
          </table:table-cell>
          <table:table-cell table:number-columns-repeated="4"/>
        </table:table-row>
        <table:table-row table:style-name="ro1">
          <table:table-cell office:value-type="float" office:value="594.801208496094">
            <text:p>594.8012084961</text:p>
          </table:table-cell>
          <table:table-cell office:value-type="float" office:value="0.07353937">
            <text:p>0.07353937</text:p>
          </table:table-cell>
          <table:table-cell table:number-columns-repeated="4"/>
        </table:table-row>
        <table:table-row table:style-name="ro1">
          <table:table-cell office:value-type="float" office:value="594.919982910156">
            <text:p>594.9199829102</text:p>
          </table:table-cell>
          <table:table-cell office:value-type="float" office:value="0.07070354">
            <text:p>0.07070354</text:p>
          </table:table-cell>
          <table:table-cell table:number-columns-repeated="4"/>
        </table:table-row>
        <table:table-row table:style-name="ro1">
          <table:table-cell office:value-type="float" office:value="595.038818359375">
            <text:p>595.0388183594</text:p>
          </table:table-cell>
          <table:table-cell office:value-type="float" office:value="0.0757013">
            <text:p>0.0757013</text:p>
          </table:table-cell>
          <table:table-cell table:number-columns-repeated="4"/>
        </table:table-row>
        <table:table-row table:style-name="ro1">
          <table:table-cell office:value-type="float" office:value="595.157592773438">
            <text:p>595.1575927734</text:p>
          </table:table-cell>
          <table:table-cell office:value-type="float" office:value="0.08596405">
            <text:p>0.08596405</text:p>
          </table:table-cell>
          <table:table-cell table:number-columns-repeated="4"/>
        </table:table-row>
        <table:table-row table:style-name="ro1">
          <table:table-cell office:value-type="float" office:value="595.2763671875">
            <text:p>595.2763671875</text:p>
          </table:table-cell>
          <table:table-cell office:value-type="float" office:value="0.0976532">
            <text:p>0.0976532</text:p>
          </table:table-cell>
          <table:table-cell table:number-columns-repeated="4"/>
        </table:table-row>
        <table:table-row table:style-name="ro1">
          <table:table-cell office:value-type="float" office:value="595.395141601563">
            <text:p>595.3951416016</text:p>
          </table:table-cell>
          <table:table-cell office:value-type="float" office:value="0.07616301">
            <text:p>0.07616301</text:p>
          </table:table-cell>
          <table:table-cell table:number-columns-repeated="4"/>
        </table:table-row>
        <table:table-row table:style-name="ro1">
          <table:table-cell office:value-type="float" office:value="595.513916015625">
            <text:p>595.5139160156</text:p>
          </table:table-cell>
          <table:table-cell office:value-type="float" office:value="0.08570496">
            <text:p>0.08570496</text:p>
          </table:table-cell>
          <table:table-cell table:number-columns-repeated="4"/>
        </table:table-row>
        <table:table-row table:style-name="ro1">
          <table:table-cell office:value-type="float" office:value="595.632751464844">
            <text:p>595.6327514648</text:p>
          </table:table-cell>
          <table:table-cell office:value-type="float" office:value="0.06752906">
            <text:p>0.06752906</text:p>
          </table:table-cell>
          <table:table-cell table:number-columns-repeated="4"/>
        </table:table-row>
        <table:table-row table:style-name="ro1">
          <table:table-cell office:value-type="float" office:value="595.751525878906">
            <text:p>595.7515258789</text:p>
          </table:table-cell>
          <table:table-cell office:value-type="float" office:value="0.07322523">
            <text:p>0.07322523</text:p>
          </table:table-cell>
          <table:table-cell table:number-columns-repeated="4"/>
        </table:table-row>
        <table:table-row table:style-name="ro1">
          <table:table-cell office:value-type="float" office:value="595.870361328125">
            <text:p>595.8703613281</text:p>
          </table:table-cell>
          <table:table-cell office:value-type="float" office:value="0.07228768">
            <text:p>0.07228768</text:p>
          </table:table-cell>
          <table:table-cell table:number-columns-repeated="4"/>
        </table:table-row>
        <table:table-row table:style-name="ro1">
          <table:table-cell office:value-type="float" office:value="595.989135742188">
            <text:p>595.9891357422</text:p>
          </table:table-cell>
          <table:table-cell office:value-type="float" office:value="0.08102891">
            <text:p>0.08102891</text:p>
          </table:table-cell>
          <table:table-cell table:number-columns-repeated="4"/>
        </table:table-row>
        <table:table-row table:style-name="ro1">
          <table:table-cell office:value-type="float" office:value="596.107971191406">
            <text:p>596.1079711914</text:p>
          </table:table-cell>
          <table:table-cell office:value-type="float" office:value="0.0744042">
            <text:p>0.0744042</text:p>
          </table:table-cell>
          <table:table-cell table:number-columns-repeated="4"/>
        </table:table-row>
        <table:table-row table:style-name="ro1">
          <table:table-cell office:value-type="float" office:value="596.226745605469">
            <text:p>596.2267456055</text:p>
          </table:table-cell>
          <table:table-cell office:value-type="float" office:value="0.07794451">
            <text:p>0.07794451</text:p>
          </table:table-cell>
          <table:table-cell table:number-columns-repeated="4"/>
        </table:table-row>
        <table:table-row table:style-name="ro1">
          <table:table-cell office:value-type="float" office:value="596.345581054688">
            <text:p>596.3455810547</text:p>
          </table:table-cell>
          <table:table-cell office:value-type="float" office:value="0.07226595">
            <text:p>0.07226595</text:p>
          </table:table-cell>
          <table:table-cell table:number-columns-repeated="4"/>
        </table:table-row>
        <table:table-row table:style-name="ro1">
          <table:table-cell office:value-type="float" office:value="596.46435546875">
            <text:p>596.4643554688</text:p>
          </table:table-cell>
          <table:table-cell office:value-type="float" office:value="0.08700141">
            <text:p>0.08700141</text:p>
          </table:table-cell>
          <table:table-cell table:number-columns-repeated="4"/>
        </table:table-row>
        <table:table-row table:style-name="ro1">
          <table:table-cell office:value-type="float" office:value="596.583190917969">
            <text:p>596.583190918</text:p>
          </table:table-cell>
          <table:table-cell office:value-type="float" office:value="0.0726882">
            <text:p>0.0726882</text:p>
          </table:table-cell>
          <table:table-cell table:number-columns-repeated="4"/>
        </table:table-row>
        <table:table-row table:style-name="ro1">
          <table:table-cell office:value-type="float" office:value="596.702026367188">
            <text:p>596.7020263672</text:p>
          </table:table-cell>
          <table:table-cell office:value-type="float" office:value="0.07667735">
            <text:p>0.07667735</text:p>
          </table:table-cell>
          <table:table-cell table:number-columns-repeated="4"/>
        </table:table-row>
        <table:table-row table:style-name="ro1">
          <table:table-cell office:value-type="float" office:value="596.82080078125">
            <text:p>596.8208007813</text:p>
          </table:table-cell>
          <table:table-cell office:value-type="float" office:value="0.0728642">
            <text:p>0.0728642</text:p>
          </table:table-cell>
          <table:table-cell table:number-columns-repeated="4"/>
        </table:table-row>
        <table:table-row table:style-name="ro1">
          <table:table-cell office:value-type="float" office:value="596.939636230469">
            <text:p>596.9396362305</text:p>
          </table:table-cell>
          <table:table-cell office:value-type="float" office:value="0.06963427">
            <text:p>0.06963427</text:p>
          </table:table-cell>
          <table:table-cell table:number-columns-repeated="4"/>
        </table:table-row>
        <table:table-row table:style-name="ro1">
          <table:table-cell office:value-type="float" office:value="597.058471679688">
            <text:p>597.0584716797</text:p>
          </table:table-cell>
          <table:table-cell office:value-type="float" office:value="0.07369681">
            <text:p>0.07369681</text:p>
          </table:table-cell>
          <table:table-cell table:number-columns-repeated="4"/>
        </table:table-row>
        <table:table-row table:style-name="ro1">
          <table:table-cell office:value-type="float" office:value="597.177307128906">
            <text:p>597.1773071289</text:p>
          </table:table-cell>
          <table:table-cell office:value-type="float" office:value="0.07049047">
            <text:p>0.07049047</text:p>
          </table:table-cell>
          <table:table-cell table:number-columns-repeated="4"/>
        </table:table-row>
        <table:table-row table:style-name="ro1">
          <table:table-cell office:value-type="float" office:value="597.296142578125">
            <text:p>597.2961425781</text:p>
          </table:table-cell>
          <table:table-cell office:value-type="float" office:value="0.08519378">
            <text:p>0.08519378</text:p>
          </table:table-cell>
          <table:table-cell table:number-columns-repeated="4"/>
        </table:table-row>
        <table:table-row table:style-name="ro1">
          <table:table-cell office:value-type="float" office:value="597.414978027344">
            <text:p>597.4149780273</text:p>
          </table:table-cell>
          <table:table-cell office:value-type="float" office:value="0.0723529">
            <text:p>0.0723529</text:p>
          </table:table-cell>
          <table:table-cell table:number-columns-repeated="4"/>
        </table:table-row>
        <table:table-row table:style-name="ro1">
          <table:table-cell office:value-type="float" office:value="597.533752441406">
            <text:p>597.5337524414</text:p>
          </table:table-cell>
          <table:table-cell office:value-type="float" office:value="0.06708834">
            <text:p>0.06708834</text:p>
          </table:table-cell>
          <table:table-cell table:number-columns-repeated="4"/>
        </table:table-row>
        <table:table-row table:style-name="ro1">
          <table:table-cell office:value-type="float" office:value="597.652587890625">
            <text:p>597.6525878906</text:p>
          </table:table-cell>
          <table:table-cell office:value-type="float" office:value="0.0922248">
            <text:p>0.0922248</text:p>
          </table:table-cell>
          <table:table-cell table:number-columns-repeated="4"/>
        </table:table-row>
        <table:table-row table:style-name="ro1">
          <table:table-cell office:value-type="float" office:value="597.771423339844">
            <text:p>597.7714233398</text:p>
          </table:table-cell>
          <table:table-cell office:value-type="float" office:value="0.07652646">
            <text:p>0.07652646</text:p>
          </table:table-cell>
          <table:table-cell table:number-columns-repeated="4"/>
        </table:table-row>
        <table:table-row table:style-name="ro1">
          <table:table-cell office:value-type="float" office:value="597.890319824219">
            <text:p>597.8903198242</text:p>
          </table:table-cell>
          <table:table-cell office:value-type="float" office:value="0.0790843">
            <text:p>0.0790843</text:p>
          </table:table-cell>
          <table:table-cell table:number-columns-repeated="4"/>
        </table:table-row>
        <table:table-row table:style-name="ro1">
          <table:table-cell office:value-type="float" office:value="598.009155273438">
            <text:p>598.0091552734</text:p>
          </table:table-cell>
          <table:table-cell office:value-type="float" office:value="0.07068836">
            <text:p>0.07068836</text:p>
          </table:table-cell>
          <table:table-cell table:number-columns-repeated="4"/>
        </table:table-row>
        <table:table-row table:style-name="ro1">
          <table:table-cell office:value-type="float" office:value="598.127990722656">
            <text:p>598.1279907227</text:p>
          </table:table-cell>
          <table:table-cell office:value-type="float" office:value="0.06732335">
            <text:p>0.06732335</text:p>
          </table:table-cell>
          <table:table-cell table:number-columns-repeated="4"/>
        </table:table-row>
        <table:table-row table:style-name="ro1">
          <table:table-cell office:value-type="float" office:value="598.246826171875">
            <text:p>598.2468261719</text:p>
          </table:table-cell>
          <table:table-cell office:value-type="float" office:value="0.07891299">
            <text:p>0.07891299</text:p>
          </table:table-cell>
          <table:table-cell table:number-columns-repeated="4"/>
        </table:table-row>
        <table:table-row table:style-name="ro1">
          <table:table-cell office:value-type="float" office:value="598.365661621094">
            <text:p>598.3656616211</text:p>
          </table:table-cell>
          <table:table-cell office:value-type="float" office:value="0.07509501">
            <text:p>0.07509501</text:p>
          </table:table-cell>
          <table:table-cell table:number-columns-repeated="4"/>
        </table:table-row>
        <table:table-row table:style-name="ro1">
          <table:table-cell office:value-type="float" office:value="598.484497070313">
            <text:p>598.4844970703</text:p>
          </table:table-cell>
          <table:table-cell office:value-type="float" office:value="0.0712619">
            <text:p>0.0712619</text:p>
          </table:table-cell>
          <table:table-cell table:number-columns-repeated="4"/>
        </table:table-row>
        <table:table-row table:style-name="ro1">
          <table:table-cell office:value-type="float" office:value="598.603393554688">
            <text:p>598.6033935547</text:p>
          </table:table-cell>
          <table:table-cell office:value-type="float" office:value="0.07927309">
            <text:p>0.07927309</text:p>
          </table:table-cell>
          <table:table-cell table:number-columns-repeated="4"/>
        </table:table-row>
        <table:table-row table:style-name="ro1">
          <table:table-cell office:value-type="float" office:value="598.722229003906">
            <text:p>598.7222290039</text:p>
          </table:table-cell>
          <table:table-cell office:value-type="float" office:value="0.0670452">
            <text:p>0.0670452</text:p>
          </table:table-cell>
          <table:table-cell table:number-columns-repeated="4"/>
        </table:table-row>
        <table:table-row table:style-name="ro1">
          <table:table-cell office:value-type="float" office:value="598.841064453125">
            <text:p>598.8410644531</text:p>
          </table:table-cell>
          <table:table-cell office:value-type="float" office:value="0.07028147">
            <text:p>0.07028147</text:p>
          </table:table-cell>
          <table:table-cell table:number-columns-repeated="4"/>
        </table:table-row>
        <table:table-row table:style-name="ro1">
          <table:table-cell office:value-type="float" office:value="598.9599609375">
            <text:p>598.9599609375</text:p>
          </table:table-cell>
          <table:table-cell office:value-type="float" office:value="0.08224248">
            <text:p>0.08224248</text:p>
          </table:table-cell>
          <table:table-cell table:number-columns-repeated="4"/>
        </table:table-row>
        <table:table-row table:style-name="ro1">
          <table:table-cell office:value-type="float" office:value="599.078796386719">
            <text:p>599.0787963867</text:p>
          </table:table-cell>
          <table:table-cell office:value-type="float" office:value="0.08205775">
            <text:p>0.08205775</text:p>
          </table:table-cell>
          <table:table-cell table:number-columns-repeated="4"/>
        </table:table-row>
        <table:table-row table:style-name="ro1">
          <table:table-cell office:value-type="float" office:value="599.197692871094">
            <text:p>599.1976928711</text:p>
          </table:table-cell>
          <table:table-cell office:value-type="float" office:value="0.07368904">
            <text:p>0.07368904</text:p>
          </table:table-cell>
          <table:table-cell table:number-columns-repeated="4"/>
        </table:table-row>
        <table:table-row table:style-name="ro1">
          <table:table-cell office:value-type="float" office:value="599.316528320313">
            <text:p>599.3165283203</text:p>
          </table:table-cell>
          <table:table-cell office:value-type="float" office:value="0.05925269">
            <text:p>0.05925269</text:p>
          </table:table-cell>
          <table:table-cell table:number-columns-repeated="4"/>
        </table:table-row>
        <table:table-row table:style-name="ro1">
          <table:table-cell office:value-type="float" office:value="599.435424804688">
            <text:p>599.4354248047</text:p>
          </table:table-cell>
          <table:table-cell office:value-type="float" office:value="0.07735862">
            <text:p>0.07735862</text:p>
          </table:table-cell>
          <table:table-cell table:number-columns-repeated="4"/>
        </table:table-row>
        <table:table-row table:style-name="ro1">
          <table:table-cell office:value-type="float" office:value="599.554321289063">
            <text:p>599.5543212891</text:p>
          </table:table-cell>
          <table:table-cell office:value-type="float" office:value="0.06355148">
            <text:p>0.06355148</text:p>
          </table:table-cell>
          <table:table-cell table:number-columns-repeated="4"/>
        </table:table-row>
        <table:table-row table:style-name="ro1">
          <table:table-cell office:value-type="float" office:value="599.673156738281">
            <text:p>599.6731567383</text:p>
          </table:table-cell>
          <table:table-cell office:value-type="float" office:value="0.06810462">
            <text:p>0.06810462</text:p>
          </table:table-cell>
          <table:table-cell table:number-columns-repeated="4"/>
        </table:table-row>
        <table:table-row table:style-name="ro1">
          <table:table-cell office:value-type="float" office:value="599.792053222656">
            <text:p>599.7920532227</text:p>
          </table:table-cell>
          <table:table-cell office:value-type="float" office:value="0.07364201">
            <text:p>0.07364201</text:p>
          </table:table-cell>
          <table:table-cell table:number-columns-repeated="4"/>
        </table:table-row>
        <table:table-row table:style-name="ro1">
          <table:table-cell office:value-type="float" office:value="599.910949707031">
            <text:p>599.910949707</text:p>
          </table:table-cell>
          <table:table-cell office:value-type="float" office:value="0.07610901">
            <text:p>0.07610901</text:p>
          </table:table-cell>
          <table:table-cell table:number-columns-repeated="4"/>
        </table:table-row>
        <table:table-row table:style-name="ro1">
          <table:table-cell office:value-type="float" office:value="600.02978515625">
            <text:p>600.0297851563</text:p>
          </table:table-cell>
          <table:table-cell office:value-type="float" office:value="0.06745543">
            <text:p>0.06745543</text:p>
          </table:table-cell>
          <table:table-cell table:number-columns-repeated="4"/>
        </table:table-row>
        <table:table-row table:style-name="ro1">
          <table:table-cell office:value-type="float" office:value="600.148681640625">
            <text:p>600.1486816406</text:p>
          </table:table-cell>
          <table:table-cell office:value-type="float" office:value="0.07393569">
            <text:p>0.07393569</text:p>
          </table:table-cell>
          <table:table-cell table:number-columns-repeated="4"/>
        </table:table-row>
        <table:table-row table:style-name="ro1">
          <table:table-cell office:value-type="float" office:value="600.267578125">
            <text:p>600.267578125</text:p>
          </table:table-cell>
          <table:table-cell office:value-type="float" office:value="0.06562489">
            <text:p>0.06562489</text:p>
          </table:table-cell>
          <table:table-cell table:number-columns-repeated="4"/>
        </table:table-row>
        <table:table-row table:style-name="ro1">
          <table:table-cell office:value-type="float" office:value="600.386474609375">
            <text:p>600.3864746094</text:p>
          </table:table-cell>
          <table:table-cell office:value-type="float" office:value="0.06189868">
            <text:p>0.06189868</text:p>
          </table:table-cell>
          <table:table-cell table:number-columns-repeated="4"/>
        </table:table-row>
        <table:table-row table:style-name="ro1">
          <table:table-cell office:value-type="float" office:value="600.50537109375">
            <text:p>600.5053710938</text:p>
          </table:table-cell>
          <table:table-cell office:value-type="float" office:value="0.08914656">
            <text:p>0.08914656</text:p>
          </table:table-cell>
          <table:table-cell table:number-columns-repeated="4"/>
        </table:table-row>
        <table:table-row table:style-name="ro1">
          <table:table-cell office:value-type="float" office:value="600.624267578125">
            <text:p>600.6242675781</text:p>
          </table:table-cell>
          <table:table-cell office:value-type="float" office:value="0.0614723">
            <text:p>0.0614723</text:p>
          </table:table-cell>
          <table:table-cell table:number-columns-repeated="4"/>
        </table:table-row>
        <table:table-row table:style-name="ro1">
          <table:table-cell office:value-type="float" office:value="600.7431640625">
            <text:p>600.7431640625</text:p>
          </table:table-cell>
          <table:table-cell office:value-type="float" office:value="0.06534249">
            <text:p>0.06534249</text:p>
          </table:table-cell>
          <table:table-cell table:number-columns-repeated="4"/>
        </table:table-row>
        <table:table-row table:style-name="ro1">
          <table:table-cell office:value-type="float" office:value="600.862060546875">
            <text:p>600.8620605469</text:p>
          </table:table-cell>
          <table:table-cell office:value-type="float" office:value="0.05787184">
            <text:p>0.05787184</text:p>
          </table:table-cell>
          <table:table-cell table:number-columns-repeated="4"/>
        </table:table-row>
        <table:table-row table:style-name="ro1">
          <table:table-cell office:value-type="float" office:value="600.98095703125">
            <text:p>600.9809570313</text:p>
          </table:table-cell>
          <table:table-cell office:value-type="float" office:value="0.06890547">
            <text:p>0.06890547</text:p>
          </table:table-cell>
          <table:table-cell table:number-columns-repeated="4"/>
        </table:table-row>
        <table:table-row table:style-name="ro1">
          <table:table-cell office:value-type="float" office:value="601.099853515625">
            <text:p>601.0998535156</text:p>
          </table:table-cell>
          <table:table-cell office:value-type="float" office:value="0.05781516">
            <text:p>0.05781516</text:p>
          </table:table-cell>
          <table:table-cell table:number-columns-repeated="4"/>
        </table:table-row>
        <table:table-row table:style-name="ro1">
          <table:table-cell office:value-type="float" office:value="601.21875">
            <text:p>601.21875</text:p>
          </table:table-cell>
          <table:table-cell office:value-type="float" office:value="0.06901065">
            <text:p>0.06901065</text:p>
          </table:table-cell>
          <table:table-cell table:number-columns-repeated="4"/>
        </table:table-row>
        <table:table-row table:style-name="ro1">
          <table:table-cell office:value-type="float" office:value="601.337646484375">
            <text:p>601.3376464844</text:p>
          </table:table-cell>
          <table:table-cell office:value-type="float" office:value="0.06757293">
            <text:p>0.06757293</text:p>
          </table:table-cell>
          <table:table-cell table:number-columns-repeated="4"/>
        </table:table-row>
        <table:table-row table:style-name="ro1">
          <table:table-cell office:value-type="float" office:value="601.45654296875">
            <text:p>601.4565429688</text:p>
          </table:table-cell>
          <table:table-cell office:value-type="float" office:value="0.06568985">
            <text:p>0.06568985</text:p>
          </table:table-cell>
          <table:table-cell table:number-columns-repeated="4"/>
        </table:table-row>
        <table:table-row table:style-name="ro1">
          <table:table-cell office:value-type="float" office:value="601.575500488281">
            <text:p>601.5755004883</text:p>
          </table:table-cell>
          <table:table-cell office:value-type="float" office:value="0.06343482">
            <text:p>0.06343482</text:p>
          </table:table-cell>
          <table:table-cell table:number-columns-repeated="4"/>
        </table:table-row>
        <table:table-row table:style-name="ro1">
          <table:table-cell office:value-type="float" office:value="601.694396972656">
            <text:p>601.6943969727</text:p>
          </table:table-cell>
          <table:table-cell office:value-type="float" office:value="0.0661107">
            <text:p>0.0661107</text:p>
          </table:table-cell>
          <table:table-cell table:number-columns-repeated="4"/>
        </table:table-row>
        <table:table-row table:style-name="ro1">
          <table:table-cell office:value-type="float" office:value="601.813293457031">
            <text:p>601.813293457</text:p>
          </table:table-cell>
          <table:table-cell office:value-type="float" office:value="0.067095">
            <text:p>0.067095</text:p>
          </table:table-cell>
          <table:table-cell table:number-columns-repeated="4"/>
        </table:table-row>
        <table:table-row table:style-name="ro1">
          <table:table-cell office:value-type="float" office:value="601.932250976563">
            <text:p>601.9322509766</text:p>
          </table:table-cell>
          <table:table-cell office:value-type="float" office:value="0.06222371">
            <text:p>0.06222371</text:p>
          </table:table-cell>
          <table:table-cell table:number-columns-repeated="4"/>
        </table:table-row>
        <table:table-row table:style-name="ro1">
          <table:table-cell office:value-type="float" office:value="602.051147460938">
            <text:p>602.0511474609</text:p>
          </table:table-cell>
          <table:table-cell office:value-type="float" office:value="0.06981472">
            <text:p>0.06981472</text:p>
          </table:table-cell>
          <table:table-cell table:number-columns-repeated="4"/>
        </table:table-row>
        <table:table-row table:style-name="ro1">
          <table:table-cell office:value-type="float" office:value="602.170043945313">
            <text:p>602.1700439453</text:p>
          </table:table-cell>
          <table:table-cell office:value-type="float" office:value="0.07259527">
            <text:p>0.07259527</text:p>
          </table:table-cell>
          <table:table-cell table:number-columns-repeated="4"/>
        </table:table-row>
        <table:table-row table:style-name="ro1">
          <table:table-cell office:value-type="float" office:value="602.289001464844">
            <text:p>602.2890014648</text:p>
          </table:table-cell>
          <table:table-cell office:value-type="float" office:value="0.05564091">
            <text:p>0.05564091</text:p>
          </table:table-cell>
          <table:table-cell table:number-columns-repeated="4"/>
        </table:table-row>
        <table:table-row table:style-name="ro1">
          <table:table-cell office:value-type="float" office:value="602.407897949219">
            <text:p>602.4078979492</text:p>
          </table:table-cell>
          <table:table-cell office:value-type="float" office:value="0.06792789">
            <text:p>0.06792789</text:p>
          </table:table-cell>
          <table:table-cell table:number-columns-repeated="4"/>
        </table:table-row>
        <table:table-row table:style-name="ro1">
          <table:table-cell office:value-type="float" office:value="602.52685546875">
            <text:p>602.5268554688</text:p>
          </table:table-cell>
          <table:table-cell office:value-type="float" office:value="0.0701895">
            <text:p>0.0701895</text:p>
          </table:table-cell>
          <table:table-cell table:number-columns-repeated="4"/>
        </table:table-row>
        <table:table-row table:style-name="ro1">
          <table:table-cell office:value-type="float" office:value="602.645751953125">
            <text:p>602.6457519531</text:p>
          </table:table-cell>
          <table:table-cell office:value-type="float" office:value="0.0552769">
            <text:p>0.0552769</text:p>
          </table:table-cell>
          <table:table-cell table:number-columns-repeated="4"/>
        </table:table-row>
        <table:table-row table:style-name="ro1">
          <table:table-cell office:value-type="float" office:value="602.764709472656">
            <text:p>602.7647094727</text:p>
          </table:table-cell>
          <table:table-cell office:value-type="float" office:value="0.05943139">
            <text:p>0.05943139</text:p>
          </table:table-cell>
          <table:table-cell table:number-columns-repeated="4"/>
        </table:table-row>
        <table:table-row table:style-name="ro1">
          <table:table-cell office:value-type="float" office:value="602.883666992188">
            <text:p>602.8836669922</text:p>
          </table:table-cell>
          <table:table-cell office:value-type="float" office:value="0.04947823">
            <text:p>0.04947823</text:p>
          </table:table-cell>
          <table:table-cell table:number-columns-repeated="4"/>
        </table:table-row>
        <table:table-row table:style-name="ro1">
          <table:table-cell office:value-type="float" office:value="603.002563476563">
            <text:p>603.0025634766</text:p>
          </table:table-cell>
          <table:table-cell office:value-type="float" office:value="0.06259546">
            <text:p>0.06259546</text:p>
          </table:table-cell>
          <table:table-cell table:number-columns-repeated="4"/>
        </table:table-row>
        <table:table-row table:style-name="ro1">
          <table:table-cell office:value-type="float" office:value="603.121520996094">
            <text:p>603.1215209961</text:p>
          </table:table-cell>
          <table:table-cell office:value-type="float" office:value="0.06607995">
            <text:p>0.06607995</text:p>
          </table:table-cell>
          <table:table-cell table:number-columns-repeated="4"/>
        </table:table-row>
        <table:table-row table:style-name="ro1">
          <table:table-cell office:value-type="float" office:value="603.240478515625">
            <text:p>603.2404785156</text:p>
          </table:table-cell>
          <table:table-cell office:value-type="float" office:value="0.06967249">
            <text:p>0.06967249</text:p>
          </table:table-cell>
          <table:table-cell table:number-columns-repeated="4"/>
        </table:table-row>
        <table:table-row table:style-name="ro1">
          <table:table-cell office:value-type="float" office:value="603.359436035156">
            <text:p>603.3594360352</text:p>
          </table:table-cell>
          <table:table-cell office:value-type="float" office:value="0.068726">
            <text:p>0.068726</text:p>
          </table:table-cell>
          <table:table-cell table:number-columns-repeated="4"/>
        </table:table-row>
        <table:table-row table:style-name="ro1">
          <table:table-cell office:value-type="float" office:value="603.478393554688">
            <text:p>603.4783935547</text:p>
          </table:table-cell>
          <table:table-cell office:value-type="float" office:value="0.06315722">
            <text:p>0.06315722</text:p>
          </table:table-cell>
          <table:table-cell table:number-columns-repeated="4"/>
        </table:table-row>
        <table:table-row table:style-name="ro1">
          <table:table-cell office:value-type="float" office:value="603.597290039063">
            <text:p>603.5972900391</text:p>
          </table:table-cell>
          <table:table-cell office:value-type="float" office:value="0.06109647">
            <text:p>0.06109647</text:p>
          </table:table-cell>
          <table:table-cell table:number-columns-repeated="4"/>
        </table:table-row>
        <table:table-row table:style-name="ro1">
          <table:table-cell office:value-type="float" office:value="603.716247558594">
            <text:p>603.7162475586</text:p>
          </table:table-cell>
          <table:table-cell office:value-type="float" office:value="0.05909023">
            <text:p>0.05909023</text:p>
          </table:table-cell>
          <table:table-cell table:number-columns-repeated="4"/>
        </table:table-row>
        <table:table-row table:style-name="ro1">
          <table:table-cell office:value-type="float" office:value="603.835205078125">
            <text:p>603.8352050781</text:p>
          </table:table-cell>
          <table:table-cell office:value-type="float" office:value="0.05341045">
            <text:p>0.05341045</text:p>
          </table:table-cell>
          <table:table-cell table:number-columns-repeated="4"/>
        </table:table-row>
        <table:table-row table:style-name="ro1">
          <table:table-cell office:value-type="float" office:value="603.954162597656">
            <text:p>603.9541625977</text:p>
          </table:table-cell>
          <table:table-cell office:value-type="float" office:value="0.05607511">
            <text:p>0.05607511</text:p>
          </table:table-cell>
          <table:table-cell table:number-columns-repeated="4"/>
        </table:table-row>
        <table:table-row table:style-name="ro1">
          <table:table-cell office:value-type="float" office:value="604.073120117188">
            <text:p>604.0731201172</text:p>
          </table:table-cell>
          <table:table-cell office:value-type="float" office:value="0.05640209">
            <text:p>0.05640209</text:p>
          </table:table-cell>
          <table:table-cell table:number-columns-repeated="4"/>
        </table:table-row>
        <table:table-row table:style-name="ro1">
          <table:table-cell office:value-type="float" office:value="604.192077636719">
            <text:p>604.1920776367</text:p>
          </table:table-cell>
          <table:table-cell office:value-type="float" office:value="0.05226659">
            <text:p>0.05226659</text:p>
          </table:table-cell>
          <table:table-cell table:number-columns-repeated="4"/>
        </table:table-row>
        <table:table-row table:style-name="ro1">
          <table:table-cell office:value-type="float" office:value="604.31103515625">
            <text:p>604.3110351563</text:p>
          </table:table-cell>
          <table:table-cell office:value-type="float" office:value="0.07398162">
            <text:p>0.07398162</text:p>
          </table:table-cell>
          <table:table-cell table:number-columns-repeated="4"/>
        </table:table-row>
        <table:table-row table:style-name="ro1">
          <table:table-cell office:value-type="float" office:value="604.430053710938">
            <text:p>604.4300537109</text:p>
          </table:table-cell>
          <table:table-cell office:value-type="float" office:value="0.05971526">
            <text:p>0.05971526</text:p>
          </table:table-cell>
          <table:table-cell table:number-columns-repeated="4"/>
        </table:table-row>
        <table:table-row table:style-name="ro1">
          <table:table-cell office:value-type="float" office:value="604.549011230469">
            <text:p>604.5490112305</text:p>
          </table:table-cell>
          <table:table-cell office:value-type="float" office:value="0.05516005">
            <text:p>0.05516005</text:p>
          </table:table-cell>
          <table:table-cell table:number-columns-repeated="4"/>
        </table:table-row>
        <table:table-row table:style-name="ro1">
          <table:table-cell office:value-type="float" office:value="604.66796875">
            <text:p>604.66796875</text:p>
          </table:table-cell>
          <table:table-cell office:value-type="float" office:value="0.05924747">
            <text:p>0.05924747</text:p>
          </table:table-cell>
          <table:table-cell table:number-columns-repeated="4"/>
        </table:table-row>
        <table:table-row table:style-name="ro1">
          <table:table-cell office:value-type="float" office:value="604.786926269531">
            <text:p>604.7869262695</text:p>
          </table:table-cell>
          <table:table-cell office:value-type="float" office:value="0.07052565">
            <text:p>0.07052565</text:p>
          </table:table-cell>
          <table:table-cell table:number-columns-repeated="4"/>
        </table:table-row>
        <table:table-row table:style-name="ro1">
          <table:table-cell office:value-type="float" office:value="604.905883789063">
            <text:p>604.9058837891</text:p>
          </table:table-cell>
          <table:table-cell office:value-type="float" office:value="0.06736496">
            <text:p>0.06736496</text:p>
          </table:table-cell>
          <table:table-cell table:number-columns-repeated="4"/>
        </table:table-row>
        <table:table-row table:style-name="ro1">
          <table:table-cell office:value-type="float" office:value="605.02490234375">
            <text:p>605.0249023438</text:p>
          </table:table-cell>
          <table:table-cell office:value-type="float" office:value="0.05691027">
            <text:p>0.05691027</text:p>
          </table:table-cell>
          <table:table-cell table:number-columns-repeated="4"/>
        </table:table-row>
        <table:table-row table:style-name="ro1">
          <table:table-cell office:value-type="float" office:value="605.143859863281">
            <text:p>605.1438598633</text:p>
          </table:table-cell>
          <table:table-cell office:value-type="float" office:value="0.05331087">
            <text:p>0.05331087</text:p>
          </table:table-cell>
          <table:table-cell table:number-columns-repeated="4"/>
        </table:table-row>
        <table:table-row table:style-name="ro1">
          <table:table-cell office:value-type="float" office:value="605.262817382813">
            <text:p>605.2628173828</text:p>
          </table:table-cell>
          <table:table-cell office:value-type="float" office:value="0.05200979">
            <text:p>0.05200979</text:p>
          </table:table-cell>
          <table:table-cell table:number-columns-repeated="4"/>
        </table:table-row>
        <table:table-row table:style-name="ro1">
          <table:table-cell office:value-type="float" office:value="605.3818359375">
            <text:p>605.3818359375</text:p>
          </table:table-cell>
          <table:table-cell office:value-type="float" office:value="0.05966297">
            <text:p>0.05966297</text:p>
          </table:table-cell>
          <table:table-cell table:number-columns-repeated="4"/>
        </table:table-row>
        <table:table-row table:style-name="ro1">
          <table:table-cell office:value-type="float" office:value="605.500793457031">
            <text:p>605.500793457</text:p>
          </table:table-cell>
          <table:table-cell office:value-type="float" office:value="0.05573616">
            <text:p>0.05573616</text:p>
          </table:table-cell>
          <table:table-cell table:number-columns-repeated="4"/>
        </table:table-row>
        <table:table-row table:style-name="ro1">
          <table:table-cell office:value-type="float" office:value="605.619812011719">
            <text:p>605.6198120117</text:p>
          </table:table-cell>
          <table:table-cell office:value-type="float" office:value="0.05871496">
            <text:p>0.05871496</text:p>
          </table:table-cell>
          <table:table-cell table:number-columns-repeated="4"/>
        </table:table-row>
        <table:table-row table:style-name="ro1">
          <table:table-cell office:value-type="float" office:value="605.73876953125">
            <text:p>605.7387695313</text:p>
          </table:table-cell>
          <table:table-cell office:value-type="float" office:value="0.05249537">
            <text:p>0.05249537</text:p>
          </table:table-cell>
          <table:table-cell table:number-columns-repeated="4"/>
        </table:table-row>
        <table:table-row table:style-name="ro1">
          <table:table-cell office:value-type="float" office:value="605.857788085938">
            <text:p>605.8577880859</text:p>
          </table:table-cell>
          <table:table-cell office:value-type="float" office:value="0.06720296">
            <text:p>0.06720296</text:p>
          </table:table-cell>
          <table:table-cell table:number-columns-repeated="4"/>
        </table:table-row>
        <table:table-row table:style-name="ro1">
          <table:table-cell office:value-type="float" office:value="605.976806640625">
            <text:p>605.9768066406</text:p>
          </table:table-cell>
          <table:table-cell office:value-type="float" office:value="0.06749181">
            <text:p>0.06749181</text:p>
          </table:table-cell>
          <table:table-cell table:number-columns-repeated="4"/>
        </table:table-row>
        <table:table-row table:style-name="ro1">
          <table:table-cell office:value-type="float" office:value="606.095764160156">
            <text:p>606.0957641602</text:p>
          </table:table-cell>
          <table:table-cell office:value-type="float" office:value="0.05979786">
            <text:p>0.05979786</text:p>
          </table:table-cell>
          <table:table-cell table:number-columns-repeated="4"/>
        </table:table-row>
        <table:table-row table:style-name="ro1">
          <table:table-cell office:value-type="float" office:value="606.214782714844">
            <text:p>606.2147827148</text:p>
          </table:table-cell>
          <table:table-cell office:value-type="float" office:value="0.06844915">
            <text:p>0.06844915</text:p>
          </table:table-cell>
          <table:table-cell table:number-columns-repeated="4"/>
        </table:table-row>
        <table:table-row table:style-name="ro1">
          <table:table-cell office:value-type="float" office:value="606.333801269531">
            <text:p>606.3338012695</text:p>
          </table:table-cell>
          <table:table-cell office:value-type="float" office:value="0.05088025">
            <text:p>0.05088025</text:p>
          </table:table-cell>
          <table:table-cell table:number-columns-repeated="4"/>
        </table:table-row>
        <table:table-row table:style-name="ro1">
          <table:table-cell office:value-type="float" office:value="606.452758789063">
            <text:p>606.4527587891</text:p>
          </table:table-cell>
          <table:table-cell office:value-type="float" office:value="0.06355003">
            <text:p>0.06355003</text:p>
          </table:table-cell>
          <table:table-cell table:number-columns-repeated="4"/>
        </table:table-row>
        <table:table-row table:style-name="ro1">
          <table:table-cell office:value-type="float" office:value="606.57177734375">
            <text:p>606.5717773438</text:p>
          </table:table-cell>
          <table:table-cell office:value-type="float" office:value="0.05133869">
            <text:p>0.05133869</text:p>
          </table:table-cell>
          <table:table-cell table:number-columns-repeated="4"/>
        </table:table-row>
        <table:table-row table:style-name="ro1">
          <table:table-cell office:value-type="float" office:value="606.690795898438">
            <text:p>606.6907958984</text:p>
          </table:table-cell>
          <table:table-cell office:value-type="float" office:value="0.05750957">
            <text:p>0.05750957</text:p>
          </table:table-cell>
          <table:table-cell table:number-columns-repeated="4"/>
        </table:table-row>
        <table:table-row table:style-name="ro1">
          <table:table-cell office:value-type="float" office:value="606.809814453125">
            <text:p>606.8098144531</text:p>
          </table:table-cell>
          <table:table-cell office:value-type="float" office:value="0.0512022">
            <text:p>0.0512022</text:p>
          </table:table-cell>
          <table:table-cell table:number-columns-repeated="4"/>
        </table:table-row>
        <table:table-row table:style-name="ro1">
          <table:table-cell office:value-type="float" office:value="606.928833007813">
            <text:p>606.9288330078</text:p>
          </table:table-cell>
          <table:table-cell office:value-type="float" office:value="0.05047608">
            <text:p>0.05047608</text:p>
          </table:table-cell>
          <table:table-cell table:number-columns-repeated="4"/>
        </table:table-row>
        <table:table-row table:style-name="ro1">
          <table:table-cell office:value-type="float" office:value="607.0478515625">
            <text:p>607.0478515625</text:p>
          </table:table-cell>
          <table:table-cell office:value-type="float" office:value="0.04847848">
            <text:p>0.04847848</text:p>
          </table:table-cell>
          <table:table-cell table:number-columns-repeated="4"/>
        </table:table-row>
        <table:table-row table:style-name="ro1">
          <table:table-cell office:value-type="float" office:value="607.166870117188">
            <text:p>607.1668701172</text:p>
          </table:table-cell>
          <table:table-cell office:value-type="float" office:value="0.07342699">
            <text:p>0.07342699</text:p>
          </table:table-cell>
          <table:table-cell table:number-columns-repeated="4"/>
        </table:table-row>
        <table:table-row table:style-name="ro1">
          <table:table-cell office:value-type="float" office:value="607.285888671875">
            <text:p>607.2858886719</text:p>
          </table:table-cell>
          <table:table-cell office:value-type="float" office:value="0.0638071">
            <text:p>0.0638071</text:p>
          </table:table-cell>
          <table:table-cell table:number-columns-repeated="4"/>
        </table:table-row>
        <table:table-row table:style-name="ro1">
          <table:table-cell office:value-type="float" office:value="607.404907226563">
            <text:p>607.4049072266</text:p>
          </table:table-cell>
          <table:table-cell office:value-type="float" office:value="0.05854284">
            <text:p>0.05854284</text:p>
          </table:table-cell>
          <table:table-cell table:number-columns-repeated="4"/>
        </table:table-row>
        <table:table-row table:style-name="ro1">
          <table:table-cell office:value-type="float" office:value="607.52392578125">
            <text:p>607.5239257813</text:p>
          </table:table-cell>
          <table:table-cell office:value-type="float" office:value="0.0564786">
            <text:p>0.0564786</text:p>
          </table:table-cell>
          <table:table-cell table:number-columns-repeated="4"/>
        </table:table-row>
        <table:table-row table:style-name="ro1">
          <table:table-cell office:value-type="float" office:value="607.642944335938">
            <text:p>607.6429443359</text:p>
          </table:table-cell>
          <table:table-cell office:value-type="float" office:value="0.06023746">
            <text:p>0.06023746</text:p>
          </table:table-cell>
          <table:table-cell table:number-columns-repeated="4"/>
        </table:table-row>
        <table:table-row table:style-name="ro1">
          <table:table-cell office:value-type="float" office:value="607.761962890625">
            <text:p>607.7619628906</text:p>
          </table:table-cell>
          <table:table-cell office:value-type="float" office:value="0.07362032">
            <text:p>0.07362032</text:p>
          </table:table-cell>
          <table:table-cell table:number-columns-repeated="4"/>
        </table:table-row>
        <table:table-row table:style-name="ro1">
          <table:table-cell office:value-type="float" office:value="607.880981445313">
            <text:p>607.8809814453</text:p>
          </table:table-cell>
          <table:table-cell office:value-type="float" office:value="0.06231278">
            <text:p>0.06231278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04811414">
            <text:p>0.04811414</text:p>
          </table:table-cell>
          <table:table-cell table:number-columns-repeated="4"/>
        </table:table-row>
        <table:table-row table:style-name="ro1">
          <table:table-cell office:value-type="float" office:value="608.119079589844">
            <text:p>608.1190795898</text:p>
          </table:table-cell>
          <table:table-cell office:value-type="float" office:value="0.05393625">
            <text:p>0.05393625</text:p>
          </table:table-cell>
          <table:table-cell table:number-columns-repeated="4"/>
        </table:table-row>
        <table:table-row table:style-name="ro1">
          <table:table-cell office:value-type="float" office:value="608.238098144531">
            <text:p>608.2380981445</text:p>
          </table:table-cell>
          <table:table-cell office:value-type="float" office:value="0.05335988">
            <text:p>0.05335988</text:p>
          </table:table-cell>
          <table:table-cell table:number-columns-repeated="4"/>
        </table:table-row>
        <table:table-row table:style-name="ro1">
          <table:table-cell office:value-type="float" office:value="608.357116699219">
            <text:p>608.3571166992</text:p>
          </table:table-cell>
          <table:table-cell office:value-type="float" office:value="0.05093348">
            <text:p>0.05093348</text:p>
          </table:table-cell>
          <table:table-cell table:number-columns-repeated="4"/>
        </table:table-row>
        <table:table-row table:style-name="ro1">
          <table:table-cell office:value-type="float" office:value="608.476196289063">
            <text:p>608.4761962891</text:p>
          </table:table-cell>
          <table:table-cell office:value-type="float" office:value="0.0578216">
            <text:p>0.0578216</text:p>
          </table:table-cell>
          <table:table-cell table:number-columns-repeated="4"/>
        </table:table-row>
        <table:table-row table:style-name="ro1">
          <table:table-cell office:value-type="float" office:value="608.59521484375">
            <text:p>608.5952148438</text:p>
          </table:table-cell>
          <table:table-cell office:value-type="float" office:value="0.06662382">
            <text:p>0.06662382</text:p>
          </table:table-cell>
          <table:table-cell table:number-columns-repeated="4"/>
        </table:table-row>
        <table:table-row table:style-name="ro1">
          <table:table-cell office:value-type="float" office:value="608.714233398438">
            <text:p>608.7142333984</text:p>
          </table:table-cell>
          <table:table-cell office:value-type="float" office:value="0.05644005">
            <text:p>0.05644005</text:p>
          </table:table-cell>
          <table:table-cell table:number-columns-repeated="4"/>
        </table:table-row>
        <table:table-row table:style-name="ro1">
          <table:table-cell office:value-type="float" office:value="608.833312988281">
            <text:p>608.8333129883</text:p>
          </table:table-cell>
          <table:table-cell office:value-type="float" office:value="0.05555602">
            <text:p>0.05555602</text:p>
          </table:table-cell>
          <table:table-cell table:number-columns-repeated="4"/>
        </table:table-row>
        <table:table-row table:style-name="ro1">
          <table:table-cell office:value-type="float" office:value="608.952331542969">
            <text:p>608.952331543</text:p>
          </table:table-cell>
          <table:table-cell office:value-type="float" office:value="0.0435193">
            <text:p>0.0435193</text:p>
          </table:table-cell>
          <table:table-cell table:number-columns-repeated="4"/>
        </table:table-row>
        <table:table-row table:style-name="ro1">
          <table:table-cell office:value-type="float" office:value="609.071411132813">
            <text:p>609.0714111328</text:p>
          </table:table-cell>
          <table:table-cell office:value-type="float" office:value="0.04698537">
            <text:p>0.04698537</text:p>
          </table:table-cell>
          <table:table-cell table:number-columns-repeated="4"/>
        </table:table-row>
        <table:table-row table:style-name="ro1">
          <table:table-cell office:value-type="float" office:value="609.1904296875">
            <text:p>609.1904296875</text:p>
          </table:table-cell>
          <table:table-cell office:value-type="float" office:value="0.04570476">
            <text:p>0.04570476</text:p>
          </table:table-cell>
          <table:table-cell table:number-columns-repeated="4"/>
        </table:table-row>
        <table:table-row table:style-name="ro1">
          <table:table-cell office:value-type="float" office:value="609.309509277344">
            <text:p>609.3095092773</text:p>
          </table:table-cell>
          <table:table-cell office:value-type="float" office:value="0.06553107">
            <text:p>0.06553107</text:p>
          </table:table-cell>
          <table:table-cell table:number-columns-repeated="4"/>
        </table:table-row>
        <table:table-row table:style-name="ro1">
          <table:table-cell office:value-type="float" office:value="609.428588867188">
            <text:p>609.4285888672</text:p>
          </table:table-cell>
          <table:table-cell office:value-type="float" office:value="0.05536323">
            <text:p>0.05536323</text:p>
          </table:table-cell>
          <table:table-cell table:number-columns-repeated="4"/>
        </table:table-row>
        <table:table-row table:style-name="ro1">
          <table:table-cell office:value-type="float" office:value="609.547607421875">
            <text:p>609.5476074219</text:p>
          </table:table-cell>
          <table:table-cell office:value-type="float" office:value="0.05432087">
            <text:p>0.05432087</text:p>
          </table:table-cell>
          <table:table-cell table:number-columns-repeated="4"/>
        </table:table-row>
        <table:table-row table:style-name="ro1">
          <table:table-cell office:value-type="float" office:value="609.666687011719">
            <text:p>609.6666870117</text:p>
          </table:table-cell>
          <table:table-cell office:value-type="float" office:value="0.05063243">
            <text:p>0.05063243</text:p>
          </table:table-cell>
          <table:table-cell table:number-columns-repeated="4"/>
        </table:table-row>
        <table:table-row table:style-name="ro1">
          <table:table-cell office:value-type="float" office:value="609.785766601563">
            <text:p>609.7857666016</text:p>
          </table:table-cell>
          <table:table-cell office:value-type="float" office:value="0.05108913">
            <text:p>0.05108913</text:p>
          </table:table-cell>
          <table:table-cell table:number-columns-repeated="4"/>
        </table:table-row>
        <table:table-row table:style-name="ro1">
          <table:table-cell office:value-type="float" office:value="609.904846191406">
            <text:p>609.9048461914</text:p>
          </table:table-cell>
          <table:table-cell office:value-type="float" office:value="0.05321408">
            <text:p>0.05321408</text:p>
          </table:table-cell>
          <table:table-cell table:number-columns-repeated="4"/>
        </table:table-row>
        <table:table-row table:style-name="ro1">
          <table:table-cell office:value-type="float" office:value="610.023864746094">
            <text:p>610.0238647461</text:p>
          </table:table-cell>
          <table:table-cell office:value-type="float" office:value="0.04840238">
            <text:p>0.04840238</text:p>
          </table:table-cell>
          <table:table-cell table:number-columns-repeated="4"/>
        </table:table-row>
        <table:table-row table:style-name="ro1">
          <table:table-cell office:value-type="float" office:value="610.142944335938">
            <text:p>610.1429443359</text:p>
          </table:table-cell>
          <table:table-cell office:value-type="float" office:value="0.04863781">
            <text:p>0.04863781</text:p>
          </table:table-cell>
          <table:table-cell table:number-columns-repeated="4"/>
        </table:table-row>
        <table:table-row table:style-name="ro1">
          <table:table-cell office:value-type="float" office:value="610.262023925781">
            <text:p>610.2620239258</text:p>
          </table:table-cell>
          <table:table-cell office:value-type="float" office:value="0.06614821">
            <text:p>0.06614821</text:p>
          </table:table-cell>
          <table:table-cell table:number-columns-repeated="4"/>
        </table:table-row>
        <table:table-row table:style-name="ro1">
          <table:table-cell office:value-type="float" office:value="610.381103515625">
            <text:p>610.3811035156</text:p>
          </table:table-cell>
          <table:table-cell office:value-type="float" office:value="0.05397267">
            <text:p>0.05397267</text:p>
          </table:table-cell>
          <table:table-cell table:number-columns-repeated="4"/>
        </table:table-row>
        <table:table-row table:style-name="ro1">
          <table:table-cell office:value-type="float" office:value="610.500183105469">
            <text:p>610.5001831055</text:p>
          </table:table-cell>
          <table:table-cell office:value-type="float" office:value="0.05033798">
            <text:p>0.05033798</text:p>
          </table:table-cell>
          <table:table-cell table:number-columns-repeated="4"/>
        </table:table-row>
        <table:table-row table:style-name="ro1">
          <table:table-cell office:value-type="float" office:value="610.619262695313">
            <text:p>610.6192626953</text:p>
          </table:table-cell>
          <table:table-cell office:value-type="float" office:value="0.04513494">
            <text:p>0.04513494</text:p>
          </table:table-cell>
          <table:table-cell table:number-columns-repeated="4"/>
        </table:table-row>
        <table:table-row table:style-name="ro1">
          <table:table-cell office:value-type="float" office:value="610.738342285156">
            <text:p>610.7383422852</text:p>
          </table:table-cell>
          <table:table-cell office:value-type="float" office:value="0.05275727">
            <text:p>0.05275727</text:p>
          </table:table-cell>
          <table:table-cell table:number-columns-repeated="4"/>
        </table:table-row>
        <table:table-row table:style-name="ro1">
          <table:table-cell office:value-type="float" office:value="610.857421875">
            <text:p>610.857421875</text:p>
          </table:table-cell>
          <table:table-cell office:value-type="float" office:value="0.04579607">
            <text:p>0.04579607</text:p>
          </table:table-cell>
          <table:table-cell table:number-columns-repeated="4"/>
        </table:table-row>
        <table:table-row table:style-name="ro1">
          <table:table-cell office:value-type="float" office:value="610.976501464844">
            <text:p>610.9765014648</text:p>
          </table:table-cell>
          <table:table-cell office:value-type="float" office:value="0.05604557">
            <text:p>0.05604557</text:p>
          </table:table-cell>
          <table:table-cell table:number-columns-repeated="4"/>
        </table:table-row>
        <table:table-row table:style-name="ro1">
          <table:table-cell office:value-type="float" office:value="611.095581054688">
            <text:p>611.0955810547</text:p>
          </table:table-cell>
          <table:table-cell office:value-type="float" office:value="0.05167941">
            <text:p>0.05167941</text:p>
          </table:table-cell>
          <table:table-cell table:number-columns-repeated="4"/>
        </table:table-row>
        <table:table-row table:style-name="ro1">
          <table:table-cell office:value-type="float" office:value="611.214660644531">
            <text:p>611.2146606445</text:p>
          </table:table-cell>
          <table:table-cell office:value-type="float" office:value="0.04903777">
            <text:p>0.04903777</text:p>
          </table:table-cell>
          <table:table-cell table:number-columns-repeated="4"/>
        </table:table-row>
        <table:table-row table:style-name="ro1">
          <table:table-cell office:value-type="float" office:value="611.333801269531">
            <text:p>611.3338012695</text:p>
          </table:table-cell>
          <table:table-cell office:value-type="float" office:value="0.04514287">
            <text:p>0.04514287</text:p>
          </table:table-cell>
          <table:table-cell table:number-columns-repeated="4"/>
        </table:table-row>
        <table:table-row table:style-name="ro1">
          <table:table-cell office:value-type="float" office:value="611.452880859375">
            <text:p>611.4528808594</text:p>
          </table:table-cell>
          <table:table-cell office:value-type="float" office:value="0.03813147">
            <text:p>0.03813147</text:p>
          </table:table-cell>
          <table:table-cell table:number-columns-repeated="4"/>
        </table:table-row>
        <table:table-row table:style-name="ro1">
          <table:table-cell office:value-type="float" office:value="611.571960449219">
            <text:p>611.5719604492</text:p>
          </table:table-cell>
          <table:table-cell office:value-type="float" office:value="0.05156971">
            <text:p>0.05156971</text:p>
          </table:table-cell>
          <table:table-cell table:number-columns-repeated="4"/>
        </table:table-row>
        <table:table-row table:style-name="ro1">
          <table:table-cell office:value-type="float" office:value="611.691040039063">
            <text:p>611.6910400391</text:p>
          </table:table-cell>
          <table:table-cell office:value-type="float" office:value="0.05174533">
            <text:p>0.05174533</text:p>
          </table:table-cell>
          <table:table-cell table:number-columns-repeated="4"/>
        </table:table-row>
        <table:table-row table:style-name="ro1">
          <table:table-cell office:value-type="float" office:value="611.810180664063">
            <text:p>611.8101806641</text:p>
          </table:table-cell>
          <table:table-cell office:value-type="float" office:value="0.05024236">
            <text:p>0.05024236</text:p>
          </table:table-cell>
          <table:table-cell table:number-columns-repeated="4"/>
        </table:table-row>
        <table:table-row table:style-name="ro1">
          <table:table-cell office:value-type="float" office:value="611.929260253906">
            <text:p>611.9292602539</text:p>
          </table:table-cell>
          <table:table-cell office:value-type="float" office:value="0.05042682">
            <text:p>0.05042682</text:p>
          </table:table-cell>
          <table:table-cell table:number-columns-repeated="4"/>
        </table:table-row>
        <table:table-row table:style-name="ro1">
          <table:table-cell office:value-type="float" office:value="612.048400878906">
            <text:p>612.0484008789</text:p>
          </table:table-cell>
          <table:table-cell office:value-type="float" office:value="0.05249576">
            <text:p>0.05249576</text:p>
          </table:table-cell>
          <table:table-cell table:number-columns-repeated="4"/>
        </table:table-row>
        <table:table-row table:style-name="ro1">
          <table:table-cell office:value-type="float" office:value="612.16748046875">
            <text:p>612.1674804688</text:p>
          </table:table-cell>
          <table:table-cell office:value-type="float" office:value="0.04338329">
            <text:p>0.04338329</text:p>
          </table:table-cell>
          <table:table-cell table:number-columns-repeated="4"/>
        </table:table-row>
        <table:table-row table:style-name="ro1">
          <table:table-cell office:value-type="float" office:value="612.286560058594">
            <text:p>612.2865600586</text:p>
          </table:table-cell>
          <table:table-cell office:value-type="float" office:value="0.05655515">
            <text:p>0.05655515</text:p>
          </table:table-cell>
          <table:table-cell table:number-columns-repeated="4"/>
        </table:table-row>
        <table:table-row table:style-name="ro1">
          <table:table-cell office:value-type="float" office:value="612.405700683594">
            <text:p>612.4057006836</text:p>
          </table:table-cell>
          <table:table-cell office:value-type="float" office:value="0.05627419">
            <text:p>0.05627419</text:p>
          </table:table-cell>
          <table:table-cell table:number-columns-repeated="4"/>
        </table:table-row>
        <table:table-row table:style-name="ro1">
          <table:table-cell office:value-type="float" office:value="612.524780273438">
            <text:p>612.5247802734</text:p>
          </table:table-cell>
          <table:table-cell office:value-type="float" office:value="0.04557366">
            <text:p>0.04557366</text:p>
          </table:table-cell>
          <table:table-cell table:number-columns-repeated="4"/>
        </table:table-row>
        <table:table-row table:style-name="ro1">
          <table:table-cell office:value-type="float" office:value="612.643920898438">
            <text:p>612.6439208984</text:p>
          </table:table-cell>
          <table:table-cell office:value-type="float" office:value="0.04099138">
            <text:p>0.04099138</text:p>
          </table:table-cell>
          <table:table-cell table:number-columns-repeated="4"/>
        </table:table-row>
        <table:table-row table:style-name="ro1">
          <table:table-cell office:value-type="float" office:value="612.763061523438">
            <text:p>612.7630615234</text:p>
          </table:table-cell>
          <table:table-cell office:value-type="float" office:value="0.05772086">
            <text:p>0.05772086</text:p>
          </table:table-cell>
          <table:table-cell table:number-columns-repeated="4"/>
        </table:table-row>
        <table:table-row table:style-name="ro1">
          <table:table-cell office:value-type="float" office:value="612.882141113281">
            <text:p>612.8821411133</text:p>
          </table:table-cell>
          <table:table-cell office:value-type="float" office:value="0.04215948">
            <text:p>0.04215948</text:p>
          </table:table-cell>
          <table:table-cell table:number-columns-repeated="4"/>
        </table:table-row>
        <table:table-row table:style-name="ro1">
          <table:table-cell office:value-type="float" office:value="613.001281738281">
            <text:p>613.0012817383</text:p>
          </table:table-cell>
          <table:table-cell office:value-type="float" office:value="0.04929098">
            <text:p>0.04929098</text:p>
          </table:table-cell>
          <table:table-cell table:number-columns-repeated="4"/>
        </table:table-row>
        <table:table-row table:style-name="ro1">
          <table:table-cell office:value-type="float" office:value="613.120422363281">
            <text:p>613.1204223633</text:p>
          </table:table-cell>
          <table:table-cell office:value-type="float" office:value="0.04438255">
            <text:p>0.04438255</text:p>
          </table:table-cell>
          <table:table-cell table:number-columns-repeated="4"/>
        </table:table-row>
        <table:table-row table:style-name="ro1">
          <table:table-cell office:value-type="float" office:value="613.239501953125">
            <text:p>613.2395019531</text:p>
          </table:table-cell>
          <table:table-cell office:value-type="float" office:value="0.04791564">
            <text:p>0.04791564</text:p>
          </table:table-cell>
          <table:table-cell table:number-columns-repeated="4"/>
        </table:table-row>
        <table:table-row table:style-name="ro1">
          <table:table-cell office:value-type="float" office:value="613.358642578125">
            <text:p>613.3586425781</text:p>
          </table:table-cell>
          <table:table-cell office:value-type="float" office:value="0.0512937">
            <text:p>0.0512937</text:p>
          </table:table-cell>
          <table:table-cell table:number-columns-repeated="4"/>
        </table:table-row>
        <table:table-row table:style-name="ro1">
          <table:table-cell office:value-type="float" office:value="613.477783203125">
            <text:p>613.4777832031</text:p>
          </table:table-cell>
          <table:table-cell office:value-type="float" office:value="0.04264011">
            <text:p>0.04264011</text:p>
          </table:table-cell>
          <table:table-cell table:number-columns-repeated="4"/>
        </table:table-row>
        <table:table-row table:style-name="ro1">
          <table:table-cell office:value-type="float" office:value="613.596923828125">
            <text:p>613.5969238281</text:p>
          </table:table-cell>
          <table:table-cell office:value-type="float" office:value="0.0375465">
            <text:p>0.0375465</text:p>
          </table:table-cell>
          <table:table-cell table:number-columns-repeated="4"/>
        </table:table-row>
        <table:table-row table:style-name="ro1">
          <table:table-cell office:value-type="float" office:value="613.716064453125">
            <text:p>613.7160644531</text:p>
          </table:table-cell>
          <table:table-cell office:value-type="float" office:value="0.04176578">
            <text:p>0.04176578</text:p>
          </table:table-cell>
          <table:table-cell table:number-columns-repeated="4"/>
        </table:table-row>
        <table:table-row table:style-name="ro1">
          <table:table-cell office:value-type="float" office:value="613.835205078125">
            <text:p>613.8352050781</text:p>
          </table:table-cell>
          <table:table-cell office:value-type="float" office:value="0.03978267">
            <text:p>0.03978267</text:p>
          </table:table-cell>
          <table:table-cell table:number-columns-repeated="4"/>
        </table:table-row>
        <table:table-row table:style-name="ro1">
          <table:table-cell office:value-type="float" office:value="613.954345703125">
            <text:p>613.9543457031</text:p>
          </table:table-cell>
          <table:table-cell office:value-type="float" office:value="0.03563439">
            <text:p>0.03563439</text:p>
          </table:table-cell>
          <table:table-cell table:number-columns-repeated="4"/>
        </table:table-row>
        <table:table-row table:style-name="ro1">
          <table:table-cell office:value-type="float" office:value="614.073486328125">
            <text:p>614.0734863281</text:p>
          </table:table-cell>
          <table:table-cell office:value-type="float" office:value="0.04286333">
            <text:p>0.04286333</text:p>
          </table:table-cell>
          <table:table-cell table:number-columns-repeated="4"/>
        </table:table-row>
        <table:table-row table:style-name="ro1">
          <table:table-cell office:value-type="float" office:value="614.192626953125">
            <text:p>614.1926269531</text:p>
          </table:table-cell>
          <table:table-cell office:value-type="float" office:value="0.06091668">
            <text:p>0.06091668</text:p>
          </table:table-cell>
          <table:table-cell table:number-columns-repeated="4"/>
        </table:table-row>
        <table:table-row table:style-name="ro1">
          <table:table-cell office:value-type="float" office:value="614.311767578125">
            <text:p>614.3117675781</text:p>
          </table:table-cell>
          <table:table-cell office:value-type="float" office:value="0.03991525">
            <text:p>0.03991525</text:p>
          </table:table-cell>
          <table:table-cell table:number-columns-repeated="4"/>
        </table:table-row>
        <table:table-row table:style-name="ro1">
          <table:table-cell office:value-type="float" office:value="614.430908203125">
            <text:p>614.4309082031</text:p>
          </table:table-cell>
          <table:table-cell office:value-type="float" office:value="0.03983856">
            <text:p>0.03983856</text:p>
          </table:table-cell>
          <table:table-cell table:number-columns-repeated="4"/>
        </table:table-row>
        <table:table-row table:style-name="ro1">
          <table:table-cell office:value-type="float" office:value="614.550048828125">
            <text:p>614.5500488281</text:p>
          </table:table-cell>
          <table:table-cell office:value-type="float" office:value="0.03892608">
            <text:p>0.03892608</text:p>
          </table:table-cell>
          <table:table-cell table:number-columns-repeated="4"/>
        </table:table-row>
        <table:table-row table:style-name="ro1">
          <table:table-cell office:value-type="float" office:value="614.669189453125">
            <text:p>614.6691894531</text:p>
          </table:table-cell>
          <table:table-cell office:value-type="float" office:value="0.05100325">
            <text:p>0.05100325</text:p>
          </table:table-cell>
          <table:table-cell table:number-columns-repeated="4"/>
        </table:table-row>
        <table:table-row table:style-name="ro1">
          <table:table-cell office:value-type="float" office:value="614.788330078125">
            <text:p>614.7883300781</text:p>
          </table:table-cell>
          <table:table-cell office:value-type="float" office:value="0.04126825">
            <text:p>0.04126825</text:p>
          </table:table-cell>
          <table:table-cell table:number-columns-repeated="4"/>
        </table:table-row>
        <table:table-row table:style-name="ro1">
          <table:table-cell office:value-type="float" office:value="614.907531738281">
            <text:p>614.9075317383</text:p>
          </table:table-cell>
          <table:table-cell office:value-type="float" office:value="0.04713809">
            <text:p>0.04713809</text:p>
          </table:table-cell>
          <table:table-cell table:number-columns-repeated="4"/>
        </table:table-row>
        <table:table-row table:style-name="ro1">
          <table:table-cell office:value-type="float" office:value="615.026672363281">
            <text:p>615.0266723633</text:p>
          </table:table-cell>
          <table:table-cell office:value-type="float" office:value="0.04586004">
            <text:p>0.04586004</text:p>
          </table:table-cell>
          <table:table-cell table:number-columns-repeated="4"/>
        </table:table-row>
        <table:table-row table:style-name="ro1">
          <table:table-cell office:value-type="float" office:value="615.145812988281">
            <text:p>615.1458129883</text:p>
          </table:table-cell>
          <table:table-cell office:value-type="float" office:value="0.06849706">
            <text:p>0.06849706</text:p>
          </table:table-cell>
          <table:table-cell table:number-columns-repeated="4"/>
        </table:table-row>
        <table:table-row table:style-name="ro1">
          <table:table-cell office:value-type="float" office:value="615.264953613281">
            <text:p>615.2649536133</text:p>
          </table:table-cell>
          <table:table-cell office:value-type="float" office:value="0.04738694">
            <text:p>0.04738694</text:p>
          </table:table-cell>
          <table:table-cell table:number-columns-repeated="4"/>
        </table:table-row>
        <table:table-row table:style-name="ro1">
          <table:table-cell office:value-type="float" office:value="615.384155273438">
            <text:p>615.3841552734</text:p>
          </table:table-cell>
          <table:table-cell office:value-type="float" office:value="0.0475142">
            <text:p>0.0475142</text:p>
          </table:table-cell>
          <table:table-cell table:number-columns-repeated="4"/>
        </table:table-row>
        <table:table-row table:style-name="ro1">
          <table:table-cell office:value-type="float" office:value="615.503295898438">
            <text:p>615.5032958984</text:p>
          </table:table-cell>
          <table:table-cell office:value-type="float" office:value="0.04074777">
            <text:p>0.04074777</text:p>
          </table:table-cell>
          <table:table-cell table:number-columns-repeated="4"/>
        </table:table-row>
        <table:table-row table:style-name="ro1">
          <table:table-cell office:value-type="float" office:value="615.622497558594">
            <text:p>615.6224975586</text:p>
          </table:table-cell>
          <table:table-cell office:value-type="float" office:value="0.051511">
            <text:p>0.051511</text:p>
          </table:table-cell>
          <table:table-cell table:number-columns-repeated="4"/>
        </table:table-row>
        <table:table-row table:style-name="ro1">
          <table:table-cell office:value-type="float" office:value="615.741638183594">
            <text:p>615.7416381836</text:p>
          </table:table-cell>
          <table:table-cell office:value-type="float" office:value="0.0402714">
            <text:p>0.0402714</text:p>
          </table:table-cell>
          <table:table-cell table:number-columns-repeated="4"/>
        </table:table-row>
        <table:table-row table:style-name="ro1">
          <table:table-cell office:value-type="float" office:value="615.86083984375">
            <text:p>615.8608398438</text:p>
          </table:table-cell>
          <table:table-cell office:value-type="float" office:value="0.04401043">
            <text:p>0.04401043</text:p>
          </table:table-cell>
          <table:table-cell table:number-columns-repeated="4"/>
        </table:table-row>
        <table:table-row table:style-name="ro1">
          <table:table-cell office:value-type="float" office:value="615.97998046875">
            <text:p>615.9799804688</text:p>
          </table:table-cell>
          <table:table-cell office:value-type="float" office:value="0.04018762">
            <text:p>0.04018762</text:p>
          </table:table-cell>
          <table:table-cell table:number-columns-repeated="4"/>
        </table:table-row>
        <table:table-row table:style-name="ro1">
          <table:table-cell office:value-type="float" office:value="616.099182128906">
            <text:p>616.0991821289</text:p>
          </table:table-cell>
          <table:table-cell office:value-type="float" office:value="0.04331971">
            <text:p>0.04331971</text:p>
          </table:table-cell>
          <table:table-cell table:number-columns-repeated="4"/>
        </table:table-row>
        <table:table-row table:style-name="ro1">
          <table:table-cell office:value-type="float" office:value="616.218322753906">
            <text:p>616.2183227539</text:p>
          </table:table-cell>
          <table:table-cell office:value-type="float" office:value="0.04842636">
            <text:p>0.04842636</text:p>
          </table:table-cell>
          <table:table-cell table:number-columns-repeated="4"/>
        </table:table-row>
        <table:table-row table:style-name="ro1">
          <table:table-cell office:value-type="float" office:value="616.337524414063">
            <text:p>616.3375244141</text:p>
          </table:table-cell>
          <table:table-cell office:value-type="float" office:value="0.03897236">
            <text:p>0.03897236</text:p>
          </table:table-cell>
          <table:table-cell table:number-columns-repeated="4"/>
        </table:table-row>
        <table:table-row table:style-name="ro1">
          <table:table-cell office:value-type="float" office:value="616.456726074219">
            <text:p>616.4567260742</text:p>
          </table:table-cell>
          <table:table-cell office:value-type="float" office:value="0.05567114">
            <text:p>0.05567114</text:p>
          </table:table-cell>
          <table:table-cell table:number-columns-repeated="4"/>
        </table:table-row>
        <table:table-row table:style-name="ro1">
          <table:table-cell office:value-type="float" office:value="616.575866699219">
            <text:p>616.5758666992</text:p>
          </table:table-cell>
          <table:table-cell office:value-type="float" office:value="0.03904037">
            <text:p>0.03904037</text:p>
          </table:table-cell>
          <table:table-cell table:number-columns-repeated="4"/>
        </table:table-row>
        <table:table-row table:style-name="ro1">
          <table:table-cell office:value-type="float" office:value="616.695068359375">
            <text:p>616.6950683594</text:p>
          </table:table-cell>
          <table:table-cell office:value-type="float" office:value="0.03420458">
            <text:p>0.03420458</text:p>
          </table:table-cell>
          <table:table-cell table:number-columns-repeated="4"/>
        </table:table-row>
        <table:table-row table:style-name="ro1">
          <table:table-cell office:value-type="float" office:value="616.814270019531">
            <text:p>616.8142700195</text:p>
          </table:table-cell>
          <table:table-cell office:value-type="float" office:value="0.03848841">
            <text:p>0.03848841</text:p>
          </table:table-cell>
          <table:table-cell table:number-columns-repeated="4"/>
        </table:table-row>
        <table:table-row table:style-name="ro1">
          <table:table-cell office:value-type="float" office:value="616.933471679688">
            <text:p>616.9334716797</text:p>
          </table:table-cell>
          <table:table-cell office:value-type="float" office:value="0.04354609">
            <text:p>0.04354609</text:p>
          </table:table-cell>
          <table:table-cell table:number-columns-repeated="4"/>
        </table:table-row>
        <table:table-row table:style-name="ro1">
          <table:table-cell office:value-type="float" office:value="617.052612304688">
            <text:p>617.0526123047</text:p>
          </table:table-cell>
          <table:table-cell office:value-type="float" office:value="0.04088763">
            <text:p>0.04088763</text:p>
          </table:table-cell>
          <table:table-cell table:number-columns-repeated="4"/>
        </table:table-row>
        <table:table-row table:style-name="ro1">
          <table:table-cell office:value-type="float" office:value="617.171813964844">
            <text:p>617.1718139648</text:p>
          </table:table-cell>
          <table:table-cell office:value-type="float" office:value="0.05001135">
            <text:p>0.05001135</text:p>
          </table:table-cell>
          <table:table-cell table:number-columns-repeated="4"/>
        </table:table-row>
        <table:table-row table:style-name="ro1">
          <table:table-cell office:value-type="float" office:value="617.291015625">
            <text:p>617.291015625</text:p>
          </table:table-cell>
          <table:table-cell office:value-type="float" office:value="0.03729123">
            <text:p>0.03729123</text:p>
          </table:table-cell>
          <table:table-cell table:number-columns-repeated="4"/>
        </table:table-row>
        <table:table-row table:style-name="ro1">
          <table:table-cell office:value-type="float" office:value="617.410217285156">
            <text:p>617.4102172852</text:p>
          </table:table-cell>
          <table:table-cell office:value-type="float" office:value="0.0414369">
            <text:p>0.0414369</text:p>
          </table:table-cell>
          <table:table-cell table:number-columns-repeated="4"/>
        </table:table-row>
        <table:table-row table:style-name="ro1">
          <table:table-cell office:value-type="float" office:value="617.529418945313">
            <text:p>617.5294189453</text:p>
          </table:table-cell>
          <table:table-cell office:value-type="float" office:value="0.04895229">
            <text:p>0.04895229</text:p>
          </table:table-cell>
          <table:table-cell table:number-columns-repeated="4"/>
        </table:table-row>
        <table:table-row table:style-name="ro1">
          <table:table-cell office:value-type="float" office:value="617.648620605469">
            <text:p>617.6486206055</text:p>
          </table:table-cell>
          <table:table-cell office:value-type="float" office:value="0.03931634">
            <text:p>0.03931634</text:p>
          </table:table-cell>
          <table:table-cell table:number-columns-repeated="4"/>
        </table:table-row>
        <table:table-row table:style-name="ro1">
          <table:table-cell office:value-type="float" office:value="617.767822265625">
            <text:p>617.7678222656</text:p>
          </table:table-cell>
          <table:table-cell office:value-type="float" office:value="0.06268828">
            <text:p>0.06268828</text:p>
          </table:table-cell>
          <table:table-cell table:number-columns-repeated="4"/>
        </table:table-row>
        <table:table-row table:style-name="ro1">
          <table:table-cell office:value-type="float" office:value="617.887023925781">
            <text:p>617.8870239258</text:p>
          </table:table-cell>
          <table:table-cell office:value-type="float" office:value="0.0474587">
            <text:p>0.0474587</text:p>
          </table:table-cell>
          <table:table-cell table:number-columns-repeated="4"/>
        </table:table-row>
        <table:table-row table:style-name="ro1">
          <table:table-cell office:value-type="float" office:value="618.006225585938">
            <text:p>618.0062255859</text:p>
          </table:table-cell>
          <table:table-cell office:value-type="float" office:value="0.03896745">
            <text:p>0.03896745</text:p>
          </table:table-cell>
          <table:table-cell table:number-columns-repeated="4"/>
        </table:table-row>
        <table:table-row table:style-name="ro1">
          <table:table-cell office:value-type="float" office:value="618.125427246094">
            <text:p>618.1254272461</text:p>
          </table:table-cell>
          <table:table-cell office:value-type="float" office:value="0.0458727">
            <text:p>0.0458727</text:p>
          </table:table-cell>
          <table:table-cell table:number-columns-repeated="4"/>
        </table:table-row>
        <table:table-row table:style-name="ro1">
          <table:table-cell office:value-type="float" office:value="618.24462890625">
            <text:p>618.2446289063</text:p>
          </table:table-cell>
          <table:table-cell office:value-type="float" office:value="0.04913798">
            <text:p>0.04913798</text:p>
          </table:table-cell>
          <table:table-cell table:number-columns-repeated="4"/>
        </table:table-row>
        <table:table-row table:style-name="ro1">
          <table:table-cell office:value-type="float" office:value="618.363891601563">
            <text:p>618.3638916016</text:p>
          </table:table-cell>
          <table:table-cell office:value-type="float" office:value="0.04876217">
            <text:p>0.04876217</text:p>
          </table:table-cell>
          <table:table-cell table:number-columns-repeated="4"/>
        </table:table-row>
        <table:table-row table:style-name="ro1">
          <table:table-cell office:value-type="float" office:value="618.483093261719">
            <text:p>618.4830932617</text:p>
          </table:table-cell>
          <table:table-cell office:value-type="float" office:value="0.03861804">
            <text:p>0.03861804</text:p>
          </table:table-cell>
          <table:table-cell table:number-columns-repeated="4"/>
        </table:table-row>
        <table:table-row table:style-name="ro1">
          <table:table-cell office:value-type="float" office:value="618.602294921875">
            <text:p>618.6022949219</text:p>
          </table:table-cell>
          <table:table-cell office:value-type="float" office:value="0.04404318">
            <text:p>0.04404318</text:p>
          </table:table-cell>
          <table:table-cell table:number-columns-repeated="4"/>
        </table:table-row>
        <table:table-row table:style-name="ro1">
          <table:table-cell office:value-type="float" office:value="618.721496582031">
            <text:p>618.721496582</text:p>
          </table:table-cell>
          <table:table-cell office:value-type="float" office:value="0.05566253">
            <text:p>0.05566253</text:p>
          </table:table-cell>
          <table:table-cell table:number-columns-repeated="4"/>
        </table:table-row>
        <table:table-row table:style-name="ro1">
          <table:table-cell office:value-type="float" office:value="618.840759277344">
            <text:p>618.8407592773</text:p>
          </table:table-cell>
          <table:table-cell office:value-type="float" office:value="0.03579815">
            <text:p>0.03579815</text:p>
          </table:table-cell>
          <table:table-cell table:number-columns-repeated="4"/>
        </table:table-row>
        <table:table-row table:style-name="ro1">
          <table:table-cell office:value-type="float" office:value="618.9599609375">
            <text:p>618.9599609375</text:p>
          </table:table-cell>
          <table:table-cell office:value-type="float" office:value="0.04800464">
            <text:p>0.04800464</text:p>
          </table:table-cell>
          <table:table-cell table:number-columns-repeated="4"/>
        </table:table-row>
        <table:table-row table:style-name="ro1">
          <table:table-cell office:value-type="float" office:value="619.079162597656">
            <text:p>619.0791625977</text:p>
          </table:table-cell>
          <table:table-cell office:value-type="float" office:value="0.03233997">
            <text:p>0.03233997</text:p>
          </table:table-cell>
          <table:table-cell table:number-columns-repeated="4"/>
        </table:table-row>
        <table:table-row table:style-name="ro1">
          <table:table-cell office:value-type="float" office:value="619.198425292969">
            <text:p>619.198425293</text:p>
          </table:table-cell>
          <table:table-cell office:value-type="float" office:value="0.05363645">
            <text:p>0.05363645</text:p>
          </table:table-cell>
          <table:table-cell table:number-columns-repeated="4"/>
        </table:table-row>
        <table:table-row table:style-name="ro1">
          <table:table-cell office:value-type="float" office:value="619.317626953125">
            <text:p>619.3176269531</text:p>
          </table:table-cell>
          <table:table-cell office:value-type="float" office:value="0.03720119">
            <text:p>0.03720119</text:p>
          </table:table-cell>
          <table:table-cell table:number-columns-repeated="4"/>
        </table:table-row>
        <table:table-row table:style-name="ro1">
          <table:table-cell office:value-type="float" office:value="619.436889648438">
            <text:p>619.4368896484</text:p>
          </table:table-cell>
          <table:table-cell office:value-type="float" office:value="0.0474282">
            <text:p>0.0474282</text:p>
          </table:table-cell>
          <table:table-cell table:number-columns-repeated="4"/>
        </table:table-row>
        <table:table-row table:style-name="ro1">
          <table:table-cell office:value-type="float" office:value="619.556091308594">
            <text:p>619.5560913086</text:p>
          </table:table-cell>
          <table:table-cell office:value-type="float" office:value="0.04122242">
            <text:p>0.04122242</text:p>
          </table:table-cell>
          <table:table-cell table:number-columns-repeated="4"/>
        </table:table-row>
        <table:table-row table:style-name="ro1">
          <table:table-cell office:value-type="float" office:value="619.675354003906">
            <text:p>619.6753540039</text:p>
          </table:table-cell>
          <table:table-cell office:value-type="float" office:value="0.0363275">
            <text:p>0.0363275</text:p>
          </table:table-cell>
          <table:table-cell table:number-columns-repeated="4"/>
        </table:table-row>
        <table:table-row table:style-name="ro1">
          <table:table-cell office:value-type="float" office:value="619.794616699219">
            <text:p>619.7946166992</text:p>
          </table:table-cell>
          <table:table-cell office:value-type="float" office:value="0.04323841">
            <text:p>0.04323841</text:p>
          </table:table-cell>
          <table:table-cell table:number-columns-repeated="4"/>
        </table:table-row>
        <table:table-row table:style-name="ro1">
          <table:table-cell office:value-type="float" office:value="619.913818359375">
            <text:p>619.9138183594</text:p>
          </table:table-cell>
          <table:table-cell office:value-type="float" office:value="0.0315911">
            <text:p>0.0315911</text:p>
          </table:table-cell>
          <table:table-cell table:number-columns-repeated="4"/>
        </table:table-row>
        <table:table-row table:style-name="ro1">
          <table:table-cell office:value-type="float" office:value="620.033081054688">
            <text:p>620.0330810547</text:p>
          </table:table-cell>
          <table:table-cell office:value-type="float" office:value="0.05732885">
            <text:p>0.05732885</text:p>
          </table:table-cell>
          <table:table-cell table:number-columns-repeated="4"/>
        </table:table-row>
        <table:table-row table:style-name="ro1">
          <table:table-cell office:value-type="float" office:value="620.152282714844">
            <text:p>620.1522827148</text:p>
          </table:table-cell>
          <table:table-cell office:value-type="float" office:value="0.04524906">
            <text:p>0.04524906</text:p>
          </table:table-cell>
          <table:table-cell table:number-columns-repeated="4"/>
        </table:table-row>
        <table:table-row table:style-name="ro1">
          <table:table-cell office:value-type="float" office:value="620.271545410156">
            <text:p>620.2715454102</text:p>
          </table:table-cell>
          <table:table-cell office:value-type="float" office:value="0.04262184">
            <text:p>0.04262184</text:p>
          </table:table-cell>
          <table:table-cell table:number-columns-repeated="4"/>
        </table:table-row>
        <table:table-row table:style-name="ro1">
          <table:table-cell office:value-type="float" office:value="620.390808105469">
            <text:p>620.3908081055</text:p>
          </table:table-cell>
          <table:table-cell office:value-type="float" office:value="0.03255963">
            <text:p>0.03255963</text:p>
          </table:table-cell>
          <table:table-cell table:number-columns-repeated="4"/>
        </table:table-row>
        <table:table-row table:style-name="ro1">
          <table:table-cell office:value-type="float" office:value="620.510070800781">
            <text:p>620.5100708008</text:p>
          </table:table-cell>
          <table:table-cell office:value-type="float" office:value="0.0367791">
            <text:p>0.0367791</text:p>
          </table:table-cell>
          <table:table-cell table:number-columns-repeated="4"/>
        </table:table-row>
        <table:table-row table:style-name="ro1">
          <table:table-cell office:value-type="float" office:value="620.629333496094">
            <text:p>620.6293334961</text:p>
          </table:table-cell>
          <table:table-cell office:value-type="float" office:value="0.03683108">
            <text:p>0.03683108</text:p>
          </table:table-cell>
          <table:table-cell table:number-columns-repeated="4"/>
        </table:table-row>
        <table:table-row table:style-name="ro1">
          <table:table-cell office:value-type="float" office:value="620.74853515625">
            <text:p>620.7485351563</text:p>
          </table:table-cell>
          <table:table-cell office:value-type="float" office:value="0.02915768">
            <text:p>0.02915768</text:p>
          </table:table-cell>
          <table:table-cell table:number-columns-repeated="4"/>
        </table:table-row>
        <table:table-row table:style-name="ro1">
          <table:table-cell office:value-type="float" office:value="620.867797851563">
            <text:p>620.8677978516</text:p>
          </table:table-cell>
          <table:table-cell office:value-type="float" office:value="0.06304841">
            <text:p>0.06304841</text:p>
          </table:table-cell>
          <table:table-cell table:number-columns-repeated="4"/>
        </table:table-row>
        <table:table-row table:style-name="ro1">
          <table:table-cell office:value-type="float" office:value="620.987060546875">
            <text:p>620.9870605469</text:p>
          </table:table-cell>
          <table:table-cell office:value-type="float" office:value="0.03511819">
            <text:p>0.03511819</text:p>
          </table:table-cell>
          <table:table-cell table:number-columns-repeated="4"/>
        </table:table-row>
        <table:table-row table:style-name="ro1">
          <table:table-cell office:value-type="float" office:value="621.106323242188">
            <text:p>621.1063232422</text:p>
          </table:table-cell>
          <table:table-cell office:value-type="float" office:value="0.03485872">
            <text:p>0.03485872</text:p>
          </table:table-cell>
          <table:table-cell table:number-columns-repeated="4"/>
        </table:table-row>
        <table:table-row table:style-name="ro1">
          <table:table-cell office:value-type="float" office:value="621.2255859375">
            <text:p>621.2255859375</text:p>
          </table:table-cell>
          <table:table-cell office:value-type="float" office:value="0.04022815">
            <text:p>0.04022815</text:p>
          </table:table-cell>
          <table:table-cell table:number-columns-repeated="4"/>
        </table:table-row>
        <table:table-row table:style-name="ro1">
          <table:table-cell office:value-type="float" office:value="621.344848632813">
            <text:p>621.3448486328</text:p>
          </table:table-cell>
          <table:table-cell office:value-type="float" office:value="0.03178718">
            <text:p>0.03178718</text:p>
          </table:table-cell>
          <table:table-cell table:number-columns-repeated="4"/>
        </table:table-row>
        <table:table-row table:style-name="ro1">
          <table:table-cell office:value-type="float" office:value="621.464111328125">
            <text:p>621.4641113281</text:p>
          </table:table-cell>
          <table:table-cell office:value-type="float" office:value="0.03357757">
            <text:p>0.03357757</text:p>
          </table:table-cell>
          <table:table-cell table:number-columns-repeated="4"/>
        </table:table-row>
        <table:table-row table:style-name="ro1">
          <table:table-cell office:value-type="float" office:value="621.583374023438">
            <text:p>621.5833740234</text:p>
          </table:table-cell>
          <table:table-cell office:value-type="float" office:value="0.05942736">
            <text:p>0.05942736</text:p>
          </table:table-cell>
          <table:table-cell table:number-columns-repeated="4"/>
        </table:table-row>
        <table:table-row table:style-name="ro1">
          <table:table-cell office:value-type="float" office:value="621.70263671875">
            <text:p>621.7026367188</text:p>
          </table:table-cell>
          <table:table-cell office:value-type="float" office:value="0.03955279">
            <text:p>0.03955279</text:p>
          </table:table-cell>
          <table:table-cell table:number-columns-repeated="4"/>
        </table:table-row>
        <table:table-row table:style-name="ro1">
          <table:table-cell office:value-type="float" office:value="621.821899414063">
            <text:p>621.8218994141</text:p>
          </table:table-cell>
          <table:table-cell office:value-type="float" office:value="0.06291796">
            <text:p>0.06291796</text:p>
          </table:table-cell>
          <table:table-cell table:number-columns-repeated="4"/>
        </table:table-row>
        <table:table-row table:style-name="ro1">
          <table:table-cell office:value-type="float" office:value="621.941223144531">
            <text:p>621.9412231445</text:p>
          </table:table-cell>
          <table:table-cell office:value-type="float" office:value="0.02924477">
            <text:p>0.02924477</text:p>
          </table:table-cell>
          <table:table-cell table:number-columns-repeated="4"/>
        </table:table-row>
        <table:table-row table:style-name="ro1">
          <table:table-cell office:value-type="float" office:value="622.060485839844">
            <text:p>622.0604858398</text:p>
          </table:table-cell>
          <table:table-cell office:value-type="float" office:value="0.04665164">
            <text:p>0.04665164</text:p>
          </table:table-cell>
          <table:table-cell table:number-columns-repeated="4"/>
        </table:table-row>
        <table:table-row table:style-name="ro1">
          <table:table-cell office:value-type="float" office:value="622.179748535156">
            <text:p>622.1797485352</text:p>
          </table:table-cell>
          <table:table-cell office:value-type="float" office:value="0.05073301">
            <text:p>0.05073301</text:p>
          </table:table-cell>
          <table:table-cell table:number-columns-repeated="4"/>
        </table:table-row>
        <table:table-row table:style-name="ro1">
          <table:table-cell office:value-type="float" office:value="622.299011230469">
            <text:p>622.2990112305</text:p>
          </table:table-cell>
          <table:table-cell office:value-type="float" office:value="0.03393168">
            <text:p>0.03393168</text:p>
          </table:table-cell>
          <table:table-cell table:number-columns-repeated="4"/>
        </table:table-row>
        <table:table-row table:style-name="ro1">
          <table:table-cell office:value-type="float" office:value="622.418334960938">
            <text:p>622.4183349609</text:p>
          </table:table-cell>
          <table:table-cell office:value-type="float" office:value="0.03654228">
            <text:p>0.03654228</text:p>
          </table:table-cell>
          <table:table-cell table:number-columns-repeated="4"/>
        </table:table-row>
        <table:table-row table:style-name="ro1">
          <table:table-cell office:value-type="float" office:value="622.53759765625">
            <text:p>622.5375976563</text:p>
          </table:table-cell>
          <table:table-cell office:value-type="float" office:value="0.03571412">
            <text:p>0.03571412</text:p>
          </table:table-cell>
          <table:table-cell table:number-columns-repeated="4"/>
        </table:table-row>
        <table:table-row table:style-name="ro1">
          <table:table-cell office:value-type="float" office:value="622.656860351563">
            <text:p>622.6568603516</text:p>
          </table:table-cell>
          <table:table-cell office:value-type="float" office:value="0.03177888">
            <text:p>0.03177888</text:p>
          </table:table-cell>
          <table:table-cell table:number-columns-repeated="4"/>
        </table:table-row>
        <table:table-row table:style-name="ro1">
          <table:table-cell office:value-type="float" office:value="622.776184082031">
            <text:p>622.776184082</text:p>
          </table:table-cell>
          <table:table-cell office:value-type="float" office:value="0.03898171">
            <text:p>0.03898171</text:p>
          </table:table-cell>
          <table:table-cell table:number-columns-repeated="4"/>
        </table:table-row>
        <table:table-row table:style-name="ro1">
          <table:table-cell office:value-type="float" office:value="622.895446777344">
            <text:p>622.8954467773</text:p>
          </table:table-cell>
          <table:table-cell office:value-type="float" office:value="0.04049801">
            <text:p>0.04049801</text:p>
          </table:table-cell>
          <table:table-cell table:number-columns-repeated="4"/>
        </table:table-row>
        <table:table-row table:style-name="ro1">
          <table:table-cell office:value-type="float" office:value="623.014709472656">
            <text:p>623.0147094727</text:p>
          </table:table-cell>
          <table:table-cell office:value-type="float" office:value="0.03763112">
            <text:p>0.03763112</text:p>
          </table:table-cell>
          <table:table-cell table:number-columns-repeated="4"/>
        </table:table-row>
        <table:table-row table:style-name="ro1">
          <table:table-cell office:value-type="float" office:value="623.134033203125">
            <text:p>623.1340332031</text:p>
          </table:table-cell>
          <table:table-cell office:value-type="float" office:value="0.02917389">
            <text:p>0.02917389</text:p>
          </table:table-cell>
          <table:table-cell table:number-columns-repeated="4"/>
        </table:table-row>
        <table:table-row table:style-name="ro1">
          <table:table-cell office:value-type="float" office:value="623.253295898438">
            <text:p>623.2532958984</text:p>
          </table:table-cell>
          <table:table-cell office:value-type="float" office:value="0.03195288">
            <text:p>0.03195288</text:p>
          </table:table-cell>
          <table:table-cell table:number-columns-repeated="4"/>
        </table:table-row>
        <table:table-row table:style-name="ro1">
          <table:table-cell office:value-type="float" office:value="623.372619628906">
            <text:p>623.3726196289</text:p>
          </table:table-cell>
          <table:table-cell office:value-type="float" office:value="0.04182554">
            <text:p>0.04182554</text:p>
          </table:table-cell>
          <table:table-cell table:number-columns-repeated="4"/>
        </table:table-row>
        <table:table-row table:style-name="ro1">
          <table:table-cell office:value-type="float" office:value="623.491943359375">
            <text:p>623.4919433594</text:p>
          </table:table-cell>
          <table:table-cell office:value-type="float" office:value="0.03647671">
            <text:p>0.03647671</text:p>
          </table:table-cell>
          <table:table-cell table:number-columns-repeated="4"/>
        </table:table-row>
        <table:table-row table:style-name="ro1">
          <table:table-cell office:value-type="float" office:value="623.611206054688">
            <text:p>623.6112060547</text:p>
          </table:table-cell>
          <table:table-cell office:value-type="float" office:value="0.03107626">
            <text:p>0.03107626</text:p>
          </table:table-cell>
          <table:table-cell table:number-columns-repeated="4"/>
        </table:table-row>
        <table:table-row table:style-name="ro1">
          <table:table-cell office:value-type="float" office:value="623.730529785156">
            <text:p>623.7305297852</text:p>
          </table:table-cell>
          <table:table-cell office:value-type="float" office:value="0.03800097">
            <text:p>0.03800097</text:p>
          </table:table-cell>
          <table:table-cell table:number-columns-repeated="4"/>
        </table:table-row>
        <table:table-row table:style-name="ro1">
          <table:table-cell office:value-type="float" office:value="623.849853515625">
            <text:p>623.8498535156</text:p>
          </table:table-cell>
          <table:table-cell office:value-type="float" office:value="0.03669722">
            <text:p>0.03669722</text:p>
          </table:table-cell>
          <table:table-cell table:number-columns-repeated="4"/>
        </table:table-row>
        <table:table-row table:style-name="ro1">
          <table:table-cell office:value-type="float" office:value="623.969116210938">
            <text:p>623.9691162109</text:p>
          </table:table-cell>
          <table:table-cell office:value-type="float" office:value="0.0356895">
            <text:p>0.0356895</text:p>
          </table:table-cell>
          <table:table-cell table:number-columns-repeated="4"/>
        </table:table-row>
        <table:table-row table:style-name="ro1">
          <table:table-cell office:value-type="float" office:value="624.088439941406">
            <text:p>624.0884399414</text:p>
          </table:table-cell>
          <table:table-cell office:value-type="float" office:value="0.02616353">
            <text:p>0.02616353</text:p>
          </table:table-cell>
          <table:table-cell table:number-columns-repeated="4"/>
        </table:table-row>
        <table:table-row table:style-name="ro1">
          <table:table-cell office:value-type="float" office:value="624.207763671875">
            <text:p>624.2077636719</text:p>
          </table:table-cell>
          <table:table-cell office:value-type="float" office:value="0.02643636">
            <text:p>0.02643636</text:p>
          </table:table-cell>
          <table:table-cell table:number-columns-repeated="4"/>
        </table:table-row>
        <table:table-row table:style-name="ro1">
          <table:table-cell office:value-type="float" office:value="624.327087402344">
            <text:p>624.3270874023</text:p>
          </table:table-cell>
          <table:table-cell office:value-type="float" office:value="0.03414521">
            <text:p>0.03414521</text:p>
          </table:table-cell>
          <table:table-cell table:number-columns-repeated="4"/>
        </table:table-row>
        <table:table-row table:style-name="ro1">
          <table:table-cell office:value-type="float" office:value="624.446350097656">
            <text:p>624.4463500977</text:p>
          </table:table-cell>
          <table:table-cell office:value-type="float" office:value="0.04969102">
            <text:p>0.04969102</text:p>
          </table:table-cell>
          <table:table-cell table:number-columns-repeated="4"/>
        </table:table-row>
        <table:table-row table:style-name="ro1">
          <table:table-cell office:value-type="float" office:value="624.565673828125">
            <text:p>624.5656738281</text:p>
          </table:table-cell>
          <table:table-cell office:value-type="float" office:value="0.040491">
            <text:p>0.040491</text:p>
          </table:table-cell>
          <table:table-cell table:number-columns-repeated="4"/>
        </table:table-row>
        <table:table-row table:style-name="ro1">
          <table:table-cell office:value-type="float" office:value="624.684997558594">
            <text:p>624.6849975586</text:p>
          </table:table-cell>
          <table:table-cell office:value-type="float" office:value="0.03673935">
            <text:p>0.03673935</text:p>
          </table:table-cell>
          <table:table-cell table:number-columns-repeated="4"/>
        </table:table-row>
        <table:table-row table:style-name="ro1">
          <table:table-cell office:value-type="float" office:value="624.804321289063">
            <text:p>624.8043212891</text:p>
          </table:table-cell>
          <table:table-cell office:value-type="float" office:value="0.03497628">
            <text:p>0.03497628</text:p>
          </table:table-cell>
          <table:table-cell table:number-columns-repeated="4"/>
        </table:table-row>
        <table:table-row table:style-name="ro1">
          <table:table-cell office:value-type="float" office:value="624.923645019531">
            <text:p>624.9236450195</text:p>
          </table:table-cell>
          <table:table-cell office:value-type="float" office:value="0.03976629">
            <text:p>0.03976629</text:p>
          </table:table-cell>
          <table:table-cell table:number-columns-repeated="4"/>
        </table:table-row>
        <table:table-row table:style-name="ro1">
          <table:table-cell office:value-type="float" office:value="625.04296875">
            <text:p>625.04296875</text:p>
          </table:table-cell>
          <table:table-cell office:value-type="float" office:value="0.02803684">
            <text:p>0.02803684</text:p>
          </table:table-cell>
          <table:table-cell table:number-columns-repeated="4"/>
        </table:table-row>
        <table:table-row table:style-name="ro1">
          <table:table-cell office:value-type="float" office:value="625.162292480469">
            <text:p>625.1622924805</text:p>
          </table:table-cell>
          <table:table-cell office:value-type="float" office:value="0.03261292">
            <text:p>0.03261292</text:p>
          </table:table-cell>
          <table:table-cell table:number-columns-repeated="4"/>
        </table:table-row>
        <table:table-row table:style-name="ro1">
          <table:table-cell office:value-type="float" office:value="625.281616210938">
            <text:p>625.2816162109</text:p>
          </table:table-cell>
          <table:table-cell office:value-type="float" office:value="0.0390002">
            <text:p>0.0390002</text:p>
          </table:table-cell>
          <table:table-cell table:number-columns-repeated="4"/>
        </table:table-row>
        <table:table-row table:style-name="ro1">
          <table:table-cell office:value-type="float" office:value="625.400939941406">
            <text:p>625.4009399414</text:p>
          </table:table-cell>
          <table:table-cell office:value-type="float" office:value="0.03342422">
            <text:p>0.03342422</text:p>
          </table:table-cell>
          <table:table-cell table:number-columns-repeated="4"/>
        </table:table-row>
        <table:table-row table:style-name="ro1">
          <table:table-cell office:value-type="float" office:value="625.520263671875">
            <text:p>625.5202636719</text:p>
          </table:table-cell>
          <table:table-cell office:value-type="float" office:value="0.03184577">
            <text:p>0.03184577</text:p>
          </table:table-cell>
          <table:table-cell table:number-columns-repeated="4"/>
        </table:table-row>
        <table:table-row table:style-name="ro1">
          <table:table-cell office:value-type="float" office:value="625.639587402344">
            <text:p>625.6395874023</text:p>
          </table:table-cell>
          <table:table-cell office:value-type="float" office:value="0.03774719">
            <text:p>0.03774719</text:p>
          </table:table-cell>
          <table:table-cell table:number-columns-repeated="4"/>
        </table:table-row>
        <table:table-row table:style-name="ro1">
          <table:table-cell office:value-type="float" office:value="625.758911132813">
            <text:p>625.7589111328</text:p>
          </table:table-cell>
          <table:table-cell office:value-type="float" office:value="0.03961059">
            <text:p>0.03961059</text:p>
          </table:table-cell>
          <table:table-cell table:number-columns-repeated="4"/>
        </table:table-row>
        <table:table-row table:style-name="ro1">
          <table:table-cell office:value-type="float" office:value="625.878295898438">
            <text:p>625.8782958984</text:p>
          </table:table-cell>
          <table:table-cell office:value-type="float" office:value="0.029499">
            <text:p>0.029499</text:p>
          </table:table-cell>
          <table:table-cell table:number-columns-repeated="4"/>
        </table:table-row>
        <table:table-row table:style-name="ro1">
          <table:table-cell office:value-type="float" office:value="625.997619628906">
            <text:p>625.9976196289</text:p>
          </table:table-cell>
          <table:table-cell office:value-type="float" office:value="0.02827406">
            <text:p>0.02827406</text:p>
          </table:table-cell>
          <table:table-cell table:number-columns-repeated="4"/>
        </table:table-row>
        <table:table-row table:style-name="ro1">
          <table:table-cell office:value-type="float" office:value="626.116943359375">
            <text:p>626.1169433594</text:p>
          </table:table-cell>
          <table:table-cell office:value-type="float" office:value="0.03736241">
            <text:p>0.03736241</text:p>
          </table:table-cell>
          <table:table-cell table:number-columns-repeated="4"/>
        </table:table-row>
        <table:table-row table:style-name="ro1">
          <table:table-cell office:value-type="float" office:value="626.236267089844">
            <text:p>626.2362670898</text:p>
          </table:table-cell>
          <table:table-cell office:value-type="float" office:value="0.03877458">
            <text:p>0.03877458</text:p>
          </table:table-cell>
          <table:table-cell table:number-columns-repeated="4"/>
        </table:table-row>
        <table:table-row table:style-name="ro1">
          <table:table-cell office:value-type="float" office:value="626.355651855469">
            <text:p>626.3556518555</text:p>
          </table:table-cell>
          <table:table-cell office:value-type="float" office:value="0.05121551">
            <text:p>0.05121551</text:p>
          </table:table-cell>
          <table:table-cell table:number-columns-repeated="4"/>
        </table:table-row>
        <table:table-row table:style-name="ro1">
          <table:table-cell office:value-type="float" office:value="626.474975585938">
            <text:p>626.4749755859</text:p>
          </table:table-cell>
          <table:table-cell office:value-type="float" office:value="0.02642879">
            <text:p>0.02642879</text:p>
          </table:table-cell>
          <table:table-cell table:number-columns-repeated="4"/>
        </table:table-row>
        <table:table-row table:style-name="ro1">
          <table:table-cell office:value-type="float" office:value="626.594360351563">
            <text:p>626.5943603516</text:p>
          </table:table-cell>
          <table:table-cell office:value-type="float" office:value="0.04718005">
            <text:p>0.04718005</text:p>
          </table:table-cell>
          <table:table-cell table:number-columns-repeated="4"/>
        </table:table-row>
        <table:table-row table:style-name="ro1">
          <table:table-cell office:value-type="float" office:value="626.713684082031">
            <text:p>626.713684082</text:p>
          </table:table-cell>
          <table:table-cell office:value-type="float" office:value="0.03231651">
            <text:p>0.03231651</text:p>
          </table:table-cell>
          <table:table-cell table:number-columns-repeated="4"/>
        </table:table-row>
        <table:table-row table:style-name="ro1">
          <table:table-cell office:value-type="float" office:value="626.8330078125">
            <text:p>626.8330078125</text:p>
          </table:table-cell>
          <table:table-cell office:value-type="float" office:value="0.04691173">
            <text:p>0.04691173</text:p>
          </table:table-cell>
          <table:table-cell table:number-columns-repeated="4"/>
        </table:table-row>
        <table:table-row table:style-name="ro1">
          <table:table-cell office:value-type="float" office:value="626.952392578125">
            <text:p>626.9523925781</text:p>
          </table:table-cell>
          <table:table-cell office:value-type="float" office:value="0.03946493">
            <text:p>0.03946493</text:p>
          </table:table-cell>
          <table:table-cell table:number-columns-repeated="4"/>
        </table:table-row>
        <table:table-row table:style-name="ro1">
          <table:table-cell office:value-type="float" office:value="627.071716308594">
            <text:p>627.0717163086</text:p>
          </table:table-cell>
          <table:table-cell office:value-type="float" office:value="0.04160263">
            <text:p>0.04160263</text:p>
          </table:table-cell>
          <table:table-cell table:number-columns-repeated="4"/>
        </table:table-row>
        <table:table-row table:style-name="ro1">
          <table:table-cell office:value-type="float" office:value="627.191101074219">
            <text:p>627.1911010742</text:p>
          </table:table-cell>
          <table:table-cell office:value-type="float" office:value="0.04435741">
            <text:p>0.04435741</text:p>
          </table:table-cell>
          <table:table-cell table:number-columns-repeated="4"/>
        </table:table-row>
        <table:table-row table:style-name="ro1">
          <table:table-cell office:value-type="float" office:value="627.310424804688">
            <text:p>627.3104248047</text:p>
          </table:table-cell>
          <table:table-cell office:value-type="float" office:value="0.03469808">
            <text:p>0.03469808</text:p>
          </table:table-cell>
          <table:table-cell table:number-columns-repeated="4"/>
        </table:table-row>
        <table:table-row table:style-name="ro1">
          <table:table-cell office:value-type="float" office:value="627.429809570313">
            <text:p>627.4298095703</text:p>
          </table:table-cell>
          <table:table-cell office:value-type="float" office:value="0.02612559">
            <text:p>0.02612559</text:p>
          </table:table-cell>
          <table:table-cell table:number-columns-repeated="4"/>
        </table:table-row>
        <table:table-row table:style-name="ro1">
          <table:table-cell office:value-type="float" office:value="627.549194335938">
            <text:p>627.5491943359</text:p>
          </table:table-cell>
          <table:table-cell office:value-type="float" office:value="0.02848866">
            <text:p>0.02848866</text:p>
          </table:table-cell>
          <table:table-cell table:number-columns-repeated="4"/>
        </table:table-row>
        <table:table-row table:style-name="ro1">
          <table:table-cell office:value-type="float" office:value="627.668518066406">
            <text:p>627.6685180664</text:p>
          </table:table-cell>
          <table:table-cell office:value-type="float" office:value="0.04127626">
            <text:p>0.04127626</text:p>
          </table:table-cell>
          <table:table-cell table:number-columns-repeated="4"/>
        </table:table-row>
        <table:table-row table:style-name="ro1">
          <table:table-cell office:value-type="float" office:value="627.787902832031">
            <text:p>627.787902832</text:p>
          </table:table-cell>
          <table:table-cell office:value-type="float" office:value="0.03845198">
            <text:p>0.03845198</text:p>
          </table:table-cell>
          <table:table-cell table:number-columns-repeated="4"/>
        </table:table-row>
        <table:table-row table:style-name="ro1">
          <table:table-cell office:value-type="float" office:value="627.907287597656">
            <text:p>627.9072875977</text:p>
          </table:table-cell>
          <table:table-cell office:value-type="float" office:value="0.03055325">
            <text:p>0.03055325</text:p>
          </table:table-cell>
          <table:table-cell table:number-columns-repeated="4"/>
        </table:table-row>
        <table:table-row table:style-name="ro1">
          <table:table-cell office:value-type="float" office:value="628.026672363281">
            <text:p>628.0266723633</text:p>
          </table:table-cell>
          <table:table-cell office:value-type="float" office:value="0.02732271">
            <text:p>0.02732271</text:p>
          </table:table-cell>
          <table:table-cell table:number-columns-repeated="4"/>
        </table:table-row>
        <table:table-row table:style-name="ro1">
          <table:table-cell office:value-type="float" office:value="628.14599609375">
            <text:p>628.1459960938</text:p>
          </table:table-cell>
          <table:table-cell office:value-type="float" office:value="0.026024">
            <text:p>0.026024</text:p>
          </table:table-cell>
          <table:table-cell table:number-columns-repeated="4"/>
        </table:table-row>
        <table:table-row table:style-name="ro1">
          <table:table-cell office:value-type="float" office:value="628.265380859375">
            <text:p>628.2653808594</text:p>
          </table:table-cell>
          <table:table-cell office:value-type="float" office:value="0.03965832">
            <text:p>0.03965832</text:p>
          </table:table-cell>
          <table:table-cell table:number-columns-repeated="4"/>
        </table:table-row>
        <table:table-row table:style-name="ro1">
          <table:table-cell office:value-type="float" office:value="628.384765625">
            <text:p>628.384765625</text:p>
          </table:table-cell>
          <table:table-cell office:value-type="float" office:value="0.04423096">
            <text:p>0.04423096</text:p>
          </table:table-cell>
          <table:table-cell table:number-columns-repeated="4"/>
        </table:table-row>
        <table:table-row table:style-name="ro1">
          <table:table-cell office:value-type="float" office:value="628.504150390625">
            <text:p>628.5041503906</text:p>
          </table:table-cell>
          <table:table-cell office:value-type="float" office:value="0.02346525">
            <text:p>0.02346525</text:p>
          </table:table-cell>
          <table:table-cell table:number-columns-repeated="4"/>
        </table:table-row>
        <table:table-row table:style-name="ro1">
          <table:table-cell office:value-type="float" office:value="628.62353515625">
            <text:p>628.6235351563</text:p>
          </table:table-cell>
          <table:table-cell office:value-type="float" office:value="0.03587304">
            <text:p>0.03587304</text:p>
          </table:table-cell>
          <table:table-cell table:number-columns-repeated="4"/>
        </table:table-row>
        <table:table-row table:style-name="ro1">
          <table:table-cell office:value-type="float" office:value="628.742919921875">
            <text:p>628.7429199219</text:p>
          </table:table-cell>
          <table:table-cell office:value-type="float" office:value="0.02454545">
            <text:p>0.02454545</text:p>
          </table:table-cell>
          <table:table-cell table:number-columns-repeated="4"/>
        </table:table-row>
        <table:table-row table:style-name="ro1">
          <table:table-cell office:value-type="float" office:value="628.8623046875">
            <text:p>628.8623046875</text:p>
          </table:table-cell>
          <table:table-cell office:value-type="float" office:value="0.02824441">
            <text:p>0.02824441</text:p>
          </table:table-cell>
          <table:table-cell table:number-columns-repeated="4"/>
        </table:table-row>
        <table:table-row table:style-name="ro1">
          <table:table-cell office:value-type="float" office:value="628.981689453125">
            <text:p>628.9816894531</text:p>
          </table:table-cell>
          <table:table-cell office:value-type="float" office:value="0.02781447">
            <text:p>0.02781447</text:p>
          </table:table-cell>
          <table:table-cell table:number-columns-repeated="4"/>
        </table:table-row>
        <table:table-row table:style-name="ro1">
          <table:table-cell office:value-type="float" office:value="629.10107421875">
            <text:p>629.1010742188</text:p>
          </table:table-cell>
          <table:table-cell office:value-type="float" office:value="0.0256059">
            <text:p>0.0256059</text:p>
          </table:table-cell>
          <table:table-cell table:number-columns-repeated="4"/>
        </table:table-row>
        <table:table-row table:style-name="ro1">
          <table:table-cell office:value-type="float" office:value="629.220458984375">
            <text:p>629.2204589844</text:p>
          </table:table-cell>
          <table:table-cell office:value-type="float" office:value="0.05025762">
            <text:p>0.05025762</text:p>
          </table:table-cell>
          <table:table-cell table:number-columns-repeated="4"/>
        </table:table-row>
        <table:table-row table:style-name="ro1">
          <table:table-cell office:value-type="float" office:value="629.33984375">
            <text:p>629.33984375</text:p>
          </table:table-cell>
          <table:table-cell office:value-type="float" office:value="0.04178355">
            <text:p>0.04178355</text:p>
          </table:table-cell>
          <table:table-cell table:number-columns-repeated="4"/>
        </table:table-row>
        <table:table-row table:style-name="ro1">
          <table:table-cell office:value-type="float" office:value="629.459228515625">
            <text:p>629.4592285156</text:p>
          </table:table-cell>
          <table:table-cell office:value-type="float" office:value="0.0412066">
            <text:p>0.0412066</text:p>
          </table:table-cell>
          <table:table-cell table:number-columns-repeated="4"/>
        </table:table-row>
        <table:table-row table:style-name="ro1">
          <table:table-cell office:value-type="float" office:value="629.57861328125">
            <text:p>629.5786132813</text:p>
          </table:table-cell>
          <table:table-cell office:value-type="float" office:value="0.02440877">
            <text:p>0.02440877</text:p>
          </table:table-cell>
          <table:table-cell table:number-columns-repeated="4"/>
        </table:table-row>
        <table:table-row table:style-name="ro1">
          <table:table-cell office:value-type="float" office:value="629.697998046875">
            <text:p>629.6979980469</text:p>
          </table:table-cell>
          <table:table-cell office:value-type="float" office:value="0.02926092">
            <text:p>0.02926092</text:p>
          </table:table-cell>
          <table:table-cell table:number-columns-repeated="4"/>
        </table:table-row>
        <table:table-row table:style-name="ro1">
          <table:table-cell office:value-type="float" office:value="629.8173828125">
            <text:p>629.8173828125</text:p>
          </table:table-cell>
          <table:table-cell office:value-type="float" office:value="0.03220652">
            <text:p>0.03220652</text:p>
          </table:table-cell>
          <table:table-cell table:number-columns-repeated="4"/>
        </table:table-row>
        <table:table-row table:style-name="ro1">
          <table:table-cell office:value-type="float" office:value="629.936828613281">
            <text:p>629.9368286133</text:p>
          </table:table-cell>
          <table:table-cell office:value-type="float" office:value="0.05823155">
            <text:p>0.05823155</text:p>
          </table:table-cell>
          <table:table-cell table:number-columns-repeated="4"/>
        </table:table-row>
        <table:table-row table:style-name="ro1">
          <table:table-cell office:value-type="float" office:value="630.056213378906">
            <text:p>630.0562133789</text:p>
          </table:table-cell>
          <table:table-cell office:value-type="float" office:value="0.04245441">
            <text:p>0.04245441</text:p>
          </table:table-cell>
          <table:table-cell table:number-columns-repeated="4"/>
        </table:table-row>
        <table:table-row table:style-name="ro1">
          <table:table-cell office:value-type="float" office:value="630.175598144531">
            <text:p>630.1755981445</text:p>
          </table:table-cell>
          <table:table-cell office:value-type="float" office:value="0.04158035">
            <text:p>0.04158035</text:p>
          </table:table-cell>
          <table:table-cell table:number-columns-repeated="4"/>
        </table:table-row>
        <table:table-row table:style-name="ro1">
          <table:table-cell office:value-type="float" office:value="630.295043945313">
            <text:p>630.2950439453</text:p>
          </table:table-cell>
          <table:table-cell office:value-type="float" office:value="0.02555221">
            <text:p>0.02555221</text:p>
          </table:table-cell>
          <table:table-cell table:number-columns-repeated="4"/>
        </table:table-row>
        <table:table-row table:style-name="ro1">
          <table:table-cell office:value-type="float" office:value="630.414428710938">
            <text:p>630.4144287109</text:p>
          </table:table-cell>
          <table:table-cell office:value-type="float" office:value="0.03737457">
            <text:p>0.03737457</text:p>
          </table:table-cell>
          <table:table-cell table:number-columns-repeated="4"/>
        </table:table-row>
        <table:table-row table:style-name="ro1">
          <table:table-cell office:value-type="float" office:value="630.533813476563">
            <text:p>630.5338134766</text:p>
          </table:table-cell>
          <table:table-cell office:value-type="float" office:value="0.02984262">
            <text:p>0.02984262</text:p>
          </table:table-cell>
          <table:table-cell table:number-columns-repeated="4"/>
        </table:table-row>
        <table:table-row table:style-name="ro1">
          <table:table-cell office:value-type="float" office:value="630.653259277344">
            <text:p>630.6532592773</text:p>
          </table:table-cell>
          <table:table-cell office:value-type="float" office:value="0.02467017">
            <text:p>0.02467017</text:p>
          </table:table-cell>
          <table:table-cell table:number-columns-repeated="4"/>
        </table:table-row>
        <table:table-row table:style-name="ro1">
          <table:table-cell office:value-type="float" office:value="630.772644042969">
            <text:p>630.772644043</text:p>
          </table:table-cell>
          <table:table-cell office:value-type="float" office:value="0.02983734">
            <text:p>0.02983734</text:p>
          </table:table-cell>
          <table:table-cell table:number-columns-repeated="4"/>
        </table:table-row>
        <table:table-row table:style-name="ro1">
          <table:table-cell office:value-type="float" office:value="630.89208984375">
            <text:p>630.8920898438</text:p>
          </table:table-cell>
          <table:table-cell office:value-type="float" office:value="0.03371097">
            <text:p>0.03371097</text:p>
          </table:table-cell>
          <table:table-cell table:number-columns-repeated="4"/>
        </table:table-row>
        <table:table-row table:style-name="ro1">
          <table:table-cell office:value-type="float" office:value="631.011474609375">
            <text:p>631.0114746094</text:p>
          </table:table-cell>
          <table:table-cell office:value-type="float" office:value="0.03976567">
            <text:p>0.03976567</text:p>
          </table:table-cell>
          <table:table-cell table:number-columns-repeated="4"/>
        </table:table-row>
        <table:table-row table:style-name="ro1">
          <table:table-cell office:value-type="float" office:value="631.130920410156">
            <text:p>631.1309204102</text:p>
          </table:table-cell>
          <table:table-cell office:value-type="float" office:value="0.03097058">
            <text:p>0.03097058</text:p>
          </table:table-cell>
          <table:table-cell table:number-columns-repeated="4"/>
        </table:table-row>
        <table:table-row table:style-name="ro1">
          <table:table-cell office:value-type="float" office:value="631.250305175781">
            <text:p>631.2503051758</text:p>
          </table:table-cell>
          <table:table-cell office:value-type="float" office:value="0.02884376">
            <text:p>0.02884376</text:p>
          </table:table-cell>
          <table:table-cell table:number-columns-repeated="4"/>
        </table:table-row>
        <table:table-row table:style-name="ro1">
          <table:table-cell office:value-type="float" office:value="631.369750976563">
            <text:p>631.3697509766</text:p>
          </table:table-cell>
          <table:table-cell office:value-type="float" office:value="0.03702854">
            <text:p>0.03702854</text:p>
          </table:table-cell>
          <table:table-cell table:number-columns-repeated="4"/>
        </table:table-row>
        <table:table-row table:style-name="ro1">
          <table:table-cell office:value-type="float" office:value="631.489135742188">
            <text:p>631.4891357422</text:p>
          </table:table-cell>
          <table:table-cell office:value-type="float" office:value="0.04063256">
            <text:p>0.04063256</text:p>
          </table:table-cell>
          <table:table-cell table:number-columns-repeated="4"/>
        </table:table-row>
        <table:table-row table:style-name="ro1">
          <table:table-cell office:value-type="float" office:value="631.608581542969">
            <text:p>631.608581543</text:p>
          </table:table-cell>
          <table:table-cell office:value-type="float" office:value="0.02553581">
            <text:p>0.02553581</text:p>
          </table:table-cell>
          <table:table-cell table:number-columns-repeated="4"/>
        </table:table-row>
        <table:table-row table:style-name="ro1">
          <table:table-cell office:value-type="float" office:value="631.72802734375">
            <text:p>631.7280273438</text:p>
          </table:table-cell>
          <table:table-cell office:value-type="float" office:value="0.03706514">
            <text:p>0.03706514</text:p>
          </table:table-cell>
          <table:table-cell table:number-columns-repeated="4"/>
        </table:table-row>
        <table:table-row table:style-name="ro1">
          <table:table-cell office:value-type="float" office:value="631.847412109375">
            <text:p>631.8474121094</text:p>
          </table:table-cell>
          <table:table-cell office:value-type="float" office:value="0.02910051">
            <text:p>0.02910051</text:p>
          </table:table-cell>
          <table:table-cell table:number-columns-repeated="4"/>
        </table:table-row>
        <table:table-row table:style-name="ro1">
          <table:table-cell office:value-type="float" office:value="631.966857910156">
            <text:p>631.9668579102</text:p>
          </table:table-cell>
          <table:table-cell office:value-type="float" office:value="0.04459954">
            <text:p>0.04459954</text:p>
          </table:table-cell>
          <table:table-cell table:number-columns-repeated="4"/>
        </table:table-row>
        <table:table-row table:style-name="ro1">
          <table:table-cell office:value-type="float" office:value="632.086303710938">
            <text:p>632.0863037109</text:p>
          </table:table-cell>
          <table:table-cell office:value-type="float" office:value="0.02203412">
            <text:p>0.02203412</text:p>
          </table:table-cell>
          <table:table-cell table:number-columns-repeated="4"/>
        </table:table-row>
        <table:table-row table:style-name="ro1">
          <table:table-cell office:value-type="float" office:value="632.205749511719">
            <text:p>632.2057495117</text:p>
          </table:table-cell>
          <table:table-cell office:value-type="float" office:value="0.0298626">
            <text:p>0.0298626</text:p>
          </table:table-cell>
          <table:table-cell table:number-columns-repeated="4"/>
        </table:table-row>
        <table:table-row table:style-name="ro1">
          <table:table-cell office:value-type="float" office:value="632.3251953125">
            <text:p>632.3251953125</text:p>
          </table:table-cell>
          <table:table-cell office:value-type="float" office:value="0.02919474">
            <text:p>0.02919474</text:p>
          </table:table-cell>
          <table:table-cell table:number-columns-repeated="4"/>
        </table:table-row>
        <table:table-row table:style-name="ro1">
          <table:table-cell office:value-type="float" office:value="632.444580078125">
            <text:p>632.4445800781</text:p>
          </table:table-cell>
          <table:table-cell office:value-type="float" office:value="0.0401284">
            <text:p>0.0401284</text:p>
          </table:table-cell>
          <table:table-cell table:number-columns-repeated="4"/>
        </table:table-row>
        <table:table-row table:style-name="ro1">
          <table:table-cell office:value-type="float" office:value="632.564025878906">
            <text:p>632.5640258789</text:p>
          </table:table-cell>
          <table:table-cell office:value-type="float" office:value="0.02853871">
            <text:p>0.02853871</text:p>
          </table:table-cell>
          <table:table-cell table:number-columns-repeated="4"/>
        </table:table-row>
        <table:table-row table:style-name="ro1">
          <table:table-cell office:value-type="float" office:value="632.683471679688">
            <text:p>632.6834716797</text:p>
          </table:table-cell>
          <table:table-cell office:value-type="float" office:value="0.03060187">
            <text:p>0.03060187</text:p>
          </table:table-cell>
          <table:table-cell table:number-columns-repeated="4"/>
        </table:table-row>
        <table:table-row table:style-name="ro1">
          <table:table-cell office:value-type="float" office:value="632.802917480469">
            <text:p>632.8029174805</text:p>
          </table:table-cell>
          <table:table-cell office:value-type="float" office:value="0.02631706">
            <text:p>0.02631706</text:p>
          </table:table-cell>
          <table:table-cell table:number-columns-repeated="4"/>
        </table:table-row>
        <table:table-row table:style-name="ro1">
          <table:table-cell office:value-type="float" office:value="632.92236328125">
            <text:p>632.9223632813</text:p>
          </table:table-cell>
          <table:table-cell office:value-type="float" office:value="0.02247964">
            <text:p>0.02247964</text:p>
          </table:table-cell>
          <table:table-cell table:number-columns-repeated="4"/>
        </table:table-row>
        <table:table-row table:style-name="ro1">
          <table:table-cell office:value-type="float" office:value="633.041809082031">
            <text:p>633.041809082</text:p>
          </table:table-cell>
          <table:table-cell office:value-type="float" office:value="0.03601175">
            <text:p>0.03601175</text:p>
          </table:table-cell>
          <table:table-cell table:number-columns-repeated="4"/>
        </table:table-row>
        <table:table-row table:style-name="ro1">
          <table:table-cell office:value-type="float" office:value="633.161254882813">
            <text:p>633.1612548828</text:p>
          </table:table-cell>
          <table:table-cell office:value-type="float" office:value="0.05826751">
            <text:p>0.05826751</text:p>
          </table:table-cell>
          <table:table-cell table:number-columns-repeated="4"/>
        </table:table-row>
        <table:table-row table:style-name="ro1">
          <table:table-cell office:value-type="float" office:value="633.280700683594">
            <text:p>633.2807006836</text:p>
          </table:table-cell>
          <table:table-cell office:value-type="float" office:value="0.0221786">
            <text:p>0.0221786</text:p>
          </table:table-cell>
          <table:table-cell table:number-columns-repeated="4"/>
        </table:table-row>
        <table:table-row table:style-name="ro1">
          <table:table-cell office:value-type="float" office:value="633.400146484375">
            <text:p>633.4001464844</text:p>
          </table:table-cell>
          <table:table-cell office:value-type="float" office:value="0.02683526">
            <text:p>0.02683526</text:p>
          </table:table-cell>
          <table:table-cell table:number-columns-repeated="4"/>
        </table:table-row>
        <table:table-row table:style-name="ro1">
          <table:table-cell office:value-type="float" office:value="633.519592285156">
            <text:p>633.5195922852</text:p>
          </table:table-cell>
          <table:table-cell office:value-type="float" office:value="0.02412031">
            <text:p>0.02412031</text:p>
          </table:table-cell>
          <table:table-cell table:number-columns-repeated="4"/>
        </table:table-row>
        <table:table-row table:style-name="ro1">
          <table:table-cell office:value-type="float" office:value="633.639038085938">
            <text:p>633.6390380859</text:p>
          </table:table-cell>
          <table:table-cell office:value-type="float" office:value="0.03861509">
            <text:p>0.03861509</text:p>
          </table:table-cell>
          <table:table-cell table:number-columns-repeated="4"/>
        </table:table-row>
        <table:table-row table:style-name="ro1">
          <table:table-cell office:value-type="float" office:value="633.758544921875">
            <text:p>633.7585449219</text:p>
          </table:table-cell>
          <table:table-cell office:value-type="float" office:value="0.01960938">
            <text:p>0.01960938</text:p>
          </table:table-cell>
          <table:table-cell table:number-columns-repeated="4"/>
        </table:table-row>
        <table:table-row table:style-name="ro1">
          <table:table-cell office:value-type="float" office:value="633.877990722656">
            <text:p>633.8779907227</text:p>
          </table:table-cell>
          <table:table-cell office:value-type="float" office:value="0.02837318">
            <text:p>0.02837318</text:p>
          </table:table-cell>
          <table:table-cell table:number-columns-repeated="4"/>
        </table:table-row>
        <table:table-row table:style-name="ro1">
          <table:table-cell office:value-type="float" office:value="633.997436523438">
            <text:p>633.9974365234</text:p>
          </table:table-cell>
          <table:table-cell office:value-type="float" office:value="0.02560483">
            <text:p>0.02560483</text:p>
          </table:table-cell>
          <table:table-cell table:number-columns-repeated="4"/>
        </table:table-row>
        <table:table-row table:style-name="ro1">
          <table:table-cell office:value-type="float" office:value="634.116882324219">
            <text:p>634.1168823242</text:p>
          </table:table-cell>
          <table:table-cell office:value-type="float" office:value="0.02246151">
            <text:p>0.02246151</text:p>
          </table:table-cell>
          <table:table-cell table:number-columns-repeated="4"/>
        </table:table-row>
        <table:table-row table:style-name="ro1">
          <table:table-cell office:value-type="float" office:value="634.236389160156">
            <text:p>634.2363891602</text:p>
          </table:table-cell>
          <table:table-cell office:value-type="float" office:value="0.02228312">
            <text:p>0.02228312</text:p>
          </table:table-cell>
          <table:table-cell table:number-columns-repeated="4"/>
        </table:table-row>
        <table:table-row table:style-name="ro1">
          <table:table-cell office:value-type="float" office:value="634.355834960938">
            <text:p>634.3558349609</text:p>
          </table:table-cell>
          <table:table-cell office:value-type="float" office:value="0.0281348">
            <text:p>0.0281348</text:p>
          </table:table-cell>
          <table:table-cell table:number-columns-repeated="4"/>
        </table:table-row>
        <table:table-row table:style-name="ro1">
          <table:table-cell office:value-type="float" office:value="634.475280761719">
            <text:p>634.4752807617</text:p>
          </table:table-cell>
          <table:table-cell office:value-type="float" office:value="0.02362986">
            <text:p>0.02362986</text:p>
          </table:table-cell>
          <table:table-cell table:number-columns-repeated="4"/>
        </table:table-row>
        <table:table-row table:style-name="ro1">
          <table:table-cell office:value-type="float" office:value="634.594787597656">
            <text:p>634.5947875977</text:p>
          </table:table-cell>
          <table:table-cell office:value-type="float" office:value="0.04630759">
            <text:p>0.04630759</text:p>
          </table:table-cell>
          <table:table-cell table:number-columns-repeated="4"/>
        </table:table-row>
        <table:table-row table:style-name="ro1">
          <table:table-cell office:value-type="float" office:value="634.714233398438">
            <text:p>634.7142333984</text:p>
          </table:table-cell>
          <table:table-cell office:value-type="float" office:value="0.02300902">
            <text:p>0.02300902</text:p>
          </table:table-cell>
          <table:table-cell table:number-columns-repeated="4"/>
        </table:table-row>
        <table:table-row table:style-name="ro1">
          <table:table-cell office:value-type="float" office:value="634.833679199219">
            <text:p>634.8336791992</text:p>
          </table:table-cell>
          <table:table-cell office:value-type="float" office:value="0.02026953">
            <text:p>0.02026953</text:p>
          </table:table-cell>
          <table:table-cell table:number-columns-repeated="4"/>
        </table:table-row>
        <table:table-row table:style-name="ro1">
          <table:table-cell office:value-type="float" office:value="634.953186035156">
            <text:p>634.9531860352</text:p>
          </table:table-cell>
          <table:table-cell office:value-type="float" office:value="0.03236293">
            <text:p>0.03236293</text:p>
          </table:table-cell>
          <table:table-cell table:number-columns-repeated="4"/>
        </table:table-row>
        <table:table-row table:style-name="ro1">
          <table:table-cell office:value-type="float" office:value="635.072631835938">
            <text:p>635.0726318359</text:p>
          </table:table-cell>
          <table:table-cell office:value-type="float" office:value="0.03440981">
            <text:p>0.03440981</text:p>
          </table:table-cell>
          <table:table-cell table:number-columns-repeated="4"/>
        </table:table-row>
        <table:table-row table:style-name="ro1">
          <table:table-cell office:value-type="float" office:value="635.192138671875">
            <text:p>635.1921386719</text:p>
          </table:table-cell>
          <table:table-cell office:value-type="float" office:value="0.02538792">
            <text:p>0.02538792</text:p>
          </table:table-cell>
          <table:table-cell table:number-columns-repeated="4"/>
        </table:table-row>
        <table:table-row table:style-name="ro1">
          <table:table-cell office:value-type="float" office:value="635.311584472656">
            <text:p>635.3115844727</text:p>
          </table:table-cell>
          <table:table-cell office:value-type="float" office:value="0.01710032">
            <text:p>0.01710032</text:p>
          </table:table-cell>
          <table:table-cell table:number-columns-repeated="4"/>
        </table:table-row>
        <table:table-row table:style-name="ro1">
          <table:table-cell office:value-type="float" office:value="635.431091308594">
            <text:p>635.4310913086</text:p>
          </table:table-cell>
          <table:table-cell office:value-type="float" office:value="0.04438199">
            <text:p>0.04438199</text:p>
          </table:table-cell>
          <table:table-cell table:number-columns-repeated="4"/>
        </table:table-row>
        <table:table-row table:style-name="ro1">
          <table:table-cell office:value-type="float" office:value="635.550598144531">
            <text:p>635.5505981445</text:p>
          </table:table-cell>
          <table:table-cell office:value-type="float" office:value="0.03272821">
            <text:p>0.03272821</text:p>
          </table:table-cell>
          <table:table-cell table:number-columns-repeated="4"/>
        </table:table-row>
        <table:table-row table:style-name="ro1">
          <table:table-cell office:value-type="float" office:value="635.670043945313">
            <text:p>635.6700439453</text:p>
          </table:table-cell>
          <table:table-cell office:value-type="float" office:value="0.02003347">
            <text:p>0.02003347</text:p>
          </table:table-cell>
          <table:table-cell table:number-columns-repeated="4"/>
        </table:table-row>
        <table:table-row table:style-name="ro1">
          <table:table-cell office:value-type="float" office:value="635.78955078125">
            <text:p>635.7895507813</text:p>
          </table:table-cell>
          <table:table-cell office:value-type="float" office:value="0.02770021">
            <text:p>0.02770021</text:p>
          </table:table-cell>
          <table:table-cell table:number-columns-repeated="4"/>
        </table:table-row>
        <table:table-row table:style-name="ro1">
          <table:table-cell office:value-type="float" office:value="635.909057617188">
            <text:p>635.9090576172</text:p>
          </table:table-cell>
          <table:table-cell office:value-type="float" office:value="0.02512676">
            <text:p>0.02512676</text:p>
          </table:table-cell>
          <table:table-cell table:number-columns-repeated="4"/>
        </table:table-row>
        <table:table-row table:style-name="ro1">
          <table:table-cell office:value-type="float" office:value="636.028503417969">
            <text:p>636.028503418</text:p>
          </table:table-cell>
          <table:table-cell office:value-type="float" office:value="0.02179675">
            <text:p>0.02179675</text:p>
          </table:table-cell>
          <table:table-cell table:number-columns-repeated="4"/>
        </table:table-row>
        <table:table-row table:style-name="ro1">
          <table:table-cell office:value-type="float" office:value="636.148010253906">
            <text:p>636.1480102539</text:p>
          </table:table-cell>
          <table:table-cell office:value-type="float" office:value="0.02185736">
            <text:p>0.02185736</text:p>
          </table:table-cell>
          <table:table-cell table:number-columns-repeated="4"/>
        </table:table-row>
        <table:table-row table:style-name="ro1">
          <table:table-cell office:value-type="float" office:value="636.267517089844">
            <text:p>636.2675170898</text:p>
          </table:table-cell>
          <table:table-cell office:value-type="float" office:value="0.03461107">
            <text:p>0.03461107</text:p>
          </table:table-cell>
          <table:table-cell table:number-columns-repeated="4"/>
        </table:table-row>
        <table:table-row table:style-name="ro1">
          <table:table-cell office:value-type="float" office:value="636.387023925781">
            <text:p>636.3870239258</text:p>
          </table:table-cell>
          <table:table-cell office:value-type="float" office:value="0.03556606">
            <text:p>0.03556606</text:p>
          </table:table-cell>
          <table:table-cell table:number-columns-repeated="4"/>
        </table:table-row>
        <table:table-row table:style-name="ro1">
          <table:table-cell office:value-type="float" office:value="636.506469726563">
            <text:p>636.5064697266</text:p>
          </table:table-cell>
          <table:table-cell office:value-type="float" office:value="0.02725087">
            <text:p>0.02725087</text:p>
          </table:table-cell>
          <table:table-cell table:number-columns-repeated="4"/>
        </table:table-row>
        <table:table-row table:style-name="ro1">
          <table:table-cell office:value-type="float" office:value="636.6259765625">
            <text:p>636.6259765625</text:p>
          </table:table-cell>
          <table:table-cell office:value-type="float" office:value="0.03476132">
            <text:p>0.03476132</text:p>
          </table:table-cell>
          <table:table-cell table:number-columns-repeated="4"/>
        </table:table-row>
        <table:table-row table:style-name="ro1">
          <table:table-cell office:value-type="float" office:value="636.745483398438">
            <text:p>636.7454833984</text:p>
          </table:table-cell>
          <table:table-cell office:value-type="float" office:value="0.01822556">
            <text:p>0.01822556</text:p>
          </table:table-cell>
          <table:table-cell table:number-columns-repeated="4"/>
        </table:table-row>
        <table:table-row table:style-name="ro1">
          <table:table-cell office:value-type="float" office:value="636.864990234375">
            <text:p>636.8649902344</text:p>
          </table:table-cell>
          <table:table-cell office:value-type="float" office:value="0.02406109">
            <text:p>0.02406109</text:p>
          </table:table-cell>
          <table:table-cell table:number-columns-repeated="4"/>
        </table:table-row>
        <table:table-row table:style-name="ro1">
          <table:table-cell office:value-type="float" office:value="636.984497070313">
            <text:p>636.9844970703</text:p>
          </table:table-cell>
          <table:table-cell office:value-type="float" office:value="0.01821934">
            <text:p>0.01821934</text:p>
          </table:table-cell>
          <table:table-cell table:number-columns-repeated="4"/>
        </table:table-row>
        <table:table-row table:style-name="ro1">
          <table:table-cell office:value-type="float" office:value="637.10400390625">
            <text:p>637.1040039063</text:p>
          </table:table-cell>
          <table:table-cell office:value-type="float" office:value="0.01820122">
            <text:p>0.01820122</text:p>
          </table:table-cell>
          <table:table-cell table:number-columns-repeated="4"/>
        </table:table-row>
        <table:table-row table:style-name="ro1">
          <table:table-cell office:value-type="float" office:value="637.223510742188">
            <text:p>637.2235107422</text:p>
          </table:table-cell>
          <table:table-cell office:value-type="float" office:value="0.0277102">
            <text:p>0.0277102</text:p>
          </table:table-cell>
          <table:table-cell table:number-columns-repeated="4"/>
        </table:table-row>
        <table:table-row table:style-name="ro1">
          <table:table-cell office:value-type="float" office:value="637.343017578125">
            <text:p>637.3430175781</text:p>
          </table:table-cell>
          <table:table-cell office:value-type="float" office:value="0.03623433">
            <text:p>0.03623433</text:p>
          </table:table-cell>
          <table:table-cell table:number-columns-repeated="4"/>
        </table:table-row>
        <table:table-row table:style-name="ro1">
          <table:table-cell office:value-type="float" office:value="637.462524414063">
            <text:p>637.4625244141</text:p>
          </table:table-cell>
          <table:table-cell office:value-type="float" office:value="0.01877377">
            <text:p>0.01877377</text:p>
          </table:table-cell>
          <table:table-cell table:number-columns-repeated="4"/>
        </table:table-row>
        <table:table-row table:style-name="ro1">
          <table:table-cell office:value-type="float" office:value="637.58203125">
            <text:p>637.58203125</text:p>
          </table:table-cell>
          <table:table-cell office:value-type="float" office:value="0.04513436">
            <text:p>0.04513436</text:p>
          </table:table-cell>
          <table:table-cell table:number-columns-repeated="4"/>
        </table:table-row>
        <table:table-row table:style-name="ro1">
          <table:table-cell office:value-type="float" office:value="637.701538085938">
            <text:p>637.7015380859</text:p>
          </table:table-cell>
          <table:table-cell office:value-type="float" office:value="0.02604082">
            <text:p>0.02604082</text:p>
          </table:table-cell>
          <table:table-cell table:number-columns-repeated="4"/>
        </table:table-row>
        <table:table-row table:style-name="ro1">
          <table:table-cell office:value-type="float" office:value="637.821044921875">
            <text:p>637.8210449219</text:p>
          </table:table-cell>
          <table:table-cell office:value-type="float" office:value="0.02200307">
            <text:p>0.02200307</text:p>
          </table:table-cell>
          <table:table-cell table:number-columns-repeated="4"/>
        </table:table-row>
        <table:table-row table:style-name="ro1">
          <table:table-cell office:value-type="float" office:value="637.940551757813">
            <text:p>637.9405517578</text:p>
          </table:table-cell>
          <table:table-cell office:value-type="float" office:value="0.01678278">
            <text:p>0.01678278</text:p>
          </table:table-cell>
          <table:table-cell table:number-columns-repeated="4"/>
        </table:table-row>
        <table:table-row table:style-name="ro1">
          <table:table-cell office:value-type="float" office:value="638.060119628906">
            <text:p>638.0601196289</text:p>
          </table:table-cell>
          <table:table-cell office:value-type="float" office:value="0.01551332">
            <text:p>0.01551332</text:p>
          </table:table-cell>
          <table:table-cell table:number-columns-repeated="4"/>
        </table:table-row>
        <table:table-row table:style-name="ro1">
          <table:table-cell office:value-type="float" office:value="638.179626464844">
            <text:p>638.1796264648</text:p>
          </table:table-cell>
          <table:table-cell office:value-type="float" office:value="0.01796353">
            <text:p>0.01796353</text:p>
          </table:table-cell>
          <table:table-cell table:number-columns-repeated="4"/>
        </table:table-row>
        <table:table-row table:style-name="ro1">
          <table:table-cell office:value-type="float" office:value="638.299133300781">
            <text:p>638.2991333008</text:p>
          </table:table-cell>
          <table:table-cell office:value-type="float" office:value="0.03501408">
            <text:p>0.03501408</text:p>
          </table:table-cell>
          <table:table-cell table:number-columns-repeated="4"/>
        </table:table-row>
        <table:table-row table:style-name="ro1">
          <table:table-cell office:value-type="float" office:value="638.418640136719">
            <text:p>638.4186401367</text:p>
          </table:table-cell>
          <table:table-cell office:value-type="float" office:value="0.03923547">
            <text:p>0.03923547</text:p>
          </table:table-cell>
          <table:table-cell table:number-columns-repeated="4"/>
        </table:table-row>
        <table:table-row table:style-name="ro1">
          <table:table-cell office:value-type="float" office:value="638.538208007813">
            <text:p>638.5382080078</text:p>
          </table:table-cell>
          <table:table-cell office:value-type="float" office:value="0.02062158">
            <text:p>0.02062158</text:p>
          </table:table-cell>
          <table:table-cell table:number-columns-repeated="4"/>
        </table:table-row>
        <table:table-row table:style-name="ro1">
          <table:table-cell office:value-type="float" office:value="638.65771484375">
            <text:p>638.6577148438</text:p>
          </table:table-cell>
          <table:table-cell office:value-type="float" office:value="0.02134152">
            <text:p>0.02134152</text:p>
          </table:table-cell>
          <table:table-cell table:number-columns-repeated="4"/>
        </table:table-row>
        <table:table-row table:style-name="ro1">
          <table:table-cell office:value-type="float" office:value="638.777221679688">
            <text:p>638.7772216797</text:p>
          </table:table-cell>
          <table:table-cell office:value-type="float" office:value="0.01887928">
            <text:p>0.01887928</text:p>
          </table:table-cell>
          <table:table-cell table:number-columns-repeated="4"/>
        </table:table-row>
        <table:table-row table:style-name="ro1">
          <table:table-cell office:value-type="float" office:value="638.896789550781">
            <text:p>638.8967895508</text:p>
          </table:table-cell>
          <table:table-cell office:value-type="float" office:value="0.0383281">
            <text:p>0.0383281</text:p>
          </table:table-cell>
          <table:table-cell table:number-columns-repeated="4"/>
        </table:table-row>
        <table:table-row table:style-name="ro1">
          <table:table-cell office:value-type="float" office:value="639.016296386719">
            <text:p>639.0162963867</text:p>
          </table:table-cell>
          <table:table-cell office:value-type="float" office:value="0.02760157">
            <text:p>0.02760157</text:p>
          </table:table-cell>
          <table:table-cell table:number-columns-repeated="4"/>
        </table:table-row>
        <table:table-row table:style-name="ro1">
          <table:table-cell office:value-type="float" office:value="639.135864257813">
            <text:p>639.1358642578</text:p>
          </table:table-cell>
          <table:table-cell office:value-type="float" office:value="0.01346499">
            <text:p>0.01346499</text:p>
          </table:table-cell>
          <table:table-cell table:number-columns-repeated="4"/>
        </table:table-row>
        <table:table-row table:style-name="ro1">
          <table:table-cell office:value-type="float" office:value="639.25537109375">
            <text:p>639.2553710938</text:p>
          </table:table-cell>
          <table:table-cell office:value-type="float" office:value="0.02014899">
            <text:p>0.02014899</text:p>
          </table:table-cell>
          <table:table-cell table:number-columns-repeated="4"/>
        </table:table-row>
        <table:table-row table:style-name="ro1">
          <table:table-cell office:value-type="float" office:value="639.374938964844">
            <text:p>639.3749389648</text:p>
          </table:table-cell>
          <table:table-cell office:value-type="float" office:value="0.02580926">
            <text:p>0.02580926</text:p>
          </table:table-cell>
          <table:table-cell table:number-columns-repeated="4"/>
        </table:table-row>
        <table:table-row table:style-name="ro1">
          <table:table-cell office:value-type="float" office:value="639.494445800781">
            <text:p>639.4944458008</text:p>
          </table:table-cell>
          <table:table-cell office:value-type="float" office:value="0.01935358">
            <text:p>0.01935358</text:p>
          </table:table-cell>
          <table:table-cell table:number-columns-repeated="4"/>
        </table:table-row>
        <table:table-row table:style-name="ro1">
          <table:table-cell office:value-type="float" office:value="639.614013671875">
            <text:p>639.6140136719</text:p>
          </table:table-cell>
          <table:table-cell office:value-type="float" office:value="0.02051912">
            <text:p>0.02051912</text:p>
          </table:table-cell>
          <table:table-cell table:number-columns-repeated="4"/>
        </table:table-row>
        <table:table-row table:style-name="ro1">
          <table:table-cell office:value-type="float" office:value="639.733520507813">
            <text:p>639.7335205078</text:p>
          </table:table-cell>
          <table:table-cell office:value-type="float" office:value="0.03632835">
            <text:p>0.03632835</text:p>
          </table:table-cell>
          <table:table-cell table:number-columns-repeated="4"/>
        </table:table-row>
        <table:table-row table:style-name="ro1">
          <table:table-cell office:value-type="float" office:value="639.853088378906">
            <text:p>639.8530883789</text:p>
          </table:table-cell>
          <table:table-cell office:value-type="float" office:value="0.01788047">
            <text:p>0.01788047</text:p>
          </table:table-cell>
          <table:table-cell table:number-columns-repeated="4"/>
        </table:table-row>
        <table:table-row table:style-name="ro1">
          <table:table-cell office:value-type="float" office:value="639.972595214844">
            <text:p>639.9725952148</text:p>
          </table:table-cell>
          <table:table-cell office:value-type="float" office:value="0.03518676">
            <text:p>0.03518676</text:p>
          </table:table-cell>
          <table:table-cell table:number-columns-repeated="4"/>
        </table:table-row>
        <table:table-row table:style-name="ro1">
          <table:table-cell office:value-type="float" office:value="640.092163085938">
            <text:p>640.0921630859</text:p>
          </table:table-cell>
          <table:table-cell office:value-type="float" office:value="0.01735833">
            <text:p>0.01735833</text:p>
          </table:table-cell>
          <table:table-cell table:number-columns-repeated="4"/>
        </table:table-row>
        <table:table-row table:style-name="ro1">
          <table:table-cell office:value-type="float" office:value="640.211730957031">
            <text:p>640.211730957</text:p>
          </table:table-cell>
          <table:table-cell office:value-type="float" office:value="0.03233665">
            <text:p>0.03233665</text:p>
          </table:table-cell>
          <table:table-cell table:number-columns-repeated="4"/>
        </table:table-row>
        <table:table-row table:style-name="ro1">
          <table:table-cell office:value-type="float" office:value="640.331237792969">
            <text:p>640.331237793</text:p>
          </table:table-cell>
          <table:table-cell office:value-type="float" office:value="0.02296272">
            <text:p>0.02296272</text:p>
          </table:table-cell>
          <table:table-cell table:number-columns-repeated="4"/>
        </table:table-row>
        <table:table-row table:style-name="ro1">
          <table:table-cell office:value-type="float" office:value="640.450805664063">
            <text:p>640.4508056641</text:p>
          </table:table-cell>
          <table:table-cell office:value-type="float" office:value="0.01644197">
            <text:p>0.01644197</text:p>
          </table:table-cell>
          <table:table-cell table:number-columns-repeated="4"/>
        </table:table-row>
        <table:table-row table:style-name="ro1">
          <table:table-cell office:value-type="float" office:value="640.570373535156">
            <text:p>640.5703735352</text:p>
          </table:table-cell>
          <table:table-cell office:value-type="float" office:value="0.02994834">
            <text:p>0.02994834</text:p>
          </table:table-cell>
          <table:table-cell table:number-columns-repeated="4"/>
        </table:table-row>
        <table:table-row table:style-name="ro1">
          <table:table-cell office:value-type="float" office:value="640.68994140625">
            <text:p>640.6899414063</text:p>
          </table:table-cell>
          <table:table-cell office:value-type="float" office:value="0.02913186">
            <text:p>0.02913186</text:p>
          </table:table-cell>
          <table:table-cell table:number-columns-repeated="4"/>
        </table:table-row>
        <table:table-row table:style-name="ro1">
          <table:table-cell office:value-type="float" office:value="640.809509277344">
            <text:p>640.8095092773</text:p>
          </table:table-cell>
          <table:table-cell office:value-type="float" office:value="0.01699333">
            <text:p>0.01699333</text:p>
          </table:table-cell>
          <table:table-cell table:number-columns-repeated="4"/>
        </table:table-row>
        <table:table-row table:style-name="ro1">
          <table:table-cell office:value-type="float" office:value="640.929016113281">
            <text:p>640.9290161133</text:p>
          </table:table-cell>
          <table:table-cell office:value-type="float" office:value="0.01290376">
            <text:p>0.01290376</text:p>
          </table:table-cell>
          <table:table-cell table:number-columns-repeated="4"/>
        </table:table-row>
        <table:table-row table:style-name="ro1">
          <table:table-cell office:value-type="float" office:value="641.048583984375">
            <text:p>641.0485839844</text:p>
          </table:table-cell>
          <table:table-cell office:value-type="float" office:value="0.0103232">
            <text:p>0.0103232</text:p>
          </table:table-cell>
          <table:table-cell table:number-columns-repeated="4"/>
        </table:table-row>
        <table:table-row table:style-name="ro1">
          <table:table-cell office:value-type="float" office:value="641.168151855469">
            <text:p>641.1681518555</text:p>
          </table:table-cell>
          <table:table-cell office:value-type="float" office:value="0.01667326">
            <text:p>0.01667326</text:p>
          </table:table-cell>
          <table:table-cell table:number-columns-repeated="4"/>
        </table:table-row>
        <table:table-row table:style-name="ro1">
          <table:table-cell office:value-type="float" office:value="641.287719726563">
            <text:p>641.2877197266</text:p>
          </table:table-cell>
          <table:table-cell office:value-type="float" office:value="0.0173644">
            <text:p>0.0173644</text:p>
          </table:table-cell>
          <table:table-cell table:number-columns-repeated="4"/>
        </table:table-row>
        <table:table-row table:style-name="ro1">
          <table:table-cell office:value-type="float" office:value="641.407287597656">
            <text:p>641.4072875977</text:p>
          </table:table-cell>
          <table:table-cell office:value-type="float" office:value="0.02341879">
            <text:p>0.02341879</text:p>
          </table:table-cell>
          <table:table-cell table:number-columns-repeated="4"/>
        </table:table-row>
        <table:table-row table:style-name="ro1">
          <table:table-cell office:value-type="float" office:value="641.52685546875">
            <text:p>641.5268554688</text:p>
          </table:table-cell>
          <table:table-cell office:value-type="float" office:value="0.03000934">
            <text:p>0.03000934</text:p>
          </table:table-cell>
          <table:table-cell table:number-columns-repeated="4"/>
        </table:table-row>
        <table:table-row table:style-name="ro1">
          <table:table-cell office:value-type="float" office:value="641.646423339844">
            <text:p>641.6464233398</text:p>
          </table:table-cell>
          <table:table-cell office:value-type="float" office:value="0.02067854">
            <text:p>0.02067854</text:p>
          </table:table-cell>
          <table:table-cell table:number-columns-repeated="4"/>
        </table:table-row>
        <table:table-row table:style-name="ro1">
          <table:table-cell office:value-type="float" office:value="641.765991210938">
            <text:p>641.7659912109</text:p>
          </table:table-cell>
          <table:table-cell office:value-type="float" office:value="0.01573161">
            <text:p>0.01573161</text:p>
          </table:table-cell>
          <table:table-cell table:number-columns-repeated="4"/>
        </table:table-row>
        <table:table-row table:style-name="ro1">
          <table:table-cell office:value-type="float" office:value="641.885559082031">
            <text:p>641.885559082</text:p>
          </table:table-cell>
          <table:table-cell office:value-type="float" office:value="0.02564795">
            <text:p>0.02564795</text:p>
          </table:table-cell>
          <table:table-cell table:number-columns-repeated="4"/>
        </table:table-row>
        <table:table-row table:style-name="ro1">
          <table:table-cell office:value-type="float" office:value="642.005126953125">
            <text:p>642.0051269531</text:p>
          </table:table-cell>
          <table:table-cell office:value-type="float" office:value="0.01906938">
            <text:p>0.01906938</text:p>
          </table:table-cell>
          <table:table-cell table:number-columns-repeated="4"/>
        </table:table-row>
        <table:table-row table:style-name="ro1">
          <table:table-cell office:value-type="float" office:value="642.124694824219">
            <text:p>642.1246948242</text:p>
          </table:table-cell>
          <table:table-cell office:value-type="float" office:value="0.02243263">
            <text:p>0.02243263</text:p>
          </table:table-cell>
          <table:table-cell table:number-columns-repeated="4"/>
        </table:table-row>
        <table:table-row table:style-name="ro1">
          <table:table-cell office:value-type="float" office:value="642.244262695313">
            <text:p>642.2442626953</text:p>
          </table:table-cell>
          <table:table-cell office:value-type="float" office:value="0.01664594">
            <text:p>0.01664594</text:p>
          </table:table-cell>
          <table:table-cell table:number-columns-repeated="4"/>
        </table:table-row>
        <table:table-row table:style-name="ro1">
          <table:table-cell office:value-type="float" office:value="642.363891601563">
            <text:p>642.3638916016</text:p>
          </table:table-cell>
          <table:table-cell office:value-type="float" office:value="0.01417585">
            <text:p>0.01417585</text:p>
          </table:table-cell>
          <table:table-cell table:number-columns-repeated="4"/>
        </table:table-row>
        <table:table-row table:style-name="ro1">
          <table:table-cell office:value-type="float" office:value="642.483459472656">
            <text:p>642.4834594727</text:p>
          </table:table-cell>
          <table:table-cell office:value-type="float" office:value="0.01661173">
            <text:p>0.01661173</text:p>
          </table:table-cell>
          <table:table-cell table:number-columns-repeated="4"/>
        </table:table-row>
        <table:table-row table:style-name="ro1">
          <table:table-cell office:value-type="float" office:value="642.60302734375">
            <text:p>642.6030273438</text:p>
          </table:table-cell>
          <table:table-cell office:value-type="float" office:value="0.02874033">
            <text:p>0.02874033</text:p>
          </table:table-cell>
          <table:table-cell table:number-columns-repeated="4"/>
        </table:table-row>
        <table:table-row table:style-name="ro1">
          <table:table-cell office:value-type="float" office:value="642.722595214844">
            <text:p>642.7225952148</text:p>
          </table:table-cell>
          <table:table-cell office:value-type="float" office:value="0.01325175">
            <text:p>0.01325175</text:p>
          </table:table-cell>
          <table:table-cell table:number-columns-repeated="4"/>
        </table:table-row>
        <table:table-row table:style-name="ro1">
          <table:table-cell office:value-type="float" office:value="642.842163085938">
            <text:p>642.8421630859</text:p>
          </table:table-cell>
          <table:table-cell office:value-type="float" office:value="0.01573624">
            <text:p>0.01573624</text:p>
          </table:table-cell>
          <table:table-cell table:number-columns-repeated="4"/>
        </table:table-row>
        <table:table-row table:style-name="ro1">
          <table:table-cell office:value-type="float" office:value="642.961791992188">
            <text:p>642.9617919922</text:p>
          </table:table-cell>
          <table:table-cell office:value-type="float" office:value="0.01879732">
            <text:p>0.01879732</text:p>
          </table:table-cell>
          <table:table-cell table:number-columns-repeated="4"/>
        </table:table-row>
        <table:table-row table:style-name="ro1">
          <table:table-cell office:value-type="float" office:value="643.081359863281">
            <text:p>643.0813598633</text:p>
          </table:table-cell>
          <table:table-cell office:value-type="float" office:value="0.02795251">
            <text:p>0.02795251</text:p>
          </table:table-cell>
          <table:table-cell table:number-columns-repeated="4"/>
        </table:table-row>
        <table:table-row table:style-name="ro1">
          <table:table-cell office:value-type="float" office:value="643.200927734375">
            <text:p>643.2009277344</text:p>
          </table:table-cell>
          <table:table-cell office:value-type="float" office:value="0.02129997">
            <text:p>0.02129997</text:p>
          </table:table-cell>
          <table:table-cell table:number-columns-repeated="4"/>
        </table:table-row>
        <table:table-row table:style-name="ro1">
          <table:table-cell office:value-type="float" office:value="643.320556640625">
            <text:p>643.3205566406</text:p>
          </table:table-cell>
          <table:table-cell office:value-type="float" office:value="0.01922129">
            <text:p>0.01922129</text:p>
          </table:table-cell>
          <table:table-cell table:number-columns-repeated="4"/>
        </table:table-row>
        <table:table-row table:style-name="ro1">
          <table:table-cell office:value-type="float" office:value="643.440124511719">
            <text:p>643.4401245117</text:p>
          </table:table-cell>
          <table:table-cell office:value-type="float" office:value="0.03015951">
            <text:p>0.03015951</text:p>
          </table:table-cell>
          <table:table-cell table:number-columns-repeated="4"/>
        </table:table-row>
        <table:table-row table:style-name="ro1">
          <table:table-cell office:value-type="float" office:value="643.559753417969">
            <text:p>643.559753418</text:p>
          </table:table-cell>
          <table:table-cell office:value-type="float" office:value="0.02797204">
            <text:p>0.02797204</text:p>
          </table:table-cell>
          <table:table-cell table:number-columns-repeated="4"/>
        </table:table-row>
        <table:table-row table:style-name="ro1">
          <table:table-cell office:value-type="float" office:value="643.679321289063">
            <text:p>643.6793212891</text:p>
          </table:table-cell>
          <table:table-cell office:value-type="float" office:value="0.02470928">
            <text:p>0.02470928</text:p>
          </table:table-cell>
          <table:table-cell table:number-columns-repeated="4"/>
        </table:table-row>
        <table:table-row table:style-name="ro1">
          <table:table-cell office:value-type="float" office:value="643.798950195313">
            <text:p>643.7989501953</text:p>
          </table:table-cell>
          <table:table-cell office:value-type="float" office:value="0.02036296">
            <text:p>0.02036296</text:p>
          </table:table-cell>
          <table:table-cell table:number-columns-repeated="4"/>
        </table:table-row>
        <table:table-row table:style-name="ro1">
          <table:table-cell office:value-type="float" office:value="643.918518066406">
            <text:p>643.9185180664</text:p>
          </table:table-cell>
          <table:table-cell office:value-type="float" office:value="0.01854568">
            <text:p>0.01854568</text:p>
          </table:table-cell>
          <table:table-cell table:number-columns-repeated="4"/>
        </table:table-row>
        <table:table-row table:style-name="ro1">
          <table:table-cell office:value-type="float" office:value="644.038146972656">
            <text:p>644.0381469727</text:p>
          </table:table-cell>
          <table:table-cell office:value-type="float" office:value="0.03551089">
            <text:p>0.03551089</text:p>
          </table:table-cell>
          <table:table-cell table:number-columns-repeated="4"/>
        </table:table-row>
        <table:table-row table:style-name="ro1">
          <table:table-cell office:value-type="float" office:value="644.15771484375">
            <text:p>644.1577148438</text:p>
          </table:table-cell>
          <table:table-cell office:value-type="float" office:value="0.01313113">
            <text:p>0.01313113</text:p>
          </table:table-cell>
          <table:table-cell table:number-columns-repeated="4"/>
        </table:table-row>
        <table:table-row table:style-name="ro1">
          <table:table-cell office:value-type="float" office:value="644.27734375">
            <text:p>644.27734375</text:p>
          </table:table-cell>
          <table:table-cell office:value-type="float" office:value="0.0137313">
            <text:p>0.0137313</text:p>
          </table:table-cell>
          <table:table-cell table:number-columns-repeated="4"/>
        </table:table-row>
        <table:table-row table:style-name="ro1">
          <table:table-cell office:value-type="float" office:value="644.396911621094">
            <text:p>644.3969116211</text:p>
          </table:table-cell>
          <table:table-cell office:value-type="float" office:value="0.01706588">
            <text:p>0.01706588</text:p>
          </table:table-cell>
          <table:table-cell table:number-columns-repeated="4"/>
        </table:table-row>
        <table:table-row table:style-name="ro1">
          <table:table-cell office:value-type="float" office:value="644.516540527344">
            <text:p>644.5165405273</text:p>
          </table:table-cell>
          <table:table-cell office:value-type="float" office:value="0.01639025">
            <text:p>0.01639025</text:p>
          </table:table-cell>
          <table:table-cell table:number-columns-repeated="4"/>
        </table:table-row>
        <table:table-row table:style-name="ro1">
          <table:table-cell office:value-type="float" office:value="644.636169433594">
            <text:p>644.6361694336</text:p>
          </table:table-cell>
          <table:table-cell office:value-type="float" office:value="0.01400571">
            <text:p>0.01400571</text:p>
          </table:table-cell>
          <table:table-cell table:number-columns-repeated="4"/>
        </table:table-row>
        <table:table-row table:style-name="ro1">
          <table:table-cell office:value-type="float" office:value="644.755737304688">
            <text:p>644.7557373047</text:p>
          </table:table-cell>
          <table:table-cell office:value-type="float" office:value="0.01520003">
            <text:p>0.01520003</text:p>
          </table:table-cell>
          <table:table-cell table:number-columns-repeated="4"/>
        </table:table-row>
        <table:table-row table:style-name="ro1">
          <table:table-cell office:value-type="float" office:value="644.875366210938">
            <text:p>644.8753662109</text:p>
          </table:table-cell>
          <table:table-cell office:value-type="float" office:value="0.02506636">
            <text:p>0.02506636</text:p>
          </table:table-cell>
          <table:table-cell table:number-columns-repeated="4"/>
        </table:table-row>
        <table:table-row table:style-name="ro1">
          <table:table-cell office:value-type="float" office:value="644.994995117188">
            <text:p>644.9949951172</text:p>
          </table:table-cell>
          <table:table-cell office:value-type="float" office:value="0.02455409">
            <text:p>0.02455409</text:p>
          </table:table-cell>
          <table:table-cell table:number-columns-repeated="4"/>
        </table:table-row>
        <table:table-row table:style-name="ro1">
          <table:table-cell office:value-type="float" office:value="645.114562988281">
            <text:p>645.1145629883</text:p>
          </table:table-cell>
          <table:table-cell office:value-type="float" office:value="0.02774293">
            <text:p>0.02774293</text:p>
          </table:table-cell>
          <table:table-cell table:number-columns-repeated="4"/>
        </table:table-row>
        <table:table-row table:style-name="ro1">
          <table:table-cell office:value-type="float" office:value="645.234191894531">
            <text:p>645.2341918945</text:p>
          </table:table-cell>
          <table:table-cell office:value-type="float" office:value="0.02626694">
            <text:p>0.02626694</text:p>
          </table:table-cell>
          <table:table-cell table:number-columns-repeated="4"/>
        </table:table-row>
        <table:table-row table:style-name="ro1">
          <table:table-cell office:value-type="float" office:value="645.353820800781">
            <text:p>645.3538208008</text:p>
          </table:table-cell>
          <table:table-cell office:value-type="float" office:value="0.01763685">
            <text:p>0.01763685</text:p>
          </table:table-cell>
          <table:table-cell table:number-columns-repeated="4"/>
        </table:table-row>
        <table:table-row table:style-name="ro1">
          <table:table-cell office:value-type="float" office:value="645.473449707031">
            <text:p>645.473449707</text:p>
          </table:table-cell>
          <table:table-cell office:value-type="float" office:value="0.01389703">
            <text:p>0.01389703</text:p>
          </table:table-cell>
          <table:table-cell table:number-columns-repeated="4"/>
        </table:table-row>
        <table:table-row table:style-name="ro1">
          <table:table-cell office:value-type="float" office:value="645.593078613281">
            <text:p>645.5930786133</text:p>
          </table:table-cell>
          <table:table-cell office:value-type="float" office:value="0.01816669">
            <text:p>0.01816669</text:p>
          </table:table-cell>
          <table:table-cell table:number-columns-repeated="4"/>
        </table:table-row>
        <table:table-row table:style-name="ro1">
          <table:table-cell office:value-type="float" office:value="645.712707519531">
            <text:p>645.7127075195</text:p>
          </table:table-cell>
          <table:table-cell office:value-type="float" office:value="0.01551726">
            <text:p>0.01551726</text:p>
          </table:table-cell>
          <table:table-cell table:number-columns-repeated="4"/>
        </table:table-row>
        <table:table-row table:style-name="ro1">
          <table:table-cell office:value-type="float" office:value="645.832336425781">
            <text:p>645.8323364258</text:p>
          </table:table-cell>
          <table:table-cell office:value-type="float" office:value="0.01380278">
            <text:p>0.01380278</text:p>
          </table:table-cell>
          <table:table-cell table:number-columns-repeated="4"/>
        </table:table-row>
        <table:table-row table:style-name="ro1">
          <table:table-cell office:value-type="float" office:value="645.951965332031">
            <text:p>645.951965332</text:p>
          </table:table-cell>
          <table:table-cell office:value-type="float" office:value="0.01730316">
            <text:p>0.01730316</text:p>
          </table:table-cell>
          <table:table-cell table:number-columns-repeated="4"/>
        </table:table-row>
        <table:table-row table:style-name="ro1">
          <table:table-cell office:value-type="float" office:value="646.071533203125">
            <text:p>646.0715332031</text:p>
          </table:table-cell>
          <table:table-cell office:value-type="float" office:value="0.01529303">
            <text:p>0.01529303</text:p>
          </table:table-cell>
          <table:table-cell table:number-columns-repeated="4"/>
        </table:table-row>
        <table:table-row table:style-name="ro1">
          <table:table-cell office:value-type="float" office:value="646.191162109375">
            <text:p>646.1911621094</text:p>
          </table:table-cell>
          <table:table-cell office:value-type="float" office:value="0.0119691">
            <text:p>0.0119691</text:p>
          </table:table-cell>
          <table:table-cell table:number-columns-repeated="4"/>
        </table:table-row>
        <table:table-row table:style-name="ro1">
          <table:table-cell office:value-type="float" office:value="646.310852050781">
            <text:p>646.3108520508</text:p>
          </table:table-cell>
          <table:table-cell office:value-type="float" office:value="0.02567263">
            <text:p>0.02567263</text:p>
          </table:table-cell>
          <table:table-cell table:number-columns-repeated="4"/>
        </table:table-row>
        <table:table-row table:style-name="ro1">
          <table:table-cell office:value-type="float" office:value="646.430480957031">
            <text:p>646.430480957</text:p>
          </table:table-cell>
          <table:table-cell office:value-type="float" office:value="0.02001681">
            <text:p>0.02001681</text:p>
          </table:table-cell>
          <table:table-cell table:number-columns-repeated="4"/>
        </table:table-row>
        <table:table-row table:style-name="ro1">
          <table:table-cell office:value-type="float" office:value="646.550109863281">
            <text:p>646.5501098633</text:p>
          </table:table-cell>
          <table:table-cell office:value-type="float" office:value="0.02819948">
            <text:p>0.02819948</text:p>
          </table:table-cell>
          <table:table-cell table:number-columns-repeated="4"/>
        </table:table-row>
        <table:table-row table:style-name="ro1">
          <table:table-cell office:value-type="float" office:value="646.669738769531">
            <text:p>646.6697387695</text:p>
          </table:table-cell>
          <table:table-cell office:value-type="float" office:value="0.01498532">
            <text:p>0.01498532</text:p>
          </table:table-cell>
          <table:table-cell table:number-columns-repeated="4"/>
        </table:table-row>
        <table:table-row table:style-name="ro1">
          <table:table-cell office:value-type="float" office:value="646.789367675781">
            <text:p>646.7893676758</text:p>
          </table:table-cell>
          <table:table-cell office:value-type="float" office:value="0.02207029">
            <text:p>0.02207029</text:p>
          </table:table-cell>
          <table:table-cell table:number-columns-repeated="4"/>
        </table:table-row>
        <table:table-row table:style-name="ro1">
          <table:table-cell office:value-type="float" office:value="646.908996582031">
            <text:p>646.908996582</text:p>
          </table:table-cell>
          <table:table-cell office:value-type="float" office:value="0.03872181">
            <text:p>0.03872181</text:p>
          </table:table-cell>
          <table:table-cell table:number-columns-repeated="4"/>
        </table:table-row>
        <table:table-row table:style-name="ro1">
          <table:table-cell office:value-type="float" office:value="647.028625488281">
            <text:p>647.0286254883</text:p>
          </table:table-cell>
          <table:table-cell office:value-type="float" office:value="0.02117862">
            <text:p>0.02117862</text:p>
          </table:table-cell>
          <table:table-cell table:number-columns-repeated="4"/>
        </table:table-row>
        <table:table-row table:style-name="ro1">
          <table:table-cell office:value-type="float" office:value="647.148254394531">
            <text:p>647.1482543945</text:p>
          </table:table-cell>
          <table:table-cell office:value-type="float" office:value="0.01505613">
            <text:p>0.01505613</text:p>
          </table:table-cell>
          <table:table-cell table:number-columns-repeated="4"/>
        </table:table-row>
        <table:table-row table:style-name="ro1">
          <table:table-cell office:value-type="float" office:value="647.267944335938">
            <text:p>647.2679443359</text:p>
          </table:table-cell>
          <table:table-cell office:value-type="float" office:value="0.01476498">
            <text:p>0.01476498</text:p>
          </table:table-cell>
          <table:table-cell table:number-columns-repeated="4"/>
        </table:table-row>
        <table:table-row table:style-name="ro1">
          <table:table-cell office:value-type="float" office:value="647.387573242188">
            <text:p>647.3875732422</text:p>
          </table:table-cell>
          <table:table-cell office:value-type="float" office:value="0.02195332">
            <text:p>0.02195332</text:p>
          </table:table-cell>
          <table:table-cell table:number-columns-repeated="4"/>
        </table:table-row>
        <table:table-row table:style-name="ro1">
          <table:table-cell office:value-type="float" office:value="647.507202148438">
            <text:p>647.5072021484</text:p>
          </table:table-cell>
          <table:table-cell office:value-type="float" office:value="0.01394995">
            <text:p>0.01394995</text:p>
          </table:table-cell>
          <table:table-cell table:number-columns-repeated="4"/>
        </table:table-row>
        <table:table-row table:style-name="ro1">
          <table:table-cell office:value-type="float" office:value="647.626831054688">
            <text:p>647.6268310547</text:p>
          </table:table-cell>
          <table:table-cell office:value-type="float" office:value="0.01938449">
            <text:p>0.01938449</text:p>
          </table:table-cell>
          <table:table-cell table:number-columns-repeated="4"/>
        </table:table-row>
        <table:table-row table:style-name="ro1">
          <table:table-cell office:value-type="float" office:value="647.746520996094">
            <text:p>647.7465209961</text:p>
          </table:table-cell>
          <table:table-cell office:value-type="float" office:value="0.0400761">
            <text:p>0.0400761</text:p>
          </table:table-cell>
          <table:table-cell table:number-columns-repeated="4"/>
        </table:table-row>
        <table:table-row table:style-name="ro1">
          <table:table-cell office:value-type="float" office:value="647.866149902344">
            <text:p>647.8661499023</text:p>
          </table:table-cell>
          <table:table-cell office:value-type="float" office:value="0.01057374">
            <text:p>0.01057374</text:p>
          </table:table-cell>
          <table:table-cell table:number-columns-repeated="4"/>
        </table:table-row>
        <table:table-row table:style-name="ro1">
          <table:table-cell office:value-type="float" office:value="647.985778808594">
            <text:p>647.9857788086</text:p>
          </table:table-cell>
          <table:table-cell office:value-type="float" office:value="0.03765117">
            <text:p>0.03765117</text:p>
          </table:table-cell>
          <table:table-cell table:number-columns-repeated="4"/>
        </table:table-row>
        <table:table-row table:style-name="ro1">
          <table:table-cell office:value-type="float" office:value="648.10546875">
            <text:p>648.10546875</text:p>
          </table:table-cell>
          <table:table-cell office:value-type="float" office:value="0.009960945">
            <text:p>0.009960945</text:p>
          </table:table-cell>
          <table:table-cell table:number-columns-repeated="4"/>
        </table:table-row>
        <table:table-row table:style-name="ro1">
          <table:table-cell office:value-type="float" office:value="648.22509765625">
            <text:p>648.2250976563</text:p>
          </table:table-cell>
          <table:table-cell office:value-type="float" office:value="0.03425667">
            <text:p>0.03425667</text:p>
          </table:table-cell>
          <table:table-cell table:number-columns-repeated="4"/>
        </table:table-row>
        <table:table-row table:style-name="ro1">
          <table:table-cell office:value-type="float" office:value="648.344787597656">
            <text:p>648.3447875977</text:p>
          </table:table-cell>
          <table:table-cell office:value-type="float" office:value="0.02433977">
            <text:p>0.02433977</text:p>
          </table:table-cell>
          <table:table-cell table:number-columns-repeated="4"/>
        </table:table-row>
        <table:table-row table:style-name="ro1">
          <table:table-cell office:value-type="float" office:value="648.464416503906">
            <text:p>648.4644165039</text:p>
          </table:table-cell>
          <table:table-cell office:value-type="float" office:value="0.01652052">
            <text:p>0.01652052</text:p>
          </table:table-cell>
          <table:table-cell table:number-columns-repeated="4"/>
        </table:table-row>
        <table:table-row table:style-name="ro1">
          <table:table-cell office:value-type="float" office:value="648.584106445313">
            <text:p>648.5841064453</text:p>
          </table:table-cell>
          <table:table-cell office:value-type="float" office:value="0.01870162">
            <text:p>0.01870162</text:p>
          </table:table-cell>
          <table:table-cell table:number-columns-repeated="4"/>
        </table:table-row>
        <table:table-row table:style-name="ro1">
          <table:table-cell office:value-type="float" office:value="648.703735351563">
            <text:p>648.7037353516</text:p>
          </table:table-cell>
          <table:table-cell office:value-type="float" office:value="0.0172841">
            <text:p>0.0172841</text:p>
          </table:table-cell>
          <table:table-cell table:number-columns-repeated="4"/>
        </table:table-row>
        <table:table-row table:style-name="ro1">
          <table:table-cell office:value-type="float" office:value="648.823425292969">
            <text:p>648.823425293</text:p>
          </table:table-cell>
          <table:table-cell office:value-type="float" office:value="0.006818437">
            <text:p>0.006818437</text:p>
          </table:table-cell>
          <table:table-cell table:number-columns-repeated="4"/>
        </table:table-row>
        <table:table-row table:style-name="ro1">
          <table:table-cell office:value-type="float" office:value="648.943054199219">
            <text:p>648.9430541992</text:p>
          </table:table-cell>
          <table:table-cell office:value-type="float" office:value="0.01281313">
            <text:p>0.01281313</text:p>
          </table:table-cell>
          <table:table-cell table:number-columns-repeated="4"/>
        </table:table-row>
        <table:table-row table:style-name="ro1">
          <table:table-cell office:value-type="float" office:value="649.062744140625">
            <text:p>649.0627441406</text:p>
          </table:table-cell>
          <table:table-cell office:value-type="float" office:value="0.01513749">
            <text:p>0.01513749</text:p>
          </table:table-cell>
          <table:table-cell table:number-columns-repeated="4"/>
        </table:table-row>
        <table:table-row table:style-name="ro1">
          <table:table-cell office:value-type="float" office:value="649.182434082031">
            <text:p>649.182434082</text:p>
          </table:table-cell>
          <table:table-cell office:value-type="float" office:value="0.01613702">
            <text:p>0.01613702</text:p>
          </table:table-cell>
          <table:table-cell table:number-columns-repeated="4"/>
        </table:table-row>
        <table:table-row table:style-name="ro1">
          <table:table-cell office:value-type="float" office:value="649.302062988281">
            <text:p>649.3020629883</text:p>
          </table:table-cell>
          <table:table-cell office:value-type="float" office:value="0.02077511">
            <text:p>0.02077511</text:p>
          </table:table-cell>
          <table:table-cell table:number-columns-repeated="4"/>
        </table:table-row>
        <table:table-row table:style-name="ro1">
          <table:table-cell office:value-type="float" office:value="649.421752929688">
            <text:p>649.4217529297</text:p>
          </table:table-cell>
          <table:table-cell office:value-type="float" office:value="0.008573144">
            <text:p>0.008573144</text:p>
          </table:table-cell>
          <table:table-cell table:number-columns-repeated="4"/>
        </table:table-row>
        <table:table-row table:style-name="ro1">
          <table:table-cell office:value-type="float" office:value="649.541442871094">
            <text:p>649.5414428711</text:p>
          </table:table-cell>
          <table:table-cell office:value-type="float" office:value="0.01301004">
            <text:p>0.01301004</text:p>
          </table:table-cell>
          <table:table-cell table:number-columns-repeated="4"/>
        </table:table-row>
        <table:table-row table:style-name="ro1">
          <table:table-cell office:value-type="float" office:value="649.661071777344">
            <text:p>649.6610717773</text:p>
          </table:table-cell>
          <table:table-cell office:value-type="float" office:value="0.03081605">
            <text:p>0.03081605</text:p>
          </table:table-cell>
          <table:table-cell table:number-columns-repeated="4"/>
        </table:table-row>
        <table:table-row table:style-name="ro1">
          <table:table-cell office:value-type="float" office:value="649.78076171875">
            <text:p>649.7807617188</text:p>
          </table:table-cell>
          <table:table-cell office:value-type="float" office:value="0.01744856">
            <text:p>0.01744856</text:p>
          </table:table-cell>
          <table:table-cell table:number-columns-repeated="4"/>
        </table:table-row>
        <table:table-row table:style-name="ro1">
          <table:table-cell office:value-type="float" office:value="649.900451660156">
            <text:p>649.9004516602</text:p>
          </table:table-cell>
          <table:table-cell office:value-type="float" office:value="0.01893128">
            <text:p>0.01893128</text:p>
          </table:table-cell>
          <table:table-cell table:number-columns-repeated="4"/>
        </table:table-row>
        <table:table-row table:style-name="ro1">
          <table:table-cell office:value-type="float" office:value="650.020141601563">
            <text:p>650.0201416016</text:p>
          </table:table-cell>
          <table:table-cell office:value-type="float" office:value="0.01035287">
            <text:p>0.01035287</text:p>
          </table:table-cell>
          <table:table-cell table:number-columns-repeated="4"/>
        </table:table-row>
        <table:table-row table:style-name="ro1">
          <table:table-cell office:value-type="float" office:value="650.139770507813">
            <text:p>650.1397705078</text:p>
          </table:table-cell>
          <table:table-cell office:value-type="float" office:value="0.007710458">
            <text:p>0.007710458</text:p>
          </table:table-cell>
          <table:table-cell table:number-columns-repeated="4"/>
        </table:table-row>
        <table:table-row table:style-name="ro1">
          <table:table-cell office:value-type="float" office:value="650.259460449219">
            <text:p>650.2594604492</text:p>
          </table:table-cell>
          <table:table-cell office:value-type="float" office:value="0.009396303">
            <text:p>0.009396303</text:p>
          </table:table-cell>
          <table:table-cell table:number-columns-repeated="4"/>
        </table:table-row>
        <table:table-row table:style-name="ro1">
          <table:table-cell office:value-type="float" office:value="650.379150390625">
            <text:p>650.3791503906</text:p>
          </table:table-cell>
          <table:table-cell office:value-type="float" office:value="0.01444578">
            <text:p>0.01444578</text:p>
          </table:table-cell>
          <table:table-cell table:number-columns-repeated="4"/>
        </table:table-row>
        <table:table-row table:style-name="ro1">
          <table:table-cell office:value-type="float" office:value="650.498840332031">
            <text:p>650.498840332</text:p>
          </table:table-cell>
          <table:table-cell office:value-type="float" office:value="0.0104283">
            <text:p>0.0104283</text:p>
          </table:table-cell>
          <table:table-cell table:number-columns-repeated="4"/>
        </table:table-row>
        <table:table-row table:style-name="ro1">
          <table:table-cell office:value-type="float" office:value="650.618530273438">
            <text:p>650.6185302734</text:p>
          </table:table-cell>
          <table:table-cell office:value-type="float" office:value="0.01912863">
            <text:p>0.01912863</text:p>
          </table:table-cell>
          <table:table-cell table:number-columns-repeated="4"/>
        </table:table-row>
        <table:table-row table:style-name="ro1">
          <table:table-cell office:value-type="float" office:value="650.738220214844">
            <text:p>650.7382202148</text:p>
          </table:table-cell>
          <table:table-cell office:value-type="float" office:value="0.01310573">
            <text:p>0.01310573</text:p>
          </table:table-cell>
          <table:table-cell table:number-columns-repeated="4"/>
        </table:table-row>
        <table:table-row table:style-name="ro1">
          <table:table-cell office:value-type="float" office:value="650.85791015625">
            <text:p>650.8579101563</text:p>
          </table:table-cell>
          <table:table-cell office:value-type="float" office:value="0.02027006">
            <text:p>0.02027006</text:p>
          </table:table-cell>
          <table:table-cell table:number-columns-repeated="4"/>
        </table:table-row>
        <table:table-row table:style-name="ro1">
          <table:table-cell office:value-type="float" office:value="650.977600097656">
            <text:p>650.9776000977</text:p>
          </table:table-cell>
          <table:table-cell office:value-type="float" office:value="0.02289479">
            <text:p>0.02289479</text:p>
          </table:table-cell>
          <table:table-cell table:number-columns-repeated="4"/>
        </table:table-row>
        <table:table-row table:style-name="ro1">
          <table:table-cell office:value-type="float" office:value="651.097290039063">
            <text:p>651.0972900391</text:p>
          </table:table-cell>
          <table:table-cell office:value-type="float" office:value="0.01456387">
            <text:p>0.01456387</text:p>
          </table:table-cell>
          <table:table-cell table:number-columns-repeated="4"/>
        </table:table-row>
        <table:table-row table:style-name="ro1">
          <table:table-cell office:value-type="float" office:value="651.216979980469">
            <text:p>651.2169799805</text:p>
          </table:table-cell>
          <table:table-cell office:value-type="float" office:value="0.02294654">
            <text:p>0.02294654</text:p>
          </table:table-cell>
          <table:table-cell table:number-columns-repeated="4"/>
        </table:table-row>
        <table:table-row table:style-name="ro1">
          <table:table-cell office:value-type="float" office:value="651.336669921875">
            <text:p>651.3366699219</text:p>
          </table:table-cell>
          <table:table-cell office:value-type="float" office:value="0.0134462">
            <text:p>0.0134462</text:p>
          </table:table-cell>
          <table:table-cell table:number-columns-repeated="4"/>
        </table:table-row>
        <table:table-row table:style-name="ro1">
          <table:table-cell office:value-type="float" office:value="651.456359863281">
            <text:p>651.4563598633</text:p>
          </table:table-cell>
          <table:table-cell office:value-type="float" office:value="0.01383256">
            <text:p>0.01383256</text:p>
          </table:table-cell>
          <table:table-cell table:number-columns-repeated="4"/>
        </table:table-row>
        <table:table-row table:style-name="ro1">
          <table:table-cell office:value-type="float" office:value="651.576049804688">
            <text:p>651.5760498047</text:p>
          </table:table-cell>
          <table:table-cell office:value-type="float" office:value="0.0113448">
            <text:p>0.0113448</text:p>
          </table:table-cell>
          <table:table-cell table:number-columns-repeated="4"/>
        </table:table-row>
        <table:table-row table:style-name="ro1">
          <table:table-cell office:value-type="float" office:value="651.695739746094">
            <text:p>651.6957397461</text:p>
          </table:table-cell>
          <table:table-cell office:value-type="float" office:value="0.01993733">
            <text:p>0.01993733</text:p>
          </table:table-cell>
          <table:table-cell table:number-columns-repeated="4"/>
        </table:table-row>
        <table:table-row table:style-name="ro1">
          <table:table-cell office:value-type="float" office:value="651.8154296875">
            <text:p>651.8154296875</text:p>
          </table:table-cell>
          <table:table-cell office:value-type="float" office:value="0.01247498">
            <text:p>0.01247498</text:p>
          </table:table-cell>
          <table:table-cell table:number-columns-repeated="4"/>
        </table:table-row>
        <table:table-row table:style-name="ro1">
          <table:table-cell office:value-type="float" office:value="651.935180664063">
            <text:p>651.9351806641</text:p>
          </table:table-cell>
          <table:table-cell office:value-type="float" office:value="0.007609453">
            <text:p>0.007609453</text:p>
          </table:table-cell>
          <table:table-cell table:number-columns-repeated="4"/>
        </table:table-row>
        <table:table-row table:style-name="ro1">
          <table:table-cell office:value-type="float" office:value="652.054870605469">
            <text:p>652.0548706055</text:p>
          </table:table-cell>
          <table:table-cell office:value-type="float" office:value="0.01504667">
            <text:p>0.01504667</text:p>
          </table:table-cell>
          <table:table-cell table:number-columns-repeated="4"/>
        </table:table-row>
        <table:table-row table:style-name="ro1">
          <table:table-cell office:value-type="float" office:value="652.174560546875">
            <text:p>652.1745605469</text:p>
          </table:table-cell>
          <table:table-cell office:value-type="float" office:value="0.01007689">
            <text:p>0.01007689</text:p>
          </table:table-cell>
          <table:table-cell table:number-columns-repeated="4"/>
        </table:table-row>
        <table:table-row table:style-name="ro1">
          <table:table-cell office:value-type="float" office:value="652.294250488281">
            <text:p>652.2942504883</text:p>
          </table:table-cell>
          <table:table-cell office:value-type="float" office:value="0.01153527">
            <text:p>0.01153527</text:p>
          </table:table-cell>
          <table:table-cell table:number-columns-repeated="4"/>
        </table:table-row>
        <table:table-row table:style-name="ro1">
          <table:table-cell office:value-type="float" office:value="652.414001464844">
            <text:p>652.4140014648</text:p>
          </table:table-cell>
          <table:table-cell office:value-type="float" office:value="0.0165744">
            <text:p>0.0165744</text:p>
          </table:table-cell>
          <table:table-cell table:number-columns-repeated="4"/>
        </table:table-row>
        <table:table-row table:style-name="ro1">
          <table:table-cell office:value-type="float" office:value="652.53369140625">
            <text:p>652.5336914063</text:p>
          </table:table-cell>
          <table:table-cell office:value-type="float" office:value="0.007586757">
            <text:p>0.007586757</text:p>
          </table:table-cell>
          <table:table-cell table:number-columns-repeated="4"/>
        </table:table-row>
        <table:table-row table:style-name="ro1">
          <table:table-cell office:value-type="float" office:value="652.653381347656">
            <text:p>652.6533813477</text:p>
          </table:table-cell>
          <table:table-cell office:value-type="float" office:value="0.01333316">
            <text:p>0.01333316</text:p>
          </table:table-cell>
          <table:table-cell table:number-columns-repeated="4"/>
        </table:table-row>
        <table:table-row table:style-name="ro1">
          <table:table-cell office:value-type="float" office:value="652.773071289063">
            <text:p>652.7730712891</text:p>
          </table:table-cell>
          <table:table-cell office:value-type="float" office:value="0.006259277">
            <text:p>0.006259277</text:p>
          </table:table-cell>
          <table:table-cell table:number-columns-repeated="4"/>
        </table:table-row>
        <table:table-row table:style-name="ro1">
          <table:table-cell office:value-type="float" office:value="652.892822265625">
            <text:p>652.8928222656</text:p>
          </table:table-cell>
          <table:table-cell office:value-type="float" office:value="0.01835074">
            <text:p>0.01835074</text:p>
          </table:table-cell>
          <table:table-cell table:number-columns-repeated="4"/>
        </table:table-row>
        <table:table-row table:style-name="ro1">
          <table:table-cell office:value-type="float" office:value="653.012512207031">
            <text:p>653.012512207</text:p>
          </table:table-cell>
          <table:table-cell office:value-type="float" office:value="0.009178287">
            <text:p>0.009178287</text:p>
          </table:table-cell>
          <table:table-cell table:number-columns-repeated="4"/>
        </table:table-row>
        <table:table-row table:style-name="ro1">
          <table:table-cell office:value-type="float" office:value="653.132263183594">
            <text:p>653.1322631836</text:p>
          </table:table-cell>
          <table:table-cell office:value-type="float" office:value="0.01617598">
            <text:p>0.01617598</text:p>
          </table:table-cell>
          <table:table-cell table:number-columns-repeated="4"/>
        </table:table-row>
        <table:table-row table:style-name="ro1">
          <table:table-cell office:value-type="float" office:value="653.251953125">
            <text:p>653.251953125</text:p>
          </table:table-cell>
          <table:table-cell office:value-type="float" office:value="0.008178144">
            <text:p>0.008178144</text:p>
          </table:table-cell>
          <table:table-cell table:number-columns-repeated="4"/>
        </table:table-row>
        <table:table-row table:style-name="ro1">
          <table:table-cell office:value-type="float" office:value="653.371704101563">
            <text:p>653.3717041016</text:p>
          </table:table-cell>
          <table:table-cell office:value-type="float" office:value="0.01547622">
            <text:p>0.01547622</text:p>
          </table:table-cell>
          <table:table-cell table:number-columns-repeated="4"/>
        </table:table-row>
        <table:table-row table:style-name="ro1">
          <table:table-cell office:value-type="float" office:value="653.491394042969">
            <text:p>653.491394043</text:p>
          </table:table-cell>
          <table:table-cell office:value-type="float" office:value="0.0298522">
            <text:p>0.0298522</text:p>
          </table:table-cell>
          <table:table-cell table:number-columns-repeated="4"/>
        </table:table-row>
        <table:table-row table:style-name="ro1">
          <table:table-cell office:value-type="float" office:value="653.611145019531">
            <text:p>653.6111450195</text:p>
          </table:table-cell>
          <table:table-cell office:value-type="float" office:value="0.01718756">
            <text:p>0.01718756</text:p>
          </table:table-cell>
          <table:table-cell table:number-columns-repeated="4"/>
        </table:table-row>
        <table:table-row table:style-name="ro1">
          <table:table-cell office:value-type="float" office:value="653.730834960938">
            <text:p>653.7308349609</text:p>
          </table:table-cell>
          <table:table-cell office:value-type="float" office:value="0.03189735">
            <text:p>0.03189735</text:p>
          </table:table-cell>
          <table:table-cell table:number-columns-repeated="4"/>
        </table:table-row>
        <table:table-row table:style-name="ro1">
          <table:table-cell office:value-type="float" office:value="653.8505859375">
            <text:p>653.8505859375</text:p>
          </table:table-cell>
          <table:table-cell office:value-type="float" office:value="0.01490661">
            <text:p>0.01490661</text:p>
          </table:table-cell>
          <table:table-cell table:number-columns-repeated="4"/>
        </table:table-row>
        <table:table-row table:style-name="ro1">
          <table:table-cell office:value-type="float" office:value="653.970275878906">
            <text:p>653.9702758789</text:p>
          </table:table-cell>
          <table:table-cell office:value-type="float" office:value="0.02804309">
            <text:p>0.02804309</text:p>
          </table:table-cell>
          <table:table-cell table:number-columns-repeated="4"/>
        </table:table-row>
        <table:table-row table:style-name="ro1">
          <table:table-cell office:value-type="float" office:value="654.090026855469">
            <text:p>654.0900268555</text:p>
          </table:table-cell>
          <table:table-cell office:value-type="float" office:value="0.005775215">
            <text:p>0.005775215</text:p>
          </table:table-cell>
          <table:table-cell table:number-columns-repeated="4"/>
        </table:table-row>
        <table:table-row table:style-name="ro1">
          <table:table-cell office:value-type="float" office:value="654.209716796875">
            <text:p>654.2097167969</text:p>
          </table:table-cell>
          <table:table-cell office:value-type="float" office:value="0.007046479">
            <text:p>0.007046479</text:p>
          </table:table-cell>
          <table:table-cell table:number-columns-repeated="4"/>
        </table:table-row>
        <table:table-row table:style-name="ro1">
          <table:table-cell office:value-type="float" office:value="654.329467773438">
            <text:p>654.3294677734</text:p>
          </table:table-cell>
          <table:table-cell office:value-type="float" office:value="0.001641816">
            <text:p>0.001641816</text:p>
          </table:table-cell>
          <table:table-cell table:number-columns-repeated="4"/>
        </table:table-row>
        <table:table-row table:style-name="ro1">
          <table:table-cell office:value-type="float" office:value="654.44921875">
            <text:p>654.44921875</text:p>
          </table:table-cell>
          <table:table-cell office:value-type="float" office:value="0.01934328">
            <text:p>0.01934328</text:p>
          </table:table-cell>
          <table:table-cell table:number-columns-repeated="4"/>
        </table:table-row>
        <table:table-row table:style-name="ro1">
          <table:table-cell office:value-type="float" office:value="654.568969726563">
            <text:p>654.5689697266</text:p>
          </table:table-cell>
          <table:table-cell office:value-type="float" office:value="0.007099615">
            <text:p>0.007099615</text:p>
          </table:table-cell>
          <table:table-cell table:number-columns-repeated="4"/>
        </table:table-row>
        <table:table-row table:style-name="ro1">
          <table:table-cell office:value-type="float" office:value="654.688659667969">
            <text:p>654.688659668</text:p>
          </table:table-cell>
          <table:table-cell office:value-type="float" office:value="0.01702105">
            <text:p>0.01702105</text:p>
          </table:table-cell>
          <table:table-cell table:number-columns-repeated="4"/>
        </table:table-row>
        <table:table-row table:style-name="ro1">
          <table:table-cell office:value-type="float" office:value="654.808410644531">
            <text:p>654.8084106445</text:p>
          </table:table-cell>
          <table:table-cell office:value-type="float" office:value="0.01148161">
            <text:p>0.01148161</text:p>
          </table:table-cell>
          <table:table-cell table:number-columns-repeated="4"/>
        </table:table-row>
        <table:table-row table:style-name="ro1">
          <table:table-cell office:value-type="float" office:value="654.928161621094">
            <text:p>654.9281616211</text:p>
          </table:table-cell>
          <table:table-cell office:value-type="float" office:value="0.01117851">
            <text:p>0.01117851</text:p>
          </table:table-cell>
          <table:table-cell table:number-columns-repeated="4"/>
        </table:table-row>
        <table:table-row table:style-name="ro1">
          <table:table-cell office:value-type="float" office:value="655.047912597656">
            <text:p>655.0479125977</text:p>
          </table:table-cell>
          <table:table-cell office:value-type="float" office:value="0.02677773">
            <text:p>0.02677773</text:p>
          </table:table-cell>
          <table:table-cell table:number-columns-repeated="4"/>
        </table:table-row>
        <table:table-row table:style-name="ro1">
          <table:table-cell office:value-type="float" office:value="655.167602539063">
            <text:p>655.1676025391</text:p>
          </table:table-cell>
          <table:table-cell office:value-type="float" office:value="0.01075215">
            <text:p>0.01075215</text:p>
          </table:table-cell>
          <table:table-cell table:number-columns-repeated="4"/>
        </table:table-row>
        <table:table-row table:style-name="ro1">
          <table:table-cell office:value-type="float" office:value="655.287353515625">
            <text:p>655.2873535156</text:p>
          </table:table-cell>
          <table:table-cell office:value-type="float" office:value="0.01948688">
            <text:p>0.01948688</text:p>
          </table:table-cell>
          <table:table-cell table:number-columns-repeated="4"/>
        </table:table-row>
        <table:table-row table:style-name="ro1">
          <table:table-cell office:value-type="float" office:value="655.407104492188">
            <text:p>655.4071044922</text:p>
          </table:table-cell>
          <table:table-cell office:value-type="float" office:value="0.004238262">
            <text:p>0.004238262</text:p>
          </table:table-cell>
          <table:table-cell table:number-columns-repeated="4"/>
        </table:table-row>
        <table:table-row table:style-name="ro1">
          <table:table-cell office:value-type="float" office:value="655.52685546875">
            <text:p>655.5268554688</text:p>
          </table:table-cell>
          <table:table-cell office:value-type="float" office:value="0.01129169">
            <text:p>0.01129169</text:p>
          </table:table-cell>
          <table:table-cell table:number-columns-repeated="4"/>
        </table:table-row>
        <table:table-row table:style-name="ro1">
          <table:table-cell office:value-type="float" office:value="655.646606445313">
            <text:p>655.6466064453</text:p>
          </table:table-cell>
          <table:table-cell office:value-type="float" office:value="0.002091237">
            <text:p>0.002091237</text:p>
          </table:table-cell>
          <table:table-cell table:number-columns-repeated="4"/>
        </table:table-row>
        <table:table-row table:style-name="ro1">
          <table:table-cell office:value-type="float" office:value="655.766357421875">
            <text:p>655.7663574219</text:p>
          </table:table-cell>
          <table:table-cell office:value-type="float" office:value="0.01164584">
            <text:p>0.01164584</text:p>
          </table:table-cell>
          <table:table-cell table:number-columns-repeated="4"/>
        </table:table-row>
        <table:table-row table:style-name="ro1">
          <table:table-cell office:value-type="float" office:value="655.886108398438">
            <text:p>655.8861083984</text:p>
          </table:table-cell>
          <table:table-cell office:value-type="float" office:value="0.003618245">
            <text:p>0.003618245</text:p>
          </table:table-cell>
          <table:table-cell table:number-columns-repeated="4"/>
        </table:table-row>
        <table:table-row table:style-name="ro1">
          <table:table-cell office:value-type="float" office:value="656.005859375">
            <text:p>656.005859375</text:p>
          </table:table-cell>
          <table:table-cell office:value-type="float" office:value="0.001514938">
            <text:p>0.001514938</text:p>
          </table:table-cell>
          <table:table-cell table:number-columns-repeated="4"/>
        </table:table-row>
        <table:table-row table:style-name="ro1">
          <table:table-cell office:value-type="float" office:value="656.125610351563">
            <text:p>656.1256103516</text:p>
          </table:table-cell>
          <table:table-cell office:value-type="float" office:value="0.01296234">
            <text:p>0.01296234</text:p>
          </table:table-cell>
          <table:table-cell table:number-columns-repeated="4"/>
        </table:table-row>
        <table:table-row table:style-name="ro1">
          <table:table-cell office:value-type="float" office:value="656.245361328125">
            <text:p>656.2453613281</text:p>
          </table:table-cell>
          <table:table-cell office:value-type="float" office:value="0.007892509">
            <text:p>0.007892509</text:p>
          </table:table-cell>
          <table:table-cell table:number-columns-repeated="4"/>
        </table:table-row>
        <table:table-row table:style-name="ro1">
          <table:table-cell office:value-type="float" office:value="656.365112304688">
            <text:p>656.3651123047</text:p>
          </table:table-cell>
          <table:table-cell office:value-type="float" office:value="0.02585503">
            <text:p>0.02585503</text:p>
          </table:table-cell>
          <table:table-cell table:number-columns-repeated="4"/>
        </table:table-row>
        <table:table-row table:style-name="ro1">
          <table:table-cell office:value-type="float" office:value="656.48486328125">
            <text:p>656.4848632813</text:p>
          </table:table-cell>
          <table:table-cell office:value-type="float" office:value="0.009273464">
            <text:p>0.009273464</text:p>
          </table:table-cell>
          <table:table-cell table:number-columns-repeated="4"/>
        </table:table-row>
        <table:table-row table:style-name="ro1">
          <table:table-cell office:value-type="float" office:value="656.604614257813">
            <text:p>656.6046142578</text:p>
          </table:table-cell>
          <table:table-cell office:value-type="float" office:value="0.01241525">
            <text:p>0.01241525</text:p>
          </table:table-cell>
          <table:table-cell table:number-columns-repeated="4"/>
        </table:table-row>
        <table:table-row table:style-name="ro1">
          <table:table-cell office:value-type="float" office:value="656.724365234375">
            <text:p>656.7243652344</text:p>
          </table:table-cell>
          <table:table-cell office:value-type="float" office:value="0.02699853">
            <text:p>0.02699853</text:p>
          </table:table-cell>
          <table:table-cell table:number-columns-repeated="4"/>
        </table:table-row>
        <table:table-row table:style-name="ro1">
          <table:table-cell office:value-type="float" office:value="656.844116210938">
            <text:p>656.8441162109</text:p>
          </table:table-cell>
          <table:table-cell office:value-type="float" office:value="0.01173776">
            <text:p>0.01173776</text:p>
          </table:table-cell>
          <table:table-cell table:number-columns-repeated="4"/>
        </table:table-row>
        <table:table-row table:style-name="ro1">
          <table:table-cell office:value-type="float" office:value="656.9638671875">
            <text:p>656.9638671875</text:p>
          </table:table-cell>
          <table:table-cell office:value-type="float" office:value="0.009073655">
            <text:p>0.009073655</text:p>
          </table:table-cell>
          <table:table-cell table:number-columns-repeated="4"/>
        </table:table-row>
        <table:table-row table:style-name="ro1">
          <table:table-cell office:value-type="float" office:value="657.083679199219">
            <text:p>657.0836791992</text:p>
          </table:table-cell>
          <table:table-cell office:value-type="float" office:value="0.01389876">
            <text:p>0.01389876</text:p>
          </table:table-cell>
          <table:table-cell table:number-columns-repeated="4"/>
        </table:table-row>
        <table:table-row table:style-name="ro1">
          <table:table-cell office:value-type="float" office:value="657.203430175781">
            <text:p>657.2034301758</text:p>
          </table:table-cell>
          <table:table-cell office:value-type="float" office:value="0.007714665">
            <text:p>0.007714665</text:p>
          </table:table-cell>
          <table:table-cell table:number-columns-repeated="4"/>
        </table:table-row>
        <table:table-row table:style-name="ro1">
          <table:table-cell office:value-type="float" office:value="657.323181152344">
            <text:p>657.3231811523</text:p>
          </table:table-cell>
          <table:table-cell office:value-type="float" office:value="0.02421149">
            <text:p>0.02421149</text:p>
          </table:table-cell>
          <table:table-cell table:number-columns-repeated="4"/>
        </table:table-row>
        <table:table-row table:style-name="ro1">
          <table:table-cell office:value-type="float" office:value="657.442932128906">
            <text:p>657.4429321289</text:p>
          </table:table-cell>
          <table:table-cell office:value-type="float" office:value="0.01883416">
            <text:p>0.01883416</text:p>
          </table:table-cell>
          <table:table-cell table:number-columns-repeated="4"/>
        </table:table-row>
        <table:table-row table:style-name="ro1">
          <table:table-cell office:value-type="float" office:value="657.562744140625">
            <text:p>657.5627441406</text:p>
          </table:table-cell>
          <table:table-cell office:value-type="float" office:value="0.01440808">
            <text:p>0.01440808</text:p>
          </table:table-cell>
          <table:table-cell table:number-columns-repeated="4"/>
        </table:table-row>
        <table:table-row table:style-name="ro1">
          <table:table-cell office:value-type="float" office:value="657.682495117188">
            <text:p>657.6824951172</text:p>
          </table:table-cell>
          <table:table-cell office:value-type="float" office:value="0.02341115">
            <text:p>0.02341115</text:p>
          </table:table-cell>
          <table:table-cell table:number-columns-repeated="4"/>
        </table:table-row>
        <table:table-row table:style-name="ro1">
          <table:table-cell office:value-type="float" office:value="657.80224609375">
            <text:p>657.8022460938</text:p>
          </table:table-cell>
          <table:table-cell office:value-type="float" office:value="0.01809211">
            <text:p>0.01809211</text:p>
          </table:table-cell>
          <table:table-cell table:number-columns-repeated="4"/>
        </table:table-row>
        <table:table-row table:style-name="ro1">
          <table:table-cell office:value-type="float" office:value="657.921997070313">
            <text:p>657.9219970703</text:p>
          </table:table-cell>
          <table:table-cell office:value-type="float" office:value="0.00491645">
            <text:p>0.00491645</text:p>
          </table:table-cell>
          <table:table-cell table:number-columns-repeated="4"/>
        </table:table-row>
        <table:table-row table:style-name="ro1">
          <table:table-cell office:value-type="float" office:value="658.041809082031">
            <text:p>658.041809082</text:p>
          </table:table-cell>
          <table:table-cell office:value-type="float" office:value="0.005136037">
            <text:p>0.005136037</text:p>
          </table:table-cell>
          <table:table-cell table:number-columns-repeated="4"/>
        </table:table-row>
        <table:table-row table:style-name="ro1">
          <table:table-cell office:value-type="float" office:value="658.161560058594">
            <text:p>658.1615600586</text:p>
          </table:table-cell>
          <table:table-cell office:value-type="float" office:value="0.001301187">
            <text:p>0.001301187</text:p>
          </table:table-cell>
          <table:table-cell table:number-columns-repeated="4"/>
        </table:table-row>
        <table:table-row table:style-name="ro1">
          <table:table-cell office:value-type="float" office:value="658.281372070313">
            <text:p>658.2813720703</text:p>
          </table:table-cell>
          <table:table-cell office:value-type="float" office:value="0.02186314">
            <text:p>0.02186314</text:p>
          </table:table-cell>
          <table:table-cell table:number-columns-repeated="4"/>
        </table:table-row>
        <table:table-row table:style-name="ro1">
          <table:table-cell office:value-type="float" office:value="658.401123046875">
            <text:p>658.4011230469</text:p>
          </table:table-cell>
          <table:table-cell office:value-type="float" office:value="0.03678046">
            <text:p>0.03678046</text:p>
          </table:table-cell>
          <table:table-cell table:number-columns-repeated="4"/>
        </table:table-row>
        <table:table-row table:style-name="ro1">
          <table:table-cell office:value-type="float" office:value="658.520935058594">
            <text:p>658.5209350586</text:p>
          </table:table-cell>
          <table:table-cell office:value-type="float" office:value="0.006120998">
            <text:p>0.006120998</text:p>
          </table:table-cell>
          <table:table-cell table:number-columns-repeated="4"/>
        </table:table-row>
        <table:table-row table:style-name="ro1">
          <table:table-cell office:value-type="float" office:value="658.640686035156">
            <text:p>658.6406860352</text:p>
          </table:table-cell>
          <table:table-cell office:value-type="float" office:value="0.003456512">
            <text:p>0.003456512</text:p>
          </table:table-cell>
          <table:table-cell table:number-columns-repeated="4"/>
        </table:table-row>
        <table:table-row table:style-name="ro1">
          <table:table-cell office:value-type="float" office:value="658.760437011719">
            <text:p>658.7604370117</text:p>
          </table:table-cell>
          <table:table-cell office:value-type="float" office:value="0.008257709">
            <text:p>0.008257709</text:p>
          </table:table-cell>
          <table:table-cell table:number-columns-repeated="4"/>
        </table:table-row>
        <table:table-row table:style-name="ro1">
          <table:table-cell office:value-type="float" office:value="658.880249023438">
            <text:p>658.8802490234</text:p>
          </table:table-cell>
          <table:table-cell office:value-type="float" office:value="0.004328277">
            <text:p>0.004328277</text:p>
          </table:table-cell>
          <table:table-cell table:number-columns-repeated="4"/>
        </table:table-row>
        <table:table-row table:style-name="ro1">
          <table:table-cell office:value-type="float" office:value="659.000061035156">
            <text:p>659.0000610352</text:p>
          </table:table-cell>
          <table:table-cell office:value-type="float" office:value="0.005427349">
            <text:p>0.005427349</text:p>
          </table:table-cell>
          <table:table-cell table:number-columns-repeated="4"/>
        </table:table-row>
        <table:table-row table:style-name="ro1">
          <table:table-cell office:value-type="float" office:value="659.119812011719">
            <text:p>659.1198120117</text:p>
          </table:table-cell>
          <table:table-cell office:value-type="float" office:value="0.00251382">
            <text:p>0.00251382</text:p>
          </table:table-cell>
          <table:table-cell table:number-columns-repeated="4"/>
        </table:table-row>
        <table:table-row table:style-name="ro1">
          <table:table-cell office:value-type="float" office:value="659.239624023438">
            <text:p>659.2396240234</text:p>
          </table:table-cell>
          <table:table-cell office:value-type="float" office:value="0.01428476">
            <text:p>0.01428476</text:p>
          </table:table-cell>
          <table:table-cell table:number-columns-repeated="4"/>
        </table:table-row>
        <table:table-row table:style-name="ro1">
          <table:table-cell office:value-type="float" office:value="659.359375">
            <text:p>659.359375</text:p>
          </table:table-cell>
          <table:table-cell office:value-type="float" office:value="0.01284235">
            <text:p>0.01284235</text:p>
          </table:table-cell>
          <table:table-cell table:number-columns-repeated="4"/>
        </table:table-row>
        <table:table-row table:style-name="ro1">
          <table:table-cell office:value-type="float" office:value="659.479187011719">
            <text:p>659.4791870117</text:p>
          </table:table-cell>
          <table:table-cell office:value-type="float" office:value="0.009707544">
            <text:p>0.009707544</text:p>
          </table:table-cell>
          <table:table-cell table:number-columns-repeated="4"/>
        </table:table-row>
        <table:table-row table:style-name="ro1">
          <table:table-cell office:value-type="float" office:value="659.598999023438">
            <text:p>659.5989990234</text:p>
          </table:table-cell>
          <table:table-cell office:value-type="float" office:value="0.01070098">
            <text:p>0.01070098</text:p>
          </table:table-cell>
          <table:table-cell table:number-columns-repeated="4"/>
        </table:table-row>
        <table:table-row table:style-name="ro1">
          <table:table-cell office:value-type="float" office:value="659.71875">
            <text:p>659.71875</text:p>
          </table:table-cell>
          <table:table-cell office:value-type="float" office:value="0.01260497">
            <text:p>0.01260497</text:p>
          </table:table-cell>
          <table:table-cell table:number-columns-repeated="4"/>
        </table:table-row>
        <table:table-row table:style-name="ro1">
          <table:table-cell office:value-type="float" office:value="659.838562011719">
            <text:p>659.8385620117</text:p>
          </table:table-cell>
          <table:table-cell office:value-type="float" office:value="0.003346788">
            <text:p>0.003346788</text:p>
          </table:table-cell>
          <table:table-cell table:number-columns-repeated="4"/>
        </table:table-row>
        <table:table-row table:style-name="ro1">
          <table:table-cell office:value-type="float" office:value="659.958374023438">
            <text:p>659.9583740234</text:p>
          </table:table-cell>
          <table:table-cell office:value-type="float" office:value="0.006993593">
            <text:p>0.006993593</text:p>
          </table:table-cell>
          <table:table-cell table:number-columns-repeated="4"/>
        </table:table-row>
        <table:table-row table:style-name="ro1">
          <table:table-cell office:value-type="float" office:value="660.078125">
            <text:p>660.078125</text:p>
          </table:table-cell>
          <table:table-cell office:value-type="float" office:value="0.001416685">
            <text:p>0.001416685</text:p>
          </table:table-cell>
          <table:table-cell table:number-columns-repeated="4"/>
        </table:table-row>
        <table:table-row table:style-name="ro1">
          <table:table-cell office:value-type="float" office:value="660.197937011719">
            <text:p>660.1979370117</text:p>
          </table:table-cell>
          <table:table-cell office:value-type="float" office:value="0.01382692">
            <text:p>0.01382692</text:p>
          </table:table-cell>
          <table:table-cell table:number-columns-repeated="4"/>
        </table:table-row>
        <table:table-row table:style-name="ro1">
          <table:table-cell office:value-type="float" office:value="660.317749023438">
            <text:p>660.3177490234</text:p>
          </table:table-cell>
          <table:table-cell office:value-type="float" office:value="0.01027989">
            <text:p>0.01027989</text:p>
          </table:table-cell>
          <table:table-cell table:number-columns-repeated="4"/>
        </table:table-row>
        <table:table-row table:style-name="ro1">
          <table:table-cell office:value-type="float" office:value="660.437561035156">
            <text:p>660.4375610352</text:p>
          </table:table-cell>
          <table:table-cell office:value-type="float" office:value="0.0210954">
            <text:p>0.0210954</text:p>
          </table:table-cell>
          <table:table-cell table:number-columns-repeated="4"/>
        </table:table-row>
        <table:table-row table:style-name="ro1">
          <table:table-cell office:value-type="float" office:value="660.557373046875">
            <text:p>660.5573730469</text:p>
          </table:table-cell>
          <table:table-cell office:value-type="float" office:value="-0.002178554">
            <text:p>-0.002178554</text:p>
          </table:table-cell>
          <table:table-cell table:number-columns-repeated="4"/>
        </table:table-row>
        <table:table-row table:style-name="ro1">
          <table:table-cell office:value-type="float" office:value="660.677124023438">
            <text:p>660.6771240234</text:p>
          </table:table-cell>
          <table:table-cell office:value-type="float" office:value="0.00330564">
            <text:p>0.00330564</text:p>
          </table:table-cell>
          <table:table-cell table:number-columns-repeated="4"/>
        </table:table-row>
        <table:table-row table:style-name="ro1">
          <table:table-cell office:value-type="float" office:value="660.796936035156">
            <text:p>660.7969360352</text:p>
          </table:table-cell>
          <table:table-cell office:value-type="float" office:value="0.007797267">
            <text:p>0.007797267</text:p>
          </table:table-cell>
          <table:table-cell table:number-columns-repeated="4"/>
        </table:table-row>
        <table:table-row table:style-name="ro1">
          <table:table-cell office:value-type="float" office:value="660.916748046875">
            <text:p>660.9167480469</text:p>
          </table:table-cell>
          <table:table-cell office:value-type="string">
            <text:p>2.533971E-05</text:p>
          </table:table-cell>
          <table:table-cell table:number-columns-repeated="4"/>
        </table:table-row>
        <table:table-row table:style-name="ro1">
          <table:table-cell office:value-type="float" office:value="661.036560058594">
            <text:p>661.0365600586</text:p>
          </table:table-cell>
          <table:table-cell office:value-type="float" office:value="0.01116868">
            <text:p>0.01116868</text:p>
          </table:table-cell>
          <table:table-cell table:number-columns-repeated="4"/>
        </table:table-row>
        <table:table-row table:style-name="ro1">
          <table:table-cell office:value-type="float" office:value="661.156372070313">
            <text:p>661.1563720703</text:p>
          </table:table-cell>
          <table:table-cell office:value-type="float" office:value="0.01257825">
            <text:p>0.01257825</text:p>
          </table:table-cell>
          <table:table-cell table:number-columns-repeated="4"/>
        </table:table-row>
        <table:table-row table:style-name="ro1">
          <table:table-cell office:value-type="float" office:value="661.276184082031">
            <text:p>661.276184082</text:p>
          </table:table-cell>
          <table:table-cell office:value-type="float" office:value="0.00718065">
            <text:p>0.00718065</text:p>
          </table:table-cell>
          <table:table-cell table:number-columns-repeated="4"/>
        </table:table-row>
        <table:table-row table:style-name="ro1">
          <table:table-cell office:value-type="float" office:value="661.39599609375">
            <text:p>661.3959960938</text:p>
          </table:table-cell>
          <table:table-cell office:value-type="float" office:value="0.008967168">
            <text:p>0.008967168</text:p>
          </table:table-cell>
          <table:table-cell table:number-columns-repeated="4"/>
        </table:table-row>
        <table:table-row table:style-name="ro1">
          <table:table-cell office:value-type="float" office:value="661.515808105469">
            <text:p>661.5158081055</text:p>
          </table:table-cell>
          <table:table-cell office:value-type="float" office:value="0.01828648">
            <text:p>0.01828648</text:p>
          </table:table-cell>
          <table:table-cell table:number-columns-repeated="4"/>
        </table:table-row>
        <table:table-row table:style-name="ro1">
          <table:table-cell office:value-type="float" office:value="661.635620117188">
            <text:p>661.6356201172</text:p>
          </table:table-cell>
          <table:table-cell office:value-type="float" office:value="0.005084683">
            <text:p>0.005084683</text:p>
          </table:table-cell>
          <table:table-cell table:number-columns-repeated="4"/>
        </table:table-row>
        <table:table-row table:style-name="ro1">
          <table:table-cell office:value-type="float" office:value="661.755432128906">
            <text:p>661.7554321289</text:p>
          </table:table-cell>
          <table:table-cell office:value-type="float" office:value="0.01303178">
            <text:p>0.01303178</text:p>
          </table:table-cell>
          <table:table-cell table:number-columns-repeated="4"/>
        </table:table-row>
        <table:table-row table:style-name="ro1">
          <table:table-cell office:value-type="float" office:value="661.875244140625">
            <text:p>661.8752441406</text:p>
          </table:table-cell>
          <table:table-cell office:value-type="float" office:value="0.01737401">
            <text:p>0.01737401</text:p>
          </table:table-cell>
          <table:table-cell table:number-columns-repeated="4"/>
        </table:table-row>
        <table:table-row table:style-name="ro1">
          <table:table-cell office:value-type="float" office:value="661.995056152344">
            <text:p>661.9950561523</text:p>
          </table:table-cell>
          <table:table-cell office:value-type="float" office:value="0.01051931">
            <text:p>0.01051931</text:p>
          </table:table-cell>
          <table:table-cell table:number-columns-repeated="4"/>
        </table:table-row>
        <table:table-row table:style-name="ro1">
          <table:table-cell office:value-type="float" office:value="662.114868164063">
            <text:p>662.1148681641</text:p>
          </table:table-cell>
          <table:table-cell office:value-type="float" office:value="0.005383414">
            <text:p>0.005383414</text:p>
          </table:table-cell>
          <table:table-cell table:number-columns-repeated="4"/>
        </table:table-row>
        <table:table-row table:style-name="ro1">
          <table:table-cell office:value-type="float" office:value="662.234680175781">
            <text:p>662.2346801758</text:p>
          </table:table-cell>
          <table:table-cell office:value-type="float" office:value="0.003438829">
            <text:p>0.003438829</text:p>
          </table:table-cell>
          <table:table-cell table:number-columns-repeated="4"/>
        </table:table-row>
        <table:table-row table:style-name="ro1">
          <table:table-cell office:value-type="float" office:value="662.354553222656">
            <text:p>662.3545532227</text:p>
          </table:table-cell>
          <table:table-cell office:value-type="float" office:value="0.002824867">
            <text:p>0.002824867</text:p>
          </table:table-cell>
          <table:table-cell table:number-columns-repeated="4"/>
        </table:table-row>
        <table:table-row table:style-name="ro1">
          <table:table-cell office:value-type="float" office:value="662.474365234375">
            <text:p>662.4743652344</text:p>
          </table:table-cell>
          <table:table-cell office:value-type="float" office:value="0.006815971">
            <text:p>0.006815971</text:p>
          </table:table-cell>
          <table:table-cell table:number-columns-repeated="4"/>
        </table:table-row>
        <table:table-row table:style-name="ro1">
          <table:table-cell office:value-type="float" office:value="662.594177246094">
            <text:p>662.5941772461</text:p>
          </table:table-cell>
          <table:table-cell office:value-type="float" office:value="0.008614389">
            <text:p>0.008614389</text:p>
          </table:table-cell>
          <table:table-cell table:number-columns-repeated="4"/>
        </table:table-row>
        <table:table-row table:style-name="ro1">
          <table:table-cell office:value-type="float" office:value="662.713989257813">
            <text:p>662.7139892578</text:p>
          </table:table-cell>
          <table:table-cell office:value-type="float" office:value="0.01294143">
            <text:p>0.01294143</text:p>
          </table:table-cell>
          <table:table-cell table:number-columns-repeated="4"/>
        </table:table-row>
        <table:table-row table:style-name="ro1">
          <table:table-cell office:value-type="float" office:value="662.833801269531">
            <text:p>662.8338012695</text:p>
          </table:table-cell>
          <table:table-cell office:value-type="float" office:value="-0.0007070416">
            <text:p>-0.0007070416</text:p>
          </table:table-cell>
          <table:table-cell table:number-columns-repeated="4"/>
        </table:table-row>
        <table:table-row table:style-name="ro1">
          <table:table-cell office:value-type="float" office:value="662.953674316406">
            <text:p>662.9536743164</text:p>
          </table:table-cell>
          <table:table-cell office:value-type="float" office:value="0.00432823">
            <text:p>0.00432823</text:p>
          </table:table-cell>
          <table:table-cell table:number-columns-repeated="4"/>
        </table:table-row>
        <table:table-row table:style-name="ro1">
          <table:table-cell office:value-type="float" office:value="663.073486328125">
            <text:p>663.0734863281</text:p>
          </table:table-cell>
          <table:table-cell office:value-type="float" office:value="0.006515594">
            <text:p>0.006515594</text:p>
          </table:table-cell>
          <table:table-cell table:number-columns-repeated="4"/>
        </table:table-row>
        <table:table-row table:style-name="ro1">
          <table:table-cell office:value-type="float" office:value="663.193298339844">
            <text:p>663.1932983398</text:p>
          </table:table-cell>
          <table:table-cell office:value-type="float" office:value="0.006431777">
            <text:p>0.006431777</text:p>
          </table:table-cell>
          <table:table-cell table:number-columns-repeated="4"/>
        </table:table-row>
        <table:table-row table:style-name="ro1">
          <table:table-cell office:value-type="float" office:value="663.313110351563">
            <text:p>663.3131103516</text:p>
          </table:table-cell>
          <table:table-cell office:value-type="float" office:value="0.008308354">
            <text:p>0.008308354</text:p>
          </table:table-cell>
          <table:table-cell table:number-columns-repeated="4"/>
        </table:table-row>
        <table:table-row table:style-name="ro1">
          <table:table-cell office:value-type="float" office:value="663.432983398438">
            <text:p>663.4329833984</text:p>
          </table:table-cell>
          <table:table-cell office:value-type="float" office:value="0.007002585">
            <text:p>0.007002585</text:p>
          </table:table-cell>
          <table:table-cell table:number-columns-repeated="4"/>
        </table:table-row>
        <table:table-row table:style-name="ro1">
          <table:table-cell office:value-type="float" office:value="663.552795410156">
            <text:p>663.5527954102</text:p>
          </table:table-cell>
          <table:table-cell office:value-type="float" office:value="0.01031965">
            <text:p>0.01031965</text:p>
          </table:table-cell>
          <table:table-cell table:number-columns-repeated="4"/>
        </table:table-row>
        <table:table-row table:style-name="ro1">
          <table:table-cell office:value-type="float" office:value="663.672668457031">
            <text:p>663.672668457</text:p>
          </table:table-cell>
          <table:table-cell office:value-type="float" office:value="0.006562504">
            <text:p>0.006562504</text:p>
          </table:table-cell>
          <table:table-cell table:number-columns-repeated="4"/>
        </table:table-row>
        <table:table-row table:style-name="ro1">
          <table:table-cell office:value-type="float" office:value="663.79248046875">
            <text:p>663.7924804688</text:p>
          </table:table-cell>
          <table:table-cell office:value-type="float" office:value="0.008900309">
            <text:p>0.008900309</text:p>
          </table:table-cell>
          <table:table-cell table:number-columns-repeated="4"/>
        </table:table-row>
        <table:table-row table:style-name="ro1">
          <table:table-cell office:value-type="float" office:value="663.912292480469">
            <text:p>663.9122924805</text:p>
          </table:table-cell>
          <table:table-cell office:value-type="float" office:value="0.00706436">
            <text:p>0.00706436</text:p>
          </table:table-cell>
          <table:table-cell table:number-columns-repeated="4"/>
        </table:table-row>
        <table:table-row table:style-name="ro1">
          <table:table-cell office:value-type="float" office:value="664.032165527344">
            <text:p>664.0321655273</text:p>
          </table:table-cell>
          <table:table-cell office:value-type="float" office:value="0.01278395">
            <text:p>0.01278395</text:p>
          </table:table-cell>
          <table:table-cell table:number-columns-repeated="4"/>
        </table:table-row>
        <table:table-row table:style-name="ro1">
          <table:table-cell office:value-type="float" office:value="664.151977539063">
            <text:p>664.1519775391</text:p>
          </table:table-cell>
          <table:table-cell office:value-type="float" office:value="0.007915521">
            <text:p>0.007915521</text:p>
          </table:table-cell>
          <table:table-cell table:number-columns-repeated="4"/>
        </table:table-row>
        <table:table-row table:style-name="ro1">
          <table:table-cell office:value-type="float" office:value="664.271850585938">
            <text:p>664.2718505859</text:p>
          </table:table-cell>
          <table:table-cell office:value-type="float" office:value="0.0008970873">
            <text:p>0.0008970873</text:p>
          </table:table-cell>
          <table:table-cell table:number-columns-repeated="4"/>
        </table:table-row>
        <table:table-row table:style-name="ro1">
          <table:table-cell office:value-type="float" office:value="664.391662597656">
            <text:p>664.3916625977</text:p>
          </table:table-cell>
          <table:table-cell office:value-type="float" office:value="0.006555521">
            <text:p>0.006555521</text:p>
          </table:table-cell>
          <table:table-cell table:number-columns-repeated="4"/>
        </table:table-row>
        <table:table-row table:style-name="ro1">
          <table:table-cell office:value-type="float" office:value="664.511535644531">
            <text:p>664.5115356445</text:p>
          </table:table-cell>
          <table:table-cell office:value-type="float" office:value="0.009729334">
            <text:p>0.009729334</text:p>
          </table:table-cell>
          <table:table-cell table:number-columns-repeated="4"/>
        </table:table-row>
        <table:table-row table:style-name="ro1">
          <table:table-cell office:value-type="float" office:value="664.63134765625">
            <text:p>664.6313476563</text:p>
          </table:table-cell>
          <table:table-cell office:value-type="float" office:value="0.005565285">
            <text:p>0.005565285</text:p>
          </table:table-cell>
          <table:table-cell table:number-columns-repeated="4"/>
        </table:table-row>
        <table:table-row table:style-name="ro1">
          <table:table-cell office:value-type="float" office:value="664.751220703125">
            <text:p>664.7512207031</text:p>
          </table:table-cell>
          <table:table-cell office:value-type="float" office:value="-0.000646032">
            <text:p>-0.000646032</text:p>
          </table:table-cell>
          <table:table-cell table:number-columns-repeated="4"/>
        </table:table-row>
        <table:table-row table:style-name="ro1">
          <table:table-cell office:value-type="float" office:value="664.87109375">
            <text:p>664.87109375</text:p>
          </table:table-cell>
          <table:table-cell office:value-type="float" office:value="0.01202329">
            <text:p>0.01202329</text:p>
          </table:table-cell>
          <table:table-cell table:number-columns-repeated="4"/>
        </table:table-row>
        <table:table-row table:style-name="ro1">
          <table:table-cell office:value-type="float" office:value="664.990905761719">
            <text:p>664.9909057617</text:p>
          </table:table-cell>
          <table:table-cell office:value-type="float" office:value="0.011848">
            <text:p>0.011848</text:p>
          </table:table-cell>
          <table:table-cell table:number-columns-repeated="4"/>
        </table:table-row>
        <table:table-row table:style-name="ro1">
          <table:table-cell office:value-type="float" office:value="665.110778808594">
            <text:p>665.1107788086</text:p>
          </table:table-cell>
          <table:table-cell office:value-type="float" office:value="0.005890138">
            <text:p>0.005890138</text:p>
          </table:table-cell>
          <table:table-cell table:number-columns-repeated="4"/>
        </table:table-row>
        <table:table-row table:style-name="ro1">
          <table:table-cell office:value-type="float" office:value="665.230590820313">
            <text:p>665.2305908203</text:p>
          </table:table-cell>
          <table:table-cell office:value-type="float" office:value="0.01200562">
            <text:p>0.01200562</text:p>
          </table:table-cell>
          <table:table-cell table:number-columns-repeated="4"/>
        </table:table-row>
        <table:table-row table:style-name="ro1">
          <table:table-cell office:value-type="float" office:value="665.350463867188">
            <text:p>665.3504638672</text:p>
          </table:table-cell>
          <table:table-cell office:value-type="float" office:value="-0.0001792173">
            <text:p>-0.0001792173</text:p>
          </table:table-cell>
          <table:table-cell table:number-columns-repeated="4"/>
        </table:table-row>
        <table:table-row table:style-name="ro1">
          <table:table-cell office:value-type="float" office:value="665.470336914063">
            <text:p>665.4703369141</text:p>
          </table:table-cell>
          <table:table-cell office:value-type="float" office:value="0.01835741">
            <text:p>0.01835741</text:p>
          </table:table-cell>
          <table:table-cell table:number-columns-repeated="4"/>
        </table:table-row>
        <table:table-row table:style-name="ro1">
          <table:table-cell office:value-type="float" office:value="665.590148925781">
            <text:p>665.5901489258</text:p>
          </table:table-cell>
          <table:table-cell office:value-type="float" office:value="0.01418">
            <text:p>0.01418</text:p>
          </table:table-cell>
          <table:table-cell table:number-columns-repeated="4"/>
        </table:table-row>
        <table:table-row table:style-name="ro1">
          <table:table-cell office:value-type="float" office:value="665.710021972656">
            <text:p>665.7100219727</text:p>
          </table:table-cell>
          <table:table-cell office:value-type="float" office:value="0.00687638">
            <text:p>0.00687638</text:p>
          </table:table-cell>
          <table:table-cell table:number-columns-repeated="4"/>
        </table:table-row>
        <table:table-row table:style-name="ro1">
          <table:table-cell office:value-type="float" office:value="665.829895019531">
            <text:p>665.8298950195</text:p>
          </table:table-cell>
          <table:table-cell office:value-type="float" office:value="0.002091682">
            <text:p>0.002091682</text:p>
          </table:table-cell>
          <table:table-cell table:number-columns-repeated="4"/>
        </table:table-row>
        <table:table-row table:style-name="ro1">
          <table:table-cell office:value-type="float" office:value="665.949768066406">
            <text:p>665.9497680664</text:p>
          </table:table-cell>
          <table:table-cell office:value-type="float" office:value="0.02129699">
            <text:p>0.02129699</text:p>
          </table:table-cell>
          <table:table-cell table:number-columns-repeated="4"/>
        </table:table-row>
        <table:table-row table:style-name="ro1">
          <table:table-cell office:value-type="float" office:value="666.069580078125">
            <text:p>666.0695800781</text:p>
          </table:table-cell>
          <table:table-cell office:value-type="float" office:value="0.002262284">
            <text:p>0.002262284</text:p>
          </table:table-cell>
          <table:table-cell table:number-columns-repeated="4"/>
        </table:table-row>
        <table:table-row table:style-name="ro1">
          <table:table-cell office:value-type="float" office:value="666.189453125">
            <text:p>666.189453125</text:p>
          </table:table-cell>
          <table:table-cell office:value-type="float" office:value="0.02212748">
            <text:p>0.02212748</text:p>
          </table:table-cell>
          <table:table-cell table:number-columns-repeated="4"/>
        </table:table-row>
        <table:table-row table:style-name="ro1">
          <table:table-cell office:value-type="float" office:value="666.309326171875">
            <text:p>666.3093261719</text:p>
          </table:table-cell>
          <table:table-cell office:value-type="float" office:value="0.003848951">
            <text:p>0.003848951</text:p>
          </table:table-cell>
          <table:table-cell table:number-columns-repeated="4"/>
        </table:table-row>
        <table:table-row table:style-name="ro1">
          <table:table-cell office:value-type="float" office:value="666.42919921875">
            <text:p>666.4291992188</text:p>
          </table:table-cell>
          <table:table-cell office:value-type="float" office:value="0.01494293">
            <text:p>0.01494293</text:p>
          </table:table-cell>
          <table:table-cell table:number-columns-repeated="4"/>
        </table:table-row>
        <table:table-row table:style-name="ro1">
          <table:table-cell office:value-type="float" office:value="666.549072265625">
            <text:p>666.5490722656</text:p>
          </table:table-cell>
          <table:table-cell office:value-type="float" office:value="0.01401478">
            <text:p>0.01401478</text:p>
          </table:table-cell>
          <table:table-cell table:number-columns-repeated="4"/>
        </table:table-row>
        <table:table-row table:style-name="ro1">
          <table:table-cell office:value-type="float" office:value="666.6689453125">
            <text:p>666.6689453125</text:p>
          </table:table-cell>
          <table:table-cell office:value-type="float" office:value="0.006840293">
            <text:p>0.006840293</text:p>
          </table:table-cell>
          <table:table-cell table:number-columns-repeated="4"/>
        </table:table-row>
        <table:table-row table:style-name="ro1">
          <table:table-cell office:value-type="float" office:value="666.788818359375">
            <text:p>666.7888183594</text:p>
          </table:table-cell>
          <table:table-cell office:value-type="float" office:value="0.006583318">
            <text:p>0.006583318</text:p>
          </table:table-cell>
          <table:table-cell table:number-columns-repeated="4"/>
        </table:table-row>
        <table:table-row table:style-name="ro1">
          <table:table-cell office:value-type="float" office:value="666.90869140625">
            <text:p>666.9086914063</text:p>
          </table:table-cell>
          <table:table-cell office:value-type="float" office:value="0.002369196">
            <text:p>0.002369196</text:p>
          </table:table-cell>
          <table:table-cell table:number-columns-repeated="4"/>
        </table:table-row>
        <table:table-row table:style-name="ro1">
          <table:table-cell office:value-type="float" office:value="667.028564453125">
            <text:p>667.0285644531</text:p>
          </table:table-cell>
          <table:table-cell office:value-type="float" office:value="0.008228761">
            <text:p>0.008228761</text:p>
          </table:table-cell>
          <table:table-cell table:number-columns-repeated="4"/>
        </table:table-row>
        <table:table-row table:style-name="ro1">
          <table:table-cell office:value-type="float" office:value="667.1484375">
            <text:p>667.1484375</text:p>
          </table:table-cell>
          <table:table-cell office:value-type="float" office:value="0.007361339">
            <text:p>0.007361339</text:p>
          </table:table-cell>
          <table:table-cell table:number-columns-repeated="4"/>
        </table:table-row>
        <table:table-row table:style-name="ro1">
          <table:table-cell office:value-type="float" office:value="667.268310546875">
            <text:p>667.2683105469</text:p>
          </table:table-cell>
          <table:table-cell office:value-type="float" office:value="0.006954725">
            <text:p>0.006954725</text:p>
          </table:table-cell>
          <table:table-cell table:number-columns-repeated="4"/>
        </table:table-row>
        <table:table-row table:style-name="ro1">
          <table:table-cell office:value-type="float" office:value="667.38818359375">
            <text:p>667.3881835938</text:p>
          </table:table-cell>
          <table:table-cell office:value-type="float" office:value="0.01496178">
            <text:p>0.01496178</text:p>
          </table:table-cell>
          <table:table-cell table:number-columns-repeated="4"/>
        </table:table-row>
        <table:table-row table:style-name="ro1">
          <table:table-cell office:value-type="float" office:value="667.508056640625">
            <text:p>667.5080566406</text:p>
          </table:table-cell>
          <table:table-cell office:value-type="float" office:value="0.002514539">
            <text:p>0.002514539</text:p>
          </table:table-cell>
          <table:table-cell table:number-columns-repeated="4"/>
        </table:table-row>
        <table:table-row table:style-name="ro1">
          <table:table-cell office:value-type="float" office:value="667.6279296875">
            <text:p>667.6279296875</text:p>
          </table:table-cell>
          <table:table-cell office:value-type="float" office:value="0.0009614229">
            <text:p>0.0009614229</text:p>
          </table:table-cell>
          <table:table-cell table:number-columns-repeated="4"/>
        </table:table-row>
        <table:table-row table:style-name="ro1">
          <table:table-cell office:value-type="float" office:value="667.747802734375">
            <text:p>667.7478027344</text:p>
          </table:table-cell>
          <table:table-cell office:value-type="float" office:value="-0.0001003518">
            <text:p>-0.0001003518</text:p>
          </table:table-cell>
          <table:table-cell table:number-columns-repeated="4"/>
        </table:table-row>
        <table:table-row table:style-name="ro1">
          <table:table-cell office:value-type="float" office:value="667.86767578125">
            <text:p>667.8676757813</text:p>
          </table:table-cell>
          <table:table-cell office:value-type="float" office:value="-0.005409217">
            <text:p>-0.005409217</text:p>
          </table:table-cell>
          <table:table-cell table:number-columns-repeated="4"/>
        </table:table-row>
        <table:table-row table:style-name="ro1">
          <table:table-cell office:value-type="float" office:value="667.987548828125">
            <text:p>667.9875488281</text:p>
          </table:table-cell>
          <table:table-cell office:value-type="float" office:value="0.01144963">
            <text:p>0.01144963</text:p>
          </table:table-cell>
          <table:table-cell table:number-columns-repeated="4"/>
        </table:table-row>
        <table:table-row table:style-name="ro1">
          <table:table-cell office:value-type="float" office:value="668.107421875">
            <text:p>668.107421875</text:p>
          </table:table-cell>
          <table:table-cell office:value-type="float" office:value="-0.004332258">
            <text:p>-0.004332258</text:p>
          </table:table-cell>
          <table:table-cell table:number-columns-repeated="4"/>
        </table:table-row>
        <table:table-row table:style-name="ro1">
          <table:table-cell office:value-type="float" office:value="668.227294921875">
            <text:p>668.2272949219</text:p>
          </table:table-cell>
          <table:table-cell office:value-type="float" office:value="0.005699208">
            <text:p>0.005699208</text:p>
          </table:table-cell>
          <table:table-cell table:number-columns-repeated="4"/>
        </table:table-row>
        <table:table-row table:style-name="ro1">
          <table:table-cell office:value-type="float" office:value="668.34716796875">
            <text:p>668.3471679688</text:p>
          </table:table-cell>
          <table:table-cell office:value-type="float" office:value="0.01058589">
            <text:p>0.01058589</text:p>
          </table:table-cell>
          <table:table-cell table:number-columns-repeated="4"/>
        </table:table-row>
        <table:table-row table:style-name="ro1">
          <table:table-cell office:value-type="float" office:value="668.467102050781">
            <text:p>668.4671020508</text:p>
          </table:table-cell>
          <table:table-cell office:value-type="float" office:value="0.006136788">
            <text:p>0.006136788</text:p>
          </table:table-cell>
          <table:table-cell table:number-columns-repeated="4"/>
        </table:table-row>
        <table:table-row table:style-name="ro1">
          <table:table-cell office:value-type="float" office:value="668.586975097656">
            <text:p>668.5869750977</text:p>
          </table:table-cell>
          <table:table-cell office:value-type="float" office:value="0.00476185">
            <text:p>0.00476185</text:p>
          </table:table-cell>
          <table:table-cell table:number-columns-repeated="4"/>
        </table:table-row>
        <table:table-row table:style-name="ro1">
          <table:table-cell office:value-type="float" office:value="668.706848144531">
            <text:p>668.7068481445</text:p>
          </table:table-cell>
          <table:table-cell office:value-type="float" office:value="0.004305793">
            <text:p>0.004305793</text:p>
          </table:table-cell>
          <table:table-cell table:number-columns-repeated="4"/>
        </table:table-row>
        <table:table-row table:style-name="ro1">
          <table:table-cell office:value-type="float" office:value="668.826721191406">
            <text:p>668.8267211914</text:p>
          </table:table-cell>
          <table:table-cell office:value-type="float" office:value="0.00442509">
            <text:p>0.00442509</text:p>
          </table:table-cell>
          <table:table-cell table:number-columns-repeated="4"/>
        </table:table-row>
        <table:table-row table:style-name="ro1">
          <table:table-cell office:value-type="float" office:value="668.946594238281">
            <text:p>668.9465942383</text:p>
          </table:table-cell>
          <table:table-cell office:value-type="float" office:value="0.01217483">
            <text:p>0.01217483</text:p>
          </table:table-cell>
          <table:table-cell table:number-columns-repeated="4"/>
        </table:table-row>
        <table:table-row table:style-name="ro1">
          <table:table-cell office:value-type="float" office:value="669.066528320313">
            <text:p>669.0665283203</text:p>
          </table:table-cell>
          <table:table-cell office:value-type="float" office:value="0.007359449">
            <text:p>0.007359449</text:p>
          </table:table-cell>
          <table:table-cell table:number-columns-repeated="4"/>
        </table:table-row>
        <table:table-row table:style-name="ro1">
          <table:table-cell office:value-type="float" office:value="669.186401367188">
            <text:p>669.1864013672</text:p>
          </table:table-cell>
          <table:table-cell office:value-type="float" office:value="-0.0006612825">
            <text:p>-0.0006612825</text:p>
          </table:table-cell>
          <table:table-cell table:number-columns-repeated="4"/>
        </table:table-row>
        <table:table-row table:style-name="ro1">
          <table:table-cell office:value-type="float" office:value="669.306274414063">
            <text:p>669.3062744141</text:p>
          </table:table-cell>
          <table:table-cell office:value-type="float" office:value="0.01656853">
            <text:p>0.01656853</text:p>
          </table:table-cell>
          <table:table-cell table:number-columns-repeated="4"/>
        </table:table-row>
        <table:table-row table:style-name="ro1">
          <table:table-cell office:value-type="float" office:value="669.426208496094">
            <text:p>669.4262084961</text:p>
          </table:table-cell>
          <table:table-cell office:value-type="float" office:value="0.008722967">
            <text:p>0.008722967</text:p>
          </table:table-cell>
          <table:table-cell table:number-columns-repeated="4"/>
        </table:table-row>
        <table:table-row table:style-name="ro1">
          <table:table-cell office:value-type="float" office:value="669.546081542969">
            <text:p>669.546081543</text:p>
          </table:table-cell>
          <table:table-cell office:value-type="string">
            <text:p>-7.179972E-05</text:p>
          </table:table-cell>
          <table:table-cell table:number-columns-repeated="4"/>
        </table:table-row>
        <table:table-row table:style-name="ro1">
          <table:table-cell office:value-type="float" office:value="669.665954589844">
            <text:p>669.6659545898</text:p>
          </table:table-cell>
          <table:table-cell office:value-type="string">
            <text:p>4.918158E-06</text:p>
          </table:table-cell>
          <table:table-cell table:number-columns-repeated="4"/>
        </table:table-row>
        <table:table-row table:style-name="ro1">
          <table:table-cell office:value-type="float" office:value="669.785888671875">
            <text:p>669.7858886719</text:p>
          </table:table-cell>
          <table:table-cell office:value-type="float" office:value="0.006181458">
            <text:p>0.006181458</text:p>
          </table:table-cell>
          <table:table-cell table:number-columns-repeated="4"/>
        </table:table-row>
        <table:table-row table:style-name="ro1">
          <table:table-cell office:value-type="float" office:value="669.90576171875">
            <text:p>669.9057617188</text:p>
          </table:table-cell>
          <table:table-cell office:value-type="float" office:value="0.00535269">
            <text:p>0.00535269</text:p>
          </table:table-cell>
          <table:table-cell table:number-columns-repeated="4"/>
        </table:table-row>
        <table:table-row table:style-name="ro1">
          <table:table-cell office:value-type="float" office:value="670.025695800781">
            <text:p>670.0256958008</text:p>
          </table:table-cell>
          <table:table-cell office:value-type="float" office:value="-0.002004391">
            <text:p>-0.002004391</text:p>
          </table:table-cell>
          <table:table-cell table:number-columns-repeated="4"/>
        </table:table-row>
        <table:table-row table:style-name="ro1">
          <table:table-cell office:value-type="float" office:value="670.145568847656">
            <text:p>670.1455688477</text:p>
          </table:table-cell>
          <table:table-cell office:value-type="float" office:value="0.01686897">
            <text:p>0.01686897</text:p>
          </table:table-cell>
          <table:table-cell table:number-columns-repeated="4"/>
        </table:table-row>
        <table:table-row table:style-name="ro1">
          <table:table-cell office:value-type="float" office:value="670.265502929688">
            <text:p>670.2655029297</text:p>
          </table:table-cell>
          <table:table-cell office:value-type="float" office:value="0.008435088">
            <text:p>0.008435088</text:p>
          </table:table-cell>
          <table:table-cell table:number-columns-repeated="4"/>
        </table:table-row>
        <table:table-row table:style-name="ro1">
          <table:table-cell office:value-type="float" office:value="670.385375976563">
            <text:p>670.3853759766</text:p>
          </table:table-cell>
          <table:table-cell office:value-type="float" office:value="0.01548236">
            <text:p>0.01548236</text:p>
          </table:table-cell>
          <table:table-cell table:number-columns-repeated="4"/>
        </table:table-row>
        <table:table-row table:style-name="ro1">
          <table:table-cell office:value-type="float" office:value="670.505310058594">
            <text:p>670.5053100586</text:p>
          </table:table-cell>
          <table:table-cell office:value-type="float" office:value="0.008788954">
            <text:p>0.008788954</text:p>
          </table:table-cell>
          <table:table-cell table:number-columns-repeated="4"/>
        </table:table-row>
        <table:table-row table:style-name="ro1">
          <table:table-cell office:value-type="float" office:value="670.625183105469">
            <text:p>670.6251831055</text:p>
          </table:table-cell>
          <table:table-cell office:value-type="float" office:value="0.01149902">
            <text:p>0.01149902</text:p>
          </table:table-cell>
          <table:table-cell table:number-columns-repeated="4"/>
        </table:table-row>
        <table:table-row table:style-name="ro1">
          <table:table-cell office:value-type="float" office:value="670.7451171875">
            <text:p>670.7451171875</text:p>
          </table:table-cell>
          <table:table-cell office:value-type="float" office:value="0.005898173">
            <text:p>0.005898173</text:p>
          </table:table-cell>
          <table:table-cell table:number-columns-repeated="4"/>
        </table:table-row>
        <table:table-row table:style-name="ro1">
          <table:table-cell office:value-type="float" office:value="670.864990234375">
            <text:p>670.8649902344</text:p>
          </table:table-cell>
          <table:table-cell office:value-type="float" office:value="0.01451994">
            <text:p>0.01451994</text:p>
          </table:table-cell>
          <table:table-cell table:number-columns-repeated="4"/>
        </table:table-row>
        <table:table-row table:style-name="ro1">
          <table:table-cell office:value-type="float" office:value="670.984924316406">
            <text:p>670.9849243164</text:p>
          </table:table-cell>
          <table:table-cell office:value-type="float" office:value="0.01233986">
            <text:p>0.01233986</text:p>
          </table:table-cell>
          <table:table-cell table:number-columns-repeated="4"/>
        </table:table-row>
        <table:table-row table:style-name="ro1">
          <table:table-cell office:value-type="float" office:value="671.104858398438">
            <text:p>671.1048583984</text:p>
          </table:table-cell>
          <table:table-cell office:value-type="float" office:value="-0.001074219">
            <text:p>-0.001074219</text:p>
          </table:table-cell>
          <table:table-cell table:number-columns-repeated="4"/>
        </table:table-row>
        <table:table-row table:style-name="ro1">
          <table:table-cell office:value-type="float" office:value="671.224731445313">
            <text:p>671.2247314453</text:p>
          </table:table-cell>
          <table:table-cell office:value-type="float" office:value="0.006194841">
            <text:p>0.006194841</text:p>
          </table:table-cell>
          <table:table-cell table:number-columns-repeated="4"/>
        </table:table-row>
        <table:table-row table:style-name="ro1">
          <table:table-cell office:value-type="float" office:value="671.344665527344">
            <text:p>671.3446655273</text:p>
          </table:table-cell>
          <table:table-cell office:value-type="float" office:value="0.01216359">
            <text:p>0.01216359</text:p>
          </table:table-cell>
          <table:table-cell table:number-columns-repeated="4"/>
        </table:table-row>
        <table:table-row table:style-name="ro1">
          <table:table-cell office:value-type="float" office:value="671.464599609375">
            <text:p>671.4645996094</text:p>
          </table:table-cell>
          <table:table-cell office:value-type="float" office:value="-0.00327708">
            <text:p>-0.00327708</text:p>
          </table:table-cell>
          <table:table-cell table:number-columns-repeated="4"/>
        </table:table-row>
        <table:table-row table:style-name="ro1">
          <table:table-cell office:value-type="float" office:value="671.58447265625">
            <text:p>671.5844726563</text:p>
          </table:table-cell>
          <table:table-cell office:value-type="float" office:value="0.0006879056">
            <text:p>0.0006879056</text:p>
          </table:table-cell>
          <table:table-cell table:number-columns-repeated="4"/>
        </table:table-row>
        <table:table-row table:style-name="ro1">
          <table:table-cell office:value-type="float" office:value="671.704406738281">
            <text:p>671.7044067383</text:p>
          </table:table-cell>
          <table:table-cell office:value-type="float" office:value="0.01218619">
            <text:p>0.01218619</text:p>
          </table:table-cell>
          <table:table-cell table:number-columns-repeated="4"/>
        </table:table-row>
        <table:table-row table:style-name="ro1">
          <table:table-cell office:value-type="float" office:value="671.824340820313">
            <text:p>671.8243408203</text:p>
          </table:table-cell>
          <table:table-cell office:value-type="float" office:value="0.004777966">
            <text:p>0.004777966</text:p>
          </table:table-cell>
          <table:table-cell table:number-columns-repeated="4"/>
        </table:table-row>
        <table:table-row table:style-name="ro1">
          <table:table-cell office:value-type="float" office:value="671.944213867188">
            <text:p>671.9442138672</text:p>
          </table:table-cell>
          <table:table-cell office:value-type="float" office:value="0.003951218">
            <text:p>0.003951218</text:p>
          </table:table-cell>
          <table:table-cell table:number-columns-repeated="4"/>
        </table:table-row>
        <table:table-row table:style-name="ro1">
          <table:table-cell office:value-type="float" office:value="672.064147949219">
            <text:p>672.0641479492</text:p>
          </table:table-cell>
          <table:table-cell office:value-type="float" office:value="0.002011469">
            <text:p>0.002011469</text:p>
          </table:table-cell>
          <table:table-cell table:number-columns-repeated="4"/>
        </table:table-row>
        <table:table-row table:style-name="ro1">
          <table:table-cell office:value-type="float" office:value="672.18408203125">
            <text:p>672.1840820313</text:p>
          </table:table-cell>
          <table:table-cell office:value-type="float" office:value="0.002945318">
            <text:p>0.002945318</text:p>
          </table:table-cell>
          <table:table-cell table:number-columns-repeated="4"/>
        </table:table-row>
        <table:table-row table:style-name="ro1">
          <table:table-cell office:value-type="float" office:value="672.304016113281">
            <text:p>672.3040161133</text:p>
          </table:table-cell>
          <table:table-cell office:value-type="float" office:value="-0.0006101235">
            <text:p>-0.0006101235</text:p>
          </table:table-cell>
          <table:table-cell table:number-columns-repeated="4"/>
        </table:table-row>
        <table:table-row table:style-name="ro1">
          <table:table-cell office:value-type="float" office:value="672.423950195313">
            <text:p>672.4239501953</text:p>
          </table:table-cell>
          <table:table-cell office:value-type="float" office:value="-0.0050257">
            <text:p>-0.0050257</text:p>
          </table:table-cell>
          <table:table-cell table:number-columns-repeated="4"/>
        </table:table-row>
        <table:table-row table:style-name="ro1">
          <table:table-cell office:value-type="float" office:value="672.543823242188">
            <text:p>672.5438232422</text:p>
          </table:table-cell>
          <table:table-cell office:value-type="float" office:value="-0.0005490227">
            <text:p>-0.0005490227</text:p>
          </table:table-cell>
          <table:table-cell table:number-columns-repeated="4"/>
        </table:table-row>
        <table:table-row table:style-name="ro1">
          <table:table-cell office:value-type="float" office:value="672.663757324219">
            <text:p>672.6637573242</text:p>
          </table:table-cell>
          <table:table-cell office:value-type="float" office:value="0.008610419">
            <text:p>0.008610419</text:p>
          </table:table-cell>
          <table:table-cell table:number-columns-repeated="4"/>
        </table:table-row>
        <table:table-row table:style-name="ro1">
          <table:table-cell office:value-type="float" office:value="672.78369140625">
            <text:p>672.7836914063</text:p>
          </table:table-cell>
          <table:table-cell office:value-type="float" office:value="0.006570985">
            <text:p>0.006570985</text:p>
          </table:table-cell>
          <table:table-cell table:number-columns-repeated="4"/>
        </table:table-row>
        <table:table-row table:style-name="ro1">
          <table:table-cell office:value-type="float" office:value="672.903625488281">
            <text:p>672.9036254883</text:p>
          </table:table-cell>
          <table:table-cell office:value-type="float" office:value="0.0172686">
            <text:p>0.0172686</text:p>
          </table:table-cell>
          <table:table-cell table:number-columns-repeated="4"/>
        </table:table-row>
        <table:table-row table:style-name="ro1">
          <table:table-cell office:value-type="float" office:value="673.023559570313">
            <text:p>673.0235595703</text:p>
          </table:table-cell>
          <table:table-cell office:value-type="float" office:value="0.01473324">
            <text:p>0.01473324</text:p>
          </table:table-cell>
          <table:table-cell table:number-columns-repeated="4"/>
        </table:table-row>
        <table:table-row table:style-name="ro1">
          <table:table-cell office:value-type="float" office:value="673.143493652344">
            <text:p>673.1434936523</text:p>
          </table:table-cell>
          <table:table-cell office:value-type="float" office:value="0.00703776">
            <text:p>0.00703776</text:p>
          </table:table-cell>
          <table:table-cell table:number-columns-repeated="4"/>
        </table:table-row>
        <table:table-row table:style-name="ro1">
          <table:table-cell office:value-type="float" office:value="673.263427734375">
            <text:p>673.2634277344</text:p>
          </table:table-cell>
          <table:table-cell office:value-type="float" office:value="-0.005124481">
            <text:p>-0.005124481</text:p>
          </table:table-cell>
          <table:table-cell table:number-columns-repeated="4"/>
        </table:table-row>
        <table:table-row table:style-name="ro1">
          <table:table-cell office:value-type="float" office:value="673.383361816406">
            <text:p>673.3833618164</text:p>
          </table:table-cell>
          <table:table-cell office:value-type="float" office:value="0.02073307">
            <text:p>0.02073307</text:p>
          </table:table-cell>
          <table:table-cell table:number-columns-repeated="4"/>
        </table:table-row>
        <table:table-row table:style-name="ro1">
          <table:table-cell office:value-type="float" office:value="673.503295898438">
            <text:p>673.5032958984</text:p>
          </table:table-cell>
          <table:table-cell office:value-type="float" office:value="-0.004825633">
            <text:p>-0.004825633</text:p>
          </table:table-cell>
          <table:table-cell table:number-columns-repeated="4"/>
        </table:table-row>
        <table:table-row table:style-name="ro1">
          <table:table-cell office:value-type="float" office:value="673.623229980469">
            <text:p>673.6232299805</text:p>
          </table:table-cell>
          <table:table-cell office:value-type="float" office:value="0.001333628">
            <text:p>0.001333628</text:p>
          </table:table-cell>
          <table:table-cell table:number-columns-repeated="4"/>
        </table:table-row>
        <table:table-row table:style-name="ro1">
          <table:table-cell office:value-type="float" office:value="673.7431640625">
            <text:p>673.7431640625</text:p>
          </table:table-cell>
          <table:table-cell office:value-type="float" office:value="0.001849842">
            <text:p>0.001849842</text:p>
          </table:table-cell>
          <table:table-cell table:number-columns-repeated="4"/>
        </table:table-row>
        <table:table-row table:style-name="ro1">
          <table:table-cell office:value-type="float" office:value="673.863098144531">
            <text:p>673.8630981445</text:p>
          </table:table-cell>
          <table:table-cell office:value-type="float" office:value="0.006795108">
            <text:p>0.006795108</text:p>
          </table:table-cell>
          <table:table-cell table:number-columns-repeated="4"/>
        </table:table-row>
        <table:table-row table:style-name="ro1">
          <table:table-cell office:value-type="float" office:value="673.983032226563">
            <text:p>673.9830322266</text:p>
          </table:table-cell>
          <table:table-cell office:value-type="float" office:value="0.002411213">
            <text:p>0.002411213</text:p>
          </table:table-cell>
          <table:table-cell table:number-columns-repeated="4"/>
        </table:table-row>
        <table:table-row table:style-name="ro1">
          <table:table-cell office:value-type="float" office:value="674.102966308594">
            <text:p>674.1029663086</text:p>
          </table:table-cell>
          <table:table-cell office:value-type="float" office:value="0.01029915">
            <text:p>0.01029915</text:p>
          </table:table-cell>
          <table:table-cell table:number-columns-repeated="4"/>
        </table:table-row>
        <table:table-row table:style-name="ro1">
          <table:table-cell office:value-type="float" office:value="674.222900390625">
            <text:p>674.2229003906</text:p>
          </table:table-cell>
          <table:table-cell office:value-type="float" office:value="-0.003078151">
            <text:p>-0.003078151</text:p>
          </table:table-cell>
          <table:table-cell table:number-columns-repeated="4"/>
        </table:table-row>
        <table:table-row table:style-name="ro1">
          <table:table-cell office:value-type="float" office:value="674.342834472656">
            <text:p>674.3428344727</text:p>
          </table:table-cell>
          <table:table-cell office:value-type="float" office:value="-0.004131011">
            <text:p>-0.004131011</text:p>
          </table:table-cell>
          <table:table-cell table:number-columns-repeated="4"/>
        </table:table-row>
        <table:table-row table:style-name="ro1">
          <table:table-cell office:value-type="float" office:value="674.462768554688">
            <text:p>674.4627685547</text:p>
          </table:table-cell>
          <table:table-cell office:value-type="float" office:value="0.00626767">
            <text:p>0.00626767</text:p>
          </table:table-cell>
          <table:table-cell table:number-columns-repeated="4"/>
        </table:table-row>
        <table:table-row table:style-name="ro1">
          <table:table-cell office:value-type="float" office:value="674.582702636719">
            <text:p>674.5827026367</text:p>
          </table:table-cell>
          <table:table-cell office:value-type="float" office:value="0.007088814">
            <text:p>0.007088814</text:p>
          </table:table-cell>
          <table:table-cell table:number-columns-repeated="4"/>
        </table:table-row>
        <table:table-row table:style-name="ro1">
          <table:table-cell office:value-type="float" office:value="674.702697753906">
            <text:p>674.7026977539</text:p>
          </table:table-cell>
          <table:table-cell office:value-type="float" office:value="0.01054004">
            <text:p>0.01054004</text:p>
          </table:table-cell>
          <table:table-cell table:number-columns-repeated="4"/>
        </table:table-row>
        <table:table-row table:style-name="ro1">
          <table:table-cell office:value-type="float" office:value="674.822631835938">
            <text:p>674.8226318359</text:p>
          </table:table-cell>
          <table:table-cell office:value-type="float" office:value="0.0002344775">
            <text:p>0.0002344775</text:p>
          </table:table-cell>
          <table:table-cell table:number-columns-repeated="4"/>
        </table:table-row>
        <table:table-row table:style-name="ro1">
          <table:table-cell office:value-type="float" office:value="674.942565917969">
            <text:p>674.942565918</text:p>
          </table:table-cell>
          <table:table-cell office:value-type="float" office:value="0.01498993">
            <text:p>0.01498993</text:p>
          </table:table-cell>
          <table:table-cell table:number-columns-repeated="4"/>
        </table:table-row>
        <table:table-row table:style-name="ro1">
          <table:table-cell office:value-type="float" office:value="675.0625">
            <text:p>675.0625</text:p>
          </table:table-cell>
          <table:table-cell office:value-type="float" office:value="-0.000655077">
            <text:p>-0.000655077</text:p>
          </table:table-cell>
          <table:table-cell table:number-columns-repeated="4"/>
        </table:table-row>
        <table:table-row table:style-name="ro1">
          <table:table-cell office:value-type="float" office:value="675.182495117188">
            <text:p>675.1824951172</text:p>
          </table:table-cell>
          <table:table-cell office:value-type="float" office:value="0.0005244901">
            <text:p>0.0005244901</text:p>
          </table:table-cell>
          <table:table-cell table:number-columns-repeated="4"/>
        </table:table-row>
        <table:table-row table:style-name="ro1">
          <table:table-cell office:value-type="float" office:value="675.302429199219">
            <text:p>675.3024291992</text:p>
          </table:table-cell>
          <table:table-cell office:value-type="float" office:value="0.008319643">
            <text:p>0.008319643</text:p>
          </table:table-cell>
          <table:table-cell table:number-columns-repeated="4"/>
        </table:table-row>
        <table:table-row table:style-name="ro1">
          <table:table-cell office:value-type="float" office:value="675.42236328125">
            <text:p>675.4223632813</text:p>
          </table:table-cell>
          <table:table-cell office:value-type="float" office:value="0.01524709">
            <text:p>0.01524709</text:p>
          </table:table-cell>
          <table:table-cell table:number-columns-repeated="4"/>
        </table:table-row>
        <table:table-row table:style-name="ro1">
          <table:table-cell office:value-type="float" office:value="675.542297363281">
            <text:p>675.5422973633</text:p>
          </table:table-cell>
          <table:table-cell office:value-type="float" office:value="0.013741">
            <text:p>0.013741</text:p>
          </table:table-cell>
          <table:table-cell table:number-columns-repeated="4"/>
        </table:table-row>
        <table:table-row table:style-name="ro1">
          <table:table-cell office:value-type="float" office:value="675.662292480469">
            <text:p>675.6622924805</text:p>
          </table:table-cell>
          <table:table-cell office:value-type="float" office:value="0.008566245">
            <text:p>0.008566245</text:p>
          </table:table-cell>
          <table:table-cell table:number-columns-repeated="4"/>
        </table:table-row>
        <table:table-row table:style-name="ro1">
          <table:table-cell office:value-type="float" office:value="675.7822265625">
            <text:p>675.7822265625</text:p>
          </table:table-cell>
          <table:table-cell office:value-type="float" office:value="0.009853235">
            <text:p>0.009853235</text:p>
          </table:table-cell>
          <table:table-cell table:number-columns-repeated="4"/>
        </table:table-row>
        <table:table-row table:style-name="ro1">
          <table:table-cell office:value-type="float" office:value="675.902160644531">
            <text:p>675.9021606445</text:p>
          </table:table-cell>
          <table:table-cell office:value-type="float" office:value="-0.003012203">
            <text:p>-0.003012203</text:p>
          </table:table-cell>
          <table:table-cell table:number-columns-repeated="4"/>
        </table:table-row>
        <table:table-row table:style-name="ro1">
          <table:table-cell office:value-type="float" office:value="676.022155761719">
            <text:p>676.0221557617</text:p>
          </table:table-cell>
          <table:table-cell office:value-type="float" office:value="0.01094916">
            <text:p>0.01094916</text:p>
          </table:table-cell>
          <table:table-cell table:number-columns-repeated="4"/>
        </table:table-row>
        <table:table-row table:style-name="ro1">
          <table:table-cell office:value-type="float" office:value="676.14208984375">
            <text:p>676.1420898438</text:p>
          </table:table-cell>
          <table:table-cell office:value-type="float" office:value="0.003189261">
            <text:p>0.003189261</text:p>
          </table:table-cell>
          <table:table-cell table:number-columns-repeated="4"/>
        </table:table-row>
        <table:table-row table:style-name="ro1">
          <table:table-cell office:value-type="float" office:value="676.262023925781">
            <text:p>676.2620239258</text:p>
          </table:table-cell>
          <table:table-cell office:value-type="float" office:value="-0.002818272">
            <text:p>-0.002818272</text:p>
          </table:table-cell>
          <table:table-cell table:number-columns-repeated="4"/>
        </table:table-row>
        <table:table-row table:style-name="ro1">
          <table:table-cell office:value-type="float" office:value="676.382019042969">
            <text:p>676.382019043</text:p>
          </table:table-cell>
          <table:table-cell office:value-type="float" office:value="0.01124034">
            <text:p>0.01124034</text:p>
          </table:table-cell>
          <table:table-cell table:number-columns-repeated="4"/>
        </table:table-row>
        <table:table-row table:style-name="ro1">
          <table:table-cell office:value-type="float" office:value="676.501953125">
            <text:p>676.501953125</text:p>
          </table:table-cell>
          <table:table-cell office:value-type="float" office:value="0.004368108">
            <text:p>0.004368108</text:p>
          </table:table-cell>
          <table:table-cell table:number-columns-repeated="4"/>
        </table:table-row>
        <table:table-row table:style-name="ro1">
          <table:table-cell office:value-type="float" office:value="676.621948242188">
            <text:p>676.6219482422</text:p>
          </table:table-cell>
          <table:table-cell office:value-type="float" office:value="-0.003601653">
            <text:p>-0.003601653</text:p>
          </table:table-cell>
          <table:table-cell table:number-columns-repeated="4"/>
        </table:table-row>
        <table:table-row table:style-name="ro1">
          <table:table-cell office:value-type="float" office:value="676.741882324219">
            <text:p>676.7418823242</text:p>
          </table:table-cell>
          <table:table-cell office:value-type="float" office:value="-0.006568916">
            <text:p>-0.006568916</text:p>
          </table:table-cell>
          <table:table-cell table:number-columns-repeated="4"/>
        </table:table-row>
        <table:table-row table:style-name="ro1">
          <table:table-cell office:value-type="float" office:value="676.861877441406">
            <text:p>676.8618774414</text:p>
          </table:table-cell>
          <table:table-cell office:value-type="float" office:value="0.002172478">
            <text:p>0.002172478</text:p>
          </table:table-cell>
          <table:table-cell table:number-columns-repeated="4"/>
        </table:table-row>
        <table:table-row table:style-name="ro1">
          <table:table-cell office:value-type="float" office:value="676.981811523438">
            <text:p>676.9818115234</text:p>
          </table:table-cell>
          <table:table-cell office:value-type="float" office:value="0.005818697">
            <text:p>0.005818697</text:p>
          </table:table-cell>
          <table:table-cell table:number-columns-repeated="4"/>
        </table:table-row>
        <table:table-row table:style-name="ro1">
          <table:table-cell office:value-type="float" office:value="677.101806640625">
            <text:p>677.1018066406</text:p>
          </table:table-cell>
          <table:table-cell office:value-type="float" office:value="0.003723043">
            <text:p>0.003723043</text:p>
          </table:table-cell>
          <table:table-cell table:number-columns-repeated="4"/>
        </table:table-row>
        <table:table-row table:style-name="ro1">
          <table:table-cell office:value-type="float" office:value="677.221740722656">
            <text:p>677.2217407227</text:p>
          </table:table-cell>
          <table:table-cell office:value-type="string">
            <text:p>-7.231491E-05</text:p>
          </table:table-cell>
          <table:table-cell table:number-columns-repeated="4"/>
        </table:table-row>
        <table:table-row table:style-name="ro1">
          <table:table-cell office:value-type="float" office:value="677.341735839844">
            <text:p>677.3417358398</text:p>
          </table:table-cell>
          <table:table-cell office:value-type="float" office:value="0.01110223">
            <text:p>0.01110223</text:p>
          </table:table-cell>
          <table:table-cell table:number-columns-repeated="4"/>
        </table:table-row>
        <table:table-row table:style-name="ro1">
          <table:table-cell office:value-type="float" office:value="677.461669921875">
            <text:p>677.4616699219</text:p>
          </table:table-cell>
          <table:table-cell office:value-type="float" office:value="0.001507148">
            <text:p>0.001507148</text:p>
          </table:table-cell>
          <table:table-cell table:number-columns-repeated="4"/>
        </table:table-row>
        <table:table-row table:style-name="ro1">
          <table:table-cell office:value-type="float" office:value="677.581665039063">
            <text:p>677.5816650391</text:p>
          </table:table-cell>
          <table:table-cell office:value-type="float" office:value="0.007042065">
            <text:p>0.007042065</text:p>
          </table:table-cell>
          <table:table-cell table:number-columns-repeated="4"/>
        </table:table-row>
        <table:table-row table:style-name="ro1">
          <table:table-cell office:value-type="float" office:value="677.70166015625">
            <text:p>677.7016601563</text:p>
          </table:table-cell>
          <table:table-cell office:value-type="float" office:value="0.0003870276">
            <text:p>0.0003870276</text:p>
          </table:table-cell>
          <table:table-cell table:number-columns-repeated="4"/>
        </table:table-row>
        <table:table-row table:style-name="ro1">
          <table:table-cell office:value-type="float" office:value="677.821594238281">
            <text:p>677.8215942383</text:p>
          </table:table-cell>
          <table:table-cell office:value-type="float" office:value="0.007237653">
            <text:p>0.007237653</text:p>
          </table:table-cell>
          <table:table-cell table:number-columns-repeated="4"/>
        </table:table-row>
        <table:table-row table:style-name="ro1">
          <table:table-cell office:value-type="float" office:value="677.941589355469">
            <text:p>677.9415893555</text:p>
          </table:table-cell>
          <table:table-cell office:value-type="float" office:value="0.003618725">
            <text:p>0.003618725</text:p>
          </table:table-cell>
          <table:table-cell table:number-columns-repeated="4"/>
        </table:table-row>
        <table:table-row table:style-name="ro1">
          <table:table-cell office:value-type="float" office:value="678.061584472656">
            <text:p>678.0615844727</text:p>
          </table:table-cell>
          <table:table-cell office:value-type="float" office:value="0.0002482649">
            <text:p>0.0002482649</text:p>
          </table:table-cell>
          <table:table-cell table:number-columns-repeated="4"/>
        </table:table-row>
        <table:table-row table:style-name="ro1">
          <table:table-cell office:value-type="float" office:value="678.181518554688">
            <text:p>678.1815185547</text:p>
          </table:table-cell>
          <table:table-cell office:value-type="float" office:value="0.0005375056">
            <text:p>0.0005375056</text:p>
          </table:table-cell>
          <table:table-cell table:number-columns-repeated="4"/>
        </table:table-row>
        <table:table-row table:style-name="ro1">
          <table:table-cell office:value-type="float" office:value="678.301513671875">
            <text:p>678.3015136719</text:p>
          </table:table-cell>
          <table:table-cell office:value-type="float" office:value="0.004818607">
            <text:p>0.004818607</text:p>
          </table:table-cell>
          <table:table-cell table:number-columns-repeated="4"/>
        </table:table-row>
        <table:table-row table:style-name="ro1">
          <table:table-cell office:value-type="float" office:value="678.421508789063">
            <text:p>678.4215087891</text:p>
          </table:table-cell>
          <table:table-cell office:value-type="float" office:value="-0.001909152">
            <text:p>-0.001909152</text:p>
          </table:table-cell>
          <table:table-cell table:number-columns-repeated="4"/>
        </table:table-row>
        <table:table-row table:style-name="ro1">
          <table:table-cell office:value-type="float" office:value="678.541442871094">
            <text:p>678.5414428711</text:p>
          </table:table-cell>
          <table:table-cell office:value-type="float" office:value="0.01712108">
            <text:p>0.01712108</text:p>
          </table:table-cell>
          <table:table-cell table:number-columns-repeated="4"/>
        </table:table-row>
        <table:table-row table:style-name="ro1">
          <table:table-cell office:value-type="float" office:value="678.661437988281">
            <text:p>678.6614379883</text:p>
          </table:table-cell>
          <table:table-cell office:value-type="float" office:value="0.0008776507">
            <text:p>0.0008776507</text:p>
          </table:table-cell>
          <table:table-cell table:number-columns-repeated="4"/>
        </table:table-row>
        <table:table-row table:style-name="ro1">
          <table:table-cell office:value-type="float" office:value="678.781433105469">
            <text:p>678.7814331055</text:p>
          </table:table-cell>
          <table:table-cell office:value-type="float" office:value="0.005600961">
            <text:p>0.005600961</text:p>
          </table:table-cell>
          <table:table-cell table:number-columns-repeated="4"/>
        </table:table-row>
        <table:table-row table:style-name="ro1">
          <table:table-cell office:value-type="float" office:value="678.901428222656">
            <text:p>678.9014282227</text:p>
          </table:table-cell>
          <table:table-cell office:value-type="float" office:value="0.00756288">
            <text:p>0.00756288</text:p>
          </table:table-cell>
          <table:table-cell table:number-columns-repeated="4"/>
        </table:table-row>
        <table:table-row table:style-name="ro1">
          <table:table-cell office:value-type="float" office:value="679.021362304688">
            <text:p>679.0213623047</text:p>
          </table:table-cell>
          <table:table-cell office:value-type="float" office:value="0.005947359">
            <text:p>0.005947359</text:p>
          </table:table-cell>
          <table:table-cell table:number-columns-repeated="4"/>
        </table:table-row>
        <table:table-row table:style-name="ro1">
          <table:table-cell office:value-type="float" office:value="679.141357421875">
            <text:p>679.1413574219</text:p>
          </table:table-cell>
          <table:table-cell office:value-type="float" office:value="0.002695567">
            <text:p>0.002695567</text:p>
          </table:table-cell>
          <table:table-cell table:number-columns-repeated="4"/>
        </table:table-row>
        <table:table-row table:style-name="ro1">
          <table:table-cell office:value-type="float" office:value="679.261352539063">
            <text:p>679.2613525391</text:p>
          </table:table-cell>
          <table:table-cell office:value-type="float" office:value="0.009676045">
            <text:p>0.009676045</text:p>
          </table:table-cell>
          <table:table-cell table:number-columns-repeated="4"/>
        </table:table-row>
        <table:table-row table:style-name="ro1">
          <table:table-cell office:value-type="float" office:value="679.38134765625">
            <text:p>679.3813476563</text:p>
          </table:table-cell>
          <table:table-cell office:value-type="float" office:value="0.0105141">
            <text:p>0.0105141</text:p>
          </table:table-cell>
          <table:table-cell table:number-columns-repeated="4"/>
        </table:table-row>
        <table:table-row table:style-name="ro1">
          <table:table-cell office:value-type="float" office:value="679.501342773438">
            <text:p>679.5013427734</text:p>
          </table:table-cell>
          <table:table-cell office:value-type="float" office:value="-0.0005638428">
            <text:p>-0.0005638428</text:p>
          </table:table-cell>
          <table:table-cell table:number-columns-repeated="4"/>
        </table:table-row>
        <table:table-row table:style-name="ro1">
          <table:table-cell office:value-type="float" office:value="679.621337890625">
            <text:p>679.6213378906</text:p>
          </table:table-cell>
          <table:table-cell office:value-type="float" office:value="0.007605946">
            <text:p>0.007605946</text:p>
          </table:table-cell>
          <table:table-cell table:number-columns-repeated="4"/>
        </table:table-row>
        <table:table-row table:style-name="ro1">
          <table:table-cell office:value-type="float" office:value="679.741333007813">
            <text:p>679.7413330078</text:p>
          </table:table-cell>
          <table:table-cell office:value-type="float" office:value="0.004430144">
            <text:p>0.004430144</text:p>
          </table:table-cell>
          <table:table-cell table:number-columns-repeated="4"/>
        </table:table-row>
        <table:table-row table:style-name="ro1">
          <table:table-cell office:value-type="float" office:value="679.861267089844">
            <text:p>679.8612670898</text:p>
          </table:table-cell>
          <table:table-cell office:value-type="float" office:value="0.006184138">
            <text:p>0.006184138</text:p>
          </table:table-cell>
          <table:table-cell table:number-columns-repeated="4"/>
        </table:table-row>
        <table:table-row table:style-name="ro1">
          <table:table-cell office:value-type="float" office:value="679.981262207031">
            <text:p>679.981262207</text:p>
          </table:table-cell>
          <table:table-cell office:value-type="float" office:value="0.001834315">
            <text:p>0.001834315</text:p>
          </table:table-cell>
          <table:table-cell table:number-columns-repeated="4"/>
        </table:table-row>
        <table:table-row table:style-name="ro1">
          <table:table-cell office:value-type="float" office:value="680.101257324219">
            <text:p>680.1012573242</text:p>
          </table:table-cell>
          <table:table-cell office:value-type="float" office:value="-0.002016511">
            <text:p>-0.002016511</text:p>
          </table:table-cell>
          <table:table-cell table:number-columns-repeated="4"/>
        </table:table-row>
        <table:table-row table:style-name="ro1">
          <table:table-cell office:value-type="float" office:value="680.221252441406">
            <text:p>680.2212524414</text:p>
          </table:table-cell>
          <table:table-cell office:value-type="float" office:value="0.01180774">
            <text:p>0.01180774</text:p>
          </table:table-cell>
          <table:table-cell table:number-columns-repeated="4"/>
        </table:table-row>
        <table:table-row table:style-name="ro1">
          <table:table-cell office:value-type="float" office:value="680.341247558594">
            <text:p>680.3412475586</text:p>
          </table:table-cell>
          <table:table-cell office:value-type="float" office:value="-0.001159858">
            <text:p>-0.001159858</text:p>
          </table:table-cell>
          <table:table-cell table:number-columns-repeated="4"/>
        </table:table-row>
        <table:table-row table:style-name="ro1">
          <table:table-cell office:value-type="float" office:value="680.461242675781">
            <text:p>680.4612426758</text:p>
          </table:table-cell>
          <table:table-cell office:value-type="float" office:value="-0.0007921908">
            <text:p>-0.0007921908</text:p>
          </table:table-cell>
          <table:table-cell table:number-columns-repeated="4"/>
        </table:table-row>
        <table:table-row table:style-name="ro1">
          <table:table-cell office:value-type="float" office:value="680.581237792969">
            <text:p>680.581237793</text:p>
          </table:table-cell>
          <table:table-cell office:value-type="float" office:value="0.0012864">
            <text:p>0.0012864</text:p>
          </table:table-cell>
          <table:table-cell table:number-columns-repeated="4"/>
        </table:table-row>
        <table:table-row table:style-name="ro1">
          <table:table-cell office:value-type="float" office:value="680.701232910156">
            <text:p>680.7012329102</text:p>
          </table:table-cell>
          <table:table-cell office:value-type="float" office:value="0.005611503">
            <text:p>0.005611503</text:p>
          </table:table-cell>
          <table:table-cell table:number-columns-repeated="4"/>
        </table:table-row>
        <table:table-row table:style-name="ro1">
          <table:table-cell office:value-type="float" office:value="680.821228027344">
            <text:p>680.8212280273</text:p>
          </table:table-cell>
          <table:table-cell office:value-type="float" office:value="0.005668593">
            <text:p>0.005668593</text:p>
          </table:table-cell>
          <table:table-cell table:number-columns-repeated="4"/>
        </table:table-row>
        <table:table-row table:style-name="ro1">
          <table:table-cell office:value-type="float" office:value="680.941223144531">
            <text:p>680.9412231445</text:p>
          </table:table-cell>
          <table:table-cell office:value-type="float" office:value="0.002473215">
            <text:p>0.002473215</text:p>
          </table:table-cell>
          <table:table-cell table:number-columns-repeated="4"/>
        </table:table-row>
        <table:table-row table:style-name="ro1">
          <table:table-cell office:value-type="float" office:value="681.061218261719">
            <text:p>681.0612182617</text:p>
          </table:table-cell>
          <table:table-cell office:value-type="float" office:value="0.0008645812">
            <text:p>0.0008645812</text:p>
          </table:table-cell>
          <table:table-cell table:number-columns-repeated="4"/>
        </table:table-row>
        <table:table-row table:style-name="ro1">
          <table:table-cell office:value-type="float" office:value="681.181274414063">
            <text:p>681.1812744141</text:p>
          </table:table-cell>
          <table:table-cell office:value-type="float" office:value="0.001178986">
            <text:p>0.001178986</text:p>
          </table:table-cell>
          <table:table-cell table:number-columns-repeated="4"/>
        </table:table-row>
        <table:table-row table:style-name="ro1">
          <table:table-cell office:value-type="float" office:value="681.30126953125">
            <text:p>681.3012695313</text:p>
          </table:table-cell>
          <table:table-cell office:value-type="float" office:value="0.005305279">
            <text:p>0.005305279</text:p>
          </table:table-cell>
          <table:table-cell table:number-columns-repeated="4"/>
        </table:table-row>
        <table:table-row table:style-name="ro1">
          <table:table-cell office:value-type="float" office:value="681.421264648438">
            <text:p>681.4212646484</text:p>
          </table:table-cell>
          <table:table-cell office:value-type="float" office:value="0.007535639">
            <text:p>0.007535639</text:p>
          </table:table-cell>
          <table:table-cell table:number-columns-repeated="4"/>
        </table:table-row>
        <table:table-row table:style-name="ro1">
          <table:table-cell office:value-type="float" office:value="681.541259765625">
            <text:p>681.5412597656</text:p>
          </table:table-cell>
          <table:table-cell office:value-type="float" office:value="-0.007032804">
            <text:p>-0.007032804</text:p>
          </table:table-cell>
          <table:table-cell table:number-columns-repeated="4"/>
        </table:table-row>
        <table:table-row table:style-name="ro1">
          <table:table-cell office:value-type="float" office:value="681.661254882813">
            <text:p>681.6612548828</text:p>
          </table:table-cell>
          <table:table-cell office:value-type="float" office:value="0.004194051">
            <text:p>0.004194051</text:p>
          </table:table-cell>
          <table:table-cell table:number-columns-repeated="4"/>
        </table:table-row>
        <table:table-row table:style-name="ro1">
          <table:table-cell office:value-type="float" office:value="681.78125">
            <text:p>681.78125</text:p>
          </table:table-cell>
          <table:table-cell office:value-type="float" office:value="-0.002180437">
            <text:p>-0.002180437</text:p>
          </table:table-cell>
          <table:table-cell table:number-columns-repeated="4"/>
        </table:table-row>
        <table:table-row table:style-name="ro1">
          <table:table-cell office:value-type="float" office:value="681.901245117188">
            <text:p>681.9012451172</text:p>
          </table:table-cell>
          <table:table-cell office:value-type="float" office:value="0.005772825">
            <text:p>0.005772825</text:p>
          </table:table-cell>
          <table:table-cell table:number-columns-repeated="4"/>
        </table:table-row>
        <table:table-row table:style-name="ro1">
          <table:table-cell office:value-type="float" office:value="682.021301269531">
            <text:p>682.0213012695</text:p>
          </table:table-cell>
          <table:table-cell office:value-type="float" office:value="0.0003315599">
            <text:p>0.0003315599</text:p>
          </table:table-cell>
          <table:table-cell table:number-columns-repeated="4"/>
        </table:table-row>
        <table:table-row table:style-name="ro1">
          <table:table-cell office:value-type="float" office:value="682.141296386719">
            <text:p>682.1412963867</text:p>
          </table:table-cell>
          <table:table-cell office:value-type="float" office:value="-0.001209383">
            <text:p>-0.001209383</text:p>
          </table:table-cell>
          <table:table-cell table:number-columns-repeated="4"/>
        </table:table-row>
        <table:table-row table:style-name="ro1">
          <table:table-cell office:value-type="float" office:value="682.261291503906">
            <text:p>682.2612915039</text:p>
          </table:table-cell>
          <table:table-cell office:value-type="float" office:value="-0.001173652">
            <text:p>-0.001173652</text:p>
          </table:table-cell>
          <table:table-cell table:number-columns-repeated="4"/>
        </table:table-row>
        <table:table-row table:style-name="ro1">
          <table:table-cell office:value-type="float" office:value="682.381286621094">
            <text:p>682.3812866211</text:p>
          </table:table-cell>
          <table:table-cell office:value-type="float" office:value="0.001302995">
            <text:p>0.001302995</text:p>
          </table:table-cell>
          <table:table-cell table:number-columns-repeated="4"/>
        </table:table-row>
        <table:table-row table:style-name="ro1">
          <table:table-cell office:value-type="float" office:value="682.501342773438">
            <text:p>682.5013427734</text:p>
          </table:table-cell>
          <table:table-cell office:value-type="float" office:value="0.005425548">
            <text:p>0.005425548</text:p>
          </table:table-cell>
          <table:table-cell table:number-columns-repeated="4"/>
        </table:table-row>
        <table:table-row table:style-name="ro1">
          <table:table-cell office:value-type="float" office:value="682.621337890625">
            <text:p>682.6213378906</text:p>
          </table:table-cell>
          <table:table-cell office:value-type="float" office:value="0.0006557454">
            <text:p>0.0006557454</text:p>
          </table:table-cell>
          <table:table-cell table:number-columns-repeated="4"/>
        </table:table-row>
        <table:table-row table:style-name="ro1">
          <table:table-cell office:value-type="float" office:value="682.741333007813">
            <text:p>682.7413330078</text:p>
          </table:table-cell>
          <table:table-cell office:value-type="float" office:value="-0.0006458502">
            <text:p>-0.0006458502</text:p>
          </table:table-cell>
          <table:table-cell table:number-columns-repeated="4"/>
        </table:table-row>
        <table:table-row table:style-name="ro1">
          <table:table-cell office:value-type="float" office:value="682.861389160156">
            <text:p>682.8613891602</text:p>
          </table:table-cell>
          <table:table-cell office:value-type="float" office:value="0.002282937">
            <text:p>0.002282937</text:p>
          </table:table-cell>
          <table:table-cell table:number-columns-repeated="4"/>
        </table:table-row>
        <table:table-row table:style-name="ro1">
          <table:table-cell office:value-type="float" office:value="682.981384277344">
            <text:p>682.9813842773</text:p>
          </table:table-cell>
          <table:table-cell office:value-type="float" office:value="0.003412482">
            <text:p>0.003412482</text:p>
          </table:table-cell>
          <table:table-cell table:number-columns-repeated="4"/>
        </table:table-row>
        <table:table-row table:style-name="ro1">
          <table:table-cell office:value-type="float" office:value="683.101379394531">
            <text:p>683.1013793945</text:p>
          </table:table-cell>
          <table:table-cell office:value-type="float" office:value="-0.003397968">
            <text:p>-0.003397968</text:p>
          </table:table-cell>
          <table:table-cell table:number-columns-repeated="4"/>
        </table:table-row>
        <table:table-row table:style-name="ro1">
          <table:table-cell office:value-type="float" office:value="683.221435546875">
            <text:p>683.2214355469</text:p>
          </table:table-cell>
          <table:table-cell office:value-type="float" office:value="0.002176117">
            <text:p>0.002176117</text:p>
          </table:table-cell>
          <table:table-cell table:number-columns-repeated="4"/>
        </table:table-row>
        <table:table-row table:style-name="ro1">
          <table:table-cell office:value-type="float" office:value="683.341430664063">
            <text:p>683.3414306641</text:p>
          </table:table-cell>
          <table:table-cell office:value-type="float" office:value="-0.005676226">
            <text:p>-0.005676226</text:p>
          </table:table-cell>
          <table:table-cell table:number-columns-repeated="4"/>
        </table:table-row>
        <table:table-row table:style-name="ro1">
          <table:table-cell office:value-type="float" office:value="683.46142578125">
            <text:p>683.4614257813</text:p>
          </table:table-cell>
          <table:table-cell office:value-type="float" office:value="-0.004593316">
            <text:p>-0.004593316</text:p>
          </table:table-cell>
          <table:table-cell table:number-columns-repeated="4"/>
        </table:table-row>
        <table:table-row table:style-name="ro1">
          <table:table-cell office:value-type="float" office:value="683.581481933594">
            <text:p>683.5814819336</text:p>
          </table:table-cell>
          <table:table-cell office:value-type="float" office:value="-0.001425653">
            <text:p>-0.001425653</text:p>
          </table:table-cell>
          <table:table-cell table:number-columns-repeated="4"/>
        </table:table-row>
        <table:table-row table:style-name="ro1">
          <table:table-cell office:value-type="float" office:value="683.701477050781">
            <text:p>683.7014770508</text:p>
          </table:table-cell>
          <table:table-cell office:value-type="float" office:value="0.0005182351">
            <text:p>0.0005182351</text:p>
          </table:table-cell>
          <table:table-cell table:number-columns-repeated="4"/>
        </table:table-row>
        <table:table-row table:style-name="ro1">
          <table:table-cell office:value-type="float" office:value="683.821533203125">
            <text:p>683.8215332031</text:p>
          </table:table-cell>
          <table:table-cell office:value-type="float" office:value="-0.002583833">
            <text:p>-0.002583833</text:p>
          </table:table-cell>
          <table:table-cell table:number-columns-repeated="4"/>
        </table:table-row>
        <table:table-row table:style-name="ro1">
          <table:table-cell office:value-type="float" office:value="683.941528320313">
            <text:p>683.9415283203</text:p>
          </table:table-cell>
          <table:table-cell office:value-type="float" office:value="-0.003113126">
            <text:p>-0.003113126</text:p>
          </table:table-cell>
          <table:table-cell table:number-columns-repeated="4"/>
        </table:table-row>
        <table:table-row table:style-name="ro1">
          <table:table-cell office:value-type="float" office:value="684.061584472656">
            <text:p>684.0615844727</text:p>
          </table:table-cell>
          <table:table-cell office:value-type="float" office:value="0.007066727">
            <text:p>0.007066727</text:p>
          </table:table-cell>
          <table:table-cell table:number-columns-repeated="4"/>
        </table:table-row>
        <table:table-row table:style-name="ro1">
          <table:table-cell office:value-type="float" office:value="684.181579589844">
            <text:p>684.1815795898</text:p>
          </table:table-cell>
          <table:table-cell office:value-type="float" office:value="-0.006655571">
            <text:p>-0.006655571</text:p>
          </table:table-cell>
          <table:table-cell table:number-columns-repeated="4"/>
        </table:table-row>
        <table:table-row table:style-name="ro1">
          <table:table-cell office:value-type="float" office:value="684.301635742188">
            <text:p>684.3016357422</text:p>
          </table:table-cell>
          <table:table-cell office:value-type="float" office:value="-0.001885084">
            <text:p>-0.001885084</text:p>
          </table:table-cell>
          <table:table-cell table:number-columns-repeated="4"/>
        </table:table-row>
        <table:table-row table:style-name="ro1">
          <table:table-cell office:value-type="float" office:value="684.421630859375">
            <text:p>684.4216308594</text:p>
          </table:table-cell>
          <table:table-cell office:value-type="float" office:value="-0.005530613">
            <text:p>-0.005530613</text:p>
          </table:table-cell>
          <table:table-cell table:number-columns-repeated="4"/>
        </table:table-row>
        <table:table-row table:style-name="ro1">
          <table:table-cell office:value-type="float" office:value="684.541687011719">
            <text:p>684.5416870117</text:p>
          </table:table-cell>
          <table:table-cell office:value-type="float" office:value="0.00675377">
            <text:p>0.00675377</text:p>
          </table:table-cell>
          <table:table-cell table:number-columns-repeated="4"/>
        </table:table-row>
        <table:table-row table:style-name="ro1">
          <table:table-cell office:value-type="float" office:value="684.661682128906">
            <text:p>684.6616821289</text:p>
          </table:table-cell>
          <table:table-cell office:value-type="float" office:value="-0.002557938">
            <text:p>-0.002557938</text:p>
          </table:table-cell>
          <table:table-cell table:number-columns-repeated="4"/>
        </table:table-row>
        <table:table-row table:style-name="ro1">
          <table:table-cell office:value-type="float" office:value="684.78173828125">
            <text:p>684.7817382813</text:p>
          </table:table-cell>
          <table:table-cell office:value-type="float" office:value="0.008105192">
            <text:p>0.008105192</text:p>
          </table:table-cell>
          <table:table-cell table:number-columns-repeated="4"/>
        </table:table-row>
        <table:table-row table:style-name="ro1">
          <table:table-cell office:value-type="float" office:value="684.901733398438">
            <text:p>684.9017333984</text:p>
          </table:table-cell>
          <table:table-cell office:value-type="float" office:value="0.0107253">
            <text:p>0.0107253</text:p>
          </table:table-cell>
          <table:table-cell table:number-columns-repeated="4"/>
        </table:table-row>
        <table:table-row table:style-name="ro1">
          <table:table-cell office:value-type="float" office:value="685.021789550781">
            <text:p>685.0217895508</text:p>
          </table:table-cell>
          <table:table-cell office:value-type="float" office:value="-0.002603622">
            <text:p>-0.002603622</text:p>
          </table:table-cell>
          <table:table-cell table:number-columns-repeated="4"/>
        </table:table-row>
        <table:table-row table:style-name="ro1">
          <table:table-cell office:value-type="float" office:value="685.141784667969">
            <text:p>685.141784668</text:p>
          </table:table-cell>
          <table:table-cell office:value-type="float" office:value="0.003174728">
            <text:p>0.003174728</text:p>
          </table:table-cell>
          <table:table-cell table:number-columns-repeated="4"/>
        </table:table-row>
        <table:table-row table:style-name="ro1">
          <table:table-cell office:value-type="float" office:value="685.261840820313">
            <text:p>685.2618408203</text:p>
          </table:table-cell>
          <table:table-cell office:value-type="float" office:value="0.01171805">
            <text:p>0.01171805</text:p>
          </table:table-cell>
          <table:table-cell table:number-columns-repeated="4"/>
        </table:table-row>
        <table:table-row table:style-name="ro1">
          <table:table-cell office:value-type="float" office:value="685.381896972656">
            <text:p>685.3818969727</text:p>
          </table:table-cell>
          <table:table-cell office:value-type="float" office:value="0.004307078">
            <text:p>0.004307078</text:p>
          </table:table-cell>
          <table:table-cell table:number-columns-repeated="4"/>
        </table:table-row>
        <table:table-row table:style-name="ro1">
          <table:table-cell office:value-type="float" office:value="685.501892089844">
            <text:p>685.5018920898</text:p>
          </table:table-cell>
          <table:table-cell office:value-type="float" office:value="-0.001355078">
            <text:p>-0.001355078</text:p>
          </table:table-cell>
          <table:table-cell table:number-columns-repeated="4"/>
        </table:table-row>
        <table:table-row table:style-name="ro1">
          <table:table-cell office:value-type="float" office:value="685.621948242188">
            <text:p>685.6219482422</text:p>
          </table:table-cell>
          <table:table-cell office:value-type="float" office:value="0.01342343">
            <text:p>0.01342343</text:p>
          </table:table-cell>
          <table:table-cell table:number-columns-repeated="4"/>
        </table:table-row>
        <table:table-row table:style-name="ro1">
          <table:table-cell office:value-type="float" office:value="685.742004394531">
            <text:p>685.7420043945</text:p>
          </table:table-cell>
          <table:table-cell office:value-type="float" office:value="0.001108594">
            <text:p>0.001108594</text:p>
          </table:table-cell>
          <table:table-cell table:number-columns-repeated="4"/>
        </table:table-row>
        <table:table-row table:style-name="ro1">
          <table:table-cell office:value-type="float" office:value="685.861999511719">
            <text:p>685.8619995117</text:p>
          </table:table-cell>
          <table:table-cell office:value-type="float" office:value="0.002890441">
            <text:p>0.002890441</text:p>
          </table:table-cell>
          <table:table-cell table:number-columns-repeated="4"/>
        </table:table-row>
        <table:table-row table:style-name="ro1">
          <table:table-cell office:value-type="float" office:value="685.982055664063">
            <text:p>685.9820556641</text:p>
          </table:table-cell>
          <table:table-cell office:value-type="float" office:value="-0.001194988">
            <text:p>-0.001194988</text:p>
          </table:table-cell>
          <table:table-cell table:number-columns-repeated="4"/>
        </table:table-row>
        <table:table-row table:style-name="ro1">
          <table:table-cell office:value-type="float" office:value="686.102111816406">
            <text:p>686.1021118164</text:p>
          </table:table-cell>
          <table:table-cell office:value-type="float" office:value="0.004019489">
            <text:p>0.004019489</text:p>
          </table:table-cell>
          <table:table-cell table:number-columns-repeated="4"/>
        </table:table-row>
        <table:table-row table:style-name="ro1">
          <table:table-cell office:value-type="float" office:value="686.22216796875">
            <text:p>686.2221679688</text:p>
          </table:table-cell>
          <table:table-cell office:value-type="float" office:value="-0.005229104">
            <text:p>-0.005229104</text:p>
          </table:table-cell>
          <table:table-cell table:number-columns-repeated="4"/>
        </table:table-row>
        <table:table-row table:style-name="ro1">
          <table:table-cell office:value-type="float" office:value="686.342163085938">
            <text:p>686.3421630859</text:p>
          </table:table-cell>
          <table:table-cell office:value-type="float" office:value="-0.003179198">
            <text:p>-0.003179198</text:p>
          </table:table-cell>
          <table:table-cell table:number-columns-repeated="4"/>
        </table:table-row>
        <table:table-row table:style-name="ro1">
          <table:table-cell office:value-type="float" office:value="686.462219238281">
            <text:p>686.4622192383</text:p>
          </table:table-cell>
          <table:table-cell office:value-type="float" office:value="0.004328476">
            <text:p>0.004328476</text:p>
          </table:table-cell>
          <table:table-cell table:number-columns-repeated="4"/>
        </table:table-row>
        <table:table-row table:style-name="ro1">
          <table:table-cell office:value-type="float" office:value="686.582275390625">
            <text:p>686.5822753906</text:p>
          </table:table-cell>
          <table:table-cell office:value-type="float" office:value="0.001801757">
            <text:p>0.001801757</text:p>
          </table:table-cell>
          <table:table-cell table:number-columns-repeated="4"/>
        </table:table-row>
        <table:table-row table:style-name="ro1">
          <table:table-cell office:value-type="float" office:value="686.702331542969">
            <text:p>686.702331543</text:p>
          </table:table-cell>
          <table:table-cell office:value-type="float" office:value="0.004342285">
            <text:p>0.004342285</text:p>
          </table:table-cell>
          <table:table-cell table:number-columns-repeated="4"/>
        </table:table-row>
        <table:table-row table:style-name="ro1">
          <table:table-cell office:value-type="float" office:value="686.822387695313">
            <text:p>686.8223876953</text:p>
          </table:table-cell>
          <table:table-cell office:value-type="float" office:value="0.0003360269">
            <text:p>0.0003360269</text:p>
          </table:table-cell>
          <table:table-cell table:number-columns-repeated="4"/>
        </table:table-row>
        <table:table-row table:style-name="ro1">
          <table:table-cell office:value-type="float" office:value="686.9423828125">
            <text:p>686.9423828125</text:p>
          </table:table-cell>
          <table:table-cell office:value-type="float" office:value="0.008573077">
            <text:p>0.008573077</text:p>
          </table:table-cell>
          <table:table-cell table:number-columns-repeated="4"/>
        </table:table-row>
        <table:table-row table:style-name="ro1">
          <table:table-cell office:value-type="float" office:value="687.062438964844">
            <text:p>687.0624389648</text:p>
          </table:table-cell>
          <table:table-cell office:value-type="float" office:value="0.004285051">
            <text:p>0.004285051</text:p>
          </table:table-cell>
          <table:table-cell table:number-columns-repeated="4"/>
        </table:table-row>
        <table:table-row table:style-name="ro1">
          <table:table-cell office:value-type="float" office:value="687.182495117188">
            <text:p>687.1824951172</text:p>
          </table:table-cell>
          <table:table-cell office:value-type="float" office:value="-0.007280493">
            <text:p>-0.007280493</text:p>
          </table:table-cell>
          <table:table-cell table:number-columns-repeated="4"/>
        </table:table-row>
        <table:table-row table:style-name="ro1">
          <table:table-cell office:value-type="float" office:value="687.302551269531">
            <text:p>687.3025512695</text:p>
          </table:table-cell>
          <table:table-cell office:value-type="float" office:value="0.003488386">
            <text:p>0.003488386</text:p>
          </table:table-cell>
          <table:table-cell table:number-columns-repeated="4"/>
        </table:table-row>
        <table:table-row table:style-name="ro1">
          <table:table-cell office:value-type="float" office:value="687.422607421875">
            <text:p>687.4226074219</text:p>
          </table:table-cell>
          <table:table-cell office:value-type="float" office:value="-0.003696491">
            <text:p>-0.003696491</text:p>
          </table:table-cell>
          <table:table-cell table:number-columns-repeated="4"/>
        </table:table-row>
        <table:table-row table:style-name="ro1">
          <table:table-cell office:value-type="float" office:value="687.542663574219">
            <text:p>687.5426635742</text:p>
          </table:table-cell>
          <table:table-cell office:value-type="float" office:value="-0.005658252">
            <text:p>-0.005658252</text:p>
          </table:table-cell>
          <table:table-cell table:number-columns-repeated="4"/>
        </table:table-row>
        <table:table-row table:style-name="ro1">
          <table:table-cell office:value-type="float" office:value="687.662719726563">
            <text:p>687.6627197266</text:p>
          </table:table-cell>
          <table:table-cell office:value-type="float" office:value="0.01194905">
            <text:p>0.01194905</text:p>
          </table:table-cell>
          <table:table-cell table:number-columns-repeated="4"/>
        </table:table-row>
        <table:table-row table:style-name="ro1">
          <table:table-cell office:value-type="float" office:value="687.782775878906">
            <text:p>687.7827758789</text:p>
          </table:table-cell>
          <table:table-cell office:value-type="float" office:value="0.00091668">
            <text:p>0.00091668</text:p>
          </table:table-cell>
          <table:table-cell table:number-columns-repeated="4"/>
        </table:table-row>
        <table:table-row table:style-name="ro1">
          <table:table-cell office:value-type="float" office:value="687.90283203125">
            <text:p>687.9028320313</text:p>
          </table:table-cell>
          <table:table-cell office:value-type="float" office:value="0.008454965">
            <text:p>0.008454965</text:p>
          </table:table-cell>
          <table:table-cell table:number-columns-repeated="4"/>
        </table:table-row>
        <table:table-row table:style-name="ro1">
          <table:table-cell office:value-type="float" office:value="688.022888183594">
            <text:p>688.0228881836</text:p>
          </table:table-cell>
          <table:table-cell office:value-type="float" office:value="0.01037645">
            <text:p>0.01037645</text:p>
          </table:table-cell>
          <table:table-cell table:number-columns-repeated="4"/>
        </table:table-row>
        <table:table-row table:style-name="ro1">
          <table:table-cell office:value-type="float" office:value="688.142944335938">
            <text:p>688.1429443359</text:p>
          </table:table-cell>
          <table:table-cell office:value-type="float" office:value="0.005756063">
            <text:p>0.005756063</text:p>
          </table:table-cell>
          <table:table-cell table:number-columns-repeated="4"/>
        </table:table-row>
        <table:table-row table:style-name="ro1">
          <table:table-cell office:value-type="float" office:value="688.263000488281">
            <text:p>688.2630004883</text:p>
          </table:table-cell>
          <table:table-cell office:value-type="float" office:value="-0.00253948">
            <text:p>-0.00253948</text:p>
          </table:table-cell>
          <table:table-cell table:number-columns-repeated="4"/>
        </table:table-row>
        <table:table-row table:style-name="ro1">
          <table:table-cell office:value-type="float" office:value="688.383056640625">
            <text:p>688.3830566406</text:p>
          </table:table-cell>
          <table:table-cell office:value-type="float" office:value="0.0002093969">
            <text:p>0.0002093969</text:p>
          </table:table-cell>
          <table:table-cell table:number-columns-repeated="4"/>
        </table:table-row>
        <table:table-row table:style-name="ro1">
          <table:table-cell office:value-type="float" office:value="688.503112792969">
            <text:p>688.503112793</text:p>
          </table:table-cell>
          <table:table-cell office:value-type="float" office:value="-0.002166731">
            <text:p>-0.002166731</text:p>
          </table:table-cell>
          <table:table-cell table:number-columns-repeated="4"/>
        </table:table-row>
        <table:table-row table:style-name="ro1">
          <table:table-cell office:value-type="float" office:value="688.623168945313">
            <text:p>688.6231689453</text:p>
          </table:table-cell>
          <table:table-cell office:value-type="float" office:value="-0.003954595">
            <text:p>-0.003954595</text:p>
          </table:table-cell>
          <table:table-cell table:number-columns-repeated="4"/>
        </table:table-row>
        <table:table-row table:style-name="ro1">
          <table:table-cell office:value-type="float" office:value="688.743225097656">
            <text:p>688.7432250977</text:p>
          </table:table-cell>
          <table:table-cell office:value-type="float" office:value="-0.001353218">
            <text:p>-0.001353218</text:p>
          </table:table-cell>
          <table:table-cell table:number-columns-repeated="4"/>
        </table:table-row>
        <table:table-row table:style-name="ro1">
          <table:table-cell office:value-type="float" office:value="688.86328125">
            <text:p>688.86328125</text:p>
          </table:table-cell>
          <table:table-cell office:value-type="float" office:value="-0.0003458851">
            <text:p>-0.0003458851</text:p>
          </table:table-cell>
          <table:table-cell table:number-columns-repeated="4"/>
        </table:table-row>
        <table:table-row table:style-name="ro1">
          <table:table-cell office:value-type="float" office:value="688.983337402344">
            <text:p>688.9833374023</text:p>
          </table:table-cell>
          <table:table-cell office:value-type="float" office:value="-0.000956578">
            <text:p>-0.000956578</text:p>
          </table:table-cell>
          <table:table-cell table:number-columns-repeated="4"/>
        </table:table-row>
        <table:table-row table:style-name="ro1">
          <table:table-cell office:value-type="float" office:value="689.103393554688">
            <text:p>689.1033935547</text:p>
          </table:table-cell>
          <table:table-cell office:value-type="float" office:value="0.00169808">
            <text:p>0.00169808</text:p>
          </table:table-cell>
          <table:table-cell table:number-columns-repeated="4"/>
        </table:table-row>
        <table:table-row table:style-name="ro1">
          <table:table-cell office:value-type="float" office:value="689.223449707031">
            <text:p>689.223449707</text:p>
          </table:table-cell>
          <table:table-cell office:value-type="float" office:value="0.001140216">
            <text:p>0.001140216</text:p>
          </table:table-cell>
          <table:table-cell table:number-columns-repeated="4"/>
        </table:table-row>
        <table:table-row table:style-name="ro1">
          <table:table-cell office:value-type="float" office:value="689.343505859375">
            <text:p>689.3435058594</text:p>
          </table:table-cell>
          <table:table-cell office:value-type="float" office:value="0.01614746">
            <text:p>0.01614746</text:p>
          </table:table-cell>
          <table:table-cell table:number-columns-repeated="4"/>
        </table:table-row>
        <table:table-row table:style-name="ro1">
          <table:table-cell office:value-type="float" office:value="689.463562011719">
            <text:p>689.4635620117</text:p>
          </table:table-cell>
          <table:table-cell office:value-type="float" office:value="0.004763298">
            <text:p>0.004763298</text:p>
          </table:table-cell>
          <table:table-cell table:number-columns-repeated="4"/>
        </table:table-row>
        <table:table-row table:style-name="ro1">
          <table:table-cell office:value-type="float" office:value="689.583679199219">
            <text:p>689.5836791992</text:p>
          </table:table-cell>
          <table:table-cell office:value-type="float" office:value="0.005569009">
            <text:p>0.005569009</text:p>
          </table:table-cell>
          <table:table-cell table:number-columns-repeated="4"/>
        </table:table-row>
        <table:table-row table:style-name="ro1">
          <table:table-cell office:value-type="float" office:value="689.703735351563">
            <text:p>689.7037353516</text:p>
          </table:table-cell>
          <table:table-cell office:value-type="float" office:value="0.006046859">
            <text:p>0.006046859</text:p>
          </table:table-cell>
          <table:table-cell table:number-columns-repeated="4"/>
        </table:table-row>
        <table:table-row table:style-name="ro1">
          <table:table-cell office:value-type="float" office:value="689.823791503906">
            <text:p>689.8237915039</text:p>
          </table:table-cell>
          <table:table-cell office:value-type="float" office:value="-0.001899254">
            <text:p>-0.001899254</text:p>
          </table:table-cell>
          <table:table-cell table:number-columns-repeated="4"/>
        </table:table-row>
        <table:table-row table:style-name="ro1">
          <table:table-cell office:value-type="float" office:value="689.94384765625">
            <text:p>689.9438476563</text:p>
          </table:table-cell>
          <table:table-cell office:value-type="float" office:value="-0.002234617">
            <text:p>-0.002234617</text:p>
          </table:table-cell>
          <table:table-cell table:number-columns-repeated="4"/>
        </table:table-row>
        <table:table-row table:style-name="ro1">
          <table:table-cell office:value-type="float" office:value="690.063903808594">
            <text:p>690.0639038086</text:p>
          </table:table-cell>
          <table:table-cell office:value-type="float" office:value="0.005246366">
            <text:p>0.005246366</text:p>
          </table:table-cell>
          <table:table-cell table:number-columns-repeated="4"/>
        </table:table-row>
        <table:table-row table:style-name="ro1">
          <table:table-cell office:value-type="float" office:value="690.184020996094">
            <text:p>690.1840209961</text:p>
          </table:table-cell>
          <table:table-cell office:value-type="float" office:value="0.00315873">
            <text:p>0.00315873</text:p>
          </table:table-cell>
          <table:table-cell table:number-columns-repeated="4"/>
        </table:table-row>
        <table:table-row table:style-name="ro1">
          <table:table-cell office:value-type="float" office:value="690.304077148438">
            <text:p>690.3040771484</text:p>
          </table:table-cell>
          <table:table-cell office:value-type="float" office:value="0.001318529">
            <text:p>0.001318529</text:p>
          </table:table-cell>
          <table:table-cell table:number-columns-repeated="4"/>
        </table:table-row>
        <table:table-row table:style-name="ro1">
          <table:table-cell office:value-type="float" office:value="690.424133300781">
            <text:p>690.4241333008</text:p>
          </table:table-cell>
          <table:table-cell office:value-type="float" office:value="0.004518697">
            <text:p>0.004518697</text:p>
          </table:table-cell>
          <table:table-cell table:number-columns-repeated="4"/>
        </table:table-row>
        <table:table-row table:style-name="ro1">
          <table:table-cell office:value-type="float" office:value="690.544189453125">
            <text:p>690.5441894531</text:p>
          </table:table-cell>
          <table:table-cell office:value-type="float" office:value="0.0218101">
            <text:p>0.0218101</text:p>
          </table:table-cell>
          <table:table-cell table:number-columns-repeated="4"/>
        </table:table-row>
        <table:table-row table:style-name="ro1">
          <table:table-cell office:value-type="float" office:value="690.664306640625">
            <text:p>690.6643066406</text:p>
          </table:table-cell>
          <table:table-cell office:value-type="float" office:value="-0.004164147">
            <text:p>-0.004164147</text:p>
          </table:table-cell>
          <table:table-cell table:number-columns-repeated="4"/>
        </table:table-row>
        <table:table-row table:style-name="ro1">
          <table:table-cell office:value-type="float" office:value="690.784362792969">
            <text:p>690.784362793</text:p>
          </table:table-cell>
          <table:table-cell office:value-type="float" office:value="0.002341973">
            <text:p>0.002341973</text:p>
          </table:table-cell>
          <table:table-cell table:number-columns-repeated="4"/>
        </table:table-row>
        <table:table-row table:style-name="ro1">
          <table:table-cell office:value-type="float" office:value="690.904418945313">
            <text:p>690.9044189453</text:p>
          </table:table-cell>
          <table:table-cell office:value-type="float" office:value="0.03745471">
            <text:p>0.03745471</text:p>
          </table:table-cell>
          <table:table-cell table:number-columns-repeated="4"/>
        </table:table-row>
        <table:table-row table:style-name="ro1">
          <table:table-cell office:value-type="float" office:value="691.024475097656">
            <text:p>691.0244750977</text:p>
          </table:table-cell>
          <table:table-cell office:value-type="float" office:value="0.004983947">
            <text:p>0.004983947</text:p>
          </table:table-cell>
          <table:table-cell table:number-columns-repeated="4"/>
        </table:table-row>
        <table:table-row table:style-name="ro1">
          <table:table-cell office:value-type="float" office:value="691.144592285156">
            <text:p>691.1445922852</text:p>
          </table:table-cell>
          <table:table-cell office:value-type="float" office:value="0.004510344">
            <text:p>0.004510344</text:p>
          </table:table-cell>
          <table:table-cell table:number-columns-repeated="4"/>
        </table:table-row>
        <table:table-row table:style-name="ro1">
          <table:table-cell office:value-type="float" office:value="691.2646484375">
            <text:p>691.2646484375</text:p>
          </table:table-cell>
          <table:table-cell office:value-type="float" office:value="-0.0001104769">
            <text:p>-0.0001104769</text:p>
          </table:table-cell>
          <table:table-cell table:number-columns-repeated="4"/>
        </table:table-row>
        <table:table-row table:style-name="ro1">
          <table:table-cell office:value-type="float" office:value="691.384765625">
            <text:p>691.384765625</text:p>
          </table:table-cell>
          <table:table-cell office:value-type="float" office:value="0.01303546">
            <text:p>0.01303546</text:p>
          </table:table-cell>
          <table:table-cell table:number-columns-repeated="4"/>
        </table:table-row>
        <table:table-row table:style-name="ro1">
          <table:table-cell office:value-type="float" office:value="691.504821777344">
            <text:p>691.5048217773</text:p>
          </table:table-cell>
          <table:table-cell office:value-type="float" office:value="0.003069615">
            <text:p>0.003069615</text:p>
          </table:table-cell>
          <table:table-cell table:number-columns-repeated="4"/>
        </table:table-row>
        <table:table-row table:style-name="ro1">
          <table:table-cell office:value-type="float" office:value="691.624877929688">
            <text:p>691.6248779297</text:p>
          </table:table-cell>
          <table:table-cell office:value-type="float" office:value="-0.006893045">
            <text:p>-0.006893045</text:p>
          </table:table-cell>
          <table:table-cell table:number-columns-repeated="4"/>
        </table:table-row>
        <table:table-row table:style-name="ro1">
          <table:table-cell office:value-type="float" office:value="691.744995117188">
            <text:p>691.7449951172</text:p>
          </table:table-cell>
          <table:table-cell office:value-type="float" office:value="0.01058678">
            <text:p>0.01058678</text:p>
          </table:table-cell>
          <table:table-cell table:number-columns-repeated="4"/>
        </table:table-row>
        <table:table-row table:style-name="ro1">
          <table:table-cell office:value-type="float" office:value="691.865051269531">
            <text:p>691.8650512695</text:p>
          </table:table-cell>
          <table:table-cell office:value-type="float" office:value="-0.004681329">
            <text:p>-0.004681329</text:p>
          </table:table-cell>
          <table:table-cell table:number-columns-repeated="4"/>
        </table:table-row>
        <table:table-row table:style-name="ro1">
          <table:table-cell office:value-type="float" office:value="691.985168457031">
            <text:p>691.985168457</text:p>
          </table:table-cell>
          <table:table-cell office:value-type="float" office:value="-0.002712006">
            <text:p>-0.002712006</text:p>
          </table:table-cell>
          <table:table-cell table:number-columns-repeated="4"/>
        </table:table-row>
        <table:table-row table:style-name="ro1">
          <table:table-cell office:value-type="float" office:value="692.105224609375">
            <text:p>692.1052246094</text:p>
          </table:table-cell>
          <table:table-cell office:value-type="float" office:value="0.009349429">
            <text:p>0.009349429</text:p>
          </table:table-cell>
          <table:table-cell table:number-columns-repeated="4"/>
        </table:table-row>
        <table:table-row table:style-name="ro1">
          <table:table-cell office:value-type="float" office:value="692.225280761719">
            <text:p>692.2252807617</text:p>
          </table:table-cell>
          <table:table-cell office:value-type="float" office:value="0.004667558">
            <text:p>0.004667558</text:p>
          </table:table-cell>
          <table:table-cell table:number-columns-repeated="4"/>
        </table:table-row>
        <table:table-row table:style-name="ro1">
          <table:table-cell office:value-type="float" office:value="692.345397949219">
            <text:p>692.3453979492</text:p>
          </table:table-cell>
          <table:table-cell office:value-type="float" office:value="0.01324624">
            <text:p>0.01324624</text:p>
          </table:table-cell>
          <table:table-cell table:number-columns-repeated="4"/>
        </table:table-row>
        <table:table-row table:style-name="ro1">
          <table:table-cell office:value-type="float" office:value="692.465454101563">
            <text:p>692.4654541016</text:p>
          </table:table-cell>
          <table:table-cell office:value-type="float" office:value="0.005444951">
            <text:p>0.005444951</text:p>
          </table:table-cell>
          <table:table-cell table:number-columns-repeated="4"/>
        </table:table-row>
        <table:table-row table:style-name="ro1">
          <table:table-cell office:value-type="float" office:value="692.585571289063">
            <text:p>692.5855712891</text:p>
          </table:table-cell>
          <table:table-cell office:value-type="float" office:value="0.007554704">
            <text:p>0.007554704</text:p>
          </table:table-cell>
          <table:table-cell table:number-columns-repeated="4"/>
        </table:table-row>
        <table:table-row table:style-name="ro1">
          <table:table-cell office:value-type="float" office:value="692.705627441406">
            <text:p>692.7056274414</text:p>
          </table:table-cell>
          <table:table-cell office:value-type="float" office:value="0.001307111">
            <text:p>0.001307111</text:p>
          </table:table-cell>
          <table:table-cell table:number-columns-repeated="4"/>
        </table:table-row>
        <table:table-row table:style-name="ro1">
          <table:table-cell office:value-type="float" office:value="692.825744628906">
            <text:p>692.8257446289</text:p>
          </table:table-cell>
          <table:table-cell office:value-type="float" office:value="0.003091995">
            <text:p>0.003091995</text:p>
          </table:table-cell>
          <table:table-cell table:number-columns-repeated="4"/>
        </table:table-row>
        <table:table-row table:style-name="ro1">
          <table:table-cell office:value-type="float" office:value="692.94580078125">
            <text:p>692.9458007813</text:p>
          </table:table-cell>
          <table:table-cell office:value-type="float" office:value="0.001876509">
            <text:p>0.001876509</text:p>
          </table:table-cell>
          <table:table-cell table:number-columns-repeated="4"/>
        </table:table-row>
        <table:table-row table:style-name="ro1">
          <table:table-cell office:value-type="float" office:value="693.06591796875">
            <text:p>693.0659179688</text:p>
          </table:table-cell>
          <table:table-cell office:value-type="float" office:value="0.002096711">
            <text:p>0.002096711</text:p>
          </table:table-cell>
          <table:table-cell table:number-columns-repeated="4"/>
        </table:table-row>
        <table:table-row table:style-name="ro1">
          <table:table-cell office:value-type="float" office:value="693.18603515625">
            <text:p>693.1860351563</text:p>
          </table:table-cell>
          <table:table-cell office:value-type="float" office:value="-0.005838369">
            <text:p>-0.005838369</text:p>
          </table:table-cell>
          <table:table-cell table:number-columns-repeated="4"/>
        </table:table-row>
        <table:table-row table:style-name="ro1">
          <table:table-cell office:value-type="float" office:value="693.306091308594">
            <text:p>693.3060913086</text:p>
          </table:table-cell>
          <table:table-cell office:value-type="float" office:value="-0.002829848">
            <text:p>-0.002829848</text:p>
          </table:table-cell>
          <table:table-cell table:number-columns-repeated="4"/>
        </table:table-row>
        <table:table-row table:style-name="ro1">
          <table:table-cell office:value-type="float" office:value="693.426208496094">
            <text:p>693.4262084961</text:p>
          </table:table-cell>
          <table:table-cell office:value-type="float" office:value="-0.009438802">
            <text:p>-0.009438802</text:p>
          </table:table-cell>
          <table:table-cell table:number-columns-repeated="4"/>
        </table:table-row>
        <table:table-row table:style-name="ro1">
          <table:table-cell office:value-type="float" office:value="693.546264648438">
            <text:p>693.5462646484</text:p>
          </table:table-cell>
          <table:table-cell office:value-type="float" office:value="0.000740786">
            <text:p>0.000740786</text:p>
          </table:table-cell>
          <table:table-cell table:number-columns-repeated="4"/>
        </table:table-row>
        <table:table-row table:style-name="ro1">
          <table:table-cell office:value-type="float" office:value="693.666381835938">
            <text:p>693.6663818359</text:p>
          </table:table-cell>
          <table:table-cell office:value-type="float" office:value="-0.003020369">
            <text:p>-0.003020369</text:p>
          </table:table-cell>
          <table:table-cell table:number-columns-repeated="4"/>
        </table:table-row>
        <table:table-row table:style-name="ro1">
          <table:table-cell office:value-type="float" office:value="693.786499023438">
            <text:p>693.7864990234</text:p>
          </table:table-cell>
          <table:table-cell office:value-type="float" office:value="0.01232532">
            <text:p>0.01232532</text:p>
          </table:table-cell>
          <table:table-cell table:number-columns-repeated="4"/>
        </table:table-row>
        <table:table-row table:style-name="ro1">
          <table:table-cell office:value-type="float" office:value="693.906555175781">
            <text:p>693.9065551758</text:p>
          </table:table-cell>
          <table:table-cell office:value-type="float" office:value="-0.004899348">
            <text:p>-0.004899348</text:p>
          </table:table-cell>
          <table:table-cell table:number-columns-repeated="4"/>
        </table:table-row>
        <table:table-row table:style-name="ro1">
          <table:table-cell office:value-type="float" office:value="694.026672363281">
            <text:p>694.0266723633</text:p>
          </table:table-cell>
          <table:table-cell office:value-type="float" office:value="-0.0001764246">
            <text:p>-0.0001764246</text:p>
          </table:table-cell>
          <table:table-cell table:number-columns-repeated="4"/>
        </table:table-row>
        <table:table-row table:style-name="ro1">
          <table:table-cell office:value-type="float" office:value="694.146728515625">
            <text:p>694.1467285156</text:p>
          </table:table-cell>
          <table:table-cell office:value-type="string">
            <text:p>2.521755E-05</text:p>
          </table:table-cell>
          <table:table-cell table:number-columns-repeated="4"/>
        </table:table-row>
        <table:table-row table:style-name="ro1">
          <table:table-cell office:value-type="float" office:value="694.266845703125">
            <text:p>694.2668457031</text:p>
          </table:table-cell>
          <table:table-cell office:value-type="float" office:value="0.0002561336">
            <text:p>0.0002561336</text:p>
          </table:table-cell>
          <table:table-cell table:number-columns-repeated="4"/>
        </table:table-row>
        <table:table-row table:style-name="ro1">
          <table:table-cell office:value-type="float" office:value="694.386962890625">
            <text:p>694.3869628906</text:p>
          </table:table-cell>
          <table:table-cell office:value-type="float" office:value="0.0009278459">
            <text:p>0.0009278459</text:p>
          </table:table-cell>
          <table:table-cell table:number-columns-repeated="4"/>
        </table:table-row>
        <table:table-row table:style-name="ro1">
          <table:table-cell office:value-type="float" office:value="694.507080078125">
            <text:p>694.5070800781</text:p>
          </table:table-cell>
          <table:table-cell office:value-type="float" office:value="0.008532641">
            <text:p>0.008532641</text:p>
          </table:table-cell>
          <table:table-cell table:number-columns-repeated="4"/>
        </table:table-row>
        <table:table-row table:style-name="ro1">
          <table:table-cell office:value-type="float" office:value="694.627136230469">
            <text:p>694.6271362305</text:p>
          </table:table-cell>
          <table:table-cell office:value-type="float" office:value="0.0002347691">
            <text:p>0.0002347691</text:p>
          </table:table-cell>
          <table:table-cell table:number-columns-repeated="4"/>
        </table:table-row>
        <table:table-row table:style-name="ro1">
          <table:table-cell office:value-type="float" office:value="694.747253417969">
            <text:p>694.747253418</text:p>
          </table:table-cell>
          <table:table-cell office:value-type="float" office:value="-0.002203794">
            <text:p>-0.002203794</text:p>
          </table:table-cell>
          <table:table-cell table:number-columns-repeated="4"/>
        </table:table-row>
        <table:table-row table:style-name="ro1">
          <table:table-cell office:value-type="float" office:value="694.867370605469">
            <text:p>694.8673706055</text:p>
          </table:table-cell>
          <table:table-cell office:value-type="float" office:value="-0.0069849">
            <text:p>-0.0069849</text:p>
          </table:table-cell>
          <table:table-cell table:number-columns-repeated="4"/>
        </table:table-row>
        <table:table-row table:style-name="ro1">
          <table:table-cell office:value-type="float" office:value="694.987426757813">
            <text:p>694.9874267578</text:p>
          </table:table-cell>
          <table:table-cell office:value-type="float" office:value="0.0002985437">
            <text:p>0.0002985437</text:p>
          </table:table-cell>
          <table:table-cell table:number-columns-repeated="4"/>
        </table:table-row>
        <table:table-row table:style-name="ro1">
          <table:table-cell office:value-type="float" office:value="695.107543945313">
            <text:p>695.1075439453</text:p>
          </table:table-cell>
          <table:table-cell office:value-type="float" office:value="0.002713681">
            <text:p>0.002713681</text:p>
          </table:table-cell>
          <table:table-cell table:number-columns-repeated="4"/>
        </table:table-row>
        <table:table-row table:style-name="ro1">
          <table:table-cell office:value-type="float" office:value="695.227661132813">
            <text:p>695.2276611328</text:p>
          </table:table-cell>
          <table:table-cell office:value-type="float" office:value="0.004859427">
            <text:p>0.004859427</text:p>
          </table:table-cell>
          <table:table-cell table:number-columns-repeated="4"/>
        </table:table-row>
        <table:table-row table:style-name="ro1">
          <table:table-cell office:value-type="float" office:value="695.347778320313">
            <text:p>695.3477783203</text:p>
          </table:table-cell>
          <table:table-cell office:value-type="float" office:value="-0.004344501">
            <text:p>-0.004344501</text:p>
          </table:table-cell>
          <table:table-cell table:number-columns-repeated="4"/>
        </table:table-row>
        <table:table-row table:style-name="ro1">
          <table:table-cell office:value-type="float" office:value="695.467895507813">
            <text:p>695.4678955078</text:p>
          </table:table-cell>
          <table:table-cell office:value-type="float" office:value="-0.006501374">
            <text:p>-0.006501374</text:p>
          </table:table-cell>
          <table:table-cell table:number-columns-repeated="4"/>
        </table:table-row>
        <table:table-row table:style-name="ro1">
          <table:table-cell office:value-type="float" office:value="695.587951660156">
            <text:p>695.5879516602</text:p>
          </table:table-cell>
          <table:table-cell office:value-type="float" office:value="0.01053507">
            <text:p>0.01053507</text:p>
          </table:table-cell>
          <table:table-cell table:number-columns-repeated="4"/>
        </table:table-row>
        <table:table-row table:style-name="ro1">
          <table:table-cell office:value-type="float" office:value="695.708068847656">
            <text:p>695.7080688477</text:p>
          </table:table-cell>
          <table:table-cell office:value-type="float" office:value="0.003974378">
            <text:p>0.003974378</text:p>
          </table:table-cell>
          <table:table-cell table:number-columns-repeated="4"/>
        </table:table-row>
        <table:table-row table:style-name="ro1">
          <table:table-cell office:value-type="float" office:value="695.828186035156">
            <text:p>695.8281860352</text:p>
          </table:table-cell>
          <table:table-cell office:value-type="float" office:value="-0.001248816">
            <text:p>-0.001248816</text:p>
          </table:table-cell>
          <table:table-cell table:number-columns-repeated="4"/>
        </table:table-row>
        <table:table-row table:style-name="ro1">
          <table:table-cell office:value-type="float" office:value="695.948303222656">
            <text:p>695.9483032227</text:p>
          </table:table-cell>
          <table:table-cell office:value-type="float" office:value="-0.000394358">
            <text:p>-0.000394358</text:p>
          </table:table-cell>
          <table:table-cell table:number-columns-repeated="4"/>
        </table:table-row>
        <table:table-row table:style-name="ro1">
          <table:table-cell office:value-type="float" office:value="696.068420410156">
            <text:p>696.0684204102</text:p>
          </table:table-cell>
          <table:table-cell office:value-type="float" office:value="-0.004531199">
            <text:p>-0.004531199</text:p>
          </table:table-cell>
          <table:table-cell table:number-columns-repeated="4"/>
        </table:table-row>
        <table:table-row table:style-name="ro1">
          <table:table-cell office:value-type="float" office:value="696.188537597656">
            <text:p>696.1885375977</text:p>
          </table:table-cell>
          <table:table-cell office:value-type="float" office:value="0.0241898">
            <text:p>0.0241898</text:p>
          </table:table-cell>
          <table:table-cell table:number-columns-repeated="4"/>
        </table:table-row>
        <table:table-row table:style-name="ro1">
          <table:table-cell office:value-type="float" office:value="696.308654785156">
            <text:p>696.3086547852</text:p>
          </table:table-cell>
          <table:table-cell office:value-type="float" office:value="-0.006743354">
            <text:p>-0.006743354</text:p>
          </table:table-cell>
          <table:table-cell table:number-columns-repeated="4"/>
        </table:table-row>
        <table:table-row table:style-name="ro1">
          <table:table-cell office:value-type="float" office:value="696.428771972656">
            <text:p>696.4287719727</text:p>
          </table:table-cell>
          <table:table-cell office:value-type="float" office:value="0.0138051">
            <text:p>0.0138051</text:p>
          </table:table-cell>
          <table:table-cell table:number-columns-repeated="4"/>
        </table:table-row>
        <table:table-row table:style-name="ro1">
          <table:table-cell office:value-type="float" office:value="696.548828125">
            <text:p>696.548828125</text:p>
          </table:table-cell>
          <table:table-cell office:value-type="float" office:value="-0.004362534">
            <text:p>-0.004362534</text:p>
          </table:table-cell>
          <table:table-cell table:number-columns-repeated="4"/>
        </table:table-row>
        <table:table-row table:style-name="ro1">
          <table:table-cell office:value-type="float" office:value="696.6689453125">
            <text:p>696.6689453125</text:p>
          </table:table-cell>
          <table:table-cell office:value-type="float" office:value="-0.004018549">
            <text:p>-0.004018549</text:p>
          </table:table-cell>
          <table:table-cell table:number-columns-repeated="4"/>
        </table:table-row>
        <table:table-row table:style-name="ro1">
          <table:table-cell office:value-type="float" office:value="696.7890625">
            <text:p>696.7890625</text:p>
          </table:table-cell>
          <table:table-cell office:value-type="float" office:value="-0.006847553">
            <text:p>-0.006847553</text:p>
          </table:table-cell>
          <table:table-cell table:number-columns-repeated="4"/>
        </table:table-row>
        <table:table-row table:style-name="ro1">
          <table:table-cell office:value-type="float" office:value="696.9091796875">
            <text:p>696.9091796875</text:p>
          </table:table-cell>
          <table:table-cell office:value-type="float" office:value="-0.005607991">
            <text:p>-0.005607991</text:p>
          </table:table-cell>
          <table:table-cell table:number-columns-repeated="4"/>
        </table:table-row>
        <table:table-row table:style-name="ro1">
          <table:table-cell office:value-type="float" office:value="697.029296875">
            <text:p>697.029296875</text:p>
          </table:table-cell>
          <table:table-cell office:value-type="float" office:value="-0.009159983">
            <text:p>-0.009159983</text:p>
          </table:table-cell>
          <table:table-cell table:number-columns-repeated="4"/>
        </table:table-row>
        <table:table-row table:style-name="ro1">
          <table:table-cell office:value-type="float" office:value="697.1494140625">
            <text:p>697.1494140625</text:p>
          </table:table-cell>
          <table:table-cell office:value-type="float" office:value="0.009102445">
            <text:p>0.009102445</text:p>
          </table:table-cell>
          <table:table-cell table:number-columns-repeated="4"/>
        </table:table-row>
        <table:table-row table:style-name="ro1">
          <table:table-cell office:value-type="float" office:value="697.26953125">
            <text:p>697.26953125</text:p>
          </table:table-cell>
          <table:table-cell office:value-type="float" office:value="0.005222397">
            <text:p>0.005222397</text:p>
          </table:table-cell>
          <table:table-cell table:number-columns-repeated="4"/>
        </table:table-row>
        <table:table-row table:style-name="ro1">
          <table:table-cell office:value-type="float" office:value="697.3896484375">
            <text:p>697.3896484375</text:p>
          </table:table-cell>
          <table:table-cell office:value-type="float" office:value="-0.005399513">
            <text:p>-0.005399513</text:p>
          </table:table-cell>
          <table:table-cell table:number-columns-repeated="4"/>
        </table:table-row>
        <table:table-row table:style-name="ro1">
          <table:table-cell office:value-type="float" office:value="697.509765625">
            <text:p>697.509765625</text:p>
          </table:table-cell>
          <table:table-cell office:value-type="float" office:value="0.002579601">
            <text:p>0.002579601</text:p>
          </table:table-cell>
          <table:table-cell table:number-columns-repeated="4"/>
        </table:table-row>
        <table:table-row table:style-name="ro1">
          <table:table-cell office:value-type="float" office:value="697.6298828125">
            <text:p>697.6298828125</text:p>
          </table:table-cell>
          <table:table-cell office:value-type="float" office:value="-0.00412504">
            <text:p>-0.00412504</text:p>
          </table:table-cell>
          <table:table-cell table:number-columns-repeated="4"/>
        </table:table-row>
        <table:table-row table:style-name="ro1">
          <table:table-cell office:value-type="float" office:value="697.75">
            <text:p>697.75</text:p>
          </table:table-cell>
          <table:table-cell office:value-type="float" office:value="0.02471907">
            <text:p>0.02471907</text:p>
          </table:table-cell>
          <table:table-cell table:number-columns-repeated="4"/>
        </table:table-row>
        <table:table-row table:style-name="ro1">
          <table:table-cell office:value-type="float" office:value="697.8701171875">
            <text:p>697.8701171875</text:p>
          </table:table-cell>
          <table:table-cell office:value-type="float" office:value="0.007165647">
            <text:p>0.007165647</text:p>
          </table:table-cell>
          <table:table-cell table:number-columns-repeated="4"/>
        </table:table-row>
        <table:table-row table:style-name="ro1">
          <table:table-cell office:value-type="float" office:value="697.990234375">
            <text:p>697.990234375</text:p>
          </table:table-cell>
          <table:table-cell office:value-type="float" office:value="0.01433544">
            <text:p>0.01433544</text:p>
          </table:table-cell>
          <table:table-cell table:number-columns-repeated="4"/>
        </table:table-row>
        <table:table-row table:style-name="ro1">
          <table:table-cell office:value-type="float" office:value="698.1103515625">
            <text:p>698.1103515625</text:p>
          </table:table-cell>
          <table:table-cell office:value-type="float" office:value="0.004042541">
            <text:p>0.004042541</text:p>
          </table:table-cell>
          <table:table-cell table:number-columns-repeated="4"/>
        </table:table-row>
        <table:table-row table:style-name="ro1">
          <table:table-cell office:value-type="float" office:value="698.23046875">
            <text:p>698.23046875</text:p>
          </table:table-cell>
          <table:table-cell office:value-type="float" office:value="-0.006065962">
            <text:p>-0.006065962</text:p>
          </table:table-cell>
          <table:table-cell table:number-columns-repeated="4"/>
        </table:table-row>
        <table:table-row table:style-name="ro1">
          <table:table-cell office:value-type="float" office:value="698.350646972656">
            <text:p>698.3506469727</text:p>
          </table:table-cell>
          <table:table-cell office:value-type="float" office:value="-0.0027439">
            <text:p>-0.0027439</text:p>
          </table:table-cell>
          <table:table-cell table:number-columns-repeated="4"/>
        </table:table-row>
        <table:table-row table:style-name="ro1">
          <table:table-cell office:value-type="float" office:value="698.470764160156">
            <text:p>698.4707641602</text:p>
          </table:table-cell>
          <table:table-cell office:value-type="float" office:value="0.004141543">
            <text:p>0.004141543</text:p>
          </table:table-cell>
          <table:table-cell table:number-columns-repeated="4"/>
        </table:table-row>
        <table:table-row table:style-name="ro1">
          <table:table-cell office:value-type="float" office:value="698.590881347656">
            <text:p>698.5908813477</text:p>
          </table:table-cell>
          <table:table-cell office:value-type="float" office:value="0.0035055">
            <text:p>0.0035055</text:p>
          </table:table-cell>
          <table:table-cell table:number-columns-repeated="4"/>
        </table:table-row>
        <table:table-row table:style-name="ro1">
          <table:table-cell office:value-type="float" office:value="698.710998535156">
            <text:p>698.7109985352</text:p>
          </table:table-cell>
          <table:table-cell office:value-type="float" office:value="0.02263065">
            <text:p>0.02263065</text:p>
          </table:table-cell>
          <table:table-cell table:number-columns-repeated="4"/>
        </table:table-row>
        <table:table-row table:style-name="ro1">
          <table:table-cell office:value-type="float" office:value="698.831115722656">
            <text:p>698.8311157227</text:p>
          </table:table-cell>
          <table:table-cell office:value-type="float" office:value="-0.0009444893">
            <text:p>-0.0009444893</text:p>
          </table:table-cell>
          <table:table-cell table:number-columns-repeated="4"/>
        </table:table-row>
        <table:table-row table:style-name="ro1">
          <table:table-cell office:value-type="float" office:value="698.951232910156">
            <text:p>698.9512329102</text:p>
          </table:table-cell>
          <table:table-cell office:value-type="float" office:value="0.001525416">
            <text:p>0.001525416</text:p>
          </table:table-cell>
          <table:table-cell table:number-columns-repeated="4"/>
        </table:table-row>
        <table:table-row table:style-name="ro1">
          <table:table-cell office:value-type="float" office:value="699.071350097656">
            <text:p>699.0713500977</text:p>
          </table:table-cell>
          <table:table-cell office:value-type="float" office:value="0.005235697">
            <text:p>0.005235697</text:p>
          </table:table-cell>
          <table:table-cell table:number-columns-repeated="4"/>
        </table:table-row>
        <table:table-row table:style-name="ro1">
          <table:table-cell office:value-type="float" office:value="699.191528320313">
            <text:p>699.1915283203</text:p>
          </table:table-cell>
          <table:table-cell office:value-type="float" office:value="0.001235506">
            <text:p>0.001235506</text:p>
          </table:table-cell>
          <table:table-cell table:number-columns-repeated="4"/>
        </table:table-row>
        <table:table-row table:style-name="ro1">
          <table:table-cell office:value-type="float" office:value="699.311645507813">
            <text:p>699.3116455078</text:p>
          </table:table-cell>
          <table:table-cell office:value-type="float" office:value="0.002984749">
            <text:p>0.002984749</text:p>
          </table:table-cell>
          <table:table-cell table:number-columns-repeated="4"/>
        </table:table-row>
        <table:table-row table:style-name="ro1">
          <table:table-cell office:value-type="float" office:value="699.431762695313">
            <text:p>699.4317626953</text:p>
          </table:table-cell>
          <table:table-cell office:value-type="float" office:value="0.005215317">
            <text:p>0.005215317</text:p>
          </table:table-cell>
          <table:table-cell table:number-columns-repeated="4"/>
        </table:table-row>
        <table:table-row table:style-name="ro1">
          <table:table-cell office:value-type="float" office:value="699.551879882813">
            <text:p>699.5518798828</text:p>
          </table:table-cell>
          <table:table-cell office:value-type="float" office:value="0.01084225">
            <text:p>0.01084225</text:p>
          </table:table-cell>
          <table:table-cell table:number-columns-repeated="4"/>
        </table:table-row>
        <table:table-row table:style-name="ro1">
          <table:table-cell office:value-type="float" office:value="699.671997070313">
            <text:p>699.6719970703</text:p>
          </table:table-cell>
          <table:table-cell office:value-type="float" office:value="0.0005365605">
            <text:p>0.0005365605</text:p>
          </table:table-cell>
          <table:table-cell table:number-columns-repeated="4"/>
        </table:table-row>
        <table:table-row table:style-name="ro1">
          <table:table-cell office:value-type="float" office:value="699.792175292969">
            <text:p>699.792175293</text:p>
          </table:table-cell>
          <table:table-cell office:value-type="float" office:value="-0.001011965">
            <text:p>-0.001011965</text:p>
          </table:table-cell>
          <table:table-cell table:number-columns-repeated="4"/>
        </table:table-row>
        <table:table-row table:style-name="ro1">
          <table:table-cell office:value-type="float" office:value="699.912292480469">
            <text:p>699.9122924805</text:p>
          </table:table-cell>
          <table:table-cell office:value-type="float" office:value="0.02421843">
            <text:p>0.02421843</text:p>
          </table:table-cell>
          <table:table-cell table:number-columns-repeated="4"/>
        </table:table-row>
        <table:table-row table:style-name="ro1">
          <table:table-cell office:value-type="float" office:value="700.032409667969">
            <text:p>700.032409668</text:p>
          </table:table-cell>
          <table:table-cell office:value-type="float" office:value="0.0110438">
            <text:p>0.0110438</text:p>
          </table:table-cell>
          <table:table-cell table:number-columns-repeated="4"/>
        </table:table-row>
        <table:table-row table:style-name="ro1">
          <table:table-cell office:value-type="float" office:value="700.152526855469">
            <text:p>700.1525268555</text:p>
          </table:table-cell>
          <table:table-cell office:value-type="float" office:value="0.00225486">
            <text:p>0.00225486</text:p>
          </table:table-cell>
          <table:table-cell table:number-columns-repeated="4"/>
        </table:table-row>
        <table:table-row table:style-name="ro1">
          <table:table-cell office:value-type="float" office:value="700.272705078125">
            <text:p>700.2727050781</text:p>
          </table:table-cell>
          <table:table-cell office:value-type="float" office:value="0.0004555792">
            <text:p>0.0004555792</text:p>
          </table:table-cell>
          <table:table-cell table:number-columns-repeated="4"/>
        </table:table-row>
        <table:table-row table:style-name="ro1">
          <table:table-cell office:value-type="float" office:value="700.392822265625">
            <text:p>700.3928222656</text:p>
          </table:table-cell>
          <table:table-cell office:value-type="float" office:value="0.003808799">
            <text:p>0.003808799</text:p>
          </table:table-cell>
          <table:table-cell table:number-columns-repeated="4"/>
        </table:table-row>
        <table:table-row table:style-name="ro1">
          <table:table-cell office:value-type="float" office:value="700.512939453125">
            <text:p>700.5129394531</text:p>
          </table:table-cell>
          <table:table-cell office:value-type="float" office:value="0.01038214">
            <text:p>0.01038214</text:p>
          </table:table-cell>
          <table:table-cell table:number-columns-repeated="4"/>
        </table:table-row>
        <table:table-row table:style-name="ro1">
          <table:table-cell office:value-type="float" office:value="700.633117675781">
            <text:p>700.6331176758</text:p>
          </table:table-cell>
          <table:table-cell office:value-type="float" office:value="0.002219872">
            <text:p>0.002219872</text:p>
          </table:table-cell>
          <table:table-cell table:number-columns-repeated="4"/>
        </table:table-row>
        <table:table-row table:style-name="ro1">
          <table:table-cell office:value-type="float" office:value="700.753234863281">
            <text:p>700.7532348633</text:p>
          </table:table-cell>
          <table:table-cell office:value-type="float" office:value="0.002097554">
            <text:p>0.002097554</text:p>
          </table:table-cell>
          <table:table-cell table:number-columns-repeated="4"/>
        </table:table-row>
        <table:table-row table:style-name="ro1">
          <table:table-cell office:value-type="float" office:value="700.873352050781">
            <text:p>700.8733520508</text:p>
          </table:table-cell>
          <table:table-cell office:value-type="float" office:value="-0.005252187">
            <text:p>-0.005252187</text:p>
          </table:table-cell>
          <table:table-cell table:number-columns-repeated="4"/>
        </table:table-row>
        <table:table-row table:style-name="ro1">
          <table:table-cell office:value-type="float" office:value="700.993530273438">
            <text:p>700.9935302734</text:p>
          </table:table-cell>
          <table:table-cell office:value-type="float" office:value="-0.001646628">
            <text:p>-0.001646628</text:p>
          </table:table-cell>
          <table:table-cell table:number-columns-repeated="4"/>
        </table:table-row>
        <table:table-row table:style-name="ro1">
          <table:table-cell office:value-type="float" office:value="701.113647460938">
            <text:p>701.1136474609</text:p>
          </table:table-cell>
          <table:table-cell office:value-type="float" office:value="0.003984517">
            <text:p>0.003984517</text:p>
          </table:table-cell>
          <table:table-cell table:number-columns-repeated="4"/>
        </table:table-row>
        <table:table-row table:style-name="ro1">
          <table:table-cell office:value-type="float" office:value="701.233764648438">
            <text:p>701.2337646484</text:p>
          </table:table-cell>
          <table:table-cell office:value-type="float" office:value="-0.001940944">
            <text:p>-0.001940944</text:p>
          </table:table-cell>
          <table:table-cell table:number-columns-repeated="4"/>
        </table:table-row>
        <table:table-row table:style-name="ro1">
          <table:table-cell office:value-type="float" office:value="701.353942871094">
            <text:p>701.3539428711</text:p>
          </table:table-cell>
          <table:table-cell office:value-type="float" office:value="0.01494385">
            <text:p>0.01494385</text:p>
          </table:table-cell>
          <table:table-cell table:number-columns-repeated="4"/>
        </table:table-row>
        <table:table-row table:style-name="ro1">
          <table:table-cell office:value-type="float" office:value="701.474060058594">
            <text:p>701.4740600586</text:p>
          </table:table-cell>
          <table:table-cell office:value-type="float" office:value="0.007582305">
            <text:p>0.007582305</text:p>
          </table:table-cell>
          <table:table-cell table:number-columns-repeated="4"/>
        </table:table-row>
        <table:table-row table:style-name="ro1">
          <table:table-cell office:value-type="float" office:value="701.594177246094">
            <text:p>701.5941772461</text:p>
          </table:table-cell>
          <table:table-cell office:value-type="float" office:value="-0.003497323">
            <text:p>-0.003497323</text:p>
          </table:table-cell>
          <table:table-cell table:number-columns-repeated="4"/>
        </table:table-row>
        <table:table-row table:style-name="ro1">
          <table:table-cell office:value-type="float" office:value="701.71435546875">
            <text:p>701.7143554688</text:p>
          </table:table-cell>
          <table:table-cell office:value-type="float" office:value="0.006765828">
            <text:p>0.006765828</text:p>
          </table:table-cell>
          <table:table-cell table:number-columns-repeated="4"/>
        </table:table-row>
        <table:table-row table:style-name="ro1">
          <table:table-cell office:value-type="float" office:value="701.83447265625">
            <text:p>701.8344726563</text:p>
          </table:table-cell>
          <table:table-cell office:value-type="float" office:value="-0.007144732">
            <text:p>-0.007144732</text:p>
          </table:table-cell>
          <table:table-cell table:number-columns-repeated="4"/>
        </table:table-row>
        <table:table-row table:style-name="ro1">
          <table:table-cell office:value-type="float" office:value="701.954650878906">
            <text:p>701.9546508789</text:p>
          </table:table-cell>
          <table:table-cell office:value-type="float" office:value="-0.003336102">
            <text:p>-0.003336102</text:p>
          </table:table-cell>
          <table:table-cell table:number-columns-repeated="4"/>
        </table:table-row>
        <table:table-row table:style-name="ro1">
          <table:table-cell office:value-type="float" office:value="702.074768066406">
            <text:p>702.0747680664</text:p>
          </table:table-cell>
          <table:table-cell office:value-type="float" office:value="0.005945149">
            <text:p>0.005945149</text:p>
          </table:table-cell>
          <table:table-cell table:number-columns-repeated="4"/>
        </table:table-row>
        <table:table-row table:style-name="ro1">
          <table:table-cell office:value-type="float" office:value="702.194946289063">
            <text:p>702.1949462891</text:p>
          </table:table-cell>
          <table:table-cell office:value-type="float" office:value="0.01101727">
            <text:p>0.01101727</text:p>
          </table:table-cell>
          <table:table-cell table:number-columns-repeated="4"/>
        </table:table-row>
        <table:table-row table:style-name="ro1">
          <table:table-cell office:value-type="float" office:value="702.315063476563">
            <text:p>702.3150634766</text:p>
          </table:table-cell>
          <table:table-cell office:value-type="float" office:value="-0.002929933">
            <text:p>-0.002929933</text:p>
          </table:table-cell>
          <table:table-cell table:number-columns-repeated="4"/>
        </table:table-row>
        <table:table-row table:style-name="ro1">
          <table:table-cell office:value-type="float" office:value="702.435241699219">
            <text:p>702.4352416992</text:p>
          </table:table-cell>
          <table:table-cell office:value-type="float" office:value="-0.003240024">
            <text:p>-0.003240024</text:p>
          </table:table-cell>
          <table:table-cell table:number-columns-repeated="4"/>
        </table:table-row>
        <table:table-row table:style-name="ro1">
          <table:table-cell office:value-type="float" office:value="702.555358886719">
            <text:p>702.5553588867</text:p>
          </table:table-cell>
          <table:table-cell office:value-type="float" office:value="0.009352718">
            <text:p>0.009352718</text:p>
          </table:table-cell>
          <table:table-cell table:number-columns-repeated="4"/>
        </table:table-row>
        <table:table-row table:style-name="ro1">
          <table:table-cell office:value-type="float" office:value="702.675537109375">
            <text:p>702.6755371094</text:p>
          </table:table-cell>
          <table:table-cell office:value-type="float" office:value="0.01618413">
            <text:p>0.01618413</text:p>
          </table:table-cell>
          <table:table-cell table:number-columns-repeated="4"/>
        </table:table-row>
        <table:table-row table:style-name="ro1">
          <table:table-cell office:value-type="float" office:value="702.795654296875">
            <text:p>702.7956542969</text:p>
          </table:table-cell>
          <table:table-cell office:value-type="float" office:value="-0.0008747025">
            <text:p>-0.0008747025</text:p>
          </table:table-cell>
          <table:table-cell table:number-columns-repeated="4"/>
        </table:table-row>
        <table:table-row table:style-name="ro1">
          <table:table-cell office:value-type="float" office:value="702.915832519531">
            <text:p>702.9158325195</text:p>
          </table:table-cell>
          <table:table-cell office:value-type="float" office:value="0.002247087">
            <text:p>0.002247087</text:p>
          </table:table-cell>
          <table:table-cell table:number-columns-repeated="4"/>
        </table:table-row>
        <table:table-row table:style-name="ro1">
          <table:table-cell office:value-type="float" office:value="703.035949707031">
            <text:p>703.035949707</text:p>
          </table:table-cell>
          <table:table-cell office:value-type="float" office:value="-0.002014271">
            <text:p>-0.002014271</text:p>
          </table:table-cell>
          <table:table-cell table:number-columns-repeated="4"/>
        </table:table-row>
        <table:table-row table:style-name="ro1">
          <table:table-cell office:value-type="float" office:value="703.156127929688">
            <text:p>703.1561279297</text:p>
          </table:table-cell>
          <table:table-cell office:value-type="float" office:value="-0.0006602708">
            <text:p>-0.0006602708</text:p>
          </table:table-cell>
          <table:table-cell table:number-columns-repeated="4"/>
        </table:table-row>
        <table:table-row table:style-name="ro1">
          <table:table-cell office:value-type="float" office:value="703.276245117188">
            <text:p>703.2762451172</text:p>
          </table:table-cell>
          <table:table-cell office:value-type="float" office:value="-0.0007256923">
            <text:p>-0.0007256923</text:p>
          </table:table-cell>
          <table:table-cell table:number-columns-repeated="4"/>
        </table:table-row>
        <table:table-row table:style-name="ro1">
          <table:table-cell office:value-type="float" office:value="703.396423339844">
            <text:p>703.3964233398</text:p>
          </table:table-cell>
          <table:table-cell office:value-type="float" office:value="-0.004005481">
            <text:p>-0.004005481</text:p>
          </table:table-cell>
          <table:table-cell table:number-columns-repeated="4"/>
        </table:table-row>
        <table:table-row table:style-name="ro1">
          <table:table-cell office:value-type="float" office:value="703.516540527344">
            <text:p>703.5165405273</text:p>
          </table:table-cell>
          <table:table-cell office:value-type="float" office:value="0.0005024195">
            <text:p>0.0005024195</text:p>
          </table:table-cell>
          <table:table-cell table:number-columns-repeated="4"/>
        </table:table-row>
        <table:table-row table:style-name="ro1">
          <table:table-cell office:value-type="float" office:value="703.63671875">
            <text:p>703.63671875</text:p>
          </table:table-cell>
          <table:table-cell office:value-type="float" office:value="0.01214168">
            <text:p>0.01214168</text:p>
          </table:table-cell>
          <table:table-cell table:number-columns-repeated="4"/>
        </table:table-row>
        <table:table-row table:style-name="ro1">
          <table:table-cell office:value-type="float" office:value="703.756896972656">
            <text:p>703.7568969727</text:p>
          </table:table-cell>
          <table:table-cell office:value-type="float" office:value="-0.007709529">
            <text:p>-0.007709529</text:p>
          </table:table-cell>
          <table:table-cell table:number-columns-repeated="4"/>
        </table:table-row>
        <table:table-row table:style-name="ro1">
          <table:table-cell office:value-type="float" office:value="703.877014160156">
            <text:p>703.8770141602</text:p>
          </table:table-cell>
          <table:table-cell office:value-type="float" office:value="0.007584603">
            <text:p>0.007584603</text:p>
          </table:table-cell>
          <table:table-cell table:number-columns-repeated="4"/>
        </table:table-row>
        <table:table-row table:style-name="ro1">
          <table:table-cell office:value-type="float" office:value="703.997192382813">
            <text:p>703.9971923828</text:p>
          </table:table-cell>
          <table:table-cell office:value-type="float" office:value="-0.003475505">
            <text:p>-0.003475505</text:p>
          </table:table-cell>
          <table:table-cell table:number-columns-repeated="4"/>
        </table:table-row>
        <table:table-row table:style-name="ro1">
          <table:table-cell office:value-type="float" office:value="704.117309570313">
            <text:p>704.1173095703</text:p>
          </table:table-cell>
          <table:table-cell office:value-type="string">
            <text:p>-8.758962E-05</text:p>
          </table:table-cell>
          <table:table-cell table:number-columns-repeated="4"/>
        </table:table-row>
        <table:table-row table:style-name="ro1">
          <table:table-cell office:value-type="float" office:value="704.237487792969">
            <text:p>704.237487793</text:p>
          </table:table-cell>
          <table:table-cell office:value-type="float" office:value="-0.003984428">
            <text:p>-0.003984428</text:p>
          </table:table-cell>
          <table:table-cell table:number-columns-repeated="4"/>
        </table:table-row>
        <table:table-row table:style-name="ro1">
          <table:table-cell office:value-type="float" office:value="704.357666015625">
            <text:p>704.3576660156</text:p>
          </table:table-cell>
          <table:table-cell office:value-type="float" office:value="-0.003831958">
            <text:p>-0.003831958</text:p>
          </table:table-cell>
          <table:table-cell table:number-columns-repeated="4"/>
        </table:table-row>
        <table:table-row table:style-name="ro1">
          <table:table-cell office:value-type="float" office:value="704.477783203125">
            <text:p>704.4777832031</text:p>
          </table:table-cell>
          <table:table-cell office:value-type="float" office:value="0.01146918">
            <text:p>0.01146918</text:p>
          </table:table-cell>
          <table:table-cell table:number-columns-repeated="4"/>
        </table:table-row>
        <table:table-row table:style-name="ro1">
          <table:table-cell office:value-type="float" office:value="704.597961425781">
            <text:p>704.5979614258</text:p>
          </table:table-cell>
          <table:table-cell office:value-type="float" office:value="-0.002587452">
            <text:p>-0.002587452</text:p>
          </table:table-cell>
          <table:table-cell table:number-columns-repeated="4"/>
        </table:table-row>
        <table:table-row table:style-name="ro1">
          <table:table-cell office:value-type="float" office:value="704.718139648438">
            <text:p>704.7181396484</text:p>
          </table:table-cell>
          <table:table-cell office:value-type="float" office:value="-0.004554297">
            <text:p>-0.004554297</text:p>
          </table:table-cell>
          <table:table-cell table:number-columns-repeated="4"/>
        </table:table-row>
        <table:table-row table:style-name="ro1">
          <table:table-cell office:value-type="float" office:value="704.838256835938">
            <text:p>704.8382568359</text:p>
          </table:table-cell>
          <table:table-cell office:value-type="float" office:value="-0.007075341">
            <text:p>-0.007075341</text:p>
          </table:table-cell>
          <table:table-cell table:number-columns-repeated="4"/>
        </table:table-row>
        <table:table-row table:style-name="ro1">
          <table:table-cell office:value-type="float" office:value="704.958435058594">
            <text:p>704.9584350586</text:p>
          </table:table-cell>
          <table:table-cell office:value-type="float" office:value="-0.00694338">
            <text:p>-0.00694338</text:p>
          </table:table-cell>
          <table:table-cell table:number-columns-repeated="4"/>
        </table:table-row>
        <table:table-row table:style-name="ro1">
          <table:table-cell office:value-type="float" office:value="705.07861328125">
            <text:p>705.0786132813</text:p>
          </table:table-cell>
          <table:table-cell office:value-type="float" office:value="0.003396463">
            <text:p>0.003396463</text:p>
          </table:table-cell>
          <table:table-cell table:number-columns-repeated="4"/>
        </table:table-row>
        <table:table-row table:style-name="ro1">
          <table:table-cell office:value-type="float" office:value="705.19873046875">
            <text:p>705.1987304688</text:p>
          </table:table-cell>
          <table:table-cell office:value-type="float" office:value="0.001621824">
            <text:p>0.001621824</text:p>
          </table:table-cell>
          <table:table-cell table:number-columns-repeated="4"/>
        </table:table-row>
        <table:table-row table:style-name="ro1">
          <table:table-cell office:value-type="float" office:value="705.318908691406">
            <text:p>705.3189086914</text:p>
          </table:table-cell>
          <table:table-cell office:value-type="float" office:value="-0.002451401">
            <text:p>-0.002451401</text:p>
          </table:table-cell>
          <table:table-cell table:number-columns-repeated="4"/>
        </table:table-row>
        <table:table-row table:style-name="ro1">
          <table:table-cell office:value-type="float" office:value="705.439086914063">
            <text:p>705.4390869141</text:p>
          </table:table-cell>
          <table:table-cell office:value-type="float" office:value="0.0101657">
            <text:p>0.0101657</text:p>
          </table:table-cell>
          <table:table-cell table:number-columns-repeated="4"/>
        </table:table-row>
        <table:table-row table:style-name="ro1">
          <table:table-cell office:value-type="float" office:value="705.559265136719">
            <text:p>705.5592651367</text:p>
          </table:table-cell>
          <table:table-cell office:value-type="float" office:value="-0.001165037">
            <text:p>-0.001165037</text:p>
          </table:table-cell>
          <table:table-cell table:number-columns-repeated="4"/>
        </table:table-row>
        <table:table-row table:style-name="ro1">
          <table:table-cell office:value-type="float" office:value="705.679382324219">
            <text:p>705.6793823242</text:p>
          </table:table-cell>
          <table:table-cell office:value-type="float" office:value="0.002128683">
            <text:p>0.002128683</text:p>
          </table:table-cell>
          <table:table-cell table:number-columns-repeated="4"/>
        </table:table-row>
        <table:table-row table:style-name="ro1">
          <table:table-cell office:value-type="float" office:value="705.799560546875">
            <text:p>705.7995605469</text:p>
          </table:table-cell>
          <table:table-cell office:value-type="float" office:value="0.01185843">
            <text:p>0.01185843</text:p>
          </table:table-cell>
          <table:table-cell table:number-columns-repeated="4"/>
        </table:table-row>
        <table:table-row table:style-name="ro1">
          <table:table-cell office:value-type="float" office:value="705.919738769531">
            <text:p>705.9197387695</text:p>
          </table:table-cell>
          <table:table-cell office:value-type="float" office:value="-0.001139072">
            <text:p>-0.001139072</text:p>
          </table:table-cell>
          <table:table-cell table:number-columns-repeated="4"/>
        </table:table-row>
        <table:table-row table:style-name="ro1">
          <table:table-cell office:value-type="float" office:value="706.039916992188">
            <text:p>706.0399169922</text:p>
          </table:table-cell>
          <table:table-cell office:value-type="float" office:value="-0.001201359">
            <text:p>-0.001201359</text:p>
          </table:table-cell>
          <table:table-cell table:number-columns-repeated="4"/>
        </table:table-row>
        <table:table-row table:style-name="ro1">
          <table:table-cell office:value-type="float" office:value="706.160034179688">
            <text:p>706.1600341797</text:p>
          </table:table-cell>
          <table:table-cell office:value-type="float" office:value="0.01823074">
            <text:p>0.01823074</text:p>
          </table:table-cell>
          <table:table-cell table:number-columns-repeated="4"/>
        </table:table-row>
        <table:table-row table:style-name="ro1">
          <table:table-cell office:value-type="float" office:value="706.280212402344">
            <text:p>706.2802124023</text:p>
          </table:table-cell>
          <table:table-cell office:value-type="float" office:value="0.0002366174">
            <text:p>0.0002366174</text:p>
          </table:table-cell>
          <table:table-cell table:number-columns-repeated="4"/>
        </table:table-row>
        <table:table-row table:style-name="ro1">
          <table:table-cell office:value-type="float" office:value="706.400390625">
            <text:p>706.400390625</text:p>
          </table:table-cell>
          <table:table-cell office:value-type="float" office:value="0.003893424">
            <text:p>0.003893424</text:p>
          </table:table-cell>
          <table:table-cell table:number-columns-repeated="4"/>
        </table:table-row>
        <table:table-row table:style-name="ro1">
          <table:table-cell office:value-type="float" office:value="706.520568847656">
            <text:p>706.5205688477</text:p>
          </table:table-cell>
          <table:table-cell office:value-type="float" office:value="0.005788869">
            <text:p>0.005788869</text:p>
          </table:table-cell>
          <table:table-cell table:number-columns-repeated="4"/>
        </table:table-row>
        <table:table-row table:style-name="ro1">
          <table:table-cell office:value-type="float" office:value="706.640747070313">
            <text:p>706.6407470703</text:p>
          </table:table-cell>
          <table:table-cell office:value-type="float" office:value="-0.002707923">
            <text:p>-0.002707923</text:p>
          </table:table-cell>
          <table:table-cell table:number-columns-repeated="4"/>
        </table:table-row>
        <table:table-row table:style-name="ro1">
          <table:table-cell office:value-type="float" office:value="706.760925292969">
            <text:p>706.760925293</text:p>
          </table:table-cell>
          <table:table-cell office:value-type="float" office:value="0.008790759">
            <text:p>0.008790759</text:p>
          </table:table-cell>
          <table:table-cell table:number-columns-repeated="4"/>
        </table:table-row>
        <table:table-row table:style-name="ro1">
          <table:table-cell office:value-type="float" office:value="706.881042480469">
            <text:p>706.8810424805</text:p>
          </table:table-cell>
          <table:table-cell office:value-type="float" office:value="0.001515685">
            <text:p>0.001515685</text:p>
          </table:table-cell>
          <table:table-cell table:number-columns-repeated="4"/>
        </table:table-row>
        <table:table-row table:style-name="ro1">
          <table:table-cell office:value-type="float" office:value="707.001220703125">
            <text:p>707.0012207031</text:p>
          </table:table-cell>
          <table:table-cell office:value-type="float" office:value="-0.00712159">
            <text:p>-0.00712159</text:p>
          </table:table-cell>
          <table:table-cell table:number-columns-repeated="4"/>
        </table:table-row>
        <table:table-row table:style-name="ro1">
          <table:table-cell office:value-type="float" office:value="707.121398925781">
            <text:p>707.1213989258</text:p>
          </table:table-cell>
          <table:table-cell office:value-type="float" office:value="-0.007579163">
            <text:p>-0.007579163</text:p>
          </table:table-cell>
          <table:table-cell table:number-columns-repeated="4"/>
        </table:table-row>
        <table:table-row table:style-name="ro1">
          <table:table-cell office:value-type="float" office:value="707.241577148438">
            <text:p>707.2415771484</text:p>
          </table:table-cell>
          <table:table-cell office:value-type="float" office:value="0.002748586">
            <text:p>0.002748586</text:p>
          </table:table-cell>
          <table:table-cell table:number-columns-repeated="4"/>
        </table:table-row>
        <table:table-row table:style-name="ro1">
          <table:table-cell office:value-type="float" office:value="707.361755371094">
            <text:p>707.3617553711</text:p>
          </table:table-cell>
          <table:table-cell office:value-type="float" office:value="0.004408782">
            <text:p>0.004408782</text:p>
          </table:table-cell>
          <table:table-cell table:number-columns-repeated="4"/>
        </table:table-row>
        <table:table-row table:style-name="ro1">
          <table:table-cell office:value-type="float" office:value="707.48193359375">
            <text:p>707.4819335938</text:p>
          </table:table-cell>
          <table:table-cell office:value-type="float" office:value="0.005102872">
            <text:p>0.005102872</text:p>
          </table:table-cell>
          <table:table-cell table:number-columns-repeated="4"/>
        </table:table-row>
        <table:table-row table:style-name="ro1">
          <table:table-cell office:value-type="float" office:value="707.602111816406">
            <text:p>707.6021118164</text:p>
          </table:table-cell>
          <table:table-cell office:value-type="float" office:value="-0.006273251">
            <text:p>-0.006273251</text:p>
          </table:table-cell>
          <table:table-cell table:number-columns-repeated="4"/>
        </table:table-row>
        <table:table-row table:style-name="ro1">
          <table:table-cell office:value-type="float" office:value="707.722290039063">
            <text:p>707.7222900391</text:p>
          </table:table-cell>
          <table:table-cell office:value-type="float" office:value="0.002652787">
            <text:p>0.002652787</text:p>
          </table:table-cell>
          <table:table-cell table:number-columns-repeated="4"/>
        </table:table-row>
        <table:table-row table:style-name="ro1">
          <table:table-cell office:value-type="float" office:value="707.842468261719">
            <text:p>707.8424682617</text:p>
          </table:table-cell>
          <table:table-cell office:value-type="float" office:value="0.004669856">
            <text:p>0.004669856</text:p>
          </table:table-cell>
          <table:table-cell table:number-columns-repeated="4"/>
        </table:table-row>
        <table:table-row table:style-name="ro1">
          <table:table-cell office:value-type="float" office:value="707.962646484375">
            <text:p>707.9626464844</text:p>
          </table:table-cell>
          <table:table-cell office:value-type="float" office:value="0.008486834">
            <text:p>0.008486834</text:p>
          </table:table-cell>
          <table:table-cell table:number-columns-repeated="4"/>
        </table:table-row>
        <table:table-row table:style-name="ro1">
          <table:table-cell office:value-type="float" office:value="708.082763671875">
            <text:p>708.0827636719</text:p>
          </table:table-cell>
          <table:table-cell office:value-type="float" office:value="-0.001434554">
            <text:p>-0.001434554</text:p>
          </table:table-cell>
          <table:table-cell table:number-columns-repeated="4"/>
        </table:table-row>
        <table:table-row table:style-name="ro1">
          <table:table-cell office:value-type="float" office:value="708.202941894531">
            <text:p>708.2029418945</text:p>
          </table:table-cell>
          <table:table-cell office:value-type="float" office:value="0.002489642">
            <text:p>0.002489642</text:p>
          </table:table-cell>
          <table:table-cell table:number-columns-repeated="4"/>
        </table:table-row>
        <table:table-row table:style-name="ro1">
          <table:table-cell office:value-type="float" office:value="708.323120117188">
            <text:p>708.3231201172</text:p>
          </table:table-cell>
          <table:table-cell office:value-type="float" office:value="0.004756294">
            <text:p>0.004756294</text:p>
          </table:table-cell>
          <table:table-cell table:number-columns-repeated="4"/>
        </table:table-row>
        <table:table-row table:style-name="ro1">
          <table:table-cell office:value-type="float" office:value="708.443298339844">
            <text:p>708.4432983398</text:p>
          </table:table-cell>
          <table:table-cell office:value-type="float" office:value="-0.00273431">
            <text:p>-0.00273431</text:p>
          </table:table-cell>
          <table:table-cell table:number-columns-repeated="4"/>
        </table:table-row>
        <table:table-row table:style-name="ro1">
          <table:table-cell office:value-type="float" office:value="708.5634765625">
            <text:p>708.5634765625</text:p>
          </table:table-cell>
          <table:table-cell office:value-type="float" office:value="-0.001983715">
            <text:p>-0.001983715</text:p>
          </table:table-cell>
          <table:table-cell table:number-columns-repeated="4"/>
        </table:table-row>
        <table:table-row table:style-name="ro1">
          <table:table-cell office:value-type="float" office:value="708.683654785156">
            <text:p>708.6836547852</text:p>
          </table:table-cell>
          <table:table-cell office:value-type="float" office:value="-0.003258765">
            <text:p>-0.003258765</text:p>
          </table:table-cell>
          <table:table-cell table:number-columns-repeated="4"/>
        </table:table-row>
        <table:table-row table:style-name="ro1">
          <table:table-cell office:value-type="float" office:value="708.803833007813">
            <text:p>708.8038330078</text:p>
          </table:table-cell>
          <table:table-cell office:value-type="float" office:value="0.01195115">
            <text:p>0.01195115</text:p>
          </table:table-cell>
          <table:table-cell table:number-columns-repeated="4"/>
        </table:table-row>
        <table:table-row table:style-name="ro1">
          <table:table-cell office:value-type="float" office:value="708.924011230469">
            <text:p>708.9240112305</text:p>
          </table:table-cell>
          <table:table-cell office:value-type="float" office:value="-0.00717115">
            <text:p>-0.00717115</text:p>
          </table:table-cell>
          <table:table-cell table:number-columns-repeated="4"/>
        </table:table-row>
        <table:table-row table:style-name="ro1">
          <table:table-cell office:value-type="float" office:value="709.044189453125">
            <text:p>709.0441894531</text:p>
          </table:table-cell>
          <table:table-cell office:value-type="float" office:value="-0.0004300127">
            <text:p>-0.0004300127</text:p>
          </table:table-cell>
          <table:table-cell table:number-columns-repeated="4"/>
        </table:table-row>
        <table:table-row table:style-name="ro1">
          <table:table-cell office:value-type="float" office:value="709.164367675781">
            <text:p>709.1643676758</text:p>
          </table:table-cell>
          <table:table-cell office:value-type="float" office:value="0.003310627">
            <text:p>0.003310627</text:p>
          </table:table-cell>
          <table:table-cell table:number-columns-repeated="4"/>
        </table:table-row>
        <table:table-row table:style-name="ro1">
          <table:table-cell office:value-type="float" office:value="709.284545898438">
            <text:p>709.2845458984</text:p>
          </table:table-cell>
          <table:table-cell office:value-type="float" office:value="0.002594975">
            <text:p>0.002594975</text:p>
          </table:table-cell>
          <table:table-cell table:number-columns-repeated="4"/>
        </table:table-row>
        <table:table-row table:style-name="ro1">
          <table:table-cell office:value-type="float" office:value="709.404724121094">
            <text:p>709.4047241211</text:p>
          </table:table-cell>
          <table:table-cell office:value-type="float" office:value="0.001938229">
            <text:p>0.001938229</text:p>
          </table:table-cell>
          <table:table-cell table:number-columns-repeated="4"/>
        </table:table-row>
        <table:table-row table:style-name="ro1">
          <table:table-cell office:value-type="float" office:value="709.52490234375">
            <text:p>709.5249023438</text:p>
          </table:table-cell>
          <table:table-cell office:value-type="float" office:value="-0.004408536">
            <text:p>-0.004408536</text:p>
          </table:table-cell>
          <table:table-cell table:number-columns-repeated="4"/>
        </table:table-row>
        <table:table-row table:style-name="ro1">
          <table:table-cell office:value-type="float" office:value="709.645141601563">
            <text:p>709.6451416016</text:p>
          </table:table-cell>
          <table:table-cell office:value-type="float" office:value="-0.005094363">
            <text:p>-0.005094363</text:p>
          </table:table-cell>
          <table:table-cell table:number-columns-repeated="4"/>
        </table:table-row>
        <table:table-row table:style-name="ro1">
          <table:table-cell office:value-type="float" office:value="709.765319824219">
            <text:p>709.7653198242</text:p>
          </table:table-cell>
          <table:table-cell office:value-type="float" office:value="0.003403217">
            <text:p>0.003403217</text:p>
          </table:table-cell>
          <table:table-cell table:number-columns-repeated="4"/>
        </table:table-row>
        <table:table-row table:style-name="ro1">
          <table:table-cell office:value-type="float" office:value="709.885498046875">
            <text:p>709.8854980469</text:p>
          </table:table-cell>
          <table:table-cell office:value-type="float" office:value="-0.0001382022">
            <text:p>-0.0001382022</text:p>
          </table:table-cell>
          <table:table-cell table:number-columns-repeated="4"/>
        </table:table-row>
        <table:table-row table:style-name="ro1">
          <table:table-cell office:value-type="float" office:value="710.005676269531">
            <text:p>710.0056762695</text:p>
          </table:table-cell>
          <table:table-cell office:value-type="float" office:value="-0.002143553">
            <text:p>-0.002143553</text:p>
          </table:table-cell>
          <table:table-cell table:number-columns-repeated="4"/>
        </table:table-row>
        <table:table-row table:style-name="ro1">
          <table:table-cell office:value-type="float" office:value="710.125854492188">
            <text:p>710.1258544922</text:p>
          </table:table-cell>
          <table:table-cell office:value-type="float" office:value="0.005848882">
            <text:p>0.005848882</text:p>
          </table:table-cell>
          <table:table-cell table:number-columns-repeated="4"/>
        </table:table-row>
        <table:table-row table:style-name="ro1">
          <table:table-cell office:value-type="float" office:value="710.246032714844">
            <text:p>710.2460327148</text:p>
          </table:table-cell>
          <table:table-cell office:value-type="float" office:value="0.002438231">
            <text:p>0.002438231</text:p>
          </table:table-cell>
          <table:table-cell table:number-columns-repeated="4"/>
        </table:table-row>
        <table:table-row table:style-name="ro1">
          <table:table-cell office:value-type="float" office:value="710.3662109375">
            <text:p>710.3662109375</text:p>
          </table:table-cell>
          <table:table-cell office:value-type="float" office:value="-0.007582983">
            <text:p>-0.007582983</text:p>
          </table:table-cell>
          <table:table-cell table:number-columns-repeated="4"/>
        </table:table-row>
        <table:table-row table:style-name="ro1">
          <table:table-cell office:value-type="float" office:value="710.486389160156">
            <text:p>710.4863891602</text:p>
          </table:table-cell>
          <table:table-cell office:value-type="float" office:value="0.009528587">
            <text:p>0.009528587</text:p>
          </table:table-cell>
          <table:table-cell table:number-columns-repeated="4"/>
        </table:table-row>
        <table:table-row table:style-name="ro1">
          <table:table-cell office:value-type="float" office:value="710.606567382813">
            <text:p>710.6065673828</text:p>
          </table:table-cell>
          <table:table-cell office:value-type="float" office:value="-0.001047176">
            <text:p>-0.001047176</text:p>
          </table:table-cell>
          <table:table-cell table:number-columns-repeated="4"/>
        </table:table-row>
        <table:table-row table:style-name="ro1">
          <table:table-cell office:value-type="float" office:value="710.726745605469">
            <text:p>710.7267456055</text:p>
          </table:table-cell>
          <table:table-cell office:value-type="float" office:value="-0.005041488">
            <text:p>-0.005041488</text:p>
          </table:table-cell>
          <table:table-cell table:number-columns-repeated="4"/>
        </table:table-row>
        <table:table-row table:style-name="ro1">
          <table:table-cell office:value-type="float" office:value="710.846984863281">
            <text:p>710.8469848633</text:p>
          </table:table-cell>
          <table:table-cell office:value-type="float" office:value="0.002789231">
            <text:p>0.002789231</text:p>
          </table:table-cell>
          <table:table-cell table:number-columns-repeated="4"/>
        </table:table-row>
        <table:table-row table:style-name="ro1">
          <table:table-cell office:value-type="float" office:value="710.967163085938">
            <text:p>710.9671630859</text:p>
          </table:table-cell>
          <table:table-cell office:value-type="float" office:value="0.00103559">
            <text:p>0.00103559</text:p>
          </table:table-cell>
          <table:table-cell table:number-columns-repeated="4"/>
        </table:table-row>
        <table:table-row table:style-name="ro1">
          <table:table-cell office:value-type="float" office:value="711.087341308594">
            <text:p>711.0873413086</text:p>
          </table:table-cell>
          <table:table-cell office:value-type="float" office:value="0.00177661">
            <text:p>0.00177661</text:p>
          </table:table-cell>
          <table:table-cell table:number-columns-repeated="4"/>
        </table:table-row>
        <table:table-row table:style-name="ro1">
          <table:table-cell office:value-type="float" office:value="711.20751953125">
            <text:p>711.2075195313</text:p>
          </table:table-cell>
          <table:table-cell office:value-type="float" office:value="-0.007511213">
            <text:p>-0.007511213</text:p>
          </table:table-cell>
          <table:table-cell table:number-columns-repeated="4"/>
        </table:table-row>
        <table:table-row table:style-name="ro1">
          <table:table-cell office:value-type="float" office:value="711.327697753906">
            <text:p>711.3276977539</text:p>
          </table:table-cell>
          <table:table-cell office:value-type="float" office:value="-0.006139466">
            <text:p>-0.006139466</text:p>
          </table:table-cell>
          <table:table-cell table:number-columns-repeated="4"/>
        </table:table-row>
        <table:table-row table:style-name="ro1">
          <table:table-cell office:value-type="float" office:value="711.447875976563">
            <text:p>711.4478759766</text:p>
          </table:table-cell>
          <table:table-cell office:value-type="float" office:value="0.003772589">
            <text:p>0.003772589</text:p>
          </table:table-cell>
          <table:table-cell table:number-columns-repeated="4"/>
        </table:table-row>
        <table:table-row table:style-name="ro1">
          <table:table-cell office:value-type="float" office:value="711.568115234375">
            <text:p>711.5681152344</text:p>
          </table:table-cell>
          <table:table-cell office:value-type="float" office:value="-0.00208732">
            <text:p>-0.00208732</text:p>
          </table:table-cell>
          <table:table-cell table:number-columns-repeated="4"/>
        </table:table-row>
        <table:table-row table:style-name="ro1">
          <table:table-cell office:value-type="float" office:value="711.688293457031">
            <text:p>711.688293457</text:p>
          </table:table-cell>
          <table:table-cell office:value-type="float" office:value="0.01292191">
            <text:p>0.01292191</text:p>
          </table:table-cell>
          <table:table-cell table:number-columns-repeated="4"/>
        </table:table-row>
        <table:table-row table:style-name="ro1">
          <table:table-cell office:value-type="float" office:value="711.808471679688">
            <text:p>711.8084716797</text:p>
          </table:table-cell>
          <table:table-cell office:value-type="float" office:value="-0.007051712">
            <text:p>-0.007051712</text:p>
          </table:table-cell>
          <table:table-cell table:number-columns-repeated="4"/>
        </table:table-row>
        <table:table-row table:style-name="ro1">
          <table:table-cell office:value-type="float" office:value="711.928649902344">
            <text:p>711.9286499023</text:p>
          </table:table-cell>
          <table:table-cell office:value-type="float" office:value="-0.002397364">
            <text:p>-0.002397364</text:p>
          </table:table-cell>
          <table:table-cell table:number-columns-repeated="4"/>
        </table:table-row>
        <table:table-row table:style-name="ro1">
          <table:table-cell office:value-type="float" office:value="712.048889160156">
            <text:p>712.0488891602</text:p>
          </table:table-cell>
          <table:table-cell office:value-type="float" office:value="-0.0008091649">
            <text:p>-0.0008091649</text:p>
          </table:table-cell>
          <table:table-cell table:number-columns-repeated="4"/>
        </table:table-row>
        <table:table-row table:style-name="ro1">
          <table:table-cell office:value-type="float" office:value="712.169067382813">
            <text:p>712.1690673828</text:p>
          </table:table-cell>
          <table:table-cell office:value-type="float" office:value="0.00725005">
            <text:p>0.00725005</text:p>
          </table:table-cell>
          <table:table-cell table:number-columns-repeated="4"/>
        </table:table-row>
        <table:table-row table:style-name="ro1">
          <table:table-cell office:value-type="float" office:value="712.289245605469">
            <text:p>712.2892456055</text:p>
          </table:table-cell>
          <table:table-cell office:value-type="float" office:value="0.004420216">
            <text:p>0.004420216</text:p>
          </table:table-cell>
          <table:table-cell table:number-columns-repeated="4"/>
        </table:table-row>
        <table:table-row table:style-name="ro1">
          <table:table-cell office:value-type="float" office:value="712.409423828125">
            <text:p>712.4094238281</text:p>
          </table:table-cell>
          <table:table-cell office:value-type="float" office:value="-0.005828606">
            <text:p>-0.005828606</text:p>
          </table:table-cell>
          <table:table-cell table:number-columns-repeated="4"/>
        </table:table-row>
        <table:table-row table:style-name="ro1">
          <table:table-cell office:value-type="float" office:value="712.529663085938">
            <text:p>712.5296630859</text:p>
          </table:table-cell>
          <table:table-cell office:value-type="float" office:value="0.007263809">
            <text:p>0.007263809</text:p>
          </table:table-cell>
          <table:table-cell table:number-columns-repeated="4"/>
        </table:table-row>
        <table:table-row table:style-name="ro1">
          <table:table-cell office:value-type="float" office:value="712.649841308594">
            <text:p>712.6498413086</text:p>
          </table:table-cell>
          <table:table-cell office:value-type="float" office:value="-0.004011622">
            <text:p>-0.004011622</text:p>
          </table:table-cell>
          <table:table-cell table:number-columns-repeated="4"/>
        </table:table-row>
        <table:table-row table:style-name="ro1">
          <table:table-cell office:value-type="float" office:value="712.77001953125">
            <text:p>712.7700195313</text:p>
          </table:table-cell>
          <table:table-cell office:value-type="float" office:value="-0.00915727">
            <text:p>-0.00915727</text:p>
          </table:table-cell>
          <table:table-cell table:number-columns-repeated="4"/>
        </table:table-row>
        <table:table-row table:style-name="ro1">
          <table:table-cell office:value-type="float" office:value="712.890197753906">
            <text:p>712.8901977539</text:p>
          </table:table-cell>
          <table:table-cell office:value-type="float" office:value="-0.003137536">
            <text:p>-0.003137536</text:p>
          </table:table-cell>
          <table:table-cell table:number-columns-repeated="4"/>
        </table:table-row>
        <table:table-row table:style-name="ro1">
          <table:table-cell office:value-type="float" office:value="713.010437011719">
            <text:p>713.0104370117</text:p>
          </table:table-cell>
          <table:table-cell office:value-type="float" office:value="0.01710145">
            <text:p>0.01710145</text:p>
          </table:table-cell>
          <table:table-cell table:number-columns-repeated="4"/>
        </table:table-row>
        <table:table-row table:style-name="ro1">
          <table:table-cell office:value-type="float" office:value="713.130615234375">
            <text:p>713.1306152344</text:p>
          </table:table-cell>
          <table:table-cell office:value-type="float" office:value="0.01623526">
            <text:p>0.01623526</text:p>
          </table:table-cell>
          <table:table-cell table:number-columns-repeated="4"/>
        </table:table-row>
        <table:table-row table:style-name="ro1">
          <table:table-cell office:value-type="float" office:value="713.250793457031">
            <text:p>713.250793457</text:p>
          </table:table-cell>
          <table:table-cell office:value-type="float" office:value="0.01564904">
            <text:p>0.01564904</text:p>
          </table:table-cell>
          <table:table-cell table:number-columns-repeated="4"/>
        </table:table-row>
        <table:table-row table:style-name="ro1">
          <table:table-cell office:value-type="float" office:value="713.371032714844">
            <text:p>713.3710327148</text:p>
          </table:table-cell>
          <table:table-cell office:value-type="float" office:value="-0.007830038">
            <text:p>-0.007830038</text:p>
          </table:table-cell>
          <table:table-cell table:number-columns-repeated="4"/>
        </table:table-row>
        <table:table-row table:style-name="ro1">
          <table:table-cell office:value-type="float" office:value="713.4912109375">
            <text:p>713.4912109375</text:p>
          </table:table-cell>
          <table:table-cell office:value-type="float" office:value="0.0002694303">
            <text:p>0.0002694303</text:p>
          </table:table-cell>
          <table:table-cell table:number-columns-repeated="4"/>
        </table:table-row>
        <table:table-row table:style-name="ro1">
          <table:table-cell office:value-type="float" office:value="713.611389160156">
            <text:p>713.6113891602</text:p>
          </table:table-cell>
          <table:table-cell office:value-type="float" office:value="0.004762027">
            <text:p>0.004762027</text:p>
          </table:table-cell>
          <table:table-cell table:number-columns-repeated="4"/>
        </table:table-row>
        <table:table-row table:style-name="ro1">
          <table:table-cell office:value-type="float" office:value="713.731628417969">
            <text:p>713.731628418</text:p>
          </table:table-cell>
          <table:table-cell office:value-type="float" office:value="0.005041694">
            <text:p>0.005041694</text:p>
          </table:table-cell>
          <table:table-cell table:number-columns-repeated="4"/>
        </table:table-row>
        <table:table-row table:style-name="ro1">
          <table:table-cell office:value-type="float" office:value="713.851806640625">
            <text:p>713.8518066406</text:p>
          </table:table-cell>
          <table:table-cell office:value-type="float" office:value="-0.005193816">
            <text:p>-0.005193816</text:p>
          </table:table-cell>
          <table:table-cell table:number-columns-repeated="4"/>
        </table:table-row>
        <table:table-row table:style-name="ro1">
          <table:table-cell office:value-type="float" office:value="713.971984863281">
            <text:p>713.9719848633</text:p>
          </table:table-cell>
          <table:table-cell office:value-type="float" office:value="-0.00103683">
            <text:p>-0.00103683</text:p>
          </table:table-cell>
          <table:table-cell table:number-columns-repeated="4"/>
        </table:table-row>
        <table:table-row table:style-name="ro1">
          <table:table-cell office:value-type="float" office:value="714.092224121094">
            <text:p>714.0922241211</text:p>
          </table:table-cell>
          <table:table-cell office:value-type="float" office:value="-0.009371134">
            <text:p>-0.009371134</text:p>
          </table:table-cell>
          <table:table-cell table:number-columns-repeated="4"/>
        </table:table-row>
        <table:table-row table:style-name="ro1">
          <table:table-cell office:value-type="float" office:value="714.21240234375">
            <text:p>714.2124023438</text:p>
          </table:table-cell>
          <table:table-cell office:value-type="float" office:value="0.009150713">
            <text:p>0.009150713</text:p>
          </table:table-cell>
          <table:table-cell table:number-columns-repeated="4"/>
        </table:table-row>
        <table:table-row table:style-name="ro1">
          <table:table-cell office:value-type="float" office:value="714.332580566406">
            <text:p>714.3325805664</text:p>
          </table:table-cell>
          <table:table-cell office:value-type="float" office:value="0.004215588">
            <text:p>0.004215588</text:p>
          </table:table-cell>
          <table:table-cell table:number-columns-repeated="4"/>
        </table:table-row>
        <table:table-row table:style-name="ro1">
          <table:table-cell office:value-type="float" office:value="714.452819824219">
            <text:p>714.4528198242</text:p>
          </table:table-cell>
          <table:table-cell office:value-type="float" office:value="0.0009131009">
            <text:p>0.0009131009</text:p>
          </table:table-cell>
          <table:table-cell table:number-columns-repeated="4"/>
        </table:table-row>
        <table:table-row table:style-name="ro1">
          <table:table-cell office:value-type="float" office:value="714.572998046875">
            <text:p>714.5729980469</text:p>
          </table:table-cell>
          <table:table-cell office:value-type="float" office:value="0.004883241">
            <text:p>0.004883241</text:p>
          </table:table-cell>
          <table:table-cell table:number-columns-repeated="4"/>
        </table:table-row>
        <table:table-row table:style-name="ro1">
          <table:table-cell office:value-type="float" office:value="714.693237304688">
            <text:p>714.6932373047</text:p>
          </table:table-cell>
          <table:table-cell office:value-type="float" office:value="0.01339803">
            <text:p>0.01339803</text:p>
          </table:table-cell>
          <table:table-cell table:number-columns-repeated="4"/>
        </table:table-row>
        <table:table-row table:style-name="ro1">
          <table:table-cell office:value-type="float" office:value="714.813415527344">
            <text:p>714.8134155273</text:p>
          </table:table-cell>
          <table:table-cell office:value-type="float" office:value="-0.001920469">
            <text:p>-0.001920469</text:p>
          </table:table-cell>
          <table:table-cell table:number-columns-repeated="4"/>
        </table:table-row>
        <table:table-row table:style-name="ro1">
          <table:table-cell office:value-type="float" office:value="714.93359375">
            <text:p>714.93359375</text:p>
          </table:table-cell>
          <table:table-cell office:value-type="float" office:value="0.004361575">
            <text:p>0.004361575</text:p>
          </table:table-cell>
          <table:table-cell table:number-columns-repeated="4"/>
        </table:table-row>
        <table:table-row table:style-name="ro1">
          <table:table-cell office:value-type="float" office:value="715.053833007813">
            <text:p>715.0538330078</text:p>
          </table:table-cell>
          <table:table-cell office:value-type="float" office:value="0.002876217">
            <text:p>0.002876217</text:p>
          </table:table-cell>
          <table:table-cell table:number-columns-repeated="4"/>
        </table:table-row>
        <table:table-row table:style-name="ro1">
          <table:table-cell office:value-type="float" office:value="715.174011230469">
            <text:p>715.1740112305</text:p>
          </table:table-cell>
          <table:table-cell office:value-type="float" office:value="0.005064519">
            <text:p>0.005064519</text:p>
          </table:table-cell>
          <table:table-cell table:number-columns-repeated="4"/>
        </table:table-row>
        <table:table-row table:style-name="ro1">
          <table:table-cell office:value-type="float" office:value="715.294250488281">
            <text:p>715.2942504883</text:p>
          </table:table-cell>
          <table:table-cell office:value-type="float" office:value="-0.00748719">
            <text:p>-0.00748719</text:p>
          </table:table-cell>
          <table:table-cell table:number-columns-repeated="4"/>
        </table:table-row>
        <table:table-row table:style-name="ro1">
          <table:table-cell office:value-type="float" office:value="715.414428710938">
            <text:p>715.4144287109</text:p>
          </table:table-cell>
          <table:table-cell office:value-type="float" office:value="-0.002692794">
            <text:p>-0.002692794</text:p>
          </table:table-cell>
          <table:table-cell table:number-columns-repeated="4"/>
        </table:table-row>
        <table:table-row table:style-name="ro1">
          <table:table-cell office:value-type="float" office:value="715.53466796875">
            <text:p>715.5346679688</text:p>
          </table:table-cell>
          <table:table-cell office:value-type="float" office:value="0.002347677">
            <text:p>0.002347677</text:p>
          </table:table-cell>
          <table:table-cell table:number-columns-repeated="4"/>
        </table:table-row>
        <table:table-row table:style-name="ro1">
          <table:table-cell office:value-type="float" office:value="715.654846191406">
            <text:p>715.6548461914</text:p>
          </table:table-cell>
          <table:table-cell office:value-type="float" office:value="-0.006128549">
            <text:p>-0.006128549</text:p>
          </table:table-cell>
          <table:table-cell table:number-columns-repeated="4"/>
        </table:table-row>
        <table:table-row table:style-name="ro1">
          <table:table-cell office:value-type="float" office:value="715.775024414063">
            <text:p>715.7750244141</text:p>
          </table:table-cell>
          <table:table-cell office:value-type="float" office:value="0.002336407">
            <text:p>0.002336407</text:p>
          </table:table-cell>
          <table:table-cell table:number-columns-repeated="4"/>
        </table:table-row>
        <table:table-row table:style-name="ro1">
          <table:table-cell office:value-type="float" office:value="715.895263671875">
            <text:p>715.8952636719</text:p>
          </table:table-cell>
          <table:table-cell office:value-type="float" office:value="-0.00135517">
            <text:p>-0.00135517</text:p>
          </table:table-cell>
          <table:table-cell table:number-columns-repeated="4"/>
        </table:table-row>
        <table:table-row table:style-name="ro1">
          <table:table-cell office:value-type="float" office:value="716.015441894531">
            <text:p>716.0154418945</text:p>
          </table:table-cell>
          <table:table-cell office:value-type="float" office:value="-0.004396981">
            <text:p>-0.004396981</text:p>
          </table:table-cell>
          <table:table-cell table:number-columns-repeated="4"/>
        </table:table-row>
        <table:table-row table:style-name="ro1">
          <table:table-cell office:value-type="float" office:value="716.135681152344">
            <text:p>716.1356811523</text:p>
          </table:table-cell>
          <table:table-cell office:value-type="string">
            <text:p>8.274183E-05</text:p>
          </table:table-cell>
          <table:table-cell table:number-columns-repeated="4"/>
        </table:table-row>
        <table:table-row table:style-name="ro1">
          <table:table-cell office:value-type="float" office:value="716.255859375">
            <text:p>716.255859375</text:p>
          </table:table-cell>
          <table:table-cell office:value-type="float" office:value="-0.006385989">
            <text:p>-0.006385989</text:p>
          </table:table-cell>
          <table:table-cell table:number-columns-repeated="4"/>
        </table:table-row>
        <table:table-row table:style-name="ro1">
          <table:table-cell office:value-type="float" office:value="716.376098632813">
            <text:p>716.3760986328</text:p>
          </table:table-cell>
          <table:table-cell office:value-type="float" office:value="-0.009026561">
            <text:p>-0.009026561</text:p>
          </table:table-cell>
          <table:table-cell table:number-columns-repeated="4"/>
        </table:table-row>
        <table:table-row table:style-name="ro1">
          <table:table-cell office:value-type="float" office:value="716.496276855469">
            <text:p>716.4962768555</text:p>
          </table:table-cell>
          <table:table-cell office:value-type="float" office:value="0.005660569">
            <text:p>0.005660569</text:p>
          </table:table-cell>
          <table:table-cell table:number-columns-repeated="4"/>
        </table:table-row>
        <table:table-row table:style-name="ro1">
          <table:table-cell office:value-type="float" office:value="716.616516113281">
            <text:p>716.6165161133</text:p>
          </table:table-cell>
          <table:table-cell office:value-type="float" office:value="0.001195662">
            <text:p>0.001195662</text:p>
          </table:table-cell>
          <table:table-cell table:number-columns-repeated="4"/>
        </table:table-row>
        <table:table-row table:style-name="ro1">
          <table:table-cell office:value-type="float" office:value="716.736694335938">
            <text:p>716.7366943359</text:p>
          </table:table-cell>
          <table:table-cell office:value-type="float" office:value="0.001053974">
            <text:p>0.001053974</text:p>
          </table:table-cell>
          <table:table-cell table:number-columns-repeated="4"/>
        </table:table-row>
        <table:table-row table:style-name="ro1">
          <table:table-cell office:value-type="float" office:value="716.85693359375">
            <text:p>716.8569335938</text:p>
          </table:table-cell>
          <table:table-cell office:value-type="float" office:value="0.0008149674">
            <text:p>0.0008149674</text:p>
          </table:table-cell>
          <table:table-cell table:number-columns-repeated="4"/>
        </table:table-row>
        <table:table-row table:style-name="ro1">
          <table:table-cell office:value-type="float" office:value="716.977172851563">
            <text:p>716.9771728516</text:p>
          </table:table-cell>
          <table:table-cell office:value-type="float" office:value="0.001282912">
            <text:p>0.001282912</text:p>
          </table:table-cell>
          <table:table-cell table:number-columns-repeated="4"/>
        </table:table-row>
        <table:table-row table:style-name="ro1">
          <table:table-cell office:value-type="float" office:value="717.097351074219">
            <text:p>717.0973510742</text:p>
          </table:table-cell>
          <table:table-cell office:value-type="float" office:value="0.005654863">
            <text:p>0.005654863</text:p>
          </table:table-cell>
          <table:table-cell table:number-columns-repeated="4"/>
        </table:table-row>
        <table:table-row table:style-name="ro1">
          <table:table-cell office:value-type="float" office:value="717.217590332031">
            <text:p>717.217590332</text:p>
          </table:table-cell>
          <table:table-cell office:value-type="float" office:value="-0.005197888">
            <text:p>-0.005197888</text:p>
          </table:table-cell>
          <table:table-cell table:number-columns-repeated="4"/>
        </table:table-row>
        <table:table-row table:style-name="ro1">
          <table:table-cell office:value-type="float" office:value="717.337768554688">
            <text:p>717.3377685547</text:p>
          </table:table-cell>
          <table:table-cell office:value-type="float" office:value="-0.008410728">
            <text:p>-0.008410728</text:p>
          </table:table-cell>
          <table:table-cell table:number-columns-repeated="4"/>
        </table:table-row>
        <table:table-row table:style-name="ro1">
          <table:table-cell office:value-type="float" office:value="717.4580078125">
            <text:p>717.4580078125</text:p>
          </table:table-cell>
          <table:table-cell office:value-type="float" office:value="0.001538485">
            <text:p>0.001538485</text:p>
          </table:table-cell>
          <table:table-cell table:number-columns-repeated="4"/>
        </table:table-row>
        <table:table-row table:style-name="ro1">
          <table:table-cell office:value-type="float" office:value="717.578186035156">
            <text:p>717.5781860352</text:p>
          </table:table-cell>
          <table:table-cell office:value-type="float" office:value="-0.0002049921">
            <text:p>-0.0002049921</text:p>
          </table:table-cell>
          <table:table-cell table:number-columns-repeated="4"/>
        </table:table-row>
        <table:table-row table:style-name="ro1">
          <table:table-cell office:value-type="float" office:value="717.698425292969">
            <text:p>717.698425293</text:p>
          </table:table-cell>
          <table:table-cell office:value-type="float" office:value="0.001469664">
            <text:p>0.001469664</text:p>
          </table:table-cell>
          <table:table-cell table:number-columns-repeated="4"/>
        </table:table-row>
        <table:table-row table:style-name="ro1">
          <table:table-cell office:value-type="float" office:value="717.818603515625">
            <text:p>717.8186035156</text:p>
          </table:table-cell>
          <table:table-cell office:value-type="float" office:value="0.001201857">
            <text:p>0.001201857</text:p>
          </table:table-cell>
          <table:table-cell table:number-columns-repeated="4"/>
        </table:table-row>
        <table:table-row table:style-name="ro1">
          <table:table-cell office:value-type="float" office:value="717.938842773438">
            <text:p>717.9388427734</text:p>
          </table:table-cell>
          <table:table-cell office:value-type="float" office:value="-0.001482459">
            <text:p>-0.001482459</text:p>
          </table:table-cell>
          <table:table-cell table:number-columns-repeated="4"/>
        </table:table-row>
        <table:table-row table:style-name="ro1">
          <table:table-cell office:value-type="float" office:value="718.05908203125">
            <text:p>718.0590820313</text:p>
          </table:table-cell>
          <table:table-cell office:value-type="float" office:value="0.001864304">
            <text:p>0.001864304</text:p>
          </table:table-cell>
          <table:table-cell table:number-columns-repeated="4"/>
        </table:table-row>
        <table:table-row table:style-name="ro1">
          <table:table-cell office:value-type="float" office:value="718.179260253906">
            <text:p>718.1792602539</text:p>
          </table:table-cell>
          <table:table-cell office:value-type="float" office:value="-0.004372422">
            <text:p>-0.004372422</text:p>
          </table:table-cell>
          <table:table-cell table:number-columns-repeated="4"/>
        </table:table-row>
        <table:table-row table:style-name="ro1">
          <table:table-cell office:value-type="float" office:value="718.299499511719">
            <text:p>718.2994995117</text:p>
          </table:table-cell>
          <table:table-cell office:value-type="float" office:value="0.005373705">
            <text:p>0.005373705</text:p>
          </table:table-cell>
          <table:table-cell table:number-columns-repeated="4"/>
        </table:table-row>
        <table:table-row table:style-name="ro1">
          <table:table-cell office:value-type="float" office:value="718.419677734375">
            <text:p>718.4196777344</text:p>
          </table:table-cell>
          <table:table-cell office:value-type="float" office:value="-0.001186252">
            <text:p>-0.001186252</text:p>
          </table:table-cell>
          <table:table-cell table:number-columns-repeated="4"/>
        </table:table-row>
        <table:table-row table:style-name="ro1">
          <table:table-cell office:value-type="float" office:value="718.539916992188">
            <text:p>718.5399169922</text:p>
          </table:table-cell>
          <table:table-cell office:value-type="float" office:value="-0.002180529">
            <text:p>-0.002180529</text:p>
          </table:table-cell>
          <table:table-cell table:number-columns-repeated="4"/>
        </table:table-row>
        <table:table-row table:style-name="ro1">
          <table:table-cell office:value-type="float" office:value="718.66015625">
            <text:p>718.66015625</text:p>
          </table:table-cell>
          <table:table-cell office:value-type="float" office:value="0.001015409">
            <text:p>0.001015409</text:p>
          </table:table-cell>
          <table:table-cell table:number-columns-repeated="4"/>
        </table:table-row>
        <table:table-row table:style-name="ro1">
          <table:table-cell office:value-type="float" office:value="718.780334472656">
            <text:p>718.7803344727</text:p>
          </table:table-cell>
          <table:table-cell office:value-type="float" office:value="-0.002578672">
            <text:p>-0.002578672</text:p>
          </table:table-cell>
          <table:table-cell table:number-columns-repeated="4"/>
        </table:table-row>
        <table:table-row table:style-name="ro1">
          <table:table-cell office:value-type="float" office:value="718.900573730469">
            <text:p>718.9005737305</text:p>
          </table:table-cell>
          <table:table-cell office:value-type="float" office:value="0.001916093">
            <text:p>0.001916093</text:p>
          </table:table-cell>
          <table:table-cell table:number-columns-repeated="4"/>
        </table:table-row>
        <table:table-row table:style-name="ro1">
          <table:table-cell office:value-type="float" office:value="719.020812988281">
            <text:p>719.0208129883</text:p>
          </table:table-cell>
          <table:table-cell office:value-type="float" office:value="0.004452898">
            <text:p>0.004452898</text:p>
          </table:table-cell>
          <table:table-cell table:number-columns-repeated="4"/>
        </table:table-row>
        <table:table-row table:style-name="ro1">
          <table:table-cell office:value-type="float" office:value="719.140991210938">
            <text:p>719.1409912109</text:p>
          </table:table-cell>
          <table:table-cell office:value-type="float" office:value="0.007848275">
            <text:p>0.007848275</text:p>
          </table:table-cell>
          <table:table-cell table:number-columns-repeated="4"/>
        </table:table-row>
        <table:table-row table:style-name="ro1">
          <table:table-cell office:value-type="float" office:value="719.26123046875">
            <text:p>719.2612304688</text:p>
          </table:table-cell>
          <table:table-cell office:value-type="float" office:value="-0.0003842768">
            <text:p>-0.0003842768</text:p>
          </table:table-cell>
          <table:table-cell table:number-columns-repeated="4"/>
        </table:table-row>
        <table:table-row table:style-name="ro1">
          <table:table-cell office:value-type="float" office:value="719.381469726563">
            <text:p>719.3814697266</text:p>
          </table:table-cell>
          <table:table-cell office:value-type="float" office:value="-0.003078847">
            <text:p>-0.003078847</text:p>
          </table:table-cell>
          <table:table-cell table:number-columns-repeated="4"/>
        </table:table-row>
        <table:table-row table:style-name="ro1">
          <table:table-cell office:value-type="float" office:value="719.501647949219">
            <text:p>719.5016479492</text:p>
          </table:table-cell>
          <table:table-cell office:value-type="float" office:value="0.007619034">
            <text:p>0.007619034</text:p>
          </table:table-cell>
          <table:table-cell table:number-columns-repeated="4"/>
        </table:table-row>
        <table:table-row table:style-name="ro1">
          <table:table-cell office:value-type="float" office:value="719.621887207031">
            <text:p>719.621887207</text:p>
          </table:table-cell>
          <table:table-cell office:value-type="float" office:value="-0.002144932">
            <text:p>-0.002144932</text:p>
          </table:table-cell>
          <table:table-cell table:number-columns-repeated="4"/>
        </table:table-row>
        <table:table-row table:style-name="ro1">
          <table:table-cell office:value-type="float" office:value="719.742126464844">
            <text:p>719.7421264648</text:p>
          </table:table-cell>
          <table:table-cell office:value-type="float" office:value="-0.008179768">
            <text:p>-0.008179768</text:p>
          </table:table-cell>
          <table:table-cell table:number-columns-repeated="4"/>
        </table:table-row>
        <table:table-row table:style-name="ro1">
          <table:table-cell office:value-type="float" office:value="719.8623046875">
            <text:p>719.8623046875</text:p>
          </table:table-cell>
          <table:table-cell office:value-type="float" office:value="-0.007662038">
            <text:p>-0.007662038</text:p>
          </table:table-cell>
          <table:table-cell table:number-columns-repeated="4"/>
        </table:table-row>
        <table:table-row table:style-name="ro1">
          <table:table-cell office:value-type="float" office:value="719.982543945313">
            <text:p>719.9825439453</text:p>
          </table:table-cell>
          <table:table-cell office:value-type="float" office:value="0.004879133">
            <text:p>0.004879133</text:p>
          </table:table-cell>
          <table:table-cell table:number-columns-repeated="4"/>
        </table:table-row>
        <table:table-row table:style-name="ro1">
          <table:table-cell office:value-type="float" office:value="720.102783203125">
            <text:p>720.1027832031</text:p>
          </table:table-cell>
          <table:table-cell office:value-type="float" office:value="-0.004974804">
            <text:p>-0.004974804</text:p>
          </table:table-cell>
          <table:table-cell table:number-columns-repeated="4"/>
        </table:table-row>
        <table:table-row table:style-name="ro1">
          <table:table-cell office:value-type="float" office:value="720.222961425781">
            <text:p>720.2229614258</text:p>
          </table:table-cell>
          <table:table-cell office:value-type="float" office:value="0.009204165">
            <text:p>0.009204165</text:p>
          </table:table-cell>
          <table:table-cell table:number-columns-repeated="4"/>
        </table:table-row>
        <table:table-row table:style-name="ro1">
          <table:table-cell office:value-type="float" office:value="720.343200683594">
            <text:p>720.3432006836</text:p>
          </table:table-cell>
          <table:table-cell office:value-type="float" office:value="-0.007969419">
            <text:p>-0.007969419</text:p>
          </table:table-cell>
          <table:table-cell table:number-columns-repeated="4"/>
        </table:table-row>
        <table:table-row table:style-name="ro1">
          <table:table-cell office:value-type="float" office:value="720.463439941406">
            <text:p>720.4634399414</text:p>
          </table:table-cell>
          <table:table-cell office:value-type="float" office:value="0.001616311">
            <text:p>0.001616311</text:p>
          </table:table-cell>
          <table:table-cell table:number-columns-repeated="4"/>
        </table:table-row>
        <table:table-row table:style-name="ro1">
          <table:table-cell office:value-type="float" office:value="720.583679199219">
            <text:p>720.5836791992</text:p>
          </table:table-cell>
          <table:table-cell office:value-type="float" office:value="0.02161575">
            <text:p>0.02161575</text:p>
          </table:table-cell>
          <table:table-cell table:number-columns-repeated="4"/>
        </table:table-row>
        <table:table-row table:style-name="ro1">
          <table:table-cell office:value-type="float" office:value="720.703857421875">
            <text:p>720.7038574219</text:p>
          </table:table-cell>
          <table:table-cell office:value-type="float" office:value="0.001423456">
            <text:p>0.001423456</text:p>
          </table:table-cell>
          <table:table-cell table:number-columns-repeated="4"/>
        </table:table-row>
        <table:table-row table:style-name="ro1">
          <table:table-cell office:value-type="float" office:value="720.824096679688">
            <text:p>720.8240966797</text:p>
          </table:table-cell>
          <table:table-cell office:value-type="float" office:value="0.001343413">
            <text:p>0.001343413</text:p>
          </table:table-cell>
          <table:table-cell table:number-columns-repeated="4"/>
        </table:table-row>
        <table:table-row table:style-name="ro1">
          <table:table-cell office:value-type="float" office:value="720.9443359375">
            <text:p>720.9443359375</text:p>
          </table:table-cell>
          <table:table-cell office:value-type="float" office:value="0.00508397">
            <text:p>0.00508397</text:p>
          </table:table-cell>
          <table:table-cell table:number-columns-repeated="4"/>
        </table:table-row>
        <table:table-row table:style-name="ro1">
          <table:table-cell office:value-type="float" office:value="721.064575195313">
            <text:p>721.0645751953</text:p>
          </table:table-cell>
          <table:table-cell office:value-type="float" office:value="0.005051622">
            <text:p>0.005051622</text:p>
          </table:table-cell>
          <table:table-cell table:number-columns-repeated="4"/>
        </table:table-row>
        <table:table-row table:style-name="ro1">
          <table:table-cell office:value-type="float" office:value="721.184753417969">
            <text:p>721.184753418</text:p>
          </table:table-cell>
          <table:table-cell office:value-type="float" office:value="-0.003192198">
            <text:p>-0.003192198</text:p>
          </table:table-cell>
          <table:table-cell table:number-columns-repeated="4"/>
        </table:table-row>
        <table:table-row table:style-name="ro1">
          <table:table-cell office:value-type="float" office:value="721.304992675781">
            <text:p>721.3049926758</text:p>
          </table:table-cell>
          <table:table-cell office:value-type="float" office:value="0.001455365">
            <text:p>0.001455365</text:p>
          </table:table-cell>
          <table:table-cell table:number-columns-repeated="4"/>
        </table:table-row>
        <table:table-row table:style-name="ro1">
          <table:table-cell office:value-type="float" office:value="721.425231933594">
            <text:p>721.4252319336</text:p>
          </table:table-cell>
          <table:table-cell office:value-type="float" office:value="0.00148438">
            <text:p>0.00148438</text:p>
          </table:table-cell>
          <table:table-cell table:number-columns-repeated="4"/>
        </table:table-row>
        <table:table-row table:style-name="ro1">
          <table:table-cell office:value-type="float" office:value="721.545471191406">
            <text:p>721.5454711914</text:p>
          </table:table-cell>
          <table:table-cell office:value-type="float" office:value="0.01800053">
            <text:p>0.01800053</text:p>
          </table:table-cell>
          <table:table-cell table:number-columns-repeated="4"/>
        </table:table-row>
        <table:table-row table:style-name="ro1">
          <table:table-cell office:value-type="float" office:value="721.665649414063">
            <text:p>721.6656494141</text:p>
          </table:table-cell>
          <table:table-cell office:value-type="float" office:value="-0.008324681">
            <text:p>-0.008324681</text:p>
          </table:table-cell>
          <table:table-cell table:number-columns-repeated="4"/>
        </table:table-row>
        <table:table-row table:style-name="ro1">
          <table:table-cell office:value-type="float" office:value="721.785888671875">
            <text:p>721.7858886719</text:p>
          </table:table-cell>
          <table:table-cell office:value-type="float" office:value="0.01597753">
            <text:p>0.01597753</text:p>
          </table:table-cell>
          <table:table-cell table:number-columns-repeated="4"/>
        </table:table-row>
        <table:table-row table:style-name="ro1">
          <table:table-cell office:value-type="float" office:value="721.906127929688">
            <text:p>721.9061279297</text:p>
          </table:table-cell>
          <table:table-cell office:value-type="float" office:value="-0.001273211">
            <text:p>-0.001273211</text:p>
          </table:table-cell>
          <table:table-cell table:number-columns-repeated="4"/>
        </table:table-row>
        <table:table-row table:style-name="ro1">
          <table:table-cell office:value-type="float" office:value="722.0263671875">
            <text:p>722.0263671875</text:p>
          </table:table-cell>
          <table:table-cell office:value-type="float" office:value="-0.00567046">
            <text:p>-0.00567046</text:p>
          </table:table-cell>
          <table:table-cell table:number-columns-repeated="4"/>
        </table:table-row>
        <table:table-row table:style-name="ro1">
          <table:table-cell office:value-type="float" office:value="722.146606445313">
            <text:p>722.1466064453</text:p>
          </table:table-cell>
          <table:table-cell office:value-type="float" office:value="0.01347181">
            <text:p>0.01347181</text:p>
          </table:table-cell>
          <table:table-cell table:number-columns-repeated="4"/>
        </table:table-row>
        <table:table-row table:style-name="ro1">
          <table:table-cell office:value-type="float" office:value="722.266784667969">
            <text:p>722.266784668</text:p>
          </table:table-cell>
          <table:table-cell office:value-type="float" office:value="-0.002458912">
            <text:p>-0.002458912</text:p>
          </table:table-cell>
          <table:table-cell table:number-columns-repeated="4"/>
        </table:table-row>
        <table:table-row table:style-name="ro1">
          <table:table-cell office:value-type="float" office:value="722.387023925781">
            <text:p>722.3870239258</text:p>
          </table:table-cell>
          <table:table-cell office:value-type="float" office:value="-0.006532736">
            <text:p>-0.006532736</text:p>
          </table:table-cell>
          <table:table-cell table:number-columns-repeated="4"/>
        </table:table-row>
        <table:table-row table:style-name="ro1">
          <table:table-cell office:value-type="float" office:value="722.507263183594">
            <text:p>722.5072631836</text:p>
          </table:table-cell>
          <table:table-cell office:value-type="float" office:value="-0.007666014">
            <text:p>-0.007666014</text:p>
          </table:table-cell>
          <table:table-cell table:number-columns-repeated="4"/>
        </table:table-row>
        <table:table-row table:style-name="ro1">
          <table:table-cell office:value-type="float" office:value="722.627502441406">
            <text:p>722.6275024414</text:p>
          </table:table-cell>
          <table:table-cell office:value-type="float" office:value="-0.005055226">
            <text:p>-0.005055226</text:p>
          </table:table-cell>
          <table:table-cell table:number-columns-repeated="4"/>
        </table:table-row>
        <table:table-row table:style-name="ro1">
          <table:table-cell office:value-type="float" office:value="722.747741699219">
            <text:p>722.7477416992</text:p>
          </table:table-cell>
          <table:table-cell office:value-type="float" office:value="0.002812264">
            <text:p>0.002812264</text:p>
          </table:table-cell>
          <table:table-cell table:number-columns-repeated="4"/>
        </table:table-row>
        <table:table-row table:style-name="ro1">
          <table:table-cell office:value-type="float" office:value="722.867980957031">
            <text:p>722.867980957</text:p>
          </table:table-cell>
          <table:table-cell office:value-type="float" office:value="-0.006527157">
            <text:p>-0.006527157</text:p>
          </table:table-cell>
          <table:table-cell table:number-columns-repeated="4"/>
        </table:table-row>
        <table:table-row table:style-name="ro1">
          <table:table-cell office:value-type="float" office:value="722.988159179688">
            <text:p>722.9881591797</text:p>
          </table:table-cell>
          <table:table-cell office:value-type="float" office:value="0.001384886">
            <text:p>0.001384886</text:p>
          </table:table-cell>
          <table:table-cell table:number-columns-repeated="4"/>
        </table:table-row>
        <table:table-row table:style-name="ro1">
          <table:table-cell office:value-type="float" office:value="723.1083984375">
            <text:p>723.1083984375</text:p>
          </table:table-cell>
          <table:table-cell office:value-type="float" office:value="0.004561721">
            <text:p>0.004561721</text:p>
          </table:table-cell>
          <table:table-cell table:number-columns-repeated="4"/>
        </table:table-row>
        <table:table-row table:style-name="ro1">
          <table:table-cell office:value-type="float" office:value="723.228637695313">
            <text:p>723.2286376953</text:p>
          </table:table-cell>
          <table:table-cell office:value-type="float" office:value="0.0155568">
            <text:p>0.0155568</text:p>
          </table:table-cell>
          <table:table-cell table:number-columns-repeated="4"/>
        </table:table-row>
        <table:table-row table:style-name="ro1">
          <table:table-cell office:value-type="float" office:value="723.348876953125">
            <text:p>723.3488769531</text:p>
          </table:table-cell>
          <table:table-cell office:value-type="float" office:value="0.001899519">
            <text:p>0.001899519</text:p>
          </table:table-cell>
          <table:table-cell table:number-columns-repeated="4"/>
        </table:table-row>
        <table:table-row table:style-name="ro1">
          <table:table-cell office:value-type="float" office:value="723.469116210938">
            <text:p>723.4691162109</text:p>
          </table:table-cell>
          <table:table-cell office:value-type="float" office:value="-0.004098971">
            <text:p>-0.004098971</text:p>
          </table:table-cell>
          <table:table-cell table:number-columns-repeated="4"/>
        </table:table-row>
        <table:table-row table:style-name="ro1">
          <table:table-cell office:value-type="float" office:value="723.58935546875">
            <text:p>723.5893554688</text:p>
          </table:table-cell>
          <table:table-cell office:value-type="float" office:value="0.0009551222">
            <text:p>0.0009551222</text:p>
          </table:table-cell>
          <table:table-cell table:number-columns-repeated="4"/>
        </table:table-row>
        <table:table-row table:style-name="ro1">
          <table:table-cell office:value-type="float" office:value="723.709594726563">
            <text:p>723.7095947266</text:p>
          </table:table-cell>
          <table:table-cell office:value-type="float" office:value="-0.005081653">
            <text:p>-0.005081653</text:p>
          </table:table-cell>
          <table:table-cell table:number-columns-repeated="4"/>
        </table:table-row>
        <table:table-row table:style-name="ro1">
          <table:table-cell office:value-type="float" office:value="723.829772949219">
            <text:p>723.8297729492</text:p>
          </table:table-cell>
          <table:table-cell office:value-type="float" office:value="-0.005417388">
            <text:p>-0.005417388</text:p>
          </table:table-cell>
          <table:table-cell table:number-columns-repeated="4"/>
        </table:table-row>
        <table:table-row table:style-name="ro1">
          <table:table-cell office:value-type="float" office:value="723.950012207031">
            <text:p>723.950012207</text:p>
          </table:table-cell>
          <table:table-cell office:value-type="float" office:value="0.002754466">
            <text:p>0.002754466</text:p>
          </table:table-cell>
          <table:table-cell table:number-columns-repeated="4"/>
        </table:table-row>
        <table:table-row table:style-name="ro1">
          <table:table-cell office:value-type="float" office:value="724.070251464844">
            <text:p>724.0702514648</text:p>
          </table:table-cell>
          <table:table-cell office:value-type="string">
            <text:p>-8.73005E-05</text:p>
          </table:table-cell>
          <table:table-cell table:number-columns-repeated="4"/>
        </table:table-row>
        <table:table-row table:style-name="ro1">
          <table:table-cell office:value-type="float" office:value="724.190490722656">
            <text:p>724.1904907227</text:p>
          </table:table-cell>
          <table:table-cell office:value-type="float" office:value="-0.01130789">
            <text:p>-0.01130789</text:p>
          </table:table-cell>
          <table:table-cell table:number-columns-repeated="4"/>
        </table:table-row>
        <table:table-row table:style-name="ro1">
          <table:table-cell office:value-type="float" office:value="724.310729980469">
            <text:p>724.3107299805</text:p>
          </table:table-cell>
          <table:table-cell office:value-type="float" office:value="-0.006989196">
            <text:p>-0.006989196</text:p>
          </table:table-cell>
          <table:table-cell table:number-columns-repeated="4"/>
        </table:table-row>
        <table:table-row table:style-name="ro1">
          <table:table-cell office:value-type="float" office:value="724.430969238281">
            <text:p>724.4309692383</text:p>
          </table:table-cell>
          <table:table-cell office:value-type="float" office:value="-0.007488319">
            <text:p>-0.007488319</text:p>
          </table:table-cell>
          <table:table-cell table:number-columns-repeated="4"/>
        </table:table-row>
        <table:table-row table:style-name="ro1">
          <table:table-cell office:value-type="float" office:value="724.551208496094">
            <text:p>724.5512084961</text:p>
          </table:table-cell>
          <table:table-cell office:value-type="float" office:value="-0.009919258">
            <text:p>-0.009919258</text:p>
          </table:table-cell>
          <table:table-cell table:number-columns-repeated="4"/>
        </table:table-row>
        <table:table-row table:style-name="ro1">
          <table:table-cell office:value-type="float" office:value="724.671447753906">
            <text:p>724.6714477539</text:p>
          </table:table-cell>
          <table:table-cell office:value-type="float" office:value="0.006009767">
            <text:p>0.006009767</text:p>
          </table:table-cell>
          <table:table-cell table:number-columns-repeated="4"/>
        </table:table-row>
        <table:table-row table:style-name="ro1">
          <table:table-cell office:value-type="float" office:value="724.791687011719">
            <text:p>724.7916870117</text:p>
          </table:table-cell>
          <table:table-cell office:value-type="float" office:value="-0.008246771">
            <text:p>-0.008246771</text:p>
          </table:table-cell>
          <table:table-cell table:number-columns-repeated="4"/>
        </table:table-row>
        <table:table-row table:style-name="ro1">
          <table:table-cell office:value-type="float" office:value="724.911865234375">
            <text:p>724.9118652344</text:p>
          </table:table-cell>
          <table:table-cell office:value-type="float" office:value="-0.007552215">
            <text:p>-0.007552215</text:p>
          </table:table-cell>
          <table:table-cell table:number-columns-repeated="4"/>
        </table:table-row>
        <table:table-row table:style-name="ro1">
          <table:table-cell office:value-type="float" office:value="725.032104492188">
            <text:p>725.0321044922</text:p>
          </table:table-cell>
          <table:table-cell office:value-type="float" office:value="0.0032463">
            <text:p>0.0032463</text:p>
          </table:table-cell>
          <table:table-cell table:number-columns-repeated="4"/>
        </table:table-row>
        <table:table-row table:style-name="ro1">
          <table:table-cell office:value-type="float" office:value="725.15234375">
            <text:p>725.15234375</text:p>
          </table:table-cell>
          <table:table-cell office:value-type="float" office:value="-0.005879134">
            <text:p>-0.005879134</text:p>
          </table:table-cell>
          <table:table-cell table:number-columns-repeated="4"/>
        </table:table-row>
        <table:table-row table:style-name="ro1">
          <table:table-cell office:value-type="float" office:value="725.272583007813">
            <text:p>725.2725830078</text:p>
          </table:table-cell>
          <table:table-cell office:value-type="float" office:value="-0.007385758">
            <text:p>-0.007385758</text:p>
          </table:table-cell>
          <table:table-cell table:number-columns-repeated="4"/>
        </table:table-row>
        <table:table-row table:style-name="ro1">
          <table:table-cell office:value-type="float" office:value="725.392822265625">
            <text:p>725.3928222656</text:p>
          </table:table-cell>
          <table:table-cell office:value-type="float" office:value="0.02413652">
            <text:p>0.02413652</text:p>
          </table:table-cell>
          <table:table-cell table:number-columns-repeated="4"/>
        </table:table-row>
        <table:table-row table:style-name="ro1">
          <table:table-cell office:value-type="float" office:value="725.513061523438">
            <text:p>725.5130615234</text:p>
          </table:table-cell>
          <table:table-cell office:value-type="float" office:value="-0.001097088">
            <text:p>-0.001097088</text:p>
          </table:table-cell>
          <table:table-cell table:number-columns-repeated="4"/>
        </table:table-row>
        <table:table-row table:style-name="ro1">
          <table:table-cell office:value-type="float" office:value="725.63330078125">
            <text:p>725.6333007813</text:p>
          </table:table-cell>
          <table:table-cell office:value-type="float" office:value="-0.0004620033">
            <text:p>-0.0004620033</text:p>
          </table:table-cell>
          <table:table-cell table:number-columns-repeated="4"/>
        </table:table-row>
        <table:table-row table:style-name="ro1">
          <table:table-cell office:value-type="float" office:value="725.753540039063">
            <text:p>725.7535400391</text:p>
          </table:table-cell>
          <table:table-cell office:value-type="float" office:value="-0.006253814">
            <text:p>-0.006253814</text:p>
          </table:table-cell>
          <table:table-cell table:number-columns-repeated="4"/>
        </table:table-row>
        <table:table-row table:style-name="ro1">
          <table:table-cell office:value-type="float" office:value="725.873779296875">
            <text:p>725.8737792969</text:p>
          </table:table-cell>
          <table:table-cell office:value-type="float" office:value="0.001579891">
            <text:p>0.001579891</text:p>
          </table:table-cell>
          <table:table-cell table:number-columns-repeated="4"/>
        </table:table-row>
        <table:table-row table:style-name="ro1">
          <table:table-cell office:value-type="float" office:value="725.994018554688">
            <text:p>725.9940185547</text:p>
          </table:table-cell>
          <table:table-cell office:value-type="float" office:value="-0.001943266">
            <text:p>-0.001943266</text:p>
          </table:table-cell>
          <table:table-cell table:number-columns-repeated="4"/>
        </table:table-row>
        <table:table-row table:style-name="ro1">
          <table:table-cell office:value-type="float" office:value="726.1142578125">
            <text:p>726.1142578125</text:p>
          </table:table-cell>
          <table:table-cell office:value-type="float" office:value="0.0003536904">
            <text:p>0.0003536904</text:p>
          </table:table-cell>
          <table:table-cell table:number-columns-repeated="4"/>
        </table:table-row>
        <table:table-row table:style-name="ro1">
          <table:table-cell office:value-type="float" office:value="726.234497070313">
            <text:p>726.2344970703</text:p>
          </table:table-cell>
          <table:table-cell office:value-type="float" office:value="-0.003092263">
            <text:p>-0.003092263</text:p>
          </table:table-cell>
          <table:table-cell table:number-columns-repeated="4"/>
        </table:table-row>
        <table:table-row table:style-name="ro1">
          <table:table-cell office:value-type="float" office:value="726.354736328125">
            <text:p>726.3547363281</text:p>
          </table:table-cell>
          <table:table-cell office:value-type="float" office:value="0.008404505">
            <text:p>0.008404505</text:p>
          </table:table-cell>
          <table:table-cell table:number-columns-repeated="4"/>
        </table:table-row>
        <table:table-row table:style-name="ro1">
          <table:table-cell office:value-type="float" office:value="726.474975585938">
            <text:p>726.4749755859</text:p>
          </table:table-cell>
          <table:table-cell office:value-type="float" office:value="-0.0001792598">
            <text:p>-0.0001792598</text:p>
          </table:table-cell>
          <table:table-cell table:number-columns-repeated="4"/>
        </table:table-row>
        <table:table-row table:style-name="ro1">
          <table:table-cell office:value-type="float" office:value="726.59521484375">
            <text:p>726.5952148438</text:p>
          </table:table-cell>
          <table:table-cell office:value-type="float" office:value="0.0008695719">
            <text:p>0.0008695719</text:p>
          </table:table-cell>
          <table:table-cell table:number-columns-repeated="4"/>
        </table:table-row>
        <table:table-row table:style-name="ro1">
          <table:table-cell office:value-type="float" office:value="726.715454101563">
            <text:p>726.7154541016</text:p>
          </table:table-cell>
          <table:table-cell office:value-type="float" office:value="-0.003846493">
            <text:p>-0.003846493</text:p>
          </table:table-cell>
          <table:table-cell table:number-columns-repeated="4"/>
        </table:table-row>
        <table:table-row table:style-name="ro1">
          <table:table-cell office:value-type="float" office:value="726.835693359375">
            <text:p>726.8356933594</text:p>
          </table:table-cell>
          <table:table-cell office:value-type="float" office:value="-0.005042572">
            <text:p>-0.005042572</text:p>
          </table:table-cell>
          <table:table-cell table:number-columns-repeated="4"/>
        </table:table-row>
        <table:table-row table:style-name="ro1">
          <table:table-cell office:value-type="float" office:value="726.955932617188">
            <text:p>726.9559326172</text:p>
          </table:table-cell>
          <table:table-cell office:value-type="float" office:value="-0.009719428">
            <text:p>-0.009719428</text:p>
          </table:table-cell>
          <table:table-cell table:number-columns-repeated="4"/>
        </table:table-row>
        <table:table-row table:style-name="ro1">
          <table:table-cell office:value-type="float" office:value="727.076171875">
            <text:p>727.076171875</text:p>
          </table:table-cell>
          <table:table-cell office:value-type="float" office:value="0.005900511">
            <text:p>0.005900511</text:p>
          </table:table-cell>
          <table:table-cell table:number-columns-repeated="4"/>
        </table:table-row>
        <table:table-row table:style-name="ro1">
          <table:table-cell office:value-type="float" office:value="727.196411132813">
            <text:p>727.1964111328</text:p>
          </table:table-cell>
          <table:table-cell office:value-type="float" office:value="-0.001317637">
            <text:p>-0.001317637</text:p>
          </table:table-cell>
          <table:table-cell table:number-columns-repeated="4"/>
        </table:table-row>
        <table:table-row table:style-name="ro1">
          <table:table-cell office:value-type="float" office:value="727.316650390625">
            <text:p>727.3166503906</text:p>
          </table:table-cell>
          <table:table-cell office:value-type="float" office:value="0.01203322">
            <text:p>0.01203322</text:p>
          </table:table-cell>
          <table:table-cell table:number-columns-repeated="4"/>
        </table:table-row>
        <table:table-row table:style-name="ro1">
          <table:table-cell office:value-type="float" office:value="727.436889648438">
            <text:p>727.4368896484</text:p>
          </table:table-cell>
          <table:table-cell office:value-type="float" office:value="-0.0006781694">
            <text:p>-0.0006781694</text:p>
          </table:table-cell>
          <table:table-cell table:number-columns-repeated="4"/>
        </table:table-row>
        <table:table-row table:style-name="ro1">
          <table:table-cell office:value-type="float" office:value="727.55712890625">
            <text:p>727.5571289063</text:p>
          </table:table-cell>
          <table:table-cell office:value-type="float" office:value="-0.0004630262">
            <text:p>-0.0004630262</text:p>
          </table:table-cell>
          <table:table-cell table:number-columns-repeated="4"/>
        </table:table-row>
        <table:table-row table:style-name="ro1">
          <table:table-cell office:value-type="float" office:value="727.677368164063">
            <text:p>727.6773681641</text:p>
          </table:table-cell>
          <table:table-cell office:value-type="float" office:value="-0.0019773">
            <text:p>-0.0019773</text:p>
          </table:table-cell>
          <table:table-cell table:number-columns-repeated="4"/>
        </table:table-row>
        <table:table-row table:style-name="ro1">
          <table:table-cell office:value-type="float" office:value="727.797607421875">
            <text:p>727.7976074219</text:p>
          </table:table-cell>
          <table:table-cell office:value-type="float" office:value="-0.008118322">
            <text:p>-0.008118322</text:p>
          </table:table-cell>
          <table:table-cell table:number-columns-repeated="4"/>
        </table:table-row>
        <table:table-row table:style-name="ro1">
          <table:table-cell office:value-type="float" office:value="727.917846679688">
            <text:p>727.9178466797</text:p>
          </table:table-cell>
          <table:table-cell office:value-type="float" office:value="-0.01048734">
            <text:p>-0.01048734</text:p>
          </table:table-cell>
          <table:table-cell table:number-columns-repeated="4"/>
        </table:table-row>
        <table:table-row table:style-name="ro1">
          <table:table-cell office:value-type="float" office:value="728.0380859375">
            <text:p>728.0380859375</text:p>
          </table:table-cell>
          <table:table-cell office:value-type="float" office:value="0.002719382">
            <text:p>0.002719382</text:p>
          </table:table-cell>
          <table:table-cell table:number-columns-repeated="4"/>
        </table:table-row>
        <table:table-row table:style-name="ro1">
          <table:table-cell office:value-type="float" office:value="728.158325195313">
            <text:p>728.1583251953</text:p>
          </table:table-cell>
          <table:table-cell office:value-type="float" office:value="-0.008991357">
            <text:p>-0.008991357</text:p>
          </table:table-cell>
          <table:table-cell table:number-columns-repeated="4"/>
        </table:table-row>
        <table:table-row table:style-name="ro1">
          <table:table-cell office:value-type="float" office:value="728.278564453125">
            <text:p>728.2785644531</text:p>
          </table:table-cell>
          <table:table-cell office:value-type="float" office:value="-0.005148204">
            <text:p>-0.005148204</text:p>
          </table:table-cell>
          <table:table-cell table:number-columns-repeated="4"/>
        </table:table-row>
        <table:table-row table:style-name="ro1">
          <table:table-cell office:value-type="float" office:value="728.398803710938">
            <text:p>728.3988037109</text:p>
          </table:table-cell>
          <table:table-cell office:value-type="float" office:value="-0.007107205">
            <text:p>-0.007107205</text:p>
          </table:table-cell>
          <table:table-cell table:number-columns-repeated="4"/>
        </table:table-row>
        <table:table-row table:style-name="ro1">
          <table:table-cell office:value-type="float" office:value="728.51904296875">
            <text:p>728.5190429688</text:p>
          </table:table-cell>
          <table:table-cell office:value-type="float" office:value="0.005081158">
            <text:p>0.005081158</text:p>
          </table:table-cell>
          <table:table-cell table:number-columns-repeated="4"/>
        </table:table-row>
        <table:table-row table:style-name="ro1">
          <table:table-cell office:value-type="float" office:value="728.639282226563">
            <text:p>728.6392822266</text:p>
          </table:table-cell>
          <table:table-cell office:value-type="float" office:value="-0.007925573">
            <text:p>-0.007925573</text:p>
          </table:table-cell>
          <table:table-cell table:number-columns-repeated="4"/>
        </table:table-row>
        <table:table-row table:style-name="ro1">
          <table:table-cell office:value-type="float" office:value="728.759521484375">
            <text:p>728.7595214844</text:p>
          </table:table-cell>
          <table:table-cell office:value-type="float" office:value="0.001182809">
            <text:p>0.001182809</text:p>
          </table:table-cell>
          <table:table-cell table:number-columns-repeated="4"/>
        </table:table-row>
        <table:table-row table:style-name="ro1">
          <table:table-cell office:value-type="float" office:value="728.879760742188">
            <text:p>728.8797607422</text:p>
          </table:table-cell>
          <table:table-cell office:value-type="float" office:value="0.003000839">
            <text:p>0.003000839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006911931">
            <text:p>-0.006911931</text:p>
          </table:table-cell>
          <table:table-cell table:number-columns-repeated="4"/>
        </table:table-row>
        <table:table-row table:style-name="ro1">
          <table:table-cell office:value-type="float" office:value="729.120239257813">
            <text:p>729.1202392578</text:p>
          </table:table-cell>
          <table:table-cell office:value-type="float" office:value="0.0005170349">
            <text:p>0.0005170349</text:p>
          </table:table-cell>
          <table:table-cell table:number-columns-repeated="4"/>
        </table:table-row>
        <table:table-row table:style-name="ro1">
          <table:table-cell office:value-type="float" office:value="729.240478515625">
            <text:p>729.2404785156</text:p>
          </table:table-cell>
          <table:table-cell office:value-type="float" office:value="0.008405771">
            <text:p>0.008405771</text:p>
          </table:table-cell>
          <table:table-cell table:number-columns-repeated="4"/>
        </table:table-row>
        <table:table-row table:style-name="ro1">
          <table:table-cell office:value-type="float" office:value="729.360778808594">
            <text:p>729.3607788086</text:p>
          </table:table-cell>
          <table:table-cell office:value-type="float" office:value="0.003657047">
            <text:p>0.003657047</text:p>
          </table:table-cell>
          <table:table-cell table:number-columns-repeated="4"/>
        </table:table-row>
        <table:table-row table:style-name="ro1">
          <table:table-cell office:value-type="float" office:value="729.481018066406">
            <text:p>729.4810180664</text:p>
          </table:table-cell>
          <table:table-cell office:value-type="float" office:value="-0.0002249078">
            <text:p>-0.0002249078</text:p>
          </table:table-cell>
          <table:table-cell table:number-columns-repeated="4"/>
        </table:table-row>
        <table:table-row table:style-name="ro1">
          <table:table-cell office:value-type="float" office:value="729.601257324219">
            <text:p>729.6012573242</text:p>
          </table:table-cell>
          <table:table-cell office:value-type="float" office:value="0.006047328">
            <text:p>0.006047328</text:p>
          </table:table-cell>
          <table:table-cell table:number-columns-repeated="4"/>
        </table:table-row>
        <table:table-row table:style-name="ro1">
          <table:table-cell office:value-type="float" office:value="729.721496582031">
            <text:p>729.721496582</text:p>
          </table:table-cell>
          <table:table-cell office:value-type="float" office:value="0.02129818">
            <text:p>0.02129818</text:p>
          </table:table-cell>
          <table:table-cell table:number-columns-repeated="4"/>
        </table:table-row>
        <table:table-row table:style-name="ro1">
          <table:table-cell office:value-type="float" office:value="729.841735839844">
            <text:p>729.8417358398</text:p>
          </table:table-cell>
          <table:table-cell office:value-type="float" office:value="-0.006049477">
            <text:p>-0.006049477</text:p>
          </table:table-cell>
          <table:table-cell table:number-columns-repeated="4"/>
        </table:table-row>
        <table:table-row table:style-name="ro1">
          <table:table-cell office:value-type="float" office:value="729.961975097656">
            <text:p>729.9619750977</text:p>
          </table:table-cell>
          <table:table-cell office:value-type="float" office:value="-0.006984904">
            <text:p>-0.006984904</text:p>
          </table:table-cell>
          <table:table-cell table:number-columns-repeated="4"/>
        </table:table-row>
        <table:table-row table:style-name="ro1">
          <table:table-cell office:value-type="float" office:value="730.082214355469">
            <text:p>730.0822143555</text:p>
          </table:table-cell>
          <table:table-cell office:value-type="float" office:value="0.01036055">
            <text:p>0.01036055</text:p>
          </table:table-cell>
          <table:table-cell table:number-columns-repeated="4"/>
        </table:table-row>
        <table:table-row table:style-name="ro1">
          <table:table-cell office:value-type="float" office:value="730.202453613281">
            <text:p>730.2024536133</text:p>
          </table:table-cell>
          <table:table-cell office:value-type="float" office:value="0.00443463">
            <text:p>0.00443463</text:p>
          </table:table-cell>
          <table:table-cell table:number-columns-repeated="4"/>
        </table:table-row>
        <table:table-row table:style-name="ro1">
          <table:table-cell office:value-type="float" office:value="730.322692871094">
            <text:p>730.3226928711</text:p>
          </table:table-cell>
          <table:table-cell office:value-type="float" office:value="-0.001834278">
            <text:p>-0.001834278</text:p>
          </table:table-cell>
          <table:table-cell table:number-columns-repeated="4"/>
        </table:table-row>
        <table:table-row table:style-name="ro1">
          <table:table-cell office:value-type="float" office:value="730.442932128906">
            <text:p>730.4429321289</text:p>
          </table:table-cell>
          <table:table-cell office:value-type="float" office:value="0.001841311">
            <text:p>0.001841311</text:p>
          </table:table-cell>
          <table:table-cell table:number-columns-repeated="4"/>
        </table:table-row>
        <table:table-row table:style-name="ro1">
          <table:table-cell office:value-type="float" office:value="730.563171386719">
            <text:p>730.5631713867</text:p>
          </table:table-cell>
          <table:table-cell office:value-type="float" office:value="0.005540589">
            <text:p>0.005540589</text:p>
          </table:table-cell>
          <table:table-cell table:number-columns-repeated="4"/>
        </table:table-row>
        <table:table-row table:style-name="ro1">
          <table:table-cell office:value-type="float" office:value="730.683471679688">
            <text:p>730.6834716797</text:p>
          </table:table-cell>
          <table:table-cell office:value-type="float" office:value="-0.001500347">
            <text:p>-0.001500347</text:p>
          </table:table-cell>
          <table:table-cell table:number-columns-repeated="4"/>
        </table:table-row>
        <table:table-row table:style-name="ro1">
          <table:table-cell office:value-type="float" office:value="730.8037109375">
            <text:p>730.8037109375</text:p>
          </table:table-cell>
          <table:table-cell office:value-type="float" office:value="0.01104448">
            <text:p>0.01104448</text:p>
          </table:table-cell>
          <table:table-cell table:number-columns-repeated="4"/>
        </table:table-row>
        <table:table-row table:style-name="ro1">
          <table:table-cell office:value-type="float" office:value="730.923950195313">
            <text:p>730.9239501953</text:p>
          </table:table-cell>
          <table:table-cell office:value-type="float" office:value="0.005827894">
            <text:p>0.005827894</text:p>
          </table:table-cell>
          <table:table-cell table:number-columns-repeated="4"/>
        </table:table-row>
        <table:table-row table:style-name="ro1">
          <table:table-cell office:value-type="float" office:value="731.044189453125">
            <text:p>731.0441894531</text:p>
          </table:table-cell>
          <table:table-cell office:value-type="float" office:value="0.01305194">
            <text:p>0.01305194</text:p>
          </table:table-cell>
          <table:table-cell table:number-columns-repeated="4"/>
        </table:table-row>
        <table:table-row table:style-name="ro1">
          <table:table-cell office:value-type="float" office:value="731.164428710938">
            <text:p>731.1644287109</text:p>
          </table:table-cell>
          <table:table-cell office:value-type="float" office:value="-0.004298528">
            <text:p>-0.004298528</text:p>
          </table:table-cell>
          <table:table-cell table:number-columns-repeated="4"/>
        </table:table-row>
        <table:table-row table:style-name="ro1">
          <table:table-cell office:value-type="float" office:value="731.28466796875">
            <text:p>731.2846679688</text:p>
          </table:table-cell>
          <table:table-cell office:value-type="float" office:value="0.001183161">
            <text:p>0.001183161</text:p>
          </table:table-cell>
          <table:table-cell table:number-columns-repeated="4"/>
        </table:table-row>
        <table:table-row table:style-name="ro1">
          <table:table-cell office:value-type="float" office:value="731.404907226563">
            <text:p>731.4049072266</text:p>
          </table:table-cell>
          <table:table-cell office:value-type="float" office:value="-0.006029335">
            <text:p>-0.006029335</text:p>
          </table:table-cell>
          <table:table-cell table:number-columns-repeated="4"/>
        </table:table-row>
        <table:table-row table:style-name="ro1">
          <table:table-cell office:value-type="float" office:value="731.525146484375">
            <text:p>731.5251464844</text:p>
          </table:table-cell>
          <table:table-cell office:value-type="float" office:value="-0.002386479">
            <text:p>-0.002386479</text:p>
          </table:table-cell>
          <table:table-cell table:number-columns-repeated="4"/>
        </table:table-row>
        <table:table-row table:style-name="ro1">
          <table:table-cell office:value-type="float" office:value="731.645446777344">
            <text:p>731.6454467773</text:p>
          </table:table-cell>
          <table:table-cell office:value-type="float" office:value="0.007384975">
            <text:p>0.007384975</text:p>
          </table:table-cell>
          <table:table-cell table:number-columns-repeated="4"/>
        </table:table-row>
        <table:table-row table:style-name="ro1">
          <table:table-cell office:value-type="float" office:value="731.765686035156">
            <text:p>731.7656860352</text:p>
          </table:table-cell>
          <table:table-cell office:value-type="float" office:value="0.007711096">
            <text:p>0.007711096</text:p>
          </table:table-cell>
          <table:table-cell table:number-columns-repeated="4"/>
        </table:table-row>
        <table:table-row table:style-name="ro1">
          <table:table-cell office:value-type="float" office:value="731.885925292969">
            <text:p>731.885925293</text:p>
          </table:table-cell>
          <table:table-cell office:value-type="float" office:value="0.004918856">
            <text:p>0.004918856</text:p>
          </table:table-cell>
          <table:table-cell table:number-columns-repeated="4"/>
        </table:table-row>
        <table:table-row table:style-name="ro1">
          <table:table-cell office:value-type="float" office:value="732.006164550781">
            <text:p>732.0061645508</text:p>
          </table:table-cell>
          <table:table-cell office:value-type="float" office:value="-0.003612084">
            <text:p>-0.003612084</text:p>
          </table:table-cell>
          <table:table-cell table:number-columns-repeated="4"/>
        </table:table-row>
        <table:table-row table:style-name="ro1">
          <table:table-cell office:value-type="float" office:value="732.126403808594">
            <text:p>732.1264038086</text:p>
          </table:table-cell>
          <table:table-cell office:value-type="float" office:value="0.01650825">
            <text:p>0.01650825</text:p>
          </table:table-cell>
          <table:table-cell table:number-columns-repeated="4"/>
        </table:table-row>
        <table:table-row table:style-name="ro1">
          <table:table-cell office:value-type="float" office:value="732.246643066406">
            <text:p>732.2466430664</text:p>
          </table:table-cell>
          <table:table-cell office:value-type="float" office:value="-0.004344833">
            <text:p>-0.004344833</text:p>
          </table:table-cell>
          <table:table-cell table:number-columns-repeated="4"/>
        </table:table-row>
        <table:table-row table:style-name="ro1">
          <table:table-cell office:value-type="float" office:value="732.366882324219">
            <text:p>732.3668823242</text:p>
          </table:table-cell>
          <table:table-cell office:value-type="float" office:value="-0.004941131">
            <text:p>-0.004941131</text:p>
          </table:table-cell>
          <table:table-cell table:number-columns-repeated="4"/>
        </table:table-row>
        <table:table-row table:style-name="ro1">
          <table:table-cell office:value-type="float" office:value="732.487182617188">
            <text:p>732.4871826172</text:p>
          </table:table-cell>
          <table:table-cell office:value-type="float" office:value="-0.005945861">
            <text:p>-0.005945861</text:p>
          </table:table-cell>
          <table:table-cell table:number-columns-repeated="4"/>
        </table:table-row>
        <table:table-row table:style-name="ro1">
          <table:table-cell office:value-type="float" office:value="732.607421875">
            <text:p>732.607421875</text:p>
          </table:table-cell>
          <table:table-cell office:value-type="float" office:value="-0.002103439">
            <text:p>-0.002103439</text:p>
          </table:table-cell>
          <table:table-cell table:number-columns-repeated="4"/>
        </table:table-row>
        <table:table-row table:style-name="ro1">
          <table:table-cell office:value-type="float" office:value="732.727661132813">
            <text:p>732.7276611328</text:p>
          </table:table-cell>
          <table:table-cell office:value-type="float" office:value="0.002912742">
            <text:p>0.002912742</text:p>
          </table:table-cell>
          <table:table-cell table:number-columns-repeated="4"/>
        </table:table-row>
        <table:table-row table:style-name="ro1">
          <table:table-cell office:value-type="float" office:value="732.847900390625">
            <text:p>732.8479003906</text:p>
          </table:table-cell>
          <table:table-cell office:value-type="float" office:value="-0.003309276">
            <text:p>-0.003309276</text:p>
          </table:table-cell>
          <table:table-cell table:number-columns-repeated="4"/>
        </table:table-row>
        <table:table-row table:style-name="ro1">
          <table:table-cell office:value-type="float" office:value="732.968139648438">
            <text:p>732.9681396484</text:p>
          </table:table-cell>
          <table:table-cell office:value-type="float" office:value="-0.002241394">
            <text:p>-0.002241394</text:p>
          </table:table-cell>
          <table:table-cell table:number-columns-repeated="4"/>
        </table:table-row>
        <table:table-row table:style-name="ro1">
          <table:table-cell office:value-type="float" office:value="733.08837890625">
            <text:p>733.0883789063</text:p>
          </table:table-cell>
          <table:table-cell office:value-type="float" office:value="-0.004652891">
            <text:p>-0.004652891</text:p>
          </table:table-cell>
          <table:table-cell table:number-columns-repeated="4"/>
        </table:table-row>
        <table:table-row table:style-name="ro1">
          <table:table-cell office:value-type="float" office:value="733.208679199219">
            <text:p>733.2086791992</text:p>
          </table:table-cell>
          <table:table-cell office:value-type="float" office:value="-0.007228847">
            <text:p>-0.007228847</text:p>
          </table:table-cell>
          <table:table-cell table:number-columns-repeated="4"/>
        </table:table-row>
        <table:table-row table:style-name="ro1">
          <table:table-cell office:value-type="float" office:value="733.328918457031">
            <text:p>733.328918457</text:p>
          </table:table-cell>
          <table:table-cell office:value-type="float" office:value="-0.003851352">
            <text:p>-0.003851352</text:p>
          </table:table-cell>
          <table:table-cell table:number-columns-repeated="4"/>
        </table:table-row>
        <table:table-row table:style-name="ro1">
          <table:table-cell office:value-type="float" office:value="733.449157714844">
            <text:p>733.4491577148</text:p>
          </table:table-cell>
          <table:table-cell office:value-type="float" office:value="-0.0007149528">
            <text:p>-0.0007149528</text:p>
          </table:table-cell>
          <table:table-cell table:number-columns-repeated="4"/>
        </table:table-row>
        <table:table-row table:style-name="ro1">
          <table:table-cell office:value-type="float" office:value="733.569396972656">
            <text:p>733.5693969727</text:p>
          </table:table-cell>
          <table:table-cell office:value-type="float" office:value="0.001947925">
            <text:p>0.001947925</text:p>
          </table:table-cell>
          <table:table-cell table:number-columns-repeated="4"/>
        </table:table-row>
        <table:table-row table:style-name="ro1">
          <table:table-cell office:value-type="float" office:value="733.689636230469">
            <text:p>733.6896362305</text:p>
          </table:table-cell>
          <table:table-cell office:value-type="float" office:value="-0.00165047">
            <text:p>-0.00165047</text:p>
          </table:table-cell>
          <table:table-cell table:number-columns-repeated="4"/>
        </table:table-row>
        <table:table-row table:style-name="ro1">
          <table:table-cell office:value-type="float" office:value="733.809936523438">
            <text:p>733.8099365234</text:p>
          </table:table-cell>
          <table:table-cell office:value-type="float" office:value="-0.0003005078">
            <text:p>-0.0003005078</text:p>
          </table:table-cell>
          <table:table-cell table:number-columns-repeated="4"/>
        </table:table-row>
        <table:table-row table:style-name="ro1">
          <table:table-cell office:value-type="float" office:value="733.93017578125">
            <text:p>733.9301757813</text:p>
          </table:table-cell>
          <table:table-cell office:value-type="float" office:value="0.006913033">
            <text:p>0.006913033</text:p>
          </table:table-cell>
          <table:table-cell table:number-columns-repeated="4"/>
        </table:table-row>
        <table:table-row table:style-name="ro1">
          <table:table-cell office:value-type="float" office:value="734.050415039063">
            <text:p>734.0504150391</text:p>
          </table:table-cell>
          <table:table-cell office:value-type="float" office:value="0.0006816708">
            <text:p>0.0006816708</text:p>
          </table:table-cell>
          <table:table-cell table:number-columns-repeated="4"/>
        </table:table-row>
        <table:table-row table:style-name="ro1">
          <table:table-cell office:value-type="float" office:value="734.170654296875">
            <text:p>734.1706542969</text:p>
          </table:table-cell>
          <table:table-cell office:value-type="float" office:value="0.006218764">
            <text:p>0.006218764</text:p>
          </table:table-cell>
          <table:table-cell table:number-columns-repeated="4"/>
        </table:table-row>
        <table:table-row table:style-name="ro1">
          <table:table-cell office:value-type="float" office:value="734.290893554688">
            <text:p>734.2908935547</text:p>
          </table:table-cell>
          <table:table-cell office:value-type="float" office:value="-0.007427709">
            <text:p>-0.007427709</text:p>
          </table:table-cell>
          <table:table-cell table:number-columns-repeated="4"/>
        </table:table-row>
        <table:table-row table:style-name="ro1">
          <table:table-cell office:value-type="float" office:value="734.4111328125">
            <text:p>734.4111328125</text:p>
          </table:table-cell>
          <table:table-cell office:value-type="float" office:value="-0.00852704">
            <text:p>-0.00852704</text:p>
          </table:table-cell>
          <table:table-cell table:number-columns-repeated="4"/>
        </table:table-row>
        <table:table-row table:style-name="ro1">
          <table:table-cell office:value-type="float" office:value="734.531433105469">
            <text:p>734.5314331055</text:p>
          </table:table-cell>
          <table:table-cell office:value-type="float" office:value="-0.001950108">
            <text:p>-0.001950108</text:p>
          </table:table-cell>
          <table:table-cell table:number-columns-repeated="4"/>
        </table:table-row>
        <table:table-row table:style-name="ro1">
          <table:table-cell office:value-type="float" office:value="734.651672363281">
            <text:p>734.6516723633</text:p>
          </table:table-cell>
          <table:table-cell office:value-type="float" office:value="0.005777596">
            <text:p>0.005777596</text:p>
          </table:table-cell>
          <table:table-cell table:number-columns-repeated="4"/>
        </table:table-row>
        <table:table-row table:style-name="ro1">
          <table:table-cell office:value-type="float" office:value="734.771911621094">
            <text:p>734.7719116211</text:p>
          </table:table-cell>
          <table:table-cell office:value-type="float" office:value="-0.0004166015">
            <text:p>-0.0004166015</text:p>
          </table:table-cell>
          <table:table-cell table:number-columns-repeated="4"/>
        </table:table-row>
        <table:table-row table:style-name="ro1">
          <table:table-cell office:value-type="float" office:value="734.892150878906">
            <text:p>734.8921508789</text:p>
          </table:table-cell>
          <table:table-cell office:value-type="float" office:value="-0.0065566">
            <text:p>-0.0065566</text:p>
          </table:table-cell>
          <table:table-cell table:number-columns-repeated="4"/>
        </table:table-row>
        <table:table-row table:style-name="ro1">
          <table:table-cell office:value-type="float" office:value="735.012451171875">
            <text:p>735.0124511719</text:p>
          </table:table-cell>
          <table:table-cell office:value-type="float" office:value="-0.006725311">
            <text:p>-0.006725311</text:p>
          </table:table-cell>
          <table:table-cell table:number-columns-repeated="4"/>
        </table:table-row>
        <table:table-row table:style-name="ro1">
          <table:table-cell office:value-type="float" office:value="735.132690429688">
            <text:p>735.1326904297</text:p>
          </table:table-cell>
          <table:table-cell office:value-type="float" office:value="-0.001563203">
            <text:p>-0.001563203</text:p>
          </table:table-cell>
          <table:table-cell table:number-columns-repeated="4"/>
        </table:table-row>
        <table:table-row table:style-name="ro1">
          <table:table-cell office:value-type="float" office:value="735.2529296875">
            <text:p>735.2529296875</text:p>
          </table:table-cell>
          <table:table-cell office:value-type="float" office:value="0.01648072">
            <text:p>0.01648072</text:p>
          </table:table-cell>
          <table:table-cell table:number-columns-repeated="4"/>
        </table:table-row>
        <table:table-row table:style-name="ro1">
          <table:table-cell office:value-type="float" office:value="735.373168945313">
            <text:p>735.3731689453</text:p>
          </table:table-cell>
          <table:table-cell office:value-type="float" office:value="0.003209741">
            <text:p>0.003209741</text:p>
          </table:table-cell>
          <table:table-cell table:number-columns-repeated="4"/>
        </table:table-row>
        <table:table-row table:style-name="ro1">
          <table:table-cell office:value-type="float" office:value="735.493408203125">
            <text:p>735.4934082031</text:p>
          </table:table-cell>
          <table:table-cell office:value-type="float" office:value="-0.001372446">
            <text:p>-0.001372446</text:p>
          </table:table-cell>
          <table:table-cell table:number-columns-repeated="4"/>
        </table:table-row>
        <table:table-row table:style-name="ro1">
          <table:table-cell office:value-type="float" office:value="735.613708496094">
            <text:p>735.6137084961</text:p>
          </table:table-cell>
          <table:table-cell office:value-type="float" office:value="0.003074988">
            <text:p>0.003074988</text:p>
          </table:table-cell>
          <table:table-cell table:number-columns-repeated="4"/>
        </table:table-row>
        <table:table-row table:style-name="ro1">
          <table:table-cell office:value-type="float" office:value="735.733947753906">
            <text:p>735.7339477539</text:p>
          </table:table-cell>
          <table:table-cell office:value-type="float" office:value="0.004959842">
            <text:p>0.004959842</text:p>
          </table:table-cell>
          <table:table-cell table:number-columns-repeated="4"/>
        </table:table-row>
        <table:table-row table:style-name="ro1">
          <table:table-cell office:value-type="float" office:value="735.854187011719">
            <text:p>735.8541870117</text:p>
          </table:table-cell>
          <table:table-cell office:value-type="float" office:value="0.007795892">
            <text:p>0.007795892</text:p>
          </table:table-cell>
          <table:table-cell table:number-columns-repeated="4"/>
        </table:table-row>
        <table:table-row table:style-name="ro1">
          <table:table-cell office:value-type="float" office:value="735.974426269531">
            <text:p>735.9744262695</text:p>
          </table:table-cell>
          <table:table-cell office:value-type="float" office:value="0.002447729">
            <text:p>0.002447729</text:p>
          </table:table-cell>
          <table:table-cell table:number-columns-repeated="4"/>
        </table:table-row>
        <table:table-row table:style-name="ro1">
          <table:table-cell office:value-type="float" office:value="736.094665527344">
            <text:p>736.0946655273</text:p>
          </table:table-cell>
          <table:table-cell office:value-type="float" office:value="0.003573885">
            <text:p>0.003573885</text:p>
          </table:table-cell>
          <table:table-cell table:number-columns-repeated="4"/>
        </table:table-row>
        <table:table-row table:style-name="ro1">
          <table:table-cell office:value-type="float" office:value="736.214965820313">
            <text:p>736.2149658203</text:p>
          </table:table-cell>
          <table:table-cell office:value-type="float" office:value="-0.005106207">
            <text:p>-0.005106207</text:p>
          </table:table-cell>
          <table:table-cell table:number-columns-repeated="4"/>
        </table:table-row>
        <table:table-row table:style-name="ro1">
          <table:table-cell office:value-type="float" office:value="736.335205078125">
            <text:p>736.3352050781</text:p>
          </table:table-cell>
          <table:table-cell office:value-type="float" office:value="0.0006120636">
            <text:p>0.0006120636</text:p>
          </table:table-cell>
          <table:table-cell table:number-columns-repeated="4"/>
        </table:table-row>
        <table:table-row table:style-name="ro1">
          <table:table-cell office:value-type="float" office:value="736.455444335938">
            <text:p>736.4554443359</text:p>
          </table:table-cell>
          <table:table-cell office:value-type="float" office:value="0.004409553">
            <text:p>0.004409553</text:p>
          </table:table-cell>
          <table:table-cell table:number-columns-repeated="4"/>
        </table:table-row>
        <table:table-row table:style-name="ro1">
          <table:table-cell office:value-type="float" office:value="736.57568359375">
            <text:p>736.5756835938</text:p>
          </table:table-cell>
          <table:table-cell office:value-type="float" office:value="0.002871979">
            <text:p>0.002871979</text:p>
          </table:table-cell>
          <table:table-cell table:number-columns-repeated="4"/>
        </table:table-row>
        <table:table-row table:style-name="ro1">
          <table:table-cell office:value-type="float" office:value="736.695983886719">
            <text:p>736.6959838867</text:p>
          </table:table-cell>
          <table:table-cell office:value-type="float" office:value="0.01062943">
            <text:p>0.01062943</text:p>
          </table:table-cell>
          <table:table-cell table:number-columns-repeated="4"/>
        </table:table-row>
        <table:table-row table:style-name="ro1">
          <table:table-cell office:value-type="float" office:value="736.816223144531">
            <text:p>736.8162231445</text:p>
          </table:table-cell>
          <table:table-cell office:value-type="float" office:value="0.006825048">
            <text:p>0.006825048</text:p>
          </table:table-cell>
          <table:table-cell table:number-columns-repeated="4"/>
        </table:table-row>
        <table:table-row table:style-name="ro1">
          <table:table-cell office:value-type="float" office:value="736.936462402344">
            <text:p>736.9364624023</text:p>
          </table:table-cell>
          <table:table-cell office:value-type="float" office:value="0.009879665">
            <text:p>0.009879665</text:p>
          </table:table-cell>
          <table:table-cell table:number-columns-repeated="4"/>
        </table:table-row>
        <table:table-row table:style-name="ro1">
          <table:table-cell office:value-type="float" office:value="737.056701660156">
            <text:p>737.0567016602</text:p>
          </table:table-cell>
          <table:table-cell office:value-type="float" office:value="-0.000708078">
            <text:p>-0.000708078</text:p>
          </table:table-cell>
          <table:table-cell table:number-columns-repeated="4"/>
        </table:table-row>
        <table:table-row table:style-name="ro1">
          <table:table-cell office:value-type="float" office:value="737.177001953125">
            <text:p>737.1770019531</text:p>
          </table:table-cell>
          <table:table-cell office:value-type="float" office:value="0.004358981">
            <text:p>0.004358981</text:p>
          </table:table-cell>
          <table:table-cell table:number-columns-repeated="4"/>
        </table:table-row>
        <table:table-row table:style-name="ro1">
          <table:table-cell office:value-type="float" office:value="737.297241210938">
            <text:p>737.2972412109</text:p>
          </table:table-cell>
          <table:table-cell office:value-type="float" office:value="0.005453724">
            <text:p>0.005453724</text:p>
          </table:table-cell>
          <table:table-cell table:number-columns-repeated="4"/>
        </table:table-row>
        <table:table-row table:style-name="ro1">
          <table:table-cell office:value-type="float" office:value="737.41748046875">
            <text:p>737.4174804688</text:p>
          </table:table-cell>
          <table:table-cell office:value-type="float" office:value="0.003273494">
            <text:p>0.003273494</text:p>
          </table:table-cell>
          <table:table-cell table:number-columns-repeated="4"/>
        </table:table-row>
        <table:table-row table:style-name="ro1">
          <table:table-cell office:value-type="float" office:value="737.537719726563">
            <text:p>737.5377197266</text:p>
          </table:table-cell>
          <table:table-cell office:value-type="float" office:value="0.003140363">
            <text:p>0.003140363</text:p>
          </table:table-cell>
          <table:table-cell table:number-columns-repeated="4"/>
        </table:table-row>
        <table:table-row table:style-name="ro1">
          <table:table-cell office:value-type="float" office:value="737.658020019531">
            <text:p>737.6580200195</text:p>
          </table:table-cell>
          <table:table-cell office:value-type="float" office:value="-0.00769207">
            <text:p>-0.00769207</text:p>
          </table:table-cell>
          <table:table-cell table:number-columns-repeated="4"/>
        </table:table-row>
        <table:table-row table:style-name="ro1">
          <table:table-cell office:value-type="float" office:value="737.778259277344">
            <text:p>737.7782592773</text:p>
          </table:table-cell>
          <table:table-cell office:value-type="float" office:value="0.005496084">
            <text:p>0.005496084</text:p>
          </table:table-cell>
          <table:table-cell table:number-columns-repeated="4"/>
        </table:table-row>
        <table:table-row table:style-name="ro1">
          <table:table-cell office:value-type="float" office:value="737.898498535156">
            <text:p>737.8984985352</text:p>
          </table:table-cell>
          <table:table-cell office:value-type="float" office:value="0.001626431">
            <text:p>0.001626431</text:p>
          </table:table-cell>
          <table:table-cell table:number-columns-repeated="4"/>
        </table:table-row>
        <table:table-row table:style-name="ro1">
          <table:table-cell office:value-type="float" office:value="738.018737792969">
            <text:p>738.018737793</text:p>
          </table:table-cell>
          <table:table-cell office:value-type="float" office:value="0.004030226">
            <text:p>0.004030226</text:p>
          </table:table-cell>
          <table:table-cell table:number-columns-repeated="4"/>
        </table:table-row>
        <table:table-row table:style-name="ro1">
          <table:table-cell office:value-type="float" office:value="738.139038085938">
            <text:p>738.1390380859</text:p>
          </table:table-cell>
          <table:table-cell office:value-type="float" office:value="0.00491368">
            <text:p>0.00491368</text:p>
          </table:table-cell>
          <table:table-cell table:number-columns-repeated="4"/>
        </table:table-row>
        <table:table-row table:style-name="ro1">
          <table:table-cell office:value-type="float" office:value="738.25927734375">
            <text:p>738.2592773438</text:p>
          </table:table-cell>
          <table:table-cell office:value-type="float" office:value="-0.0009747098">
            <text:p>-0.0009747098</text:p>
          </table:table-cell>
          <table:table-cell table:number-columns-repeated="4"/>
        </table:table-row>
        <table:table-row table:style-name="ro1">
          <table:table-cell office:value-type="float" office:value="738.379516601563">
            <text:p>738.3795166016</text:p>
          </table:table-cell>
          <table:table-cell office:value-type="float" office:value="0.01454097">
            <text:p>0.01454097</text:p>
          </table:table-cell>
          <table:table-cell table:number-columns-repeated="4"/>
        </table:table-row>
        <table:table-row table:style-name="ro1">
          <table:table-cell office:value-type="float" office:value="738.499755859375">
            <text:p>738.4997558594</text:p>
          </table:table-cell>
          <table:table-cell office:value-type="float" office:value="0.004493607">
            <text:p>0.004493607</text:p>
          </table:table-cell>
          <table:table-cell table:number-columns-repeated="4"/>
        </table:table-row>
        <table:table-row table:style-name="ro1">
          <table:table-cell office:value-type="float" office:value="738.620056152344">
            <text:p>738.6200561523</text:p>
          </table:table-cell>
          <table:table-cell office:value-type="float" office:value="-0.004029883">
            <text:p>-0.004029883</text:p>
          </table:table-cell>
          <table:table-cell table:number-columns-repeated="4"/>
        </table:table-row>
        <table:table-row table:style-name="ro1">
          <table:table-cell office:value-type="float" office:value="738.740295410156">
            <text:p>738.7402954102</text:p>
          </table:table-cell>
          <table:table-cell office:value-type="float" office:value="-0.0009578957">
            <text:p>-0.0009578957</text:p>
          </table:table-cell>
          <table:table-cell table:number-columns-repeated="4"/>
        </table:table-row>
        <table:table-row table:style-name="ro1">
          <table:table-cell office:value-type="float" office:value="738.860534667969">
            <text:p>738.860534668</text:p>
          </table:table-cell>
          <table:table-cell office:value-type="float" office:value="-0.005382779">
            <text:p>-0.005382779</text:p>
          </table:table-cell>
          <table:table-cell table:number-columns-repeated="4"/>
        </table:table-row>
        <table:table-row table:style-name="ro1">
          <table:table-cell office:value-type="float" office:value="738.980773925781">
            <text:p>738.9807739258</text:p>
          </table:table-cell>
          <table:table-cell office:value-type="float" office:value="0.01120483">
            <text:p>0.01120483</text:p>
          </table:table-cell>
          <table:table-cell table:number-columns-repeated="4"/>
        </table:table-row>
        <table:table-row table:style-name="ro1">
          <table:table-cell office:value-type="float" office:value="739.10107421875">
            <text:p>739.1010742188</text:p>
          </table:table-cell>
          <table:table-cell office:value-type="float" office:value="-0.003518251">
            <text:p>-0.003518251</text:p>
          </table:table-cell>
          <table:table-cell table:number-columns-repeated="4"/>
        </table:table-row>
        <table:table-row table:style-name="ro1">
          <table:table-cell office:value-type="float" office:value="739.221313476563">
            <text:p>739.2213134766</text:p>
          </table:table-cell>
          <table:table-cell office:value-type="float" office:value="0.006592175">
            <text:p>0.006592175</text:p>
          </table:table-cell>
          <table:table-cell table:number-columns-repeated="4"/>
        </table:table-row>
        <table:table-row table:style-name="ro1">
          <table:table-cell office:value-type="float" office:value="739.341552734375">
            <text:p>739.3415527344</text:p>
          </table:table-cell>
          <table:table-cell office:value-type="float" office:value="0.0004219916">
            <text:p>0.0004219916</text:p>
          </table:table-cell>
          <table:table-cell table:number-columns-repeated="4"/>
        </table:table-row>
        <table:table-row table:style-name="ro1">
          <table:table-cell office:value-type="float" office:value="739.461791992188">
            <text:p>739.4617919922</text:p>
          </table:table-cell>
          <table:table-cell office:value-type="float" office:value="-0.0002235615">
            <text:p>-0.0002235615</text:p>
          </table:table-cell>
          <table:table-cell table:number-columns-repeated="4"/>
        </table:table-row>
        <table:table-row table:style-name="ro1">
          <table:table-cell office:value-type="float" office:value="739.582092285156">
            <text:p>739.5820922852</text:p>
          </table:table-cell>
          <table:table-cell office:value-type="float" office:value="-0.004375155">
            <text:p>-0.004375155</text:p>
          </table:table-cell>
          <table:table-cell table:number-columns-repeated="4"/>
        </table:table-row>
        <table:table-row table:style-name="ro1">
          <table:table-cell office:value-type="float" office:value="739.702331542969">
            <text:p>739.702331543</text:p>
          </table:table-cell>
          <table:table-cell office:value-type="float" office:value="-0.009308999">
            <text:p>-0.009308999</text:p>
          </table:table-cell>
          <table:table-cell table:number-columns-repeated="4"/>
        </table:table-row>
        <table:table-row table:style-name="ro1">
          <table:table-cell office:value-type="float" office:value="739.822570800781">
            <text:p>739.8225708008</text:p>
          </table:table-cell>
          <table:table-cell office:value-type="float" office:value="-0.00330239">
            <text:p>-0.00330239</text:p>
          </table:table-cell>
          <table:table-cell table:number-columns-repeated="4"/>
        </table:table-row>
        <table:table-row table:style-name="ro1">
          <table:table-cell office:value-type="float" office:value="739.942810058594">
            <text:p>739.9428100586</text:p>
          </table:table-cell>
          <table:table-cell office:value-type="float" office:value="-0.009422373">
            <text:p>-0.009422373</text:p>
          </table:table-cell>
          <table:table-cell table:number-columns-repeated="4"/>
        </table:table-row>
        <table:table-row table:style-name="ro1">
          <table:table-cell office:value-type="float" office:value="740.063110351563">
            <text:p>740.0631103516</text:p>
          </table:table-cell>
          <table:table-cell office:value-type="float" office:value="-0.004590552">
            <text:p>-0.004590552</text:p>
          </table:table-cell>
          <table:table-cell table:number-columns-repeated="4"/>
        </table:table-row>
        <table:table-row table:style-name="ro1">
          <table:table-cell office:value-type="float" office:value="740.183349609375">
            <text:p>740.1833496094</text:p>
          </table:table-cell>
          <table:table-cell office:value-type="float" office:value="-0.002303094">
            <text:p>-0.002303094</text:p>
          </table:table-cell>
          <table:table-cell table:number-columns-repeated="4"/>
        </table:table-row>
        <table:table-row table:style-name="ro1">
          <table:table-cell office:value-type="float" office:value="740.303588867188">
            <text:p>740.3035888672</text:p>
          </table:table-cell>
          <table:table-cell office:value-type="float" office:value="-0.0006439621">
            <text:p>-0.0006439621</text:p>
          </table:table-cell>
          <table:table-cell table:number-columns-repeated="4"/>
        </table:table-row>
        <table:table-row table:style-name="ro1">
          <table:table-cell office:value-type="float" office:value="740.423889160156">
            <text:p>740.4238891602</text:p>
          </table:table-cell>
          <table:table-cell office:value-type="float" office:value="0.008570463">
            <text:p>0.008570463</text:p>
          </table:table-cell>
          <table:table-cell table:number-columns-repeated="4"/>
        </table:table-row>
        <table:table-row table:style-name="ro1">
          <table:table-cell office:value-type="float" office:value="740.544128417969">
            <text:p>740.544128418</text:p>
          </table:table-cell>
          <table:table-cell office:value-type="float" office:value="0.01190308">
            <text:p>0.01190308</text:p>
          </table:table-cell>
          <table:table-cell table:number-columns-repeated="4"/>
        </table:table-row>
        <table:table-row table:style-name="ro1">
          <table:table-cell office:value-type="float" office:value="740.664367675781">
            <text:p>740.6643676758</text:p>
          </table:table-cell>
          <table:table-cell office:value-type="float" office:value="-0.007317971">
            <text:p>-0.007317971</text:p>
          </table:table-cell>
          <table:table-cell table:number-columns-repeated="4"/>
        </table:table-row>
        <table:table-row table:style-name="ro1">
          <table:table-cell office:value-type="float" office:value="740.784606933594">
            <text:p>740.7846069336</text:p>
          </table:table-cell>
          <table:table-cell office:value-type="float" office:value="0.008311342">
            <text:p>0.008311342</text:p>
          </table:table-cell>
          <table:table-cell table:number-columns-repeated="4"/>
        </table:table-row>
        <table:table-row table:style-name="ro1">
          <table:table-cell office:value-type="float" office:value="740.904907226563">
            <text:p>740.9049072266</text:p>
          </table:table-cell>
          <table:table-cell office:value-type="float" office:value="0.0009458644">
            <text:p>0.0009458644</text:p>
          </table:table-cell>
          <table:table-cell table:number-columns-repeated="4"/>
        </table:table-row>
        <table:table-row table:style-name="ro1">
          <table:table-cell office:value-type="float" office:value="741.025146484375">
            <text:p>741.0251464844</text:p>
          </table:table-cell>
          <table:table-cell office:value-type="float" office:value="-0.006553091">
            <text:p>-0.006553091</text:p>
          </table:table-cell>
          <table:table-cell table:number-columns-repeated="4"/>
        </table:table-row>
        <table:table-row table:style-name="ro1">
          <table:table-cell office:value-type="float" office:value="741.145385742188">
            <text:p>741.1453857422</text:p>
          </table:table-cell>
          <table:table-cell office:value-type="float" office:value="-0.004656584">
            <text:p>-0.004656584</text:p>
          </table:table-cell>
          <table:table-cell table:number-columns-repeated="4"/>
        </table:table-row>
        <table:table-row table:style-name="ro1">
          <table:table-cell office:value-type="float" office:value="741.265625">
            <text:p>741.265625</text:p>
          </table:table-cell>
          <table:table-cell office:value-type="float" office:value="0.02022943">
            <text:p>0.02022943</text:p>
          </table:table-cell>
          <table:table-cell table:number-columns-repeated="4"/>
        </table:table-row>
        <table:table-row table:style-name="ro1">
          <table:table-cell office:value-type="float" office:value="741.385925292969">
            <text:p>741.385925293</text:p>
          </table:table-cell>
          <table:table-cell office:value-type="float" office:value="-0.005644399">
            <text:p>-0.005644399</text:p>
          </table:table-cell>
          <table:table-cell table:number-columns-repeated="4"/>
        </table:table-row>
        <table:table-row table:style-name="ro1">
          <table:table-cell office:value-type="float" office:value="741.506164550781">
            <text:p>741.5061645508</text:p>
          </table:table-cell>
          <table:table-cell office:value-type="float" office:value="-0.0005678507">
            <text:p>-0.0005678507</text:p>
          </table:table-cell>
          <table:table-cell table:number-columns-repeated="4"/>
        </table:table-row>
        <table:table-row table:style-name="ro1">
          <table:table-cell office:value-type="float" office:value="741.626403808594">
            <text:p>741.6264038086</text:p>
          </table:table-cell>
          <table:table-cell office:value-type="float" office:value="0.007589695">
            <text:p>0.007589695</text:p>
          </table:table-cell>
          <table:table-cell table:number-columns-repeated="4"/>
        </table:table-row>
        <table:table-row table:style-name="ro1">
          <table:table-cell office:value-type="float" office:value="741.746704101563">
            <text:p>741.7467041016</text:p>
          </table:table-cell>
          <table:table-cell office:value-type="float" office:value="-0.0005103187">
            <text:p>-0.0005103187</text:p>
          </table:table-cell>
          <table:table-cell table:number-columns-repeated="4"/>
        </table:table-row>
        <table:table-row table:style-name="ro1">
          <table:table-cell office:value-type="float" office:value="741.866943359375">
            <text:p>741.8669433594</text:p>
          </table:table-cell>
          <table:table-cell office:value-type="float" office:value="0.01728458">
            <text:p>0.01728458</text:p>
          </table:table-cell>
          <table:table-cell table:number-columns-repeated="4"/>
        </table:table-row>
        <table:table-row table:style-name="ro1">
          <table:table-cell office:value-type="float" office:value="741.987182617188">
            <text:p>741.9871826172</text:p>
          </table:table-cell>
          <table:table-cell office:value-type="float" office:value="-0.003007012">
            <text:p>-0.003007012</text:p>
          </table:table-cell>
          <table:table-cell table:number-columns-repeated="4"/>
        </table:table-row>
        <table:table-row table:style-name="ro1">
          <table:table-cell office:value-type="float" office:value="742.107421875">
            <text:p>742.107421875</text:p>
          </table:table-cell>
          <table:table-cell office:value-type="float" office:value="0.004737736">
            <text:p>0.004737736</text:p>
          </table:table-cell>
          <table:table-cell table:number-columns-repeated="4"/>
        </table:table-row>
        <table:table-row table:style-name="ro1">
          <table:table-cell office:value-type="float" office:value="742.227722167969">
            <text:p>742.227722168</text:p>
          </table:table-cell>
          <table:table-cell office:value-type="float" office:value="0.006517951">
            <text:p>0.006517951</text:p>
          </table:table-cell>
          <table:table-cell table:number-columns-repeated="4"/>
        </table:table-row>
        <table:table-row table:style-name="ro1">
          <table:table-cell office:value-type="float" office:value="742.347961425781">
            <text:p>742.3479614258</text:p>
          </table:table-cell>
          <table:table-cell office:value-type="float" office:value="0.002267641">
            <text:p>0.002267641</text:p>
          </table:table-cell>
          <table:table-cell table:number-columns-repeated="4"/>
        </table:table-row>
        <table:table-row table:style-name="ro1">
          <table:table-cell office:value-type="float" office:value="742.468200683594">
            <text:p>742.4682006836</text:p>
          </table:table-cell>
          <table:table-cell office:value-type="float" office:value="-0.004236736">
            <text:p>-0.004236736</text:p>
          </table:table-cell>
          <table:table-cell table:number-columns-repeated="4"/>
        </table:table-row>
        <table:table-row table:style-name="ro1">
          <table:table-cell office:value-type="float" office:value="742.588439941406">
            <text:p>742.5884399414</text:p>
          </table:table-cell>
          <table:table-cell office:value-type="float" office:value="0.0003284813">
            <text:p>0.0003284813</text:p>
          </table:table-cell>
          <table:table-cell table:number-columns-repeated="4"/>
        </table:table-row>
        <table:table-row table:style-name="ro1">
          <table:table-cell office:value-type="float" office:value="742.708740234375">
            <text:p>742.7087402344</text:p>
          </table:table-cell>
          <table:table-cell office:value-type="float" office:value="-0.003072347">
            <text:p>-0.003072347</text:p>
          </table:table-cell>
          <table:table-cell table:number-columns-repeated="4"/>
        </table:table-row>
        <table:table-row table:style-name="ro1">
          <table:table-cell office:value-type="float" office:value="742.828979492188">
            <text:p>742.8289794922</text:p>
          </table:table-cell>
          <table:table-cell office:value-type="float" office:value="-0.002973397">
            <text:p>-0.002973397</text:p>
          </table:table-cell>
          <table:table-cell table:number-columns-repeated="4"/>
        </table:table-row>
        <table:table-row table:style-name="ro1">
          <table:table-cell office:value-type="float" office:value="742.94921875">
            <text:p>742.94921875</text:p>
          </table:table-cell>
          <table:table-cell office:value-type="float" office:value="0.005109818">
            <text:p>0.005109818</text:p>
          </table:table-cell>
          <table:table-cell table:number-columns-repeated="4"/>
        </table:table-row>
        <table:table-row table:style-name="ro1">
          <table:table-cell office:value-type="float" office:value="743.069519042969">
            <text:p>743.069519043</text:p>
          </table:table-cell>
          <table:table-cell office:value-type="float" office:value="0.0108487">
            <text:p>0.0108487</text:p>
          </table:table-cell>
          <table:table-cell table:number-columns-repeated="4"/>
        </table:table-row>
        <table:table-row table:style-name="ro1">
          <table:table-cell office:value-type="float" office:value="743.189758300781">
            <text:p>743.1897583008</text:p>
          </table:table-cell>
          <table:table-cell office:value-type="float" office:value="0.001234681">
            <text:p>0.001234681</text:p>
          </table:table-cell>
          <table:table-cell table:number-columns-repeated="4"/>
        </table:table-row>
        <table:table-row table:style-name="ro1">
          <table:table-cell office:value-type="float" office:value="743.309997558594">
            <text:p>743.3099975586</text:p>
          </table:table-cell>
          <table:table-cell office:value-type="float" office:value="-0.009496887">
            <text:p>-0.009496887</text:p>
          </table:table-cell>
          <table:table-cell table:number-columns-repeated="4"/>
        </table:table-row>
        <table:table-row table:style-name="ro1">
          <table:table-cell office:value-type="float" office:value="743.430236816406">
            <text:p>743.4302368164</text:p>
          </table:table-cell>
          <table:table-cell office:value-type="float" office:value="0.003402582">
            <text:p>0.003402582</text:p>
          </table:table-cell>
          <table:table-cell table:number-columns-repeated="4"/>
        </table:table-row>
        <table:table-row table:style-name="ro1">
          <table:table-cell office:value-type="float" office:value="743.550537109375">
            <text:p>743.5505371094</text:p>
          </table:table-cell>
          <table:table-cell office:value-type="float" office:value="-0.009055168">
            <text:p>-0.009055168</text:p>
          </table:table-cell>
          <table:table-cell table:number-columns-repeated="4"/>
        </table:table-row>
        <table:table-row table:style-name="ro1">
          <table:table-cell office:value-type="float" office:value="743.670776367188">
            <text:p>743.6707763672</text:p>
          </table:table-cell>
          <table:table-cell office:value-type="float" office:value="-0.006830998">
            <text:p>-0.006830998</text:p>
          </table:table-cell>
          <table:table-cell table:number-columns-repeated="4"/>
        </table:table-row>
        <table:table-row table:style-name="ro1">
          <table:table-cell office:value-type="float" office:value="743.791015625">
            <text:p>743.791015625</text:p>
          </table:table-cell>
          <table:table-cell office:value-type="float" office:value="-0.006381767">
            <text:p>-0.006381767</text:p>
          </table:table-cell>
          <table:table-cell table:number-columns-repeated="4"/>
        </table:table-row>
        <table:table-row table:style-name="ro1">
          <table:table-cell office:value-type="float" office:value="743.911254882813">
            <text:p>743.9112548828</text:p>
          </table:table-cell>
          <table:table-cell office:value-type="float" office:value="0.02966961">
            <text:p>0.02966961</text:p>
          </table:table-cell>
          <table:table-cell table:number-columns-repeated="4"/>
        </table:table-row>
        <table:table-row table:style-name="ro1">
          <table:table-cell office:value-type="float" office:value="744.031555175781">
            <text:p>744.0315551758</text:p>
          </table:table-cell>
          <table:table-cell office:value-type="float" office:value="-0.007256545">
            <text:p>-0.007256545</text:p>
          </table:table-cell>
          <table:table-cell table:number-columns-repeated="4"/>
        </table:table-row>
        <table:table-row table:style-name="ro1">
          <table:table-cell office:value-type="float" office:value="744.151794433594">
            <text:p>744.1517944336</text:p>
          </table:table-cell>
          <table:table-cell office:value-type="float" office:value="-0.05623533">
            <text:p>-0.05623533</text:p>
          </table:table-cell>
          <table:table-cell table:number-columns-repeated="4"/>
        </table:table-row>
        <table:table-row table:style-name="ro1">
          <table:table-cell office:value-type="float" office:value="744.272033691406">
            <text:p>744.2720336914</text:p>
          </table:table-cell>
          <table:table-cell office:value-type="float" office:value="-0.05785015">
            <text:p>-0.05785015</text:p>
          </table:table-cell>
          <table:table-cell table:number-columns-repeated="4"/>
        </table:table-row>
        <table:table-row table:style-name="ro1">
          <table:table-cell office:value-type="float" office:value="744.392333984375">
            <text:p>744.3923339844</text:p>
          </table:table-cell>
          <table:table-cell office:value-type="float" office:value="-0.0589988">
            <text:p>-0.0589988</text:p>
          </table:table-cell>
          <table:table-cell table:number-columns-repeated="4"/>
        </table:table-row>
        <table:table-row table:style-name="ro1">
          <table:table-cell office:value-type="float" office:value="744.512573242188">
            <text:p>744.5125732422</text:p>
          </table:table-cell>
          <table:table-cell office:value-type="float" office:value="-0.05945754">
            <text:p>-0.05945754</text:p>
          </table:table-cell>
          <table:table-cell table:number-columns-repeated="4"/>
        </table:table-row>
        <table:table-row table:style-name="ro1">
          <table:table-cell office:value-type="float" office:value="744.6328125">
            <text:p>744.6328125</text:p>
          </table:table-cell>
          <table:table-cell office:value-type="float" office:value="-0.05994065">
            <text:p>-0.05994065</text:p>
          </table:table-cell>
          <table:table-cell table:number-columns-repeated="4"/>
        </table:table-row>
        <table:table-row table:style-name="ro1">
          <table:table-cell office:value-type="float" office:value="744.753051757813">
            <text:p>744.7530517578</text:p>
          </table:table-cell>
          <table:table-cell office:value-type="float" office:value="-0.05961225">
            <text:p>-0.0596122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9">06/29/2026</text:date>, <text:time>12:3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9T12:04:29.74</meta:creation-date>
    <dc:date>2026-06-29T12:38:33.35</dc:date>
    <meta:editing-duration>PT7M20S</meta:editing-duration>
    <meta:editing-cycles>1</meta:editing-cycles>
    <meta:generator>OpenOffice/4.1.10$Win32 OpenOffice.org_project/4110m2$Build-9807</meta:generator>
    <meta:document-statistic meta:table-count="3" meta:cell-count="7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3cm" svg:y="4.188cm" style:legend-expansion="high" chart:style-name="ch2"/>
        <chart:plot-area chart:style-name="ch3" table:cell-range-address="Sheet1.A1:Sheet1.B3649" chart:data-source-has-labels="row" svg:x="0.77cm" svg:y="0.855cm" svg:width="11.983cm" svg:height="7.545cm">
          <chartooo:coordinate-region svg:x="1.788cm" svg:y="1.067cm" svg:width="10.68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49" chart:label-cell-address="Sheet1.B1:Sheet1.B1" chart:class="chart:scatter">
            <chart:domain table:cell-range-address="Sheet1.A2:Sheet1.A3649"/>
            <chart:data-point chart:repeated="3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[Intensity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.5908203125">
                <text:p>321.5908203125</text:p>
                <draw:g>
                  <svg:desc>Sheet1.A2:Sheet1.A3649</svg:desc>
                </draw:g>
              </table:table-cell>
              <table:table-cell office:value-type="float" office:value="0.005212234">
                <text:p>0.005212234</text:p>
                <draw:g>
                  <svg:desc>Sheet1.B2:Sheet1.B3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.698333740234">
                <text:p>321.698333740234</text:p>
              </table:table-cell>
              <table:table-cell office:value-type="float" office:value="0.00115659">
                <text:p>0.00115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805877685547">
                <text:p>321.805877685547</text:p>
              </table:table-cell>
              <table:table-cell office:value-type="float" office:value="0.003243573">
                <text:p>0.003243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13421630859">
                <text:p>321.913421630859</text:p>
              </table:table-cell>
              <table:table-cell office:value-type="float" office:value="0.01145807">
                <text:p>0.01145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.020965576172">
                <text:p>322.020965576172</text:p>
              </table:table-cell>
              <table:table-cell office:value-type="float" office:value="0.006331592">
                <text:p>0.006331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128540039063">
                <text:p>322.128540039063</text:p>
              </table:table-cell>
              <table:table-cell office:value-type="float" office:value="0.004813194">
                <text:p>0.004813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.236083984375">
                <text:p>322.236083984375</text:p>
              </table:table-cell>
              <table:table-cell office:value-type="float" office:value="0.01629797">
                <text:p>0.01629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.343658447266">
                <text:p>322.343658447266</text:p>
              </table:table-cell>
              <table:table-cell office:value-type="float" office:value="-0.001738467">
                <text:p>-0.001738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451232910156">
                <text:p>322.45123291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.558837890625">
                <text:p>322.558837890625</text:p>
              </table:table-cell>
              <table:table-cell office:value-type="float" office:value="0.006274268">
                <text:p>0.006274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666412353516">
                <text:p>322.666412353516</text:p>
              </table:table-cell>
              <table:table-cell office:value-type="float" office:value="0.008973436">
                <text:p>0.008973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774017333984">
                <text:p>322.774017333984</text:p>
              </table:table-cell>
              <table:table-cell office:value-type="float" office:value="0.01125534">
                <text:p>0.01125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881622314453">
                <text:p>322.881622314453</text:p>
              </table:table-cell>
              <table:table-cell office:value-type="float" office:value="-0.00298038">
                <text:p>-0.00298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.989227294922">
                <text:p>322.989227294922</text:p>
              </table:table-cell>
              <table:table-cell office:value-type="float" office:value="0.003490729">
                <text:p>0.003490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096862792969">
                <text:p>323.096862792969</text:p>
              </table:table-cell>
              <table:table-cell office:value-type="float" office:value="0.001533429">
                <text:p>0.001533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.204498291016">
                <text:p>323.204498291016</text:p>
              </table:table-cell>
              <table:table-cell office:value-type="float" office:value="0.00669343">
                <text:p>0.00669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312133789063">
                <text:p>323.312133789063</text:p>
              </table:table-cell>
              <table:table-cell office:value-type="float" office:value="-0.00160456">
                <text:p>-0.00160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.419769287109">
                <text:p>323.419769287109</text:p>
              </table:table-cell>
              <table:table-cell office:value-type="float" office:value="0.003550855">
                <text:p>0.003550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527404785156">
                <text:p>323.527404785156</text:p>
              </table:table-cell>
              <table:table-cell office:value-type="float" office:value="0.03704138">
                <text:p>0.03704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635070800781">
                <text:p>323.635070800781</text:p>
              </table:table-cell>
              <table:table-cell office:value-type="float" office:value="-0.006448764">
                <text:p>-0.0064487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.742736816406">
                <text:p>323.742736816406</text:p>
              </table:table-cell>
              <table:table-cell office:value-type="float" office:value="-0.004230672">
                <text:p>-0.004230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0.01142329">
                <text:p>0.011423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58068847656">
                <text:p>323.958068847656</text:p>
              </table:table-cell>
              <table:table-cell office:value-type="float" office:value="0.01782057">
                <text:p>0.01782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065765380859">
                <text:p>324.065765380859</text:p>
              </table:table-cell>
              <table:table-cell office:value-type="float" office:value="-0.002020303">
                <text:p>-0.002020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173461914063">
                <text:p>324.173461914063</text:p>
              </table:table-cell>
              <table:table-cell office:value-type="float" office:value="-0.005955962">
                <text:p>-0.005955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281158447266">
                <text:p>324.281158447266</text:p>
              </table:table-cell>
              <table:table-cell office:value-type="float" office:value="0.004274735">
                <text:p>0.0042747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388854980469">
                <text:p>324.388854980469</text:p>
              </table:table-cell>
              <table:table-cell office:value-type="float" office:value="-0.00371813">
                <text:p>-0.003718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496551513672">
                <text:p>324.496551513672</text:p>
              </table:table-cell>
              <table:table-cell office:value-type="float" office:value="0.002131953">
                <text:p>0.0021319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.604278564453">
                <text:p>324.604278564453</text:p>
              </table:table-cell>
              <table:table-cell office:value-type="float" office:value="0.007089259">
                <text:p>0.0070892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712005615234">
                <text:p>324.712005615234</text:p>
              </table:table-cell>
              <table:table-cell office:value-type="float" office:value="0.00324699">
                <text:p>0.00324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819732666016">
                <text:p>324.819732666016</text:p>
              </table:table-cell>
              <table:table-cell office:value-type="float" office:value="0.001323177">
                <text:p>0.001323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27490234375">
                <text:p>324.927490234375</text:p>
              </table:table-cell>
              <table:table-cell office:value-type="float" office:value="0.01596894">
                <text:p>0.01596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.035217285156">
                <text:p>325.035217285156</text:p>
              </table:table-cell>
              <table:table-cell office:value-type="float" office:value="-0.007365465">
                <text:p>-0.0073654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.142974853516">
                <text:p>325.142974853516</text:p>
              </table:table-cell>
              <table:table-cell office:value-type="float" office:value="0.001530671">
                <text:p>0.0015306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250732421875">
                <text:p>325.250732421875</text:p>
              </table:table-cell>
              <table:table-cell office:value-type="float" office:value="0.0008522327">
                <text:p>0.00085223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.358489990234">
                <text:p>325.358489990234</text:p>
              </table:table-cell>
              <table:table-cell office:value-type="float" office:value="-0.0033719">
                <text:p>-0.0033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466278076172">
                <text:p>325.466278076172</text:p>
              </table:table-cell>
              <table:table-cell office:value-type="float" office:value="0.003152006">
                <text:p>0.003152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574066162109">
                <text:p>325.574066162109</text:p>
              </table:table-cell>
              <table:table-cell office:value-type="float" office:value="0.004856593">
                <text:p>0.004856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.681854248047">
                <text:p>325.681854248047</text:p>
              </table:table-cell>
              <table:table-cell office:value-type="float" office:value="0.003876512">
                <text:p>0.003876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.789642333984">
                <text:p>325.789642333984</text:p>
              </table:table-cell>
              <table:table-cell office:value-type="float" office:value="0.005464093">
                <text:p>0.005464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897430419922">
                <text:p>325.897430419922</text:p>
              </table:table-cell>
              <table:table-cell office:value-type="float" office:value="0.002539601">
                <text:p>0.002539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.005249023438">
                <text:p>326.005249023438</text:p>
              </table:table-cell>
              <table:table-cell office:value-type="float" office:value="0.001710856">
                <text:p>0.001710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113067626953">
                <text:p>326.113067626953</text:p>
              </table:table-cell>
              <table:table-cell office:value-type="float" office:value="0.007805158">
                <text:p>0.007805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.220886230469">
                <text:p>326.220886230469</text:p>
              </table:table-cell>
              <table:table-cell office:value-type="float" office:value="0.01534442">
                <text:p>0.015344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.328704833984">
                <text:p>326.328704833984</text:p>
              </table:table-cell>
              <table:table-cell office:value-type="float" office:value="-0.004527873">
                <text:p>-0.0045278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.436553955078">
                <text:p>326.436553955078</text:p>
              </table:table-cell>
              <table:table-cell office:value-type="float" office:value="0.007985528">
                <text:p>0.007985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.544403076172">
                <text:p>326.544403076172</text:p>
              </table:table-cell>
              <table:table-cell office:value-type="float" office:value="0.02228499">
                <text:p>0.022284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.652252197266">
                <text:p>326.652252197266</text:p>
              </table:table-cell>
              <table:table-cell office:value-type="float" office:value="0.01681977">
                <text:p>0.01681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.760101318359">
                <text:p>326.760101318359</text:p>
              </table:table-cell>
              <table:table-cell office:value-type="float" office:value="0.005135227">
                <text:p>0.005135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.867950439453">
                <text:p>326.867950439453</text:p>
              </table:table-cell>
              <table:table-cell office:value-type="float" office:value="0.009542903">
                <text:p>0.0095429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.975830078125">
                <text:p>326.975830078125</text:p>
              </table:table-cell>
              <table:table-cell office:value-type="float" office:value="0.004244313">
                <text:p>0.0042443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083709716797">
                <text:p>327.083709716797</text:p>
              </table:table-cell>
              <table:table-cell office:value-type="float" office:value="0.00739447">
                <text:p>0.007394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.191589355469">
                <text:p>327.191589355469</text:p>
              </table:table-cell>
              <table:table-cell office:value-type="float" office:value="-0.001396103">
                <text:p>-0.001396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99499511719">
                <text:p>327.299499511719</text:p>
              </table:table-cell>
              <table:table-cell office:value-type="float" office:value="0.005180408">
                <text:p>0.0051804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407379150391">
                <text:p>327.407379150391</text:p>
              </table:table-cell>
              <table:table-cell office:value-type="float" office:value="0.01908247">
                <text:p>0.019082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515289306641">
                <text:p>327.515289306641</text:p>
              </table:table-cell>
              <table:table-cell office:value-type="float" office:value="-0.002485394">
                <text:p>-0.0024853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.623199462891">
                <text:p>327.623199462891</text:p>
              </table:table-cell>
              <table:table-cell office:value-type="float" office:value="0.008415091">
                <text:p>0.0084150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731109619141">
                <text:p>327.731109619141</text:p>
              </table:table-cell>
              <table:table-cell office:value-type="float" office:value="-0.00223547">
                <text:p>-0.002235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.839050292969">
                <text:p>327.839050292969</text:p>
              </table:table-cell>
              <table:table-cell office:value-type="float" office:value="-0.006270499">
                <text:p>-0.0062704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.946990966797">
                <text:p>327.946990966797</text:p>
              </table:table-cell>
              <table:table-cell office:value-type="float" office:value="-0.0003960514">
                <text:p>-0.00039605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.054931640625">
                <text:p>328.054931640625</text:p>
              </table:table-cell>
              <table:table-cell office:value-type="float" office:value="0.003320084">
                <text:p>0.0033200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.162872314453">
                <text:p>328.162872314453</text:p>
              </table:table-cell>
              <table:table-cell office:value-type="float" office:value="0.005921789">
                <text:p>0.0059217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270812988281">
                <text:p>328.270812988281</text:p>
              </table:table-cell>
              <table:table-cell office:value-type="float" office:value="-0.003329551">
                <text:p>-0.0033295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.378784179688">
                <text:p>328.378784179688</text:p>
              </table:table-cell>
              <table:table-cell office:value-type="float" office:value="-0.00165147">
                <text:p>-0.001651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486755371094">
                <text:p>328.486755371094</text:p>
              </table:table-cell>
              <table:table-cell office:value-type="float" office:value="-0.00854549">
                <text:p>-0.008545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.5947265625">
                <text:p>328.5947265625</text:p>
              </table:table-cell>
              <table:table-cell office:value-type="float" office:value="0.002535154">
                <text:p>0.002535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.702697753906">
                <text:p>328.702697753906</text:p>
              </table:table-cell>
              <table:table-cell office:value-type="float" office:value="0.02165887">
                <text:p>0.021658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.810699462891">
                <text:p>328.810699462891</text:p>
              </table:table-cell>
              <table:table-cell office:value-type="float" office:value="0.001118528">
                <text:p>0.0011185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.918670654297">
                <text:p>328.918670654297</text:p>
              </table:table-cell>
              <table:table-cell office:value-type="float" office:value="0.007155646">
                <text:p>0.0071556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.026672363281">
                <text:p>329.026672363281</text:p>
              </table:table-cell>
              <table:table-cell office:value-type="float" office:value="0.008688378">
                <text:p>0.0086883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134704589844">
                <text:p>329.134704589844</text:p>
              </table:table-cell>
              <table:table-cell office:value-type="float" office:value="0.01697955">
                <text:p>0.016979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242706298828">
                <text:p>329.242706298828</text:p>
              </table:table-cell>
              <table:table-cell office:value-type="float" office:value="-0.002380587">
                <text:p>-0.002380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.350738525391">
                <text:p>329.350738525391</text:p>
              </table:table-cell>
              <table:table-cell office:value-type="float" office:value="-0.002903507">
                <text:p>-0.0029035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.458770751953">
                <text:p>329.458770751953</text:p>
              </table:table-cell>
              <table:table-cell office:value-type="float" office:value="0.001744048">
                <text:p>0.0017440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9.566802978516">
                <text:p>329.566802978516</text:p>
              </table:table-cell>
              <table:table-cell office:value-type="float" office:value="0.003854342">
                <text:p>0.0038543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.674835205078">
                <text:p>329.674835205078</text:p>
              </table:table-cell>
              <table:table-cell office:value-type="float" office:value="-0.00294069">
                <text:p>-0.00294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.782897949219">
                <text:p>329.782897949219</text:p>
              </table:table-cell>
              <table:table-cell office:value-type="float" office:value="0.008006306">
                <text:p>0.008006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.890960693359">
                <text:p>329.890960693359</text:p>
              </table:table-cell>
              <table:table-cell office:value-type="float" office:value="0.03815298">
                <text:p>0.038152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.9990234375">
                <text:p>329.9990234375</text:p>
              </table:table-cell>
              <table:table-cell office:value-type="float" office:value="0.00251658">
                <text:p>0.002516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107086181641">
                <text:p>330.107086181641</text:p>
              </table:table-cell>
              <table:table-cell office:value-type="float" office:value="0.00144173">
                <text:p>0.001441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215148925781">
                <text:p>330.215148925781</text:p>
              </table:table-cell>
              <table:table-cell office:value-type="float" office:value="-0.006916465">
                <text:p>-0.0069164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3232421875">
                <text:p>330.3232421875</text:p>
              </table:table-cell>
              <table:table-cell office:value-type="float" office:value="0.01597583">
                <text:p>0.015975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.431335449219">
                <text:p>330.431335449219</text:p>
              </table:table-cell>
              <table:table-cell office:value-type="float" office:value="0.008528234">
                <text:p>0.0085282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.539428710938">
                <text:p>330.539428710938</text:p>
              </table:table-cell>
              <table:table-cell office:value-type="float" office:value="0.008315331">
                <text:p>0.0083153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.647521972656">
                <text:p>330.647521972656</text:p>
              </table:table-cell>
              <table:table-cell office:value-type="float" office:value="-0.003622621">
                <text:p>-0.0036226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.755645751953">
                <text:p>330.755645751953</text:p>
              </table:table-cell>
              <table:table-cell office:value-type="float" office:value="0.005161009">
                <text:p>0.0051610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.86376953125">
                <text:p>330.86376953125</text:p>
              </table:table-cell>
              <table:table-cell office:value-type="float" office:value="0.01595779">
                <text:p>0.015957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.971893310547">
                <text:p>330.971893310547</text:p>
              </table:table-cell>
              <table:table-cell office:value-type="float" office:value="0.01113051">
                <text:p>0.011130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1.080017089844">
                <text:p>331.080017089844</text:p>
              </table:table-cell>
              <table:table-cell office:value-type="float" office:value="0.0271397">
                <text:p>0.02713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188171386719">
                <text:p>331.188171386719</text:p>
              </table:table-cell>
              <table:table-cell office:value-type="float" office:value="0.01083427">
                <text:p>0.010834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.296295166016">
                <text:p>331.296295166016</text:p>
              </table:table-cell>
              <table:table-cell office:value-type="float" office:value="0.01886982">
                <text:p>0.018869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.404449462891">
                <text:p>331.404449462891</text:p>
              </table:table-cell>
              <table:table-cell office:value-type="float" office:value="-0.003431434">
                <text:p>-0.003431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.512603759766">
                <text:p>331.512603759766</text:p>
              </table:table-cell>
              <table:table-cell office:value-type="float" office:value="-0.003710333">
                <text:p>-0.003710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620788574219">
                <text:p>331.620788574219</text:p>
              </table:table-cell>
              <table:table-cell office:value-type="float" office:value="0.003802932">
                <text:p>0.0038029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.728942871094">
                <text:p>331.728942871094</text:p>
              </table:table-cell>
              <table:table-cell office:value-type="float" office:value="0.008926352">
                <text:p>0.0089263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1.837127685547">
                <text:p>331.837127685547</text:p>
              </table:table-cell>
              <table:table-cell office:value-type="float" office:value="-0.0007784098">
                <text:p>-0.0007784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.9453125">
                <text:p>331.9453125</text:p>
              </table:table-cell>
              <table:table-cell office:value-type="float" office:value="-0.003076675">
                <text:p>-0.0030766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.053527832031">
                <text:p>332.053527832031</text:p>
              </table:table-cell>
              <table:table-cell office:value-type="float" office:value="0.006510112">
                <text:p>0.006510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.161712646484">
                <text:p>332.161712646484</text:p>
              </table:table-cell>
              <table:table-cell office:value-type="float" office:value="-0.0004778146">
                <text:p>-0.0004778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2.269927978516">
                <text:p>332.269927978516</text:p>
              </table:table-cell>
              <table:table-cell office:value-type="float" office:value="-0.008755307">
                <text:p>-0.0087553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.378143310547">
                <text:p>332.378143310547</text:p>
              </table:table-cell>
              <table:table-cell office:value-type="float" office:value="-0.003482284">
                <text:p>-0.0034822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.486358642578">
                <text:p>332.486358642578</text:p>
              </table:table-cell>
              <table:table-cell office:value-type="float" office:value="0.01899159">
                <text:p>0.018991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.594573974609">
                <text:p>332.594573974609</text:p>
              </table:table-cell>
              <table:table-cell office:value-type="float" office:value="0.01131201">
                <text:p>0.011312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.702819824219">
                <text:p>332.702819824219</text:p>
              </table:table-cell>
              <table:table-cell office:value-type="float" office:value="0.003728348">
                <text:p>0.0037283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.811065673828">
                <text:p>332.811065673828</text:p>
              </table:table-cell>
              <table:table-cell office:value-type="float" office:value="-0.008705101">
                <text:p>-0.0087051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919311523438">
                <text:p>332.919311523438</text:p>
              </table:table-cell>
              <table:table-cell office:value-type="float" office:value="0.0002206033">
                <text:p>0.00022060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.027557373047">
                <text:p>333.027557373047</text:p>
              </table:table-cell>
              <table:table-cell office:value-type="float" office:value="-0.0004469764">
                <text:p>-0.00044697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135833740234">
                <text:p>333.135833740234</text:p>
              </table:table-cell>
              <table:table-cell office:value-type="float" office:value="0.005514379">
                <text:p>0.0055143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.244079589844">
                <text:p>333.244079589844</text:p>
              </table:table-cell>
              <table:table-cell office:value-type="float" office:value="0.04592992">
                <text:p>0.045929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.352355957031">
                <text:p>333.352355957031</text:p>
              </table:table-cell>
              <table:table-cell office:value-type="float" office:value="-0.001764965">
                <text:p>-0.0017649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.460662841797">
                <text:p>333.460662841797</text:p>
              </table:table-cell>
              <table:table-cell office:value-type="float" office:value="0.002525622">
                <text:p>0.0025256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.568939208984">
                <text:p>333.568939208984</text:p>
              </table:table-cell>
              <table:table-cell office:value-type="float" office:value="0.002233567">
                <text:p>0.0022335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.67724609375">
                <text:p>333.67724609375</text:p>
              </table:table-cell>
              <table:table-cell office:value-type="float" office:value="-0.006076542">
                <text:p>-0.0060765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.785552978516">
                <text:p>333.785552978516</text:p>
              </table:table-cell>
              <table:table-cell office:value-type="float" office:value="0.008252569">
                <text:p>0.0082525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.893859863281">
                <text:p>333.893859863281</text:p>
              </table:table-cell>
              <table:table-cell office:value-type="float" office:value="0.004268704">
                <text:p>0.004268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002166748047">
                <text:p>334.002166748047</text:p>
              </table:table-cell>
              <table:table-cell office:value-type="float" office:value="-0.009930665">
                <text:p>-0.0099306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.110473632813">
                <text:p>334.110473632813</text:p>
              </table:table-cell>
              <table:table-cell office:value-type="float" office:value="0.0002143357">
                <text:p>0.00021433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.218811035156">
                <text:p>334.218811035156</text:p>
              </table:table-cell>
              <table:table-cell office:value-type="float" office:value="0.005103158">
                <text:p>0.0051031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.3271484375">
                <text:p>334.3271484375</text:p>
              </table:table-cell>
              <table:table-cell office:value-type="float" office:value="-0.0002381251">
                <text:p>-0.00023812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435485839844">
                <text:p>334.435485839844</text:p>
              </table:table-cell>
              <table:table-cell office:value-type="float" office:value="0.0006613132">
                <text:p>0.00066131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.543853759766">
                <text:p>334.543853759766</text:p>
              </table:table-cell>
              <table:table-cell office:value-type="float" office:value="-0.005750126">
                <text:p>-0.005750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.652191162109">
                <text:p>334.652191162109</text:p>
              </table:table-cell>
              <table:table-cell office:value-type="float" office:value="0.01640544">
                <text:p>0.01640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4.760559082031">
                <text:p>334.760559082031</text:p>
              </table:table-cell>
              <table:table-cell office:value-type="float" office:value="-0.0003663284">
                <text:p>-0.00036632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.868927001953">
                <text:p>334.868927001953</text:p>
              </table:table-cell>
              <table:table-cell office:value-type="float" office:value="0.007430843">
                <text:p>0.0074308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.977325439453">
                <text:p>334.977325439453</text:p>
              </table:table-cell>
              <table:table-cell office:value-type="float" office:value="0.006514202">
                <text:p>0.0065142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.085693359375">
                <text:p>335.085693359375</text:p>
              </table:table-cell>
              <table:table-cell office:value-type="float" office:value="0.0091248">
                <text:p>0.00912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.194091796875">
                <text:p>335.194091796875</text:p>
              </table:table-cell>
              <table:table-cell office:value-type="float" office:value="0.0003030372">
                <text:p>0.00030303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.302490234375">
                <text:p>335.302490234375</text:p>
              </table:table-cell>
              <table:table-cell office:value-type="float" office:value="0.008479683">
                <text:p>0.0084796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5.410888671875">
                <text:p>335.410888671875</text:p>
              </table:table-cell>
              <table:table-cell office:value-type="float" office:value="0.007036212">
                <text:p>0.0070362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.519287109375">
                <text:p>335.519287109375</text:p>
              </table:table-cell>
              <table:table-cell office:value-type="float" office:value="0.02969431">
                <text:p>0.029694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627716064453">
                <text:p>335.627716064453</text:p>
              </table:table-cell>
              <table:table-cell office:value-type="float" office:value="0.008761438">
                <text:p>0.0087614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5.736145019531">
                <text:p>335.736145019531</text:p>
              </table:table-cell>
              <table:table-cell office:value-type="float" office:value="0.006621204">
                <text:p>0.0066212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.844573974609">
                <text:p>335.844573974609</text:p>
              </table:table-cell>
              <table:table-cell office:value-type="float" office:value="-0.0007558934">
                <text:p>-0.00075589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.953002929688">
                <text:p>335.953002929688</text:p>
              </table:table-cell>
              <table:table-cell office:value-type="float" office:value="0.009808271">
                <text:p>0.0098082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6.061462402344">
                <text:p>336.061462402344</text:p>
              </table:table-cell>
              <table:table-cell office:value-type="float" office:value="0.01943274">
                <text:p>0.019432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6.169891357422">
                <text:p>336.169891357422</text:p>
              </table:table-cell>
              <table:table-cell office:value-type="float" office:value="-0.005461147">
                <text:p>-0.0054611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278350830078">
                <text:p>336.278350830078</text:p>
              </table:table-cell>
              <table:table-cell office:value-type="float" office:value="0.002397163">
                <text:p>0.0023971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6.386840820313">
                <text:p>336.386840820313</text:p>
              </table:table-cell>
              <table:table-cell office:value-type="float" office:value="0.01754734">
                <text:p>0.017547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6.495300292969">
                <text:p>336.495300292969</text:p>
              </table:table-cell>
              <table:table-cell office:value-type="float" office:value="0.004469243">
                <text:p>0.004469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6.603790283203">
                <text:p>336.603790283203</text:p>
              </table:table-cell>
              <table:table-cell office:value-type="float" office:value="-0.00493672">
                <text:p>-0.004936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6.712249755859">
                <text:p>336.712249755859</text:p>
              </table:table-cell>
              <table:table-cell office:value-type="float" office:value="-0.002866992">
                <text:p>-0.0028669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.820770263672">
                <text:p>336.820770263672</text:p>
              </table:table-cell>
              <table:table-cell office:value-type="float" office:value="-0.0011496">
                <text:p>-0.00114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.929260253906">
                <text:p>336.929260253906</text:p>
              </table:table-cell>
              <table:table-cell office:value-type="float" office:value="0.001758172">
                <text:p>0.0017581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.037750244141">
                <text:p>337.037750244141</text:p>
              </table:table-cell>
              <table:table-cell office:value-type="float" office:value="-0.006285778">
                <text:p>-0.0062857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.146270751953">
                <text:p>337.146270751953</text:p>
              </table:table-cell>
              <table:table-cell office:value-type="float" office:value="-0.009068375">
                <text:p>-0.009068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.254791259766">
                <text:p>337.254791259766</text:p>
              </table:table-cell>
              <table:table-cell office:value-type="float" office:value="0.02394343">
                <text:p>0.023943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.363311767578">
                <text:p>337.363311767578</text:p>
              </table:table-cell>
              <table:table-cell office:value-type="float" office:value="0.001960333">
                <text:p>0.001960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.471862792969">
                <text:p>337.471862792969</text:p>
              </table:table-cell>
              <table:table-cell office:value-type="float" office:value="0.003833157">
                <text:p>0.0038331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.580383300781">
                <text:p>337.580383300781</text:p>
              </table:table-cell>
              <table:table-cell office:value-type="float" office:value="-0.00292451">
                <text:p>-0.002924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688934326172">
                <text:p>337.688934326172</text:p>
              </table:table-cell>
              <table:table-cell office:value-type="float" office:value="-0.0007062525">
                <text:p>-0.00070625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7.797485351563">
                <text:p>337.797485351563</text:p>
              </table:table-cell>
              <table:table-cell office:value-type="float" office:value="-0.002402663">
                <text:p>-0.0024026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.906036376953">
                <text:p>337.906036376953</text:p>
              </table:table-cell>
              <table:table-cell office:value-type="float" office:value="-0.003149543">
                <text:p>-0.0031495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.014617919922">
                <text:p>338.014617919922</text:p>
              </table:table-cell>
              <table:table-cell office:value-type="float" office:value="-0.002450965">
                <text:p>-0.0024509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123168945313">
                <text:p>338.123168945313</text:p>
              </table:table-cell>
              <table:table-cell office:value-type="float" office:value="0.01209852">
                <text:p>0.01209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.231750488281">
                <text:p>338.231750488281</text:p>
              </table:table-cell>
              <table:table-cell office:value-type="float" office:value="0.0116934">
                <text:p>0.01169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.340362548828">
                <text:p>338.340362548828</text:p>
              </table:table-cell>
              <table:table-cell office:value-type="float" office:value="-0.002296332">
                <text:p>-0.0022963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8.448944091797">
                <text:p>338.448944091797</text:p>
              </table:table-cell>
              <table:table-cell office:value-type="float" office:value="0.02330956">
                <text:p>0.023309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.557525634766">
                <text:p>338.557525634766</text:p>
              </table:table-cell>
              <table:table-cell office:value-type="float" office:value="0.005906032">
                <text:p>0.0059060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.666137695313">
                <text:p>338.666137695313</text:p>
              </table:table-cell>
              <table:table-cell office:value-type="float" office:value="0.01261646">
                <text:p>0.012616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.774749755859">
                <text:p>338.774749755859</text:p>
              </table:table-cell>
              <table:table-cell office:value-type="float" office:value="-0.004853721">
                <text:p>-0.0048537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.883392333984">
                <text:p>338.883392333984</text:p>
              </table:table-cell>
              <table:table-cell office:value-type="float" office:value="-0.00311048">
                <text:p>-0.003110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.992004394531">
                <text:p>338.992004394531</text:p>
              </table:table-cell>
              <table:table-cell office:value-type="float" office:value="0.003358519">
                <text:p>0.0033585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9.100646972656">
                <text:p>339.100646972656</text:p>
              </table:table-cell>
              <table:table-cell office:value-type="float" office:value="0.009283929">
                <text:p>0.0092839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209289550781">
                <text:p>339.209289550781</text:p>
              </table:table-cell>
              <table:table-cell office:value-type="float" office:value="-0.004989578">
                <text:p>-0.0049895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.317932128906">
                <text:p>339.317932128906</text:p>
              </table:table-cell>
              <table:table-cell office:value-type="float" office:value="0.008731316">
                <text:p>0.0087313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.426574707031">
                <text:p>339.426574707031</text:p>
              </table:table-cell>
              <table:table-cell office:value-type="float" office:value="0.002494362">
                <text:p>0.0024943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9.535247802734">
                <text:p>339.535247802734</text:p>
              </table:table-cell>
              <table:table-cell office:value-type="float" office:value="0.01054531">
                <text:p>0.010545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9.643890380859">
                <text:p>339.643890380859</text:p>
              </table:table-cell>
              <table:table-cell office:value-type="float" office:value="0.003347633">
                <text:p>0.0033476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.752563476563">
                <text:p>339.752563476563</text:p>
              </table:table-cell>
              <table:table-cell office:value-type="float" office:value="0.003878395">
                <text:p>0.0038783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.861267089844">
                <text:p>339.861267089844</text:p>
              </table:table-cell>
              <table:table-cell office:value-type="float" office:value="0.001225415">
                <text:p>0.0012254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.969940185547">
                <text:p>339.969940185547</text:p>
              </table:table-cell>
              <table:table-cell office:value-type="float" office:value="0.01683649">
                <text:p>0.016836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78643798828">
                <text:p>340.078643798828</text:p>
              </table:table-cell>
              <table:table-cell office:value-type="float" office:value="0.002539399">
                <text:p>0.0025393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0.187347412109">
                <text:p>340.187347412109</text:p>
              </table:table-cell>
              <table:table-cell office:value-type="float" office:value="0.01715364">
                <text:p>0.017153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.296051025391">
                <text:p>340.296051025391</text:p>
              </table:table-cell>
              <table:table-cell office:value-type="float" office:value="0.006243362">
                <text:p>0.0062433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.404754638672">
                <text:p>340.404754638672</text:p>
              </table:table-cell>
              <table:table-cell office:value-type="float" office:value="0.008591425">
                <text:p>0.0085914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.513488769531">
                <text:p>340.513488769531</text:p>
              </table:table-cell>
              <table:table-cell office:value-type="float" office:value="-0.007449938">
                <text:p>-0.0074499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.622192382813">
                <text:p>340.622192382813</text:p>
              </table:table-cell>
              <table:table-cell office:value-type="float" office:value="0.01601252">
                <text:p>0.016012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730926513672">
                <text:p>340.730926513672</text:p>
              </table:table-cell>
              <table:table-cell office:value-type="float" office:value="0.01561204">
                <text:p>0.015612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.839660644531">
                <text:p>340.839660644531</text:p>
              </table:table-cell>
              <table:table-cell office:value-type="float" office:value="0.01416404">
                <text:p>0.014164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.948425292969">
                <text:p>340.948425292969</text:p>
              </table:table-cell>
              <table:table-cell office:value-type="float" office:value="-0.00476479">
                <text:p>-0.004764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.057159423828">
                <text:p>341.057159423828</text:p>
              </table:table-cell>
              <table:table-cell office:value-type="float" office:value="-0.0008798944">
                <text:p>-0.00087989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.165924072266">
                <text:p>341.165924072266</text:p>
              </table:table-cell>
              <table:table-cell office:value-type="float" office:value="-0.00246947">
                <text:p>-0.002469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1.274688720703">
                <text:p>341.274688720703</text:p>
              </table:table-cell>
              <table:table-cell office:value-type="float" office:value="-0.002611369">
                <text:p>-0.0026113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1.383483886719">
                <text:p>341.383483886719</text:p>
              </table:table-cell>
              <table:table-cell office:value-type="float" office:value="0.01521923">
                <text:p>0.015219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.492248535156">
                <text:p>341.492248535156</text:p>
              </table:table-cell>
              <table:table-cell office:value-type="float" office:value="0.004235016">
                <text:p>0.0042350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1.601043701172">
                <text:p>341.601043701172</text:p>
              </table:table-cell>
              <table:table-cell office:value-type="float" office:value="0.02339114">
                <text:p>0.023391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1.709838867188">
                <text:p>341.709838867188</text:p>
              </table:table-cell>
              <table:table-cell office:value-type="float" office:value="0.0196177">
                <text:p>0.01961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.818634033203">
                <text:p>341.818634033203</text:p>
              </table:table-cell>
              <table:table-cell office:value-type="float" office:value="0.01456818">
                <text:p>0.014568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1.927429199219">
                <text:p>341.927429199219</text:p>
              </table:table-cell>
              <table:table-cell office:value-type="float" office:value="-0.001555428">
                <text:p>-0.0015554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.036254882813">
                <text:p>342.036254882813</text:p>
              </table:table-cell>
              <table:table-cell office:value-type="float" office:value="-0.002588107">
                <text:p>-0.0025881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.145080566406">
                <text:p>342.145080566406</text:p>
              </table:table-cell>
              <table:table-cell office:value-type="float" office:value="0.00116229">
                <text:p>0.001162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25390625">
                <text:p>342.25390625</text:p>
              </table:table-cell>
              <table:table-cell office:value-type="float" office:value="0.01026317">
                <text:p>0.010263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362731933594">
                <text:p>342.362731933594</text:p>
              </table:table-cell>
              <table:table-cell office:value-type="float" office:value="0.004463703">
                <text:p>0.0044637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.471557617188">
                <text:p>342.47155761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2.580413818359">
                <text:p>342.580413818359</text:p>
              </table:table-cell>
              <table:table-cell office:value-type="float" office:value="0.01082254">
                <text:p>0.010822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.689270019531">
                <text:p>342.689270019531</text:p>
              </table:table-cell>
              <table:table-cell office:value-type="float" office:value="-0.004138452">
                <text:p>-0.0041384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2.798126220703">
                <text:p>342.798126220703</text:p>
              </table:table-cell>
              <table:table-cell office:value-type="float" office:value="0.006943411">
                <text:p>0.0069434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906982421875">
                <text:p>342.906982421875</text:p>
              </table:table-cell>
              <table:table-cell office:value-type="float" office:value="0.0148305">
                <text:p>0.01483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.015869140625">
                <text:p>343.015869140625</text:p>
              </table:table-cell>
              <table:table-cell office:value-type="float" office:value="0.01162419">
                <text:p>0.011624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.124755859375">
                <text:p>343.124755859375</text:p>
              </table:table-cell>
              <table:table-cell office:value-type="float" office:value="-0.00295447">
                <text:p>-0.002954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.233642578125">
                <text:p>343.233642578125</text:p>
              </table:table-cell>
              <table:table-cell office:value-type="float" office:value="-0.007499588">
                <text:p>-0.0074995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342529296875">
                <text:p>343.342529296875</text:p>
              </table:table-cell>
              <table:table-cell office:value-type="float" office:value="0.008935149">
                <text:p>0.0089351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.451416015625">
                <text:p>343.451416015625</text:p>
              </table:table-cell>
              <table:table-cell office:value-type="float" office:value="0.001534611">
                <text:p>0.0015346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.560333251953">
                <text:p>343.560333251953</text:p>
              </table:table-cell>
              <table:table-cell office:value-type="float" office:value="-0.003070885">
                <text:p>-0.0030708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.669250488281">
                <text:p>343.669250488281</text:p>
              </table:table-cell>
              <table:table-cell office:value-type="float" office:value="-0.003288553">
                <text:p>-0.0032885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.778167724609">
                <text:p>343.778167724609</text:p>
              </table:table-cell>
              <table:table-cell office:value-type="float" office:value="0.001777538">
                <text:p>0.0017775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.887084960938">
                <text:p>343.887084960938</text:p>
              </table:table-cell>
              <table:table-cell office:value-type="float" office:value="0.004351772">
                <text:p>0.0043517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.996032714844">
                <text:p>343.996032714844</text:p>
              </table:table-cell>
              <table:table-cell office:value-type="float" office:value="-0.007746607">
                <text:p>-0.0077466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.104949951172">
                <text:p>344.104949951172</text:p>
              </table:table-cell>
              <table:table-cell office:value-type="float" office:value="0.009755013">
                <text:p>0.0097550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4.213897705078">
                <text:p>344.213897705078</text:p>
              </table:table-cell>
              <table:table-cell office:value-type="float" office:value="-0.00235684">
                <text:p>-0.002356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.322845458984">
                <text:p>344.322845458984</text:p>
              </table:table-cell>
              <table:table-cell office:value-type="float" office:value="0.007544121">
                <text:p>0.0075441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4.431823730469">
                <text:p>344.431823730469</text:p>
              </table:table-cell>
              <table:table-cell office:value-type="float" office:value="-0.003901405">
                <text:p>-0.0039014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4.540771484375">
                <text:p>344.54077148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4.649749755859">
                <text:p>344.649749755859</text:p>
              </table:table-cell>
              <table:table-cell office:value-type="float" office:value="0.0005115874">
                <text:p>0.00051158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4.758728027344">
                <text:p>344.758728027344</text:p>
              </table:table-cell>
              <table:table-cell office:value-type="float" office:value="0.0002509933">
                <text:p>0.00025099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.867706298828">
                <text:p>344.867706298828</text:p>
              </table:table-cell>
              <table:table-cell office:value-type="float" office:value="0.006309864">
                <text:p>0.0063098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.976715087891">
                <text:p>344.976715087891</text:p>
              </table:table-cell>
              <table:table-cell office:value-type="float" office:value="0.009965725">
                <text:p>0.0099657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.085723876953">
                <text:p>345.085723876953</text:p>
              </table:table-cell>
              <table:table-cell office:value-type="float" office:value="-0.001516046">
                <text:p>-0.0015160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5.194702148438">
                <text:p>345.194702148438</text:p>
              </table:table-cell>
              <table:table-cell office:value-type="float" office:value="0.002389991">
                <text:p>0.002389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5.303741455078">
                <text:p>345.303741455078</text:p>
              </table:table-cell>
              <table:table-cell office:value-type="float" office:value="0.0228337">
                <text:p>0.02283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5.412750244141">
                <text:p>345.412750244141</text:p>
              </table:table-cell>
              <table:table-cell office:value-type="float" office:value="-0.006484458">
                <text:p>-0.0064844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521759033203">
                <text:p>345.521759033203</text:p>
              </table:table-cell>
              <table:table-cell office:value-type="float" office:value="-0.004698917">
                <text:p>-0.0046989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.630798339844">
                <text:p>345.630798339844</text:p>
              </table:table-cell>
              <table:table-cell office:value-type="float" office:value="0.00308458">
                <text:p>0.003084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.739837646484">
                <text:p>345.739837646484</text:p>
              </table:table-cell>
              <table:table-cell office:value-type="float" office:value="-0.001563024">
                <text:p>-0.0015630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.848876953125">
                <text:p>345.848876953125</text:p>
              </table:table-cell>
              <table:table-cell office:value-type="float" office:value="0.0104556">
                <text:p>0.01045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5.957946777344">
                <text:p>345.957946777344</text:p>
              </table:table-cell>
              <table:table-cell office:value-type="float" office:value="0.01166079">
                <text:p>0.011660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.066986083984">
                <text:p>346.066986083984</text:p>
              </table:table-cell>
              <table:table-cell office:value-type="float" office:value="-0.001887506">
                <text:p>-0.0018875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6.176055908203">
                <text:p>346.176055908203</text:p>
              </table:table-cell>
              <table:table-cell office:value-type="float" office:value="-0.003104336">
                <text:p>-0.0031043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285125732422">
                <text:p>346.285125732422</text:p>
              </table:table-cell>
              <table:table-cell office:value-type="float" office:value="-0.004347884">
                <text:p>-0.0043478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6.394195556641">
                <text:p>346.394195556641</text:p>
              </table:table-cell>
              <table:table-cell office:value-type="float" office:value="0.002931881">
                <text:p>0.0029318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6.503295898438">
                <text:p>346.503295898438</text:p>
              </table:table-cell>
              <table:table-cell office:value-type="float" office:value="-0.002360474">
                <text:p>-0.0023604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.612365722656">
                <text:p>346.612365722656</text:p>
              </table:table-cell>
              <table:table-cell office:value-type="float" office:value="-0.004528181">
                <text:p>-0.0045281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6.721466064453">
                <text:p>346.721466064453</text:p>
              </table:table-cell>
              <table:table-cell office:value-type="float" office:value="0.0008801112">
                <text:p>0.00088011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.83056640625">
                <text:p>346.83056640625</text:p>
              </table:table-cell>
              <table:table-cell office:value-type="float" office:value="0.01116166">
                <text:p>0.011161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.939697265625">
                <text:p>346.939697265625</text:p>
              </table:table-cell>
              <table:table-cell office:value-type="float" office:value="0.02839008">
                <text:p>0.028390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.048797607422">
                <text:p>347.048797607422</text:p>
              </table:table-cell>
              <table:table-cell office:value-type="float" office:value="-0.008756751">
                <text:p>-0.0087567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.157928466797">
                <text:p>347.157928466797</text:p>
              </table:table-cell>
              <table:table-cell office:value-type="float" office:value="-0.00869242">
                <text:p>-0.008692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.267059326172">
                <text:p>347.267059326172</text:p>
              </table:table-cell>
              <table:table-cell office:value-type="float" office:value="0.002602618">
                <text:p>0.0026026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7.376190185547">
                <text:p>347.376190185547</text:p>
              </table:table-cell>
              <table:table-cell office:value-type="float" office:value="-0.002172594">
                <text:p>-0.0021725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7.4853515625">
                <text:p>347.4853515625</text:p>
              </table:table-cell>
              <table:table-cell office:value-type="float" office:value="0.00504324">
                <text:p>0.005043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.594482421875">
                <text:p>347.594482421875</text:p>
              </table:table-cell>
              <table:table-cell office:value-type="float" office:value="-0.01181706">
                <text:p>-0.011817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.703643798828">
                <text:p>347.703643798828</text:p>
              </table:table-cell>
              <table:table-cell office:value-type="float" office:value="0.00393224">
                <text:p>0.003932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.812805175781">
                <text:p>347.812805175781</text:p>
              </table:table-cell>
              <table:table-cell office:value-type="float" office:value="-0.0008647703">
                <text:p>-0.00086477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.921966552734">
                <text:p>347.921966552734</text:p>
              </table:table-cell>
              <table:table-cell office:value-type="float" office:value="0.002261562">
                <text:p>0.0022615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.031158447266">
                <text:p>348.031158447266</text:p>
              </table:table-cell>
              <table:table-cell office:value-type="float" office:value="0.006800523">
                <text:p>0.0068005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.140319824219">
                <text:p>348.140319824219</text:p>
              </table:table-cell>
              <table:table-cell office:value-type="float" office:value="0.001583443">
                <text:p>0.0015834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8.24951171875">
                <text:p>348.24951171875</text:p>
              </table:table-cell>
              <table:table-cell office:value-type="float" office:value="0.01298139">
                <text:p>0.012981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8.358703613281">
                <text:p>348.358703613281</text:p>
              </table:table-cell>
              <table:table-cell office:value-type="float" office:value="-0.008444242">
                <text:p>-0.0084442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467926025391">
                <text:p>348.467926025391</text:p>
              </table:table-cell>
              <table:table-cell office:value-type="float" office:value="-0.0007637385">
                <text:p>-0.00076373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.577117919922">
                <text:p>348.577117919922</text:p>
              </table:table-cell>
              <table:table-cell office:value-type="float" office:value="-0.001543608">
                <text:p>-0.0015436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8.686340332031">
                <text:p>348.686340332031</text:p>
              </table:table-cell>
              <table:table-cell office:value-type="float" office:value="0.01968663">
                <text:p>0.019686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.795562744141">
                <text:p>348.795562744141</text:p>
              </table:table-cell>
              <table:table-cell office:value-type="float" office:value="-0.0008586079">
                <text:p>-0.00085860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.90478515625">
                <text:p>348.90478515625</text:p>
              </table:table-cell>
              <table:table-cell office:value-type="float" office:value="0.005063996">
                <text:p>0.0050639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.014038085938">
                <text:p>349.014038085938</text:p>
              </table:table-cell>
              <table:table-cell office:value-type="float" office:value="0.001217663">
                <text:p>0.0012176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.123260498047">
                <text:p>349.123260498047</text:p>
              </table:table-cell>
              <table:table-cell office:value-type="float" office:value="0.009948528">
                <text:p>0.0099485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.232513427734">
                <text:p>349.232513427734</text:p>
              </table:table-cell>
              <table:table-cell office:value-type="float" office:value="-0.008707716">
                <text:p>-0.0087077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9.341766357422">
                <text:p>349.341766357422</text:p>
              </table:table-cell>
              <table:table-cell office:value-type="float" office:value="-0.009005493">
                <text:p>-0.0090054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9.451019287109">
                <text:p>349.451019287109</text:p>
              </table:table-cell>
              <table:table-cell office:value-type="float" office:value="0.008488341">
                <text:p>0.0084883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.560302734375">
                <text:p>349.560302734375</text:p>
              </table:table-cell>
              <table:table-cell office:value-type="float" office:value="0.003418948">
                <text:p>0.0034189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669586181641">
                <text:p>349.669586181641</text:p>
              </table:table-cell>
              <table:table-cell office:value-type="float" office:value="-0.006783471">
                <text:p>-0.0067834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9.778839111328">
                <text:p>349.778839111328</text:p>
              </table:table-cell>
              <table:table-cell office:value-type="float" office:value="-0.003756392">
                <text:p>-0.0037563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9.888153076172">
                <text:p>349.888153076172</text:p>
              </table:table-cell>
              <table:table-cell office:value-type="float" office:value="0.01446066">
                <text:p>0.014460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.997436523438">
                <text:p>349.997436523438</text:p>
              </table:table-cell>
              <table:table-cell office:value-type="float" office:value="0.009927637">
                <text:p>0.0099276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.106719970703">
                <text:p>350.106719970703</text:p>
              </table:table-cell>
              <table:table-cell office:value-type="float" office:value="0.009518604">
                <text:p>0.0095186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.216033935547">
                <text:p>350.216033935547</text:p>
              </table:table-cell>
              <table:table-cell office:value-type="float" office:value="-0.007611021">
                <text:p>-0.007611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.325347900391">
                <text:p>350.325347900391</text:p>
              </table:table-cell>
              <table:table-cell office:value-type="float" office:value="-0.000918333">
                <text:p>-0.000918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.434661865234">
                <text:p>350.434661865234</text:p>
              </table:table-cell>
              <table:table-cell office:value-type="float" office:value="0.005952943">
                <text:p>0.0059529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.544006347656">
                <text:p>350.544006347656</text:p>
              </table:table-cell>
              <table:table-cell office:value-type="float" office:value="0.003569404">
                <text:p>0.0035694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.6533203125">
                <text:p>350.6533203125</text:p>
              </table:table-cell>
              <table:table-cell office:value-type="float" office:value="0.005123412">
                <text:p>0.0051234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.762664794922">
                <text:p>350.762664794922</text:p>
              </table:table-cell>
              <table:table-cell office:value-type="float" office:value="0.004440204">
                <text:p>0.0044402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.872009277344">
                <text:p>350.872009277344</text:p>
              </table:table-cell>
              <table:table-cell office:value-type="float" office:value="0.01281749">
                <text:p>0.012817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.981353759766">
                <text:p>350.981353759766</text:p>
              </table:table-cell>
              <table:table-cell office:value-type="float" office:value="-0.01077365">
                <text:p>-0.010773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1.090728759766">
                <text:p>351.090728759766</text:p>
              </table:table-cell>
              <table:table-cell office:value-type="float" office:value="0.003047456">
                <text:p>0.0030474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1.200073242188">
                <text:p>351.200073242188</text:p>
              </table:table-cell>
              <table:table-cell office:value-type="float" office:value="0.002283974">
                <text:p>0.0022839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1.309448242188">
                <text:p>351.309448242188</text:p>
              </table:table-cell>
              <table:table-cell office:value-type="float" office:value="0.01130279">
                <text:p>0.011302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.418823242188">
                <text:p>351.418823242188</text:p>
              </table:table-cell>
              <table:table-cell office:value-type="float" office:value="0.008097465">
                <text:p>0.0080974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1.528228759766">
                <text:p>351.528228759766</text:p>
              </table:table-cell>
              <table:table-cell office:value-type="float" office:value="-0.008565827">
                <text:p>-0.0085658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.637603759766">
                <text:p>351.637603759766</text:p>
              </table:table-cell>
              <table:table-cell office:value-type="float" office:value="0.01054595">
                <text:p>0.010545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.747009277344">
                <text:p>351.747009277344</text:p>
              </table:table-cell>
              <table:table-cell office:value-type="float" office:value="0.00164016">
                <text:p>0.001640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.856414794922">
                <text:p>351.856414794922</text:p>
              </table:table-cell>
              <table:table-cell office:value-type="float" office:value="-0.008235634">
                <text:p>-0.0082356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.9658203125">
                <text:p>351.9658203125</text:p>
              </table:table-cell>
              <table:table-cell office:value-type="float" office:value="0.002205011">
                <text:p>0.0022050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2.075225830078">
                <text:p>352.075225830078</text:p>
              </table:table-cell>
              <table:table-cell office:value-type="float" office:value="-0.000421244">
                <text:p>-0.0004212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2.184661865234">
                <text:p>352.184661865234</text:p>
              </table:table-cell>
              <table:table-cell office:value-type="float" office:value="0.003617468">
                <text:p>0.0036174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2.294097900391">
                <text:p>352.294097900391</text:p>
              </table:table-cell>
              <table:table-cell office:value-type="float" office:value="0.005271125">
                <text:p>0.0052711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.403533935547">
                <text:p>352.403533935547</text:p>
              </table:table-cell>
              <table:table-cell office:value-type="float" office:value="-0.00234586">
                <text:p>-0.002345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2.512969970703">
                <text:p>352.512969970703</text:p>
              </table:table-cell>
              <table:table-cell office:value-type="float" office:value="0.001866367">
                <text:p>0.0018663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2.622406005859">
                <text:p>352.622406005859</text:p>
              </table:table-cell>
              <table:table-cell office:value-type="float" office:value="0.01675478">
                <text:p>0.016754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2.731872558594">
                <text:p>352.731872558594</text:p>
              </table:table-cell>
              <table:table-cell office:value-type="float" office:value="-0.004597291">
                <text:p>-0.0045972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.841339111328">
                <text:p>352.841339111328</text:p>
              </table:table-cell>
              <table:table-cell office:value-type="float" office:value="-0.00713058">
                <text:p>-0.007130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2.950805664063">
                <text:p>352.950805664063</text:p>
              </table:table-cell>
              <table:table-cell office:value-type="float" office:value="0.01546569">
                <text:p>0.015465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3.060272216797">
                <text:p>353.060272216797</text:p>
              </table:table-cell>
              <table:table-cell office:value-type="float" office:value="0.01117441">
                <text:p>0.011174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3.169738769531">
                <text:p>353.169738769531</text:p>
              </table:table-cell>
              <table:table-cell office:value-type="float" office:value="-0.001379678">
                <text:p>-0.0013796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3.279235839844">
                <text:p>353.279235839844</text:p>
              </table:table-cell>
              <table:table-cell office:value-type="float" office:value="-0.002050626">
                <text:p>-0.0020506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.388732910156">
                <text:p>353.388732910156</text:p>
              </table:table-cell>
              <table:table-cell office:value-type="float" office:value="0.005182718">
                <text:p>0.0051827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.498229980469">
                <text:p>353.498229980469</text:p>
              </table:table-cell>
              <table:table-cell office:value-type="float" office:value="0.005016899">
                <text:p>0.0050168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.607727050781">
                <text:p>353.607727050781</text:p>
              </table:table-cell>
              <table:table-cell office:value-type="float" office:value="0.00819344">
                <text:p>0.008193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.717254638672">
                <text:p>353.717254638672</text:p>
              </table:table-cell>
              <table:table-cell office:value-type="float" office:value="-0.0008742505">
                <text:p>-0.00087425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.826782226563">
                <text:p>353.826782226563</text:p>
              </table:table-cell>
              <table:table-cell office:value-type="float" office:value="-0.004060785">
                <text:p>-0.0040607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3.936309814453">
                <text:p>353.936309814453</text:p>
              </table:table-cell>
              <table:table-cell office:value-type="float" office:value="0.01591812">
                <text:p>0.015918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045837402344">
                <text:p>354.045837402344</text:p>
              </table:table-cell>
              <table:table-cell office:value-type="float" office:value="-0.00464865">
                <text:p>-0.004648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.155364990234">
                <text:p>354.155364990234</text:p>
              </table:table-cell>
              <table:table-cell office:value-type="float" office:value="0.00499635">
                <text:p>0.004996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.264923095703">
                <text:p>354.264923095703</text:p>
              </table:table-cell>
              <table:table-cell office:value-type="float" office:value="0.002729551">
                <text:p>0.0027295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.374481201172">
                <text:p>354.374481201172</text:p>
              </table:table-cell>
              <table:table-cell office:value-type="float" office:value="0.005740423">
                <text:p>0.0057404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.484039306641">
                <text:p>354.484039306641</text:p>
              </table:table-cell>
              <table:table-cell office:value-type="float" office:value="0.003757245">
                <text:p>0.0037572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.593597412109">
                <text:p>354.593597412109</text:p>
              </table:table-cell>
              <table:table-cell office:value-type="float" office:value="0.003685752">
                <text:p>0.0036857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.703155517578">
                <text:p>354.703155517578</text:p>
              </table:table-cell>
              <table:table-cell office:value-type="float" office:value="0.001864188">
                <text:p>0.0018641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.812744140625">
                <text:p>354.812744140625</text:p>
              </table:table-cell>
              <table:table-cell office:value-type="float" office:value="0.01145365">
                <text:p>0.011453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.922332763672">
                <text:p>354.922332763672</text:p>
              </table:table-cell>
              <table:table-cell office:value-type="float" office:value="0.0006166624">
                <text:p>0.00061666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031921386719">
                <text:p>355.031921386719</text:p>
              </table:table-cell>
              <table:table-cell office:value-type="float" office:value="0.006752285">
                <text:p>0.0067522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.141510009766">
                <text:p>355.141510009766</text:p>
              </table:table-cell>
              <table:table-cell office:value-type="float" office:value="-0.002466033">
                <text:p>-0.0024660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5.251129150391">
                <text:p>355.251129150391</text:p>
              </table:table-cell>
              <table:table-cell office:value-type="float" office:value="0.003870827">
                <text:p>0.0038708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.360717773438">
                <text:p>355.360717773438</text:p>
              </table:table-cell>
              <table:table-cell office:value-type="float" office:value="0.003018853">
                <text:p>0.0030188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5.470336914063">
                <text:p>355.470336914063</text:p>
              </table:table-cell>
              <table:table-cell office:value-type="float" office:value="0.0007789153">
                <text:p>0.00077891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5.579956054688">
                <text:p>355.579956054688</text:p>
              </table:table-cell>
              <table:table-cell office:value-type="float" office:value="0.008823338">
                <text:p>0.0088233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5.689605712891">
                <text:p>355.689605712891</text:p>
              </table:table-cell>
              <table:table-cell office:value-type="float" office:value="0.01262111">
                <text:p>0.012621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5.799224853516">
                <text:p>355.799224853516</text:p>
              </table:table-cell>
              <table:table-cell office:value-type="float" office:value="0.01417643">
                <text:p>0.014176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5.908874511719">
                <text:p>355.908874511719</text:p>
              </table:table-cell>
              <table:table-cell office:value-type="float" office:value="-0.006172351">
                <text:p>-0.0061723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018524169922">
                <text:p>356.018524169922</text:p>
              </table:table-cell>
              <table:table-cell office:value-type="float" office:value="0.01046337">
                <text:p>0.010463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128173828125">
                <text:p>356.128173828125</text:p>
              </table:table-cell>
              <table:table-cell office:value-type="float" office:value="-0.002813441">
                <text:p>-0.0028134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6.237823486328">
                <text:p>356.237823486328</text:p>
              </table:table-cell>
              <table:table-cell office:value-type="float" office:value="-0.005278667">
                <text:p>-0.005278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347503662109">
                <text:p>356.347503662109</text:p>
              </table:table-cell>
              <table:table-cell office:value-type="float" office:value="0.003861682">
                <text:p>0.0038616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457183837891">
                <text:p>356.457183837891</text:p>
              </table:table-cell>
              <table:table-cell office:value-type="float" office:value="0.003008819">
                <text:p>0.0030088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566864013672">
                <text:p>356.566864013672</text:p>
              </table:table-cell>
              <table:table-cell office:value-type="float" office:value="0.001223081">
                <text:p>0.0012230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.676544189453">
                <text:p>356.676544189453</text:p>
              </table:table-cell>
              <table:table-cell office:value-type="float" office:value="-0.005649687">
                <text:p>-0.0056496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786224365234">
                <text:p>356.786224365234</text:p>
              </table:table-cell>
              <table:table-cell office:value-type="float" office:value="-0.005822403">
                <text:p>-0.0058224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95935058594">
                <text:p>356.895935058594</text:p>
              </table:table-cell>
              <table:table-cell office:value-type="float" office:value="-0.005943328">
                <text:p>-0.0059433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05645751953">
                <text:p>357.005645751953</text:p>
              </table:table-cell>
              <table:table-cell office:value-type="float" office:value="-0.008079506">
                <text:p>-0.0080795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115356445313">
                <text:p>357.115356445313</text:p>
              </table:table-cell>
              <table:table-cell office:value-type="float" office:value="0.000292081">
                <text:p>0.0002920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225067138672">
                <text:p>357.225067138672</text:p>
              </table:table-cell>
              <table:table-cell office:value-type="float" office:value="0.003898786">
                <text:p>0.0038987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334777832031">
                <text:p>357.334777832031</text:p>
              </table:table-cell>
              <table:table-cell office:value-type="float" office:value="0.003617486">
                <text:p>0.0036174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444519042969">
                <text:p>357.444519042969</text:p>
              </table:table-cell>
              <table:table-cell office:value-type="float" office:value="0.007688948">
                <text:p>0.0076889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554260253906">
                <text:p>357.554260253906</text:p>
              </table:table-cell>
              <table:table-cell office:value-type="float" office:value="-0.00433439">
                <text:p>-0.004334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.664001464844">
                <text:p>357.664001464844</text:p>
              </table:table-cell>
              <table:table-cell office:value-type="float" office:value="-0.0008585656">
                <text:p>-0.00085856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773742675781">
                <text:p>357.773742675781</text:p>
              </table:table-cell>
              <table:table-cell office:value-type="float" office:value="0.01474736">
                <text:p>0.014747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883514404297">
                <text:p>357.883514404297</text:p>
              </table:table-cell>
              <table:table-cell office:value-type="float" office:value="0.001310314">
                <text:p>0.0013103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993286132813">
                <text:p>357.993286132813</text:p>
              </table:table-cell>
              <table:table-cell office:value-type="float" office:value="-0.000949987">
                <text:p>-0.0009499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10302734375">
                <text:p>358.10302734375</text:p>
              </table:table-cell>
              <table:table-cell office:value-type="float" office:value="0.009798704">
                <text:p>0.0097987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212829589844">
                <text:p>358.212829589844</text:p>
              </table:table-cell>
              <table:table-cell office:value-type="float" office:value="0.01057744">
                <text:p>0.010577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322601318359">
                <text:p>358.322601318359</text:p>
              </table:table-cell>
              <table:table-cell office:value-type="float" office:value="0.003147061">
                <text:p>0.0031470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.432373046875">
                <text:p>358.432373046875</text:p>
              </table:table-cell>
              <table:table-cell office:value-type="float" office:value="0.007180858">
                <text:p>0.0071808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542175292969">
                <text:p>358.542175292969</text:p>
              </table:table-cell>
              <table:table-cell office:value-type="float" office:value="-0.004715101">
                <text:p>-0.0047151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8.651977539063">
                <text:p>358.651977539063</text:p>
              </table:table-cell>
              <table:table-cell office:value-type="float" office:value="0.002185221">
                <text:p>0.0021852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.761779785156">
                <text:p>358.761779785156</text:p>
              </table:table-cell>
              <table:table-cell office:value-type="float" office:value="0.0090333">
                <text:p>0.0090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8.871612548828">
                <text:p>358.871612548828</text:p>
              </table:table-cell>
              <table:table-cell office:value-type="float" office:value="-0.005472638">
                <text:p>-0.0054726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.981414794922">
                <text:p>358.981414794922</text:p>
              </table:table-cell>
              <table:table-cell office:value-type="float" office:value="0.00206763">
                <text:p>0.002067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091247558594">
                <text:p>359.091247558594</text:p>
              </table:table-cell>
              <table:table-cell office:value-type="float" office:value="0.01472148">
                <text:p>0.014721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201080322266">
                <text:p>359.201080322266</text:p>
              </table:table-cell>
              <table:table-cell office:value-type="float" office:value="0.005216882">
                <text:p>0.0052168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310913085938">
                <text:p>359.310913085938</text:p>
              </table:table-cell>
              <table:table-cell office:value-type="float" office:value="0.001036683">
                <text:p>0.0010366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420776367188">
                <text:p>359.420776367188</text:p>
              </table:table-cell>
              <table:table-cell office:value-type="float" office:value="-0.009017445">
                <text:p>-0.0090174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.530609130859">
                <text:p>359.530609130859</text:p>
              </table:table-cell>
              <table:table-cell office:value-type="float" office:value="0.01165855">
                <text:p>0.011658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.640472412109">
                <text:p>359.640472412109</text:p>
              </table:table-cell>
              <table:table-cell office:value-type="float" office:value="-0.0008192227">
                <text:p>-0.00081922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.750335693359">
                <text:p>359.750335693359</text:p>
              </table:table-cell>
              <table:table-cell office:value-type="float" office:value="-0.001629036">
                <text:p>-0.0016290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.860198974609">
                <text:p>359.860198974609</text:p>
              </table:table-cell>
              <table:table-cell office:value-type="float" office:value="0.0003648962">
                <text:p>0.00036489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.970092773438">
                <text:p>359.970092773438</text:p>
              </table:table-cell>
              <table:table-cell office:value-type="float" office:value="0.007121339">
                <text:p>0.0071213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079986572266">
                <text:p>360.079986572266</text:p>
              </table:table-cell>
              <table:table-cell office:value-type="float" office:value="-0.005427741">
                <text:p>-0.0054277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189849853516">
                <text:p>360.189849853516</text:p>
              </table:table-cell>
              <table:table-cell office:value-type="float" office:value="0.01245541">
                <text:p>0.012455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299743652344">
                <text:p>360.299743652344</text:p>
              </table:table-cell>
              <table:table-cell office:value-type="float" office:value="0.01176024">
                <text:p>0.011760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40966796875">
                <text:p>360.40966796875</text:p>
              </table:table-cell>
              <table:table-cell office:value-type="float" office:value="0.009479216">
                <text:p>0.0094792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519561767578">
                <text:p>360.519561767578</text:p>
              </table:table-cell>
              <table:table-cell office:value-type="float" office:value="0.003812491">
                <text:p>0.0038124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.629486083984">
                <text:p>360.629486083984</text:p>
              </table:table-cell>
              <table:table-cell office:value-type="float" office:value="0.0028202">
                <text:p>0.00282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739410400391">
                <text:p>360.739410400391</text:p>
              </table:table-cell>
              <table:table-cell office:value-type="float" office:value="-0.003438495">
                <text:p>-0.0034384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49334716797">
                <text:p>360.849334716797</text:p>
              </table:table-cell>
              <table:table-cell office:value-type="float" office:value="0.006135249">
                <text:p>0.0061352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959259033203">
                <text:p>360.959259033203</text:p>
              </table:table-cell>
              <table:table-cell office:value-type="float" office:value="-0.008084182">
                <text:p>-0.0080841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069213867188">
                <text:p>361.06921386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179168701172">
                <text:p>361.179168701172</text:p>
              </table:table-cell>
              <table:table-cell office:value-type="float" office:value="-0.0002893191">
                <text:p>-0.00028931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289093017578">
                <text:p>361.289093017578</text:p>
              </table:table-cell>
              <table:table-cell office:value-type="float" office:value="0.001977733">
                <text:p>0.0019777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399078369141">
                <text:p>361.399078369141</text:p>
              </table:table-cell>
              <table:table-cell office:value-type="float" office:value="0.003853807">
                <text:p>0.0038538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509033203125">
                <text:p>361.509033203125</text:p>
              </table:table-cell>
              <table:table-cell office:value-type="float" office:value="-0.006685247">
                <text:p>-0.0066852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619018554688">
                <text:p>361.619018554688</text:p>
              </table:table-cell>
              <table:table-cell office:value-type="float" office:value="-0.005496413">
                <text:p>-0.0054964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.728973388672">
                <text:p>361.728973388672</text:p>
              </table:table-cell>
              <table:table-cell office:value-type="float" office:value="0.007883203">
                <text:p>0.0078832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.838958740234">
                <text:p>361.838958740234</text:p>
              </table:table-cell>
              <table:table-cell office:value-type="float" office:value="0.00241527">
                <text:p>0.002415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.948944091797">
                <text:p>361.948944091797</text:p>
              </table:table-cell>
              <table:table-cell office:value-type="float" office:value="0.0003723637">
                <text:p>0.00037236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058959960938">
                <text:p>362.058959960938</text:p>
              </table:table-cell>
              <table:table-cell office:value-type="float" office:value="-0.0005907053">
                <text:p>-0.00059070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1689453125">
                <text:p>362.1689453125</text:p>
              </table:table-cell>
              <table:table-cell office:value-type="float" office:value="0.004297743">
                <text:p>0.0042977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278961181641">
                <text:p>362.278961181641</text:p>
              </table:table-cell>
              <table:table-cell office:value-type="float" office:value="0.01737295">
                <text:p>0.017372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388977050781">
                <text:p>362.388977050781</text:p>
              </table:table-cell>
              <table:table-cell office:value-type="float" office:value="0.01041399">
                <text:p>0.010413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498992919922">
                <text:p>362.498992919922</text:p>
              </table:table-cell>
              <table:table-cell office:value-type="float" office:value="-0.0007476792">
                <text:p>-0.00074767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609039306641">
                <text:p>362.609039306641</text:p>
              </table:table-cell>
              <table:table-cell office:value-type="float" office:value="-0.002044813">
                <text:p>-0.0020448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719055175781">
                <text:p>362.719055175781</text:p>
              </table:table-cell>
              <table:table-cell office:value-type="float" office:value="0.007763628">
                <text:p>0.0077636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2.8291015625">
                <text:p>362.8291015625</text:p>
              </table:table-cell>
              <table:table-cell office:value-type="float" office:value="0.01180357">
                <text:p>0.011803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.939147949219">
                <text:p>362.939147949219</text:p>
              </table:table-cell>
              <table:table-cell office:value-type="float" office:value="0.0008683686">
                <text:p>0.00086836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049224853516">
                <text:p>363.049224853516</text:p>
              </table:table-cell>
              <table:table-cell office:value-type="float" office:value="-0.0007311311">
                <text:p>-0.00073113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159271240234">
                <text:p>363.159271240234</text:p>
              </table:table-cell>
              <table:table-cell office:value-type="float" office:value="-0.000862432">
                <text:p>-0.0008624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269348144531">
                <text:p>363.269348144531</text:p>
              </table:table-cell>
              <table:table-cell office:value-type="float" office:value="0.005945758">
                <text:p>0.0059457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37939453125">
                <text:p>363.37939453125</text:p>
              </table:table-cell>
              <table:table-cell office:value-type="float" office:value="0.005593059">
                <text:p>0.0055930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489501953125">
                <text:p>363.489501953125</text:p>
              </table:table-cell>
              <table:table-cell office:value-type="float" office:value="-0.006820907">
                <text:p>-0.0068209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599578857422">
                <text:p>363.599578857422</text:p>
              </table:table-cell>
              <table:table-cell office:value-type="float" office:value="0.01262655">
                <text:p>0.012626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709655761719">
                <text:p>363.709655761719</text:p>
              </table:table-cell>
              <table:table-cell office:value-type="float" office:value="0.007805487">
                <text:p>0.0078054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819763183594">
                <text:p>363.819763183594</text:p>
              </table:table-cell>
              <table:table-cell office:value-type="float" office:value="0.005617854">
                <text:p>0.0056178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3.929870605469">
                <text:p>363.929870605469</text:p>
              </table:table-cell>
              <table:table-cell office:value-type="float" office:value="-0.005613798">
                <text:p>-0.0056137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039978027344">
                <text:p>364.039978027344</text:p>
              </table:table-cell>
              <table:table-cell office:value-type="float" office:value="-0.006665592">
                <text:p>-0.0066655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150085449219">
                <text:p>364.150085449219</text:p>
              </table:table-cell>
              <table:table-cell office:value-type="float" office:value="-0.004338553">
                <text:p>-0.0043385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260223388672">
                <text:p>364.260223388672</text:p>
              </table:table-cell>
              <table:table-cell office:value-type="float" office:value="-0.002192688">
                <text:p>-0.0021926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370330810547">
                <text:p>364.370330810547</text:p>
              </table:table-cell>
              <table:table-cell office:value-type="float" office:value="-0.004166504">
                <text:p>-0.0041665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48046875">
                <text:p>364.48046875</text:p>
              </table:table-cell>
              <table:table-cell office:value-type="float" office:value="0.006801072">
                <text:p>0.0068010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590606689453">
                <text:p>364.590606689453</text:p>
              </table:table-cell>
              <table:table-cell office:value-type="float" office:value="0.009166613">
                <text:p>0.0091666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00775146484">
                <text:p>364.700775146484</text:p>
              </table:table-cell>
              <table:table-cell office:value-type="float" office:value="0.003460175">
                <text:p>0.0034601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10913085938">
                <text:p>364.810913085938</text:p>
              </table:table-cell>
              <table:table-cell office:value-type="float" office:value="0.01435385">
                <text:p>0.014353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21081542969">
                <text:p>364.921081542969</text:p>
              </table:table-cell>
              <table:table-cell office:value-type="float" office:value="-0.004425531">
                <text:p>-0.0044255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3125">
                <text:p>365.03125</text:p>
              </table:table-cell>
              <table:table-cell office:value-type="float" office:value="-0.005584772">
                <text:p>-0.0055847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41418457031">
                <text:p>365.141418457031</text:p>
              </table:table-cell>
              <table:table-cell office:value-type="float" office:value="-0.008698112">
                <text:p>-0.0086981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51586914063">
                <text:p>365.251586914063</text:p>
              </table:table-cell>
              <table:table-cell office:value-type="float" office:value="0.009551741">
                <text:p>0.0095517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61785888672">
                <text:p>365.361785888672</text:p>
              </table:table-cell>
              <table:table-cell office:value-type="float" office:value="0.0264585">
                <text:p>0.02645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71984863281">
                <text:p>365.471984863281</text:p>
              </table:table-cell>
              <table:table-cell office:value-type="float" office:value="0.003150185">
                <text:p>0.0031501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2183837891">
                <text:p>365.582183837891</text:p>
              </table:table-cell>
              <table:table-cell office:value-type="float" office:value="0.007087763">
                <text:p>0.0070877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923828125">
                <text:p>365.6923828125</text:p>
              </table:table-cell>
              <table:table-cell office:value-type="float" office:value="0.00905039">
                <text:p>0.009050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802581787109">
                <text:p>365.802581787109</text:p>
              </table:table-cell>
              <table:table-cell office:value-type="float" office:value="-0.0003541051">
                <text:p>-0.00035410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912811279297">
                <text:p>365.912811279297</text:p>
              </table:table-cell>
              <table:table-cell office:value-type="float" office:value="0.008882673">
                <text:p>0.0088826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6.023010253906">
                <text:p>366.023010253906</text:p>
              </table:table-cell>
              <table:table-cell office:value-type="float" office:value="0.003384786">
                <text:p>0.0033847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133239746094">
                <text:p>366.133239746094</text:p>
              </table:table-cell>
              <table:table-cell office:value-type="float" office:value="0.004965893">
                <text:p>0.0049658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243499755859">
                <text:p>366.243499755859</text:p>
              </table:table-cell>
              <table:table-cell office:value-type="float" office:value="-0.002153087">
                <text:p>-0.0021530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353729248047">
                <text:p>366.353729248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463989257813">
                <text:p>366.463989257813</text:p>
              </table:table-cell>
              <table:table-cell office:value-type="float" office:value="-0.0006124174">
                <text:p>-0.00061241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57421875">
                <text:p>366.57421875</text:p>
              </table:table-cell>
              <table:table-cell office:value-type="float" office:value="0.003554728">
                <text:p>0.0035547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684478759766">
                <text:p>366.684478759766</text:p>
              </table:table-cell>
              <table:table-cell office:value-type="float" office:value="-0.0007172529">
                <text:p>-0.00071725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794738769531">
                <text:p>366.794738769531</text:p>
              </table:table-cell>
              <table:table-cell office:value-type="float" office:value="0.009848307">
                <text:p>0.0098483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905029296875">
                <text:p>366.905029296875</text:p>
              </table:table-cell>
              <table:table-cell office:value-type="float" office:value="-0.003023271">
                <text:p>-0.00302327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7.015289306641">
                <text:p>367.015289306641</text:p>
              </table:table-cell>
              <table:table-cell office:value-type="float" office:value="0.0009811952">
                <text:p>0.00098119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7.125579833984">
                <text:p>367.125579833984</text:p>
              </table:table-cell>
              <table:table-cell office:value-type="float" office:value="0.01178099">
                <text:p>0.011780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235870361328">
                <text:p>367.235870361328</text:p>
              </table:table-cell>
              <table:table-cell office:value-type="float" office:value="0.01482128">
                <text:p>0.014821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346160888672">
                <text:p>367.346160888672</text:p>
              </table:table-cell>
              <table:table-cell office:value-type="float" office:value="0.01850895">
                <text:p>0.018508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456481933594">
                <text:p>367.456481933594</text:p>
              </table:table-cell>
              <table:table-cell office:value-type="float" office:value="0.009881925">
                <text:p>0.0098819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566772460938">
                <text:p>367.566772460938</text:p>
              </table:table-cell>
              <table:table-cell office:value-type="float" office:value="-0.005734229">
                <text:p>-0.0057342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677093505859">
                <text:p>367.677093505859</text:p>
              </table:table-cell>
              <table:table-cell office:value-type="float" office:value="-0.002401382">
                <text:p>-0.0024013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787414550781">
                <text:p>367.787414550781</text:p>
              </table:table-cell>
              <table:table-cell office:value-type="float" office:value="-0.007138149">
                <text:p>-0.0071381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897766113281">
                <text:p>367.897766113281</text:p>
              </table:table-cell>
              <table:table-cell office:value-type="float" office:value="-0.008717109">
                <text:p>-0.0087171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8.008087158203">
                <text:p>368.008087158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.118438720703">
                <text:p>368.118438720703</text:p>
              </table:table-cell>
              <table:table-cell office:value-type="float" office:value="-0.003169647">
                <text:p>-0.0031696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228759765625">
                <text:p>368.228759765625</text:p>
              </table:table-cell>
              <table:table-cell office:value-type="float" office:value="0.0007845262">
                <text:p>0.00078452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339111328125">
                <text:p>368.339111328125</text:p>
              </table:table-cell>
              <table:table-cell office:value-type="float" office:value="-0.001747122">
                <text:p>-0.0017471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449493408203">
                <text:p>368.449493408203</text:p>
              </table:table-cell>
              <table:table-cell office:value-type="float" office:value="0.003219312">
                <text:p>0.0032193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559844970703">
                <text:p>368.559844970703</text:p>
              </table:table-cell>
              <table:table-cell office:value-type="float" office:value="0.007997064">
                <text:p>0.0079970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670227050781">
                <text:p>368.670227050781</text:p>
              </table:table-cell>
              <table:table-cell office:value-type="float" office:value="-0.006331035">
                <text:p>-0.0063310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780609130859">
                <text:p>368.780609130859</text:p>
              </table:table-cell>
              <table:table-cell office:value-type="float" office:value="-0.00253577">
                <text:p>-0.002535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890991210938">
                <text:p>368.890991210938</text:p>
              </table:table-cell>
              <table:table-cell office:value-type="float" office:value="-0.00871176">
                <text:p>-0.008711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.001373291016">
                <text:p>369.001373291016</text:p>
              </table:table-cell>
              <table:table-cell office:value-type="float" office:value="-0.0003892291">
                <text:p>-0.00038922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.111755371094">
                <text:p>369.111755371094</text:p>
              </table:table-cell>
              <table:table-cell office:value-type="float" office:value="-0.008194225">
                <text:p>-0.0081942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22216796875">
                <text:p>369.22216796875</text:p>
              </table:table-cell>
              <table:table-cell office:value-type="float" office:value="-0.007519995">
                <text:p>-0.0075199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.332580566406">
                <text:p>369.332580566406</text:p>
              </table:table-cell>
              <table:table-cell office:value-type="float" office:value="-0.007708793">
                <text:p>-0.0077087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442993164063">
                <text:p>369.442993164063</text:p>
              </table:table-cell>
              <table:table-cell office:value-type="float" office:value="-0.0008813191">
                <text:p>-0.00088131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553405761719">
                <text:p>369.553405761719</text:p>
              </table:table-cell>
              <table:table-cell office:value-type="float" office:value="0.00315688">
                <text:p>0.003156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663848876953">
                <text:p>369.663848876953</text:p>
              </table:table-cell>
              <table:table-cell office:value-type="float" office:value="0.005345318">
                <text:p>0.0053453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774261474609">
                <text:p>369.774261474609</text:p>
              </table:table-cell>
              <table:table-cell office:value-type="float" office:value="-0.004158068">
                <text:p>-0.0041580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884704589844">
                <text:p>369.884704589844</text:p>
              </table:table-cell>
              <table:table-cell office:value-type="float" office:value="0.002962178">
                <text:p>0.0029621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995147705078">
                <text:p>369.995147705078</text:p>
              </table:table-cell>
              <table:table-cell office:value-type="float" office:value="-0.006008863">
                <text:p>-0.0060088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.105621337891">
                <text:p>370.105621337891</text:p>
              </table:table-cell>
              <table:table-cell office:value-type="float" office:value="0.009050566">
                <text:p>0.0090505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0.216064453125">
                <text:p>370.216064453125</text:p>
              </table:table-cell>
              <table:table-cell office:value-type="float" office:value="0.008139867">
                <text:p>0.0081398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.326538085938">
                <text:p>370.326538085938</text:p>
              </table:table-cell>
              <table:table-cell office:value-type="float" office:value="0.01962248">
                <text:p>0.019622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.43701171875">
                <text:p>370.43701171875</text:p>
              </table:table-cell>
              <table:table-cell office:value-type="float" office:value="0.01075726">
                <text:p>0.010757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547485351563">
                <text:p>370.547485351563</text:p>
              </table:table-cell>
              <table:table-cell office:value-type="float" office:value="0.002703733">
                <text:p>0.0027037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657958984375">
                <text:p>370.657958984375</text:p>
              </table:table-cell>
              <table:table-cell office:value-type="float" office:value="-0.003669117">
                <text:p>-0.0036691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768432617188">
                <text:p>370.768432617188</text:p>
              </table:table-cell>
              <table:table-cell office:value-type="float" office:value="-0.008573296">
                <text:p>-0.0085732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878936767578">
                <text:p>370.878936767578</text:p>
              </table:table-cell>
              <table:table-cell office:value-type="float" office:value="0.006271032">
                <text:p>0.0062710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989440917969">
                <text:p>370.989440917969</text:p>
              </table:table-cell>
              <table:table-cell office:value-type="float" office:value="-0.006522551">
                <text:p>-0.0065225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1.099945068359">
                <text:p>371.099945068359</text:p>
              </table:table-cell>
              <table:table-cell office:value-type="float" office:value="0.004378581">
                <text:p>0.0043785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1.21044921875">
                <text:p>371.21044921875</text:p>
              </table:table-cell>
              <table:table-cell office:value-type="float" office:value="-0.005534307">
                <text:p>-0.0055343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1.320983886719">
                <text:p>371.320983886719</text:p>
              </table:table-cell>
              <table:table-cell office:value-type="float" office:value="-0.005006213">
                <text:p>-0.0050062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431488037109">
                <text:p>371.431488037109</text:p>
              </table:table-cell>
              <table:table-cell office:value-type="float" office:value="0.00135943">
                <text:p>0.001359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542022705078">
                <text:p>371.542022705078</text:p>
              </table:table-cell>
              <table:table-cell office:value-type="float" office:value="0.01196707">
                <text:p>0.011967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652557373047">
                <text:p>371.652557373047</text:p>
              </table:table-cell>
              <table:table-cell office:value-type="float" office:value="-0.0074987">
                <text:p>-0.00749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763122558594">
                <text:p>371.763122558594</text:p>
              </table:table-cell>
              <table:table-cell office:value-type="float" office:value="-0.004919441">
                <text:p>-0.0049194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873657226563">
                <text:p>371.873657226563</text:p>
              </table:table-cell>
              <table:table-cell office:value-type="float" office:value="-0.007148038">
                <text:p>-0.0071480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984222412109">
                <text:p>371.984222412109</text:p>
              </table:table-cell>
              <table:table-cell office:value-type="float" office:value="0.003410203">
                <text:p>0.0034102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.094787597656">
                <text:p>372.094787597656</text:p>
              </table:table-cell>
              <table:table-cell office:value-type="float" office:value="-0.00485561">
                <text:p>-0.004855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.205352783203">
                <text:p>372.205352783203</text:p>
              </table:table-cell>
              <table:table-cell office:value-type="float" office:value="-0.006059073">
                <text:p>-0.0060590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.31591796875">
                <text:p>372.31591796875</text:p>
              </table:table-cell>
              <table:table-cell office:value-type="float" office:value="-0.005980629">
                <text:p>-0.0059806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.426513671875">
                <text:p>372.426513671875</text:p>
              </table:table-cell>
              <table:table-cell office:value-type="float" office:value="-0.001286643">
                <text:p>-0.0012866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2.537078857422">
                <text:p>372.537078857422</text:p>
              </table:table-cell>
              <table:table-cell office:value-type="float" office:value="0.00264607">
                <text:p>0.002646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647674560547">
                <text:p>372.647674560547</text:p>
              </table:table-cell>
              <table:table-cell office:value-type="float" office:value="-0.009400459">
                <text:p>-0.0094004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758270263672">
                <text:p>372.75827026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868896484375">
                <text:p>372.868896484375</text:p>
              </table:table-cell>
              <table:table-cell office:value-type="float" office:value="0.005753997">
                <text:p>0.0057539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9794921875">
                <text:p>372.9794921875</text:p>
              </table:table-cell>
              <table:table-cell office:value-type="float" office:value="-0.009567216">
                <text:p>-0.0095672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.090118408203">
                <text:p>373.090118408203</text:p>
              </table:table-cell>
              <table:table-cell office:value-type="float" office:value="-0.00128052">
                <text:p>-0.001280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3.200744628906">
                <text:p>373.200744628906</text:p>
              </table:table-cell>
              <table:table-cell office:value-type="float" office:value="0.02798198">
                <text:p>0.027981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.311370849609">
                <text:p>373.311370849609</text:p>
              </table:table-cell>
              <table:table-cell office:value-type="float" office:value="-0.00102001">
                <text:p>-0.001020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.421997070313">
                <text:p>373.421997070313</text:p>
              </table:table-cell>
              <table:table-cell office:value-type="float" office:value="0.0009509774">
                <text:p>0.00095097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3.532623291016">
                <text:p>373.532623291016</text:p>
              </table:table-cell>
              <table:table-cell office:value-type="float" office:value="-0.006494706">
                <text:p>-0.0064947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.643280029297">
                <text:p>373.643280029297</text:p>
              </table:table-cell>
              <table:table-cell office:value-type="float" office:value="0.01126196">
                <text:p>0.011261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.753936767578">
                <text:p>373.753936767578</text:p>
              </table:table-cell>
              <table:table-cell office:value-type="float" office:value="0.006846471">
                <text:p>0.0068464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.864593505859">
                <text:p>373.864593505859</text:p>
              </table:table-cell>
              <table:table-cell office:value-type="float" office:value="-0.005613838">
                <text:p>-0.0056138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3.975250244141">
                <text:p>373.975250244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.0859375">
                <text:p>374.0859375</text:p>
              </table:table-cell>
              <table:table-cell office:value-type="float" office:value="-0.005046547">
                <text:p>-0.0050465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.196624755859">
                <text:p>374.196624755859</text:p>
              </table:table-cell>
              <table:table-cell office:value-type="float" office:value="-0.008772089">
                <text:p>-0.00877208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4.307281494141">
                <text:p>374.307281494141</text:p>
              </table:table-cell>
              <table:table-cell office:value-type="float" office:value="-0.002248087">
                <text:p>-0.0022480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4.417999267578">
                <text:p>374.417999267578</text:p>
              </table:table-cell>
              <table:table-cell office:value-type="float" office:value="-0.005401549">
                <text:p>-0.0054015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4.528686523438">
                <text:p>374.528686523438</text:p>
              </table:table-cell>
              <table:table-cell office:value-type="float" office:value="0.006887797">
                <text:p>0.0068877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4.639373779297">
                <text:p>374.639373779297</text:p>
              </table:table-cell>
              <table:table-cell office:value-type="float" office:value="0.008617021">
                <text:p>0.0086170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4.750091552734">
                <text:p>374.750091552734</text:p>
              </table:table-cell>
              <table:table-cell office:value-type="float" office:value="-0.004598459">
                <text:p>-0.00459845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.860809326172">
                <text:p>374.860809326172</text:p>
              </table:table-cell>
              <table:table-cell office:value-type="float" office:value="-0.001167377">
                <text:p>-0.0011673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.971527099609">
                <text:p>374.971527099609</text:p>
              </table:table-cell>
              <table:table-cell office:value-type="float" office:value="0.0001000278">
                <text:p>0.00010002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5.082244873047">
                <text:p>375.082244873047</text:p>
              </table:table-cell>
              <table:table-cell office:value-type="float" office:value="-0.0004186097">
                <text:p>-0.00041860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.192993164063">
                <text:p>375.192993164063</text:p>
              </table:table-cell>
              <table:table-cell office:value-type="float" office:value="-0.003010155">
                <text:p>-0.0030101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.3037109375">
                <text:p>375.3037109375</text:p>
              </table:table-cell>
              <table:table-cell office:value-type="float" office:value="-0.008411233">
                <text:p>-0.0084112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5.414459228516">
                <text:p>375.414459228516</text:p>
              </table:table-cell>
              <table:table-cell office:value-type="float" office:value="0.003221042">
                <text:p>0.0032210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5.525207519531">
                <text:p>375.525207519531</text:p>
              </table:table-cell>
              <table:table-cell office:value-type="float" office:value="-0.001225788">
                <text:p>-0.0012257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5.635986328125">
                <text:p>375.635986328125</text:p>
              </table:table-cell>
              <table:table-cell office:value-type="float" office:value="0.006856595">
                <text:p>0.0068565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5.746734619141">
                <text:p>375.746734619141</text:p>
              </table:table-cell>
              <table:table-cell office:value-type="float" office:value="-0.001551148">
                <text:p>-0.0015511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5.857513427734">
                <text:p>375.857513427734</text:p>
              </table:table-cell>
              <table:table-cell office:value-type="float" office:value="-0.003670598">
                <text:p>-0.0036705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.968292236328">
                <text:p>375.968292236328</text:p>
              </table:table-cell>
              <table:table-cell office:value-type="float" office:value="-0.002930521">
                <text:p>-0.0029305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.079071044922">
                <text:p>376.079071044922</text:p>
              </table:table-cell>
              <table:table-cell office:value-type="float" office:value="-0.00652318">
                <text:p>-0.006523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.189849853516">
                <text:p>376.189849853516</text:p>
              </table:table-cell>
              <table:table-cell office:value-type="float" office:value="0.0004290097">
                <text:p>0.00042900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.300628662109">
                <text:p>376.300628662109</text:p>
              </table:table-cell>
              <table:table-cell office:value-type="float" office:value="-0.002273491">
                <text:p>-0.0022734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6.411437988281">
                <text:p>376.411437988281</text:p>
              </table:table-cell>
              <table:table-cell office:value-type="float" office:value="-0.0102205">
                <text:p>-0.01022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6.522247314453">
                <text:p>376.522247314453</text:p>
              </table:table-cell>
              <table:table-cell office:value-type="float" office:value="-0.0006794499">
                <text:p>-0.00067944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633056640625">
                <text:p>376.633056640625</text:p>
              </table:table-cell>
              <table:table-cell office:value-type="float" office:value="-0.001141294">
                <text:p>-0.00114129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6.743865966797">
                <text:p>376.743865966797</text:p>
              </table:table-cell>
              <table:table-cell office:value-type="float" office:value="0.001944328">
                <text:p>0.0019443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6.854705810547">
                <text:p>376.854705810547</text:p>
              </table:table-cell>
              <table:table-cell office:value-type="float" office:value="0.01229912">
                <text:p>0.012299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965515136719">
                <text:p>376.965515136719</text:p>
              </table:table-cell>
              <table:table-cell office:value-type="float" office:value="0.0144704">
                <text:p>0.01447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7.076354980469">
                <text:p>377.076354980469</text:p>
              </table:table-cell>
              <table:table-cell office:value-type="float" office:value="-0.004882775">
                <text:p>-0.0048827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187194824219">
                <text:p>377.187194824219</text:p>
              </table:table-cell>
              <table:table-cell office:value-type="float" office:value="0.003967495">
                <text:p>0.0039674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298034667969">
                <text:p>377.298034667969</text:p>
              </table:table-cell>
              <table:table-cell office:value-type="float" office:value="-0.006760215">
                <text:p>-0.0067602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408905029297">
                <text:p>377.408905029297</text:p>
              </table:table-cell>
              <table:table-cell office:value-type="float" office:value="0.007020959">
                <text:p>0.00702095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.519744873047">
                <text:p>377.519744873047</text:p>
              </table:table-cell>
              <table:table-cell office:value-type="float" office:value="-0.004140541">
                <text:p>-0.0041405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.630615234375">
                <text:p>377.630615234375</text:p>
              </table:table-cell>
              <table:table-cell office:value-type="float" office:value="0.001867294">
                <text:p>0.0018672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.741485595703">
                <text:p>377.741485595703</text:p>
              </table:table-cell>
              <table:table-cell office:value-type="float" office:value="-0.004853302">
                <text:p>-0.0048533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.852355957031">
                <text:p>377.852355957031</text:p>
              </table:table-cell>
              <table:table-cell office:value-type="float" office:value="-0.005748196">
                <text:p>-0.0057481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.963256835938">
                <text:p>377.963256835938</text:p>
              </table:table-cell>
              <table:table-cell office:value-type="float" office:value="-0.00325452">
                <text:p>-0.003254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8.074157714844">
                <text:p>378.074157714844</text:p>
              </table:table-cell>
              <table:table-cell office:value-type="float" office:value="0.01074728">
                <text:p>0.010747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8.185028076172">
                <text:p>378.185028076172</text:p>
              </table:table-cell>
              <table:table-cell office:value-type="float" office:value="0.009431734">
                <text:p>0.0094317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8.295928955078">
                <text:p>378.295928955078</text:p>
              </table:table-cell>
              <table:table-cell office:value-type="float" office:value="-0.007268537">
                <text:p>-0.0072685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8.406860351563">
                <text:p>378.406860351563</text:p>
              </table:table-cell>
              <table:table-cell office:value-type="float" office:value="-0.0005357302">
                <text:p>-0.00053573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8.517761230469">
                <text:p>378.517761230469</text:p>
              </table:table-cell>
              <table:table-cell office:value-type="float" office:value="0.004908003">
                <text:p>0.0049080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8.628692626953">
                <text:p>378.628692626953</text:p>
              </table:table-cell>
              <table:table-cell office:value-type="float" office:value="0.0008968224">
                <text:p>0.00089682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8.739593505859">
                <text:p>378.739593505859</text:p>
              </table:table-cell>
              <table:table-cell office:value-type="float" office:value="0.00188803">
                <text:p>0.001888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.850524902344">
                <text:p>378.850524902344</text:p>
              </table:table-cell>
              <table:table-cell office:value-type="float" office:value="0.002912558">
                <text:p>0.0029125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8.961486816406">
                <text:p>378.961486816406</text:p>
              </table:table-cell>
              <table:table-cell office:value-type="float" office:value="0.004932524">
                <text:p>0.0049325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072418212891">
                <text:p>379.072418212891</text:p>
              </table:table-cell>
              <table:table-cell office:value-type="float" office:value="0.009558653">
                <text:p>0.0095586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183380126953">
                <text:p>379.183380126953</text:p>
              </table:table-cell>
              <table:table-cell office:value-type="float" office:value="-0.006145687">
                <text:p>-0.00614568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9.294311523438">
                <text:p>379.294311523438</text:p>
              </table:table-cell>
              <table:table-cell office:value-type="float" office:value="0.006352848">
                <text:p>0.00635284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9.4052734375">
                <text:p>379.4052734375</text:p>
              </table:table-cell>
              <table:table-cell office:value-type="float" office:value="-0.00959266">
                <text:p>-0.009592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9.516235351563">
                <text:p>379.516235351563</text:p>
              </table:table-cell>
              <table:table-cell office:value-type="float" office:value="-0.006253847">
                <text:p>-0.00625384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9.627227783203">
                <text:p>379.627227783203</text:p>
              </table:table-cell>
              <table:table-cell office:value-type="float" office:value="-0.001918484">
                <text:p>-0.0019184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9.738189697266">
                <text:p>379.738189697266</text:p>
              </table:table-cell>
              <table:table-cell office:value-type="float" office:value="0.01072842">
                <text:p>0.010728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9.849182128906">
                <text:p>379.849182128906</text:p>
              </table:table-cell>
              <table:table-cell office:value-type="float" office:value="-0.00503687">
                <text:p>-0.0050368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9.960174560547">
                <text:p>379.960174560547</text:p>
              </table:table-cell>
              <table:table-cell office:value-type="float" office:value="-0.00225891">
                <text:p>-0.002258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0.071166992188">
                <text:p>380.071166992188</text:p>
              </table:table-cell>
              <table:table-cell office:value-type="float" office:value="-0.005315765">
                <text:p>-0.00531576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.182189941406">
                <text:p>380.182189941406</text:p>
              </table:table-cell>
              <table:table-cell office:value-type="float" office:value="0.01031843">
                <text:p>0.0103184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0.293182373047">
                <text:p>380.293182373047</text:p>
              </table:table-cell>
              <table:table-cell office:value-type="float" office:value="0.005846627">
                <text:p>0.0058466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0.404205322266">
                <text:p>380.404205322266</text:p>
              </table:table-cell>
              <table:table-cell office:value-type="float" office:value="-0.0112117">
                <text:p>-0.01121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.515228271484">
                <text:p>380.515228271484</text:p>
              </table:table-cell>
              <table:table-cell office:value-type="float" office:value="-0.007823836">
                <text:p>-0.0078238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.626251220703">
                <text:p>380.626251220703</text:p>
              </table:table-cell>
              <table:table-cell office:value-type="float" office:value="-0.001136346">
                <text:p>-0.0011363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.737274169922">
                <text:p>380.737274169922</text:p>
              </table:table-cell>
              <table:table-cell office:value-type="float" office:value="-0.008678377">
                <text:p>-0.0086783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.848327636719">
                <text:p>380.848327636719</text:p>
              </table:table-cell>
              <table:table-cell office:value-type="float" office:value="0.01408558">
                <text:p>0.014085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.959381103516">
                <text:p>380.959381103516</text:p>
              </table:table-cell>
              <table:table-cell office:value-type="float" office:value="-0.001653036">
                <text:p>-0.0016530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1.070404052734">
                <text:p>381.070404052734</text:p>
              </table:table-cell>
              <table:table-cell office:value-type="float" office:value="-0.005128159">
                <text:p>-0.00512815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1.181488037109">
                <text:p>381.181488037109</text:p>
              </table:table-cell>
              <table:table-cell office:value-type="float" office:value="-0.002512683">
                <text:p>-0.00251268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1.292541503906">
                <text:p>381.292541503906</text:p>
              </table:table-cell>
              <table:table-cell office:value-type="float" office:value="-0.004457671">
                <text:p>-0.0044576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1.403594970703">
                <text:p>381.403594970703</text:p>
              </table:table-cell>
              <table:table-cell office:value-type="float" office:value="0.01074428">
                <text:p>0.010744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1.514678955078">
                <text:p>381.514678955078</text:p>
              </table:table-cell>
              <table:table-cell office:value-type="float" office:value="0.01004421">
                <text:p>0.010044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1.625762939453">
                <text:p>381.625762939453</text:p>
              </table:table-cell>
              <table:table-cell office:value-type="float" office:value="0.01160972">
                <text:p>0.011609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1.736846923828">
                <text:p>381.736846923828</text:p>
              </table:table-cell>
              <table:table-cell office:value-type="float" office:value="0.008137154">
                <text:p>0.0081371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1.847930908203">
                <text:p>381.847930908203</text:p>
              </table:table-cell>
              <table:table-cell office:value-type="float" office:value="-0.005773976">
                <text:p>-0.0057739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1.959045410156">
                <text:p>381.959045410156</text:p>
              </table:table-cell>
              <table:table-cell office:value-type="float" office:value="0.007896638">
                <text:p>0.0078966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2.070129394531">
                <text:p>382.070129394531</text:p>
              </table:table-cell>
              <table:table-cell office:value-type="float" office:value="0.001764866">
                <text:p>0.0017648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2.181243896484">
                <text:p>382.181243896484</text:p>
              </table:table-cell>
              <table:table-cell office:value-type="float" office:value="0.004225091">
                <text:p>0.0042250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2.292358398438">
                <text:p>382.292358398438</text:p>
              </table:table-cell>
              <table:table-cell office:value-type="float" office:value="-0.004692879">
                <text:p>-0.0046928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2.403503417969">
                <text:p>382.403503417969</text:p>
              </table:table-cell>
              <table:table-cell office:value-type="float" office:value="0.00397523">
                <text:p>0.003975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.514617919922">
                <text:p>382.514617919922</text:p>
              </table:table-cell>
              <table:table-cell office:value-type="float" office:value="0.01507538">
                <text:p>0.015075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2.625762939453">
                <text:p>382.625762939453</text:p>
              </table:table-cell>
              <table:table-cell office:value-type="float" office:value="-0.002174295">
                <text:p>-0.00217429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2.736907958984">
                <text:p>382.736907958984</text:p>
              </table:table-cell>
              <table:table-cell office:value-type="float" office:value="0.006674532">
                <text:p>0.00667453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2.848052978516">
                <text:p>382.848052978516</text:p>
              </table:table-cell>
              <table:table-cell office:value-type="float" office:value="0.002638303">
                <text:p>0.0026383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2.959197998047">
                <text:p>382.959197998047</text:p>
              </table:table-cell>
              <table:table-cell office:value-type="float" office:value="0.008343224">
                <text:p>0.0083432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3.070343017578">
                <text:p>383.070343017578</text:p>
              </table:table-cell>
              <table:table-cell office:value-type="float" office:value="0.003547058">
                <text:p>0.0035470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3.181518554688">
                <text:p>383.181518554688</text:p>
              </table:table-cell>
              <table:table-cell office:value-type="float" office:value="0.0127517">
                <text:p>0.01275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.292694091797">
                <text:p>383.292694091797</text:p>
              </table:table-cell>
              <table:table-cell office:value-type="float" office:value="0.003008823">
                <text:p>0.0030088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.403869628906">
                <text:p>383.403869628906</text:p>
              </table:table-cell>
              <table:table-cell office:value-type="float" office:value="-0.001632684">
                <text:p>-0.00163268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3.515045166016">
                <text:p>383.515045166016</text:p>
              </table:table-cell>
              <table:table-cell office:value-type="float" office:value="-0.001191448">
                <text:p>-0.0011914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3.626220703125">
                <text:p>383.626220703125</text:p>
              </table:table-cell>
              <table:table-cell office:value-type="float" office:value="0.0103637">
                <text:p>0.01036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3.737426757813">
                <text:p>383.737426757813</text:p>
              </table:table-cell>
              <table:table-cell office:value-type="float" office:value="0.01247538">
                <text:p>0.0124753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3.8486328125">
                <text:p>383.8486328125</text:p>
              </table:table-cell>
              <table:table-cell office:value-type="float" office:value="0.0001609174">
                <text:p>0.00016091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3.959838867188">
                <text:p>383.959838867188</text:p>
              </table:table-cell>
              <table:table-cell office:value-type="float" office:value="-0.0007150389">
                <text:p>-0.00071503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4.071044921875">
                <text:p>384.071044921875</text:p>
              </table:table-cell>
              <table:table-cell office:value-type="float" office:value="-0.008008822">
                <text:p>-0.0080088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4.182250976563">
                <text:p>384.182250976563</text:p>
              </table:table-cell>
              <table:table-cell office:value-type="float" office:value="0.01033099">
                <text:p>0.010330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4.293487548828">
                <text:p>384.293487548828</text:p>
              </table:table-cell>
              <table:table-cell office:value-type="float" office:value="-0.006808662">
                <text:p>-0.0068086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4.404693603516">
                <text:p>384.404693603516</text:p>
              </table:table-cell>
              <table:table-cell office:value-type="float" office:value="0.01041901">
                <text:p>0.010419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4.515930175781">
                <text:p>384.515930175781</text:p>
              </table:table-cell>
              <table:table-cell office:value-type="float" office:value="0.01048447">
                <text:p>0.010484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4.627197265625">
                <text:p>384.627197265625</text:p>
              </table:table-cell>
              <table:table-cell office:value-type="float" office:value="-0.008566332">
                <text:p>-0.0085663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4.738433837891">
                <text:p>384.738433837891</text:p>
              </table:table-cell>
              <table:table-cell office:value-type="float" office:value="-0.003472763">
                <text:p>-0.0034727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4.849670410156">
                <text:p>384.849670410156</text:p>
              </table:table-cell>
              <table:table-cell office:value-type="float" office:value="0.01597525">
                <text:p>0.015975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4.9609375">
                <text:p>384.9609375</text:p>
              </table:table-cell>
              <table:table-cell office:value-type="float" office:value="0.01373468">
                <text:p>0.0137346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5.072204589844">
                <text:p>385.072204589844</text:p>
              </table:table-cell>
              <table:table-cell office:value-type="float" office:value="-0.004843402">
                <text:p>-0.0048434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5.183471679688">
                <text:p>385.183471679688</text:p>
              </table:table-cell>
              <table:table-cell office:value-type="float" office:value="0.01363646">
                <text:p>0.013636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5.294738769531">
                <text:p>385.294738769531</text:p>
              </table:table-cell>
              <table:table-cell office:value-type="float" office:value="0.008079476">
                <text:p>0.0080794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5.406036376953">
                <text:p>385.406036376953</text:p>
              </table:table-cell>
              <table:table-cell office:value-type="float" office:value="-0.002622572">
                <text:p>-0.0026225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.517333984375">
                <text:p>385.517333984375</text:p>
              </table:table-cell>
              <table:table-cell office:value-type="float" office:value="0.004121152">
                <text:p>0.00412115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.628601074219">
                <text:p>385.628601074219</text:p>
              </table:table-cell>
              <table:table-cell office:value-type="float" office:value="-0.004063627">
                <text:p>-0.0040636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5.739898681641">
                <text:p>385.739898681641</text:p>
              </table:table-cell>
              <table:table-cell office:value-type="float" office:value="-0.007666876">
                <text:p>-0.0076668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5.851226806641">
                <text:p>385.851226806641</text:p>
              </table:table-cell>
              <table:table-cell office:value-type="float" office:value="0.01215574">
                <text:p>0.0121557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5.962524414063">
                <text:p>385.962524414063</text:p>
              </table:table-cell>
              <table:table-cell office:value-type="float" office:value="-0.003518534">
                <text:p>-0.00351853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6.073852539063">
                <text:p>386.073852539063</text:p>
              </table:table-cell>
              <table:table-cell office:value-type="float" office:value="0.0112041">
                <text:p>0.01120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6.185180664063">
                <text:p>386.185180664063</text:p>
              </table:table-cell>
              <table:table-cell office:value-type="float" office:value="0.0007032637">
                <text:p>0.00070326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6.296508789063">
                <text:p>386.296508789063</text:p>
              </table:table-cell>
              <table:table-cell office:value-type="float" office:value="0.006817081">
                <text:p>0.00681708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6.407836914063">
                <text:p>386.407836914063</text:p>
              </table:table-cell>
              <table:table-cell office:value-type="float" office:value="0.002258403">
                <text:p>0.00225840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6.519165039063">
                <text:p>386.519165039063</text:p>
              </table:table-cell>
              <table:table-cell office:value-type="float" office:value="0.003354141">
                <text:p>0.00335414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6.630523681641">
                <text:p>386.630523681641</text:p>
              </table:table-cell>
              <table:table-cell office:value-type="float" office:value="0.003585635">
                <text:p>0.0035856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6.741882324219">
                <text:p>386.741882324219</text:p>
              </table:table-cell>
              <table:table-cell office:value-type="float" office:value="0.001583287">
                <text:p>0.0015832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6.853240966797">
                <text:p>386.853240966797</text:p>
              </table:table-cell>
              <table:table-cell office:value-type="float" office:value="-0.002885706">
                <text:p>-0.0028857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6.964599609375">
                <text:p>386.964599609375</text:p>
              </table:table-cell>
              <table:table-cell office:value-type="float" office:value="-0.00454649">
                <text:p>-0.004546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7.075958251953">
                <text:p>387.075958251953</text:p>
              </table:table-cell>
              <table:table-cell office:value-type="float" office:value="0.008000894">
                <text:p>0.00800089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7.187347412109">
                <text:p>387.187347412109</text:p>
              </table:table-cell>
              <table:table-cell office:value-type="float" office:value="-0.004996207">
                <text:p>-0.00499620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7.298736572266">
                <text:p>387.298736572266</text:p>
              </table:table-cell>
              <table:table-cell office:value-type="float" office:value="0.01400804">
                <text:p>0.014008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7.410095214844">
                <text:p>387.410095214844</text:p>
              </table:table-cell>
              <table:table-cell office:value-type="float" office:value="0.004504434">
                <text:p>0.00450443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7.521514892578">
                <text:p>387.521514892578</text:p>
              </table:table-cell>
              <table:table-cell office:value-type="float" office:value="-0.0009762677">
                <text:p>-0.00097626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7.632904052734">
                <text:p>387.632904052734</text:p>
              </table:table-cell>
              <table:table-cell office:value-type="float" office:value="0.0001724996">
                <text:p>0.00017249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7.744293212891">
                <text:p>387.744293212891</text:p>
              </table:table-cell>
              <table:table-cell office:value-type="float" office:value="0.0126047">
                <text:p>0.01260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7.855712890625">
                <text:p>387.855712890625</text:p>
              </table:table-cell>
              <table:table-cell office:value-type="float" office:value="0.00201965">
                <text:p>0.002019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7.967132568359">
                <text:p>387.967132568359</text:p>
              </table:table-cell>
              <table:table-cell office:value-type="float" office:value="0.004312103">
                <text:p>0.0043121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.078552246094">
                <text:p>388.078552246094</text:p>
              </table:table-cell>
              <table:table-cell office:value-type="float" office:value="0.002007147">
                <text:p>0.00200714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8.189971923828">
                <text:p>388.189971923828</text:p>
              </table:table-cell>
              <table:table-cell office:value-type="float" office:value="0.0007130978">
                <text:p>0.00071309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8.301422119141">
                <text:p>388.301422119141</text:p>
              </table:table-cell>
              <table:table-cell office:value-type="float" office:value="-0.004634261">
                <text:p>-0.0046342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8.412872314453">
                <text:p>388.412872314453</text:p>
              </table:table-cell>
              <table:table-cell office:value-type="float" office:value="-0.008100717">
                <text:p>-0.00810071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.524291992188">
                <text:p>388.524291992188</text:p>
              </table:table-cell>
              <table:table-cell office:value-type="float" office:value="0.005576947">
                <text:p>0.0055769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.635772705078">
                <text:p>388.635772705078</text:p>
              </table:table-cell>
              <table:table-cell office:value-type="float" office:value="0.004406986">
                <text:p>0.0044069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8.747222900391">
                <text:p>388.747222900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8.858673095703">
                <text:p>388.858673095703</text:p>
              </table:table-cell>
              <table:table-cell office:value-type="float" office:value="-0.007033429">
                <text:p>-0.0070334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8.970153808594">
                <text:p>388.970153808594</text:p>
              </table:table-cell>
              <table:table-cell office:value-type="float" office:value="0.002922933">
                <text:p>0.0029229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.081634521484">
                <text:p>389.081634521484</text:p>
              </table:table-cell>
              <table:table-cell office:value-type="float" office:value="-0.001659683">
                <text:p>-0.0016596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.193115234375">
                <text:p>389.193115234375</text:p>
              </table:table-cell>
              <table:table-cell office:value-type="float" office:value="0.001921741">
                <text:p>0.0019217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.304595947266">
                <text:p>389.304595947266</text:p>
              </table:table-cell>
              <table:table-cell office:value-type="float" office:value="-0.001267309">
                <text:p>-0.0012673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.416076660156">
                <text:p>389.416076660156</text:p>
              </table:table-cell>
              <table:table-cell office:value-type="float" office:value="0.003492811">
                <text:p>0.0034928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.527587890625">
                <text:p>389.527587890625</text:p>
              </table:table-cell>
              <table:table-cell office:value-type="float" office:value="-0.003100353">
                <text:p>-0.00310035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.639099121094">
                <text:p>389.639099121094</text:p>
              </table:table-cell>
              <table:table-cell office:value-type="float" office:value="0.01248987">
                <text:p>0.0124898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.750610351563">
                <text:p>389.750610351563</text:p>
              </table:table-cell>
              <table:table-cell office:value-type="float" office:value="-0.0026753">
                <text:p>-0.002675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.862121582031">
                <text:p>389.862121582031</text:p>
              </table:table-cell>
              <table:table-cell office:value-type="float" office:value="-0.003640512">
                <text:p>-0.0036405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.9736328125">
                <text:p>389.9736328125</text:p>
              </table:table-cell>
              <table:table-cell office:value-type="float" office:value="-0.002218727">
                <text:p>-0.0022187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0.085174560547">
                <text:p>390.085174560547</text:p>
              </table:table-cell>
              <table:table-cell office:value-type="float" office:value="-0.002948195">
                <text:p>-0.0029481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0.196685791016">
                <text:p>390.196685791016</text:p>
              </table:table-cell>
              <table:table-cell office:value-type="float" office:value="0.01321788">
                <text:p>0.013217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0.308227539063">
                <text:p>390.308227539063</text:p>
              </table:table-cell>
              <table:table-cell office:value-type="float" office:value="0.0003699141">
                <text:p>0.00036991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0.419769287109">
                <text:p>390.419769287109</text:p>
              </table:table-cell>
              <table:table-cell office:value-type="float" office:value="0.0006744493">
                <text:p>0.00067444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.531341552734">
                <text:p>390.531341552734</text:p>
              </table:table-cell>
              <table:table-cell office:value-type="float" office:value="0.0009477033">
                <text:p>0.00094770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0.642883300781">
                <text:p>390.642883300781</text:p>
              </table:table-cell>
              <table:table-cell office:value-type="float" office:value="-0.004192341">
                <text:p>-0.00419234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0.754455566406">
                <text:p>390.754455566406</text:p>
              </table:table-cell>
              <table:table-cell office:value-type="float" office:value="0.01461254">
                <text:p>0.0146125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0.866027832031">
                <text:p>390.866027832031</text:p>
              </table:table-cell>
              <table:table-cell office:value-type="float" office:value="0.0007644378">
                <text:p>0.000764437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0.977600097656">
                <text:p>390.977600097656</text:p>
              </table:table-cell>
              <table:table-cell office:value-type="float" office:value="-0.0001230448">
                <text:p>-0.00012304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1.089172363281">
                <text:p>391.089172363281</text:p>
              </table:table-cell>
              <table:table-cell office:value-type="float" office:value="-0.005402333">
                <text:p>-0.00540233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1.200744628906">
                <text:p>391.200744628906</text:p>
              </table:table-cell>
              <table:table-cell office:value-type="float" office:value="0.01509878">
                <text:p>0.015098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1.312347412109">
                <text:p>391.312347412109</text:p>
              </table:table-cell>
              <table:table-cell office:value-type="float" office:value="-0.0009375585">
                <text:p>-0.00093755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.423950195313">
                <text:p>391.423950195313</text:p>
              </table:table-cell>
              <table:table-cell office:value-type="float" office:value="0.01133335">
                <text:p>0.011333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1.535552978516">
                <text:p>391.535552978516</text:p>
              </table:table-cell>
              <table:table-cell office:value-type="float" office:value="-0.008722377">
                <text:p>-0.0087223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1.647155761719">
                <text:p>391.647155761719</text:p>
              </table:table-cell>
              <table:table-cell office:value-type="float" office:value="0.004119307">
                <text:p>0.0041193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1.758758544922">
                <text:p>391.758758544922</text:p>
              </table:table-cell>
              <table:table-cell office:value-type="float" office:value="-0.00901875">
                <text:p>-0.009018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1.870391845703">
                <text:p>391.870391845703</text:p>
              </table:table-cell>
              <table:table-cell office:value-type="float" office:value="0.01162372">
                <text:p>0.011623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1.982025146484">
                <text:p>391.982025146484</text:p>
              </table:table-cell>
              <table:table-cell office:value-type="float" office:value="0.001628729">
                <text:p>0.0016287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.093658447266">
                <text:p>392.093658447266</text:p>
              </table:table-cell>
              <table:table-cell office:value-type="float" office:value="-0.007398235">
                <text:p>-0.0073982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.205291748047">
                <text:p>392.205291748047</text:p>
              </table:table-cell>
              <table:table-cell office:value-type="float" office:value="0.00019076">
                <text:p>0.000190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.316925048828">
                <text:p>392.316925048828</text:p>
              </table:table-cell>
              <table:table-cell office:value-type="float" office:value="0.01454087">
                <text:p>0.014540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.428558349609">
                <text:p>392.428558349609</text:p>
              </table:table-cell>
              <table:table-cell office:value-type="float" office:value="0.01008641">
                <text:p>0.010086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.540222167969">
                <text:p>392.540222167969</text:p>
              </table:table-cell>
              <table:table-cell office:value-type="float" office:value="-0.003385925">
                <text:p>-0.0033859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.651885986328">
                <text:p>392.651885986328</text:p>
              </table:table-cell>
              <table:table-cell office:value-type="float" office:value="-0.00772514">
                <text:p>-0.007725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.763549804688">
                <text:p>392.76354980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.875213623047">
                <text:p>392.875213623047</text:p>
              </table:table-cell>
              <table:table-cell office:value-type="float" office:value="0.0003387722">
                <text:p>0.000338772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.986907958984">
                <text:p>392.986907958984</text:p>
              </table:table-cell>
              <table:table-cell office:value-type="float" office:value="0.004265742">
                <text:p>0.00426574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.098602294922">
                <text:p>393.098602294922</text:p>
              </table:table-cell>
              <table:table-cell office:value-type="float" office:value="0.01309011">
                <text:p>0.013090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.210266113281">
                <text:p>393.210266113281</text:p>
              </table:table-cell>
              <table:table-cell office:value-type="float" office:value="-0.003056992">
                <text:p>-0.00305699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.321960449219">
                <text:p>393.321960449219</text:p>
              </table:table-cell>
              <table:table-cell office:value-type="float" office:value="-0.001365955">
                <text:p>-0.0013659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.433685302734">
                <text:p>393.433685302734</text:p>
              </table:table-cell>
              <table:table-cell office:value-type="float" office:value="-0.00466807">
                <text:p>-0.0046680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3.545379638672">
                <text:p>393.545379638672</text:p>
              </table:table-cell>
              <table:table-cell office:value-type="float" office:value="-0.009779768">
                <text:p>-0.00977976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3.657104492188">
                <text:p>393.657104492188</text:p>
              </table:table-cell>
              <table:table-cell office:value-type="float" office:value="0.0005926623">
                <text:p>0.00059266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3.768798828125">
                <text:p>393.768798828125</text:p>
              </table:table-cell>
              <table:table-cell office:value-type="float" office:value="-0.005488812">
                <text:p>-0.0054888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3.880523681641">
                <text:p>393.880523681641</text:p>
              </table:table-cell>
              <table:table-cell office:value-type="float" office:value="0.01084016">
                <text:p>0.010840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.992248535156">
                <text:p>393.992248535156</text:p>
              </table:table-cell>
              <table:table-cell office:value-type="float" office:value="0.01983054">
                <text:p>0.0198305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4.10400390625">
                <text:p>394.10400390625</text:p>
              </table:table-cell>
              <table:table-cell office:value-type="float" office:value="-0.005514052">
                <text:p>-0.0055140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.215728759766">
                <text:p>394.215728759766</text:p>
              </table:table-cell>
              <table:table-cell office:value-type="float" office:value="0.001199497">
                <text:p>0.00119949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4.327484130859">
                <text:p>394.327484130859</text:p>
              </table:table-cell>
              <table:table-cell office:value-type="float" office:value="0.005740118">
                <text:p>0.00574011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4.439239501953">
                <text:p>394.439239501953</text:p>
              </table:table-cell>
              <table:table-cell office:value-type="float" office:value="-0.002497548">
                <text:p>-0.00249754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4.550994873047">
                <text:p>394.550994873047</text:p>
              </table:table-cell>
              <table:table-cell office:value-type="float" office:value="-0.007724472">
                <text:p>-0.0077244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4.662750244141">
                <text:p>394.662750244141</text:p>
              </table:table-cell>
              <table:table-cell office:value-type="float" office:value="0.002964543">
                <text:p>0.0029645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4.774536132813">
                <text:p>394.774536132813</text:p>
              </table:table-cell>
              <table:table-cell office:value-type="float" office:value="-0.002464626">
                <text:p>-0.00246462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4.886291503906">
                <text:p>394.886291503906</text:p>
              </table:table-cell>
              <table:table-cell office:value-type="float" office:value="0.007537233">
                <text:p>0.0075372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4.998077392578">
                <text:p>394.998077392578</text:p>
              </table:table-cell>
              <table:table-cell office:value-type="float" office:value="-0.001666407">
                <text:p>-0.0016664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5.10986328125">
                <text:p>395.10986328125</text:p>
              </table:table-cell>
              <table:table-cell office:value-type="float" office:value="0.0087771">
                <text:p>0.00877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.221649169922">
                <text:p>395.221649169922</text:p>
              </table:table-cell>
              <table:table-cell office:value-type="float" office:value="-0.00208676">
                <text:p>-0.002086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.333465576172">
                <text:p>395.333465576172</text:p>
              </table:table-cell>
              <table:table-cell office:value-type="float" office:value="-0.007702942">
                <text:p>-0.00770294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.445251464844">
                <text:p>395.445251464844</text:p>
              </table:table-cell>
              <table:table-cell office:value-type="float" office:value="-0.001601825">
                <text:p>-0.0016018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557067871094">
                <text:p>395.557067871094</text:p>
              </table:table-cell>
              <table:table-cell office:value-type="float" office:value="-0.005550078">
                <text:p>-0.00555007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5.668884277344">
                <text:p>395.668884277344</text:p>
              </table:table-cell>
              <table:table-cell office:value-type="float" office:value="0.04065116">
                <text:p>0.040651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5.780700683594">
                <text:p>395.780700683594</text:p>
              </table:table-cell>
              <table:table-cell office:value-type="float" office:value="-0.002739261">
                <text:p>-0.00273926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.892547607422">
                <text:p>395.892547607422</text:p>
              </table:table-cell>
              <table:table-cell office:value-type="float" office:value="0.003140185">
                <text:p>0.00314018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.004364013672">
                <text:p>396.004364013672</text:p>
              </table:table-cell>
              <table:table-cell office:value-type="float" office:value="0.001573955">
                <text:p>0.0015739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.1162109375">
                <text:p>396.1162109375</text:p>
              </table:table-cell>
              <table:table-cell office:value-type="float" office:value="0.04412733">
                <text:p>0.044127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.228057861328">
                <text:p>396.228057861328</text:p>
              </table:table-cell>
              <table:table-cell office:value-type="float" office:value="-0.0006208958">
                <text:p>-0.000620895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6.339904785156">
                <text:p>396.339904785156</text:p>
              </table:table-cell>
              <table:table-cell office:value-type="float" office:value="-0.001932222">
                <text:p>-0.0019322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6.451751708984">
                <text:p>396.451751708984</text:p>
              </table:table-cell>
              <table:table-cell office:value-type="float" office:value="-0.004323825">
                <text:p>-0.0043238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6.563629150391">
                <text:p>396.563629150391</text:p>
              </table:table-cell>
              <table:table-cell office:value-type="float" office:value="-0.006739893">
                <text:p>-0.0067398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6.675476074219">
                <text:p>396.675476074219</text:p>
              </table:table-cell>
              <table:table-cell office:value-type="float" office:value="-0.002947641">
                <text:p>-0.00294764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6.787353515625">
                <text:p>396.787353515625</text:p>
              </table:table-cell>
              <table:table-cell office:value-type="float" office:value="0.01093022">
                <text:p>0.010930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.899230957031">
                <text:p>396.899230957031</text:p>
              </table:table-cell>
              <table:table-cell office:value-type="float" office:value="-0.004444666">
                <text:p>-0.0044446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7.011108398438">
                <text:p>397.011108398438</text:p>
              </table:table-cell>
              <table:table-cell office:value-type="float" office:value="0.001919488">
                <text:p>0.00191948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7.123016357422">
                <text:p>397.123016357422</text:p>
              </table:table-cell>
              <table:table-cell office:value-type="float" office:value="-0.003316376">
                <text:p>-0.00331637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7.234893798828">
                <text:p>397.234893798828</text:p>
              </table:table-cell>
              <table:table-cell office:value-type="float" office:value="0.005102121">
                <text:p>0.00510212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7.346801757813">
                <text:p>397.346801757813</text:p>
              </table:table-cell>
              <table:table-cell office:value-type="float" office:value="0.003642402">
                <text:p>0.0036424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.458709716797">
                <text:p>397.458709716797</text:p>
              </table:table-cell>
              <table:table-cell office:value-type="float" office:value="-0.001850399">
                <text:p>-0.00185039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7.570617675781">
                <text:p>397.570617675781</text:p>
              </table:table-cell>
              <table:table-cell office:value-type="float" office:value="0.004914308">
                <text:p>0.00491430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7.682525634766">
                <text:p>397.682525634766</text:p>
              </table:table-cell>
              <table:table-cell office:value-type="float" office:value="-0.002216878">
                <text:p>-0.00221687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7.794464111328">
                <text:p>397.794464111328</text:p>
              </table:table-cell>
              <table:table-cell office:value-type="float" office:value="0.001893295">
                <text:p>0.0018932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7.906402587891">
                <text:p>397.906402587891</text:p>
              </table:table-cell>
              <table:table-cell office:value-type="float" office:value="0.0008281753">
                <text:p>0.000828175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8.018310546875">
                <text:p>398.018310546875</text:p>
              </table:table-cell>
              <table:table-cell office:value-type="float" office:value="0.006137384">
                <text:p>0.0061373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8.130249023438">
                <text:p>398.130249023438</text:p>
              </table:table-cell>
              <table:table-cell office:value-type="float" office:value="-0.003167049">
                <text:p>-0.0031670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8.242218017578">
                <text:p>398.242218017578</text:p>
              </table:table-cell>
              <table:table-cell office:value-type="float" office:value="-0.0008509887">
                <text:p>-0.00085098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.354156494141">
                <text:p>398.354156494141</text:p>
              </table:table-cell>
              <table:table-cell office:value-type="float" office:value="-0.002034237">
                <text:p>-0.0020342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.466125488281">
                <text:p>398.466125488281</text:p>
              </table:table-cell>
              <table:table-cell office:value-type="float" office:value="-0.001903119">
                <text:p>-0.0019031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8.578094482422">
                <text:p>398.578094482422</text:p>
              </table:table-cell>
              <table:table-cell office:value-type="float" office:value="-0.002086826">
                <text:p>-0.00208682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8.690063476563">
                <text:p>398.690063476563</text:p>
              </table:table-cell>
              <table:table-cell office:value-type="float" office:value="-0.006792925">
                <text:p>-0.0067929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8.802032470703">
                <text:p>398.802032470703</text:p>
              </table:table-cell>
              <table:table-cell office:value-type="float" office:value="-0.006094085">
                <text:p>-0.00609408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8.914001464844">
                <text:p>398.914001464844</text:p>
              </table:table-cell>
              <table:table-cell office:value-type="float" office:value="-0.003996748">
                <text:p>-0.0039967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9.026000976563">
                <text:p>399.026000976563</text:p>
              </table:table-cell>
              <table:table-cell office:value-type="float" office:value="0.01976613">
                <text:p>0.019766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9.137969970703">
                <text:p>399.137969970703</text:p>
              </table:table-cell>
              <table:table-cell office:value-type="float" office:value="-0.001750137">
                <text:p>-0.00175013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9.249969482422">
                <text:p>399.249969482422</text:p>
              </table:table-cell>
              <table:table-cell office:value-type="float" office:value="0.01597134">
                <text:p>0.015971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9.361968994141">
                <text:p>399.361968994141</text:p>
              </table:table-cell>
              <table:table-cell office:value-type="float" office:value="-0.003029104">
                <text:p>-0.0030291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9.473999023438">
                <text:p>399.473999023438</text:p>
              </table:table-cell>
              <table:table-cell office:value-type="float" office:value="0.008129994">
                <text:p>0.00812999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9.585998535156">
                <text:p>399.585998535156</text:p>
              </table:table-cell>
              <table:table-cell office:value-type="float" office:value="-0.0005586824">
                <text:p>-0.00055868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9.698028564453">
                <text:p>399.698028564453</text:p>
              </table:table-cell>
              <table:table-cell office:value-type="float" office:value="-0.00197236">
                <text:p>-0.001972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9.81005859375">
                <text:p>399.81005859375</text:p>
              </table:table-cell>
              <table:table-cell office:value-type="float" office:value="-0.005591767">
                <text:p>-0.0055917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9.922088623047">
                <text:p>399.922088623047</text:p>
              </table:table-cell>
              <table:table-cell office:value-type="float" office:value="-0.002060589">
                <text:p>-0.00206058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0.034118652344">
                <text:p>400.034118652344</text:p>
              </table:table-cell>
              <table:table-cell office:value-type="float" office:value="-0.006547102">
                <text:p>-0.00654710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0.146148681641">
                <text:p>400.146148681641</text:p>
              </table:table-cell>
              <table:table-cell office:value-type="float" office:value="-0.0003101036">
                <text:p>-0.000310103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0.258209228516">
                <text:p>400.258209228516</text:p>
              </table:table-cell>
              <table:table-cell office:value-type="float" office:value="-0.002940008">
                <text:p>-0.0029400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0.370269775391">
                <text:p>400.370269775391</text:p>
              </table:table-cell>
              <table:table-cell office:value-type="float" office:value="0.002900318">
                <text:p>0.00290031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0.482330322266">
                <text:p>400.482330322266</text:p>
              </table:table-cell>
              <table:table-cell office:value-type="float" office:value="-0.001862839">
                <text:p>-0.0018628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.594390869141">
                <text:p>400.594390869141</text:p>
              </table:table-cell>
              <table:table-cell office:value-type="float" office:value="0.005919852">
                <text:p>0.0059198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0.706451416016">
                <text:p>400.706451416016</text:p>
              </table:table-cell>
              <table:table-cell office:value-type="float" office:value="-0.003676619">
                <text:p>-0.0036766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0.818511962891">
                <text:p>400.818511962891</text:p>
              </table:table-cell>
              <table:table-cell office:value-type="float" office:value="0.005922914">
                <text:p>0.0059229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0.930603027344">
                <text:p>400.930603027344</text:p>
              </table:table-cell>
              <table:table-cell office:value-type="float" office:value="0.006136345">
                <text:p>0.0061363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1.042694091797">
                <text:p>401.042694091797</text:p>
              </table:table-cell>
              <table:table-cell office:value-type="float" office:value="-0.001002539">
                <text:p>-0.00100253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1.15478515625">
                <text:p>401.15478515625</text:p>
              </table:table-cell>
              <table:table-cell office:value-type="float" office:value="0.005240931">
                <text:p>0.00524093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1.266876220703">
                <text:p>401.266876220703</text:p>
              </table:table-cell>
              <table:table-cell office:value-type="float" office:value="0.00429769">
                <text:p>0.0042976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1.378997802734">
                <text:p>401.378997802734</text:p>
              </table:table-cell>
              <table:table-cell office:value-type="float" office:value="0.001052024">
                <text:p>0.0010520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1.491088867188">
                <text:p>401.491088867188</text:p>
              </table:table-cell>
              <table:table-cell office:value-type="float" office:value="-0.0007534073">
                <text:p>-0.000753407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1.603210449219">
                <text:p>401.603210449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1.71533203125">
                <text:p>401.71533203125</text:p>
              </table:table-cell>
              <table:table-cell office:value-type="float" office:value="-0.00260911">
                <text:p>-0.002609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1.827453613281">
                <text:p>401.827453613281</text:p>
              </table:table-cell>
              <table:table-cell office:value-type="float" office:value="0.0007931492">
                <text:p>0.000793149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1.939605712891">
                <text:p>401.939605712891</text:p>
              </table:table-cell>
              <table:table-cell office:value-type="float" office:value="0.002215838">
                <text:p>0.00221583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2.051727294922">
                <text:p>402.051727294922</text:p>
              </table:table-cell>
              <table:table-cell office:value-type="float" office:value="-0.004493394">
                <text:p>-0.0044933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2.163879394531">
                <text:p>402.163879394531</text:p>
              </table:table-cell>
              <table:table-cell office:value-type="float" office:value="0.01021261">
                <text:p>0.0102126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2.276031494141">
                <text:p>402.276031494141</text:p>
              </table:table-cell>
              <table:table-cell office:value-type="float" office:value="-0.002122323">
                <text:p>-0.00212232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2.38818359375">
                <text:p>402.38818359375</text:p>
              </table:table-cell>
              <table:table-cell office:value-type="float" office:value="-0.001250076">
                <text:p>-0.00125007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.500335693359">
                <text:p>402.500335693359</text:p>
              </table:table-cell>
              <table:table-cell office:value-type="float" office:value="0.000502668">
                <text:p>0.0005026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2.612487792969">
                <text:p>402.612487792969</text:p>
              </table:table-cell>
              <table:table-cell office:value-type="float" office:value="0.005472088">
                <text:p>0.00547208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2.724670410156">
                <text:p>402.724670410156</text:p>
              </table:table-cell>
              <table:table-cell office:value-type="float" office:value="0.005202703">
                <text:p>0.00520270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2.836853027344">
                <text:p>402.836853027344</text:p>
              </table:table-cell>
              <table:table-cell office:value-type="float" office:value="0.003750339">
                <text:p>0.0037503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2.949035644531">
                <text:p>402.949035644531</text:p>
              </table:table-cell>
              <table:table-cell office:value-type="float" office:value="0.01246867">
                <text:p>0.012468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3.061218261719">
                <text:p>403.061218261719</text:p>
              </table:table-cell>
              <table:table-cell office:value-type="float" office:value="0.00215409">
                <text:p>0.002154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3.173400878906">
                <text:p>403.173400878906</text:p>
              </table:table-cell>
              <table:table-cell office:value-type="float" office:value="0.01200745">
                <text:p>0.0120074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3.285614013672">
                <text:p>403.285614013672</text:p>
              </table:table-cell>
              <table:table-cell office:value-type="float" office:value="-0.001156635">
                <text:p>-0.00115663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.397827148438">
                <text:p>403.397827148438</text:p>
              </table:table-cell>
              <table:table-cell office:value-type="float" office:value="-0.004843495">
                <text:p>-0.0048434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.510040283203">
                <text:p>403.510040283203</text:p>
              </table:table-cell>
              <table:table-cell office:value-type="float" office:value="0.00166361">
                <text:p>0.0016636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3.622253417969">
                <text:p>403.622253417969</text:p>
              </table:table-cell>
              <table:table-cell office:value-type="float" office:value="-0.00605566">
                <text:p>-0.006055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3.734466552734">
                <text:p>403.734466552734</text:p>
              </table:table-cell>
              <table:table-cell office:value-type="float" office:value="0.002085158">
                <text:p>0.00208515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3.8466796875">
                <text:p>403.8466796875</text:p>
              </table:table-cell>
              <table:table-cell office:value-type="float" office:value="-0.00219963">
                <text:p>-0.0021996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3.958923339844">
                <text:p>403.958923339844</text:p>
              </table:table-cell>
              <table:table-cell office:value-type="float" office:value="-0.0003901542">
                <text:p>-0.00039015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.071166992188">
                <text:p>404.071166992188</text:p>
              </table:table-cell>
              <table:table-cell office:value-type="float" office:value="-0.0007602132">
                <text:p>-0.00076021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4.183410644531">
                <text:p>404.183410644531</text:p>
              </table:table-cell>
              <table:table-cell office:value-type="float" office:value="-0.008425815">
                <text:p>-0.0084258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4.295654296875">
                <text:p>404.295654296875</text:p>
              </table:table-cell>
              <table:table-cell office:value-type="float" office:value="0.009474095">
                <text:p>0.00947409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.407897949219">
                <text:p>404.407897949219</text:p>
              </table:table-cell>
              <table:table-cell office:value-type="float" office:value="-0.00904215">
                <text:p>-0.009042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.520172119141">
                <text:p>404.520172119141</text:p>
              </table:table-cell>
              <table:table-cell office:value-type="float" office:value="0.00514323">
                <text:p>0.005143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.632446289063">
                <text:p>404.632446289063</text:p>
              </table:table-cell>
              <table:table-cell office:value-type="float" office:value="0.005460206">
                <text:p>0.00546020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4.744689941406">
                <text:p>404.744689941406</text:p>
              </table:table-cell>
              <table:table-cell office:value-type="float" office:value="0.004932304">
                <text:p>0.00493230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4.856994628906">
                <text:p>404.856994628906</text:p>
              </table:table-cell>
              <table:table-cell office:value-type="float" office:value="-0.008586825">
                <text:p>-0.0085868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4.969268798828">
                <text:p>404.969268798828</text:p>
              </table:table-cell>
              <table:table-cell office:value-type="float" office:value="0.002872703">
                <text:p>0.0028727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5.08154296875">
                <text:p>405.08154296875</text:p>
              </table:table-cell>
              <table:table-cell office:value-type="float" office:value="0.01312189">
                <text:p>0.0131218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5.19384765625">
                <text:p>405.19384765625</text:p>
              </table:table-cell>
              <table:table-cell office:value-type="float" office:value="-0.003940846">
                <text:p>-0.00394084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5.30615234375">
                <text:p>405.30615234375</text:p>
              </table:table-cell>
              <table:table-cell office:value-type="float" office:value="0.001070897">
                <text:p>0.0010708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5.41845703125">
                <text:p>405.41845703125</text:p>
              </table:table-cell>
              <table:table-cell office:value-type="float" office:value="-0.001357441">
                <text:p>-0.00135744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.53076171875">
                <text:p>405.53076171875</text:p>
              </table:table-cell>
              <table:table-cell office:value-type="float" office:value="0.00975543">
                <text:p>0.009755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5.64306640625">
                <text:p>405.64306640625</text:p>
              </table:table-cell>
              <table:table-cell office:value-type="float" office:value="-0.002349384">
                <text:p>-0.0023493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5.755401611328">
                <text:p>405.755401611328</text:p>
              </table:table-cell>
              <table:table-cell office:value-type="float" office:value="-0.001840526">
                <text:p>-0.00184052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5.867706298828">
                <text:p>405.867706298828</text:p>
              </table:table-cell>
              <table:table-cell office:value-type="float" office:value="-0.002796807">
                <text:p>-0.0027968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.980041503906">
                <text:p>405.980041503906</text:p>
              </table:table-cell>
              <table:table-cell office:value-type="float" office:value="0.01536435">
                <text:p>0.0153643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6.092376708984">
                <text:p>406.092376708984</text:p>
              </table:table-cell>
              <table:table-cell office:value-type="float" office:value="-0.006918815">
                <text:p>-0.00691881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6.204742431641">
                <text:p>406.204742431641</text:p>
              </table:table-cell>
              <table:table-cell office:value-type="float" office:value="0.006658091">
                <text:p>0.0066580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.317077636719">
                <text:p>406.317077636719</text:p>
              </table:table-cell>
              <table:table-cell office:value-type="float" office:value="-0.0004466599">
                <text:p>-0.000446659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6.429443359375">
                <text:p>406.429443359375</text:p>
              </table:table-cell>
              <table:table-cell office:value-type="float" office:value="-0.006404632">
                <text:p>-0.0064046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6.541809082031">
                <text:p>406.541809082031</text:p>
              </table:table-cell>
              <table:table-cell office:value-type="float" office:value="0.00033001">
                <text:p>0.000330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6.654174804688">
                <text:p>406.654174804688</text:p>
              </table:table-cell>
              <table:table-cell office:value-type="float" office:value="-0.006597058">
                <text:p>-0.0065970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6.766540527344">
                <text:p>406.766540527344</text:p>
              </table:table-cell>
              <table:table-cell office:value-type="float" office:value="-0.007269971">
                <text:p>-0.00726997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6.87890625">
                <text:p>406.87890625</text:p>
              </table:table-cell>
              <table:table-cell office:value-type="float" office:value="-0.004359734">
                <text:p>-0.00435973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6.991302490234">
                <text:p>406.991302490234</text:p>
              </table:table-cell>
              <table:table-cell office:value-type="float" office:value="0.001020037">
                <text:p>0.00102003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7.103668212891">
                <text:p>407.103668212891</text:p>
              </table:table-cell>
              <table:table-cell office:value-type="float" office:value="-0.003809834">
                <text:p>-0.00380983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7.216064453125">
                <text:p>407.216064453125</text:p>
              </table:table-cell>
              <table:table-cell office:value-type="float" office:value="0.01623707">
                <text:p>0.016237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7.328460693359">
                <text:p>407.328460693359</text:p>
              </table:table-cell>
              <table:table-cell office:value-type="float" office:value="0.004570515">
                <text:p>0.0045705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7.440887451172">
                <text:p>407.440887451172</text:p>
              </table:table-cell>
              <table:table-cell office:value-type="float" office:value="-0.00187234">
                <text:p>-0.0018723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7.553283691406">
                <text:p>407.553283691406</text:p>
              </table:table-cell>
              <table:table-cell office:value-type="float" office:value="0.008645408">
                <text:p>0.00864540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7.665710449219">
                <text:p>407.665710449219</text:p>
              </table:table-cell>
              <table:table-cell office:value-type="float" office:value="-0.002659629">
                <text:p>-0.0026596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7.778106689453">
                <text:p>407.778106689453</text:p>
              </table:table-cell>
              <table:table-cell office:value-type="float" office:value="0.01226521">
                <text:p>0.012265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.890533447266">
                <text:p>407.890533447266</text:p>
              </table:table-cell>
              <table:table-cell office:value-type="float" office:value="0.005542635">
                <text:p>0.0055426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.002990722656">
                <text:p>408.002990722656</text:p>
              </table:table-cell>
              <table:table-cell office:value-type="float" office:value="0.007352609">
                <text:p>0.0073526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8.115417480469">
                <text:p>408.115417480469</text:p>
              </table:table-cell>
              <table:table-cell office:value-type="float" office:value="0.003195104">
                <text:p>0.00319510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.227844238281">
                <text:p>408.227844238281</text:p>
              </table:table-cell>
              <table:table-cell office:value-type="float" office:value="0.01881975">
                <text:p>0.018819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8.340301513672">
                <text:p>408.340301513672</text:p>
              </table:table-cell>
              <table:table-cell office:value-type="float" office:value="-0.01031598">
                <text:p>-0.0103159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8.452758789063">
                <text:p>408.452758789063</text:p>
              </table:table-cell>
              <table:table-cell office:value-type="float" office:value="-0.002655177">
                <text:p>-0.0026551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8.565216064453">
                <text:p>408.565216064453</text:p>
              </table:table-cell>
              <table:table-cell office:value-type="float" office:value="-0.005560177">
                <text:p>-0.0055601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8.677673339844">
                <text:p>408.677673339844</text:p>
              </table:table-cell>
              <table:table-cell office:value-type="float" office:value="-0.001798418">
                <text:p>-0.0017984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8.790161132813">
                <text:p>408.790161132813</text:p>
              </table:table-cell>
              <table:table-cell office:value-type="float" office:value="-0.00336171">
                <text:p>-0.0033617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8.902618408203">
                <text:p>408.902618408203</text:p>
              </table:table-cell>
              <table:table-cell office:value-type="float" office:value="-0.002262749">
                <text:p>-0.0022627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9.015106201172">
                <text:p>409.015106201172</text:p>
              </table:table-cell>
              <table:table-cell office:value-type="float" office:value="-0.005801648">
                <text:p>-0.0058016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9.127593994141">
                <text:p>409.127593994141</text:p>
              </table:table-cell>
              <table:table-cell office:value-type="float" office:value="0.001707977">
                <text:p>0.00170797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9.240081787109">
                <text:p>409.240081787109</text:p>
              </table:table-cell>
              <table:table-cell office:value-type="float" office:value="0.001742249">
                <text:p>0.0017422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9.352569580078">
                <text:p>409.352569580078</text:p>
              </table:table-cell>
              <table:table-cell office:value-type="float" office:value="-0.007741627">
                <text:p>-0.00774162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9.465087890625">
                <text:p>409.465087890625</text:p>
              </table:table-cell>
              <table:table-cell office:value-type="float" office:value="-0.002519548">
                <text:p>-0.0025195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.577606201172">
                <text:p>409.577606201172</text:p>
              </table:table-cell>
              <table:table-cell office:value-type="float" office:value="-0.005854581">
                <text:p>-0.00585458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9.690093994141">
                <text:p>409.690093994141</text:p>
              </table:table-cell>
              <table:table-cell office:value-type="float" office:value="0.001658488">
                <text:p>0.00165848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9.802612304688">
                <text:p>409.80261230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.915161132813">
                <text:p>409.915161132813</text:p>
              </table:table-cell>
              <table:table-cell office:value-type="float" office:value="0.00210081">
                <text:p>0.0021008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0.027679443359">
                <text:p>410.027679443359</text:p>
              </table:table-cell>
              <table:table-cell office:value-type="float" office:value="-0.001332854">
                <text:p>-0.00133285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0.140228271484">
                <text:p>410.140228271484</text:p>
              </table:table-cell>
              <table:table-cell office:value-type="float" office:value="0.003974861">
                <text:p>0.00397486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.252746582031">
                <text:p>410.252746582031</text:p>
              </table:table-cell>
              <table:table-cell office:value-type="float" office:value="0.001951983">
                <text:p>0.00195198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.365295410156">
                <text:p>410.365295410156</text:p>
              </table:table-cell>
              <table:table-cell office:value-type="float" office:value="-0.002254097">
                <text:p>-0.00225409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0.477844238281">
                <text:p>410.477844238281</text:p>
              </table:table-cell>
              <table:table-cell office:value-type="float" office:value="0.01862349">
                <text:p>0.0186234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0.590423583984">
                <text:p>410.590423583984</text:p>
              </table:table-cell>
              <table:table-cell office:value-type="float" office:value="0.006946163">
                <text:p>0.00694616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0.702972412109">
                <text:p>410.702972412109</text:p>
              </table:table-cell>
              <table:table-cell office:value-type="float" office:value="-0.004020905">
                <text:p>-0.0040209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.815551757813">
                <text:p>410.815551757813</text:p>
              </table:table-cell>
              <table:table-cell office:value-type="float" office:value="0.001279468">
                <text:p>0.00127946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0.928131103516">
                <text:p>410.928131103516</text:p>
              </table:table-cell>
              <table:table-cell office:value-type="float" office:value="0.02486424">
                <text:p>0.0248642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1.040679931641">
                <text:p>411.040679931641</text:p>
              </table:table-cell>
              <table:table-cell office:value-type="float" office:value="0.006084586">
                <text:p>0.00608458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1.153289794922">
                <text:p>411.153289794922</text:p>
              </table:table-cell>
              <table:table-cell office:value-type="float" office:value="0.01268629">
                <text:p>0.0126862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1.265869140625">
                <text:p>411.265869140625</text:p>
              </table:table-cell>
              <table:table-cell office:value-type="float" office:value="0.006412814">
                <text:p>0.0064128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1.378479003906">
                <text:p>411.378479003906</text:p>
              </table:table-cell>
              <table:table-cell office:value-type="float" office:value="0.003366066">
                <text:p>0.00336606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1.491058349609">
                <text:p>411.491058349609</text:p>
              </table:table-cell>
              <table:table-cell office:value-type="float" office:value="0.023371">
                <text:p>0.0233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.603668212891">
                <text:p>411.603668212891</text:p>
              </table:table-cell>
              <table:table-cell office:value-type="float" office:value="0.003241121">
                <text:p>0.00324112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.716278076172">
                <text:p>411.716278076172</text:p>
              </table:table-cell>
              <table:table-cell office:value-type="float" office:value="0.02173392">
                <text:p>0.0217339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.828887939453">
                <text:p>411.828887939453</text:p>
              </table:table-cell>
              <table:table-cell office:value-type="float" office:value="0.0009622041">
                <text:p>0.000962204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.941528320313">
                <text:p>411.941528320313</text:p>
              </table:table-cell>
              <table:table-cell office:value-type="float" office:value="0.002706596">
                <text:p>0.0027065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.054138183594">
                <text:p>412.054138183594</text:p>
              </table:table-cell>
              <table:table-cell office:value-type="float" office:value="0.0006839517">
                <text:p>0.00068395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.166778564453">
                <text:p>412.166778564453</text:p>
              </table:table-cell>
              <table:table-cell office:value-type="float" office:value="-0.007501615">
                <text:p>-0.0075016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.279418945313">
                <text:p>412.279418945313</text:p>
              </table:table-cell>
              <table:table-cell office:value-type="float" office:value="0.00841374">
                <text:p>0.0084137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.392059326172">
                <text:p>412.392059326172</text:p>
              </table:table-cell>
              <table:table-cell office:value-type="float" office:value="0.002286759">
                <text:p>0.0022867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4730224609">
                <text:p>412.504730224609</text:p>
              </table:table-cell>
              <table:table-cell office:value-type="float" office:value="-0.007876458">
                <text:p>-0.00787645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617370605469">
                <text:p>412.617370605469</text:p>
              </table:table-cell>
              <table:table-cell office:value-type="float" office:value="-0.003267456">
                <text:p>-0.00326745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2.730041503906">
                <text:p>412.730041503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.842712402344">
                <text:p>412.842712402344</text:p>
              </table:table-cell>
              <table:table-cell office:value-type="float" office:value="-0.0005591544">
                <text:p>-0.000559154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2.955383300781">
                <text:p>412.955383300781</text:p>
              </table:table-cell>
              <table:table-cell office:value-type="float" office:value="-0.008948393">
                <text:p>-0.00894839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.068054199219">
                <text:p>413.068054199219</text:p>
              </table:table-cell>
              <table:table-cell office:value-type="float" office:value="-0.005386319">
                <text:p>-0.0053863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3.180725097656">
                <text:p>413.180725097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3.293426513672">
                <text:p>413.293426513672</text:p>
              </table:table-cell>
              <table:table-cell office:value-type="float" office:value="0.0003789598">
                <text:p>0.000378959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3.406097412109">
                <text:p>413.406097412109</text:p>
              </table:table-cell>
              <table:table-cell office:value-type="float" office:value="-0.003492808">
                <text:p>-0.00349280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.518798828125">
                <text:p>413.518798828125</text:p>
              </table:table-cell>
              <table:table-cell office:value-type="float" office:value="-0.001271441">
                <text:p>-0.0012714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3.631500244141">
                <text:p>413.631500244141</text:p>
              </table:table-cell>
              <table:table-cell office:value-type="float" office:value="-0.006364803">
                <text:p>-0.00636480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3.744232177734">
                <text:p>413.744232177734</text:p>
              </table:table-cell>
              <table:table-cell office:value-type="float" office:value="0.002456604">
                <text:p>0.0024566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.85693359375">
                <text:p>413.85693359375</text:p>
              </table:table-cell>
              <table:table-cell office:value-type="float" office:value="0.002583601">
                <text:p>0.0025836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3.969665527344">
                <text:p>413.969665527344</text:p>
              </table:table-cell>
              <table:table-cell office:value-type="float" office:value="-0.001900832">
                <text:p>-0.0019008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4.082366943359">
                <text:p>414.082366943359</text:p>
              </table:table-cell>
              <table:table-cell office:value-type="float" office:value="0.01186692">
                <text:p>0.011866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4.195098876953">
                <text:p>414.195098876953</text:p>
              </table:table-cell>
              <table:table-cell office:value-type="float" office:value="0.001904761">
                <text:p>0.00190476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4.307861328125">
                <text:p>414.307861328125</text:p>
              </table:table-cell>
              <table:table-cell office:value-type="float" office:value="0.008163231">
                <text:p>0.0081632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420593261719">
                <text:p>414.420593261719</text:p>
              </table:table-cell>
              <table:table-cell office:value-type="float" office:value="-0.00904452">
                <text:p>-0.009044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4.533325195313">
                <text:p>414.533325195313</text:p>
              </table:table-cell>
              <table:table-cell office:value-type="float" office:value="0.00608933">
                <text:p>0.0060893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.646087646484">
                <text:p>414.646087646484</text:p>
              </table:table-cell>
              <table:table-cell office:value-type="float" office:value="-0.003926279">
                <text:p>-0.00392627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4.758850097656">
                <text:p>414.758850097656</text:p>
              </table:table-cell>
              <table:table-cell office:value-type="float" office:value="-0.002779468">
                <text:p>-0.00277946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4.871612548828">
                <text:p>414.871612548828</text:p>
              </table:table-cell>
              <table:table-cell office:value-type="float" office:value="0.003585109">
                <text:p>0.00358510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4.984375">
                <text:p>414.984375</text:p>
              </table:table-cell>
              <table:table-cell office:value-type="float" office:value="0.002312343">
                <text:p>0.00231234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.09716796875">
                <text:p>415.097167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5.209930419922">
                <text:p>415.209930419922</text:p>
              </table:table-cell>
              <table:table-cell office:value-type="float" office:value="-0.004048962">
                <text:p>-0.00404896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.322723388672">
                <text:p>415.322723388672</text:p>
              </table:table-cell>
              <table:table-cell office:value-type="float" office:value="-0.002934619">
                <text:p>-0.00293461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5.435516357422">
                <text:p>415.435516357422</text:p>
              </table:table-cell>
              <table:table-cell office:value-type="float" office:value="-0.004017936">
                <text:p>-0.00401793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.548309326172">
                <text:p>415.548309326172</text:p>
              </table:table-cell>
              <table:table-cell office:value-type="float" office:value="0.000943541">
                <text:p>0.00094354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5.661102294922">
                <text:p>415.661102294922</text:p>
              </table:table-cell>
              <table:table-cell office:value-type="float" office:value="-0.005485013">
                <text:p>-0.00548501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5.773895263672">
                <text:p>415.773895263672</text:p>
              </table:table-cell>
              <table:table-cell office:value-type="float" office:value="0.006254607">
                <text:p>0.00625460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5.88671875">
                <text:p>415.88671875</text:p>
              </table:table-cell>
              <table:table-cell office:value-type="float" office:value="-0.004976781">
                <text:p>-0.00497678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5.999542236328">
                <text:p>415.999542236328</text:p>
              </table:table-cell>
              <table:table-cell office:value-type="float" office:value="-0.008537057">
                <text:p>-0.00853705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6.112365722656">
                <text:p>416.112365722656</text:p>
              </table:table-cell>
              <table:table-cell office:value-type="float" office:value="-0.00803657">
                <text:p>-0.0080365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6.225189208984">
                <text:p>416.225189208984</text:p>
              </table:table-cell>
              <table:table-cell office:value-type="float" office:value="-0.0003287432">
                <text:p>-0.00032874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6.338012695313">
                <text:p>416.338012695313</text:p>
              </table:table-cell>
              <table:table-cell office:value-type="float" office:value="-0.002559078">
                <text:p>-0.00255907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.450866699219">
                <text:p>416.450866699219</text:p>
              </table:table-cell>
              <table:table-cell office:value-type="float" office:value="0.0007860159">
                <text:p>0.000786015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6.563690185547">
                <text:p>416.563690185547</text:p>
              </table:table-cell>
              <table:table-cell office:value-type="float" office:value="-0.003929992">
                <text:p>-0.0039299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6.676544189453">
                <text:p>416.676544189453</text:p>
              </table:table-cell>
              <table:table-cell office:value-type="float" office:value="-0.004309207">
                <text:p>-0.00430920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6.789398193359">
                <text:p>416.789398193359</text:p>
              </table:table-cell>
              <table:table-cell office:value-type="float" office:value="0.0002765161">
                <text:p>0.000276516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6.902252197266">
                <text:p>416.902252197266</text:p>
              </table:table-cell>
              <table:table-cell office:value-type="float" office:value="-0.003317324">
                <text:p>-0.00331732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7.01513671875">
                <text:p>417.01513671875</text:p>
              </table:table-cell>
              <table:table-cell office:value-type="float" office:value="-0.002663995">
                <text:p>-0.0026639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7.127990722656">
                <text:p>417.127990722656</text:p>
              </table:table-cell>
              <table:table-cell office:value-type="float" office:value="0.01072634">
                <text:p>0.010726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7.240875244141">
                <text:p>417.240875244141</text:p>
              </table:table-cell>
              <table:table-cell office:value-type="float" office:value="0.003269362">
                <text:p>0.00326936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7.353759765625">
                <text:p>417.353759765625</text:p>
              </table:table-cell>
              <table:table-cell office:value-type="float" office:value="0.01935383">
                <text:p>0.019353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7.466644287109">
                <text:p>417.466644287109</text:p>
              </table:table-cell>
              <table:table-cell office:value-type="float" office:value="-0.01002991">
                <text:p>-0.010029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7.579528808594">
                <text:p>417.579528808594</text:p>
              </table:table-cell>
              <table:table-cell office:value-type="float" office:value="-0.005862804">
                <text:p>-0.0058628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.692443847656">
                <text:p>417.692443847656</text:p>
              </table:table-cell>
              <table:table-cell office:value-type="float" office:value="0.001009225">
                <text:p>0.0010092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7.805328369141">
                <text:p>417.805328369141</text:p>
              </table:table-cell>
              <table:table-cell office:value-type="float" office:value="0.00363021">
                <text:p>0.003630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7.918243408203">
                <text:p>417.918243408203</text:p>
              </table:table-cell>
              <table:table-cell office:value-type="float" office:value="-0.01460902">
                <text:p>-0.0146090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.031158447266">
                <text:p>418.031158447266</text:p>
              </table:table-cell>
              <table:table-cell office:value-type="float" office:value="-0.007732789">
                <text:p>-0.00773278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8.144073486328">
                <text:p>418.144073486328</text:p>
              </table:table-cell>
              <table:table-cell office:value-type="float" office:value="0.02879669">
                <text:p>0.0287966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8.256988525391">
                <text:p>418.256988525391</text:p>
              </table:table-cell>
              <table:table-cell office:value-type="float" office:value="0.01507789">
                <text:p>0.0150778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8.369934082031">
                <text:p>418.369934082031</text:p>
              </table:table-cell>
              <table:table-cell office:value-type="float" office:value="0.004684399">
                <text:p>0.00468439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8.482849121094">
                <text:p>418.482849121094</text:p>
              </table:table-cell>
              <table:table-cell office:value-type="float" office:value="0.004283962">
                <text:p>0.00428396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8.595794677734">
                <text:p>418.595794677734</text:p>
              </table:table-cell>
              <table:table-cell office:value-type="float" office:value="0.0009648731">
                <text:p>0.000964873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8.708740234375">
                <text:p>418.708740234375</text:p>
              </table:table-cell>
              <table:table-cell office:value-type="float" office:value="0.001390925">
                <text:p>0.0013909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8.821685791016">
                <text:p>418.821685791016</text:p>
              </table:table-cell>
              <table:table-cell office:value-type="float" office:value="0.0006449132">
                <text:p>0.000644913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8.934661865234">
                <text:p>418.934661865234</text:p>
              </table:table-cell>
              <table:table-cell office:value-type="float" office:value="0.003365079">
                <text:p>0.00336507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9.047607421875">
                <text:p>419.047607421875</text:p>
              </table:table-cell>
              <table:table-cell office:value-type="float" office:value="-0.003726489">
                <text:p>-0.00372648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9.160583496094">
                <text:p>419.160583496094</text:p>
              </table:table-cell>
              <table:table-cell office:value-type="float" office:value="-0.008341698">
                <text:p>-0.0083416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9.273559570313">
                <text:p>419.273559570313</text:p>
              </table:table-cell>
              <table:table-cell office:value-type="float" office:value="-0.005334455">
                <text:p>-0.00533445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.386535644531">
                <text:p>419.386535644531</text:p>
              </table:table-cell>
              <table:table-cell office:value-type="float" office:value="-0.001410037">
                <text:p>-0.00141003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.49951171875">
                <text:p>419.49951171875</text:p>
              </table:table-cell>
              <table:table-cell office:value-type="float" office:value="0.009062653">
                <text:p>0.00906265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.612487792969">
                <text:p>419.612487792969</text:p>
              </table:table-cell>
              <table:table-cell office:value-type="float" office:value="0.005849409">
                <text:p>0.00584940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9.725494384766">
                <text:p>419.725494384766</text:p>
              </table:table-cell>
              <table:table-cell office:value-type="float" office:value="0.008280137">
                <text:p>0.0082801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9.838470458984">
                <text:p>419.838470458984</text:p>
              </table:table-cell>
              <table:table-cell office:value-type="float" office:value="0.001483603">
                <text:p>0.0014836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.951477050781">
                <text:p>419.951477050781</text:p>
              </table:table-cell>
              <table:table-cell office:value-type="float" office:value="0.01245526">
                <text:p>0.012455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.064483642578">
                <text:p>420.064483642578</text:p>
              </table:table-cell>
              <table:table-cell office:value-type="float" office:value="-0.002355589">
                <text:p>-0.0023555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.177520751953">
                <text:p>420.177520751953</text:p>
              </table:table-cell>
              <table:table-cell office:value-type="float" office:value="0.0004636144">
                <text:p>0.00046361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0.29052734375">
                <text:p>420.29052734375</text:p>
              </table:table-cell>
              <table:table-cell office:value-type="float" office:value="-0.006802317">
                <text:p>-0.0068023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0.403564453125">
                <text:p>420.403564453125</text:p>
              </table:table-cell>
              <table:table-cell office:value-type="float" office:value="-0.005377057">
                <text:p>-0.00537705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0.516571044922">
                <text:p>420.516571044922</text:p>
              </table:table-cell>
              <table:table-cell office:value-type="float" office:value="-0.00339159">
                <text:p>-0.0033915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0.629608154297">
                <text:p>420.629608154297</text:p>
              </table:table-cell>
              <table:table-cell office:value-type="float" office:value="0.001984089">
                <text:p>0.00198408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0.742645263672">
                <text:p>420.742645263672</text:p>
              </table:table-cell>
              <table:table-cell office:value-type="float" office:value="0.003805234">
                <text:p>0.00380523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0.855712890625">
                <text:p>420.855712890625</text:p>
              </table:table-cell>
              <table:table-cell office:value-type="float" office:value="0.004709058">
                <text:p>0.00470905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.96875">
                <text:p>420.96875</text:p>
              </table:table-cell>
              <table:table-cell office:value-type="float" office:value="0.01298311">
                <text:p>0.012983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1.081817626953">
                <text:p>421.081817626953</text:p>
              </table:table-cell>
              <table:table-cell office:value-type="float" office:value="-0.003285284">
                <text:p>-0.0032852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1.194854736328">
                <text:p>421.194854736328</text:p>
              </table:table-cell>
              <table:table-cell office:value-type="float" office:value="-0.005091345">
                <text:p>-0.00509134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1.307922363281">
                <text:p>421.307922363281</text:p>
              </table:table-cell>
              <table:table-cell office:value-type="float" office:value="0.002179806">
                <text:p>0.00217980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.421020507813">
                <text:p>421.421020507813</text:p>
              </table:table-cell>
              <table:table-cell office:value-type="float" office:value="0.01072853">
                <text:p>0.0107285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1.534088134766">
                <text:p>421.534088134766</text:p>
              </table:table-cell>
              <table:table-cell office:value-type="float" office:value="-0.007773614">
                <text:p>-0.0077736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.647155761719">
                <text:p>421.647155761719</text:p>
              </table:table-cell>
              <table:table-cell office:value-type="float" office:value="0.002725166">
                <text:p>0.00272516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.76025390625">
                <text:p>421.76025390625</text:p>
              </table:table-cell>
              <table:table-cell office:value-type="float" office:value="-0.001733919">
                <text:p>-0.00173391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.873352050781">
                <text:p>421.873352050781</text:p>
              </table:table-cell>
              <table:table-cell office:value-type="float" office:value="0.007166074">
                <text:p>0.0071660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.986450195313">
                <text:p>421.986450195313</text:p>
              </table:table-cell>
              <table:table-cell office:value-type="float" office:value="0.005698862">
                <text:p>0.0056988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.099548339844">
                <text:p>422.099548339844</text:p>
              </table:table-cell>
              <table:table-cell office:value-type="float" office:value="-0.00104043">
                <text:p>-0.0010404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.212646484375">
                <text:p>422.212646484375</text:p>
              </table:table-cell>
              <table:table-cell office:value-type="float" office:value="0.02082422">
                <text:p>0.0208242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2.325775146484">
                <text:p>422.325775146484</text:p>
              </table:table-cell>
              <table:table-cell office:value-type="float" office:value="-0.002618086">
                <text:p>-0.00261808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2.438903808594">
                <text:p>422.438903808594</text:p>
              </table:table-cell>
              <table:table-cell office:value-type="float" office:value="-0.00758489">
                <text:p>-0.0075848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2.552001953125">
                <text:p>422.552001953125</text:p>
              </table:table-cell>
              <table:table-cell office:value-type="float" office:value="-0.007800569">
                <text:p>-0.0078005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2.665130615234">
                <text:p>422.665130615234</text:p>
              </table:table-cell>
              <table:table-cell office:value-type="float" office:value="0.008366105">
                <text:p>0.0083661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2.778289794922">
                <text:p>422.778289794922</text:p>
              </table:table-cell>
              <table:table-cell office:value-type="float" office:value="-0.005486204">
                <text:p>-0.0054862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2.891418457031">
                <text:p>422.891418457031</text:p>
              </table:table-cell>
              <table:table-cell office:value-type="float" office:value="0.0107504">
                <text:p>0.010750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3.004577636719">
                <text:p>423.004577636719</text:p>
              </table:table-cell>
              <table:table-cell office:value-type="float" office:value="0.005992326">
                <text:p>0.00599232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3.117706298828">
                <text:p>423.117706298828</text:p>
              </table:table-cell>
              <table:table-cell office:value-type="float" office:value="-0.002865244">
                <text:p>-0.00286524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3.230865478516">
                <text:p>423.230865478516</text:p>
              </table:table-cell>
              <table:table-cell office:value-type="float" office:value="-0.003652791">
                <text:p>-0.00365279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.344024658203">
                <text:p>423.344024658203</text:p>
              </table:table-cell>
              <table:table-cell office:value-type="float" office:value="0.002241041">
                <text:p>0.00224104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.457183837891">
                <text:p>423.457183837891</text:p>
              </table:table-cell>
              <table:table-cell office:value-type="float" office:value="-0.008603296">
                <text:p>-0.00860329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.570373535156">
                <text:p>423.570373535156</text:p>
              </table:table-cell>
              <table:table-cell office:value-type="float" office:value="0.01018757">
                <text:p>0.0101875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3.683532714844">
                <text:p>423.683532714844</text:p>
              </table:table-cell>
              <table:table-cell office:value-type="float" office:value="-0.0007630957">
                <text:p>-0.000763095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3.796722412109">
                <text:p>423.796722412109</text:p>
              </table:table-cell>
              <table:table-cell office:value-type="float" office:value="-0.003323">
                <text:p>-0.00332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3.909912109375">
                <text:p>423.909912109375</text:p>
              </table:table-cell>
              <table:table-cell office:value-type="float" office:value="-0.009775368">
                <text:p>-0.00977536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4.023101806641">
                <text:p>424.023101806641</text:p>
              </table:table-cell>
              <table:table-cell office:value-type="float" office:value="0.004737529">
                <text:p>0.00473752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.136291503906">
                <text:p>424.136291503906</text:p>
              </table:table-cell>
              <table:table-cell office:value-type="float" office:value="0.009896347">
                <text:p>0.00989634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4.24951171875">
                <text:p>424.24951171875</text:p>
              </table:table-cell>
              <table:table-cell office:value-type="float" office:value="0.00604505">
                <text:p>0.0060450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4.362701416016">
                <text:p>424.362701416016</text:p>
              </table:table-cell>
              <table:table-cell office:value-type="float" office:value="-0.004050718">
                <text:p>-0.0040507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4.475921630859">
                <text:p>424.475921630859</text:p>
              </table:table-cell>
              <table:table-cell office:value-type="float" office:value="0.002085492">
                <text:p>0.0020854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4.589141845703">
                <text:p>424.589141845703</text:p>
              </table:table-cell>
              <table:table-cell office:value-type="float" office:value="-0.0002386621">
                <text:p>-0.000238662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4.702362060547">
                <text:p>424.702362060547</text:p>
              </table:table-cell>
              <table:table-cell office:value-type="float" office:value="-0.00682213">
                <text:p>-0.006822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4.815612792969">
                <text:p>424.815612792969</text:p>
              </table:table-cell>
              <table:table-cell office:value-type="float" office:value="-0.002438184">
                <text:p>-0.00243818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4.928833007813">
                <text:p>424.928833007813</text:p>
              </table:table-cell>
              <table:table-cell office:value-type="float" office:value="0.01389579">
                <text:p>0.0138957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5.042083740234">
                <text:p>425.042083740234</text:p>
              </table:table-cell>
              <table:table-cell office:value-type="float" office:value="-0.004584293">
                <text:p>-0.00458429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5.155303955078">
                <text:p>425.155303955078</text:p>
              </table:table-cell>
              <table:table-cell office:value-type="float" office:value="-0.003342864">
                <text:p>-0.0033428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.2685546875">
                <text:p>425.2685546875</text:p>
              </table:table-cell>
              <table:table-cell office:value-type="float" office:value="-0.01326958">
                <text:p>-0.0132695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5.3818359375">
                <text:p>425.3818359375</text:p>
              </table:table-cell>
              <table:table-cell office:value-type="float" office:value="-0.001082158">
                <text:p>-0.00108215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5.495086669922">
                <text:p>425.495086669922</text:p>
              </table:table-cell>
              <table:table-cell office:value-type="float" office:value="0.005282981">
                <text:p>0.00528298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5.608337402344">
                <text:p>425.608337402344</text:p>
              </table:table-cell>
              <table:table-cell office:value-type="float" office:value="0.004695087">
                <text:p>0.00469508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5.721618652344">
                <text:p>425.721618652344</text:p>
              </table:table-cell>
              <table:table-cell office:value-type="float" office:value="-0.005324311">
                <text:p>-0.00532431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5.834899902344">
                <text:p>425.834899902344</text:p>
              </table:table-cell>
              <table:table-cell office:value-type="float" office:value="-0.005979368">
                <text:p>-0.0059793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5.948181152344">
                <text:p>425.948181152344</text:p>
              </table:table-cell>
              <table:table-cell office:value-type="float" office:value="0.003758837">
                <text:p>0.0037588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6.061462402344">
                <text:p>426.061462402344</text:p>
              </table:table-cell>
              <table:table-cell office:value-type="float" office:value="0.01025913">
                <text:p>0.010259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6.174743652344">
                <text:p>426.174743652344</text:p>
              </table:table-cell>
              <table:table-cell office:value-type="float" office:value="-0.00488819">
                <text:p>-0.0048881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.288055419922">
                <text:p>426.288055419922</text:p>
              </table:table-cell>
              <table:table-cell office:value-type="float" office:value="0.009507929">
                <text:p>0.00950792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.401336669922">
                <text:p>426.401336669922</text:p>
              </table:table-cell>
              <table:table-cell office:value-type="float" office:value="-0.0002166578">
                <text:p>-0.000216657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6.5146484375">
                <text:p>426.5146484375</text:p>
              </table:table-cell>
              <table:table-cell office:value-type="float" office:value="-0.002577569">
                <text:p>-0.00257756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6.627960205078">
                <text:p>426.627960205078</text:p>
              </table:table-cell>
              <table:table-cell office:value-type="float" office:value="0.002946789">
                <text:p>0.00294678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6.741271972656">
                <text:p>426.741271972656</text:p>
              </table:table-cell>
              <table:table-cell office:value-type="float" office:value="0.00844756">
                <text:p>0.0084475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6.854614257813">
                <text:p>426.854614257813</text:p>
              </table:table-cell>
              <table:table-cell office:value-type="float" office:value="0.008563942">
                <text:p>0.00856394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6.967926025391">
                <text:p>426.967926025391</text:p>
              </table:table-cell>
              <table:table-cell office:value-type="float" office:value="-0.004102508">
                <text:p>-0.00410250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7.081268310547">
                <text:p>427.081268310547</text:p>
              </table:table-cell>
              <table:table-cell office:value-type="float" office:value="-0.004708798">
                <text:p>-0.00470879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7.194610595703">
                <text:p>427.194610595703</text:p>
              </table:table-cell>
              <table:table-cell office:value-type="float" office:value="0.003672916">
                <text:p>0.0036729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7.307952880859">
                <text:p>427.307952880859</text:p>
              </table:table-cell>
              <table:table-cell office:value-type="float" office:value="0.002995955">
                <text:p>0.00299595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7.421295166016">
                <text:p>427.421295166016</text:p>
              </table:table-cell>
              <table:table-cell office:value-type="float" office:value="0.0001664654">
                <text:p>0.000166465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7.534637451172">
                <text:p>427.534637451172</text:p>
              </table:table-cell>
              <table:table-cell office:value-type="float" office:value="-0.009662193">
                <text:p>-0.00966219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7.648010253906">
                <text:p>427.648010253906</text:p>
              </table:table-cell>
              <table:table-cell office:value-type="float" office:value="0.002252087">
                <text:p>0.0022520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.761383056641">
                <text:p>427.761383056641</text:p>
              </table:table-cell>
              <table:table-cell office:value-type="float" office:value="0.004317291">
                <text:p>0.00431729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7.874755859375">
                <text:p>427.874755859375</text:p>
              </table:table-cell>
              <table:table-cell office:value-type="float" office:value="-0.006799466">
                <text:p>-0.00679946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7.988128662109">
                <text:p>427.988128662109</text:p>
              </table:table-cell>
              <table:table-cell office:value-type="float" office:value="-0.009746322">
                <text:p>-0.00974632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8.101501464844">
                <text:p>428.101501464844</text:p>
              </table:table-cell>
              <table:table-cell office:value-type="float" office:value="-0.0003581657">
                <text:p>-0.000358165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8.214874267578">
                <text:p>428.214874267578</text:p>
              </table:table-cell>
              <table:table-cell office:value-type="float" office:value="0.007916297">
                <text:p>0.00791629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8.328277587891">
                <text:p>428.328277587891</text:p>
              </table:table-cell>
              <table:table-cell office:value-type="float" office:value="-0.002222846">
                <text:p>-0.0022228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8.441650390625">
                <text:p>428.441650390625</text:p>
              </table:table-cell>
              <table:table-cell office:value-type="float" office:value="-0.005780923">
                <text:p>-0.00578092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8.555053710938">
                <text:p>428.555053710938</text:p>
              </table:table-cell>
              <table:table-cell office:value-type="float" office:value="-0.003357438">
                <text:p>-0.00335743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8.66845703125">
                <text:p>428.66845703125</text:p>
              </table:table-cell>
              <table:table-cell office:value-type="float" office:value="0.00351348">
                <text:p>0.003513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.781890869141">
                <text:p>428.781890869141</text:p>
              </table:table-cell>
              <table:table-cell office:value-type="float" office:value="-0.0001608435">
                <text:p>-0.000160843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.895294189453">
                <text:p>428.895294189453</text:p>
              </table:table-cell>
              <table:table-cell office:value-type="float" office:value="0.006797289">
                <text:p>0.00679728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.008728027344">
                <text:p>429.008728027344</text:p>
              </table:table-cell>
              <table:table-cell office:value-type="float" office:value="-0.006795669">
                <text:p>-0.00679566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.122131347656">
                <text:p>429.122131347656</text:p>
              </table:table-cell>
              <table:table-cell office:value-type="float" office:value="-0.004509868">
                <text:p>-0.00450986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.235565185547">
                <text:p>429.235565185547</text:p>
              </table:table-cell>
              <table:table-cell office:value-type="float" office:value="-0.005445322">
                <text:p>-0.0054453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9.348999023438">
                <text:p>429.348999023438</text:p>
              </table:table-cell>
              <table:table-cell office:value-type="float" office:value="0.01580795">
                <text:p>0.015807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9.462432861328">
                <text:p>429.462432861328</text:p>
              </table:table-cell>
              <table:table-cell office:value-type="float" office:value="0.02340482">
                <text:p>0.0234048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9.575897216797">
                <text:p>429.575897216797</text:p>
              </table:table-cell>
              <table:table-cell office:value-type="float" office:value="-0.001056401">
                <text:p>-0.00105640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9.689331054688">
                <text:p>429.689331054688</text:p>
              </table:table-cell>
              <table:table-cell office:value-type="float" office:value="-0.005278558">
                <text:p>-0.00527855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9.802795410156">
                <text:p>429.802795410156</text:p>
              </table:table-cell>
              <table:table-cell office:value-type="float" office:value="0.006785534">
                <text:p>0.00678553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9.916259765625">
                <text:p>429.916259765625</text:p>
              </table:table-cell>
              <table:table-cell office:value-type="float" office:value="-0.0002595284">
                <text:p>-0.000259528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0.029724121094">
                <text:p>430.029724121094</text:p>
              </table:table-cell>
              <table:table-cell office:value-type="float" office:value="0.007332973">
                <text:p>0.00733297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0.143188476563">
                <text:p>430.143188476563</text:p>
              </table:table-cell>
              <table:table-cell office:value-type="float" office:value="0.008207746">
                <text:p>0.00820774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0.256683349609">
                <text:p>430.256683349609</text:p>
              </table:table-cell>
              <table:table-cell office:value-type="float" office:value="-0.00289935">
                <text:p>-0.0028993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0.370147705078">
                <text:p>430.370147705078</text:p>
              </table:table-cell>
              <table:table-cell office:value-type="float" office:value="0.01087658">
                <text:p>0.0108765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0.483642578125">
                <text:p>430.483642578125</text:p>
              </table:table-cell>
              <table:table-cell office:value-type="float" office:value="-0.002246679">
                <text:p>-0.00224667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597137451172">
                <text:p>430.597137451172</text:p>
              </table:table-cell>
              <table:table-cell office:value-type="float" office:value="0.0005925459">
                <text:p>0.000592545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710632324219">
                <text:p>430.710632324219</text:p>
              </table:table-cell>
              <table:table-cell office:value-type="float" office:value="-0.002628342">
                <text:p>-0.00262834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0.824127197266">
                <text:p>430.824127197266</text:p>
              </table:table-cell>
              <table:table-cell office:value-type="float" office:value="0.005736238">
                <text:p>0.0057362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0.937652587891">
                <text:p>430.937652587891</text:p>
              </table:table-cell>
              <table:table-cell office:value-type="float" office:value="-0.001000253">
                <text:p>-0.00100025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051147460938">
                <text:p>431.051147460938</text:p>
              </table:table-cell>
              <table:table-cell office:value-type="float" office:value="-0.004052809">
                <text:p>-0.00405280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1.164672851563">
                <text:p>431.164672851563</text:p>
              </table:table-cell>
              <table:table-cell office:value-type="float" office:value="-0.005941731">
                <text:p>-0.00594173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1.278198242188">
                <text:p>431.278198242188</text:p>
              </table:table-cell>
              <table:table-cell office:value-type="float" office:value="0.003124722">
                <text:p>0.0031247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1.391723632813">
                <text:p>431.391723632813</text:p>
              </table:table-cell>
              <table:table-cell office:value-type="float" office:value="-0.005522159">
                <text:p>-0.00552215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1.505249023438">
                <text:p>431.505249023438</text:p>
              </table:table-cell>
              <table:table-cell office:value-type="float" office:value="-0.002634642">
                <text:p>-0.00263464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1.618804931641">
                <text:p>431.618804931641</text:p>
              </table:table-cell>
              <table:table-cell office:value-type="float" office:value="-0.002967956">
                <text:p>-0.00296795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1.732330322266">
                <text:p>431.732330322266</text:p>
              </table:table-cell>
              <table:table-cell office:value-type="float" office:value="0.007795229">
                <text:p>0.0077952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1.845886230469">
                <text:p>431.845886230469</text:p>
              </table:table-cell>
              <table:table-cell office:value-type="float" office:value="0.00961719">
                <text:p>0.0096171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1.959442138672">
                <text:p>431.959442138672</text:p>
              </table:table-cell>
              <table:table-cell office:value-type="float" office:value="0.005778282">
                <text:p>0.00577828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.072998046875">
                <text:p>432.072998046875</text:p>
              </table:table-cell>
              <table:table-cell office:value-type="float" office:value="0.01859538">
                <text:p>0.018595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2.186553955078">
                <text:p>432.186553955078</text:p>
              </table:table-cell>
              <table:table-cell office:value-type="float" office:value="-0.005234691">
                <text:p>-0.00523469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2.300140380859">
                <text:p>432.300140380859</text:p>
              </table:table-cell>
              <table:table-cell office:value-type="float" office:value="-0.002374038">
                <text:p>-0.00237403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2.413696289063">
                <text:p>432.413696289063</text:p>
              </table:table-cell>
              <table:table-cell office:value-type="float" office:value="0.000310585">
                <text:p>0.00031058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2.527282714844">
                <text:p>432.527282714844</text:p>
              </table:table-cell>
              <table:table-cell office:value-type="float" office:value="0.004153586">
                <text:p>0.00415358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2.640869140625">
                <text:p>432.640869140625</text:p>
              </table:table-cell>
              <table:table-cell office:value-type="float" office:value="-0.002639231">
                <text:p>-0.00263923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2.754455566406">
                <text:p>432.754455566406</text:p>
              </table:table-cell>
              <table:table-cell office:value-type="float" office:value="0.01092467">
                <text:p>0.0109246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2.868041992188">
                <text:p>432.868041992188</text:p>
              </table:table-cell>
              <table:table-cell office:value-type="float" office:value="0.01562642">
                <text:p>0.0156264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2.981658935547">
                <text:p>432.981658935547</text:p>
              </table:table-cell>
              <table:table-cell office:value-type="float" office:value="0.008445967">
                <text:p>0.00844596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3.095245361328">
                <text:p>433.095245361328</text:p>
              </table:table-cell>
              <table:table-cell office:value-type="float" office:value="0.00278876">
                <text:p>0.0027887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3.208862304688">
                <text:p>433.208862304688</text:p>
              </table:table-cell>
              <table:table-cell office:value-type="float" office:value="0.002546223">
                <text:p>0.00254622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33.322479248047">
                <text:p>433.322479248047</text:p>
              </table:table-cell>
              <table:table-cell office:value-type="float" office:value="-0.00163297">
                <text:p>-0.0016329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3.436096191406">
                <text:p>433.436096191406</text:p>
              </table:table-cell>
              <table:table-cell office:value-type="float" office:value="0.00408432">
                <text:p>0.0040843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33.549713134766">
                <text:p>433.549713134766</text:p>
              </table:table-cell>
              <table:table-cell office:value-type="float" office:value="-0.002582033">
                <text:p>-0.00258203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33.663330078125">
                <text:p>433.663330078125</text:p>
              </table:table-cell>
              <table:table-cell office:value-type="float" office:value="-0.004730284">
                <text:p>-0.00473028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33.776977539063">
                <text:p>433.776977539063</text:p>
              </table:table-cell>
              <table:table-cell office:value-type="float" office:value="-0.005261178">
                <text:p>-0.00526117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3.890625">
                <text:p>433.890625</text:p>
              </table:table-cell>
              <table:table-cell office:value-type="float" office:value="0.01395557">
                <text:p>0.0139555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4.004272460938">
                <text:p>434.004272460938</text:p>
              </table:table-cell>
              <table:table-cell office:value-type="float" office:value="-0.001228921">
                <text:p>-0.00122892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34.117919921875">
                <text:p>434.117919921875</text:p>
              </table:table-cell>
              <table:table-cell office:value-type="float" office:value="0.002266301">
                <text:p>0.00226630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4.231567382813">
                <text:p>434.231567382813</text:p>
              </table:table-cell>
              <table:table-cell office:value-type="float" office:value="-0.008652764">
                <text:p>-0.00865276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4.34521484375">
                <text:p>434.34521484375</text:p>
              </table:table-cell>
              <table:table-cell office:value-type="float" office:value="-0.005564789">
                <text:p>-0.00556478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4.458892822266">
                <text:p>434.458892822266</text:p>
              </table:table-cell>
              <table:table-cell office:value-type="float" office:value="0.02015986">
                <text:p>0.0201598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34.572570800781">
                <text:p>434.572570800781</text:p>
              </table:table-cell>
              <table:table-cell office:value-type="float" office:value="-0.003536801">
                <text:p>-0.00353680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4.686248779297">
                <text:p>434.686248779297</text:p>
              </table:table-cell>
              <table:table-cell office:value-type="float" office:value="-0.002274469">
                <text:p>-0.00227446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4.799926757813">
                <text:p>434.799926757813</text:p>
              </table:table-cell>
              <table:table-cell office:value-type="float" office:value="-0.003165868">
                <text:p>-0.00316586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34.913604736328">
                <text:p>434.913604736328</text:p>
              </table:table-cell>
              <table:table-cell office:value-type="float" office:value="0.002706408">
                <text:p>0.00270640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35.027282714844">
                <text:p>435.027282714844</text:p>
              </table:table-cell>
              <table:table-cell office:value-type="float" office:value="-0.002174431">
                <text:p>-0.00217443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5.140991210938">
                <text:p>435.140991210938</text:p>
              </table:table-cell>
              <table:table-cell office:value-type="float" office:value="-0.002072204">
                <text:p>-0.00207220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35.254669189453">
                <text:p>435.254669189453</text:p>
              </table:table-cell>
              <table:table-cell office:value-type="float" office:value="0.005912667">
                <text:p>0.00591266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35.368377685547">
                <text:p>435.368377685547</text:p>
              </table:table-cell>
              <table:table-cell office:value-type="float" office:value="-0.008524331">
                <text:p>-0.00852433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35.482086181641">
                <text:p>435.482086181641</text:p>
              </table:table-cell>
              <table:table-cell office:value-type="float" office:value="-0.008389914">
                <text:p>-0.00838991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35.595825195313">
                <text:p>435.595825195313</text:p>
              </table:table-cell>
              <table:table-cell office:value-type="float" office:value="-0.005117176">
                <text:p>-0.00511717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35.709533691406">
                <text:p>435.709533691406</text:p>
              </table:table-cell>
              <table:table-cell office:value-type="float" office:value="0.01073958">
                <text:p>0.0107395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35.823272705078">
                <text:p>435.823272705078</text:p>
              </table:table-cell>
              <table:table-cell office:value-type="float" office:value="0.002455171">
                <text:p>0.00245517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35.936981201172">
                <text:p>435.936981201172</text:p>
              </table:table-cell>
              <table:table-cell office:value-type="float" office:value="-0.009550724">
                <text:p>-0.00955072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36.050720214844">
                <text:p>436.050720214844</text:p>
              </table:table-cell>
              <table:table-cell office:value-type="float" office:value="0.001960948">
                <text:p>0.00196094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36.164459228516">
                <text:p>436.164459228516</text:p>
              </table:table-cell>
              <table:table-cell office:value-type="float" office:value="-0.001824962">
                <text:p>-0.00182496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36.278198242188">
                <text:p>436.278198242188</text:p>
              </table:table-cell>
              <table:table-cell office:value-type="float" office:value="0.0243249">
                <text:p>0.024324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36.391967773438">
                <text:p>436.391967773438</text:p>
              </table:table-cell>
              <table:table-cell office:value-type="float" office:value="-0.001117388">
                <text:p>-0.00111738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36.505706787109">
                <text:p>436.505706787109</text:p>
              </table:table-cell>
              <table:table-cell office:value-type="float" office:value="-0.001934109">
                <text:p>-0.00193410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6.619476318359">
                <text:p>436.619476318359</text:p>
              </table:table-cell>
              <table:table-cell office:value-type="float" office:value="0.00505925">
                <text:p>0.0050592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36.733245849609">
                <text:p>436.733245849609</text:p>
              </table:table-cell>
              <table:table-cell office:value-type="float" office:value="0.002809684">
                <text:p>0.00280968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36.847015380859">
                <text:p>436.847015380859</text:p>
              </table:table-cell>
              <table:table-cell office:value-type="float" office:value="-0.008415791">
                <text:p>-0.00841579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36.960784912109">
                <text:p>436.960784912109</text:p>
              </table:table-cell>
              <table:table-cell office:value-type="float" office:value="0.004682455">
                <text:p>0.00468245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37.074554443359">
                <text:p>437.074554443359</text:p>
              </table:table-cell>
              <table:table-cell office:value-type="float" office:value="0.003043304">
                <text:p>0.00304330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37.188354492188">
                <text:p>437.188354492188</text:p>
              </table:table-cell>
              <table:table-cell office:value-type="float" office:value="-0.0006391149">
                <text:p>-0.000639114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37.302154541016">
                <text:p>437.302154541016</text:p>
              </table:table-cell>
              <table:table-cell office:value-type="float" office:value="0.002153268">
                <text:p>0.00215326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37.415924072266">
                <text:p>437.415924072266</text:p>
              </table:table-cell>
              <table:table-cell office:value-type="float" office:value="0.002669105">
                <text:p>0.00266910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37.529724121094">
                <text:p>437.529724121094</text:p>
              </table:table-cell>
              <table:table-cell office:value-type="float" office:value="-0.0007104871">
                <text:p>-0.000710487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37.6435546875">
                <text:p>437.6435546875</text:p>
              </table:table-cell>
              <table:table-cell office:value-type="float" office:value="-0.00109325">
                <text:p>-0.0010932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7.757354736328">
                <text:p>437.757354736328</text:p>
              </table:table-cell>
              <table:table-cell office:value-type="float" office:value="0.003774578">
                <text:p>0.00377457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37.871154785156">
                <text:p>437.871154785156</text:p>
              </table:table-cell>
              <table:table-cell office:value-type="float" office:value="-0.003891951">
                <text:p>-0.00389195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37.984985351563">
                <text:p>437.984985351563</text:p>
              </table:table-cell>
              <table:table-cell office:value-type="float" office:value="0.01359054">
                <text:p>0.0135905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38.098815917969">
                <text:p>438.098815917969</text:p>
              </table:table-cell>
              <table:table-cell office:value-type="float" office:value="0.003873171">
                <text:p>0.00387317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38.212646484375">
                <text:p>438.212646484375</text:p>
              </table:table-cell>
              <table:table-cell office:value-type="float" office:value="-0.006743235">
                <text:p>-0.00674323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8.326477050781">
                <text:p>438.326477050781</text:p>
              </table:table-cell>
              <table:table-cell office:value-type="float" office:value="-0.0101918">
                <text:p>-0.010191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38.440307617188">
                <text:p>438.440307617188</text:p>
              </table:table-cell>
              <table:table-cell office:value-type="float" office:value="-0.0005045105">
                <text:p>-0.000504510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8.554168701172">
                <text:p>438.554168701172</text:p>
              </table:table-cell>
              <table:table-cell office:value-type="float" office:value="0.006374553">
                <text:p>0.00637455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38.667999267578">
                <text:p>438.667999267578</text:p>
              </table:table-cell>
              <table:table-cell office:value-type="float" office:value="-0.00847951">
                <text:p>-0.0084795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38.781860351563">
                <text:p>438.781860351563</text:p>
              </table:table-cell>
              <table:table-cell office:value-type="float" office:value="-0.01154691">
                <text:p>-0.0115469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38.895721435547">
                <text:p>438.895721435547</text:p>
              </table:table-cell>
              <table:table-cell office:value-type="float" office:value="-0.002633133">
                <text:p>-0.00263313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.009582519531">
                <text:p>439.009582519531</text:p>
              </table:table-cell>
              <table:table-cell office:value-type="float" office:value="0.002789063">
                <text:p>0.00278906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39.123474121094">
                <text:p>439.123474121094</text:p>
              </table:table-cell>
              <table:table-cell office:value-type="float" office:value="-0.008835759">
                <text:p>-0.00883575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9.237335205078">
                <text:p>439.237335205078</text:p>
              </table:table-cell>
              <table:table-cell office:value-type="float" office:value="-0.007686448">
                <text:p>-0.00768644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39.351226806641">
                <text:p>439.351226806641</text:p>
              </table:table-cell>
              <table:table-cell office:value-type="float" office:value="0.002778466">
                <text:p>0.00277846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39.465087890625">
                <text:p>439.465087890625</text:p>
              </table:table-cell>
              <table:table-cell office:value-type="float" office:value="0.01994432">
                <text:p>0.0199443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9.578979492188">
                <text:p>439.578979492188</text:p>
              </table:table-cell>
              <table:table-cell office:value-type="float" office:value="-0.005583206">
                <text:p>-0.00558320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69287109375">
                <text:p>439.69287109375</text:p>
              </table:table-cell>
              <table:table-cell office:value-type="float" office:value="-0.008898235">
                <text:p>-0.00889823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9.806793212891">
                <text:p>439.806793212891</text:p>
              </table:table-cell>
              <table:table-cell office:value-type="float" office:value="-0.006398039">
                <text:p>-0.00639803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9.920684814453">
                <text:p>439.920684814453</text:p>
              </table:table-cell>
              <table:table-cell office:value-type="float" office:value="0.05443946">
                <text:p>0.0544394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0.034606933594">
                <text:p>440.034606933594</text:p>
              </table:table-cell>
              <table:table-cell office:value-type="float" office:value="-0.001484454">
                <text:p>-0.00148445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0.148498535156">
                <text:p>440.148498535156</text:p>
              </table:table-cell>
              <table:table-cell office:value-type="float" office:value="-0.003883255">
                <text:p>-0.00388325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0.262420654297">
                <text:p>440.262420654297</text:p>
              </table:table-cell>
              <table:table-cell office:value-type="float" office:value="0.006301928">
                <text:p>0.00630192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0.376342773438">
                <text:p>440.376342773438</text:p>
              </table:table-cell>
              <table:table-cell office:value-type="float" office:value="0.02934662">
                <text:p>0.0293466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0.490295410156">
                <text:p>440.490295410156</text:p>
              </table:table-cell>
              <table:table-cell office:value-type="float" office:value="-0.001052855">
                <text:p>-0.00105285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0.604217529297">
                <text:p>440.604217529297</text:p>
              </table:table-cell>
              <table:table-cell office:value-type="float" office:value="-0.0162295">
                <text:p>-0.016229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40.718170166016">
                <text:p>440.718170166016</text:p>
              </table:table-cell>
              <table:table-cell office:value-type="float" office:value="0.01931707">
                <text:p>0.0193170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0.832092285156">
                <text:p>440.832092285156</text:p>
              </table:table-cell>
              <table:table-cell office:value-type="float" office:value="0.01022736">
                <text:p>0.0102273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0.946044921875">
                <text:p>440.946044921875</text:p>
              </table:table-cell>
              <table:table-cell office:value-type="float" office:value="-0.002693189">
                <text:p>-0.00269318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41.059997558594">
                <text:p>441.059997558594</text:p>
              </table:table-cell>
              <table:table-cell office:value-type="float" office:value="-0.00249237">
                <text:p>-0.0024923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1.173950195313">
                <text:p>441.173950195313</text:p>
              </table:table-cell>
              <table:table-cell office:value-type="float" office:value="0.00570466">
                <text:p>0.0057046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41.287933349609">
                <text:p>441.287933349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41.401885986328">
                <text:p>441.401885986328</text:p>
              </table:table-cell>
              <table:table-cell office:value-type="float" office:value="0.0003703348">
                <text:p>0.000370334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1.515869140625">
                <text:p>441.515869140625</text:p>
              </table:table-cell>
              <table:table-cell office:value-type="float" office:value="0.01335926">
                <text:p>0.0133592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1.629852294922">
                <text:p>441.629852294922</text:p>
              </table:table-cell>
              <table:table-cell office:value-type="float" office:value="0.001350608">
                <text:p>0.00135060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41.743835449219">
                <text:p>441.743835449219</text:p>
              </table:table-cell>
              <table:table-cell office:value-type="float" office:value="0.005895067">
                <text:p>0.00589506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1.857818603516">
                <text:p>441.857818603516</text:p>
              </table:table-cell>
              <table:table-cell office:value-type="float" office:value="-0.01105634">
                <text:p>-0.0110563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1.971801757813">
                <text:p>441.971801757813</text:p>
              </table:table-cell>
              <table:table-cell office:value-type="float" office:value="0.0003958625">
                <text:p>0.00039586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2.085815429688">
                <text:p>442.085815429688</text:p>
              </table:table-cell>
              <table:table-cell office:value-type="float" office:value="0.00714434">
                <text:p>0.0071443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2.199829101563">
                <text:p>442.199829101563</text:p>
              </table:table-cell>
              <table:table-cell office:value-type="float" office:value="-0.005654004">
                <text:p>-0.00565400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2.313812255859">
                <text:p>442.313812255859</text:p>
              </table:table-cell>
              <table:table-cell office:value-type="float" office:value="-0.001261682">
                <text:p>-0.00126168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2.427825927734">
                <text:p>442.427825927734</text:p>
              </table:table-cell>
              <table:table-cell office:value-type="float" office:value="0.01783371">
                <text:p>0.0178337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2.541839599609">
                <text:p>442.541839599609</text:p>
              </table:table-cell>
              <table:table-cell office:value-type="float" office:value="0.001559035">
                <text:p>0.00155903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2.655883789063">
                <text:p>442.655883789063</text:p>
              </table:table-cell>
              <table:table-cell office:value-type="float" office:value="-0.001821305">
                <text:p>-0.00182130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2.769897460938">
                <text:p>442.769897460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2.883941650391">
                <text:p>442.883941650391</text:p>
              </table:table-cell>
              <table:table-cell office:value-type="float" office:value="-0.003184563">
                <text:p>-0.00318456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2.997985839844">
                <text:p>442.997985839844</text:p>
              </table:table-cell>
              <table:table-cell office:value-type="float" office:value="0.007364143">
                <text:p>0.00736414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43.112030029297">
                <text:p>443.112030029297</text:p>
              </table:table-cell>
              <table:table-cell office:value-type="float" office:value="0.003399163">
                <text:p>0.00339916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3.22607421875">
                <text:p>443.22607421875</text:p>
              </table:table-cell>
              <table:table-cell office:value-type="float" office:value="-0.005014939">
                <text:p>-0.00501493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3.340118408203">
                <text:p>443.340118408203</text:p>
              </table:table-cell>
              <table:table-cell office:value-type="float" office:value="-0.0005147989">
                <text:p>-0.000514798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3.454162597656">
                <text:p>443.454162597656</text:p>
              </table:table-cell>
              <table:table-cell office:value-type="float" office:value="0.002669932">
                <text:p>0.00266993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43.568237304688">
                <text:p>443.568237304688</text:p>
              </table:table-cell>
              <table:table-cell office:value-type="float" office:value="-0.004702702">
                <text:p>-0.00470270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43.682312011719">
                <text:p>443.682312011719</text:p>
              </table:table-cell>
              <table:table-cell office:value-type="float" office:value="-0.009788257">
                <text:p>-0.00978825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43.79638671875">
                <text:p>443.79638671875</text:p>
              </table:table-cell>
              <table:table-cell office:value-type="float" office:value="0.001687847">
                <text:p>0.00168784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3.910461425781">
                <text:p>443.910461425781</text:p>
              </table:table-cell>
              <table:table-cell office:value-type="float" office:value="-0.003803054">
                <text:p>-0.00380305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44.024536132813">
                <text:p>444.024536132813</text:p>
              </table:table-cell>
              <table:table-cell office:value-type="float" office:value="0.003624708">
                <text:p>0.00362470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44.138610839844">
                <text:p>444.138610839844</text:p>
              </table:table-cell>
              <table:table-cell office:value-type="float" office:value="0.02279014">
                <text:p>0.0227901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4.252716064453">
                <text:p>444.252716064453</text:p>
              </table:table-cell>
              <table:table-cell office:value-type="float" office:value="-0.004726256">
                <text:p>-0.00472625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44.366821289063">
                <text:p>444.366821289063</text:p>
              </table:table-cell>
              <table:table-cell office:value-type="float" office:value="-0.0006635096">
                <text:p>-0.000663509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44.480895996094">
                <text:p>444.480895996094</text:p>
              </table:table-cell>
              <table:table-cell office:value-type="float" office:value="0.0008896635">
                <text:p>0.000889663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4.595001220703">
                <text:p>444.595001220703</text:p>
              </table:table-cell>
              <table:table-cell office:value-type="float" office:value="-0.005041293">
                <text:p>-0.00504129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4.709136962891">
                <text:p>444.709136962891</text:p>
              </table:table-cell>
              <table:table-cell office:value-type="float" office:value="-0.002935334">
                <text:p>-0.00293533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4.8232421875">
                <text:p>444.8232421875</text:p>
              </table:table-cell>
              <table:table-cell office:value-type="float" office:value="0.004267086">
                <text:p>0.00426708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4.937347412109">
                <text:p>444.937347412109</text:p>
              </table:table-cell>
              <table:table-cell office:value-type="float" office:value="0.006266281">
                <text:p>0.00626628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5.051483154297">
                <text:p>445.051483154297</text:p>
              </table:table-cell>
              <table:table-cell office:value-type="float" office:value="-0.003307489">
                <text:p>-0.00330748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5.165618896484">
                <text:p>445.165618896484</text:p>
              </table:table-cell>
              <table:table-cell office:value-type="float" office:value="-0.009830818">
                <text:p>-0.00983081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5.279754638672">
                <text:p>445.279754638672</text:p>
              </table:table-cell>
              <table:table-cell office:value-type="float" office:value="0.005874892">
                <text:p>0.00587489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5.393890380859">
                <text:p>445.393890380859</text:p>
              </table:table-cell>
              <table:table-cell office:value-type="float" office:value="-0.0004494902">
                <text:p>-0.000449490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45.508026123047">
                <text:p>445.508026123047</text:p>
              </table:table-cell>
              <table:table-cell office:value-type="float" office:value="-0.005767825">
                <text:p>-0.00576782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5.622192382813">
                <text:p>445.622192382813</text:p>
              </table:table-cell>
              <table:table-cell office:value-type="float" office:value="0.0003117993">
                <text:p>0.000311799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5.736328125">
                <text:p>445.736328125</text:p>
              </table:table-cell>
              <table:table-cell office:value-type="float" office:value="0.001124375">
                <text:p>0.00112437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45.850494384766">
                <text:p>445.850494384766</text:p>
              </table:table-cell>
              <table:table-cell office:value-type="float" office:value="0.004283194">
                <text:p>0.00428319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5.964660644531">
                <text:p>445.964660644531</text:p>
              </table:table-cell>
              <table:table-cell office:value-type="float" office:value="-0.005392509">
                <text:p>-0.00539250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46.078826904297">
                <text:p>446.078826904297</text:p>
              </table:table-cell>
              <table:table-cell office:value-type="float" office:value="-0.001780537">
                <text:p>-0.00178053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46.192993164063">
                <text:p>446.192993164063</text:p>
              </table:table-cell>
              <table:table-cell office:value-type="float" office:value="0.003605516">
                <text:p>0.00360551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46.307189941406">
                <text:p>446.307189941406</text:p>
              </table:table-cell>
              <table:table-cell office:value-type="float" office:value="0.003215412">
                <text:p>0.00321541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46.421356201172">
                <text:p>446.421356201172</text:p>
              </table:table-cell>
              <table:table-cell office:value-type="float" office:value="-0.005071553">
                <text:p>-0.00507155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46.535552978516">
                <text:p>446.535552978516</text:p>
              </table:table-cell>
              <table:table-cell office:value-type="float" office:value="-0.0002886018">
                <text:p>-0.000288601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46.649749755859">
                <text:p>446.649749755859</text:p>
              </table:table-cell>
              <table:table-cell office:value-type="float" office:value="0.01168242">
                <text:p>0.0116824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6.763946533203">
                <text:p>446.763946533203</text:p>
              </table:table-cell>
              <table:table-cell office:value-type="float" office:value="-0.003143676">
                <text:p>-0.00314367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.878143310547">
                <text:p>446.878143310547</text:p>
              </table:table-cell>
              <table:table-cell office:value-type="float" office:value="-0.002278224">
                <text:p>-0.00227822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6.992370605469">
                <text:p>446.992370605469</text:p>
              </table:table-cell>
              <table:table-cell office:value-type="float" office:value="-0.003414779">
                <text:p>-0.00341477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7.106567382813">
                <text:p>447.106567382813</text:p>
              </table:table-cell>
              <table:table-cell office:value-type="float" office:value="0.01376073">
                <text:p>0.0137607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7.220794677734">
                <text:p>447.220794677734</text:p>
              </table:table-cell>
              <table:table-cell office:value-type="float" office:value="0.001628909">
                <text:p>0.00162890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7.335021972656">
                <text:p>447.335021972656</text:p>
              </table:table-cell>
              <table:table-cell office:value-type="float" office:value="0.003658637">
                <text:p>0.00365863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7.449249267578">
                <text:p>447.449249267578</text:p>
              </table:table-cell>
              <table:table-cell office:value-type="float" office:value="0.008316315">
                <text:p>0.00831631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7.5634765625">
                <text:p>447.5634765625</text:p>
              </table:table-cell>
              <table:table-cell office:value-type="float" office:value="0.001684143">
                <text:p>0.00168414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7.677703857422">
                <text:p>447.677703857422</text:p>
              </table:table-cell>
              <table:table-cell office:value-type="float" office:value="0.003965256">
                <text:p>0.00396525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7.791961669922">
                <text:p>447.791961669922</text:p>
              </table:table-cell>
              <table:table-cell office:value-type="float" office:value="-0.005942089">
                <text:p>-0.00594208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7.906188964844">
                <text:p>447.906188964844</text:p>
              </table:table-cell>
              <table:table-cell office:value-type="float" office:value="-0.008573061">
                <text:p>-0.00857306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8.020446777344">
                <text:p>448.020446777344</text:p>
              </table:table-cell>
              <table:table-cell office:value-type="float" office:value="-0.006058322">
                <text:p>-0.00605832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8.134704589844">
                <text:p>448.134704589844</text:p>
              </table:table-cell>
              <table:table-cell office:value-type="float" office:value="0.01052307">
                <text:p>0.0105230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48.248962402344">
                <text:p>448.248962402344</text:p>
              </table:table-cell>
              <table:table-cell office:value-type="float" office:value="-0.008443099">
                <text:p>-0.00844309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8.363220214844">
                <text:p>448.363220214844</text:p>
              </table:table-cell>
              <table:table-cell office:value-type="float" office:value="-0.002804497">
                <text:p>-0.00280449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48.477508544922">
                <text:p>448.477508544922</text:p>
              </table:table-cell>
              <table:table-cell office:value-type="float" office:value="0.006089745">
                <text:p>0.00608974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48.591766357422">
                <text:p>448.591766357422</text:p>
              </table:table-cell>
              <table:table-cell office:value-type="float" office:value="0.008921531">
                <text:p>0.00892153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48.7060546875">
                <text:p>448.7060546875</text:p>
              </table:table-cell>
              <table:table-cell office:value-type="float" office:value="0.009209607">
                <text:p>0.00920960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8.820343017578">
                <text:p>448.820343017578</text:p>
              </table:table-cell>
              <table:table-cell office:value-type="float" office:value="-0.009139988">
                <text:p>-0.00913998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.934631347656">
                <text:p>448.934631347656</text:p>
              </table:table-cell>
              <table:table-cell office:value-type="float" office:value="-0.00194347">
                <text:p>-0.0019434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49.048919677734">
                <text:p>449.048919677734</text:p>
              </table:table-cell>
              <table:table-cell office:value-type="float" office:value="-0.002015305">
                <text:p>-0.00201530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49.163238525391">
                <text:p>449.163238525391</text:p>
              </table:table-cell>
              <table:table-cell office:value-type="float" office:value="-0.0112617">
                <text:p>-0.011261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49.277526855469">
                <text:p>449.277526855469</text:p>
              </table:table-cell>
              <table:table-cell office:value-type="float" office:value="-0.000293482">
                <text:p>-0.00029348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9.391845703125">
                <text:p>449.391845703125</text:p>
              </table:table-cell>
              <table:table-cell office:value-type="float" office:value="0.01394316">
                <text:p>0.0139431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9.506164550781">
                <text:p>449.506164550781</text:p>
              </table:table-cell>
              <table:table-cell office:value-type="float" office:value="0.001532043">
                <text:p>0.00153204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9.620483398438">
                <text:p>449.620483398438</text:p>
              </table:table-cell>
              <table:table-cell office:value-type="float" office:value="0.009742033">
                <text:p>0.00974203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9.734802246094">
                <text:p>449.734802246094</text:p>
              </table:table-cell>
              <table:table-cell office:value-type="float" office:value="-0.009819541">
                <text:p>-0.00981954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9.84912109375">
                <text:p>449.84912109375</text:p>
              </table:table-cell>
              <table:table-cell office:value-type="float" office:value="0.006284469">
                <text:p>0.00628446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9.963439941406">
                <text:p>449.963439941406</text:p>
              </table:table-cell>
              <table:table-cell office:value-type="float" office:value="-0.004239182">
                <text:p>-0.00423918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0.077789306641">
                <text:p>450.077789306641</text:p>
              </table:table-cell>
              <table:table-cell office:value-type="float" office:value="-0.00229372">
                <text:p>-0.0022937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0.192138671875">
                <text:p>450.192138671875</text:p>
              </table:table-cell>
              <table:table-cell office:value-type="float" office:value="-0.01327731">
                <text:p>-0.0132773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0.306488037109">
                <text:p>450.306488037109</text:p>
              </table:table-cell>
              <table:table-cell office:value-type="float" office:value="0.005678939">
                <text:p>0.00567893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0.420837402344">
                <text:p>450.420837402344</text:p>
              </table:table-cell>
              <table:table-cell office:value-type="float" office:value="0.001684377">
                <text:p>0.00168437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0.535186767578">
                <text:p>450.535186767578</text:p>
              </table:table-cell>
              <table:table-cell office:value-type="float" office:value="-0.0007983968">
                <text:p>-0.000798396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0.649536132813">
                <text:p>450.649536132813</text:p>
              </table:table-cell>
              <table:table-cell office:value-type="float" office:value="-0.01328226">
                <text:p>-0.0132822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0.763916015625">
                <text:p>450.763916015625</text:p>
              </table:table-cell>
              <table:table-cell office:value-type="float" office:value="0.006734628">
                <text:p>0.00673462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50.878295898438">
                <text:p>450.878295898438</text:p>
              </table:table-cell>
              <table:table-cell office:value-type="float" office:value="-0.005892704">
                <text:p>-0.00589270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0.99267578125">
                <text:p>450.99267578125</text:p>
              </table:table-cell>
              <table:table-cell office:value-type="float" office:value="-0.002014212">
                <text:p>-0.00201421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1.107055664063">
                <text:p>451.107055664063</text:p>
              </table:table-cell>
              <table:table-cell office:value-type="float" office:value="-0.01446843">
                <text:p>-0.0144684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51.221435546875">
                <text:p>451.221435546875</text:p>
              </table:table-cell>
              <table:table-cell office:value-type="float" office:value="-0.0001046549">
                <text:p>-0.000104654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1.335815429688">
                <text:p>451.335815429688</text:p>
              </table:table-cell>
              <table:table-cell office:value-type="float" office:value="0.01150456">
                <text:p>0.0115045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51.450225830078">
                <text:p>451.450225830078</text:p>
              </table:table-cell>
              <table:table-cell office:value-type="float" office:value="0.001397436">
                <text:p>0.00139743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51.564605712891">
                <text:p>451.564605712891</text:p>
              </table:table-cell>
              <table:table-cell office:value-type="float" office:value="-0.01243253">
                <text:p>-0.0124325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51.679016113281">
                <text:p>451.679016113281</text:p>
              </table:table-cell>
              <table:table-cell office:value-type="float" office:value="0.007790238">
                <text:p>0.00779023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1.793426513672">
                <text:p>451.793426513672</text:p>
              </table:table-cell>
              <table:table-cell office:value-type="float" office:value="0.008957445">
                <text:p>0.00895744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1.907836914063">
                <text:p>451.907836914063</text:p>
              </table:table-cell>
              <table:table-cell office:value-type="float" office:value="-0.007173148">
                <text:p>-0.00717314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2.022247314453">
                <text:p>452.022247314453</text:p>
              </table:table-cell>
              <table:table-cell office:value-type="float" office:value="-0.003080152">
                <text:p>-0.00308015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2.136688232422">
                <text:p>452.136688232422</text:p>
              </table:table-cell>
              <table:table-cell office:value-type="float" office:value="0.002142261">
                <text:p>0.00214226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2.251098632813">
                <text:p>452.251098632813</text:p>
              </table:table-cell>
              <table:table-cell office:value-type="float" office:value="0.00723548">
                <text:p>0.0072354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2.365539550781">
                <text:p>452.365539550781</text:p>
              </table:table-cell>
              <table:table-cell office:value-type="float" office:value="-0.01038793">
                <text:p>-0.0103879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2.47998046875">
                <text:p>452.47998046875</text:p>
              </table:table-cell>
              <table:table-cell office:value-type="float" office:value="0.001171937">
                <text:p>0.00117193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52.594421386719">
                <text:p>452.594421386719</text:p>
              </table:table-cell>
              <table:table-cell office:value-type="float" office:value="0.008140818">
                <text:p>0.00814081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52.708862304688">
                <text:p>452.708862304688</text:p>
              </table:table-cell>
              <table:table-cell office:value-type="float" office:value="0.005254027">
                <text:p>0.00525402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52.823333740234">
                <text:p>452.823333740234</text:p>
              </table:table-cell>
              <table:table-cell office:value-type="float" office:value="0.007371502">
                <text:p>0.00737150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2.937774658203">
                <text:p>452.937774658203</text:p>
              </table:table-cell>
              <table:table-cell office:value-type="float" office:value="-0.007275134">
                <text:p>-0.00727513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53.05224609375">
                <text:p>453.05224609375</text:p>
              </table:table-cell>
              <table:table-cell office:value-type="float" office:value="-0.002374755">
                <text:p>-0.00237475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3.166717529297">
                <text:p>453.166717529297</text:p>
              </table:table-cell>
              <table:table-cell office:value-type="float" office:value="0.005887326">
                <text:p>0.00588732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53.281188964844">
                <text:p>453.281188964844</text:p>
              </table:table-cell>
              <table:table-cell office:value-type="float" office:value="-0.01091558">
                <text:p>-0.0109155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3.395660400391">
                <text:p>453.395660400391</text:p>
              </table:table-cell>
              <table:table-cell office:value-type="float" office:value="-0.003927571">
                <text:p>-0.00392757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53.510131835938">
                <text:p>453.510131835938</text:p>
              </table:table-cell>
              <table:table-cell office:value-type="float" office:value="0.0146989">
                <text:p>0.014698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53.624603271484">
                <text:p>453.624603271484</text:p>
              </table:table-cell>
              <table:table-cell office:value-type="float" office:value="-0.006149996">
                <text:p>-0.00614999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3.739105224609">
                <text:p>453.739105224609</text:p>
              </table:table-cell>
              <table:table-cell office:value-type="float" office:value="-0.003991386">
                <text:p>-0.00399138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3.853607177734">
                <text:p>453.853607177734</text:p>
              </table:table-cell>
              <table:table-cell office:value-type="float" office:value="-0.003514254">
                <text:p>-0.00351425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53.968109130859">
                <text:p>453.968109130859</text:p>
              </table:table-cell>
              <table:table-cell office:value-type="float" office:value="0.002416109">
                <text:p>0.00241610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4.082611083984">
                <text:p>454.082611083984</text:p>
              </table:table-cell>
              <table:table-cell office:value-type="float" office:value="-0.001667686">
                <text:p>-0.00166768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4.197113037109">
                <text:p>454.197113037109</text:p>
              </table:table-cell>
              <table:table-cell office:value-type="float" office:value="-0.01080773">
                <text:p>-0.0108077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4.311614990234">
                <text:p>454.311614990234</text:p>
              </table:table-cell>
              <table:table-cell office:value-type="float" office:value="-0.01504449">
                <text:p>-0.0150444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4.426147460938">
                <text:p>454.426147460938</text:p>
              </table:table-cell>
              <table:table-cell office:value-type="float" office:value="0.005620252">
                <text:p>0.00562025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4.540649414063">
                <text:p>454.540649414063</text:p>
              </table:table-cell>
              <table:table-cell office:value-type="float" office:value="0.008408736">
                <text:p>0.00840873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4.655181884766">
                <text:p>454.655181884766</text:p>
              </table:table-cell>
              <table:table-cell office:value-type="float" office:value="-0.006902692">
                <text:p>-0.00690269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4.769714355469">
                <text:p>454.769714355469</text:p>
              </table:table-cell>
              <table:table-cell office:value-type="float" office:value="-0.003128961">
                <text:p>-0.00312896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54.884246826172">
                <text:p>454.884246826172</text:p>
              </table:table-cell>
              <table:table-cell office:value-type="float" office:value="0.009631867">
                <text:p>0.00963186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4.998809814453">
                <text:p>454.998809814453</text:p>
              </table:table-cell>
              <table:table-cell office:value-type="float" office:value="0.01036544">
                <text:p>0.0103654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5.113342285156">
                <text:p>455.113342285156</text:p>
              </table:table-cell>
              <table:table-cell office:value-type="float" office:value="-0.007474666">
                <text:p>-0.00747466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5.227905273438">
                <text:p>455.227905273438</text:p>
              </table:table-cell>
              <table:table-cell office:value-type="float" office:value="-0.005281152">
                <text:p>-0.00528115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5.342468261719">
                <text:p>455.342468261719</text:p>
              </table:table-cell>
              <table:table-cell office:value-type="float" office:value="0.006389515">
                <text:p>0.00638951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.457000732422">
                <text:p>455.457000732422</text:p>
              </table:table-cell>
              <table:table-cell office:value-type="float" office:value="0.007726752">
                <text:p>0.00772675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5.571563720703">
                <text:p>455.571563720703</text:p>
              </table:table-cell>
              <table:table-cell office:value-type="float" office:value="-0.009456315">
                <text:p>-0.00945631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5.686157226563">
                <text:p>455.686157226563</text:p>
              </table:table-cell>
              <table:table-cell office:value-type="float" office:value="-0.010574">
                <text:p>-0.01057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5.800720214844">
                <text:p>455.800720214844</text:p>
              </table:table-cell>
              <table:table-cell office:value-type="float" office:value="0.01045143">
                <text:p>0.0104514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5.915313720703">
                <text:p>455.915313720703</text:p>
              </table:table-cell>
              <table:table-cell office:value-type="float" office:value="-0.0003310733">
                <text:p>-0.000331073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6.029876708984">
                <text:p>456.029876708984</text:p>
              </table:table-cell>
              <table:table-cell office:value-type="float" office:value="-0.006576283">
                <text:p>-0.00657628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6.144470214844">
                <text:p>456.144470214844</text:p>
              </table:table-cell>
              <table:table-cell office:value-type="float" office:value="-0.005038429">
                <text:p>-0.00503842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6.259063720703">
                <text:p>456.259063720703</text:p>
              </table:table-cell>
              <table:table-cell office:value-type="float" office:value="-0.003757153">
                <text:p>-0.00375715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6.373657226563">
                <text:p>456.373657226563</text:p>
              </table:table-cell>
              <table:table-cell office:value-type="float" office:value="0.008311377">
                <text:p>0.00831137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6.488250732422">
                <text:p>456.488250732422</text:p>
              </table:table-cell>
              <table:table-cell office:value-type="float" office:value="-0.005883589">
                <text:p>-0.00588358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6.602874755859">
                <text:p>456.602874755859</text:p>
              </table:table-cell>
              <table:table-cell office:value-type="float" office:value="-0.01416888">
                <text:p>-0.0141688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6.717468261719">
                <text:p>456.717468261719</text:p>
              </table:table-cell>
              <table:table-cell office:value-type="float" office:value="0.01327003">
                <text:p>0.0132700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6.832092285156">
                <text:p>456.832092285156</text:p>
              </table:table-cell>
              <table:table-cell office:value-type="float" office:value="-0.0007033913">
                <text:p>-0.000703391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6.946716308594">
                <text:p>456.946716308594</text:p>
              </table:table-cell>
              <table:table-cell office:value-type="float" office:value="-0.01113233">
                <text:p>-0.0111323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7.061340332031">
                <text:p>457.061340332031</text:p>
              </table:table-cell>
              <table:table-cell office:value-type="float" office:value="0.006801946">
                <text:p>0.00680194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7.175964355469">
                <text:p>457.175964355469</text:p>
              </table:table-cell>
              <table:table-cell office:value-type="float" office:value="0.002593881">
                <text:p>0.00259388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7.290618896484">
                <text:p>457.290618896484</text:p>
              </table:table-cell>
              <table:table-cell office:value-type="float" office:value="0.001925219">
                <text:p>0.00192521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7.405242919922">
                <text:p>457.405242919922</text:p>
              </table:table-cell>
              <table:table-cell office:value-type="float" office:value="-0.01368804">
                <text:p>-0.0136880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7.519897460938">
                <text:p>457.519897460938</text:p>
              </table:table-cell>
              <table:table-cell office:value-type="float" office:value="0.01575142">
                <text:p>0.0157514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7.634552001953">
                <text:p>457.634552001953</text:p>
              </table:table-cell>
              <table:table-cell office:value-type="float" office:value="0.008087429">
                <text:p>0.00808742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7.749206542969">
                <text:p>457.749206542969</text:p>
              </table:table-cell>
              <table:table-cell office:value-type="float" office:value="0.01063144">
                <text:p>0.0106314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57.863861083984">
                <text:p>457.863861083984</text:p>
              </table:table-cell>
              <table:table-cell office:value-type="float" office:value="-0.001638718">
                <text:p>-0.00163871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7.978515625">
                <text:p>457.978515625</text:p>
              </table:table-cell>
              <table:table-cell office:value-type="float" office:value="-0.001806285">
                <text:p>-0.00180628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58.093200683594">
                <text:p>458.093200683594</text:p>
              </table:table-cell>
              <table:table-cell office:value-type="float" office:value="-0.002267575">
                <text:p>-0.00226757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58.207855224609">
                <text:p>458.207855224609</text:p>
              </table:table-cell>
              <table:table-cell office:value-type="float" office:value="0.006221638">
                <text:p>0.00622163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8.322540283203">
                <text:p>458.322540283203</text:p>
              </table:table-cell>
              <table:table-cell office:value-type="float" office:value="0.01087523">
                <text:p>0.0108752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58.437225341797">
                <text:p>458.437225341797</text:p>
              </table:table-cell>
              <table:table-cell office:value-type="float" office:value="0.0003747106">
                <text:p>0.000374710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58.551910400391">
                <text:p>458.551910400391</text:p>
              </table:table-cell>
              <table:table-cell office:value-type="float" office:value="0.00705204">
                <text:p>0.0070520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58.666595458984">
                <text:p>458.666595458984</text:p>
              </table:table-cell>
              <table:table-cell office:value-type="float" office:value="0.01541513">
                <text:p>0.0154151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58.781280517578">
                <text:p>458.781280517578</text:p>
              </table:table-cell>
              <table:table-cell office:value-type="float" office:value="-0.00717909">
                <text:p>-0.0071790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58.89599609375">
                <text:p>458.89599609375</text:p>
              </table:table-cell>
              <table:table-cell office:value-type="float" office:value="-0.002690719">
                <text:p>-0.00269071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59.010681152344">
                <text:p>459.010681152344</text:p>
              </table:table-cell>
              <table:table-cell office:value-type="float" office:value="0.01015931">
                <text:p>0.0101593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9.125396728516">
                <text:p>459.125396728516</text:p>
              </table:table-cell>
              <table:table-cell office:value-type="float" office:value="0.03052315">
                <text:p>0.0305231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59.240112304688">
                <text:p>459.240112304688</text:p>
              </table:table-cell>
              <table:table-cell office:value-type="float" office:value="0.008913919">
                <text:p>0.00891391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59.354827880859">
                <text:p>459.354827880859</text:p>
              </table:table-cell>
              <table:table-cell office:value-type="float" office:value="-0.007627261">
                <text:p>-0.00762726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9.469543457031">
                <text:p>459.469543457031</text:p>
              </table:table-cell>
              <table:table-cell office:value-type="float" office:value="0.003514771">
                <text:p>0.00351477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59.584289550781">
                <text:p>459.584289550781</text:p>
              </table:table-cell>
              <table:table-cell office:value-type="float" office:value="-0.000441581">
                <text:p>-0.00044158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59.699005126953">
                <text:p>459.699005126953</text:p>
              </table:table-cell>
              <table:table-cell office:value-type="float" office:value="0.005433553">
                <text:p>0.00543355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9.813751220703">
                <text:p>459.813751220703</text:p>
              </table:table-cell>
              <table:table-cell office:value-type="float" office:value="-0.005150628">
                <text:p>-0.00515062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59.928497314453">
                <text:p>459.928497314453</text:p>
              </table:table-cell>
              <table:table-cell office:value-type="float" office:value="0.007314384">
                <text:p>0.00731438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60.043243408203">
                <text:p>460.043243408203</text:p>
              </table:table-cell>
              <table:table-cell office:value-type="float" office:value="0.0341741">
                <text:p>0.034174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0.157989501953">
                <text:p>460.157989501953</text:p>
              </table:table-cell>
              <table:table-cell office:value-type="float" office:value="0.01287163">
                <text:p>0.0128716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0.272735595703">
                <text:p>460.272735595703</text:p>
              </table:table-cell>
              <table:table-cell office:value-type="float" office:value="-0.01072583">
                <text:p>-0.0107258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0.387512207031">
                <text:p>460.387512207031</text:p>
              </table:table-cell>
              <table:table-cell office:value-type="float" office:value="-0.003029363">
                <text:p>-0.00302936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0.502258300781">
                <text:p>460.502258300781</text:p>
              </table:table-cell>
              <table:table-cell office:value-type="float" office:value="0.01050816">
                <text:p>0.0105081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60.617034912109">
                <text:p>460.617034912109</text:p>
              </table:table-cell>
              <table:table-cell office:value-type="float" office:value="-0.002621374">
                <text:p>-0.00262137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60.731811523438">
                <text:p>460.731811523438</text:p>
              </table:table-cell>
              <table:table-cell office:value-type="float" office:value="0.008263496">
                <text:p>0.00826349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0.846588134766">
                <text:p>460.846588134766</text:p>
              </table:table-cell>
              <table:table-cell office:value-type="float" office:value="0.01241118">
                <text:p>0.0124111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60.961364746094">
                <text:p>460.961364746094</text:p>
              </table:table-cell>
              <table:table-cell office:value-type="float" office:value="-0.002032928">
                <text:p>-0.00203292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1.076171875">
                <text:p>461.076171875</text:p>
              </table:table-cell>
              <table:table-cell office:value-type="float" office:value="-0.01099688">
                <text:p>-0.0109968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1.190948486328">
                <text:p>461.190948486328</text:p>
              </table:table-cell>
              <table:table-cell office:value-type="float" office:value="-0.0007936918">
                <text:p>-0.000793691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61.305755615234">
                <text:p>461.305755615234</text:p>
              </table:table-cell>
              <table:table-cell office:value-type="float" office:value="0.005047862">
                <text:p>0.00504786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1.420562744141">
                <text:p>461.420562744141</text:p>
              </table:table-cell>
              <table:table-cell office:value-type="float" office:value="-0.002264537">
                <text:p>-0.00226453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61.535369873047">
                <text:p>461.535369873047</text:p>
              </table:table-cell>
              <table:table-cell office:value-type="float" office:value="-0.009248879">
                <text:p>-0.00924887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61.650177001953">
                <text:p>461.650177001953</text:p>
              </table:table-cell>
              <table:table-cell office:value-type="float" office:value="0.007142593">
                <text:p>0.00714259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61.764984130859">
                <text:p>461.764984130859</text:p>
              </table:table-cell>
              <table:table-cell office:value-type="float" office:value="0.002452967">
                <text:p>0.00245296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61.879791259766">
                <text:p>461.879791259766</text:p>
              </table:table-cell>
              <table:table-cell office:value-type="float" office:value="0.005222845">
                <text:p>0.00522284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61.99462890625">
                <text:p>461.99462890625</text:p>
              </table:table-cell>
              <table:table-cell office:value-type="float" office:value="-0.003896644">
                <text:p>-0.00389664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62.109466552734">
                <text:p>462.109466552734</text:p>
              </table:table-cell>
              <table:table-cell office:value-type="float" office:value="0.005684953">
                <text:p>0.00568495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62.224304199219">
                <text:p>462.224304199219</text:p>
              </table:table-cell>
              <table:table-cell office:value-type="float" office:value="0.0009217234">
                <text:p>0.000921723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2.339141845703">
                <text:p>462.339141845703</text:p>
              </table:table-cell>
              <table:table-cell office:value-type="float" office:value="0.009114132">
                <text:p>0.00911413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62.453979492188">
                <text:p>462.453979492188</text:p>
              </table:table-cell>
              <table:table-cell office:value-type="float" office:value="-0.0008078323">
                <text:p>-0.000807832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2.568817138672">
                <text:p>462.568817138672</text:p>
              </table:table-cell>
              <table:table-cell office:value-type="float" office:value="0.003162839">
                <text:p>0.00316283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2.683654785156">
                <text:p>462.683654785156</text:p>
              </table:table-cell>
              <table:table-cell office:value-type="float" office:value="0.01199392">
                <text:p>0.0119939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62.798522949219">
                <text:p>462.798522949219</text:p>
              </table:table-cell>
              <table:table-cell office:value-type="float" office:value="-0.008212658">
                <text:p>-0.00821265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62.913391113281">
                <text:p>462.913391113281</text:p>
              </table:table-cell>
              <table:table-cell office:value-type="float" office:value="-0.005574293">
                <text:p>-0.00557429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63.028259277344">
                <text:p>463.028259277344</text:p>
              </table:table-cell>
              <table:table-cell office:value-type="float" office:value="0.006461391">
                <text:p>0.00646139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3.143127441406">
                <text:p>463.143127441406</text:p>
              </table:table-cell>
              <table:table-cell office:value-type="float" office:value="0.004938282">
                <text:p>0.00493828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63.257995605469">
                <text:p>463.257995605469</text:p>
              </table:table-cell>
              <table:table-cell office:value-type="float" office:value="-0.008321301">
                <text:p>-0.00832130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3.372863769531">
                <text:p>463.372863769531</text:p>
              </table:table-cell>
              <table:table-cell office:value-type="float" office:value="0.01177063">
                <text:p>0.0117706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63.487762451172">
                <text:p>463.487762451172</text:p>
              </table:table-cell>
              <table:table-cell office:value-type="float" office:value="0.006414396">
                <text:p>0.00641439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3.602661132813">
                <text:p>463.602661132813</text:p>
              </table:table-cell>
              <table:table-cell office:value-type="float" office:value="0.006041646">
                <text:p>0.00604164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63.717529296875">
                <text:p>463.717529296875</text:p>
              </table:table-cell>
              <table:table-cell office:value-type="float" office:value="-0.001428245">
                <text:p>-0.00142824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3.832427978516">
                <text:p>463.832427978516</text:p>
              </table:table-cell>
              <table:table-cell office:value-type="float" office:value="-0.01103623">
                <text:p>-0.0110362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63.947326660156">
                <text:p>463.947326660156</text:p>
              </table:table-cell>
              <table:table-cell office:value-type="float" office:value="0.001781727">
                <text:p>0.00178172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64.062255859375">
                <text:p>464.062255859375</text:p>
              </table:table-cell>
              <table:table-cell office:value-type="float" office:value="-0.004299573">
                <text:p>-0.00429957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64.177154541016">
                <text:p>464.177154541016</text:p>
              </table:table-cell>
              <table:table-cell office:value-type="float" office:value="-0.005627305">
                <text:p>-0.00562730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64.292083740234">
                <text:p>464.292083740234</text:p>
              </table:table-cell>
              <table:table-cell office:value-type="float" office:value="-0.009464276">
                <text:p>-0.00946427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4.406982421875">
                <text:p>464.406982421875</text:p>
              </table:table-cell>
              <table:table-cell office:value-type="float" office:value="0.005923919">
                <text:p>0.00592391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4.521911621094">
                <text:p>464.521911621094</text:p>
              </table:table-cell>
              <table:table-cell office:value-type="float" office:value="-0.003215646">
                <text:p>-0.00321564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4.636840820313">
                <text:p>464.636840820313</text:p>
              </table:table-cell>
              <table:table-cell office:value-type="float" office:value="-0.003216033">
                <text:p>-0.00321603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4.751770019531">
                <text:p>464.751770019531</text:p>
              </table:table-cell>
              <table:table-cell office:value-type="float" office:value="-0.007468838">
                <text:p>-0.00746883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4.866729736328">
                <text:p>464.866729736328</text:p>
              </table:table-cell>
              <table:table-cell office:value-type="float" office:value="0.003609071">
                <text:p>0.00360907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64.981658935547">
                <text:p>464.981658935547</text:p>
              </table:table-cell>
              <table:table-cell office:value-type="float" office:value="0.01276778">
                <text:p>0.0127677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5.096618652344">
                <text:p>465.096618652344</text:p>
              </table:table-cell>
              <table:table-cell office:value-type="float" office:value="-0.007262347">
                <text:p>-0.00726234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65.211547851563">
                <text:p>465.211547851563</text:p>
              </table:table-cell>
              <table:table-cell office:value-type="float" office:value="-0.01322661">
                <text:p>-0.0132266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65.326507568359">
                <text:p>465.326507568359</text:p>
              </table:table-cell>
              <table:table-cell office:value-type="float" office:value="-0.0082727">
                <text:p>-0.008272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5.441467285156">
                <text:p>465.441467285156</text:p>
              </table:table-cell>
              <table:table-cell office:value-type="float" office:value="0.001873252">
                <text:p>0.00187325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65.556427001953">
                <text:p>465.556427001953</text:p>
              </table:table-cell>
              <table:table-cell office:value-type="float" office:value="-0.00445588">
                <text:p>-0.0044558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5.671417236328">
                <text:p>465.671417236328</text:p>
              </table:table-cell>
              <table:table-cell office:value-type="float" office:value="-0.006887108">
                <text:p>-0.00688710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65.786376953125">
                <text:p>465.786376953125</text:p>
              </table:table-cell>
              <table:table-cell office:value-type="float" office:value="0.003841557">
                <text:p>0.00384155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5.9013671875">
                <text:p>465.9013671875</text:p>
              </table:table-cell>
              <table:table-cell office:value-type="float" office:value="0.004476801">
                <text:p>0.00447680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6.016357421875">
                <text:p>466.016357421875</text:p>
              </table:table-cell>
              <table:table-cell office:value-type="float" office:value="-0.00278217">
                <text:p>-0.0027821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66.13134765625">
                <text:p>466.13134765625</text:p>
              </table:table-cell>
              <table:table-cell office:value-type="float" office:value="-0.0118376">
                <text:p>-0.011837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6.246337890625">
                <text:p>466.246337890625</text:p>
              </table:table-cell>
              <table:table-cell office:value-type="float" office:value="0.01564148">
                <text:p>0.0156414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66.361328125">
                <text:p>466.361328125</text:p>
              </table:table-cell>
              <table:table-cell office:value-type="float" office:value="-0.002295572">
                <text:p>-0.00229557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6.476318359375">
                <text:p>466.476318359375</text:p>
              </table:table-cell>
              <table:table-cell office:value-type="float" office:value="-0.01220826">
                <text:p>-0.0122082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6.591339111328">
                <text:p>466.591339111328</text:p>
              </table:table-cell>
              <table:table-cell office:value-type="float" office:value="0.003660548">
                <text:p>0.00366054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66.706329345703">
                <text:p>466.706329345703</text:p>
              </table:table-cell>
              <table:table-cell office:value-type="float" office:value="0.02331363">
                <text:p>0.0233136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66.821350097656">
                <text:p>466.821350097656</text:p>
              </table:table-cell>
              <table:table-cell office:value-type="float" office:value="-0.0007724591">
                <text:p>-0.000772459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66.936370849609">
                <text:p>466.936370849609</text:p>
              </table:table-cell>
              <table:table-cell office:value-type="float" office:value="-0.005691805">
                <text:p>-0.00569180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67.051391601563">
                <text:p>467.051391601563</text:p>
              </table:table-cell>
              <table:table-cell office:value-type="float" office:value="0.00767522">
                <text:p>0.0076752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7.166442871094">
                <text:p>467.166442871094</text:p>
              </table:table-cell>
              <table:table-cell office:value-type="float" office:value="-0.004669667">
                <text:p>-0.00466966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67.281463623047">
                <text:p>467.281463623047</text:p>
              </table:table-cell>
              <table:table-cell office:value-type="float" office:value="0.001475617">
                <text:p>0.00147561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67.396484375">
                <text:p>467.396484375</text:p>
              </table:table-cell>
              <table:table-cell office:value-type="float" office:value="-0.006647902">
                <text:p>-0.00664790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7.511535644531">
                <text:p>467.511535644531</text:p>
              </table:table-cell>
              <table:table-cell office:value-type="float" office:value="-0.008697974">
                <text:p>-0.00869797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67.626586914063">
                <text:p>467.626586914063</text:p>
              </table:table-cell>
              <table:table-cell office:value-type="float" office:value="0.001992114">
                <text:p>0.00199211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7.741638183594">
                <text:p>467.741638183594</text:p>
              </table:table-cell>
              <table:table-cell office:value-type="float" office:value="-0.009780631">
                <text:p>-0.00978063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67.856689453125">
                <text:p>467.856689453125</text:p>
              </table:table-cell>
              <table:table-cell office:value-type="float" office:value="-0.006683584">
                <text:p>-0.00668358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7.971740722656">
                <text:p>467.971740722656</text:p>
              </table:table-cell>
              <table:table-cell office:value-type="float" office:value="-0.008089771">
                <text:p>-0.00808977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68.086822509766">
                <text:p>468.086822509766</text:p>
              </table:table-cell>
              <table:table-cell office:value-type="float" office:value="-0.0009308069">
                <text:p>-0.000930806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8.201873779297">
                <text:p>468.201873779297</text:p>
              </table:table-cell>
              <table:table-cell office:value-type="float" office:value="0.008869859">
                <text:p>0.00886985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8.316955566406">
                <text:p>468.316955566406</text:p>
              </table:table-cell>
              <table:table-cell office:value-type="float" office:value="-0.002105377">
                <text:p>-0.00210537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8.432037353516">
                <text:p>468.432037353516</text:p>
              </table:table-cell>
              <table:table-cell office:value-type="float" office:value="-0.003627988">
                <text:p>-0.00362798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68.547119140625">
                <text:p>468.547119140625</text:p>
              </table:table-cell>
              <table:table-cell office:value-type="float" office:value="-0.0004364612">
                <text:p>-0.000436461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68.662200927734">
                <text:p>468.662200927734</text:p>
              </table:table-cell>
              <table:table-cell office:value-type="float" office:value="-0.00568984">
                <text:p>-0.0056898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8.777282714844">
                <text:p>468.777282714844</text:p>
              </table:table-cell>
              <table:table-cell office:value-type="float" office:value="-0.006807892">
                <text:p>-0.00680789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68.892395019531">
                <text:p>468.892395019531</text:p>
              </table:table-cell>
              <table:table-cell office:value-type="float" office:value="-0.005183733">
                <text:p>-0.00518373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9.007476806641">
                <text:p>469.007476806641</text:p>
              </table:table-cell>
              <table:table-cell office:value-type="float" office:value="0.02341672">
                <text:p>0.0234167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9.122589111328">
                <text:p>469.122589111328</text:p>
              </table:table-cell>
              <table:table-cell office:value-type="float" office:value="-0.0005946443">
                <text:p>-0.000594644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9.237701416016">
                <text:p>469.237701416016</text:p>
              </table:table-cell>
              <table:table-cell office:value-type="float" office:value="0.00232369">
                <text:p>0.0023236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69.352813720703">
                <text:p>469.352813720703</text:p>
              </table:table-cell>
              <table:table-cell office:value-type="float" office:value="0.008716545">
                <text:p>0.00871654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69.467926025391">
                <text:p>469.467926025391</text:p>
              </table:table-cell>
              <table:table-cell office:value-type="float" office:value="0.008685123">
                <text:p>0.00868512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9.583068847656">
                <text:p>469.583068847656</text:p>
              </table:table-cell>
              <table:table-cell office:value-type="float" office:value="0.008160839">
                <text:p>0.00816083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9.698181152344">
                <text:p>469.698181152344</text:p>
              </table:table-cell>
              <table:table-cell office:value-type="float" office:value="0.0007746649">
                <text:p>0.000774664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69.813323974609">
                <text:p>469.813323974609</text:p>
              </table:table-cell>
              <table:table-cell office:value-type="float" office:value="-0.006136218">
                <text:p>-0.00613621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69.928436279297">
                <text:p>469.928436279297</text:p>
              </table:table-cell>
              <table:table-cell office:value-type="float" office:value="-0.003090223">
                <text:p>-0.00309022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0.043579101563">
                <text:p>470.043579101563</text:p>
              </table:table-cell>
              <table:table-cell office:value-type="float" office:value="0.005013313">
                <text:p>0.00501331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0.158721923828">
                <text:p>470.158721923828</text:p>
              </table:table-cell>
              <table:table-cell office:value-type="float" office:value="-0.009950207">
                <text:p>-0.00995020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0.273895263672">
                <text:p>470.273895263672</text:p>
              </table:table-cell>
              <table:table-cell office:value-type="float" office:value="0.004049913">
                <text:p>0.00404991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0.389038085938">
                <text:p>470.389038085938</text:p>
              </table:table-cell>
              <table:table-cell office:value-type="float" office:value="0.004260612">
                <text:p>0.00426061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70.504180908203">
                <text:p>470.504180908203</text:p>
              </table:table-cell>
              <table:table-cell office:value-type="float" office:value="-0.0007517922">
                <text:p>-0.000751792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0.619354248047">
                <text:p>470.619354248047</text:p>
              </table:table-cell>
              <table:table-cell office:value-type="float" office:value="-0.008838843">
                <text:p>-0.00883884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70.734527587891">
                <text:p>470.734527587891</text:p>
              </table:table-cell>
              <table:table-cell office:value-type="float" office:value="0.009248072">
                <text:p>0.00924807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70.849700927734">
                <text:p>470.849700927734</text:p>
              </table:table-cell>
              <table:table-cell office:value-type="float" office:value="0.04161338">
                <text:p>0.0416133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0.964874267578">
                <text:p>470.964874267578</text:p>
              </table:table-cell>
              <table:table-cell office:value-type="float" office:value="0.002037835">
                <text:p>0.00203783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1.080047607422">
                <text:p>471.080047607422</text:p>
              </table:table-cell>
              <table:table-cell office:value-type="float" office:value="0.01540929">
                <text:p>0.0154092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1.195220947266">
                <text:p>471.195220947266</text:p>
              </table:table-cell>
              <table:table-cell office:value-type="float" office:value="-0.01090808">
                <text:p>-0.0109080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1.310424804688">
                <text:p>471.310424804688</text:p>
              </table:table-cell>
              <table:table-cell office:value-type="float" office:value="0.006083207">
                <text:p>0.00608320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1.425628662109">
                <text:p>471.425628662109</text:p>
              </table:table-cell>
              <table:table-cell office:value-type="float" office:value="0.004020422">
                <text:p>0.00402042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1.540802001953">
                <text:p>471.540802001953</text:p>
              </table:table-cell>
              <table:table-cell office:value-type="float" office:value="0.0149302">
                <text:p>0.014930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1.656005859375">
                <text:p>471.656005859375</text:p>
              </table:table-cell>
              <table:table-cell office:value-type="float" office:value="-0.00186998">
                <text:p>-0.0018699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1.771209716797">
                <text:p>471.771209716797</text:p>
              </table:table-cell>
              <table:table-cell office:value-type="float" office:value="0.01899439">
                <text:p>0.0189943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1.886444091797">
                <text:p>471.886444091797</text:p>
              </table:table-cell>
              <table:table-cell office:value-type="float" office:value="0.01368714">
                <text:p>0.0136871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72.001647949219">
                <text:p>472.001647949219</text:p>
              </table:table-cell>
              <table:table-cell office:value-type="float" office:value="0.004940889">
                <text:p>0.00494088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2.116882324219">
                <text:p>472.116882324219</text:p>
              </table:table-cell>
              <table:table-cell office:value-type="float" office:value="-0.009324157">
                <text:p>-0.00932415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2.232086181641">
                <text:p>472.232086181641</text:p>
              </table:table-cell>
              <table:table-cell office:value-type="float" office:value="0.002186619">
                <text:p>0.00218661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2.347320556641">
                <text:p>472.347320556641</text:p>
              </table:table-cell>
              <table:table-cell office:value-type="float" office:value="0.001683493">
                <text:p>0.00168349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2.462554931641">
                <text:p>472.462554931641</text:p>
              </table:table-cell>
              <table:table-cell office:value-type="float" office:value="-0.01338053">
                <text:p>-0.0133805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2.577789306641">
                <text:p>472.577789306641</text:p>
              </table:table-cell>
              <table:table-cell office:value-type="float" office:value="-0.008889786">
                <text:p>-0.00888978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2.693023681641">
                <text:p>472.693023681641</text:p>
              </table:table-cell>
              <table:table-cell office:value-type="float" office:value="0.008310548">
                <text:p>0.00831054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2.808288574219">
                <text:p>472.808288574219</text:p>
              </table:table-cell>
              <table:table-cell office:value-type="float" office:value="-0.0008977543">
                <text:p>-0.000897754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2.923522949219">
                <text:p>472.923522949219</text:p>
              </table:table-cell>
              <table:table-cell office:value-type="float" office:value="-0.007505673">
                <text:p>-0.00750567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3.038787841797">
                <text:p>473.038787841797</text:p>
              </table:table-cell>
              <table:table-cell office:value-type="float" office:value="-0.01135152">
                <text:p>-0.0113515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73.154052734375">
                <text:p>473.154052734375</text:p>
              </table:table-cell>
              <table:table-cell office:value-type="float" office:value="0.01278735">
                <text:p>0.0127873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73.269317626953">
                <text:p>473.269317626953</text:p>
              </table:table-cell>
              <table:table-cell office:value-type="float" office:value="0.006392346">
                <text:p>0.00639234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3.384582519531">
                <text:p>473.384582519531</text:p>
              </table:table-cell>
              <table:table-cell office:value-type="float" office:value="-0.005640634">
                <text:p>-0.00564063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73.499847412109">
                <text:p>473.499847412109</text:p>
              </table:table-cell>
              <table:table-cell office:value-type="float" office:value="-0.002402652">
                <text:p>-0.00240265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3.615112304688">
                <text:p>473.615112304688</text:p>
              </table:table-cell>
              <table:table-cell office:value-type="float" office:value="0.0143944">
                <text:p>0.014394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3.730407714844">
                <text:p>473.730407714844</text:p>
              </table:table-cell>
              <table:table-cell office:value-type="float" office:value="0.02450683">
                <text:p>0.0245068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3.845703125">
                <text:p>473.845703125</text:p>
              </table:table-cell>
              <table:table-cell office:value-type="float" office:value="-0.00397072">
                <text:p>-0.0039707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3.960998535156">
                <text:p>473.960998535156</text:p>
              </table:table-cell>
              <table:table-cell office:value-type="float" office:value="0.00202523">
                <text:p>0.0020252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4.076263427734">
                <text:p>474.076263427734</text:p>
              </table:table-cell>
              <table:table-cell office:value-type="float" office:value="0.002774145">
                <text:p>0.00277414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4.191589355469">
                <text:p>474.191589355469</text:p>
              </table:table-cell>
              <table:table-cell office:value-type="float" office:value="0.01797236">
                <text:p>0.0179723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4.306884765625">
                <text:p>474.306884765625</text:p>
              </table:table-cell>
              <table:table-cell office:value-type="float" office:value="0.01966707">
                <text:p>0.0196670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4.422180175781">
                <text:p>474.422180175781</text:p>
              </table:table-cell>
              <table:table-cell office:value-type="float" office:value="-0.01247876">
                <text:p>-0.0124787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74.537506103516">
                <text:p>474.537506103516</text:p>
              </table:table-cell>
              <table:table-cell office:value-type="float" office:value="0.005231704">
                <text:p>0.00523170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4.652801513672">
                <text:p>474.652801513672</text:p>
              </table:table-cell>
              <table:table-cell office:value-type="float" office:value="-0.004784051">
                <text:p>-0.00478405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4.768127441406">
                <text:p>474.768127441406</text:p>
              </table:table-cell>
              <table:table-cell office:value-type="float" office:value="-0.008888728">
                <text:p>-0.00888872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4.883453369141">
                <text:p>474.883453369141</text:p>
              </table:table-cell>
              <table:table-cell office:value-type="float" office:value="-0.007851596">
                <text:p>-0.00785159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4.998779296875">
                <text:p>474.998779296875</text:p>
              </table:table-cell>
              <table:table-cell office:value-type="float" office:value="0.004513724">
                <text:p>0.00451372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5.114135742188">
                <text:p>475.114135742188</text:p>
              </table:table-cell>
              <table:table-cell office:value-type="float" office:value="-0.00624915">
                <text:p>-0.0062491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75.229461669922">
                <text:p>475.229461669922</text:p>
              </table:table-cell>
              <table:table-cell office:value-type="float" office:value="-0.00617173">
                <text:p>-0.0061717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.344818115234">
                <text:p>475.344818115234</text:p>
              </table:table-cell>
              <table:table-cell office:value-type="float" office:value="0.002037697">
                <text:p>0.00203769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5.460144042969">
                <text:p>475.460144042969</text:p>
              </table:table-cell>
              <table:table-cell office:value-type="float" office:value="0.008292192">
                <text:p>0.00829219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5.575500488281">
                <text:p>475.575500488281</text:p>
              </table:table-cell>
              <table:table-cell office:value-type="float" office:value="0.002170821">
                <text:p>0.00217082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5.690856933594">
                <text:p>475.690856933594</text:p>
              </table:table-cell>
              <table:table-cell office:value-type="float" office:value="-0.01074848">
                <text:p>-0.0107484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5.806213378906">
                <text:p>475.806213378906</text:p>
              </table:table-cell>
              <table:table-cell office:value-type="float" office:value="-0.01144532">
                <text:p>-0.0114453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5.921569824219">
                <text:p>475.921569824219</text:p>
              </table:table-cell>
              <table:table-cell office:value-type="float" office:value="0.001885023">
                <text:p>0.00188502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6.036956787109">
                <text:p>476.036956787109</text:p>
              </table:table-cell>
              <table:table-cell office:value-type="float" office:value="0.006632393">
                <text:p>0.00663239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6.152313232422">
                <text:p>476.152313232422</text:p>
              </table:table-cell>
              <table:table-cell office:value-type="float" office:value="0.006073717">
                <text:p>0.00607371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76.267700195313">
                <text:p>476.267700195313</text:p>
              </table:table-cell>
              <table:table-cell office:value-type="float" office:value="-0.0118519">
                <text:p>-0.011851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6.383087158203">
                <text:p>476.383087158203</text:p>
              </table:table-cell>
              <table:table-cell office:value-type="float" office:value="0.01369157">
                <text:p>0.0136915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6.498474121094">
                <text:p>476.498474121094</text:p>
              </table:table-cell>
              <table:table-cell office:value-type="float" office:value="0.0008071872">
                <text:p>0.000807187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6.613861083984">
                <text:p>476.613861083984</text:p>
              </table:table-cell>
              <table:table-cell office:value-type="float" office:value="-0.00838583">
                <text:p>-0.0083858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6.729248046875">
                <text:p>476.729248046875</text:p>
              </table:table-cell>
              <table:table-cell office:value-type="float" office:value="-0.006571181">
                <text:p>-0.00657118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6.844665527344">
                <text:p>476.844665527344</text:p>
              </table:table-cell>
              <table:table-cell office:value-type="float" office:value="0.01454142">
                <text:p>0.0145414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6.960052490234">
                <text:p>476.960052490234</text:p>
              </table:table-cell>
              <table:table-cell office:value-type="float" office:value="0.002034178">
                <text:p>0.00203417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77.075469970703">
                <text:p>477.075469970703</text:p>
              </table:table-cell>
              <table:table-cell office:value-type="float" office:value="-0.01274223">
                <text:p>-0.0127422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7.190887451172">
                <text:p>477.190887451172</text:p>
              </table:table-cell>
              <table:table-cell office:value-type="float" office:value="-0.008206444">
                <text:p>-0.00820644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7.306304931641">
                <text:p>477.306304931641</text:p>
              </table:table-cell>
              <table:table-cell office:value-type="float" office:value="0.01494964">
                <text:p>0.0149496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7.421722412109">
                <text:p>477.421722412109</text:p>
              </table:table-cell>
              <table:table-cell office:value-type="float" office:value="-0.007465377">
                <text:p>-0.00746537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7.537139892578">
                <text:p>477.537139892578</text:p>
              </table:table-cell>
              <table:table-cell office:value-type="float" office:value="-0.004994184">
                <text:p>-0.00499418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7.652557373047">
                <text:p>477.652557373047</text:p>
              </table:table-cell>
              <table:table-cell office:value-type="float" office:value="-0.01291061">
                <text:p>-0.0129106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7.768005371094">
                <text:p>477.768005371094</text:p>
              </table:table-cell>
              <table:table-cell office:value-type="float" office:value="-0.005165294">
                <text:p>-0.00516529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7.883422851563">
                <text:p>477.883422851563</text:p>
              </table:table-cell>
              <table:table-cell office:value-type="float" office:value="0.01079703">
                <text:p>0.0107970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7.998870849609">
                <text:p>477.998870849609</text:p>
              </table:table-cell>
              <table:table-cell office:value-type="float" office:value="-0.01372255">
                <text:p>-0.0137225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8.114318847656">
                <text:p>478.114318847656</text:p>
              </table:table-cell>
              <table:table-cell office:value-type="float" office:value="-0.006040017">
                <text:p>-0.00604001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8.229766845703">
                <text:p>478.229766845703</text:p>
              </table:table-cell>
              <table:table-cell office:value-type="float" office:value="0.003646149">
                <text:p>0.00364614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8.345245361328">
                <text:p>478.345245361328</text:p>
              </table:table-cell>
              <table:table-cell office:value-type="float" office:value="0.0006001825">
                <text:p>0.000600182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8.460693359375">
                <text:p>478.460693359375</text:p>
              </table:table-cell>
              <table:table-cell office:value-type="float" office:value="-0.01188495">
                <text:p>-0.0118849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8.576141357422">
                <text:p>478.576141357422</text:p>
              </table:table-cell>
              <table:table-cell office:value-type="float" office:value="-0.005651701">
                <text:p>-0.00565170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8.691619873047">
                <text:p>478.691619873047</text:p>
              </table:table-cell>
              <table:table-cell office:value-type="float" office:value="0.01080431">
                <text:p>0.0108043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8.807098388672">
                <text:p>478.807098388672</text:p>
              </table:table-cell>
              <table:table-cell office:value-type="float" office:value="-0.002013804">
                <text:p>-0.00201380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8.922576904297">
                <text:p>478.922576904297</text:p>
              </table:table-cell>
              <table:table-cell office:value-type="float" office:value="-0.004491114">
                <text:p>-0.00449111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9.038055419922">
                <text:p>479.038055419922</text:p>
              </table:table-cell>
              <table:table-cell office:value-type="float" office:value="-0.01192815">
                <text:p>-0.0119281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9.153533935547">
                <text:p>479.153533935547</text:p>
              </table:table-cell>
              <table:table-cell office:value-type="float" office:value="-0.002234171">
                <text:p>-0.00223417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9.269012451172">
                <text:p>479.269012451172</text:p>
              </table:table-cell>
              <table:table-cell office:value-type="float" office:value="0.01855696">
                <text:p>0.0185569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9.384521484375">
                <text:p>479.384521484375</text:p>
              </table:table-cell>
              <table:table-cell office:value-type="float" office:value="-0.008456572">
                <text:p>-0.00845657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9.500030517578">
                <text:p>479.500030517578</text:p>
              </table:table-cell>
              <table:table-cell office:value-type="float" office:value="-0.005983317">
                <text:p>-0.00598331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9.615509033203">
                <text:p>479.615509033203</text:p>
              </table:table-cell>
              <table:table-cell office:value-type="float" office:value="0.002297605">
                <text:p>0.00229760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9.731018066406">
                <text:p>479.731018066406</text:p>
              </table:table-cell>
              <table:table-cell office:value-type="float" office:value="0.002247605">
                <text:p>0.00224760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9.846527099609">
                <text:p>479.846527099609</text:p>
              </table:table-cell>
              <table:table-cell office:value-type="float" office:value="-0.006686769">
                <text:p>-0.00668676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9.962066650391">
                <text:p>479.962066650391</text:p>
              </table:table-cell>
              <table:table-cell office:value-type="float" office:value="-0.004500518">
                <text:p>-0.00450051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80.077575683594">
                <text:p>480.077575683594</text:p>
              </table:table-cell>
              <table:table-cell office:value-type="float" office:value="0.003102444">
                <text:p>0.00310244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80.193084716797">
                <text:p>480.193084716797</text:p>
              </table:table-cell>
              <table:table-cell office:value-type="float" office:value="0.01278913">
                <text:p>0.0127891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80.308624267578">
                <text:p>480.308624267578</text:p>
              </table:table-cell>
              <table:table-cell office:value-type="float" office:value="-0.005974129">
                <text:p>-0.00597412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80.424163818359">
                <text:p>480.424163818359</text:p>
              </table:table-cell>
              <table:table-cell office:value-type="float" office:value="-0.005341843">
                <text:p>-0.00534184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0.539703369141">
                <text:p>480.539703369141</text:p>
              </table:table-cell>
              <table:table-cell office:value-type="float" office:value="0.006563678">
                <text:p>0.00656367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80.655242919922">
                <text:p>480.655242919922</text:p>
              </table:table-cell>
              <table:table-cell office:value-type="float" office:value="-0.003719901">
                <text:p>-0.00371990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80.770782470703">
                <text:p>480.770782470703</text:p>
              </table:table-cell>
              <table:table-cell office:value-type="float" office:value="-0.009215103">
                <text:p>-0.00921510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0.886322021484">
                <text:p>480.886322021484</text:p>
              </table:table-cell>
              <table:table-cell office:value-type="float" office:value="-0.006304163">
                <text:p>-0.00630416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1.001892089844">
                <text:p>481.001892089844</text:p>
              </table:table-cell>
              <table:table-cell office:value-type="float" office:value="0.001244906">
                <text:p>0.00124490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81.117431640625">
                <text:p>481.117431640625</text:p>
              </table:table-cell>
              <table:table-cell office:value-type="float" office:value="0.003740138">
                <text:p>0.00374013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81.233001708984">
                <text:p>481.233001708984</text:p>
              </table:table-cell>
              <table:table-cell office:value-type="float" office:value="0.002454274">
                <text:p>0.00245427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81.348571777344">
                <text:p>481.348571777344</text:p>
              </table:table-cell>
              <table:table-cell office:value-type="float" office:value="-0.01095046">
                <text:p>-0.0109504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81.464141845703">
                <text:p>481.464141845703</text:p>
              </table:table-cell>
              <table:table-cell office:value-type="float" office:value="-0.004125202">
                <text:p>-0.00412520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1.579711914063">
                <text:p>481.579711914063</text:p>
              </table:table-cell>
              <table:table-cell office:value-type="float" office:value="0.003609092">
                <text:p>0.00360909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1.695281982422">
                <text:p>481.695281982422</text:p>
              </table:table-cell>
              <table:table-cell office:value-type="float" office:value="-0.01002705">
                <text:p>-0.0100270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81.810882568359">
                <text:p>481.810882568359</text:p>
              </table:table-cell>
              <table:table-cell office:value-type="float" office:value="-0.005220038">
                <text:p>-0.00522003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81.926452636719">
                <text:p>481.926452636719</text:p>
              </table:table-cell>
              <table:table-cell office:value-type="float" office:value="-0.002643853">
                <text:p>-0.00264385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82.042053222656">
                <text:p>482.042053222656</text:p>
              </table:table-cell>
              <table:table-cell office:value-type="float" office:value="0.01432529">
                <text:p>0.0143252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2.157653808594">
                <text:p>482.157653808594</text:p>
              </table:table-cell>
              <table:table-cell office:value-type="float" office:value="-0.008557987">
                <text:p>-0.00855798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82.273254394531">
                <text:p>482.273254394531</text:p>
              </table:table-cell>
              <table:table-cell office:value-type="float" office:value="-0.004087843">
                <text:p>-0.00408784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82.388854980469">
                <text:p>482.388854980469</text:p>
              </table:table-cell>
              <table:table-cell office:value-type="float" office:value="0.01136475">
                <text:p>0.0113647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82.504455566406">
                <text:p>482.504455566406</text:p>
              </table:table-cell>
              <table:table-cell office:value-type="float" office:value="0.01590153">
                <text:p>0.0159015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2.620086669922">
                <text:p>482.620086669922</text:p>
              </table:table-cell>
              <table:table-cell office:value-type="float" office:value="-0.007770496">
                <text:p>-0.00777049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2.735687255859">
                <text:p>482.735687255859</text:p>
              </table:table-cell>
              <table:table-cell office:value-type="float" office:value="0.001719333">
                <text:p>0.00171933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2.851318359375">
                <text:p>482.851318359375</text:p>
              </table:table-cell>
              <table:table-cell office:value-type="float" office:value="-0.005284817">
                <text:p>-0.00528481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2.966949462891">
                <text:p>482.966949462891</text:p>
              </table:table-cell>
              <table:table-cell office:value-type="float" office:value="0.006874052">
                <text:p>0.00687405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3.082580566406">
                <text:p>483.082580566406</text:p>
              </table:table-cell>
              <table:table-cell office:value-type="float" office:value="-0.0147999">
                <text:p>-0.014799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3.198211669922">
                <text:p>483.198211669922</text:p>
              </table:table-cell>
              <table:table-cell office:value-type="float" office:value="-0.0006039437">
                <text:p>-0.000603943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3.313842773438">
                <text:p>483.313842773438</text:p>
              </table:table-cell>
              <table:table-cell office:value-type="float" office:value="0.004049937">
                <text:p>0.00404993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3.429473876953">
                <text:p>483.429473876953</text:p>
              </table:table-cell>
              <table:table-cell office:value-type="float" office:value="0.009735615">
                <text:p>0.00973561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3.545135498047">
                <text:p>483.545135498047</text:p>
              </table:table-cell>
              <table:table-cell office:value-type="float" office:value="-0.00199272">
                <text:p>-0.0019927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3.660797119141">
                <text:p>483.660797119141</text:p>
              </table:table-cell>
              <table:table-cell office:value-type="float" office:value="-0.007856593">
                <text:p>-0.00785659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3.776428222656">
                <text:p>483.776428222656</text:p>
              </table:table-cell>
              <table:table-cell office:value-type="float" office:value="0.002251429">
                <text:p>0.00225142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3.89208984375">
                <text:p>483.89208984375</text:p>
              </table:table-cell>
              <table:table-cell office:value-type="float" office:value="0.01602441">
                <text:p>0.0160244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4.007751464844">
                <text:p>484.007751464844</text:p>
              </table:table-cell>
              <table:table-cell office:value-type="float" office:value="-0.01101474">
                <text:p>-0.0110147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4.123413085938">
                <text:p>484.123413085938</text:p>
              </table:table-cell>
              <table:table-cell office:value-type="float" office:value="-0.01456324">
                <text:p>-0.0145632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4.239105224609">
                <text:p>484.239105224609</text:p>
              </table:table-cell>
              <table:table-cell office:value-type="float" office:value="0.007798387">
                <text:p>0.00779838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4.354766845703">
                <text:p>484.354766845703</text:p>
              </table:table-cell>
              <table:table-cell office:value-type="float" office:value="-0.0009119601">
                <text:p>-0.000911960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4.470458984375">
                <text:p>484.470458984375</text:p>
              </table:table-cell>
              <table:table-cell office:value-type="float" office:value="-0.003884554">
                <text:p>-0.00388455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4.586151123047">
                <text:p>484.586151123047</text:p>
              </table:table-cell>
              <table:table-cell office:value-type="float" office:value="-0.01081141">
                <text:p>-0.0108114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4.701843261719">
                <text:p>484.701843261719</text:p>
              </table:table-cell>
              <table:table-cell office:value-type="float" office:value="-0.002253464">
                <text:p>-0.00225346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4.817535400391">
                <text:p>484.817535400391</text:p>
              </table:table-cell>
              <table:table-cell office:value-type="float" office:value="0.003633368">
                <text:p>0.00363336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4.933227539063">
                <text:p>484.933227539063</text:p>
              </table:table-cell>
              <table:table-cell office:value-type="float" office:value="-0.01207927">
                <text:p>-0.0120792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5.048919677734">
                <text:p>485.048919677734</text:p>
              </table:table-cell>
              <table:table-cell office:value-type="float" office:value="-0.006053942">
                <text:p>-0.00605394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5.164642333984">
                <text:p>485.164642333984</text:p>
              </table:table-cell>
              <table:table-cell office:value-type="float" office:value="0.01204849">
                <text:p>0.0120484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5.280334472656">
                <text:p>485.280334472656</text:p>
              </table:table-cell>
              <table:table-cell office:value-type="float" office:value="0.001595591">
                <text:p>0.00159559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5.396057128906">
                <text:p>485.396057128906</text:p>
              </table:table-cell>
              <table:table-cell office:value-type="float" office:value="0.005821015">
                <text:p>0.00582101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5.511779785156">
                <text:p>485.511779785156</text:p>
              </table:table-cell>
              <table:table-cell office:value-type="float" office:value="-0.007735755">
                <text:p>-0.00773575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5.627502441406">
                <text:p>485.627502441406</text:p>
              </table:table-cell>
              <table:table-cell office:value-type="float" office:value="-0.001564925">
                <text:p>-0.00156492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5.743225097656">
                <text:p>485.743225097656</text:p>
              </table:table-cell>
              <table:table-cell office:value-type="float" office:value="0.02149228">
                <text:p>0.0214922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5.858947753906">
                <text:p>485.858947753906</text:p>
              </table:table-cell>
              <table:table-cell office:value-type="float" office:value="-0.01066712">
                <text:p>-0.0106671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5.974670410156">
                <text:p>485.974670410156</text:p>
              </table:table-cell>
              <table:table-cell office:value-type="float" office:value="-0.007835157">
                <text:p>-0.00783515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6.090423583984">
                <text:p>486.090423583984</text:p>
              </table:table-cell>
              <table:table-cell office:value-type="float" office:value="0.01995829">
                <text:p>0.0199582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6.206176757813">
                <text:p>486.206176757813</text:p>
              </table:table-cell>
              <table:table-cell office:value-type="float" office:value="0.001316748">
                <text:p>0.00131674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6.321899414063">
                <text:p>486.321899414063</text:p>
              </table:table-cell>
              <table:table-cell office:value-type="float" office:value="-0.002910825">
                <text:p>-0.00291082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86.437652587891">
                <text:p>486.437652587891</text:p>
              </table:table-cell>
              <table:table-cell office:value-type="float" office:value="-0.00191209">
                <text:p>-0.0019120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86.553436279297">
                <text:p>486.553436279297</text:p>
              </table:table-cell>
              <table:table-cell office:value-type="float" office:value="0.004953602">
                <text:p>0.00495360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6.669189453125">
                <text:p>486.669189453125</text:p>
              </table:table-cell>
              <table:table-cell office:value-type="float" office:value="0.00202846">
                <text:p>0.0020284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6.784942626953">
                <text:p>486.784942626953</text:p>
              </table:table-cell>
              <table:table-cell office:value-type="float" office:value="0.0006924928">
                <text:p>0.000692492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6.900726318359">
                <text:p>486.900726318359</text:p>
              </table:table-cell>
              <table:table-cell office:value-type="float" office:value="-0.005287666">
                <text:p>-0.00528766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7.016479492188">
                <text:p>487.016479492188</text:p>
              </table:table-cell>
              <table:table-cell office:value-type="float" office:value="0.00886299">
                <text:p>0.0088629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7.132263183594">
                <text:p>487.132263183594</text:p>
              </table:table-cell>
              <table:table-cell office:value-type="float" office:value="-0.003231006">
                <text:p>-0.00323100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7.248046875">
                <text:p>487.248046875</text:p>
              </table:table-cell>
              <table:table-cell office:value-type="float" office:value="0.009541547">
                <text:p>0.00954154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7.363830566406">
                <text:p>487.363830566406</text:p>
              </table:table-cell>
              <table:table-cell office:value-type="float" office:value="0.0007350463">
                <text:p>0.000735046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7.479614257813">
                <text:p>487.479614257813</text:p>
              </table:table-cell>
              <table:table-cell office:value-type="float" office:value="0.006620809">
                <text:p>0.00662080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7.595397949219">
                <text:p>487.595397949219</text:p>
              </table:table-cell>
              <table:table-cell office:value-type="float" office:value="0.00644041">
                <text:p>0.0064404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7.711212158203">
                <text:p>487.711212158203</text:p>
              </table:table-cell>
              <table:table-cell office:value-type="float" office:value="0.005905974">
                <text:p>0.00590597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7.826995849609">
                <text:p>487.826995849609</text:p>
              </table:table-cell>
              <table:table-cell office:value-type="float" office:value="-0.009509174">
                <text:p>-0.00950917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7.942810058594">
                <text:p>487.942810058594</text:p>
              </table:table-cell>
              <table:table-cell office:value-type="float" office:value="0.005269387">
                <text:p>0.00526938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8.058624267578">
                <text:p>488.058624267578</text:p>
              </table:table-cell>
              <table:table-cell office:value-type="float" office:value="0.01633631">
                <text:p>0.0163363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8.174438476563">
                <text:p>488.174438476563</text:p>
              </table:table-cell>
              <table:table-cell office:value-type="float" office:value="-0.005124574">
                <text:p>-0.00512457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8.290252685547">
                <text:p>488.290252685547</text:p>
              </table:table-cell>
              <table:table-cell office:value-type="float" office:value="-0.01126307">
                <text:p>-0.0112630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8.406066894531">
                <text:p>488.406066894531</text:p>
              </table:table-cell>
              <table:table-cell office:value-type="float" office:value="0.005670672">
                <text:p>0.00567067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8.521911621094">
                <text:p>488.521911621094</text:p>
              </table:table-cell>
              <table:table-cell office:value-type="float" office:value="-0.0008890626">
                <text:p>-0.000889062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.637725830078">
                <text:p>488.637725830078</text:p>
              </table:table-cell>
              <table:table-cell office:value-type="float" office:value="-0.01318607">
                <text:p>-0.0131860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.753570556641">
                <text:p>488.753570556641</text:p>
              </table:table-cell>
              <table:table-cell office:value-type="float" office:value="-0.01210616">
                <text:p>-0.0121061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8.869415283203">
                <text:p>488.869415283203</text:p>
              </table:table-cell>
              <table:table-cell office:value-type="float" office:value="0.007051815">
                <text:p>0.00705181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8.985260009766">
                <text:p>488.985260009766</text:p>
              </table:table-cell>
              <table:table-cell office:value-type="float" office:value="-0.002186463">
                <text:p>-0.00218646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89.101104736328">
                <text:p>489.101104736328</text:p>
              </table:table-cell>
              <table:table-cell office:value-type="float" office:value="-0.001788478">
                <text:p>-0.00178847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89.216949462891">
                <text:p>489.216949462891</text:p>
              </table:table-cell>
              <table:table-cell office:value-type="float" office:value="-0.008335183">
                <text:p>-0.00833518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89.332794189453">
                <text:p>489.332794189453</text:p>
              </table:table-cell>
              <table:table-cell office:value-type="float" office:value="0.004375943">
                <text:p>0.00437594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89.448669433594">
                <text:p>489.448669433594</text:p>
              </table:table-cell>
              <table:table-cell office:value-type="float" office:value="0.00387308">
                <text:p>0.0038730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89.564544677734">
                <text:p>489.564544677734</text:p>
              </table:table-cell>
              <table:table-cell office:value-type="float" office:value="-0.01410884">
                <text:p>-0.0141088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89.680389404297">
                <text:p>489.680389404297</text:p>
              </table:table-cell>
              <table:table-cell office:value-type="float" office:value="-0.006013635">
                <text:p>-0.00601363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89.796264648438">
                <text:p>489.796264648438</text:p>
              </table:table-cell>
              <table:table-cell office:value-type="float" office:value="0.005832433">
                <text:p>0.00583243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9.912139892578">
                <text:p>489.912139892578</text:p>
              </table:table-cell>
              <table:table-cell office:value-type="float" office:value="0.001227672">
                <text:p>0.00122767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0.028015136719">
                <text:p>490.028015136719</text:p>
              </table:table-cell>
              <table:table-cell office:value-type="float" office:value="-0.01127133">
                <text:p>-0.0112713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0.143920898438">
                <text:p>490.143920898438</text:p>
              </table:table-cell>
              <table:table-cell office:value-type="float" office:value="0.01216192">
                <text:p>0.0121619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0.259796142578">
                <text:p>490.259796142578</text:p>
              </table:table-cell>
              <table:table-cell office:value-type="float" office:value="0.006001584">
                <text:p>0.00600158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0.375701904297">
                <text:p>490.375701904297</text:p>
              </table:table-cell>
              <table:table-cell office:value-type="float" office:value="-0.01187036">
                <text:p>-0.0118703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0.491577148438">
                <text:p>490.491577148438</text:p>
              </table:table-cell>
              <table:table-cell office:value-type="float" office:value="-0.001627528">
                <text:p>-0.00162752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0.607482910156">
                <text:p>490.607482910156</text:p>
              </table:table-cell>
              <table:table-cell office:value-type="float" office:value="-0.004444521">
                <text:p>-0.00444452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0.723388671875">
                <text:p>490.723388671875</text:p>
              </table:table-cell>
              <table:table-cell office:value-type="float" office:value="0.008958383">
                <text:p>0.00895838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0.839294433594">
                <text:p>490.839294433594</text:p>
              </table:table-cell>
              <table:table-cell office:value-type="float" office:value="-0.0001083654">
                <text:p>-0.000108365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0.955200195313">
                <text:p>490.955200195313</text:p>
              </table:table-cell>
              <table:table-cell office:value-type="float" office:value="-0.003630918">
                <text:p>-0.00363091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1.071136474609">
                <text:p>491.071136474609</text:p>
              </table:table-cell>
              <table:table-cell office:value-type="float" office:value="0.0009231861">
                <text:p>0.000923186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.187042236328">
                <text:p>491.187042236328</text:p>
              </table:table-cell>
              <table:table-cell office:value-type="float" office:value="0.01020026">
                <text:p>0.0102002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.302978515625">
                <text:p>491.302978515625</text:p>
              </table:table-cell>
              <table:table-cell office:value-type="float" office:value="-0.004325714">
                <text:p>-0.00432571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1.418914794922">
                <text:p>491.418914794922</text:p>
              </table:table-cell>
              <table:table-cell office:value-type="float" office:value="-0.01037865">
                <text:p>-0.0103786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1.534851074219">
                <text:p>491.534851074219</text:p>
              </table:table-cell>
              <table:table-cell office:value-type="float" office:value="0.008312228">
                <text:p>0.00831222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1.650787353516">
                <text:p>491.650787353516</text:p>
              </table:table-cell>
              <table:table-cell office:value-type="float" office:value="0.000313783">
                <text:p>0.00031378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1.766723632813">
                <text:p>491.766723632813</text:p>
              </table:table-cell>
              <table:table-cell office:value-type="float" office:value="-0.004894353">
                <text:p>-0.00489435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1.882659912109">
                <text:p>491.882659912109</text:p>
              </table:table-cell>
              <table:table-cell office:value-type="float" office:value="-0.01112561">
                <text:p>-0.0111256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1.998596191406">
                <text:p>491.998596191406</text:p>
              </table:table-cell>
              <table:table-cell office:value-type="float" office:value="0.005020414">
                <text:p>0.00502041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2.114562988281">
                <text:p>492.114562988281</text:p>
              </table:table-cell>
              <table:table-cell office:value-type="float" office:value="0.003934422">
                <text:p>0.00393442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2.230529785156">
                <text:p>492.230529785156</text:p>
              </table:table-cell>
              <table:table-cell office:value-type="float" office:value="-0.01042905">
                <text:p>-0.0104290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2.346496582031">
                <text:p>492.346496582031</text:p>
              </table:table-cell>
              <table:table-cell office:value-type="float" office:value="0.001681908">
                <text:p>0.00168190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462463378906">
                <text:p>492.462463378906</text:p>
              </table:table-cell>
              <table:table-cell office:value-type="float" office:value="0.001465994">
                <text:p>0.00146599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2.578430175781">
                <text:p>492.578430175781</text:p>
              </table:table-cell>
              <table:table-cell office:value-type="float" office:value="0.002612611">
                <text:p>0.00261261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2.694396972656">
                <text:p>492.694396972656</text:p>
              </table:table-cell>
              <table:table-cell office:value-type="float" office:value="-0.005766142">
                <text:p>-0.0057661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2.810363769531">
                <text:p>492.810363769531</text:p>
              </table:table-cell>
              <table:table-cell office:value-type="float" office:value="-0.008218537">
                <text:p>-0.00821853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2.926361083984">
                <text:p>492.926361083984</text:p>
              </table:table-cell>
              <table:table-cell office:value-type="float" office:value="0.009869503">
                <text:p>0.00986950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3.042327880859">
                <text:p>493.042327880859</text:p>
              </table:table-cell>
              <table:table-cell office:value-type="float" office:value="-0.003715644">
                <text:p>-0.00371564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3.158325195313">
                <text:p>493.158325195313</text:p>
              </table:table-cell>
              <table:table-cell office:value-type="float" office:value="-0.00846837">
                <text:p>-0.0084683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3.274322509766">
                <text:p>493.274322509766</text:p>
              </table:table-cell>
              <table:table-cell office:value-type="float" office:value="-0.0007123831">
                <text:p>-0.000712383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3.390319824219">
                <text:p>493.390319824219</text:p>
              </table:table-cell>
              <table:table-cell office:value-type="float" office:value="0.01060933">
                <text:p>0.0106093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3.506317138672">
                <text:p>493.506317138672</text:p>
              </table:table-cell>
              <table:table-cell office:value-type="float" office:value="0.003519066">
                <text:p>0.00351906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3.622344970703">
                <text:p>493.622344970703</text:p>
              </table:table-cell>
              <table:table-cell office:value-type="float" office:value="0.0005186337">
                <text:p>0.000518633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3.738342285156">
                <text:p>493.738342285156</text:p>
              </table:table-cell>
              <table:table-cell office:value-type="float" office:value="-0.01096037">
                <text:p>-0.0109603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93.854370117188">
                <text:p>493.854370117188</text:p>
              </table:table-cell>
              <table:table-cell office:value-type="float" office:value="-0.004291357">
                <text:p>-0.00429135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93.970367431641">
                <text:p>493.970367431641</text:p>
              </table:table-cell>
              <table:table-cell office:value-type="float" office:value="0.005104855">
                <text:p>0.00510485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94.086395263672">
                <text:p>494.086395263672</text:p>
              </table:table-cell>
              <table:table-cell office:value-type="float" office:value="0.000946931">
                <text:p>0.00094693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4.202423095703">
                <text:p>494.202423095703</text:p>
              </table:table-cell>
              <table:table-cell office:value-type="float" office:value="-0.002152027">
                <text:p>-0.00215202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94.318450927734">
                <text:p>494.318450927734</text:p>
              </table:table-cell>
              <table:table-cell office:value-type="float" office:value="-0.002733281">
                <text:p>-0.00273328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4.434478759766">
                <text:p>494.434478759766</text:p>
              </table:table-cell>
              <table:table-cell office:value-type="float" office:value="-0.0007727774">
                <text:p>-0.000772777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94.550537109375">
                <text:p>494.550537109375</text:p>
              </table:table-cell>
              <table:table-cell office:value-type="float" office:value="-0.0062843">
                <text:p>-0.006284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94.666564941406">
                <text:p>494.666564941406</text:p>
              </table:table-cell>
              <table:table-cell office:value-type="float" office:value="-0.005685373">
                <text:p>-0.00568537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94.782623291016">
                <text:p>494.782623291016</text:p>
              </table:table-cell>
              <table:table-cell office:value-type="float" office:value="-0.001406927">
                <text:p>-0.00140692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94.898681640625">
                <text:p>494.898681640625</text:p>
              </table:table-cell>
              <table:table-cell office:value-type="float" office:value="0.005590427">
                <text:p>0.00559042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95.014739990234">
                <text:p>495.014739990234</text:p>
              </table:table-cell>
              <table:table-cell office:value-type="float" office:value="-0.01164125">
                <text:p>-0.0116412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95.130798339844">
                <text:p>495.130798339844</text:p>
              </table:table-cell>
              <table:table-cell office:value-type="float" office:value="-0.01077587">
                <text:p>-0.0107758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95.246856689453">
                <text:p>495.246856689453</text:p>
              </table:table-cell>
              <table:table-cell office:value-type="float" office:value="0.004131497">
                <text:p>0.00413149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95.362915039063">
                <text:p>495.362915039063</text:p>
              </table:table-cell>
              <table:table-cell office:value-type="float" office:value="0.007399699">
                <text:p>0.00739969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95.478973388672">
                <text:p>495.478973388672</text:p>
              </table:table-cell>
              <table:table-cell office:value-type="float" office:value="-0.01195874">
                <text:p>-0.0119587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95.595062255859">
                <text:p>495.595062255859</text:p>
              </table:table-cell>
              <table:table-cell office:value-type="float" office:value="0.003993055">
                <text:p>0.00399305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95.711151123047">
                <text:p>495.711151123047</text:p>
              </table:table-cell>
              <table:table-cell office:value-type="float" office:value="-0.003365073">
                <text:p>-0.00336507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5.827209472656">
                <text:p>495.827209472656</text:p>
              </table:table-cell>
              <table:table-cell office:value-type="float" office:value="0.02479688">
                <text:p>0.0247968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95.943298339844">
                <text:p>495.943298339844</text:p>
              </table:table-cell>
              <table:table-cell office:value-type="float" office:value="-0.001411978">
                <text:p>-0.00141197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96.059387207031">
                <text:p>496.059387207031</text:p>
              </table:table-cell>
              <table:table-cell office:value-type="float" office:value="0.008920812">
                <text:p>0.00892081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96.175506591797">
                <text:p>496.175506591797</text:p>
              </table:table-cell>
              <table:table-cell office:value-type="float" office:value="-0.003519577">
                <text:p>-0.00351957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96.291595458984">
                <text:p>496.291595458984</text:p>
              </table:table-cell>
              <table:table-cell office:value-type="float" office:value="-0.005680225">
                <text:p>-0.00568022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96.407684326172">
                <text:p>496.407684326172</text:p>
              </table:table-cell>
              <table:table-cell office:value-type="float" office:value="0.0108357">
                <text:p>0.010835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96.523803710938">
                <text:p>496.523803710938</text:p>
              </table:table-cell>
              <table:table-cell office:value-type="float" office:value="-0.009240724">
                <text:p>-0.00924072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96.639923095703">
                <text:p>496.639923095703</text:p>
              </table:table-cell>
              <table:table-cell office:value-type="float" office:value="0.008355985">
                <text:p>0.00835598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6.756042480469">
                <text:p>496.756042480469</text:p>
              </table:table-cell>
              <table:table-cell office:value-type="float" office:value="0.005176373">
                <text:p>0.00517637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96.872161865234">
                <text:p>496.872161865234</text:p>
              </table:table-cell>
              <table:table-cell office:value-type="float" office:value="-0.004085396">
                <text:p>-0.00408539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96.98828125">
                <text:p>496.98828125</text:p>
              </table:table-cell>
              <table:table-cell office:value-type="float" office:value="0.002933208">
                <text:p>0.00293320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97.104400634766">
                <text:p>497.104400634766</text:p>
              </table:table-cell>
              <table:table-cell office:value-type="float" office:value="0.01974485">
                <text:p>0.0197448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97.220520019531">
                <text:p>497.220520019531</text:p>
              </table:table-cell>
              <table:table-cell office:value-type="float" office:value="0.003539562">
                <text:p>0.00353956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97.336669921875">
                <text:p>497.336669921875</text:p>
              </table:table-cell>
              <table:table-cell office:value-type="float" office:value="-0.003056231">
                <text:p>-0.00305623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7.452819824219">
                <text:p>497.452819824219</text:p>
              </table:table-cell>
              <table:table-cell office:value-type="float" office:value="-0.009062743">
                <text:p>-0.00906274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97.568939208984">
                <text:p>497.568939208984</text:p>
              </table:table-cell>
              <table:table-cell office:value-type="float" office:value="0.005201141">
                <text:p>0.00520114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7.685089111328">
                <text:p>497.685089111328</text:p>
              </table:table-cell>
              <table:table-cell office:value-type="float" office:value="0.005781129">
                <text:p>0.00578112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7.801239013672">
                <text:p>497.801239013672</text:p>
              </table:table-cell>
              <table:table-cell office:value-type="float" office:value="0.000386175">
                <text:p>0.00038617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7.917388916016">
                <text:p>497.917388916016</text:p>
              </table:table-cell>
              <table:table-cell office:value-type="float" office:value="-0.01045559">
                <text:p>-0.0104555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8.033569335938">
                <text:p>498.033569335938</text:p>
              </table:table-cell>
              <table:table-cell office:value-type="float" office:value="0.005646711">
                <text:p>0.00564671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8.149719238281">
                <text:p>498.149719238281</text:p>
              </table:table-cell>
              <table:table-cell office:value-type="float" office:value="0.0164303">
                <text:p>0.016430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98.265899658203">
                <text:p>498.265899658203</text:p>
              </table:table-cell>
              <table:table-cell office:value-type="float" office:value="-0.00432714">
                <text:p>-0.0043271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98.382049560547">
                <text:p>498.382049560547</text:p>
              </table:table-cell>
              <table:table-cell office:value-type="float" office:value="-0.001843891">
                <text:p>-0.00184389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98.498229980469">
                <text:p>498.498229980469</text:p>
              </table:table-cell>
              <table:table-cell office:value-type="float" office:value="0.01398079">
                <text:p>0.0139807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98.614410400391">
                <text:p>498.614410400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98.730590820313">
                <text:p>498.730590820313</text:p>
              </table:table-cell>
              <table:table-cell office:value-type="float" office:value="0.002862443">
                <text:p>0.00286244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98.846771240234">
                <text:p>498.846771240234</text:p>
              </table:table-cell>
              <table:table-cell office:value-type="float" office:value="-0.01219437">
                <text:p>-0.0121943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98.962982177734">
                <text:p>498.962982177734</text:p>
              </table:table-cell>
              <table:table-cell office:value-type="float" office:value="0.003682673">
                <text:p>0.00368267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99.079162597656">
                <text:p>499.079162597656</text:p>
              </table:table-cell>
              <table:table-cell office:value-type="float" office:value="0.02588698">
                <text:p>0.0258869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99.195373535156">
                <text:p>499.195373535156</text:p>
              </table:table-cell>
              <table:table-cell office:value-type="float" office:value="-0.006754959">
                <text:p>-0.00675495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99.311584472656">
                <text:p>499.311584472656</text:p>
              </table:table-cell>
              <table:table-cell office:value-type="float" office:value="-0.006413232">
                <text:p>-0.00641323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9.427764892578">
                <text:p>499.427764892578</text:p>
              </table:table-cell>
              <table:table-cell office:value-type="float" office:value="0.008040852">
                <text:p>0.00804085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9.543975830078">
                <text:p>499.543975830078</text:p>
              </table:table-cell>
              <table:table-cell office:value-type="float" office:value="-0.00155952">
                <text:p>-0.0015595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9.660217285156">
                <text:p>499.660217285156</text:p>
              </table:table-cell>
              <table:table-cell office:value-type="float" office:value="-0.006813366">
                <text:p>-0.00681336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9.776428222656">
                <text:p>499.776428222656</text:p>
              </table:table-cell>
              <table:table-cell office:value-type="float" office:value="-0.01307622">
                <text:p>-0.0130762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9.892639160156">
                <text:p>499.892639160156</text:p>
              </table:table-cell>
              <table:table-cell office:value-type="float" office:value="0.0007774198">
                <text:p>0.000777419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0.008880615234">
                <text:p>500.008880615234</text:p>
              </table:table-cell>
              <table:table-cell office:value-type="float" office:value="0.02468361">
                <text:p>0.0246836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0.125091552734">
                <text:p>500.125091552734</text:p>
              </table:table-cell>
              <table:table-cell office:value-type="float" office:value="-0.003786045">
                <text:p>-0.00378604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00.241333007813">
                <text:p>500.241333007813</text:p>
              </table:table-cell>
              <table:table-cell office:value-type="float" office:value="0.001613445">
                <text:p>0.00161344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0.357574462891">
                <text:p>500.357574462891</text:p>
              </table:table-cell>
              <table:table-cell office:value-type="float" office:value="0.002262797">
                <text:p>0.00226279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00.473815917969">
                <text:p>500.473815917969</text:p>
              </table:table-cell>
              <table:table-cell office:value-type="float" office:value="0.001665016">
                <text:p>0.00166501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00.590057373047">
                <text:p>500.590057373047</text:p>
              </table:table-cell>
              <table:table-cell office:value-type="float" office:value="-0.009090562">
                <text:p>-0.00909056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0.706298828125">
                <text:p>500.706298828125</text:p>
              </table:table-cell>
              <table:table-cell office:value-type="float" office:value="-0.009524034">
                <text:p>-0.00952403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0.822570800781">
                <text:p>500.822570800781</text:p>
              </table:table-cell>
              <table:table-cell office:value-type="float" office:value="0.0007581829">
                <text:p>0.000758182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0.938812255859">
                <text:p>500.938812255859</text:p>
              </table:table-cell>
              <table:table-cell office:value-type="float" office:value="0.003621838">
                <text:p>0.00362183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1.055084228516">
                <text:p>501.055084228516</text:p>
              </table:table-cell>
              <table:table-cell office:value-type="float" office:value="-0.01151074">
                <text:p>-0.0115107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1.171356201172">
                <text:p>501.171356201172</text:p>
              </table:table-cell>
              <table:table-cell office:value-type="float" office:value="-0.003619039">
                <text:p>-0.00361903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01.287628173828">
                <text:p>501.287628173828</text:p>
              </table:table-cell>
              <table:table-cell office:value-type="float" office:value="0.00688757">
                <text:p>0.0068875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01.403900146484">
                <text:p>501.403900146484</text:p>
              </table:table-cell>
              <table:table-cell office:value-type="float" office:value="0.001515734">
                <text:p>0.00151573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01.520172119141">
                <text:p>501.520172119141</text:p>
              </table:table-cell>
              <table:table-cell office:value-type="float" office:value="-0.003311668">
                <text:p>-0.00331166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01.636444091797">
                <text:p>501.636444091797</text:p>
              </table:table-cell>
              <table:table-cell office:value-type="float" office:value="0.05987405">
                <text:p>0.0598740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1.752746582031">
                <text:p>501.752746582031</text:p>
              </table:table-cell>
              <table:table-cell office:value-type="float" office:value="0.0002985203">
                <text:p>0.000298520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1.869018554688">
                <text:p>501.869018554688</text:p>
              </table:table-cell>
              <table:table-cell office:value-type="float" office:value="-0.0007605864">
                <text:p>-0.000760586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1.985321044922">
                <text:p>501.985321044922</text:p>
              </table:table-cell>
              <table:table-cell office:value-type="float" office:value="0.003109199">
                <text:p>0.00310919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2.101623535156">
                <text:p>502.101623535156</text:p>
              </table:table-cell>
              <table:table-cell office:value-type="float" office:value="-0.009965683">
                <text:p>-0.00996568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2.217926025391">
                <text:p>502.217926025391</text:p>
              </table:table-cell>
              <table:table-cell office:value-type="float" office:value="0.00220925">
                <text:p>0.0022092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2.334228515625">
                <text:p>502.334228515625</text:p>
              </table:table-cell>
              <table:table-cell office:value-type="float" office:value="-0.002667832">
                <text:p>-0.00266783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2.450531005859">
                <text:p>502.450531005859</text:p>
              </table:table-cell>
              <table:table-cell office:value-type="float" office:value="-0.008724832">
                <text:p>-0.00872483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2.566833496094">
                <text:p>502.566833496094</text:p>
              </table:table-cell>
              <table:table-cell office:value-type="float" office:value="0.0001379976">
                <text:p>0.000137997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2.683166503906">
                <text:p>502.683166503906</text:p>
              </table:table-cell>
              <table:table-cell office:value-type="float" office:value="0.004119418">
                <text:p>0.00411941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2.799468994141">
                <text:p>502.799468994141</text:p>
              </table:table-cell>
              <table:table-cell office:value-type="float" office:value="-0.000983425">
                <text:p>-0.00098342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2.915802001953">
                <text:p>502.915802001953</text:p>
              </table:table-cell>
              <table:table-cell office:value-type="float" office:value="-0.005374307">
                <text:p>-0.00537430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3.032135009766">
                <text:p>503.032135009766</text:p>
              </table:table-cell>
              <table:table-cell office:value-type="float" office:value="-0.008257302">
                <text:p>-0.00825730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3.148468017578">
                <text:p>503.148468017578</text:p>
              </table:table-cell>
              <table:table-cell office:value-type="float" office:value="-0.001456497">
                <text:p>-0.00145649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3.264801025391">
                <text:p>503.264801025391</text:p>
              </table:table-cell>
              <table:table-cell office:value-type="float" office:value="0.006154581">
                <text:p>0.00615458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3.381134033203">
                <text:p>503.381134033203</text:p>
              </table:table-cell>
              <table:table-cell office:value-type="float" office:value="-0.008250756">
                <text:p>-0.00825075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3.497497558594">
                <text:p>503.497497558594</text:p>
              </table:table-cell>
              <table:table-cell office:value-type="float" office:value="-0.005538395">
                <text:p>-0.00553839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3.613830566406">
                <text:p>503.613830566406</text:p>
              </table:table-cell>
              <table:table-cell office:value-type="float" office:value="0.0003855758">
                <text:p>0.000385575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3.730194091797">
                <text:p>503.730194091797</text:p>
              </table:table-cell>
              <table:table-cell office:value-type="float" office:value="-0.002375942">
                <text:p>-0.00237594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3.846527099609">
                <text:p>503.846527099609</text:p>
              </table:table-cell>
              <table:table-cell office:value-type="float" office:value="-0.000977457">
                <text:p>-0.00097745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3.962890625">
                <text:p>503.962890625</text:p>
              </table:table-cell>
              <table:table-cell office:value-type="float" office:value="-0.01101709">
                <text:p>-0.0110170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4.079254150391">
                <text:p>504.079254150391</text:p>
              </table:table-cell>
              <table:table-cell office:value-type="float" office:value="0.0004948046">
                <text:p>0.000494804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4.195617675781">
                <text:p>504.195617675781</text:p>
              </table:table-cell>
              <table:table-cell office:value-type="float" office:value="0.004986916">
                <text:p>0.00498691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4.31201171875">
                <text:p>504.31201171875</text:p>
              </table:table-cell>
              <table:table-cell office:value-type="float" office:value="0.004713517">
                <text:p>0.00471351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4.428375244141">
                <text:p>504.428375244141</text:p>
              </table:table-cell>
              <table:table-cell office:value-type="float" office:value="-0.007139998">
                <text:p>-0.00713999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4.544738769531">
                <text:p>504.544738769531</text:p>
              </table:table-cell>
              <table:table-cell office:value-type="float" office:value="-0.0016253">
                <text:p>-0.001625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4.6611328125">
                <text:p>504.6611328125</text:p>
              </table:table-cell>
              <table:table-cell office:value-type="float" office:value="0.0007888077">
                <text:p>0.000788807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4.777526855469">
                <text:p>504.777526855469</text:p>
              </table:table-cell>
              <table:table-cell office:value-type="float" office:value="-0.002087396">
                <text:p>-0.00208739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4.893920898438">
                <text:p>504.893920898438</text:p>
              </table:table-cell>
              <table:table-cell office:value-type="float" office:value="-0.001916137">
                <text:p>-0.00191613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5.010314941406">
                <text:p>505.010314941406</text:p>
              </table:table-cell>
              <table:table-cell office:value-type="float" office:value="0.008268374">
                <text:p>0.00826837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5.126708984375">
                <text:p>505.126708984375</text:p>
              </table:table-cell>
              <table:table-cell office:value-type="float" office:value="0.02224128">
                <text:p>0.0222412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5.243103027344">
                <text:p>505.243103027344</text:p>
              </table:table-cell>
              <table:table-cell office:value-type="float" office:value="-0.0008128414">
                <text:p>-0.000812841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5.359497070313">
                <text:p>505.359497070313</text:p>
              </table:table-cell>
              <table:table-cell office:value-type="float" office:value="-0.004725337">
                <text:p>-0.00472533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5.475921630859">
                <text:p>505.475921630859</text:p>
              </table:table-cell>
              <table:table-cell office:value-type="float" office:value="0.002800486">
                <text:p>0.00280048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5.592346191406">
                <text:p>505.592346191406</text:p>
              </table:table-cell>
              <table:table-cell office:value-type="float" office:value="0.01088279">
                <text:p>0.0108827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5.708740234375">
                <text:p>505.708740234375</text:p>
              </table:table-cell>
              <table:table-cell office:value-type="float" office:value="-0.006970427">
                <text:p>-0.00697042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5.825164794922">
                <text:p>505.825164794922</text:p>
              </table:table-cell>
              <table:table-cell office:value-type="float" office:value="-0.005309667">
                <text:p>-0.00530966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5.941589355469">
                <text:p>505.941589355469</text:p>
              </table:table-cell>
              <table:table-cell office:value-type="float" office:value="0.001189208">
                <text:p>0.00118920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6.058013916016">
                <text:p>506.058013916016</text:p>
              </table:table-cell>
              <table:table-cell office:value-type="float" office:value="0.001594353">
                <text:p>0.00159435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174468994141">
                <text:p>506.174468994141</text:p>
              </table:table-cell>
              <table:table-cell office:value-type="float" office:value="0.001478407">
                <text:p>0.00147840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6.290893554688">
                <text:p>506.290893554688</text:p>
              </table:table-cell>
              <table:table-cell office:value-type="float" office:value="-0.004181646">
                <text:p>-0.00418164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6.407348632813">
                <text:p>506.407348632813</text:p>
              </table:table-cell>
              <table:table-cell office:value-type="float" office:value="0.007559607">
                <text:p>0.00755960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6.523773193359">
                <text:p>506.523773193359</text:p>
              </table:table-cell>
              <table:table-cell office:value-type="float" office:value="0.001105676">
                <text:p>0.00110567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6.640228271484">
                <text:p>506.640228271484</text:p>
              </table:table-cell>
              <table:table-cell office:value-type="float" office:value="0.0001028322">
                <text:p>0.000102832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6.756683349609">
                <text:p>506.756683349609</text:p>
              </table:table-cell>
              <table:table-cell office:value-type="float" office:value="0.003418362">
                <text:p>0.00341836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6.873138427734">
                <text:p>506.873138427734</text:p>
              </table:table-cell>
              <table:table-cell office:value-type="float" office:value="0.008629066">
                <text:p>0.00862906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6.989593505859">
                <text:p>506.989593505859</text:p>
              </table:table-cell>
              <table:table-cell office:value-type="float" office:value="-0.0007244824">
                <text:p>-0.000724482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7.106048583984">
                <text:p>507.106048583984</text:p>
              </table:table-cell>
              <table:table-cell office:value-type="float" office:value="-0.00465782">
                <text:p>-0.0046578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7.222534179688">
                <text:p>507.222534179688</text:p>
              </table:table-cell>
              <table:table-cell office:value-type="float" office:value="-0.01208535">
                <text:p>-0.0120853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7.338989257813">
                <text:p>507.338989257813</text:p>
              </table:table-cell>
              <table:table-cell office:value-type="float" office:value="-0.003830777">
                <text:p>-0.00383077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7.455474853516">
                <text:p>507.455474853516</text:p>
              </table:table-cell>
              <table:table-cell office:value-type="float" office:value="-0.000581908">
                <text:p>-0.00058190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7.571960449219">
                <text:p>507.571960449219</text:p>
              </table:table-cell>
              <table:table-cell office:value-type="float" office:value="-0.01102429">
                <text:p>-0.0110242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7.688446044922">
                <text:p>507.688446044922</text:p>
              </table:table-cell>
              <table:table-cell office:value-type="float" office:value="-0.008302399">
                <text:p>-0.00830239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7.804931640625">
                <text:p>507.804931640625</text:p>
              </table:table-cell>
              <table:table-cell office:value-type="float" office:value="-0.0007223395">
                <text:p>-0.000722339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7.921417236328">
                <text:p>507.921417236328</text:p>
              </table:table-cell>
              <table:table-cell office:value-type="float" office:value="-0.0007581087">
                <text:p>-0.000758108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8.037902832031">
                <text:p>508.037902832031</text:p>
              </table:table-cell>
              <table:table-cell office:value-type="float" office:value="-0.004739875">
                <text:p>-0.00473987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08.154388427734">
                <text:p>508.154388427734</text:p>
              </table:table-cell>
              <table:table-cell office:value-type="float" office:value="-0.000114115">
                <text:p>-0.00011411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8.270904541016">
                <text:p>508.270904541016</text:p>
              </table:table-cell>
              <table:table-cell office:value-type="float" office:value="0.001281525">
                <text:p>0.00128152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08.387420654297">
                <text:p>508.387420654297</text:p>
              </table:table-cell>
              <table:table-cell office:value-type="float" office:value="-0.003967895">
                <text:p>-0.00396789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8.50390625">
                <text:p>508.50390625</text:p>
              </table:table-cell>
              <table:table-cell office:value-type="float" office:value="-0.005733976">
                <text:p>-0.00573397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08.620422363281">
                <text:p>508.620422363281</text:p>
              </table:table-cell>
              <table:table-cell office:value-type="float" office:value="-0.008126372">
                <text:p>-0.00812637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8.736938476563">
                <text:p>508.736938476563</text:p>
              </table:table-cell>
              <table:table-cell office:value-type="float" office:value="0.01840464">
                <text:p>0.0184046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8.853454589844">
                <text:p>508.853454589844</text:p>
              </table:table-cell>
              <table:table-cell office:value-type="float" office:value="0.0041402">
                <text:p>0.004140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8.970001220703">
                <text:p>508.970001220703</text:p>
              </table:table-cell>
              <table:table-cell office:value-type="float" office:value="-0.005290775">
                <text:p>-0.00529077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9.086517333984">
                <text:p>509.086517333984</text:p>
              </table:table-cell>
              <table:table-cell office:value-type="float" office:value="-0.001659951">
                <text:p>-0.00165995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09.203063964844">
                <text:p>509.203063964844</text:p>
              </table:table-cell>
              <table:table-cell office:value-type="float" office:value="0.01269598">
                <text:p>0.0126959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09.319580078125">
                <text:p>509.319580078125</text:p>
              </table:table-cell>
              <table:table-cell office:value-type="float" office:value="-0.00116941">
                <text:p>-0.0011694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09.436126708984">
                <text:p>509.436126708984</text:p>
              </table:table-cell>
              <table:table-cell office:value-type="float" office:value="-0.003427976">
                <text:p>-0.00342797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09.552673339844">
                <text:p>509.552673339844</text:p>
              </table:table-cell>
              <table:table-cell office:value-type="float" office:value="-0.004442543">
                <text:p>-0.00444254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9.669219970703">
                <text:p>509.669219970703</text:p>
              </table:table-cell>
              <table:table-cell office:value-type="float" office:value="0.007848962">
                <text:p>0.00784896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09.785766601563">
                <text:p>509.785766601563</text:p>
              </table:table-cell>
              <table:table-cell office:value-type="float" office:value="0.003678875">
                <text:p>0.00367887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09.902313232422">
                <text:p>509.902313232422</text:p>
              </table:table-cell>
              <table:table-cell office:value-type="float" office:value="-0.001240278">
                <text:p>-0.00124027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10.018890380859">
                <text:p>510.018890380859</text:p>
              </table:table-cell>
              <table:table-cell office:value-type="float" office:value="-0.008494597">
                <text:p>-0.00849459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0.135437011719">
                <text:p>510.135437011719</text:p>
              </table:table-cell>
              <table:table-cell office:value-type="float" office:value="-0.00202218">
                <text:p>-0.0020221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0.252014160156">
                <text:p>510.252014160156</text:p>
              </table:table-cell>
              <table:table-cell office:value-type="float" office:value="0.003526056">
                <text:p>0.00352605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10.368560791016">
                <text:p>510.368560791016</text:p>
              </table:table-cell>
              <table:table-cell office:value-type="float" office:value="-0.003491686">
                <text:p>-0.00349168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10.485137939453">
                <text:p>510.485137939453</text:p>
              </table:table-cell>
              <table:table-cell office:value-type="float" office:value="-0.01019522">
                <text:p>-0.0101952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0.601715087891">
                <text:p>510.601715087891</text:p>
              </table:table-cell>
              <table:table-cell office:value-type="float" office:value="0.005505182">
                <text:p>0.00550518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0.718322753906">
                <text:p>510.718322753906</text:p>
              </table:table-cell>
              <table:table-cell office:value-type="float" office:value="0.002363113">
                <text:p>0.00236311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0.834899902344">
                <text:p>510.834899902344</text:p>
              </table:table-cell>
              <table:table-cell office:value-type="float" office:value="-0.01082637">
                <text:p>-0.0108263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0.951477050781">
                <text:p>510.951477050781</text:p>
              </table:table-cell>
              <table:table-cell office:value-type="float" office:value="0.007980647">
                <text:p>0.00798064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11.068084716797">
                <text:p>511.068084716797</text:p>
              </table:table-cell>
              <table:table-cell office:value-type="float" office:value="-0.002324972">
                <text:p>-0.00232497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11.184661865234">
                <text:p>511.184661865234</text:p>
              </table:table-cell>
              <table:table-cell office:value-type="float" office:value="-0.003855637">
                <text:p>-0.00385563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11.30126953125">
                <text:p>511.30126953125</text:p>
              </table:table-cell>
              <table:table-cell office:value-type="float" office:value="-0.01028636">
                <text:p>-0.0102863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1.417877197266">
                <text:p>511.417877197266</text:p>
              </table:table-cell>
              <table:table-cell office:value-type="float" office:value="-0.01165192">
                <text:p>-0.0116519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1.534484863281">
                <text:p>511.534484863281</text:p>
              </table:table-cell>
              <table:table-cell office:value-type="float" office:value="-0.002671601">
                <text:p>-0.00267160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1.651092529297">
                <text:p>511.651092529297</text:p>
              </table:table-cell>
              <table:table-cell office:value-type="float" office:value="-0.004575451">
                <text:p>-0.00457545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.767700195313">
                <text:p>511.767700195313</text:p>
              </table:table-cell>
              <table:table-cell office:value-type="float" office:value="-0.002073077">
                <text:p>-0.00207307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.884338378906">
                <text:p>511.884338378906</text:p>
              </table:table-cell>
              <table:table-cell office:value-type="float" office:value="-0.003482527">
                <text:p>-0.00348252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2.0009765625">
                <text:p>512.0009765625</text:p>
              </table:table-cell>
              <table:table-cell office:value-type="float" office:value="-0.003395493">
                <text:p>-0.00339549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2.117553710938">
                <text:p>512.117553710938</text:p>
              </table:table-cell>
              <table:table-cell office:value-type="float" office:value="0.005786362">
                <text:p>0.00578636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2.234191894531">
                <text:p>512.234191894531</text:p>
              </table:table-cell>
              <table:table-cell office:value-type="float" office:value="0.04600916">
                <text:p>0.0460091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.350830078125">
                <text:p>512.350830078125</text:p>
              </table:table-cell>
              <table:table-cell office:value-type="float" office:value="-0.001746035">
                <text:p>-0.00174603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2.467468261719">
                <text:p>512.467468261719</text:p>
              </table:table-cell>
              <table:table-cell office:value-type="float" office:value="0.009738958">
                <text:p>0.00973895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.584106445313">
                <text:p>512.584106445313</text:p>
              </table:table-cell>
              <table:table-cell office:value-type="float" office:value="-0.001620631">
                <text:p>-0.00162063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2.700744628906">
                <text:p>512.700744628906</text:p>
              </table:table-cell>
              <table:table-cell office:value-type="float" office:value="0.01778171">
                <text:p>0.0177817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12.8173828125">
                <text:p>512.8173828125</text:p>
              </table:table-cell>
              <table:table-cell office:value-type="float" office:value="-0.009704601">
                <text:p>-0.00970460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12.93408203125">
                <text:p>512.93408203125</text:p>
              </table:table-cell>
              <table:table-cell office:value-type="float" office:value="0.005528385">
                <text:p>0.00552838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13.050720214844">
                <text:p>513.050720214844</text:p>
              </table:table-cell>
              <table:table-cell office:value-type="float" office:value="0.005244849">
                <text:p>0.00524484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3.167358398438">
                <text:p>513.167358398438</text:p>
              </table:table-cell>
              <table:table-cell office:value-type="float" office:value="-0.008728932">
                <text:p>-0.00872893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3.284057617188">
                <text:p>513.284057617188</text:p>
              </table:table-cell>
              <table:table-cell office:value-type="float" office:value="-0.009692984">
                <text:p>-0.00969298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3.400695800781">
                <text:p>513.400695800781</text:p>
              </table:table-cell>
              <table:table-cell office:value-type="float" office:value="0.008453946">
                <text:p>0.00845394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3.517395019531">
                <text:p>513.517395019531</text:p>
              </table:table-cell>
              <table:table-cell office:value-type="float" office:value="0.005726516">
                <text:p>0.00572651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3.634033203125">
                <text:p>513.634033203125</text:p>
              </table:table-cell>
              <table:table-cell office:value-type="float" office:value="-0.00484506">
                <text:p>-0.0048450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13.750732421875">
                <text:p>513.750732421875</text:p>
              </table:table-cell>
              <table:table-cell office:value-type="float" office:value="0.006238082">
                <text:p>0.00623808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3.867431640625">
                <text:p>513.867431640625</text:p>
              </table:table-cell>
              <table:table-cell office:value-type="float" office:value="0.006255488">
                <text:p>0.00625548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3.984069824219">
                <text:p>513.984069824219</text:p>
              </table:table-cell>
              <table:table-cell office:value-type="float" office:value="0.007310867">
                <text:p>0.00731086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4.100769042969">
                <text:p>514.100769042969</text:p>
              </table:table-cell>
              <table:table-cell office:value-type="float" office:value="0.00785497">
                <text:p>0.0078549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14.217468261719">
                <text:p>514.217468261719</text:p>
              </table:table-cell>
              <table:table-cell office:value-type="float" office:value="-0.003676708">
                <text:p>-0.00367670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14.334167480469">
                <text:p>514.334167480469</text:p>
              </table:table-cell>
              <table:table-cell office:value-type="float" office:value="0.001656291">
                <text:p>0.00165629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14.450866699219">
                <text:p>514.450866699219</text:p>
              </table:table-cell>
              <table:table-cell office:value-type="float" office:value="0.006980942">
                <text:p>0.00698094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14.567565917969">
                <text:p>514.567565917969</text:p>
              </table:table-cell>
              <table:table-cell office:value-type="float" office:value="-0.006196976">
                <text:p>-0.00619697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14.684265136719">
                <text:p>514.684265136719</text:p>
              </table:table-cell>
              <table:table-cell office:value-type="float" office:value="0.001675371">
                <text:p>0.00167537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4.801025390625">
                <text:p>514.801025390625</text:p>
              </table:table-cell>
              <table:table-cell office:value-type="float" office:value="0.0003449217">
                <text:p>0.000344921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4.917724609375">
                <text:p>514.917724609375</text:p>
              </table:table-cell>
              <table:table-cell office:value-type="float" office:value="0.004032675">
                <text:p>0.00403267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5.034423828125">
                <text:p>515.034423828125</text:p>
              </table:table-cell>
              <table:table-cell office:value-type="float" office:value="-0.003927285">
                <text:p>-0.00392728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5.151184082031">
                <text:p>515.151184082031</text:p>
              </table:table-cell>
              <table:table-cell office:value-type="float" office:value="-0.01177736">
                <text:p>-0.0117773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5.267883300781">
                <text:p>515.267883300781</text:p>
              </table:table-cell>
              <table:table-cell office:value-type="float" office:value="-0.001289723">
                <text:p>-0.00128972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.384643554688">
                <text:p>515.384643554688</text:p>
              </table:table-cell>
              <table:table-cell office:value-type="float" office:value="0.00504497">
                <text:p>0.0050449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5.501342773438">
                <text:p>515.501342773438</text:p>
              </table:table-cell>
              <table:table-cell office:value-type="float" office:value="-0.0008909016">
                <text:p>-0.000890901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5.618103027344">
                <text:p>515.618103027344</text:p>
              </table:table-cell>
              <table:table-cell office:value-type="float" office:value="0.0016009">
                <text:p>0.001600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5.734802246094">
                <text:p>515.734802246094</text:p>
              </table:table-cell>
              <table:table-cell office:value-type="float" office:value="-0.001441982">
                <text:p>-0.00144198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5.8515625">
                <text:p>515.8515625</text:p>
              </table:table-cell>
              <table:table-cell office:value-type="float" office:value="0.01211779">
                <text:p>0.0121177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15.968322753906">
                <text:p>515.968322753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16.085083007813">
                <text:p>516.085083007813</text:p>
              </table:table-cell>
              <table:table-cell office:value-type="float" office:value="0.001718871">
                <text:p>0.00171887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6.201843261719">
                <text:p>516.201843261719</text:p>
              </table:table-cell>
              <table:table-cell office:value-type="float" office:value="-0.001680033">
                <text:p>-0.00168003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16.318603515625">
                <text:p>516.318603515625</text:p>
              </table:table-cell>
              <table:table-cell office:value-type="float" office:value="-0.003459717">
                <text:p>-0.00345971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6.435363769531">
                <text:p>516.435363769531</text:p>
              </table:table-cell>
              <table:table-cell office:value-type="float" office:value="-0.006762146">
                <text:p>-0.00676214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6.552124023438">
                <text:p>516.552124023438</text:p>
              </table:table-cell>
              <table:table-cell office:value-type="float" office:value="-0.002551448">
                <text:p>-0.00255144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16.668884277344">
                <text:p>516.668884277344</text:p>
              </table:table-cell>
              <table:table-cell office:value-type="float" office:value="-0.001733454">
                <text:p>-0.00173345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16.78564453125">
                <text:p>516.78564453125</text:p>
              </table:table-cell>
              <table:table-cell office:value-type="float" office:value="0.01173173">
                <text:p>0.0117317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.902465820313">
                <text:p>516.902465820313</text:p>
              </table:table-cell>
              <table:table-cell office:value-type="float" office:value="0.02735765">
                <text:p>0.0273576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17.019226074219">
                <text:p>517.019226074219</text:p>
              </table:table-cell>
              <table:table-cell office:value-type="float" office:value="-0.006328115">
                <text:p>-0.00632811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7.135986328125">
                <text:p>517.135986328125</text:p>
              </table:table-cell>
              <table:table-cell office:value-type="float" office:value="0.0009589653">
                <text:p>0.000958965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7.252807617188">
                <text:p>517.252807617188</text:p>
              </table:table-cell>
              <table:table-cell office:value-type="float" office:value="0.005282">
                <text:p>0.00528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.369567871094">
                <text:p>517.369567871094</text:p>
              </table:table-cell>
              <table:table-cell office:value-type="float" office:value="-0.005656297">
                <text:p>-0.00565629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7.486389160156">
                <text:p>517.486389160156</text:p>
              </table:table-cell>
              <table:table-cell office:value-type="float" office:value="0.0007480255">
                <text:p>0.000748025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17.603210449219">
                <text:p>517.603210449219</text:p>
              </table:table-cell>
              <table:table-cell office:value-type="float" office:value="0.01165256">
                <text:p>0.0116525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7.719970703125">
                <text:p>517.719970703125</text:p>
              </table:table-cell>
              <table:table-cell office:value-type="float" office:value="0.001096598">
                <text:p>0.00109659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7.836791992188">
                <text:p>517.836791992188</text:p>
              </table:table-cell>
              <table:table-cell office:value-type="float" office:value="0.003352791">
                <text:p>0.00335279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7.95361328125">
                <text:p>517.95361328125</text:p>
              </table:table-cell>
              <table:table-cell office:value-type="float" office:value="0.0007079247">
                <text:p>0.000707924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.070434570313">
                <text:p>518.070434570313</text:p>
              </table:table-cell>
              <table:table-cell office:value-type="float" office:value="-0.002459685">
                <text:p>-0.00245968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8.187255859375">
                <text:p>518.187255859375</text:p>
              </table:table-cell>
              <table:table-cell office:value-type="float" office:value="0.005333783">
                <text:p>0.00533378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18.304077148438">
                <text:p>518.304077148438</text:p>
              </table:table-cell>
              <table:table-cell office:value-type="float" office:value="0.01154728">
                <text:p>0.0115472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18.4208984375">
                <text:p>518.4208984375</text:p>
              </table:table-cell>
              <table:table-cell office:value-type="float" office:value="0.004422083">
                <text:p>0.00442208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18.537719726563">
                <text:p>518.537719726563</text:p>
              </table:table-cell>
              <table:table-cell office:value-type="float" office:value="0.01876318">
                <text:p>0.0187631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18.654541015625">
                <text:p>518.654541015625</text:p>
              </table:table-cell>
              <table:table-cell office:value-type="float" office:value="0.007600367">
                <text:p>0.00760036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18.771362304688">
                <text:p>518.771362304688</text:p>
              </table:table-cell>
              <table:table-cell office:value-type="float" office:value="-0.008228621">
                <text:p>-0.00822862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18.888244628906">
                <text:p>518.888244628906</text:p>
              </table:table-cell>
              <table:table-cell office:value-type="float" office:value="-0.008643593">
                <text:p>-0.00864359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.005065917969">
                <text:p>519.005065917969</text:p>
              </table:table-cell>
              <table:table-cell office:value-type="float" office:value="0.002552024">
                <text:p>0.00255202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19.121887207031">
                <text:p>519.121887207031</text:p>
              </table:table-cell>
              <table:table-cell office:value-type="float" office:value="-0.0007174853">
                <text:p>-0.000717485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9.23876953125">
                <text:p>519.23876953125</text:p>
              </table:table-cell>
              <table:table-cell office:value-type="float" office:value="0.003628718">
                <text:p>0.00362871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19.355590820313">
                <text:p>519.355590820313</text:p>
              </table:table-cell>
              <table:table-cell office:value-type="float" office:value="-0.002943168">
                <text:p>-0.00294316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19.472473144531">
                <text:p>519.472473144531</text:p>
              </table:table-cell>
              <table:table-cell office:value-type="float" office:value="0.003066584">
                <text:p>0.00306658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19.58935546875">
                <text:p>519.58935546875</text:p>
              </table:table-cell>
              <table:table-cell office:value-type="float" office:value="0.001914555">
                <text:p>0.00191455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9.706176757813">
                <text:p>519.706176757813</text:p>
              </table:table-cell>
              <table:table-cell office:value-type="float" office:value="-0.003550638">
                <text:p>-0.00355063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19.823059082031">
                <text:p>519.823059082031</text:p>
              </table:table-cell>
              <table:table-cell office:value-type="float" office:value="-0.007015017">
                <text:p>-0.00701501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9.93994140625">
                <text:p>519.93994140625</text:p>
              </table:table-cell>
              <table:table-cell office:value-type="float" office:value="0.01478108">
                <text:p>0.0147810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.056823730469">
                <text:p>520.056823730469</text:p>
              </table:table-cell>
              <table:table-cell office:value-type="float" office:value="-0.003941025">
                <text:p>-0.00394102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0.173706054688">
                <text:p>520.173706054688</text:p>
              </table:table-cell>
              <table:table-cell office:value-type="float" office:value="-0.0001009896">
                <text:p>-0.000100989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0.290588378906">
                <text:p>520.290588378906</text:p>
              </table:table-cell>
              <table:table-cell office:value-type="float" office:value="-0.004228328">
                <text:p>-0.00422832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0.407470703125">
                <text:p>520.407470703125</text:p>
              </table:table-cell>
              <table:table-cell office:value-type="float" office:value="-0.001646322">
                <text:p>-0.00164632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0.524353027344">
                <text:p>520.524353027344</text:p>
              </table:table-cell>
              <table:table-cell office:value-type="float" office:value="-0.005067723">
                <text:p>-0.00506772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0.641235351563">
                <text:p>520.641235351563</text:p>
              </table:table-cell>
              <table:table-cell office:value-type="float" office:value="-0.007522918">
                <text:p>-0.00752291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0.758178710938">
                <text:p>520.758178710938</text:p>
              </table:table-cell>
              <table:table-cell office:value-type="float" office:value="-0.00116706">
                <text:p>-0.0011670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0.875061035156">
                <text:p>520.875061035156</text:p>
              </table:table-cell>
              <table:table-cell office:value-type="float" office:value="0.02064618">
                <text:p>0.0206461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0.991943359375">
                <text:p>520.991943359375</text:p>
              </table:table-cell>
              <table:table-cell office:value-type="float" office:value="0.001914139">
                <text:p>0.00191413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1.10888671875">
                <text:p>521.10888671875</text:p>
              </table:table-cell>
              <table:table-cell office:value-type="float" office:value="-0.007321382">
                <text:p>-0.00732138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1.225769042969">
                <text:p>521.225769042969</text:p>
              </table:table-cell>
              <table:table-cell office:value-type="float" office:value="0.001523959">
                <text:p>0.00152395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1.342712402344">
                <text:p>521.342712402344</text:p>
              </table:table-cell>
              <table:table-cell office:value-type="float" office:value="0.007069938">
                <text:p>0.00706993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1.459594726563">
                <text:p>521.459594726563</text:p>
              </table:table-cell>
              <table:table-cell office:value-type="float" office:value="-0.005643846">
                <text:p>-0.00564384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1.576538085938">
                <text:p>521.576538085938</text:p>
              </table:table-cell>
              <table:table-cell office:value-type="float" office:value="-0.00489967">
                <text:p>-0.0048996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1.693481445313">
                <text:p>521.693481445313</text:p>
              </table:table-cell>
              <table:table-cell office:value-type="float" office:value="-0.001106766">
                <text:p>-0.00110676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1.810424804688">
                <text:p>521.810424804688</text:p>
              </table:table-cell>
              <table:table-cell office:value-type="float" office:value="-0.005387533">
                <text:p>-0.00538753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1.927307128906">
                <text:p>521.927307128906</text:p>
              </table:table-cell>
              <table:table-cell office:value-type="float" office:value="0.01044196">
                <text:p>0.0104419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2.044250488281">
                <text:p>522.044250488281</text:p>
              </table:table-cell>
              <table:table-cell office:value-type="float" office:value="0.001056746">
                <text:p>0.00105674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2.161193847656">
                <text:p>522.161193847656</text:p>
              </table:table-cell>
              <table:table-cell office:value-type="float" office:value="0.03610873">
                <text:p>0.0361087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2.278137207031">
                <text:p>522.278137207031</text:p>
              </table:table-cell>
              <table:table-cell office:value-type="float" office:value="0.009582758">
                <text:p>0.00958275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22.395080566406">
                <text:p>522.395080566406</text:p>
              </table:table-cell>
              <table:table-cell office:value-type="float" office:value="0.00122779">
                <text:p>0.0012277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2.512023925781">
                <text:p>522.512023925781</text:p>
              </table:table-cell>
              <table:table-cell office:value-type="float" office:value="-0.004656456">
                <text:p>-0.00465645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2.629028320313">
                <text:p>522.629028320313</text:p>
              </table:table-cell>
              <table:table-cell office:value-type="float" office:value="0.003497544">
                <text:p>0.00349754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2.745971679688">
                <text:p>522.745971679688</text:p>
              </table:table-cell>
              <table:table-cell office:value-type="float" office:value="0.001640217">
                <text:p>0.00164021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2.862915039063">
                <text:p>522.862915039063</text:p>
              </table:table-cell>
              <table:table-cell office:value-type="float" office:value="0.01465572">
                <text:p>0.0146557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2.979919433594">
                <text:p>522.979919433594</text:p>
              </table:table-cell>
              <table:table-cell office:value-type="float" office:value="-0.009274954">
                <text:p>-0.00927495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23.096862792969">
                <text:p>523.096862792969</text:p>
              </table:table-cell>
              <table:table-cell office:value-type="float" office:value="0.0159469">
                <text:p>0.015946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23.2138671875">
                <text:p>523.2138671875</text:p>
              </table:table-cell>
              <table:table-cell office:value-type="float" office:value="0.005731919">
                <text:p>0.00573191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.330810546875">
                <text:p>523.330810546875</text:p>
              </table:table-cell>
              <table:table-cell office:value-type="float" office:value="0.001641509">
                <text:p>0.00164150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23.447814941406">
                <text:p>523.447814941406</text:p>
              </table:table-cell>
              <table:table-cell office:value-type="float" office:value="0.0005100393">
                <text:p>0.000510039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23.564758300781">
                <text:p>523.564758300781</text:p>
              </table:table-cell>
              <table:table-cell office:value-type="float" office:value="0.002117469">
                <text:p>0.00211746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23.681762695313">
                <text:p>523.681762695313</text:p>
              </table:table-cell>
              <table:table-cell office:value-type="float" office:value="-0.002275862">
                <text:p>-0.00227586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23.798767089844">
                <text:p>523.798767089844</text:p>
              </table:table-cell>
              <table:table-cell office:value-type="float" office:value="-0.006610855">
                <text:p>-0.00661085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23.915771484375">
                <text:p>523.915771484375</text:p>
              </table:table-cell>
              <table:table-cell office:value-type="float" office:value="-0.009911179">
                <text:p>-0.00991117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24.032775878906">
                <text:p>524.032775878906</text:p>
              </table:table-cell>
              <table:table-cell office:value-type="float" office:value="0.00803763">
                <text:p>0.0080376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24.149719238281">
                <text:p>524.149719238281</text:p>
              </table:table-cell>
              <table:table-cell office:value-type="float" office:value="0.003624082">
                <text:p>0.00362408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24.266723632813">
                <text:p>524.266723632813</text:p>
              </table:table-cell>
              <table:table-cell office:value-type="float" office:value="0.004002319">
                <text:p>0.00400231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24.3837890625">
                <text:p>524.3837890625</text:p>
              </table:table-cell>
              <table:table-cell office:value-type="float" office:value="-0.009936328">
                <text:p>-0.00993632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24.500793457031">
                <text:p>524.500793457031</text:p>
              </table:table-cell>
              <table:table-cell office:value-type="float" office:value="0.01831963">
                <text:p>0.0183196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24.617797851563">
                <text:p>524.617797851563</text:p>
              </table:table-cell>
              <table:table-cell office:value-type="float" office:value="0.006073471">
                <text:p>0.00607347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24.734802246094">
                <text:p>524.734802246094</text:p>
              </table:table-cell>
              <table:table-cell office:value-type="float" office:value="-0.007287508">
                <text:p>-0.00728750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24.851806640625">
                <text:p>524.851806640625</text:p>
              </table:table-cell>
              <table:table-cell office:value-type="float" office:value="-0.005886105">
                <text:p>-0.00588610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4.968872070313">
                <text:p>524.968872070313</text:p>
              </table:table-cell>
              <table:table-cell office:value-type="float" office:value="0.002329432">
                <text:p>0.00232943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25.085876464844">
                <text:p>525.085876464844</text:p>
              </table:table-cell>
              <table:table-cell office:value-type="float" office:value="0.01879838">
                <text:p>0.0187983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5.202941894531">
                <text:p>525.202941894531</text:p>
              </table:table-cell>
              <table:table-cell office:value-type="float" office:value="-0.004583838">
                <text:p>-0.00458383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5.319946289063">
                <text:p>525.319946289063</text:p>
              </table:table-cell>
              <table:table-cell office:value-type="float" office:value="-0.003782427">
                <text:p>-0.00378242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5.43701171875">
                <text:p>525.43701171875</text:p>
              </table:table-cell>
              <table:table-cell office:value-type="float" office:value="0.005884656">
                <text:p>0.00588465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5.554016113281">
                <text:p>525.554016113281</text:p>
              </table:table-cell>
              <table:table-cell office:value-type="float" office:value="0.005436445">
                <text:p>0.00543644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5.671081542969">
                <text:p>525.671081542969</text:p>
              </table:table-cell>
              <table:table-cell office:value-type="float" office:value="-0.004201102">
                <text:p>-0.00420110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5.788146972656">
                <text:p>525.788146972656</text:p>
              </table:table-cell>
              <table:table-cell office:value-type="float" office:value="-0.01314088">
                <text:p>-0.0131408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5.905212402344">
                <text:p>525.905212402344</text:p>
              </table:table-cell>
              <table:table-cell office:value-type="float" office:value="-0.002308057">
                <text:p>-0.00230805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6.022277832031">
                <text:p>526.022277832031</text:p>
              </table:table-cell>
              <table:table-cell office:value-type="float" office:value="-0.005323318">
                <text:p>-0.00532331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6.139282226563">
                <text:p>526.139282226563</text:p>
              </table:table-cell>
              <table:table-cell office:value-type="float" office:value="-0.004912174">
                <text:p>-0.00491217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6.25634765625">
                <text:p>526.25634765625</text:p>
              </table:table-cell>
              <table:table-cell office:value-type="float" office:value="0.01066495">
                <text:p>0.0106649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6.373474121094">
                <text:p>526.373474121094</text:p>
              </table:table-cell>
              <table:table-cell office:value-type="float" office:value="-0.005458734">
                <text:p>-0.00545873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6.490539550781">
                <text:p>526.490539550781</text:p>
              </table:table-cell>
              <table:table-cell office:value-type="float" office:value="0.01207091">
                <text:p>0.0120709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6.607604980469">
                <text:p>526.607604980469</text:p>
              </table:table-cell>
              <table:table-cell office:value-type="float" office:value="-0.005620567">
                <text:p>-0.00562056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6.724670410156">
                <text:p>526.724670410156</text:p>
              </table:table-cell>
              <table:table-cell office:value-type="float" office:value="0.005864774">
                <text:p>0.00586477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6.841735839844">
                <text:p>526.841735839844</text:p>
              </table:table-cell>
              <table:table-cell office:value-type="float" office:value="0.01163679">
                <text:p>0.0116367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26.958862304688">
                <text:p>526.958862304688</text:p>
              </table:table-cell>
              <table:table-cell office:value-type="float" office:value="0.001888605">
                <text:p>0.00188860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27.075927734375">
                <text:p>527.075927734375</text:p>
              </table:table-cell>
              <table:table-cell office:value-type="float" office:value="0.01625358">
                <text:p>0.0162535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27.192993164063">
                <text:p>527.192993164063</text:p>
              </table:table-cell>
              <table:table-cell office:value-type="float" office:value="-0.007492637">
                <text:p>-0.00749263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27.310119628906">
                <text:p>527.310119628906</text:p>
              </table:table-cell>
              <table:table-cell office:value-type="float" office:value="0.003394094">
                <text:p>0.00339409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27.42724609375">
                <text:p>527.42724609375</text:p>
              </table:table-cell>
              <table:table-cell office:value-type="float" office:value="-0.001198091">
                <text:p>-0.00119809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27.544311523438">
                <text:p>527.544311523438</text:p>
              </table:table-cell>
              <table:table-cell office:value-type="float" office:value="-0.007528973">
                <text:p>-0.00752897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27.661437988281">
                <text:p>527.661437988281</text:p>
              </table:table-cell>
              <table:table-cell office:value-type="float" office:value="-0.01181444">
                <text:p>-0.0118144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27.778564453125">
                <text:p>527.778564453125</text:p>
              </table:table-cell>
              <table:table-cell office:value-type="float" office:value="0.006324569">
                <text:p>0.00632456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27.895629882813">
                <text:p>527.895629882813</text:p>
              </table:table-cell>
              <table:table-cell office:value-type="float" office:value="0.00334994">
                <text:p>0.0033499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28.012756347656">
                <text:p>528.012756347656</text:p>
              </table:table-cell>
              <table:table-cell office:value-type="float" office:value="-0.00705262">
                <text:p>-0.0070526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28.1298828125">
                <text:p>528.1298828125</text:p>
              </table:table-cell>
              <table:table-cell office:value-type="float" office:value="-0.002989512">
                <text:p>-0.00298951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28.247009277344">
                <text:p>528.247009277344</text:p>
              </table:table-cell>
              <table:table-cell office:value-type="float" office:value="0.008574484">
                <text:p>0.00857448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28.364135742188">
                <text:p>528.364135742188</text:p>
              </table:table-cell>
              <table:table-cell office:value-type="float" office:value="-0.005962081">
                <text:p>-0.00596208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28.481262207031">
                <text:p>528.481262207031</text:p>
              </table:table-cell>
              <table:table-cell office:value-type="float" office:value="0.01523955">
                <text:p>0.0152395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28.598388671875">
                <text:p>528.598388671875</text:p>
              </table:table-cell>
              <table:table-cell office:value-type="float" office:value="0.0105486">
                <text:p>0.010548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28.715576171875">
                <text:p>528.715576171875</text:p>
              </table:table-cell>
              <table:table-cell office:value-type="float" office:value="0.002032128">
                <text:p>0.00203212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28.832702636719">
                <text:p>528.832702636719</text:p>
              </table:table-cell>
              <table:table-cell office:value-type="float" office:value="0.0008776253">
                <text:p>0.000877625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28.949829101563">
                <text:p>528.949829101563</text:p>
              </table:table-cell>
              <table:table-cell office:value-type="float" office:value="-0.003957291">
                <text:p>-0.00395729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29.066955566406">
                <text:p>529.066955566406</text:p>
              </table:table-cell>
              <table:table-cell office:value-type="float" office:value="-0.01161427">
                <text:p>-0.0116142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29.184143066406">
                <text:p>529.184143066406</text:p>
              </table:table-cell>
              <table:table-cell office:value-type="float" office:value="0.004391328">
                <text:p>0.00439132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29.30126953125">
                <text:p>529.30126953125</text:p>
              </table:table-cell>
              <table:table-cell office:value-type="float" office:value="0.0106894">
                <text:p>0.010689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29.41845703125">
                <text:p>529.41845703125</text:p>
              </table:table-cell>
              <table:table-cell office:value-type="float" office:value="-0.002109486">
                <text:p>-0.00210948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29.535583496094">
                <text:p>529.535583496094</text:p>
              </table:table-cell>
              <table:table-cell office:value-type="float" office:value="0.002695094">
                <text:p>0.00269509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29.652770996094">
                <text:p>529.652770996094</text:p>
              </table:table-cell>
              <table:table-cell office:value-type="float" office:value="-0.0001152617">
                <text:p>-0.000115261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9.769958496094">
                <text:p>529.769958496094</text:p>
              </table:table-cell>
              <table:table-cell office:value-type="float" office:value="0.0008457326">
                <text:p>0.000845732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29.887145996094">
                <text:p>529.887145996094</text:p>
              </table:table-cell>
              <table:table-cell office:value-type="float" office:value="-0.0005173864">
                <text:p>-0.000517386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30.004272460938">
                <text:p>530.004272460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0.121459960938">
                <text:p>530.121459960938</text:p>
              </table:table-cell>
              <table:table-cell office:value-type="float" office:value="0.001323693">
                <text:p>0.00132369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30.238647460938">
                <text:p>530.238647460938</text:p>
              </table:table-cell>
              <table:table-cell office:value-type="float" office:value="-0.00125918">
                <text:p>-0.0012591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30.355834960938">
                <text:p>530.355834960938</text:p>
              </table:table-cell>
              <table:table-cell office:value-type="float" office:value="-0.006777521">
                <text:p>-0.00677752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30.473022460938">
                <text:p>530.473022460938</text:p>
              </table:table-cell>
              <table:table-cell office:value-type="float" office:value="-0.009970008">
                <text:p>-0.00997000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30.590209960938">
                <text:p>530.590209960938</text:p>
              </table:table-cell>
              <table:table-cell office:value-type="float" office:value="0.002511009">
                <text:p>0.00251100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30.707397460938">
                <text:p>530.707397460938</text:p>
              </table:table-cell>
              <table:table-cell office:value-type="float" office:value="0.0461322">
                <text:p>0.046132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0.824645996094">
                <text:p>530.824645996094</text:p>
              </table:table-cell>
              <table:table-cell office:value-type="float" office:value="0.006453245">
                <text:p>0.00645324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0.941833496094">
                <text:p>530.941833496094</text:p>
              </table:table-cell>
              <table:table-cell office:value-type="float" office:value="0.002196723">
                <text:p>0.00219672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31.059020996094">
                <text:p>531.059020996094</text:p>
              </table:table-cell>
              <table:table-cell office:value-type="float" office:value="0.00322125">
                <text:p>0.0032212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31.17626953125">
                <text:p>531.17626953125</text:p>
              </table:table-cell>
              <table:table-cell office:value-type="float" office:value="-0.0005964644">
                <text:p>-0.000596464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31.29345703125">
                <text:p>531.29345703125</text:p>
              </table:table-cell>
              <table:table-cell office:value-type="float" office:value="0.001484407">
                <text:p>0.00148440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31.410705566406">
                <text:p>531.410705566406</text:p>
              </table:table-cell>
              <table:table-cell office:value-type="float" office:value="0.002747336">
                <text:p>0.00274733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31.527893066406">
                <text:p>531.527893066406</text:p>
              </table:table-cell>
              <table:table-cell office:value-type="float" office:value="-0.002429047">
                <text:p>-0.00242904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1.645141601563">
                <text:p>531.645141601563</text:p>
              </table:table-cell>
              <table:table-cell office:value-type="float" office:value="-0.0009937267">
                <text:p>-0.000993726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31.762329101563">
                <text:p>531.762329101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31.879577636719">
                <text:p>531.879577636719</text:p>
              </table:table-cell>
              <table:table-cell office:value-type="float" office:value="-0.003893275">
                <text:p>-0.00389327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1.996826171875">
                <text:p>531.996826171875</text:p>
              </table:table-cell>
              <table:table-cell office:value-type="float" office:value="0.003934541">
                <text:p>0.00393454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32.114074707031">
                <text:p>532.114074707031</text:p>
              </table:table-cell>
              <table:table-cell office:value-type="float" office:value="0.0237925">
                <text:p>0.023792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32.231323242188">
                <text:p>532.231323242188</text:p>
              </table:table-cell>
              <table:table-cell office:value-type="float" office:value="0.002061093">
                <text:p>0.00206109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32.348510742188">
                <text:p>532.348510742188</text:p>
              </table:table-cell>
              <table:table-cell office:value-type="float" office:value="0.01651339">
                <text:p>0.0165133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32.465759277344">
                <text:p>532.465759277344</text:p>
              </table:table-cell>
              <table:table-cell office:value-type="float" office:value="-0.005175488">
                <text:p>-0.00517548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2.583068847656">
                <text:p>532.583068847656</text:p>
              </table:table-cell>
              <table:table-cell office:value-type="float" office:value="-0.002759321">
                <text:p>-0.00275932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2.700317382813">
                <text:p>532.700317382813</text:p>
              </table:table-cell>
              <table:table-cell office:value-type="float" office:value="0.0002872991">
                <text:p>0.000287299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2.817565917969">
                <text:p>532.817565917969</text:p>
              </table:table-cell>
              <table:table-cell office:value-type="float" office:value="-0.008037353">
                <text:p>-0.00803735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32.934814453125">
                <text:p>532.934814453125</text:p>
              </table:table-cell>
              <table:table-cell office:value-type="float" office:value="0.007254271">
                <text:p>0.00725427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33.052062988281">
                <text:p>533.052062988281</text:p>
              </table:table-cell>
              <table:table-cell office:value-type="float" office:value="-0.004019666">
                <text:p>-0.00401966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33.169372558594">
                <text:p>533.169372558594</text:p>
              </table:table-cell>
              <table:table-cell office:value-type="float" office:value="-0.005042368">
                <text:p>-0.00504236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33.28662109375">
                <text:p>533.28662109375</text:p>
              </table:table-cell>
              <table:table-cell office:value-type="float" office:value="0.02125113">
                <text:p>0.0212511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33.403869628906">
                <text:p>533.403869628906</text:p>
              </table:table-cell>
              <table:table-cell office:value-type="float" office:value="-0.0006765294">
                <text:p>-0.000676529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33.521179199219">
                <text:p>533.521179199219</text:p>
              </table:table-cell>
              <table:table-cell office:value-type="float" office:value="0.007523182">
                <text:p>0.00752318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3.638427734375">
                <text:p>533.638427734375</text:p>
              </table:table-cell>
              <table:table-cell office:value-type="float" office:value="0.004655103">
                <text:p>0.00465510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33.755737304688">
                <text:p>533.755737304688</text:p>
              </table:table-cell>
              <table:table-cell office:value-type="float" office:value="-0.006709318">
                <text:p>-0.00670931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33.873046875">
                <text:p>533.873046875</text:p>
              </table:table-cell>
              <table:table-cell office:value-type="float" office:value="0.01239384">
                <text:p>0.0123938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33.990295410156">
                <text:p>533.990295410156</text:p>
              </table:table-cell>
              <table:table-cell office:value-type="float" office:value="0.007087776">
                <text:p>0.00708777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34.107604980469">
                <text:p>534.107604980469</text:p>
              </table:table-cell>
              <table:table-cell office:value-type="float" office:value="-0.0002844717">
                <text:p>-0.000284471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34.224914550781">
                <text:p>534.224914550781</text:p>
              </table:table-cell>
              <table:table-cell office:value-type="float" office:value="0.00504255">
                <text:p>0.0050425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34.342224121094">
                <text:p>534.342224121094</text:p>
              </table:table-cell>
              <table:table-cell office:value-type="float" office:value="-0.003550534">
                <text:p>-0.00355053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34.459533691406">
                <text:p>534.459533691406</text:p>
              </table:table-cell>
              <table:table-cell office:value-type="float" office:value="-0.003607025">
                <text:p>-0.00360702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34.576843261719">
                <text:p>534.576843261719</text:p>
              </table:table-cell>
              <table:table-cell office:value-type="float" office:value="0.006219801">
                <text:p>0.00621980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34.694152832031">
                <text:p>534.694152832031</text:p>
              </table:table-cell>
              <table:table-cell office:value-type="float" office:value="-0.00911826">
                <text:p>-0.0091182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34.811462402344">
                <text:p>534.811462402344</text:p>
              </table:table-cell>
              <table:table-cell office:value-type="float" office:value="-0.001296982">
                <text:p>-0.00129698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34.928771972656">
                <text:p>534.928771972656</text:p>
              </table:table-cell>
              <table:table-cell office:value-type="float" office:value="-0.004316472">
                <text:p>-0.00431647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35.046081542969">
                <text:p>535.046081542969</text:p>
              </table:table-cell>
              <table:table-cell office:value-type="float" office:value="-0.007032557">
                <text:p>-0.00703255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35.163452148438">
                <text:p>535.163452148438</text:p>
              </table:table-cell>
              <table:table-cell office:value-type="float" office:value="0.00389599">
                <text:p>0.0038959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35.28076171875">
                <text:p>535.28076171875</text:p>
              </table:table-cell>
              <table:table-cell office:value-type="float" office:value="0.001135149">
                <text:p>0.00113514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35.398071289063">
                <text:p>535.398071289063</text:p>
              </table:table-cell>
              <table:table-cell office:value-type="float" office:value="0.000925521">
                <text:p>0.00092552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5.515441894531">
                <text:p>535.515441894531</text:p>
              </table:table-cell>
              <table:table-cell office:value-type="float" office:value="-0.007798875">
                <text:p>-0.00779887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35.632751464844">
                <text:p>535.632751464844</text:p>
              </table:table-cell>
              <table:table-cell office:value-type="float" office:value="-0.003492783">
                <text:p>-0.00349278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35.750122070313">
                <text:p>535.750122070313</text:p>
              </table:table-cell>
              <table:table-cell office:value-type="float" office:value="-0.001908867">
                <text:p>-0.00190886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35.867431640625">
                <text:p>535.867431640625</text:p>
              </table:table-cell>
              <table:table-cell office:value-type="float" office:value="0.004980901">
                <text:p>0.00498090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35.984802246094">
                <text:p>535.984802246094</text:p>
              </table:table-cell>
              <table:table-cell office:value-type="float" office:value="0.008372805">
                <text:p>0.00837280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36.102172851563">
                <text:p>536.102172851563</text:p>
              </table:table-cell>
              <table:table-cell office:value-type="float" office:value="0.007610916">
                <text:p>0.00761091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36.219543457031">
                <text:p>536.219543457031</text:p>
              </table:table-cell>
              <table:table-cell office:value-type="float" office:value="-0.0003747842">
                <text:p>-0.000374784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36.336853027344">
                <text:p>536.336853027344</text:p>
              </table:table-cell>
              <table:table-cell office:value-type="float" office:value="-0.002228178">
                <text:p>-0.00222817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6.454223632813">
                <text:p>536.454223632813</text:p>
              </table:table-cell>
              <table:table-cell office:value-type="float" office:value="-0.0112963">
                <text:p>-0.011296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36.571594238281">
                <text:p>536.571594238281</text:p>
              </table:table-cell>
              <table:table-cell office:value-type="float" office:value="-0.008710736">
                <text:p>-0.00871073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36.68896484375">
                <text:p>536.68896484375</text:p>
              </table:table-cell>
              <table:table-cell office:value-type="float" office:value="-0.002933187">
                <text:p>-0.00293318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36.806335449219">
                <text:p>536.806335449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36.923706054688">
                <text:p>536.923706054688</text:p>
              </table:table-cell>
              <table:table-cell office:value-type="float" office:value="0.0181428">
                <text:p>0.018142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37.041076660156">
                <text:p>537.041076660156</text:p>
              </table:table-cell>
              <table:table-cell office:value-type="float" office:value="-0.002122165">
                <text:p>-0.00212216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37.158508300781">
                <text:p>537.158508300781</text:p>
              </table:table-cell>
              <table:table-cell office:value-type="float" office:value="0.002003253">
                <text:p>0.00200325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37.27587890625">
                <text:p>537.27587890625</text:p>
              </table:table-cell>
              <table:table-cell office:value-type="float" office:value="-0.0004216804">
                <text:p>-0.000421680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37.393249511719">
                <text:p>537.393249511719</text:p>
              </table:table-cell>
              <table:table-cell office:value-type="float" office:value="0.00284">
                <text:p>0.0028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37.510681152344">
                <text:p>537.510681152344</text:p>
              </table:table-cell>
              <table:table-cell office:value-type="float" office:value="-0.003766309">
                <text:p>-0.00376630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37.628051757813">
                <text:p>537.628051757813</text:p>
              </table:table-cell>
              <table:table-cell office:value-type="float" office:value="0.002962583">
                <text:p>0.00296258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37.745483398438">
                <text:p>537.745483398438</text:p>
              </table:table-cell>
              <table:table-cell office:value-type="float" office:value="-0.0009788476">
                <text:p>-0.000978847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37.862854003906">
                <text:p>537.862854003906</text:p>
              </table:table-cell>
              <table:table-cell office:value-type="float" office:value="0.001312714">
                <text:p>0.00131271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37.980285644531">
                <text:p>537.980285644531</text:p>
              </table:table-cell>
              <table:table-cell office:value-type="float" office:value="-0.01125314">
                <text:p>-0.0112531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38.09765625">
                <text:p>538.09765625</text:p>
              </table:table-cell>
              <table:table-cell office:value-type="float" office:value="0.03022042">
                <text:p>0.0302204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38.215087890625">
                <text:p>538.215087890625</text:p>
              </table:table-cell>
              <table:table-cell office:value-type="float" office:value="0.002593701">
                <text:p>0.00259370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38.33251953125">
                <text:p>538.33251953125</text:p>
              </table:table-cell>
              <table:table-cell office:value-type="float" office:value="0.0253516">
                <text:p>0.025351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38.449890136719">
                <text:p>538.449890136719</text:p>
              </table:table-cell>
              <table:table-cell office:value-type="float" office:value="0.0004433852">
                <text:p>0.000443385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38.567321777344">
                <text:p>538.567321777344</text:p>
              </table:table-cell>
              <table:table-cell office:value-type="float" office:value="0.02930587">
                <text:p>0.0293058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38.684753417969">
                <text:p>538.684753417969</text:p>
              </table:table-cell>
              <table:table-cell office:value-type="float" office:value="-0.0007881033">
                <text:p>-0.000788103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38.802185058594">
                <text:p>538.802185058594</text:p>
              </table:table-cell>
              <table:table-cell office:value-type="float" office:value="0.003916102">
                <text:p>0.00391610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38.919616699219">
                <text:p>538.919616699219</text:p>
              </table:table-cell>
              <table:table-cell office:value-type="float" office:value="-0.009651623">
                <text:p>-0.00965162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9.037048339844">
                <text:p>539.037048339844</text:p>
              </table:table-cell>
              <table:table-cell office:value-type="float" office:value="0.006536839">
                <text:p>0.00653683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39.154479980469">
                <text:p>539.154479980469</text:p>
              </table:table-cell>
              <table:table-cell office:value-type="float" office:value="0.0008985467">
                <text:p>0.000898546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39.27197265625">
                <text:p>539.27197265625</text:p>
              </table:table-cell>
              <table:table-cell office:value-type="float" office:value="-0.008142381">
                <text:p>-0.00814238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39.389404296875">
                <text:p>539.389404296875</text:p>
              </table:table-cell>
              <table:table-cell office:value-type="float" office:value="-0.0005290479">
                <text:p>-0.000529047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39.5068359375">
                <text:p>539.5068359375</text:p>
              </table:table-cell>
              <table:table-cell office:value-type="float" office:value="-0.00205229">
                <text:p>-0.0020522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9.624267578125">
                <text:p>539.624267578125</text:p>
              </table:table-cell>
              <table:table-cell office:value-type="float" office:value="-0.001678543">
                <text:p>-0.00167854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9.741760253906">
                <text:p>539.741760253906</text:p>
              </table:table-cell>
              <table:table-cell office:value-type="float" office:value="-0.004323545">
                <text:p>-0.00432354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39.859191894531">
                <text:p>539.859191894531</text:p>
              </table:table-cell>
              <table:table-cell office:value-type="float" office:value="-0.01047793">
                <text:p>-0.0104779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39.976684570313">
                <text:p>539.976684570313</text:p>
              </table:table-cell>
              <table:table-cell office:value-type="float" office:value="0.006248209">
                <text:p>0.00624820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40.094116210938">
                <text:p>540.094116210938</text:p>
              </table:table-cell>
              <table:table-cell office:value-type="float" office:value="-0.007017708">
                <text:p>-0.00701770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40.211608886719">
                <text:p>540.211608886719</text:p>
              </table:table-cell>
              <table:table-cell office:value-type="float" office:value="-0.006865458">
                <text:p>-0.00686545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40.3291015625">
                <text:p>540.3291015625</text:p>
              </table:table-cell>
              <table:table-cell office:value-type="float" office:value="-0.001987116">
                <text:p>-0.00198711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40.446533203125">
                <text:p>540.446533203125</text:p>
              </table:table-cell>
              <table:table-cell office:value-type="float" office:value="-0.002469667">
                <text:p>-0.002469667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40.564025878906">
                <text:p>540.564025878906</text:p>
              </table:table-cell>
              <table:table-cell office:value-type="float" office:value="0.01132928">
                <text:p>0.0113292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0.681518554688">
                <text:p>540.681518554688</text:p>
              </table:table-cell>
              <table:table-cell office:value-type="float" office:value="-0.003742838">
                <text:p>-0.00374283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40.799011230469">
                <text:p>540.799011230469</text:p>
              </table:table-cell>
              <table:table-cell office:value-type="float" office:value="-0.003813974">
                <text:p>-0.00381397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40.91650390625">
                <text:p>540.91650390625</text:p>
              </table:table-cell>
              <table:table-cell office:value-type="float" office:value="-0.007482632">
                <text:p>-0.00748263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41.033996582031">
                <text:p>541.033996582031</text:p>
              </table:table-cell>
              <table:table-cell office:value-type="float" office:value="-0.00183472">
                <text:p>-0.0018347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41.151489257813">
                <text:p>541.151489257813</text:p>
              </table:table-cell>
              <table:table-cell office:value-type="float" office:value="0.0003972936">
                <text:p>0.000397293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41.268981933594">
                <text:p>541.268981933594</text:p>
              </table:table-cell>
              <table:table-cell office:value-type="float" office:value="-0.004447475">
                <text:p>-0.00444747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41.386474609375">
                <text:p>541.386474609375</text:p>
              </table:table-cell>
              <table:table-cell office:value-type="float" office:value="0.007442705">
                <text:p>0.00744270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41.503967285156">
                <text:p>541.503967285156</text:p>
              </table:table-cell>
              <table:table-cell office:value-type="float" office:value="-0.003508391">
                <text:p>-0.00350839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.621459960938">
                <text:p>541.621459960938</text:p>
              </table:table-cell>
              <table:table-cell office:value-type="float" office:value="0.001002261">
                <text:p>0.00100226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1.739013671875">
                <text:p>541.739013671875</text:p>
              </table:table-cell>
              <table:table-cell office:value-type="float" office:value="0.01263868">
                <text:p>0.0126386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541.856506347656">
                <text:p>541.856506347656</text:p>
              </table:table-cell>
              <table:table-cell office:value-type="float" office:value="-0.00196454">
                <text:p>-0.0019645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41.974060058594">
                <text:p>541.974060058594</text:p>
              </table:table-cell>
              <table:table-cell office:value-type="float" office:value="-0.00993109">
                <text:p>-0.0099310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42.091552734375">
                <text:p>542.091552734375</text:p>
              </table:table-cell>
              <table:table-cell office:value-type="float" office:value="0.003002306">
                <text:p>0.00300230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42.209106445313">
                <text:p>542.209106445313</text:p>
              </table:table-cell>
              <table:table-cell office:value-type="float" office:value="0.001284065">
                <text:p>0.00128406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42.326599121094">
                <text:p>542.326599121094</text:p>
              </table:table-cell>
              <table:table-cell office:value-type="float" office:value="-0.005741227">
                <text:p>-0.00574122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42.444152832031">
                <text:p>542.444152832031</text:p>
              </table:table-cell>
              <table:table-cell office:value-type="float" office:value="0.008148665">
                <text:p>0.00814866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42.561645507813">
                <text:p>542.561645507813</text:p>
              </table:table-cell>
              <table:table-cell office:value-type="float" office:value="-0.001825347">
                <text:p>-0.00182534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42.67919921875">
                <text:p>542.67919921875</text:p>
              </table:table-cell>
              <table:table-cell office:value-type="float" office:value="-0.006559336">
                <text:p>-0.00655933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42.796752929688">
                <text:p>542.796752929688</text:p>
              </table:table-cell>
              <table:table-cell office:value-type="float" office:value="0.007183907">
                <text:p>0.00718390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42.914306640625">
                <text:p>542.914306640625</text:p>
              </table:table-cell>
              <table:table-cell office:value-type="float" office:value="-0.00356289">
                <text:p>-0.0035628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43.031860351563">
                <text:p>543.031860351563</text:p>
              </table:table-cell>
              <table:table-cell office:value-type="float" office:value="0.004194118">
                <text:p>0.00419411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3.1494140625">
                <text:p>543.1494140625</text:p>
              </table:table-cell>
              <table:table-cell office:value-type="float" office:value="-0.01121306">
                <text:p>-0.0112130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43.266967773438">
                <text:p>543.266967773438</text:p>
              </table:table-cell>
              <table:table-cell office:value-type="float" office:value="0.001949802">
                <text:p>0.00194980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43.384521484375">
                <text:p>543.384521484375</text:p>
              </table:table-cell>
              <table:table-cell office:value-type="float" office:value="0.004290408">
                <text:p>0.00429040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43.502075195313">
                <text:p>543.502075195313</text:p>
              </table:table-cell>
              <table:table-cell office:value-type="float" office:value="-0.008742561">
                <text:p>-0.00874256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43.61962890625">
                <text:p>543.61962890625</text:p>
              </table:table-cell>
              <table:table-cell office:value-type="float" office:value="0.0003165263">
                <text:p>0.000316526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43.737182617188">
                <text:p>543.737182617188</text:p>
              </table:table-cell>
              <table:table-cell office:value-type="float" office:value="-0.005266097">
                <text:p>-0.00526609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3.854736328125">
                <text:p>543.854736328125</text:p>
              </table:table-cell>
              <table:table-cell office:value-type="float" office:value="-0.004328465">
                <text:p>-0.00432846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43.972351074219">
                <text:p>543.972351074219</text:p>
              </table:table-cell>
              <table:table-cell office:value-type="float" office:value="-0.0003959053">
                <text:p>-0.000395905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44.089904785156">
                <text:p>544.089904785156</text:p>
              </table:table-cell>
              <table:table-cell office:value-type="float" office:value="-0.003105046">
                <text:p>-0.00310504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44.207458496094">
                <text:p>544.207458496094</text:p>
              </table:table-cell>
              <table:table-cell office:value-type="float" office:value="0.0009215122">
                <text:p>0.000921512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44.325073242188">
                <text:p>544.325073242188</text:p>
              </table:table-cell>
              <table:table-cell office:value-type="float" office:value="0.005908588">
                <text:p>0.00590858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44.442626953125">
                <text:p>544.442626953125</text:p>
              </table:table-cell>
              <table:table-cell office:value-type="float" office:value="-0.007221986">
                <text:p>-0.00722198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44.560241699219">
                <text:p>544.560241699219</text:p>
              </table:table-cell>
              <table:table-cell office:value-type="float" office:value="0.002456072">
                <text:p>0.00245607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44.677856445313">
                <text:p>544.677856445313</text:p>
              </table:table-cell>
              <table:table-cell office:value-type="float" office:value="0.001873633">
                <text:p>0.00187363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44.79541015625">
                <text:p>544.79541015625</text:p>
              </table:table-cell>
              <table:table-cell office:value-type="float" office:value="0.002973881">
                <text:p>0.00297388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44.913024902344">
                <text:p>544.913024902344</text:p>
              </table:table-cell>
              <table:table-cell office:value-type="float" office:value="-0.009229418">
                <text:p>-0.00922941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5.030639648438">
                <text:p>545.030639648438</text:p>
              </table:table-cell>
              <table:table-cell office:value-type="float" office:value="-0.0004462856">
                <text:p>-0.000446285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45.148254394531">
                <text:p>545.148254394531</text:p>
              </table:table-cell>
              <table:table-cell office:value-type="float" office:value="0.001627772">
                <text:p>0.00162777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45.265869140625">
                <text:p>545.265869140625</text:p>
              </table:table-cell>
              <table:table-cell office:value-type="float" office:value="0.00211434">
                <text:p>0.0021143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45.383483886719">
                <text:p>545.383483886719</text:p>
              </table:table-cell>
              <table:table-cell office:value-type="float" office:value="-0.01172515">
                <text:p>-0.0117251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45.501098632813">
                <text:p>545.501098632813</text:p>
              </table:table-cell>
              <table:table-cell office:value-type="float" office:value="-0.0004165807">
                <text:p>-0.000416580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45.618713378906">
                <text:p>545.618713378906</text:p>
              </table:table-cell>
              <table:table-cell office:value-type="float" office:value="0.005072857">
                <text:p>0.00507285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45.736328125">
                <text:p>545.736328125</text:p>
              </table:table-cell>
              <table:table-cell office:value-type="float" office:value="0.004389092">
                <text:p>0.00438909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45.853942871094">
                <text:p>545.853942871094</text:p>
              </table:table-cell>
              <table:table-cell office:value-type="float" office:value="0.0009437845">
                <text:p>0.000943784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5.971557617188">
                <text:p>545.971557617188</text:p>
              </table:table-cell>
              <table:table-cell office:value-type="float" office:value="0.008706967">
                <text:p>0.00870696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46.089172363281">
                <text:p>546.089172363281</text:p>
              </table:table-cell>
              <table:table-cell office:value-type="float" office:value="0.009971537">
                <text:p>0.00997153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46.206848144531">
                <text:p>546.206848144531</text:p>
              </table:table-cell>
              <table:table-cell office:value-type="float" office:value="0.0103593">
                <text:p>0.010359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46.324462890625">
                <text:p>546.324462890625</text:p>
              </table:table-cell>
              <table:table-cell office:value-type="float" office:value="-0.004571517">
                <text:p>-0.00457151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6.442077636719">
                <text:p>546.442077636719</text:p>
              </table:table-cell>
              <table:table-cell office:value-type="float" office:value="0.003338254">
                <text:p>0.00333825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46.559753417969">
                <text:p>546.559753417969</text:p>
              </table:table-cell>
              <table:table-cell office:value-type="float" office:value="0.003880641">
                <text:p>0.00388064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46.677368164063">
                <text:p>546.677368164063</text:p>
              </table:table-cell>
              <table:table-cell office:value-type="float" office:value="0.0004315895">
                <text:p>0.000431589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46.795043945313">
                <text:p>546.795043945313</text:p>
              </table:table-cell>
              <table:table-cell office:value-type="float" office:value="0.002227176">
                <text:p>0.00222717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6.912719726563">
                <text:p>546.912719726563</text:p>
              </table:table-cell>
              <table:table-cell office:value-type="float" office:value="0.004785815">
                <text:p>0.00478581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47.030334472656">
                <text:p>547.030334472656</text:p>
              </table:table-cell>
              <table:table-cell office:value-type="float" office:value="-0.001688867">
                <text:p>-0.00168886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47.148010253906">
                <text:p>547.148010253906</text:p>
              </table:table-cell>
              <table:table-cell office:value-type="float" office:value="0.004456277">
                <text:p>0.00445627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47.265686035156">
                <text:p>547.265686035156</text:p>
              </table:table-cell>
              <table:table-cell office:value-type="float" office:value="0.003547244">
                <text:p>0.00354724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47.383361816406">
                <text:p>547.383361816406</text:p>
              </table:table-cell>
              <table:table-cell office:value-type="float" office:value="0.005645601">
                <text:p>0.00564560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47.5009765625">
                <text:p>547.5009765625</text:p>
              </table:table-cell>
              <table:table-cell office:value-type="float" office:value="-0.005860678">
                <text:p>-0.00586067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47.61865234375">
                <text:p>547.61865234375</text:p>
              </table:table-cell>
              <table:table-cell office:value-type="float" office:value="0.001381493">
                <text:p>0.00138149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47.736328125">
                <text:p>547.736328125</text:p>
              </table:table-cell>
              <table:table-cell office:value-type="float" office:value="0.002202585">
                <text:p>0.00220258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47.85400390625">
                <text:p>547.85400390625</text:p>
              </table:table-cell>
              <table:table-cell office:value-type="float" office:value="-0.003242515">
                <text:p>-0.00324251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7.971740722656">
                <text:p>547.971740722656</text:p>
              </table:table-cell>
              <table:table-cell office:value-type="float" office:value="-0.01057845">
                <text:p>-0.0105784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48.089416503906">
                <text:p>548.089416503906</text:p>
              </table:table-cell>
              <table:table-cell office:value-type="float" office:value="-0.006188261">
                <text:p>-0.00618826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48.207092285156">
                <text:p>548.207092285156</text:p>
              </table:table-cell>
              <table:table-cell office:value-type="float" office:value="0.00730184">
                <text:p>0.0073018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48.324768066406">
                <text:p>548.324768066406</text:p>
              </table:table-cell>
              <table:table-cell office:value-type="float" office:value="-0.007448553">
                <text:p>-0.00744855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48.442443847656">
                <text:p>548.442443847656</text:p>
              </table:table-cell>
              <table:table-cell office:value-type="float" office:value="0.0006964096">
                <text:p>0.000696409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48.560180664063">
                <text:p>548.560180664063</text:p>
              </table:table-cell>
              <table:table-cell office:value-type="float" office:value="-0.002538875">
                <text:p>-0.00253887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8.677856445313">
                <text:p>548.677856445313</text:p>
              </table:table-cell>
              <table:table-cell office:value-type="float" office:value="0.006649885">
                <text:p>0.00664988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48.795593261719">
                <text:p>548.795593261719</text:p>
              </table:table-cell>
              <table:table-cell office:value-type="float" office:value="-0.004573509">
                <text:p>-0.00457350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48.913269042969">
                <text:p>548.913269042969</text:p>
              </table:table-cell>
              <table:table-cell office:value-type="float" office:value="-0.004574178">
                <text:p>-0.004574178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9.031005859375">
                <text:p>549.031005859375</text:p>
              </table:table-cell>
              <table:table-cell office:value-type="float" office:value="-0.001781713">
                <text:p>-0.00178171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49.148681640625">
                <text:p>549.148681640625</text:p>
              </table:table-cell>
              <table:table-cell office:value-type="float" office:value="-0.003491003">
                <text:p>-0.00349100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49.266418457031">
                <text:p>549.266418457031</text:p>
              </table:table-cell>
              <table:table-cell office:value-type="float" office:value="0.004728603">
                <text:p>0.00472860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9.384155273438">
                <text:p>549.384155273438</text:p>
              </table:table-cell>
              <table:table-cell office:value-type="float" office:value="-0.0001624016">
                <text:p>-0.000162401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9.501831054688">
                <text:p>549.501831054688</text:p>
              </table:table-cell>
              <table:table-cell office:value-type="float" office:value="0.002974237">
                <text:p>0.00297423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9.619567871094">
                <text:p>549.619567871094</text:p>
              </table:table-cell>
              <table:table-cell office:value-type="float" office:value="0.01281526">
                <text:p>0.0128152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49.7373046875">
                <text:p>549.7373046875</text:p>
              </table:table-cell>
              <table:table-cell office:value-type="float" office:value="0.005595216">
                <text:p>0.00559521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49.855041503906">
                <text:p>549.855041503906</text:p>
              </table:table-cell>
              <table:table-cell office:value-type="float" office:value="0.001441335">
                <text:p>0.00144133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49.972778320313">
                <text:p>549.972778320313</text:p>
              </table:table-cell>
              <table:table-cell office:value-type="float" office:value="0.00704211">
                <text:p>0.0070421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50.090515136719">
                <text:p>550.090515136719</text:p>
              </table:table-cell>
              <table:table-cell office:value-type="float" office:value="-0.00998241">
                <text:p>-0.0099824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50.208251953125">
                <text:p>550.208251953125</text:p>
              </table:table-cell>
              <table:table-cell office:value-type="float" office:value="0.002142572">
                <text:p>0.00214257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50.325988769531">
                <text:p>550.325988769531</text:p>
              </table:table-cell>
              <table:table-cell office:value-type="float" office:value="-0.004487137">
                <text:p>-0.004487137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0.443725585938">
                <text:p>550.44372558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50.561462402344">
                <text:p>550.561462402344</text:p>
              </table:table-cell>
              <table:table-cell office:value-type="float" office:value="0.008389252">
                <text:p>0.00838925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50.679260253906">
                <text:p>550.679260253906</text:p>
              </table:table-cell>
              <table:table-cell office:value-type="float" office:value="0.00396601">
                <text:p>0.0039660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50.796997070313">
                <text:p>550.796997070313</text:p>
              </table:table-cell>
              <table:table-cell office:value-type="float" office:value="0.000488042">
                <text:p>0.00048804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0.914733886719">
                <text:p>550.914733886719</text:p>
              </table:table-cell>
              <table:table-cell office:value-type="float" office:value="0.003116086">
                <text:p>0.00311608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51.032531738281">
                <text:p>551.032531738281</text:p>
              </table:table-cell>
              <table:table-cell office:value-type="float" office:value="-0.00372879">
                <text:p>-0.0037287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1.150268554688">
                <text:p>551.150268554688</text:p>
              </table:table-cell>
              <table:table-cell office:value-type="float" office:value="0.004754752">
                <text:p>0.00475475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51.26806640625">
                <text:p>551.26806640625</text:p>
              </table:table-cell>
              <table:table-cell office:value-type="float" office:value="-0.008321077">
                <text:p>-0.00832107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51.385803222656">
                <text:p>551.385803222656</text:p>
              </table:table-cell>
              <table:table-cell office:value-type="float" office:value="0.004331046">
                <text:p>0.00433104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1.503601074219">
                <text:p>551.503601074219</text:p>
              </table:table-cell>
              <table:table-cell office:value-type="float" office:value="-0.008263594">
                <text:p>-0.00826359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1.621398925781">
                <text:p>551.621398925781</text:p>
              </table:table-cell>
              <table:table-cell office:value-type="float" office:value="0.0129667">
                <text:p>0.012966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1.739135742188">
                <text:p>551.739135742188</text:p>
              </table:table-cell>
              <table:table-cell office:value-type="float" office:value="-0.001616659">
                <text:p>-0.00161665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1.85693359375">
                <text:p>551.85693359375</text:p>
              </table:table-cell>
              <table:table-cell office:value-type="float" office:value="-0.00515799">
                <text:p>-0.0051579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51.974731445313">
                <text:p>551.974731445313</text:p>
              </table:table-cell>
              <table:table-cell office:value-type="float" office:value="0.003248104">
                <text:p>0.003248104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52.092529296875">
                <text:p>552.092529296875</text:p>
              </table:table-cell>
              <table:table-cell office:value-type="float" office:value="-0.004832084">
                <text:p>-0.00483208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2.210327148438">
                <text:p>552.210327148438</text:p>
              </table:table-cell>
              <table:table-cell office:value-type="float" office:value="0.009289008">
                <text:p>0.00928900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2.328125">
                <text:p>552.328125</text:p>
              </table:table-cell>
              <table:table-cell office:value-type="float" office:value="-0.00167452">
                <text:p>-0.0016745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52.445922851563">
                <text:p>552.445922851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2.563720703125">
                <text:p>552.563720703125</text:p>
              </table:table-cell>
              <table:table-cell office:value-type="float" office:value="0.01222956">
                <text:p>0.0122295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52.681518554688">
                <text:p>552.681518554688</text:p>
              </table:table-cell>
              <table:table-cell office:value-type="float" office:value="-0.002522709">
                <text:p>-0.00252270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2.79931640625">
                <text:p>552.79931640625</text:p>
              </table:table-cell>
              <table:table-cell office:value-type="float" office:value="-0.001773159">
                <text:p>-0.00177315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52.917114257813">
                <text:p>552.917114257813</text:p>
              </table:table-cell>
              <table:table-cell office:value-type="float" office:value="-0.003427792">
                <text:p>-0.00342779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53.034973144531">
                <text:p>553.034973144531</text:p>
              </table:table-cell>
              <table:table-cell office:value-type="float" office:value="-0.001079813">
                <text:p>-0.00107981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53.152770996094">
                <text:p>553.152770996094</text:p>
              </table:table-cell>
              <table:table-cell office:value-type="float" office:value="0.002899757">
                <text:p>0.002899757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53.270568847656">
                <text:p>553.270568847656</text:p>
              </table:table-cell>
              <table:table-cell office:value-type="float" office:value="0.01637929">
                <text:p>0.0163792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53.388427734375">
                <text:p>553.388427734375</text:p>
              </table:table-cell>
              <table:table-cell office:value-type="float" office:value="-0.00622352">
                <text:p>-0.00622352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53.506225585938">
                <text:p>553.506225585938</text:p>
              </table:table-cell>
              <table:table-cell office:value-type="float" office:value="0.01107422">
                <text:p>0.0110742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3.624084472656">
                <text:p>553.624084472656</text:p>
              </table:table-cell>
              <table:table-cell office:value-type="float" office:value="0.001471966">
                <text:p>0.00147196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53.741882324219">
                <text:p>553.741882324219</text:p>
              </table:table-cell>
              <table:table-cell office:value-type="float" office:value="-0.002689627">
                <text:p>-0.00268962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53.859741210938">
                <text:p>553.859741210938</text:p>
              </table:table-cell>
              <table:table-cell office:value-type="float" office:value="-0.009341939">
                <text:p>-0.00934193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3.977600097656">
                <text:p>553.977600097656</text:p>
              </table:table-cell>
              <table:table-cell office:value-type="float" office:value="0.0006308014">
                <text:p>0.000630801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54.095458984375">
                <text:p>554.095458984375</text:p>
              </table:table-cell>
              <table:table-cell office:value-type="float" office:value="-0.003284015">
                <text:p>-0.00328401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54.213256835938">
                <text:p>554.213256835938</text:p>
              </table:table-cell>
              <table:table-cell office:value-type="float" office:value="0.01638087">
                <text:p>0.0163808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54.331115722656">
                <text:p>554.331115722656</text:p>
              </table:table-cell>
              <table:table-cell office:value-type="float" office:value="0.0008085482">
                <text:p>0.000808548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54.448974609375">
                <text:p>554.448974609375</text:p>
              </table:table-cell>
              <table:table-cell office:value-type="float" office:value="0.000701168">
                <text:p>0.00070116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54.566833496094">
                <text:p>554.566833496094</text:p>
              </table:table-cell>
              <table:table-cell office:value-type="float" office:value="0.0001340604">
                <text:p>0.000134060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54.684692382813">
                <text:p>554.684692382813</text:p>
              </table:table-cell>
              <table:table-cell office:value-type="float" office:value="-0.004763332">
                <text:p>-0.00476333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54.802551269531">
                <text:p>554.802551269531</text:p>
              </table:table-cell>
              <table:table-cell office:value-type="float" office:value="-0.004474391">
                <text:p>-0.00447439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54.92041015625">
                <text:p>554.92041015625</text:p>
              </table:table-cell>
              <table:table-cell office:value-type="float" office:value="-0.005825037">
                <text:p>-0.005825037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55.038269042969">
                <text:p>555.038269042969</text:p>
              </table:table-cell>
              <table:table-cell office:value-type="float" office:value="-0.0008434977">
                <text:p>-0.0008434977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55.156127929688">
                <text:p>555.156127929688</text:p>
              </table:table-cell>
              <table:table-cell office:value-type="float" office:value="-0.001268045">
                <text:p>-0.00126804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5.274047851563">
                <text:p>555.274047851563</text:p>
              </table:table-cell>
              <table:table-cell office:value-type="float" office:value="-0.0006996057">
                <text:p>-0.000699605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55.391906738281">
                <text:p>555.391906738281</text:p>
              </table:table-cell>
              <table:table-cell office:value-type="float" office:value="0.002554773">
                <text:p>0.00255477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5.509765625">
                <text:p>555.509765625</text:p>
              </table:table-cell>
              <table:table-cell office:value-type="float" office:value="0.0008827266">
                <text:p>0.000882726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5.627685546875">
                <text:p>555.627685546875</text:p>
              </table:table-cell>
              <table:table-cell office:value-type="float" office:value="0.007449271">
                <text:p>0.00744927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55.745544433594">
                <text:p>555.745544433594</text:p>
              </table:table-cell>
              <table:table-cell office:value-type="float" office:value="0.004325592">
                <text:p>0.00432559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55.863403320313">
                <text:p>555.863403320313</text:p>
              </table:table-cell>
              <table:table-cell office:value-type="float" office:value="-0.00547672">
                <text:p>-0.0054767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55.981323242188">
                <text:p>555.981323242188</text:p>
              </table:table-cell>
              <table:table-cell office:value-type="float" office:value="0.001335496">
                <text:p>0.00133549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56.099243164063">
                <text:p>556.099243164063</text:p>
              </table:table-cell>
              <table:table-cell office:value-type="float" office:value="-0.004327828">
                <text:p>-0.00432782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56.217102050781">
                <text:p>556.217102050781</text:p>
              </table:table-cell>
              <table:table-cell office:value-type="float" office:value="0.008162871">
                <text:p>0.00816287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56.335021972656">
                <text:p>556.335021972656</text:p>
              </table:table-cell>
              <table:table-cell office:value-type="float" office:value="0.009315418">
                <text:p>0.00931541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56.452941894531">
                <text:p>556.452941894531</text:p>
              </table:table-cell>
              <table:table-cell office:value-type="float" office:value="0.002694014">
                <text:p>0.002694014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6.57080078125">
                <text:p>556.57080078125</text:p>
              </table:table-cell>
              <table:table-cell office:value-type="float" office:value="0.001949944">
                <text:p>0.00194994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.688720703125">
                <text:p>556.688720703125</text:p>
              </table:table-cell>
              <table:table-cell office:value-type="float" office:value="0.0005176856">
                <text:p>0.000517685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6.806640625">
                <text:p>556.806640625</text:p>
              </table:table-cell>
              <table:table-cell office:value-type="float" office:value="0.0002701274">
                <text:p>0.000270127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56.924560546875">
                <text:p>556.924560546875</text:p>
              </table:table-cell>
              <table:table-cell office:value-type="float" office:value="0.00586581">
                <text:p>0.0058658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57.04248046875">
                <text:p>557.04248046875</text:p>
              </table:table-cell>
              <table:table-cell office:value-type="float" office:value="0.0003297588">
                <text:p>0.0003297588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57.160400390625">
                <text:p>557.160400390625</text:p>
              </table:table-cell>
              <table:table-cell office:value-type="float" office:value="-0.004718232">
                <text:p>-0.00471823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57.2783203125">
                <text:p>557.2783203125</text:p>
              </table:table-cell>
              <table:table-cell office:value-type="float" office:value="0.01486246">
                <text:p>0.01486246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57.396240234375">
                <text:p>557.396240234375</text:p>
              </table:table-cell>
              <table:table-cell office:value-type="float" office:value="0.0008149464">
                <text:p>0.000814946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7.51416015625">
                <text:p>557.51416015625</text:p>
              </table:table-cell>
              <table:table-cell office:value-type="float" office:value="-0.008019789">
                <text:p>-0.008019789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57.632141113281">
                <text:p>557.632141113281</text:p>
              </table:table-cell>
              <table:table-cell office:value-type="float" office:value="0.002420953">
                <text:p>0.00242095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57.750061035156">
                <text:p>557.750061035156</text:p>
              </table:table-cell>
              <table:table-cell office:value-type="float" office:value="-0.001730462">
                <text:p>-0.00173046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57.867980957031">
                <text:p>557.867980957031</text:p>
              </table:table-cell>
              <table:table-cell office:value-type="float" office:value="0.00153663">
                <text:p>0.0015366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57.985961914063">
                <text:p>557.985961914063</text:p>
              </table:table-cell>
              <table:table-cell office:value-type="float" office:value="-0.00994073">
                <text:p>-0.0099407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8.103881835938">
                <text:p>558.103881835938</text:p>
              </table:table-cell>
              <table:table-cell office:value-type="float" office:value="-0.007103803">
                <text:p>-0.00710380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58.221801757813">
                <text:p>558.221801757813</text:p>
              </table:table-cell>
              <table:table-cell office:value-type="float" office:value="-0.002644551">
                <text:p>-0.00264455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58.339782714844">
                <text:p>558.339782714844</text:p>
              </table:table-cell>
              <table:table-cell office:value-type="float" office:value="0.006703396">
                <text:p>0.00670339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58.457702636719">
                <text:p>558.457702636719</text:p>
              </table:table-cell>
              <table:table-cell office:value-type="float" office:value="-0.00411939">
                <text:p>-0.0041193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58.57568359375">
                <text:p>558.57568359375</text:p>
              </table:table-cell>
              <table:table-cell office:value-type="float" office:value="-0.0001273362">
                <text:p>-0.000127336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58.693664550781">
                <text:p>558.693664550781</text:p>
              </table:table-cell>
              <table:table-cell office:value-type="float" office:value="0.003906907">
                <text:p>0.00390690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58.811584472656">
                <text:p>558.811584472656</text:p>
              </table:table-cell>
              <table:table-cell office:value-type="float" office:value="0.005677859">
                <text:p>0.005677859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58.929565429688">
                <text:p>558.929565429688</text:p>
              </table:table-cell>
              <table:table-cell office:value-type="float" office:value="-0.00382745">
                <text:p>-0.0038274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59.047546386719">
                <text:p>559.047546386719</text:p>
              </table:table-cell>
              <table:table-cell office:value-type="float" office:value="0.001468824">
                <text:p>0.00146882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59.16552734375">
                <text:p>559.16552734375</text:p>
              </table:table-cell>
              <table:table-cell office:value-type="float" office:value="0.00143328">
                <text:p>0.0014332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59.283508300781">
                <text:p>559.283508300781</text:p>
              </table:table-cell>
              <table:table-cell office:value-type="float" office:value="-0.000881442">
                <text:p>-0.00088144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59.401489257813">
                <text:p>559.401489257813</text:p>
              </table:table-cell>
              <table:table-cell office:value-type="float" office:value="0.005334787">
                <text:p>0.00533478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59.519470214844">
                <text:p>559.519470214844</text:p>
              </table:table-cell>
              <table:table-cell office:value-type="float" office:value="-0.009498509">
                <text:p>-0.00949850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59.637451171875">
                <text:p>559.637451171875</text:p>
              </table:table-cell>
              <table:table-cell office:value-type="float" office:value="0.001662169">
                <text:p>0.001662169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59.755432128906">
                <text:p>559.755432128906</text:p>
              </table:table-cell>
              <table:table-cell office:value-type="float" office:value="0.007514605">
                <text:p>0.00751460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59.873413085938">
                <text:p>559.873413085938</text:p>
              </table:table-cell>
              <table:table-cell office:value-type="float" office:value="-0.001840642">
                <text:p>-0.00184064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59.991394042969">
                <text:p>559.991394042969</text:p>
              </table:table-cell>
              <table:table-cell office:value-type="float" office:value="0.002325022">
                <text:p>0.00232502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60.109375">
                <text:p>560.109375</text:p>
              </table:table-cell>
              <table:table-cell office:value-type="float" office:value="0.004838862">
                <text:p>0.00483886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60.227416992188">
                <text:p>560.227416992188</text:p>
              </table:table-cell>
              <table:table-cell office:value-type="float" office:value="-0.001581785">
                <text:p>-0.00158178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60.345397949219">
                <text:p>560.345397949219</text:p>
              </table:table-cell>
              <table:table-cell office:value-type="float" office:value="-0.007732322">
                <text:p>-0.00773232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0.46337890625">
                <text:p>560.46337890625</text:p>
              </table:table-cell>
              <table:table-cell office:value-type="float" office:value="0.003850195">
                <text:p>0.00385019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60.581420898438">
                <text:p>560.581420898438</text:p>
              </table:table-cell>
              <table:table-cell office:value-type="float" office:value="0.02174265">
                <text:p>0.0217426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60.699401855469">
                <text:p>560.699401855469</text:p>
              </table:table-cell>
              <table:table-cell office:value-type="float" office:value="-0.006031958">
                <text:p>-0.00603195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60.817443847656">
                <text:p>560.817443847656</text:p>
              </table:table-cell>
              <table:table-cell office:value-type="float" office:value="-0.004520414">
                <text:p>-0.00452041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60.935424804688">
                <text:p>560.935424804688</text:p>
              </table:table-cell>
              <table:table-cell office:value-type="float" office:value="0.005073721">
                <text:p>0.00507372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61.053466796875">
                <text:p>561.053466796875</text:p>
              </table:table-cell>
              <table:table-cell office:value-type="float" office:value="-0.0005092752">
                <text:p>-0.000509275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61.171508789063">
                <text:p>561.171508789063</text:p>
              </table:table-cell>
              <table:table-cell office:value-type="float" office:value="-0.003299959">
                <text:p>-0.00329995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61.289489746094">
                <text:p>561.289489746094</text:p>
              </table:table-cell>
              <table:table-cell office:value-type="float" office:value="0.005241655">
                <text:p>0.00524165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61.407531738281">
                <text:p>561.407531738281</text:p>
              </table:table-cell>
              <table:table-cell office:value-type="float" office:value="-0.002857919">
                <text:p>-0.00285791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61.525573730469">
                <text:p>561.525573730469</text:p>
              </table:table-cell>
              <table:table-cell office:value-type="float" office:value="0.01087099">
                <text:p>0.0108709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61.643615722656">
                <text:p>561.643615722656</text:p>
              </table:table-cell>
              <table:table-cell office:value-type="float" office:value="-0.003549787">
                <text:p>-0.003549787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61.761657714844">
                <text:p>561.761657714844</text:p>
              </table:table-cell>
              <table:table-cell office:value-type="float" office:value="-0.008321817">
                <text:p>-0.008321817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61.879699707031">
                <text:p>561.879699707031</text:p>
              </table:table-cell>
              <table:table-cell office:value-type="float" office:value="0.008999454">
                <text:p>0.008999454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61.997741699219">
                <text:p>561.997741699219</text:p>
              </table:table-cell>
              <table:table-cell office:value-type="float" office:value="0.01694309">
                <text:p>0.0169430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62.115783691406">
                <text:p>562.115783691406</text:p>
              </table:table-cell>
              <table:table-cell office:value-type="float" office:value="-0.004738697">
                <text:p>-0.00473869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62.233825683594">
                <text:p>562.233825683594</text:p>
              </table:table-cell>
              <table:table-cell office:value-type="float" office:value="0.007644955">
                <text:p>0.00764495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62.351867675781">
                <text:p>562.351867675781</text:p>
              </table:table-cell>
              <table:table-cell office:value-type="float" office:value="0.004455969">
                <text:p>0.00445596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2.469909667969">
                <text:p>562.469909667969</text:p>
              </table:table-cell>
              <table:table-cell office:value-type="float" office:value="0.003806331">
                <text:p>0.00380633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62.588012695313">
                <text:p>562.588012695313</text:p>
              </table:table-cell>
              <table:table-cell office:value-type="float" office:value="0.0009052055">
                <text:p>0.000905205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62.7060546875">
                <text:p>562.7060546875</text:p>
              </table:table-cell>
              <table:table-cell office:value-type="float" office:value="-0.009622563">
                <text:p>-0.00962256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62.824096679688">
                <text:p>562.824096679688</text:p>
              </table:table-cell>
              <table:table-cell office:value-type="float" office:value="-0.00484927">
                <text:p>-0.00484927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62.942199707031">
                <text:p>562.942199707031</text:p>
              </table:table-cell>
              <table:table-cell office:value-type="float" office:value="-0.005861079">
                <text:p>-0.00586107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63.060241699219">
                <text:p>563.060241699219</text:p>
              </table:table-cell>
              <table:table-cell office:value-type="float" office:value="0.002188812">
                <text:p>0.00218881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3.178344726563">
                <text:p>563.178344726563</text:p>
              </table:table-cell>
              <table:table-cell office:value-type="float" office:value="0.01205764">
                <text:p>0.0120576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63.29638671875">
                <text:p>563.29638671875</text:p>
              </table:table-cell>
              <table:table-cell office:value-type="float" office:value="-0.006854609">
                <text:p>-0.00685460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63.414489746094">
                <text:p>563.414489746094</text:p>
              </table:table-cell>
              <table:table-cell office:value-type="float" office:value="0.005186081">
                <text:p>0.00518608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63.532531738281">
                <text:p>563.532531738281</text:p>
              </table:table-cell>
              <table:table-cell office:value-type="float" office:value="0.01302559">
                <text:p>0.0130255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63.650634765625">
                <text:p>563.650634765625</text:p>
              </table:table-cell>
              <table:table-cell office:value-type="float" office:value="-0.004910944">
                <text:p>-0.00491094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63.768737792969">
                <text:p>563.768737792969</text:p>
              </table:table-cell>
              <table:table-cell office:value-type="float" office:value="-0.004625401">
                <text:p>-0.00462540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63.886779785156">
                <text:p>563.886779785156</text:p>
              </table:table-cell>
              <table:table-cell office:value-type="float" office:value="0.002671518">
                <text:p>0.002671518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64.0048828125">
                <text:p>564.0048828125</text:p>
              </table:table-cell>
              <table:table-cell office:value-type="float" office:value="-0.004069417">
                <text:p>-0.004069417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64.122985839844">
                <text:p>564.122985839844</text:p>
              </table:table-cell>
              <table:table-cell office:value-type="float" office:value="-0.008095139">
                <text:p>-0.008095139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64.241088867188">
                <text:p>564.241088867188</text:p>
              </table:table-cell>
              <table:table-cell office:value-type="float" office:value="0.00906752">
                <text:p>0.00906752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64.359191894531">
                <text:p>564.359191894531</text:p>
              </table:table-cell>
              <table:table-cell office:value-type="float" office:value="0.007479591">
                <text:p>0.00747959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64.477294921875">
                <text:p>564.477294921875</text:p>
              </table:table-cell>
              <table:table-cell office:value-type="float" office:value="0.001583673">
                <text:p>0.00158367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64.595397949219">
                <text:p>564.595397949219</text:p>
              </table:table-cell>
              <table:table-cell office:value-type="float" office:value="0.00631486">
                <text:p>0.0063148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64.713500976563">
                <text:p>564.713500976563</text:p>
              </table:table-cell>
              <table:table-cell office:value-type="float" office:value="0.03365856">
                <text:p>0.0336585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64.831604003906">
                <text:p>564.831604003906</text:p>
              </table:table-cell>
              <table:table-cell office:value-type="float" office:value="0.002358776">
                <text:p>0.002358776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64.949768066406">
                <text:p>564.949768066406</text:p>
              </table:table-cell>
              <table:table-cell office:value-type="float" office:value="0.003514505">
                <text:p>0.00351450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65.06787109375">
                <text:p>565.06787109375</text:p>
              </table:table-cell>
              <table:table-cell office:value-type="float" office:value="0.009228157">
                <text:p>0.009228157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65.185974121094">
                <text:p>565.185974121094</text:p>
              </table:table-cell>
              <table:table-cell office:value-type="float" office:value="0.005184528">
                <text:p>0.00518452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65.304077148438">
                <text:p>565.304077148438</text:p>
              </table:table-cell>
              <table:table-cell office:value-type="float" office:value="-0.006101802">
                <text:p>-0.006101802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65.422241210938">
                <text:p>565.422241210938</text:p>
              </table:table-cell>
              <table:table-cell office:value-type="float" office:value="0.001257455">
                <text:p>0.00125745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65.540344238281">
                <text:p>565.540344238281</text:p>
              </table:table-cell>
              <table:table-cell office:value-type="float" office:value="-0.003930812">
                <text:p>-0.00393081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65.658508300781">
                <text:p>565.658508300781</text:p>
              </table:table-cell>
              <table:table-cell office:value-type="float" office:value="0.007192933">
                <text:p>0.007192933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65.776611328125">
                <text:p>565.776611328125</text:p>
              </table:table-cell>
              <table:table-cell office:value-type="float" office:value="0.003711606">
                <text:p>0.003711606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65.894775390625">
                <text:p>565.894775390625</text:p>
              </table:table-cell>
              <table:table-cell office:value-type="float" office:value="0.01420164">
                <text:p>0.0142016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66.012878417969">
                <text:p>566.012878417969</text:p>
              </table:table-cell>
              <table:table-cell office:value-type="float" office:value="0.004530012">
                <text:p>0.00453001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66.131042480469">
                <text:p>566.131042480469</text:p>
              </table:table-cell>
              <table:table-cell office:value-type="float" office:value="0.00310672">
                <text:p>0.00310672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66.249206542969">
                <text:p>566.249206542969</text:p>
              </table:table-cell>
              <table:table-cell office:value-type="float" office:value="0.005173945">
                <text:p>0.00517394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66.367370605469">
                <text:p>566.367370605469</text:p>
              </table:table-cell>
              <table:table-cell office:value-type="float" office:value="0.007457191">
                <text:p>0.00745719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66.485473632813">
                <text:p>566.485473632813</text:p>
              </table:table-cell>
              <table:table-cell office:value-type="float" office:value="-0.003018335">
                <text:p>-0.00301833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6.603637695313">
                <text:p>566.603637695313</text:p>
              </table:table-cell>
              <table:table-cell office:value-type="float" office:value="0.01884794">
                <text:p>0.0188479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66.721801757813">
                <text:p>566.721801757813</text:p>
              </table:table-cell>
              <table:table-cell office:value-type="float" office:value="0.007894679">
                <text:p>0.00789467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66.839965820313">
                <text:p>566.839965820313</text:p>
              </table:table-cell>
              <table:table-cell office:value-type="float" office:value="0.001464893">
                <text:p>0.00146489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66.958129882813">
                <text:p>566.958129882813</text:p>
              </table:table-cell>
              <table:table-cell office:value-type="float" office:value="0.00918952">
                <text:p>0.00918952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67.076293945313">
                <text:p>567.076293945313</text:p>
              </table:table-cell>
              <table:table-cell office:value-type="float" office:value="0.02184228">
                <text:p>0.02184228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67.194458007813">
                <text:p>567.194458007813</text:p>
              </table:table-cell>
              <table:table-cell office:value-type="float" office:value="0.01339031">
                <text:p>0.01339031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67.312622070313">
                <text:p>567.312622070313</text:p>
              </table:table-cell>
              <table:table-cell office:value-type="float" office:value="0.007552774">
                <text:p>0.007552774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67.430847167969">
                <text:p>567.430847167969</text:p>
              </table:table-cell>
              <table:table-cell office:value-type="float" office:value="0.002252995">
                <text:p>0.00225299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67.549011230469">
                <text:p>567.549011230469</text:p>
              </table:table-cell>
              <table:table-cell office:value-type="float" office:value="0.01594688">
                <text:p>0.0159468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67.667175292969">
                <text:p>567.667175292969</text:p>
              </table:table-cell>
              <table:table-cell office:value-type="float" office:value="0.008814855">
                <text:p>0.00881485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67.785339355469">
                <text:p>567.785339355469</text:p>
              </table:table-cell>
              <table:table-cell office:value-type="float" office:value="0.0109812">
                <text:p>0.010981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67.903564453125">
                <text:p>567.903564453125</text:p>
              </table:table-cell>
              <table:table-cell office:value-type="float" office:value="0.003224174">
                <text:p>0.00322417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68.021728515625">
                <text:p>568.021728515625</text:p>
              </table:table-cell>
              <table:table-cell office:value-type="float" office:value="0.02872482">
                <text:p>0.02872482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68.139953613281">
                <text:p>568.139953613281</text:p>
              </table:table-cell>
              <table:table-cell office:value-type="float" office:value="0.03072432">
                <text:p>0.0307243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68.258117675781">
                <text:p>568.258117675781</text:p>
              </table:table-cell>
              <table:table-cell office:value-type="float" office:value="-0.000734726">
                <text:p>-0.000734726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68.376342773438">
                <text:p>568.376342773438</text:p>
              </table:table-cell>
              <table:table-cell office:value-type="float" office:value="0.004605775">
                <text:p>0.00460577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68.494506835938">
                <text:p>568.494506835938</text:p>
              </table:table-cell>
              <table:table-cell office:value-type="float" office:value="0.015197">
                <text:p>0.01519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68.612731933594">
                <text:p>568.612731933594</text:p>
              </table:table-cell>
              <table:table-cell office:value-type="float" office:value="0.01580719">
                <text:p>0.0158071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68.73095703125">
                <text:p>568.73095703125</text:p>
              </table:table-cell>
              <table:table-cell office:value-type="float" office:value="-0.005097935">
                <text:p>-0.00509793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68.84912109375">
                <text:p>568.84912109375</text:p>
              </table:table-cell>
              <table:table-cell office:value-type="float" office:value="0.0111774">
                <text:p>0.0111774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68.967346191406">
                <text:p>568.967346191406</text:p>
              </table:table-cell>
              <table:table-cell office:value-type="float" office:value="0.01335262">
                <text:p>0.0133526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69.085571289063">
                <text:p>569.085571289063</text:p>
              </table:table-cell>
              <table:table-cell office:value-type="float" office:value="0.02572207">
                <text:p>0.0257220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69.203796386719">
                <text:p>569.203796386719</text:p>
              </table:table-cell>
              <table:table-cell office:value-type="float" office:value="-0.003385564">
                <text:p>-0.00338556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9.322021484375">
                <text:p>569.322021484375</text:p>
              </table:table-cell>
              <table:table-cell office:value-type="float" office:value="0.008948199">
                <text:p>0.008948199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69.440246582031">
                <text:p>569.440246582031</text:p>
              </table:table-cell>
              <table:table-cell office:value-type="float" office:value="0.009252636">
                <text:p>0.009252636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69.558471679688">
                <text:p>569.558471679688</text:p>
              </table:table-cell>
              <table:table-cell office:value-type="float" office:value="0.01666322">
                <text:p>0.0166632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69.676696777344">
                <text:p>569.676696777344</text:p>
              </table:table-cell>
              <table:table-cell office:value-type="float" office:value="0.01022512">
                <text:p>0.0102251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9.794921875">
                <text:p>569.794921875</text:p>
              </table:table-cell>
              <table:table-cell office:value-type="float" office:value="-0.0002703261">
                <text:p>-0.0002703261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69.913146972656">
                <text:p>569.913146972656</text:p>
              </table:table-cell>
              <table:table-cell office:value-type="float" office:value="-0.001818506">
                <text:p>-0.001818506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70.031372070313">
                <text:p>570.031372070313</text:p>
              </table:table-cell>
              <table:table-cell office:value-type="float" office:value="0.00536371">
                <text:p>0.0053637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70.149597167969">
                <text:p>570.149597167969</text:p>
              </table:table-cell>
              <table:table-cell office:value-type="float" office:value="0.007052244">
                <text:p>0.007052244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70.267883300781">
                <text:p>570.267883300781</text:p>
              </table:table-cell>
              <table:table-cell office:value-type="float" office:value="-0.004825558">
                <text:p>-0.00482555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70.386108398438">
                <text:p>570.386108398438</text:p>
              </table:table-cell>
              <table:table-cell office:value-type="float" office:value="0.00682272">
                <text:p>0.0068227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70.504333496094">
                <text:p>570.504333496094</text:p>
              </table:table-cell>
              <table:table-cell office:value-type="float" office:value="0.0181697">
                <text:p>0.0181697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70.622619628906">
                <text:p>570.622619628906</text:p>
              </table:table-cell>
              <table:table-cell office:value-type="float" office:value="0.02080901">
                <text:p>0.0208090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70.740844726563">
                <text:p>570.740844726563</text:p>
              </table:table-cell>
              <table:table-cell office:value-type="float" office:value="0.005353363">
                <text:p>0.00535336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70.859130859375">
                <text:p>570.859130859375</text:p>
              </table:table-cell>
              <table:table-cell office:value-type="float" office:value="0.002254521">
                <text:p>0.00225452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70.977355957031">
                <text:p>570.977355957031</text:p>
              </table:table-cell>
              <table:table-cell office:value-type="float" office:value="0.01067059">
                <text:p>0.01067059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1.095642089844">
                <text:p>571.095642089844</text:p>
              </table:table-cell>
              <table:table-cell office:value-type="float" office:value="0.000973351">
                <text:p>0.00097335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71.213928222656">
                <text:p>571.213928222656</text:p>
              </table:table-cell>
              <table:table-cell office:value-type="float" office:value="0.008911104">
                <text:p>0.008911104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1.332153320313">
                <text:p>571.332153320313</text:p>
              </table:table-cell>
              <table:table-cell office:value-type="float" office:value="0.01118596">
                <text:p>0.01118596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71.450439453125">
                <text:p>571.450439453125</text:p>
              </table:table-cell>
              <table:table-cell office:value-type="float" office:value="0.008854824">
                <text:p>0.00885482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71.568725585938">
                <text:p>571.568725585938</text:p>
              </table:table-cell>
              <table:table-cell office:value-type="float" office:value="-0.001208188">
                <text:p>-0.00120818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1.68701171875">
                <text:p>571.68701171875</text:p>
              </table:table-cell>
              <table:table-cell office:value-type="float" office:value="0.01501185">
                <text:p>0.0150118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71.805297851563">
                <text:p>571.805297851563</text:p>
              </table:table-cell>
              <table:table-cell office:value-type="float" office:value="0.004527583">
                <text:p>0.00452758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71.923583984375">
                <text:p>571.923583984375</text:p>
              </table:table-cell>
              <table:table-cell office:value-type="float" office:value="0.02557475">
                <text:p>0.0255747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72.041870117188">
                <text:p>572.041870117188</text:p>
              </table:table-cell>
              <table:table-cell office:value-type="float" office:value="0.006934643">
                <text:p>0.006934643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72.16015625">
                <text:p>572.16015625</text:p>
              </table:table-cell>
              <table:table-cell office:value-type="float" office:value="0.01686359">
                <text:p>0.0168635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72.278442382813">
                <text:p>572.278442382813</text:p>
              </table:table-cell>
              <table:table-cell office:value-type="float" office:value="0.004807181">
                <text:p>0.00480718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72.396728515625">
                <text:p>572.396728515625</text:p>
              </table:table-cell>
              <table:table-cell office:value-type="float" office:value="0.004396308">
                <text:p>0.004396308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72.515014648438">
                <text:p>572.515014648438</text:p>
              </table:table-cell>
              <table:table-cell office:value-type="float" office:value="0.001773702">
                <text:p>0.001773702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72.63330078125">
                <text:p>572.63330078125</text:p>
              </table:table-cell>
              <table:table-cell office:value-type="float" office:value="0.006925827">
                <text:p>0.00692582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2.751586914063">
                <text:p>572.751586914063</text:p>
              </table:table-cell>
              <table:table-cell office:value-type="float" office:value="0.01572285">
                <text:p>0.0157228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72.869934082031">
                <text:p>572.869934082031</text:p>
              </table:table-cell>
              <table:table-cell office:value-type="float" office:value="0.003287853">
                <text:p>0.00328785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72.988220214844">
                <text:p>572.988220214844</text:p>
              </table:table-cell>
              <table:table-cell office:value-type="float" office:value="0.002719042">
                <text:p>0.00271904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3.106506347656">
                <text:p>573.106506347656</text:p>
              </table:table-cell>
              <table:table-cell office:value-type="float" office:value="0.01496624">
                <text:p>0.0149662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73.224853515625">
                <text:p>573.224853515625</text:p>
              </table:table-cell>
              <table:table-cell office:value-type="float" office:value="0.008267465">
                <text:p>0.00826746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73.343139648438">
                <text:p>573.343139648438</text:p>
              </table:table-cell>
              <table:table-cell office:value-type="float" office:value="0.009644401">
                <text:p>0.00964440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73.461486816406">
                <text:p>573.461486816406</text:p>
              </table:table-cell>
              <table:table-cell office:value-type="float" office:value="0.01798431">
                <text:p>0.0179843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73.579772949219">
                <text:p>573.579772949219</text:p>
              </table:table-cell>
              <table:table-cell office:value-type="float" office:value="0.007656906">
                <text:p>0.00765690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73.698120117188">
                <text:p>573.698120117188</text:p>
              </table:table-cell>
              <table:table-cell office:value-type="float" office:value="0.01354391">
                <text:p>0.0135439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73.81640625">
                <text:p>573.81640625</text:p>
              </table:table-cell>
              <table:table-cell office:value-type="float" office:value="0.006442624">
                <text:p>0.00644262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73.934753417969">
                <text:p>573.934753417969</text:p>
              </table:table-cell>
              <table:table-cell office:value-type="float" office:value="0.009730147">
                <text:p>0.00973014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74.053100585938">
                <text:p>574.053100585938</text:p>
              </table:table-cell>
              <table:table-cell office:value-type="float" office:value="0.007302375">
                <text:p>0.00730237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74.171447753906">
                <text:p>574.171447753906</text:p>
              </table:table-cell>
              <table:table-cell office:value-type="float" office:value="0.008302222">
                <text:p>0.00830222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74.289733886719">
                <text:p>574.289733886719</text:p>
              </table:table-cell>
              <table:table-cell office:value-type="float" office:value="0.006496567">
                <text:p>0.00649656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74.408081054688">
                <text:p>574.408081054688</text:p>
              </table:table-cell>
              <table:table-cell office:value-type="float" office:value="0.015327">
                <text:p>0.015327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74.526428222656">
                <text:p>574.526428222656</text:p>
              </table:table-cell>
              <table:table-cell office:value-type="float" office:value="0.01428204">
                <text:p>0.0142820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74.644775390625">
                <text:p>574.644775390625</text:p>
              </table:table-cell>
              <table:table-cell office:value-type="float" office:value="0.01412115">
                <text:p>0.0141211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74.763122558594">
                <text:p>574.763122558594</text:p>
              </table:table-cell>
              <table:table-cell office:value-type="float" office:value="0.01762669">
                <text:p>0.01762669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74.881469726563">
                <text:p>574.881469726563</text:p>
              </table:table-cell>
              <table:table-cell office:value-type="float" office:value="0.01983782">
                <text:p>0.0198378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74.999816894531">
                <text:p>574.999816894531</text:p>
              </table:table-cell>
              <table:table-cell office:value-type="float" office:value="0.0100344">
                <text:p>0.010034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75.1181640625">
                <text:p>575.1181640625</text:p>
              </table:table-cell>
              <table:table-cell office:value-type="float" office:value="0.03310785">
                <text:p>0.0331078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75.236572265625">
                <text:p>575.236572265625</text:p>
              </table:table-cell>
              <table:table-cell office:value-type="float" office:value="0.01039419">
                <text:p>0.0103941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75.354919433594">
                <text:p>575.354919433594</text:p>
              </table:table-cell>
              <table:table-cell office:value-type="float" office:value="0.02554869">
                <text:p>0.02554869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75.473266601563">
                <text:p>575.473266601563</text:p>
              </table:table-cell>
              <table:table-cell office:value-type="float" office:value="0.009851244">
                <text:p>0.00985124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75.591613769531">
                <text:p>575.591613769531</text:p>
              </table:table-cell>
              <table:table-cell office:value-type="float" office:value="0.009621486">
                <text:p>0.009621486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75.710021972656">
                <text:p>575.710021972656</text:p>
              </table:table-cell>
              <table:table-cell office:value-type="float" office:value="0.01036003">
                <text:p>0.01036003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75.828369140625">
                <text:p>575.828369140625</text:p>
              </table:table-cell>
              <table:table-cell office:value-type="float" office:value="0.01199512">
                <text:p>0.0119951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75.94677734375">
                <text:p>575.94677734375</text:p>
              </table:table-cell>
              <table:table-cell office:value-type="float" office:value="0.02049825">
                <text:p>0.0204982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76.065124511719">
                <text:p>576.065124511719</text:p>
              </table:table-cell>
              <table:table-cell office:value-type="float" office:value="0.01909444">
                <text:p>0.0190944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76.183532714844">
                <text:p>576.183532714844</text:p>
              </table:table-cell>
              <table:table-cell office:value-type="float" office:value="0.01101537">
                <text:p>0.0110153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76.301879882813">
                <text:p>576.301879882813</text:p>
              </table:table-cell>
              <table:table-cell office:value-type="float" office:value="0.02436921">
                <text:p>0.0243692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76.420288085938">
                <text:p>576.420288085938</text:p>
              </table:table-cell>
              <table:table-cell office:value-type="float" office:value="0.0270158">
                <text:p>0.027015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76.538635253906">
                <text:p>576.538635253906</text:p>
              </table:table-cell>
              <table:table-cell office:value-type="float" office:value="0.01576319">
                <text:p>0.0157631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76.657043457031">
                <text:p>576.657043457031</text:p>
              </table:table-cell>
              <table:table-cell office:value-type="float" office:value="0.03231828">
                <text:p>0.0323182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6.775451660156">
                <text:p>576.775451660156</text:p>
              </table:table-cell>
              <table:table-cell office:value-type="float" office:value="0.01186029">
                <text:p>0.01186029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76.893859863281">
                <text:p>576.893859863281</text:p>
              </table:table-cell>
              <table:table-cell office:value-type="float" office:value="0.01676976">
                <text:p>0.0167697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77.012268066406">
                <text:p>577.012268066406</text:p>
              </table:table-cell>
              <table:table-cell office:value-type="float" office:value="0.02866421">
                <text:p>0.02866421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77.130615234375">
                <text:p>577.130615234375</text:p>
              </table:table-cell>
              <table:table-cell office:value-type="float" office:value="0.02256024">
                <text:p>0.0225602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77.2490234375">
                <text:p>577.2490234375</text:p>
              </table:table-cell>
              <table:table-cell office:value-type="float" office:value="0.02670899">
                <text:p>0.0267089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77.367431640625">
                <text:p>577.367431640625</text:p>
              </table:table-cell>
              <table:table-cell office:value-type="float" office:value="0.01469229">
                <text:p>0.01469229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77.48583984375">
                <text:p>577.48583984375</text:p>
              </table:table-cell>
              <table:table-cell office:value-type="float" office:value="0.02856686">
                <text:p>0.0285668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577.604248046875">
                <text:p>577.604248046875</text:p>
              </table:table-cell>
              <table:table-cell office:value-type="float" office:value="0.01593">
                <text:p>0.01593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77.722717285156">
                <text:p>577.722717285156</text:p>
              </table:table-cell>
              <table:table-cell office:value-type="float" office:value="0.01933994">
                <text:p>0.0193399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77.841125488281">
                <text:p>577.841125488281</text:p>
              </table:table-cell>
              <table:table-cell office:value-type="float" office:value="0.02345504">
                <text:p>0.02345504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77.959533691406">
                <text:p>577.959533691406</text:p>
              </table:table-cell>
              <table:table-cell office:value-type="float" office:value="0.01864646">
                <text:p>0.0186464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78.077941894531">
                <text:p>578.077941894531</text:p>
              </table:table-cell>
              <table:table-cell office:value-type="float" office:value="0.03780632">
                <text:p>0.0378063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78.196350097656">
                <text:p>578.196350097656</text:p>
              </table:table-cell>
              <table:table-cell office:value-type="float" office:value="0.02103819">
                <text:p>0.02103819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78.314819335938">
                <text:p>578.314819335938</text:p>
              </table:table-cell>
              <table:table-cell office:value-type="float" office:value="0.02138789">
                <text:p>0.0213878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78.433227539063">
                <text:p>578.433227539063</text:p>
              </table:table-cell>
              <table:table-cell office:value-type="float" office:value="0.02454556">
                <text:p>0.02454556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78.551635742188">
                <text:p>578.551635742188</text:p>
              </table:table-cell>
              <table:table-cell office:value-type="float" office:value="0.0259928">
                <text:p>0.025992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78.670104980469">
                <text:p>578.670104980469</text:p>
              </table:table-cell>
              <table:table-cell office:value-type="float" office:value="0.03571324">
                <text:p>0.0357132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78.788513183594">
                <text:p>578.788513183594</text:p>
              </table:table-cell>
              <table:table-cell office:value-type="float" office:value="0.05296338">
                <text:p>0.0529633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78.906982421875">
                <text:p>578.906982421875</text:p>
              </table:table-cell>
              <table:table-cell office:value-type="float" office:value="0.02088984">
                <text:p>0.02088984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79.025451660156">
                <text:p>579.025451660156</text:p>
              </table:table-cell>
              <table:table-cell office:value-type="float" office:value="0.02772673">
                <text:p>0.02772673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79.143859863281">
                <text:p>579.143859863281</text:p>
              </table:table-cell>
              <table:table-cell office:value-type="float" office:value="0.03263193">
                <text:p>0.0326319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9.262329101563">
                <text:p>579.262329101563</text:p>
              </table:table-cell>
              <table:table-cell office:value-type="float" office:value="0.02755616">
                <text:p>0.02755616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79.380798339844">
                <text:p>579.380798339844</text:p>
              </table:table-cell>
              <table:table-cell office:value-type="float" office:value="0.03250353">
                <text:p>0.03250353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79.499206542969">
                <text:p>579.499206542969</text:p>
              </table:table-cell>
              <table:table-cell office:value-type="float" office:value="0.02771227">
                <text:p>0.02771227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79.61767578125">
                <text:p>579.61767578125</text:p>
              </table:table-cell>
              <table:table-cell office:value-type="float" office:value="0.02901425">
                <text:p>0.0290142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79.736145019531">
                <text:p>579.736145019531</text:p>
              </table:table-cell>
              <table:table-cell office:value-type="float" office:value="0.03191333">
                <text:p>0.03191333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79.854614257813">
                <text:p>579.854614257813</text:p>
              </table:table-cell>
              <table:table-cell office:value-type="float" office:value="0.02633094">
                <text:p>0.0263309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79.973083496094">
                <text:p>579.973083496094</text:p>
              </table:table-cell>
              <table:table-cell office:value-type="float" office:value="0.02674532">
                <text:p>0.0267453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80.091552734375">
                <text:p>580.091552734375</text:p>
              </table:table-cell>
              <table:table-cell office:value-type="float" office:value="0.03763353">
                <text:p>0.03763353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80.210021972656">
                <text:p>580.210021972656</text:p>
              </table:table-cell>
              <table:table-cell office:value-type="float" office:value="0.04874655">
                <text:p>0.0487465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80.328491210938">
                <text:p>580.328491210938</text:p>
              </table:table-cell>
              <table:table-cell office:value-type="float" office:value="0.03944986">
                <text:p>0.0394498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80.446960449219">
                <text:p>580.446960449219</text:p>
              </table:table-cell>
              <table:table-cell office:value-type="float" office:value="0.03454334">
                <text:p>0.0345433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80.5654296875">
                <text:p>580.5654296875</text:p>
              </table:table-cell>
              <table:table-cell office:value-type="float" office:value="0.03570574">
                <text:p>0.03570574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80.683898925781">
                <text:p>580.683898925781</text:p>
              </table:table-cell>
              <table:table-cell office:value-type="float" office:value="0.04623408">
                <text:p>0.0462340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80.802368164063">
                <text:p>580.802368164063</text:p>
              </table:table-cell>
              <table:table-cell office:value-type="float" office:value="0.0405584">
                <text:p>0.040558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80.9208984375">
                <text:p>580.9208984375</text:p>
              </table:table-cell>
              <table:table-cell office:value-type="float" office:value="0.03946671">
                <text:p>0.0394667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81.039367675781">
                <text:p>581.039367675781</text:p>
              </table:table-cell>
              <table:table-cell office:value-type="float" office:value="0.03898182">
                <text:p>0.0389818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1.157836914063">
                <text:p>581.157836914063</text:p>
              </table:table-cell>
              <table:table-cell office:value-type="float" office:value="0.04964345">
                <text:p>0.0496434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1.2763671875">
                <text:p>581.2763671875</text:p>
              </table:table-cell>
              <table:table-cell office:value-type="float" office:value="0.05289155">
                <text:p>0.0528915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81.394836425781">
                <text:p>581.394836425781</text:p>
              </table:table-cell>
              <table:table-cell office:value-type="float" office:value="0.04544425">
                <text:p>0.0454442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81.513366699219">
                <text:p>581.513366699219</text:p>
              </table:table-cell>
              <table:table-cell office:value-type="float" office:value="0.0534572">
                <text:p>0.053457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81.6318359375">
                <text:p>581.6318359375</text:p>
              </table:table-cell>
              <table:table-cell office:value-type="float" office:value="0.04125451">
                <text:p>0.0412545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81.750366210938">
                <text:p>581.750366210938</text:p>
              </table:table-cell>
              <table:table-cell office:value-type="float" office:value="0.03780295">
                <text:p>0.0378029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81.868835449219">
                <text:p>581.868835449219</text:p>
              </table:table-cell>
              <table:table-cell office:value-type="float" office:value="0.0412905">
                <text:p>0.041290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81.987365722656">
                <text:p>581.987365722656</text:p>
              </table:table-cell>
              <table:table-cell office:value-type="float" office:value="0.0431765">
                <text:p>0.043176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82.105895996094">
                <text:p>582.105895996094</text:p>
              </table:table-cell>
              <table:table-cell office:value-type="float" office:value="0.04708235">
                <text:p>0.0470823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82.224365234375">
                <text:p>582.224365234375</text:p>
              </table:table-cell>
              <table:table-cell office:value-type="float" office:value="0.05013025">
                <text:p>0.0501302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82.342895507813">
                <text:p>582.342895507813</text:p>
              </table:table-cell>
              <table:table-cell office:value-type="float" office:value="0.04621845">
                <text:p>0.0462184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82.46142578125">
                <text:p>582.46142578125</text:p>
              </table:table-cell>
              <table:table-cell office:value-type="float" office:value="0.04855125">
                <text:p>0.0485512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82.579956054688">
                <text:p>582.579956054688</text:p>
              </table:table-cell>
              <table:table-cell office:value-type="float" office:value="0.04481562">
                <text:p>0.0448156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82.698486328125">
                <text:p>582.698486328125</text:p>
              </table:table-cell>
              <table:table-cell office:value-type="float" office:value="0.04279147">
                <text:p>0.04279147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82.817016601563">
                <text:p>582.817016601563</text:p>
              </table:table-cell>
              <table:table-cell office:value-type="float" office:value="0.05186404">
                <text:p>0.0518640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82.935546875">
                <text:p>582.935546875</text:p>
              </table:table-cell>
              <table:table-cell office:value-type="float" office:value="0.04214725">
                <text:p>0.0421472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83.054077148438">
                <text:p>583.054077148438</text:p>
              </table:table-cell>
              <table:table-cell office:value-type="float" office:value="0.04744612">
                <text:p>0.04744612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83.172607421875">
                <text:p>583.172607421875</text:p>
              </table:table-cell>
              <table:table-cell office:value-type="float" office:value="0.07680093">
                <text:p>0.0768009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83.291137695313">
                <text:p>583.291137695313</text:p>
              </table:table-cell>
              <table:table-cell office:value-type="float" office:value="0.05151788">
                <text:p>0.0515178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83.40966796875">
                <text:p>583.40966796875</text:p>
              </table:table-cell>
              <table:table-cell office:value-type="float" office:value="0.0456991">
                <text:p>0.045699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3.528198242188">
                <text:p>583.528198242188</text:p>
              </table:table-cell>
              <table:table-cell office:value-type="float" office:value="0.05300057">
                <text:p>0.0530005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83.646789550781">
                <text:p>583.646789550781</text:p>
              </table:table-cell>
              <table:table-cell office:value-type="float" office:value="0.04822384">
                <text:p>0.0482238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83.765319824219">
                <text:p>583.765319824219</text:p>
              </table:table-cell>
              <table:table-cell office:value-type="float" office:value="0.04726047">
                <text:p>0.0472604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83.883850097656">
                <text:p>583.883850097656</text:p>
              </table:table-cell>
              <table:table-cell office:value-type="float" office:value="0.06008912">
                <text:p>0.0600891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84.00244140625">
                <text:p>584.00244140625</text:p>
              </table:table-cell>
              <table:table-cell office:value-type="float" office:value="0.04613433">
                <text:p>0.0461343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84.120971679688">
                <text:p>584.120971679688</text:p>
              </table:table-cell>
              <table:table-cell office:value-type="float" office:value="0.0613111">
                <text:p>0.061311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84.239501953125">
                <text:p>584.239501953125</text:p>
              </table:table-cell>
              <table:table-cell office:value-type="float" office:value="0.05741593">
                <text:p>0.05741593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84.358093261719">
                <text:p>584.358093261719</text:p>
              </table:table-cell>
              <table:table-cell office:value-type="float" office:value="0.05377517">
                <text:p>0.05377517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84.476623535156">
                <text:p>584.476623535156</text:p>
              </table:table-cell>
              <table:table-cell office:value-type="float" office:value="0.06222906">
                <text:p>0.06222906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4.59521484375">
                <text:p>584.59521484375</text:p>
              </table:table-cell>
              <table:table-cell office:value-type="float" office:value="0.06488871">
                <text:p>0.06488871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84.713806152344">
                <text:p>584.713806152344</text:p>
              </table:table-cell>
              <table:table-cell office:value-type="float" office:value="0.0581618">
                <text:p>0.058161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4.832336425781">
                <text:p>584.832336425781</text:p>
              </table:table-cell>
              <table:table-cell office:value-type="float" office:value="0.05878642">
                <text:p>0.0587864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84.950927734375">
                <text:p>584.950927734375</text:p>
              </table:table-cell>
              <table:table-cell office:value-type="float" office:value="0.05775506">
                <text:p>0.0577550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85.069519042969">
                <text:p>585.069519042969</text:p>
              </table:table-cell>
              <table:table-cell office:value-type="float" office:value="0.05044651">
                <text:p>0.0504465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85.188110351563">
                <text:p>585.188110351563</text:p>
              </table:table-cell>
              <table:table-cell office:value-type="float" office:value="0.06426763">
                <text:p>0.06426763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85.306640625">
                <text:p>585.306640625</text:p>
              </table:table-cell>
              <table:table-cell office:value-type="float" office:value="0.06563087">
                <text:p>0.06563087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85.425231933594">
                <text:p>585.425231933594</text:p>
              </table:table-cell>
              <table:table-cell office:value-type="float" office:value="0.05796794">
                <text:p>0.0579679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5.543823242188">
                <text:p>585.543823242188</text:p>
              </table:table-cell>
              <table:table-cell office:value-type="float" office:value="0.08122894">
                <text:p>0.08122894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85.662414550781">
                <text:p>585.662414550781</text:p>
              </table:table-cell>
              <table:table-cell office:value-type="float" office:value="0.05448441">
                <text:p>0.05448441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5.781005859375">
                <text:p>585.781005859375</text:p>
              </table:table-cell>
              <table:table-cell office:value-type="float" office:value="0.06261326">
                <text:p>0.06261326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85.899597167969">
                <text:p>585.899597167969</text:p>
              </table:table-cell>
              <table:table-cell office:value-type="float" office:value="0.06846626">
                <text:p>0.0684662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86.018188476563">
                <text:p>586.018188476563</text:p>
              </table:table-cell>
              <table:table-cell office:value-type="float" office:value="0.05608315">
                <text:p>0.0560831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86.136779785156">
                <text:p>586.136779785156</text:p>
              </table:table-cell>
              <table:table-cell office:value-type="float" office:value="0.05915001">
                <text:p>0.0591500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86.255432128906">
                <text:p>586.255432128906</text:p>
              </table:table-cell>
              <table:table-cell office:value-type="float" office:value="0.06636225">
                <text:p>0.0663622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86.3740234375">
                <text:p>586.3740234375</text:p>
              </table:table-cell>
              <table:table-cell office:value-type="float" office:value="0.06695616">
                <text:p>0.06695616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86.492614746094">
                <text:p>586.492614746094</text:p>
              </table:table-cell>
              <table:table-cell office:value-type="float" office:value="0.06766279">
                <text:p>0.06766279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86.611206054688">
                <text:p>586.611206054688</text:p>
              </table:table-cell>
              <table:table-cell office:value-type="float" office:value="0.07582909">
                <text:p>0.07582909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86.729858398438">
                <text:p>586.729858398438</text:p>
              </table:table-cell>
              <table:table-cell office:value-type="float" office:value="0.0718713">
                <text:p>0.071871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86.848449707031">
                <text:p>586.848449707031</text:p>
              </table:table-cell>
              <table:table-cell office:value-type="float" office:value="0.07434464">
                <text:p>0.07434464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86.967041015625">
                <text:p>586.967041015625</text:p>
              </table:table-cell>
              <table:table-cell office:value-type="float" office:value="0.06342132">
                <text:p>0.0634213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87.085693359375">
                <text:p>587.085693359375</text:p>
              </table:table-cell>
              <table:table-cell office:value-type="float" office:value="0.06434488">
                <text:p>0.06434488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87.204284667969">
                <text:p>587.204284667969</text:p>
              </table:table-cell>
              <table:table-cell office:value-type="float" office:value="0.07622367">
                <text:p>0.0762236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87.322937011719">
                <text:p>587.322937011719</text:p>
              </table:table-cell>
              <table:table-cell office:value-type="float" office:value="0.07102214">
                <text:p>0.07102214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87.441589355469">
                <text:p>587.441589355469</text:p>
              </table:table-cell>
              <table:table-cell office:value-type="float" office:value="0.07571339">
                <text:p>0.07571339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87.560180664063">
                <text:p>587.560180664063</text:p>
              </table:table-cell>
              <table:table-cell office:value-type="float" office:value="0.06208702">
                <text:p>0.0620870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7.678833007813">
                <text:p>587.678833007813</text:p>
              </table:table-cell>
              <table:table-cell office:value-type="float" office:value="0.07160524">
                <text:p>0.07160524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87.797424316406">
                <text:p>587.797424316406</text:p>
              </table:table-cell>
              <table:table-cell office:value-type="float" office:value="0.07685848">
                <text:p>0.07685848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7.916076660156">
                <text:p>587.916076660156</text:p>
              </table:table-cell>
              <table:table-cell office:value-type="float" office:value="0.08088773">
                <text:p>0.08088773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8.034729003906">
                <text:p>588.034729003906</text:p>
              </table:table-cell>
              <table:table-cell office:value-type="float" office:value="0.07246026">
                <text:p>0.07246026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8.153381347656">
                <text:p>588.153381347656</text:p>
              </table:table-cell>
              <table:table-cell office:value-type="float" office:value="0.07384806">
                <text:p>0.07384806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88.272033691406">
                <text:p>588.272033691406</text:p>
              </table:table-cell>
              <table:table-cell office:value-type="float" office:value="0.07430045">
                <text:p>0.0743004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88.390686035156">
                <text:p>588.390686035156</text:p>
              </table:table-cell>
              <table:table-cell office:value-type="float" office:value="0.08354826">
                <text:p>0.08354826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88.509338378906">
                <text:p>588.509338378906</text:p>
              </table:table-cell>
              <table:table-cell office:value-type="float" office:value="0.07346274">
                <text:p>0.07346274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88.627990722656">
                <text:p>588.627990722656</text:p>
              </table:table-cell>
              <table:table-cell office:value-type="float" office:value="0.0692514">
                <text:p>0.069251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88.746643066406">
                <text:p>588.746643066406</text:p>
              </table:table-cell>
              <table:table-cell office:value-type="float" office:value="0.06892563">
                <text:p>0.0689256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88.865295410156">
                <text:p>588.865295410156</text:p>
              </table:table-cell>
              <table:table-cell office:value-type="float" office:value="0.07144646">
                <text:p>0.07144646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88.983947753906">
                <text:p>588.983947753906</text:p>
              </table:table-cell>
              <table:table-cell office:value-type="float" office:value="0.06903376">
                <text:p>0.0690337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89.102600097656">
                <text:p>589.102600097656</text:p>
              </table:table-cell>
              <table:table-cell office:value-type="float" office:value="0.07934191">
                <text:p>0.07934191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89.221252441406">
                <text:p>589.221252441406</text:p>
              </table:table-cell>
              <table:table-cell office:value-type="float" office:value="0.06638607">
                <text:p>0.06638607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89.339904785156">
                <text:p>589.339904785156</text:p>
              </table:table-cell>
              <table:table-cell office:value-type="float" office:value="0.07176413">
                <text:p>0.07176413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89.458618164063">
                <text:p>589.458618164063</text:p>
              </table:table-cell>
              <table:table-cell office:value-type="float" office:value="0.07043135">
                <text:p>0.0704313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89.577270507813">
                <text:p>589.577270507813</text:p>
              </table:table-cell>
              <table:table-cell office:value-type="float" office:value="0.06721576">
                <text:p>0.06721576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89.695922851563">
                <text:p>589.695922851563</text:p>
              </table:table-cell>
              <table:table-cell office:value-type="float" office:value="0.08045437">
                <text:p>0.08045437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89.814636230469">
                <text:p>589.814636230469</text:p>
              </table:table-cell>
              <table:table-cell office:value-type="float" office:value="0.06763867">
                <text:p>0.0676386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89.933288574219">
                <text:p>589.933288574219</text:p>
              </table:table-cell>
              <table:table-cell office:value-type="float" office:value="0.07538771">
                <text:p>0.07538771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90.052001953125">
                <text:p>590.052001953125</text:p>
              </table:table-cell>
              <table:table-cell office:value-type="float" office:value="0.07009449">
                <text:p>0.0700944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90.170654296875">
                <text:p>590.170654296875</text:p>
              </table:table-cell>
              <table:table-cell office:value-type="float" office:value="0.07584747">
                <text:p>0.0758474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90.289367675781">
                <text:p>590.289367675781</text:p>
              </table:table-cell>
              <table:table-cell office:value-type="float" office:value="0.06675515">
                <text:p>0.0667551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90.408020019531">
                <text:p>590.408020019531</text:p>
              </table:table-cell>
              <table:table-cell office:value-type="float" office:value="0.110978">
                <text:p>0.11097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90.526733398438">
                <text:p>590.526733398438</text:p>
              </table:table-cell>
              <table:table-cell office:value-type="float" office:value="0.08119351">
                <text:p>0.08119351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90.645446777344">
                <text:p>590.645446777344</text:p>
              </table:table-cell>
              <table:table-cell office:value-type="float" office:value="0.07169659">
                <text:p>0.0716965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90.764099121094">
                <text:p>590.764099121094</text:p>
              </table:table-cell>
              <table:table-cell office:value-type="float" office:value="0.07238472">
                <text:p>0.07238472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90.8828125">
                <text:p>590.8828125</text:p>
              </table:table-cell>
              <table:table-cell office:value-type="float" office:value="0.08199774">
                <text:p>0.0819977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1.001525878906">
                <text:p>591.001525878906</text:p>
              </table:table-cell>
              <table:table-cell office:value-type="float" office:value="0.08361977">
                <text:p>0.0836197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91.120239257813">
                <text:p>591.120239257813</text:p>
              </table:table-cell>
              <table:table-cell office:value-type="float" office:value="0.07082599">
                <text:p>0.07082599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91.238891601563">
                <text:p>591.238891601563</text:p>
              </table:table-cell>
              <table:table-cell office:value-type="float" office:value="0.07128605">
                <text:p>0.0712860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91.357604980469">
                <text:p>591.357604980469</text:p>
              </table:table-cell>
              <table:table-cell office:value-type="float" office:value="0.08139445">
                <text:p>0.0813944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1.476318359375">
                <text:p>591.476318359375</text:p>
              </table:table-cell>
              <table:table-cell office:value-type="float" office:value="0.07322076">
                <text:p>0.07322076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91.595031738281">
                <text:p>591.595031738281</text:p>
              </table:table-cell>
              <table:table-cell office:value-type="float" office:value="0.08901983">
                <text:p>0.0890198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91.713745117188">
                <text:p>591.713745117188</text:p>
              </table:table-cell>
              <table:table-cell office:value-type="float" office:value="0.07538237">
                <text:p>0.07538237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91.832458496094">
                <text:p>591.832458496094</text:p>
              </table:table-cell>
              <table:table-cell office:value-type="float" office:value="0.08717962">
                <text:p>0.0871796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91.951232910156">
                <text:p>591.951232910156</text:p>
              </table:table-cell>
              <table:table-cell office:value-type="float" office:value="0.07707258">
                <text:p>0.0770725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92.069946289063">
                <text:p>592.069946289063</text:p>
              </table:table-cell>
              <table:table-cell office:value-type="float" office:value="0.07892475">
                <text:p>0.0789247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92.188659667969">
                <text:p>592.188659667969</text:p>
              </table:table-cell>
              <table:table-cell office:value-type="float" office:value="0.06991798">
                <text:p>0.06991798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92.307373046875">
                <text:p>592.307373046875</text:p>
              </table:table-cell>
              <table:table-cell office:value-type="float" office:value="0.07195407">
                <text:p>0.0719540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92.426086425781">
                <text:p>592.426086425781</text:p>
              </table:table-cell>
              <table:table-cell office:value-type="float" office:value="0.09327196">
                <text:p>0.09327196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92.544860839844">
                <text:p>592.544860839844</text:p>
              </table:table-cell>
              <table:table-cell office:value-type="float" office:value="0.07309394">
                <text:p>0.07309394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2.66357421875">
                <text:p>592.66357421875</text:p>
              </table:table-cell>
              <table:table-cell office:value-type="float" office:value="0.06840932">
                <text:p>0.06840932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92.782348632813">
                <text:p>592.782348632813</text:p>
              </table:table-cell>
              <table:table-cell office:value-type="float" office:value="0.07007326">
                <text:p>0.0700732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92.901062011719">
                <text:p>592.901062011719</text:p>
              </table:table-cell>
              <table:table-cell office:value-type="float" office:value="0.07571002">
                <text:p>0.07571002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93.019775390625">
                <text:p>593.019775390625</text:p>
              </table:table-cell>
              <table:table-cell office:value-type="float" office:value="0.07166715">
                <text:p>0.0716671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93.138549804688">
                <text:p>593.138549804688</text:p>
              </table:table-cell>
              <table:table-cell office:value-type="float" office:value="0.06794086">
                <text:p>0.06794086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93.257263183594">
                <text:p>593.257263183594</text:p>
              </table:table-cell>
              <table:table-cell office:value-type="float" office:value="0.06715466">
                <text:p>0.06715466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93.376037597656">
                <text:p>593.376037597656</text:p>
              </table:table-cell>
              <table:table-cell office:value-type="float" office:value="0.06473645">
                <text:p>0.0647364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93.494812011719">
                <text:p>593.494812011719</text:p>
              </table:table-cell>
              <table:table-cell office:value-type="float" office:value="0.08026909">
                <text:p>0.08026909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93.613525390625">
                <text:p>593.613525390625</text:p>
              </table:table-cell>
              <table:table-cell office:value-type="float" office:value="0.07048456">
                <text:p>0.07048456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93.732299804688">
                <text:p>593.732299804688</text:p>
              </table:table-cell>
              <table:table-cell office:value-type="float" office:value="0.07243033">
                <text:p>0.07243033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93.85107421875">
                <text:p>593.85107421875</text:p>
              </table:table-cell>
              <table:table-cell office:value-type="float" office:value="0.07491228">
                <text:p>0.0749122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93.969848632813">
                <text:p>593.969848632813</text:p>
              </table:table-cell>
              <table:table-cell office:value-type="float" office:value="0.07239053">
                <text:p>0.07239053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94.088562011719">
                <text:p>594.088562011719</text:p>
              </table:table-cell>
              <table:table-cell office:value-type="float" office:value="0.07196144">
                <text:p>0.0719614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94.207336425781">
                <text:p>594.207336425781</text:p>
              </table:table-cell>
              <table:table-cell office:value-type="float" office:value="0.07426002">
                <text:p>0.0742600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94.326110839844">
                <text:p>594.326110839844</text:p>
              </table:table-cell>
              <table:table-cell office:value-type="float" office:value="0.07904654">
                <text:p>0.0790465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94.444885253906">
                <text:p>594.444885253906</text:p>
              </table:table-cell>
              <table:table-cell office:value-type="float" office:value="0.06817103">
                <text:p>0.0681710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94.563659667969">
                <text:p>594.563659667969</text:p>
              </table:table-cell>
              <table:table-cell office:value-type="float" office:value="0.07263615">
                <text:p>0.0726361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94.682434082031">
                <text:p>594.682434082031</text:p>
              </table:table-cell>
              <table:table-cell office:value-type="float" office:value="0.07798494">
                <text:p>0.07798494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94.801208496094">
                <text:p>594.801208496094</text:p>
              </table:table-cell>
              <table:table-cell office:value-type="float" office:value="0.07353937">
                <text:p>0.0735393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94.919982910156">
                <text:p>594.919982910156</text:p>
              </table:table-cell>
              <table:table-cell office:value-type="float" office:value="0.07070354">
                <text:p>0.0707035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95.038818359375">
                <text:p>595.038818359375</text:p>
              </table:table-cell>
              <table:table-cell office:value-type="float" office:value="0.0757013">
                <text:p>0.0757013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95.157592773438">
                <text:p>595.157592773438</text:p>
              </table:table-cell>
              <table:table-cell office:value-type="float" office:value="0.08596405">
                <text:p>0.0859640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95.2763671875">
                <text:p>595.2763671875</text:p>
              </table:table-cell>
              <table:table-cell office:value-type="float" office:value="0.0976532">
                <text:p>0.0976532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95.395141601563">
                <text:p>595.395141601563</text:p>
              </table:table-cell>
              <table:table-cell office:value-type="float" office:value="0.07616301">
                <text:p>0.07616301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95.513916015625">
                <text:p>595.513916015625</text:p>
              </table:table-cell>
              <table:table-cell office:value-type="float" office:value="0.08570496">
                <text:p>0.08570496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95.632751464844">
                <text:p>595.632751464844</text:p>
              </table:table-cell>
              <table:table-cell office:value-type="float" office:value="0.06752906">
                <text:p>0.06752906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95.751525878906">
                <text:p>595.751525878906</text:p>
              </table:table-cell>
              <table:table-cell office:value-type="float" office:value="0.07322523">
                <text:p>0.07322523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95.870361328125">
                <text:p>595.870361328125</text:p>
              </table:table-cell>
              <table:table-cell office:value-type="float" office:value="0.07228768">
                <text:p>0.07228768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95.989135742188">
                <text:p>595.989135742188</text:p>
              </table:table-cell>
              <table:table-cell office:value-type="float" office:value="0.08102891">
                <text:p>0.08102891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96.107971191406">
                <text:p>596.107971191406</text:p>
              </table:table-cell>
              <table:table-cell office:value-type="float" office:value="0.0744042">
                <text:p>0.0744042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96.226745605469">
                <text:p>596.226745605469</text:p>
              </table:table-cell>
              <table:table-cell office:value-type="float" office:value="0.07794451">
                <text:p>0.0779445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96.345581054688">
                <text:p>596.345581054688</text:p>
              </table:table-cell>
              <table:table-cell office:value-type="float" office:value="0.07226595">
                <text:p>0.0722659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96.46435546875">
                <text:p>596.46435546875</text:p>
              </table:table-cell>
              <table:table-cell office:value-type="float" office:value="0.08700141">
                <text:p>0.08700141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96.583190917969">
                <text:p>596.583190917969</text:p>
              </table:table-cell>
              <table:table-cell office:value-type="float" office:value="0.0726882">
                <text:p>0.0726882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96.702026367188">
                <text:p>596.702026367188</text:p>
              </table:table-cell>
              <table:table-cell office:value-type="float" office:value="0.07667735">
                <text:p>0.0766773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96.82080078125">
                <text:p>596.82080078125</text:p>
              </table:table-cell>
              <table:table-cell office:value-type="float" office:value="0.0728642">
                <text:p>0.0728642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96.939636230469">
                <text:p>596.939636230469</text:p>
              </table:table-cell>
              <table:table-cell office:value-type="float" office:value="0.06963427">
                <text:p>0.06963427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97.058471679688">
                <text:p>597.058471679688</text:p>
              </table:table-cell>
              <table:table-cell office:value-type="float" office:value="0.07369681">
                <text:p>0.0736968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97.177307128906">
                <text:p>597.177307128906</text:p>
              </table:table-cell>
              <table:table-cell office:value-type="float" office:value="0.07049047">
                <text:p>0.0704904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97.296142578125">
                <text:p>597.296142578125</text:p>
              </table:table-cell>
              <table:table-cell office:value-type="float" office:value="0.08519378">
                <text:p>0.08519378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97.414978027344">
                <text:p>597.414978027344</text:p>
              </table:table-cell>
              <table:table-cell office:value-type="float" office:value="0.0723529">
                <text:p>0.072352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7.533752441406">
                <text:p>597.533752441406</text:p>
              </table:table-cell>
              <table:table-cell office:value-type="float" office:value="0.06708834">
                <text:p>0.06708834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97.652587890625">
                <text:p>597.652587890625</text:p>
              </table:table-cell>
              <table:table-cell office:value-type="float" office:value="0.0922248">
                <text:p>0.092224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97.771423339844">
                <text:p>597.771423339844</text:p>
              </table:table-cell>
              <table:table-cell office:value-type="float" office:value="0.07652646">
                <text:p>0.0765264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97.890319824219">
                <text:p>597.890319824219</text:p>
              </table:table-cell>
              <table:table-cell office:value-type="float" office:value="0.0790843">
                <text:p>0.0790843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98.009155273438">
                <text:p>598.009155273438</text:p>
              </table:table-cell>
              <table:table-cell office:value-type="float" office:value="0.07068836">
                <text:p>0.07068836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98.127990722656">
                <text:p>598.127990722656</text:p>
              </table:table-cell>
              <table:table-cell office:value-type="float" office:value="0.06732335">
                <text:p>0.0673233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98.246826171875">
                <text:p>598.246826171875</text:p>
              </table:table-cell>
              <table:table-cell office:value-type="float" office:value="0.07891299">
                <text:p>0.0789129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98.365661621094">
                <text:p>598.365661621094</text:p>
              </table:table-cell>
              <table:table-cell office:value-type="float" office:value="0.07509501">
                <text:p>0.0750950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98.484497070313">
                <text:p>598.484497070313</text:p>
              </table:table-cell>
              <table:table-cell office:value-type="float" office:value="0.0712619">
                <text:p>0.0712619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98.603393554688">
                <text:p>598.603393554688</text:p>
              </table:table-cell>
              <table:table-cell office:value-type="float" office:value="0.07927309">
                <text:p>0.0792730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98.722229003906">
                <text:p>598.722229003906</text:p>
              </table:table-cell>
              <table:table-cell office:value-type="float" office:value="0.0670452">
                <text:p>0.0670452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98.841064453125">
                <text:p>598.841064453125</text:p>
              </table:table-cell>
              <table:table-cell office:value-type="float" office:value="0.07028147">
                <text:p>0.07028147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98.9599609375">
                <text:p>598.9599609375</text:p>
              </table:table-cell>
              <table:table-cell office:value-type="float" office:value="0.08224248">
                <text:p>0.08224248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99.078796386719">
                <text:p>599.078796386719</text:p>
              </table:table-cell>
              <table:table-cell office:value-type="float" office:value="0.08205775">
                <text:p>0.08205775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99.197692871094">
                <text:p>599.197692871094</text:p>
              </table:table-cell>
              <table:table-cell office:value-type="float" office:value="0.07368904">
                <text:p>0.07368904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99.316528320313">
                <text:p>599.316528320313</text:p>
              </table:table-cell>
              <table:table-cell office:value-type="float" office:value="0.05925269">
                <text:p>0.05925269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9.435424804688">
                <text:p>599.435424804688</text:p>
              </table:table-cell>
              <table:table-cell office:value-type="float" office:value="0.07735862">
                <text:p>0.0773586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99.554321289063">
                <text:p>599.554321289063</text:p>
              </table:table-cell>
              <table:table-cell office:value-type="float" office:value="0.06355148">
                <text:p>0.06355148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99.673156738281">
                <text:p>599.673156738281</text:p>
              </table:table-cell>
              <table:table-cell office:value-type="float" office:value="0.06810462">
                <text:p>0.0681046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9.792053222656">
                <text:p>599.792053222656</text:p>
              </table:table-cell>
              <table:table-cell office:value-type="float" office:value="0.07364201">
                <text:p>0.07364201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9.910949707031">
                <text:p>599.910949707031</text:p>
              </table:table-cell>
              <table:table-cell office:value-type="float" office:value="0.07610901">
                <text:p>0.07610901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00.02978515625">
                <text:p>600.02978515625</text:p>
              </table:table-cell>
              <table:table-cell office:value-type="float" office:value="0.06745543">
                <text:p>0.06745543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0.148681640625">
                <text:p>600.148681640625</text:p>
              </table:table-cell>
              <table:table-cell office:value-type="float" office:value="0.07393569">
                <text:p>0.0739356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00.267578125">
                <text:p>600.267578125</text:p>
              </table:table-cell>
              <table:table-cell office:value-type="float" office:value="0.06562489">
                <text:p>0.0656248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00.386474609375">
                <text:p>600.386474609375</text:p>
              </table:table-cell>
              <table:table-cell office:value-type="float" office:value="0.06189868">
                <text:p>0.06189868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.50537109375">
                <text:p>600.50537109375</text:p>
              </table:table-cell>
              <table:table-cell office:value-type="float" office:value="0.08914656">
                <text:p>0.08914656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0.624267578125">
                <text:p>600.624267578125</text:p>
              </table:table-cell>
              <table:table-cell office:value-type="float" office:value="0.0614723">
                <text:p>0.0614723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0.7431640625">
                <text:p>600.7431640625</text:p>
              </table:table-cell>
              <table:table-cell office:value-type="float" office:value="0.06534249">
                <text:p>0.06534249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0.862060546875">
                <text:p>600.862060546875</text:p>
              </table:table-cell>
              <table:table-cell office:value-type="float" office:value="0.05787184">
                <text:p>0.05787184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0.98095703125">
                <text:p>600.98095703125</text:p>
              </table:table-cell>
              <table:table-cell office:value-type="float" office:value="0.06890547">
                <text:p>0.0689054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1.099853515625">
                <text:p>601.099853515625</text:p>
              </table:table-cell>
              <table:table-cell office:value-type="float" office:value="0.05781516">
                <text:p>0.05781516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01.21875">
                <text:p>601.21875</text:p>
              </table:table-cell>
              <table:table-cell office:value-type="float" office:value="0.06901065">
                <text:p>0.0690106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01.337646484375">
                <text:p>601.337646484375</text:p>
              </table:table-cell>
              <table:table-cell office:value-type="float" office:value="0.06757293">
                <text:p>0.0675729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01.45654296875">
                <text:p>601.45654296875</text:p>
              </table:table-cell>
              <table:table-cell office:value-type="float" office:value="0.06568985">
                <text:p>0.0656898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01.575500488281">
                <text:p>601.575500488281</text:p>
              </table:table-cell>
              <table:table-cell office:value-type="float" office:value="0.06343482">
                <text:p>0.0634348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01.694396972656">
                <text:p>601.694396972656</text:p>
              </table:table-cell>
              <table:table-cell office:value-type="float" office:value="0.0661107">
                <text:p>0.066110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01.813293457031">
                <text:p>601.813293457031</text:p>
              </table:table-cell>
              <table:table-cell office:value-type="float" office:value="0.067095">
                <text:p>0.06709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01.932250976563">
                <text:p>601.932250976563</text:p>
              </table:table-cell>
              <table:table-cell office:value-type="float" office:value="0.06222371">
                <text:p>0.06222371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02.051147460938">
                <text:p>602.051147460938</text:p>
              </table:table-cell>
              <table:table-cell office:value-type="float" office:value="0.06981472">
                <text:p>0.0698147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02.170043945313">
                <text:p>602.170043945313</text:p>
              </table:table-cell>
              <table:table-cell office:value-type="float" office:value="0.07259527">
                <text:p>0.07259527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02.289001464844">
                <text:p>602.289001464844</text:p>
              </table:table-cell>
              <table:table-cell office:value-type="float" office:value="0.05564091">
                <text:p>0.05564091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02.407897949219">
                <text:p>602.407897949219</text:p>
              </table:table-cell>
              <table:table-cell office:value-type="float" office:value="0.06792789">
                <text:p>0.0679278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02.52685546875">
                <text:p>602.52685546875</text:p>
              </table:table-cell>
              <table:table-cell office:value-type="float" office:value="0.0701895">
                <text:p>0.070189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02.645751953125">
                <text:p>602.645751953125</text:p>
              </table:table-cell>
              <table:table-cell office:value-type="float" office:value="0.0552769">
                <text:p>0.055276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02.764709472656">
                <text:p>602.764709472656</text:p>
              </table:table-cell>
              <table:table-cell office:value-type="float" office:value="0.05943139">
                <text:p>0.0594313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2.883666992188">
                <text:p>602.883666992188</text:p>
              </table:table-cell>
              <table:table-cell office:value-type="float" office:value="0.04947823">
                <text:p>0.0494782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03.002563476563">
                <text:p>603.002563476563</text:p>
              </table:table-cell>
              <table:table-cell office:value-type="float" office:value="0.06259546">
                <text:p>0.06259546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03.121520996094">
                <text:p>603.121520996094</text:p>
              </table:table-cell>
              <table:table-cell office:value-type="float" office:value="0.06607995">
                <text:p>0.0660799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03.240478515625">
                <text:p>603.240478515625</text:p>
              </table:table-cell>
              <table:table-cell office:value-type="float" office:value="0.06967249">
                <text:p>0.0696724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03.359436035156">
                <text:p>603.359436035156</text:p>
              </table:table-cell>
              <table:table-cell office:value-type="float" office:value="0.068726">
                <text:p>0.068726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03.478393554688">
                <text:p>603.478393554688</text:p>
              </table:table-cell>
              <table:table-cell office:value-type="float" office:value="0.06315722">
                <text:p>0.06315722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03.597290039063">
                <text:p>603.597290039063</text:p>
              </table:table-cell>
              <table:table-cell office:value-type="float" office:value="0.06109647">
                <text:p>0.06109647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3.716247558594">
                <text:p>603.716247558594</text:p>
              </table:table-cell>
              <table:table-cell office:value-type="float" office:value="0.05909023">
                <text:p>0.0590902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3.835205078125">
                <text:p>603.835205078125</text:p>
              </table:table-cell>
              <table:table-cell office:value-type="float" office:value="0.05341045">
                <text:p>0.0534104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03.954162597656">
                <text:p>603.954162597656</text:p>
              </table:table-cell>
              <table:table-cell office:value-type="float" office:value="0.05607511">
                <text:p>0.05607511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04.073120117188">
                <text:p>604.073120117188</text:p>
              </table:table-cell>
              <table:table-cell office:value-type="float" office:value="0.05640209">
                <text:p>0.05640209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04.192077636719">
                <text:p>604.192077636719</text:p>
              </table:table-cell>
              <table:table-cell office:value-type="float" office:value="0.05226659">
                <text:p>0.05226659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04.31103515625">
                <text:p>604.31103515625</text:p>
              </table:table-cell>
              <table:table-cell office:value-type="float" office:value="0.07398162">
                <text:p>0.0739816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04.430053710938">
                <text:p>604.430053710938</text:p>
              </table:table-cell>
              <table:table-cell office:value-type="float" office:value="0.05971526">
                <text:p>0.05971526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04.549011230469">
                <text:p>604.549011230469</text:p>
              </table:table-cell>
              <table:table-cell office:value-type="float" office:value="0.05516005">
                <text:p>0.0551600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04.66796875">
                <text:p>604.66796875</text:p>
              </table:table-cell>
              <table:table-cell office:value-type="float" office:value="0.05924747">
                <text:p>0.05924747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04.786926269531">
                <text:p>604.786926269531</text:p>
              </table:table-cell>
              <table:table-cell office:value-type="float" office:value="0.07052565">
                <text:p>0.0705256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04.905883789063">
                <text:p>604.905883789063</text:p>
              </table:table-cell>
              <table:table-cell office:value-type="float" office:value="0.06736496">
                <text:p>0.06736496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05.02490234375">
                <text:p>605.02490234375</text:p>
              </table:table-cell>
              <table:table-cell office:value-type="float" office:value="0.05691027">
                <text:p>0.05691027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05.143859863281">
                <text:p>605.143859863281</text:p>
              </table:table-cell>
              <table:table-cell office:value-type="float" office:value="0.05331087">
                <text:p>0.0533108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05.262817382813">
                <text:p>605.262817382813</text:p>
              </table:table-cell>
              <table:table-cell office:value-type="float" office:value="0.05200979">
                <text:p>0.0520097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05.3818359375">
                <text:p>605.3818359375</text:p>
              </table:table-cell>
              <table:table-cell office:value-type="float" office:value="0.05966297">
                <text:p>0.05966297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05.500793457031">
                <text:p>605.500793457031</text:p>
              </table:table-cell>
              <table:table-cell office:value-type="float" office:value="0.05573616">
                <text:p>0.05573616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05.619812011719">
                <text:p>605.619812011719</text:p>
              </table:table-cell>
              <table:table-cell office:value-type="float" office:value="0.05871496">
                <text:p>0.0587149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05.73876953125">
                <text:p>605.73876953125</text:p>
              </table:table-cell>
              <table:table-cell office:value-type="float" office:value="0.05249537">
                <text:p>0.05249537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5.857788085938">
                <text:p>605.857788085938</text:p>
              </table:table-cell>
              <table:table-cell office:value-type="float" office:value="0.06720296">
                <text:p>0.06720296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05.976806640625">
                <text:p>605.976806640625</text:p>
              </table:table-cell>
              <table:table-cell office:value-type="float" office:value="0.06749181">
                <text:p>0.0674918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06.095764160156">
                <text:p>606.095764160156</text:p>
              </table:table-cell>
              <table:table-cell office:value-type="float" office:value="0.05979786">
                <text:p>0.0597978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06.214782714844">
                <text:p>606.214782714844</text:p>
              </table:table-cell>
              <table:table-cell office:value-type="float" office:value="0.06844915">
                <text:p>0.0684491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06.333801269531">
                <text:p>606.333801269531</text:p>
              </table:table-cell>
              <table:table-cell office:value-type="float" office:value="0.05088025">
                <text:p>0.0508802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06.452758789063">
                <text:p>606.452758789063</text:p>
              </table:table-cell>
              <table:table-cell office:value-type="float" office:value="0.06355003">
                <text:p>0.0635500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06.57177734375">
                <text:p>606.57177734375</text:p>
              </table:table-cell>
              <table:table-cell office:value-type="float" office:value="0.05133869">
                <text:p>0.0513386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06.690795898438">
                <text:p>606.690795898438</text:p>
              </table:table-cell>
              <table:table-cell office:value-type="float" office:value="0.05750957">
                <text:p>0.05750957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06.809814453125">
                <text:p>606.809814453125</text:p>
              </table:table-cell>
              <table:table-cell office:value-type="float" office:value="0.0512022">
                <text:p>0.051202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06.928833007813">
                <text:p>606.928833007813</text:p>
              </table:table-cell>
              <table:table-cell office:value-type="float" office:value="0.05047608">
                <text:p>0.05047608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07.0478515625">
                <text:p>607.0478515625</text:p>
              </table:table-cell>
              <table:table-cell office:value-type="float" office:value="0.04847848">
                <text:p>0.0484784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07.166870117188">
                <text:p>607.166870117188</text:p>
              </table:table-cell>
              <table:table-cell office:value-type="float" office:value="0.07342699">
                <text:p>0.07342699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07.285888671875">
                <text:p>607.285888671875</text:p>
              </table:table-cell>
              <table:table-cell office:value-type="float" office:value="0.0638071">
                <text:p>0.0638071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07.404907226563">
                <text:p>607.404907226563</text:p>
              </table:table-cell>
              <table:table-cell office:value-type="float" office:value="0.05854284">
                <text:p>0.05854284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07.52392578125">
                <text:p>607.52392578125</text:p>
              </table:table-cell>
              <table:table-cell office:value-type="float" office:value="0.0564786">
                <text:p>0.0564786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07.642944335938">
                <text:p>607.642944335938</text:p>
              </table:table-cell>
              <table:table-cell office:value-type="float" office:value="0.06023746">
                <text:p>0.06023746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07.761962890625">
                <text:p>607.761962890625</text:p>
              </table:table-cell>
              <table:table-cell office:value-type="float" office:value="0.07362032">
                <text:p>0.07362032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07.880981445313">
                <text:p>607.880981445313</text:p>
              </table:table-cell>
              <table:table-cell office:value-type="float" office:value="0.06231278">
                <text:p>0.06231278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08">
                <text:p>608</text:p>
              </table:table-cell>
              <table:table-cell office:value-type="float" office:value="0.04811414">
                <text:p>0.04811414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08.119079589844">
                <text:p>608.119079589844</text:p>
              </table:table-cell>
              <table:table-cell office:value-type="float" office:value="0.05393625">
                <text:p>0.05393625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08.238098144531">
                <text:p>608.238098144531</text:p>
              </table:table-cell>
              <table:table-cell office:value-type="float" office:value="0.05335988">
                <text:p>0.05335988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08.357116699219">
                <text:p>608.357116699219</text:p>
              </table:table-cell>
              <table:table-cell office:value-type="float" office:value="0.05093348">
                <text:p>0.0509334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8.476196289063">
                <text:p>608.476196289063</text:p>
              </table:table-cell>
              <table:table-cell office:value-type="float" office:value="0.0578216">
                <text:p>0.0578216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08.59521484375">
                <text:p>608.59521484375</text:p>
              </table:table-cell>
              <table:table-cell office:value-type="float" office:value="0.06662382">
                <text:p>0.0666238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08.714233398438">
                <text:p>608.714233398438</text:p>
              </table:table-cell>
              <table:table-cell office:value-type="float" office:value="0.05644005">
                <text:p>0.0564400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08.833312988281">
                <text:p>608.833312988281</text:p>
              </table:table-cell>
              <table:table-cell office:value-type="float" office:value="0.05555602">
                <text:p>0.05555602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08.952331542969">
                <text:p>608.952331542969</text:p>
              </table:table-cell>
              <table:table-cell office:value-type="float" office:value="0.0435193">
                <text:p>0.0435193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09.071411132813">
                <text:p>609.071411132813</text:p>
              </table:table-cell>
              <table:table-cell office:value-type="float" office:value="0.04698537">
                <text:p>0.04698537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09.1904296875">
                <text:p>609.1904296875</text:p>
              </table:table-cell>
              <table:table-cell office:value-type="float" office:value="0.04570476">
                <text:p>0.04570476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9.309509277344">
                <text:p>609.309509277344</text:p>
              </table:table-cell>
              <table:table-cell office:value-type="float" office:value="0.06553107">
                <text:p>0.06553107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9.428588867188">
                <text:p>609.428588867188</text:p>
              </table:table-cell>
              <table:table-cell office:value-type="float" office:value="0.05536323">
                <text:p>0.05536323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09.547607421875">
                <text:p>609.547607421875</text:p>
              </table:table-cell>
              <table:table-cell office:value-type="float" office:value="0.05432087">
                <text:p>0.05432087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09.666687011719">
                <text:p>609.666687011719</text:p>
              </table:table-cell>
              <table:table-cell office:value-type="float" office:value="0.05063243">
                <text:p>0.05063243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09.785766601563">
                <text:p>609.785766601563</text:p>
              </table:table-cell>
              <table:table-cell office:value-type="float" office:value="0.05108913">
                <text:p>0.05108913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09.904846191406">
                <text:p>609.904846191406</text:p>
              </table:table-cell>
              <table:table-cell office:value-type="float" office:value="0.05321408">
                <text:p>0.05321408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10.023864746094">
                <text:p>610.023864746094</text:p>
              </table:table-cell>
              <table:table-cell office:value-type="float" office:value="0.04840238">
                <text:p>0.04840238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10.142944335938">
                <text:p>610.142944335938</text:p>
              </table:table-cell>
              <table:table-cell office:value-type="float" office:value="0.04863781">
                <text:p>0.0486378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10.262023925781">
                <text:p>610.262023925781</text:p>
              </table:table-cell>
              <table:table-cell office:value-type="float" office:value="0.06614821">
                <text:p>0.06614821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10.381103515625">
                <text:p>610.381103515625</text:p>
              </table:table-cell>
              <table:table-cell office:value-type="float" office:value="0.05397267">
                <text:p>0.0539726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10.500183105469">
                <text:p>610.500183105469</text:p>
              </table:table-cell>
              <table:table-cell office:value-type="float" office:value="0.05033798">
                <text:p>0.05033798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10.619262695313">
                <text:p>610.619262695313</text:p>
              </table:table-cell>
              <table:table-cell office:value-type="float" office:value="0.04513494">
                <text:p>0.04513494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10.738342285156">
                <text:p>610.738342285156</text:p>
              </table:table-cell>
              <table:table-cell office:value-type="float" office:value="0.05275727">
                <text:p>0.05275727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10.857421875">
                <text:p>610.857421875</text:p>
              </table:table-cell>
              <table:table-cell office:value-type="float" office:value="0.04579607">
                <text:p>0.04579607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10.976501464844">
                <text:p>610.976501464844</text:p>
              </table:table-cell>
              <table:table-cell office:value-type="float" office:value="0.05604557">
                <text:p>0.05604557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11.095581054688">
                <text:p>611.095581054688</text:p>
              </table:table-cell>
              <table:table-cell office:value-type="float" office:value="0.05167941">
                <text:p>0.0516794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11.214660644531">
                <text:p>611.214660644531</text:p>
              </table:table-cell>
              <table:table-cell office:value-type="float" office:value="0.04903777">
                <text:p>0.04903777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11.333801269531">
                <text:p>611.333801269531</text:p>
              </table:table-cell>
              <table:table-cell office:value-type="float" office:value="0.04514287">
                <text:p>0.0451428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1.452880859375">
                <text:p>611.452880859375</text:p>
              </table:table-cell>
              <table:table-cell office:value-type="float" office:value="0.03813147">
                <text:p>0.0381314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11.571960449219">
                <text:p>611.571960449219</text:p>
              </table:table-cell>
              <table:table-cell office:value-type="float" office:value="0.05156971">
                <text:p>0.05156971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11.691040039063">
                <text:p>611.691040039063</text:p>
              </table:table-cell>
              <table:table-cell office:value-type="float" office:value="0.05174533">
                <text:p>0.05174533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11.810180664063">
                <text:p>611.810180664063</text:p>
              </table:table-cell>
              <table:table-cell office:value-type="float" office:value="0.05024236">
                <text:p>0.05024236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11.929260253906">
                <text:p>611.929260253906</text:p>
              </table:table-cell>
              <table:table-cell office:value-type="float" office:value="0.05042682">
                <text:p>0.0504268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12.048400878906">
                <text:p>612.048400878906</text:p>
              </table:table-cell>
              <table:table-cell office:value-type="float" office:value="0.05249576">
                <text:p>0.05249576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12.16748046875">
                <text:p>612.16748046875</text:p>
              </table:table-cell>
              <table:table-cell office:value-type="float" office:value="0.04338329">
                <text:p>0.04338329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2.286560058594">
                <text:p>612.286560058594</text:p>
              </table:table-cell>
              <table:table-cell office:value-type="float" office:value="0.05655515">
                <text:p>0.05655515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12.405700683594">
                <text:p>612.405700683594</text:p>
              </table:table-cell>
              <table:table-cell office:value-type="float" office:value="0.05627419">
                <text:p>0.05627419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12.524780273438">
                <text:p>612.524780273438</text:p>
              </table:table-cell>
              <table:table-cell office:value-type="float" office:value="0.04557366">
                <text:p>0.0455736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12.643920898438">
                <text:p>612.643920898438</text:p>
              </table:table-cell>
              <table:table-cell office:value-type="float" office:value="0.04099138">
                <text:p>0.0409913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12.763061523438">
                <text:p>612.763061523438</text:p>
              </table:table-cell>
              <table:table-cell office:value-type="float" office:value="0.05772086">
                <text:p>0.05772086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2.882141113281">
                <text:p>612.882141113281</text:p>
              </table:table-cell>
              <table:table-cell office:value-type="float" office:value="0.04215948">
                <text:p>0.04215948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13.001281738281">
                <text:p>613.001281738281</text:p>
              </table:table-cell>
              <table:table-cell office:value-type="float" office:value="0.04929098">
                <text:p>0.0492909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13.120422363281">
                <text:p>613.120422363281</text:p>
              </table:table-cell>
              <table:table-cell office:value-type="float" office:value="0.04438255">
                <text:p>0.04438255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13.239501953125">
                <text:p>613.239501953125</text:p>
              </table:table-cell>
              <table:table-cell office:value-type="float" office:value="0.04791564">
                <text:p>0.04791564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13.358642578125">
                <text:p>613.358642578125</text:p>
              </table:table-cell>
              <table:table-cell office:value-type="float" office:value="0.0512937">
                <text:p>0.0512937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13.477783203125">
                <text:p>613.477783203125</text:p>
              </table:table-cell>
              <table:table-cell office:value-type="float" office:value="0.04264011">
                <text:p>0.0426401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3.596923828125">
                <text:p>613.596923828125</text:p>
              </table:table-cell>
              <table:table-cell office:value-type="float" office:value="0.0375465">
                <text:p>0.0375465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13.716064453125">
                <text:p>613.716064453125</text:p>
              </table:table-cell>
              <table:table-cell office:value-type="float" office:value="0.04176578">
                <text:p>0.04176578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13.835205078125">
                <text:p>613.835205078125</text:p>
              </table:table-cell>
              <table:table-cell office:value-type="float" office:value="0.03978267">
                <text:p>0.03978267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13.954345703125">
                <text:p>613.954345703125</text:p>
              </table:table-cell>
              <table:table-cell office:value-type="float" office:value="0.03563439">
                <text:p>0.03563439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14.073486328125">
                <text:p>614.073486328125</text:p>
              </table:table-cell>
              <table:table-cell office:value-type="float" office:value="0.04286333">
                <text:p>0.04286333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14.192626953125">
                <text:p>614.192626953125</text:p>
              </table:table-cell>
              <table:table-cell office:value-type="float" office:value="0.06091668">
                <text:p>0.06091668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14.311767578125">
                <text:p>614.311767578125</text:p>
              </table:table-cell>
              <table:table-cell office:value-type="float" office:value="0.03991525">
                <text:p>0.03991525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14.430908203125">
                <text:p>614.430908203125</text:p>
              </table:table-cell>
              <table:table-cell office:value-type="float" office:value="0.03983856">
                <text:p>0.03983856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14.550048828125">
                <text:p>614.550048828125</text:p>
              </table:table-cell>
              <table:table-cell office:value-type="float" office:value="0.03892608">
                <text:p>0.0389260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14.669189453125">
                <text:p>614.669189453125</text:p>
              </table:table-cell>
              <table:table-cell office:value-type="float" office:value="0.05100325">
                <text:p>0.05100325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4.788330078125">
                <text:p>614.788330078125</text:p>
              </table:table-cell>
              <table:table-cell office:value-type="float" office:value="0.04126825">
                <text:p>0.0412682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14.907531738281">
                <text:p>614.907531738281</text:p>
              </table:table-cell>
              <table:table-cell office:value-type="float" office:value="0.04713809">
                <text:p>0.04713809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15.026672363281">
                <text:p>615.026672363281</text:p>
              </table:table-cell>
              <table:table-cell office:value-type="float" office:value="0.04586004">
                <text:p>0.04586004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5.145812988281">
                <text:p>615.145812988281</text:p>
              </table:table-cell>
              <table:table-cell office:value-type="float" office:value="0.06849706">
                <text:p>0.0684970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15.264953613281">
                <text:p>615.264953613281</text:p>
              </table:table-cell>
              <table:table-cell office:value-type="float" office:value="0.04738694">
                <text:p>0.04738694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15.384155273438">
                <text:p>615.384155273438</text:p>
              </table:table-cell>
              <table:table-cell office:value-type="float" office:value="0.0475142">
                <text:p>0.0475142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15.503295898438">
                <text:p>615.503295898438</text:p>
              </table:table-cell>
              <table:table-cell office:value-type="float" office:value="0.04074777">
                <text:p>0.04074777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15.622497558594">
                <text:p>615.622497558594</text:p>
              </table:table-cell>
              <table:table-cell office:value-type="float" office:value="0.051511">
                <text:p>0.05151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15.741638183594">
                <text:p>615.741638183594</text:p>
              </table:table-cell>
              <table:table-cell office:value-type="float" office:value="0.0402714">
                <text:p>0.040271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5.86083984375">
                <text:p>615.86083984375</text:p>
              </table:table-cell>
              <table:table-cell office:value-type="float" office:value="0.04401043">
                <text:p>0.04401043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5.97998046875">
                <text:p>615.97998046875</text:p>
              </table:table-cell>
              <table:table-cell office:value-type="float" office:value="0.04018762">
                <text:p>0.04018762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6.099182128906">
                <text:p>616.099182128906</text:p>
              </table:table-cell>
              <table:table-cell office:value-type="float" office:value="0.04331971">
                <text:p>0.04331971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6.218322753906">
                <text:p>616.218322753906</text:p>
              </table:table-cell>
              <table:table-cell office:value-type="float" office:value="0.04842636">
                <text:p>0.04842636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6.337524414063">
                <text:p>616.337524414063</text:p>
              </table:table-cell>
              <table:table-cell office:value-type="float" office:value="0.03897236">
                <text:p>0.03897236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6.456726074219">
                <text:p>616.456726074219</text:p>
              </table:table-cell>
              <table:table-cell office:value-type="float" office:value="0.05567114">
                <text:p>0.05567114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.575866699219">
                <text:p>616.575866699219</text:p>
              </table:table-cell>
              <table:table-cell office:value-type="float" office:value="0.03904037">
                <text:p>0.03904037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6.695068359375">
                <text:p>616.695068359375</text:p>
              </table:table-cell>
              <table:table-cell office:value-type="float" office:value="0.03420458">
                <text:p>0.03420458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6.814270019531">
                <text:p>616.814270019531</text:p>
              </table:table-cell>
              <table:table-cell office:value-type="float" office:value="0.03848841">
                <text:p>0.0384884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6.933471679688">
                <text:p>616.933471679688</text:p>
              </table:table-cell>
              <table:table-cell office:value-type="float" office:value="0.04354609">
                <text:p>0.04354609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17.052612304688">
                <text:p>617.052612304688</text:p>
              </table:table-cell>
              <table:table-cell office:value-type="float" office:value="0.04088763">
                <text:p>0.04088763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17.171813964844">
                <text:p>617.171813964844</text:p>
              </table:table-cell>
              <table:table-cell office:value-type="float" office:value="0.05001135">
                <text:p>0.0500113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17.291015625">
                <text:p>617.291015625</text:p>
              </table:table-cell>
              <table:table-cell office:value-type="float" office:value="0.03729123">
                <text:p>0.03729123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17.410217285156">
                <text:p>617.410217285156</text:p>
              </table:table-cell>
              <table:table-cell office:value-type="float" office:value="0.0414369">
                <text:p>0.0414369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17.529418945313">
                <text:p>617.529418945313</text:p>
              </table:table-cell>
              <table:table-cell office:value-type="float" office:value="0.04895229">
                <text:p>0.04895229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17.648620605469">
                <text:p>617.648620605469</text:p>
              </table:table-cell>
              <table:table-cell office:value-type="float" office:value="0.03931634">
                <text:p>0.03931634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17.767822265625">
                <text:p>617.767822265625</text:p>
              </table:table-cell>
              <table:table-cell office:value-type="float" office:value="0.06268828">
                <text:p>0.06268828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17.887023925781">
                <text:p>617.887023925781</text:p>
              </table:table-cell>
              <table:table-cell office:value-type="float" office:value="0.0474587">
                <text:p>0.0474587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18.006225585938">
                <text:p>618.006225585938</text:p>
              </table:table-cell>
              <table:table-cell office:value-type="float" office:value="0.03896745">
                <text:p>0.0389674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18.125427246094">
                <text:p>618.125427246094</text:p>
              </table:table-cell>
              <table:table-cell office:value-type="float" office:value="0.0458727">
                <text:p>0.0458727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18.24462890625">
                <text:p>618.24462890625</text:p>
              </table:table-cell>
              <table:table-cell office:value-type="float" office:value="0.04913798">
                <text:p>0.04913798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18.363891601563">
                <text:p>618.363891601563</text:p>
              </table:table-cell>
              <table:table-cell office:value-type="float" office:value="0.04876217">
                <text:p>0.04876217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18.483093261719">
                <text:p>618.483093261719</text:p>
              </table:table-cell>
              <table:table-cell office:value-type="float" office:value="0.03861804">
                <text:p>0.0386180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18.602294921875">
                <text:p>618.602294921875</text:p>
              </table:table-cell>
              <table:table-cell office:value-type="float" office:value="0.04404318">
                <text:p>0.0440431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18.721496582031">
                <text:p>618.721496582031</text:p>
              </table:table-cell>
              <table:table-cell office:value-type="float" office:value="0.05566253">
                <text:p>0.05566253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18.840759277344">
                <text:p>618.840759277344</text:p>
              </table:table-cell>
              <table:table-cell office:value-type="float" office:value="0.03579815">
                <text:p>0.03579815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18.9599609375">
                <text:p>618.9599609375</text:p>
              </table:table-cell>
              <table:table-cell office:value-type="float" office:value="0.04800464">
                <text:p>0.04800464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19.079162597656">
                <text:p>619.079162597656</text:p>
              </table:table-cell>
              <table:table-cell office:value-type="float" office:value="0.03233997">
                <text:p>0.03233997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19.198425292969">
                <text:p>619.198425292969</text:p>
              </table:table-cell>
              <table:table-cell office:value-type="float" office:value="0.05363645">
                <text:p>0.0536364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19.317626953125">
                <text:p>619.317626953125</text:p>
              </table:table-cell>
              <table:table-cell office:value-type="float" office:value="0.03720119">
                <text:p>0.03720119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19.436889648438">
                <text:p>619.436889648438</text:p>
              </table:table-cell>
              <table:table-cell office:value-type="float" office:value="0.0474282">
                <text:p>0.047428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19.556091308594">
                <text:p>619.556091308594</text:p>
              </table:table-cell>
              <table:table-cell office:value-type="float" office:value="0.04122242">
                <text:p>0.0412224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19.675354003906">
                <text:p>619.675354003906</text:p>
              </table:table-cell>
              <table:table-cell office:value-type="float" office:value="0.0363275">
                <text:p>0.036327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19.794616699219">
                <text:p>619.794616699219</text:p>
              </table:table-cell>
              <table:table-cell office:value-type="float" office:value="0.04323841">
                <text:p>0.04323841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19.913818359375">
                <text:p>619.913818359375</text:p>
              </table:table-cell>
              <table:table-cell office:value-type="float" office:value="0.0315911">
                <text:p>0.0315911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20.033081054688">
                <text:p>620.033081054688</text:p>
              </table:table-cell>
              <table:table-cell office:value-type="float" office:value="0.05732885">
                <text:p>0.05732885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20.152282714844">
                <text:p>620.152282714844</text:p>
              </table:table-cell>
              <table:table-cell office:value-type="float" office:value="0.04524906">
                <text:p>0.0452490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20.271545410156">
                <text:p>620.271545410156</text:p>
              </table:table-cell>
              <table:table-cell office:value-type="float" office:value="0.04262184">
                <text:p>0.04262184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20.390808105469">
                <text:p>620.390808105469</text:p>
              </table:table-cell>
              <table:table-cell office:value-type="float" office:value="0.03255963">
                <text:p>0.03255963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20.510070800781">
                <text:p>620.510070800781</text:p>
              </table:table-cell>
              <table:table-cell office:value-type="float" office:value="0.0367791">
                <text:p>0.0367791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20.629333496094">
                <text:p>620.629333496094</text:p>
              </table:table-cell>
              <table:table-cell office:value-type="float" office:value="0.03683108">
                <text:p>0.03683108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20.74853515625">
                <text:p>620.74853515625</text:p>
              </table:table-cell>
              <table:table-cell office:value-type="float" office:value="0.02915768">
                <text:p>0.02915768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20.867797851563">
                <text:p>620.867797851563</text:p>
              </table:table-cell>
              <table:table-cell office:value-type="float" office:value="0.06304841">
                <text:p>0.06304841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20.987060546875">
                <text:p>620.987060546875</text:p>
              </table:table-cell>
              <table:table-cell office:value-type="float" office:value="0.03511819">
                <text:p>0.03511819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21.106323242188">
                <text:p>621.106323242188</text:p>
              </table:table-cell>
              <table:table-cell office:value-type="float" office:value="0.03485872">
                <text:p>0.03485872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21.2255859375">
                <text:p>621.2255859375</text:p>
              </table:table-cell>
              <table:table-cell office:value-type="float" office:value="0.04022815">
                <text:p>0.04022815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21.344848632813">
                <text:p>621.344848632813</text:p>
              </table:table-cell>
              <table:table-cell office:value-type="float" office:value="0.03178718">
                <text:p>0.03178718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21.464111328125">
                <text:p>621.464111328125</text:p>
              </table:table-cell>
              <table:table-cell office:value-type="float" office:value="0.03357757">
                <text:p>0.03357757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21.583374023438">
                <text:p>621.583374023438</text:p>
              </table:table-cell>
              <table:table-cell office:value-type="float" office:value="0.05942736">
                <text:p>0.05942736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21.70263671875">
                <text:p>621.70263671875</text:p>
              </table:table-cell>
              <table:table-cell office:value-type="float" office:value="0.03955279">
                <text:p>0.03955279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21.821899414063">
                <text:p>621.821899414063</text:p>
              </table:table-cell>
              <table:table-cell office:value-type="float" office:value="0.06291796">
                <text:p>0.06291796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21.941223144531">
                <text:p>621.941223144531</text:p>
              </table:table-cell>
              <table:table-cell office:value-type="float" office:value="0.02924477">
                <text:p>0.02924477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2.060485839844">
                <text:p>622.060485839844</text:p>
              </table:table-cell>
              <table:table-cell office:value-type="float" office:value="0.04665164">
                <text:p>0.04665164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22.179748535156">
                <text:p>622.179748535156</text:p>
              </table:table-cell>
              <table:table-cell office:value-type="float" office:value="0.05073301">
                <text:p>0.05073301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22.299011230469">
                <text:p>622.299011230469</text:p>
              </table:table-cell>
              <table:table-cell office:value-type="float" office:value="0.03393168">
                <text:p>0.0339316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22.418334960938">
                <text:p>622.418334960938</text:p>
              </table:table-cell>
              <table:table-cell office:value-type="float" office:value="0.03654228">
                <text:p>0.03654228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22.53759765625">
                <text:p>622.53759765625</text:p>
              </table:table-cell>
              <table:table-cell office:value-type="float" office:value="0.03571412">
                <text:p>0.03571412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22.656860351563">
                <text:p>622.656860351563</text:p>
              </table:table-cell>
              <table:table-cell office:value-type="float" office:value="0.03177888">
                <text:p>0.03177888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22.776184082031">
                <text:p>622.776184082031</text:p>
              </table:table-cell>
              <table:table-cell office:value-type="float" office:value="0.03898171">
                <text:p>0.03898171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22.895446777344">
                <text:p>622.895446777344</text:p>
              </table:table-cell>
              <table:table-cell office:value-type="float" office:value="0.04049801">
                <text:p>0.0404980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23.014709472656">
                <text:p>623.014709472656</text:p>
              </table:table-cell>
              <table:table-cell office:value-type="float" office:value="0.03763112">
                <text:p>0.03763112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23.134033203125">
                <text:p>623.134033203125</text:p>
              </table:table-cell>
              <table:table-cell office:value-type="float" office:value="0.02917389">
                <text:p>0.02917389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23.253295898438">
                <text:p>623.253295898438</text:p>
              </table:table-cell>
              <table:table-cell office:value-type="float" office:value="0.03195288">
                <text:p>0.03195288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23.372619628906">
                <text:p>623.372619628906</text:p>
              </table:table-cell>
              <table:table-cell office:value-type="float" office:value="0.04182554">
                <text:p>0.04182554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3.491943359375">
                <text:p>623.491943359375</text:p>
              </table:table-cell>
              <table:table-cell office:value-type="float" office:value="0.03647671">
                <text:p>0.03647671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23.611206054688">
                <text:p>623.611206054688</text:p>
              </table:table-cell>
              <table:table-cell office:value-type="float" office:value="0.03107626">
                <text:p>0.03107626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23.730529785156">
                <text:p>623.730529785156</text:p>
              </table:table-cell>
              <table:table-cell office:value-type="float" office:value="0.03800097">
                <text:p>0.03800097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23.849853515625">
                <text:p>623.849853515625</text:p>
              </table:table-cell>
              <table:table-cell office:value-type="float" office:value="0.03669722">
                <text:p>0.03669722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23.969116210938">
                <text:p>623.969116210938</text:p>
              </table:table-cell>
              <table:table-cell office:value-type="float" office:value="0.0356895">
                <text:p>0.0356895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24.088439941406">
                <text:p>624.088439941406</text:p>
              </table:table-cell>
              <table:table-cell office:value-type="float" office:value="0.02616353">
                <text:p>0.02616353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24.207763671875">
                <text:p>624.207763671875</text:p>
              </table:table-cell>
              <table:table-cell office:value-type="float" office:value="0.02643636">
                <text:p>0.0264363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24.327087402344">
                <text:p>624.327087402344</text:p>
              </table:table-cell>
              <table:table-cell office:value-type="float" office:value="0.03414521">
                <text:p>0.03414521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24.446350097656">
                <text:p>624.446350097656</text:p>
              </table:table-cell>
              <table:table-cell office:value-type="float" office:value="0.04969102">
                <text:p>0.04969102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24.565673828125">
                <text:p>624.565673828125</text:p>
              </table:table-cell>
              <table:table-cell office:value-type="float" office:value="0.040491">
                <text:p>0.040491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24.684997558594">
                <text:p>624.684997558594</text:p>
              </table:table-cell>
              <table:table-cell office:value-type="float" office:value="0.03673935">
                <text:p>0.0367393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24.804321289063">
                <text:p>624.804321289063</text:p>
              </table:table-cell>
              <table:table-cell office:value-type="float" office:value="0.03497628">
                <text:p>0.03497628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24.923645019531">
                <text:p>624.923645019531</text:p>
              </table:table-cell>
              <table:table-cell office:value-type="float" office:value="0.03976629">
                <text:p>0.0397662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25.04296875">
                <text:p>625.04296875</text:p>
              </table:table-cell>
              <table:table-cell office:value-type="float" office:value="0.02803684">
                <text:p>0.02803684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25.162292480469">
                <text:p>625.162292480469</text:p>
              </table:table-cell>
              <table:table-cell office:value-type="float" office:value="0.03261292">
                <text:p>0.03261292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25.281616210938">
                <text:p>625.281616210938</text:p>
              </table:table-cell>
              <table:table-cell office:value-type="float" office:value="0.0390002">
                <text:p>0.039000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25.400939941406">
                <text:p>625.400939941406</text:p>
              </table:table-cell>
              <table:table-cell office:value-type="float" office:value="0.03342422">
                <text:p>0.03342422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25.520263671875">
                <text:p>625.520263671875</text:p>
              </table:table-cell>
              <table:table-cell office:value-type="float" office:value="0.03184577">
                <text:p>0.03184577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25.639587402344">
                <text:p>625.639587402344</text:p>
              </table:table-cell>
              <table:table-cell office:value-type="float" office:value="0.03774719">
                <text:p>0.03774719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25.758911132813">
                <text:p>625.758911132813</text:p>
              </table:table-cell>
              <table:table-cell office:value-type="float" office:value="0.03961059">
                <text:p>0.03961059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25.878295898438">
                <text:p>625.878295898438</text:p>
              </table:table-cell>
              <table:table-cell office:value-type="float" office:value="0.029499">
                <text:p>0.029499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25.997619628906">
                <text:p>625.997619628906</text:p>
              </table:table-cell>
              <table:table-cell office:value-type="float" office:value="0.02827406">
                <text:p>0.02827406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26.116943359375">
                <text:p>626.116943359375</text:p>
              </table:table-cell>
              <table:table-cell office:value-type="float" office:value="0.03736241">
                <text:p>0.03736241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26.236267089844">
                <text:p>626.236267089844</text:p>
              </table:table-cell>
              <table:table-cell office:value-type="float" office:value="0.03877458">
                <text:p>0.0387745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26.355651855469">
                <text:p>626.355651855469</text:p>
              </table:table-cell>
              <table:table-cell office:value-type="float" office:value="0.05121551">
                <text:p>0.05121551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26.474975585938">
                <text:p>626.474975585938</text:p>
              </table:table-cell>
              <table:table-cell office:value-type="float" office:value="0.02642879">
                <text:p>0.02642879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6.594360351563">
                <text:p>626.594360351563</text:p>
              </table:table-cell>
              <table:table-cell office:value-type="float" office:value="0.04718005">
                <text:p>0.0471800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26.713684082031">
                <text:p>626.713684082031</text:p>
              </table:table-cell>
              <table:table-cell office:value-type="float" office:value="0.03231651">
                <text:p>0.03231651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26.8330078125">
                <text:p>626.8330078125</text:p>
              </table:table-cell>
              <table:table-cell office:value-type="float" office:value="0.04691173">
                <text:p>0.04691173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26.952392578125">
                <text:p>626.952392578125</text:p>
              </table:table-cell>
              <table:table-cell office:value-type="float" office:value="0.03946493">
                <text:p>0.0394649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27.071716308594">
                <text:p>627.071716308594</text:p>
              </table:table-cell>
              <table:table-cell office:value-type="float" office:value="0.04160263">
                <text:p>0.0416026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7.191101074219">
                <text:p>627.191101074219</text:p>
              </table:table-cell>
              <table:table-cell office:value-type="float" office:value="0.04435741">
                <text:p>0.04435741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27.310424804688">
                <text:p>627.310424804688</text:p>
              </table:table-cell>
              <table:table-cell office:value-type="float" office:value="0.03469808">
                <text:p>0.03469808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27.429809570313">
                <text:p>627.429809570313</text:p>
              </table:table-cell>
              <table:table-cell office:value-type="float" office:value="0.02612559">
                <text:p>0.02612559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27.549194335938">
                <text:p>627.549194335938</text:p>
              </table:table-cell>
              <table:table-cell office:value-type="float" office:value="0.02848866">
                <text:p>0.02848866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27.668518066406">
                <text:p>627.668518066406</text:p>
              </table:table-cell>
              <table:table-cell office:value-type="float" office:value="0.04127626">
                <text:p>0.04127626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27.787902832031">
                <text:p>627.787902832031</text:p>
              </table:table-cell>
              <table:table-cell office:value-type="float" office:value="0.03845198">
                <text:p>0.03845198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27.907287597656">
                <text:p>627.907287597656</text:p>
              </table:table-cell>
              <table:table-cell office:value-type="float" office:value="0.03055325">
                <text:p>0.0305532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28.026672363281">
                <text:p>628.026672363281</text:p>
              </table:table-cell>
              <table:table-cell office:value-type="float" office:value="0.02732271">
                <text:p>0.02732271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28.14599609375">
                <text:p>628.14599609375</text:p>
              </table:table-cell>
              <table:table-cell office:value-type="float" office:value="0.026024">
                <text:p>0.026024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8.265380859375">
                <text:p>628.265380859375</text:p>
              </table:table-cell>
              <table:table-cell office:value-type="float" office:value="0.03965832">
                <text:p>0.0396583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28.384765625">
                <text:p>628.384765625</text:p>
              </table:table-cell>
              <table:table-cell office:value-type="float" office:value="0.04423096">
                <text:p>0.04423096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28.504150390625">
                <text:p>628.504150390625</text:p>
              </table:table-cell>
              <table:table-cell office:value-type="float" office:value="0.02346525">
                <text:p>0.02346525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28.62353515625">
                <text:p>628.62353515625</text:p>
              </table:table-cell>
              <table:table-cell office:value-type="float" office:value="0.03587304">
                <text:p>0.03587304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28.742919921875">
                <text:p>628.742919921875</text:p>
              </table:table-cell>
              <table:table-cell office:value-type="float" office:value="0.02454545">
                <text:p>0.0245454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28.8623046875">
                <text:p>628.8623046875</text:p>
              </table:table-cell>
              <table:table-cell office:value-type="float" office:value="0.02824441">
                <text:p>0.02824441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28.981689453125">
                <text:p>628.981689453125</text:p>
              </table:table-cell>
              <table:table-cell office:value-type="float" office:value="0.02781447">
                <text:p>0.0278144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29.10107421875">
                <text:p>629.10107421875</text:p>
              </table:table-cell>
              <table:table-cell office:value-type="float" office:value="0.0256059">
                <text:p>0.0256059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29.220458984375">
                <text:p>629.220458984375</text:p>
              </table:table-cell>
              <table:table-cell office:value-type="float" office:value="0.05025762">
                <text:p>0.0502576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29.33984375">
                <text:p>629.33984375</text:p>
              </table:table-cell>
              <table:table-cell office:value-type="float" office:value="0.04178355">
                <text:p>0.04178355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9.459228515625">
                <text:p>629.459228515625</text:p>
              </table:table-cell>
              <table:table-cell office:value-type="float" office:value="0.0412066">
                <text:p>0.0412066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29.57861328125">
                <text:p>629.57861328125</text:p>
              </table:table-cell>
              <table:table-cell office:value-type="float" office:value="0.02440877">
                <text:p>0.02440877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9.697998046875">
                <text:p>629.697998046875</text:p>
              </table:table-cell>
              <table:table-cell office:value-type="float" office:value="0.02926092">
                <text:p>0.0292609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9.8173828125">
                <text:p>629.8173828125</text:p>
              </table:table-cell>
              <table:table-cell office:value-type="float" office:value="0.03220652">
                <text:p>0.0322065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29.936828613281">
                <text:p>629.936828613281</text:p>
              </table:table-cell>
              <table:table-cell office:value-type="float" office:value="0.05823155">
                <text:p>0.0582315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30.056213378906">
                <text:p>630.056213378906</text:p>
              </table:table-cell>
              <table:table-cell office:value-type="float" office:value="0.04245441">
                <text:p>0.04245441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30.175598144531">
                <text:p>630.175598144531</text:p>
              </table:table-cell>
              <table:table-cell office:value-type="float" office:value="0.04158035">
                <text:p>0.04158035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30.295043945313">
                <text:p>630.295043945313</text:p>
              </table:table-cell>
              <table:table-cell office:value-type="float" office:value="0.02555221">
                <text:p>0.02555221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0.414428710938">
                <text:p>630.414428710938</text:p>
              </table:table-cell>
              <table:table-cell office:value-type="float" office:value="0.03737457">
                <text:p>0.03737457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30.533813476563">
                <text:p>630.533813476563</text:p>
              </table:table-cell>
              <table:table-cell office:value-type="float" office:value="0.02984262">
                <text:p>0.02984262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30.653259277344">
                <text:p>630.653259277344</text:p>
              </table:table-cell>
              <table:table-cell office:value-type="float" office:value="0.02467017">
                <text:p>0.02467017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0.772644042969">
                <text:p>630.772644042969</text:p>
              </table:table-cell>
              <table:table-cell office:value-type="float" office:value="0.02983734">
                <text:p>0.0298373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30.89208984375">
                <text:p>630.89208984375</text:p>
              </table:table-cell>
              <table:table-cell office:value-type="float" office:value="0.03371097">
                <text:p>0.03371097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31.011474609375">
                <text:p>631.011474609375</text:p>
              </table:table-cell>
              <table:table-cell office:value-type="float" office:value="0.03976567">
                <text:p>0.03976567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31.130920410156">
                <text:p>631.130920410156</text:p>
              </table:table-cell>
              <table:table-cell office:value-type="float" office:value="0.03097058">
                <text:p>0.03097058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31.250305175781">
                <text:p>631.250305175781</text:p>
              </table:table-cell>
              <table:table-cell office:value-type="float" office:value="0.02884376">
                <text:p>0.02884376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31.369750976563">
                <text:p>631.369750976563</text:p>
              </table:table-cell>
              <table:table-cell office:value-type="float" office:value="0.03702854">
                <text:p>0.0370285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31.489135742188">
                <text:p>631.489135742188</text:p>
              </table:table-cell>
              <table:table-cell office:value-type="float" office:value="0.04063256">
                <text:p>0.04063256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31.608581542969">
                <text:p>631.608581542969</text:p>
              </table:table-cell>
              <table:table-cell office:value-type="float" office:value="0.02553581">
                <text:p>0.0255358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31.72802734375">
                <text:p>631.72802734375</text:p>
              </table:table-cell>
              <table:table-cell office:value-type="float" office:value="0.03706514">
                <text:p>0.03706514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31.847412109375">
                <text:p>631.847412109375</text:p>
              </table:table-cell>
              <table:table-cell office:value-type="float" office:value="0.02910051">
                <text:p>0.02910051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31.966857910156">
                <text:p>631.966857910156</text:p>
              </table:table-cell>
              <table:table-cell office:value-type="float" office:value="0.04459954">
                <text:p>0.04459954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32.086303710938">
                <text:p>632.086303710938</text:p>
              </table:table-cell>
              <table:table-cell office:value-type="float" office:value="0.02203412">
                <text:p>0.0220341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32.205749511719">
                <text:p>632.205749511719</text:p>
              </table:table-cell>
              <table:table-cell office:value-type="float" office:value="0.0298626">
                <text:p>0.0298626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32.3251953125">
                <text:p>632.3251953125</text:p>
              </table:table-cell>
              <table:table-cell office:value-type="float" office:value="0.02919474">
                <text:p>0.02919474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32.444580078125">
                <text:p>632.444580078125</text:p>
              </table:table-cell>
              <table:table-cell office:value-type="float" office:value="0.0401284">
                <text:p>0.0401284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32.564025878906">
                <text:p>632.564025878906</text:p>
              </table:table-cell>
              <table:table-cell office:value-type="float" office:value="0.02853871">
                <text:p>0.0285387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2.683471679688">
                <text:p>632.683471679688</text:p>
              </table:table-cell>
              <table:table-cell office:value-type="float" office:value="0.03060187">
                <text:p>0.03060187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2.802917480469">
                <text:p>632.802917480469</text:p>
              </table:table-cell>
              <table:table-cell office:value-type="float" office:value="0.02631706">
                <text:p>0.02631706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32.92236328125">
                <text:p>632.92236328125</text:p>
              </table:table-cell>
              <table:table-cell office:value-type="float" office:value="0.02247964">
                <text:p>0.02247964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33.041809082031">
                <text:p>633.041809082031</text:p>
              </table:table-cell>
              <table:table-cell office:value-type="float" office:value="0.03601175">
                <text:p>0.03601175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33.161254882813">
                <text:p>633.161254882813</text:p>
              </table:table-cell>
              <table:table-cell office:value-type="float" office:value="0.05826751">
                <text:p>0.05826751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33.280700683594">
                <text:p>633.280700683594</text:p>
              </table:table-cell>
              <table:table-cell office:value-type="float" office:value="0.0221786">
                <text:p>0.0221786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33.400146484375">
                <text:p>633.400146484375</text:p>
              </table:table-cell>
              <table:table-cell office:value-type="float" office:value="0.02683526">
                <text:p>0.0268352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33.519592285156">
                <text:p>633.519592285156</text:p>
              </table:table-cell>
              <table:table-cell office:value-type="float" office:value="0.02412031">
                <text:p>0.02412031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33.639038085938">
                <text:p>633.639038085938</text:p>
              </table:table-cell>
              <table:table-cell office:value-type="float" office:value="0.03861509">
                <text:p>0.0386150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33.758544921875">
                <text:p>633.758544921875</text:p>
              </table:table-cell>
              <table:table-cell office:value-type="float" office:value="0.01960938">
                <text:p>0.01960938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33.877990722656">
                <text:p>633.877990722656</text:p>
              </table:table-cell>
              <table:table-cell office:value-type="float" office:value="0.02837318">
                <text:p>0.02837318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33.997436523438">
                <text:p>633.997436523438</text:p>
              </table:table-cell>
              <table:table-cell office:value-type="float" office:value="0.02560483">
                <text:p>0.02560483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34.116882324219">
                <text:p>634.116882324219</text:p>
              </table:table-cell>
              <table:table-cell office:value-type="float" office:value="0.02246151">
                <text:p>0.02246151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34.236389160156">
                <text:p>634.236389160156</text:p>
              </table:table-cell>
              <table:table-cell office:value-type="float" office:value="0.02228312">
                <text:p>0.0222831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34.355834960938">
                <text:p>634.355834960938</text:p>
              </table:table-cell>
              <table:table-cell office:value-type="float" office:value="0.0281348">
                <text:p>0.028134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34.475280761719">
                <text:p>634.475280761719</text:p>
              </table:table-cell>
              <table:table-cell office:value-type="float" office:value="0.02362986">
                <text:p>0.02362986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34.594787597656">
                <text:p>634.594787597656</text:p>
              </table:table-cell>
              <table:table-cell office:value-type="float" office:value="0.04630759">
                <text:p>0.04630759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34.714233398438">
                <text:p>634.714233398438</text:p>
              </table:table-cell>
              <table:table-cell office:value-type="float" office:value="0.02300902">
                <text:p>0.02300902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34.833679199219">
                <text:p>634.833679199219</text:p>
              </table:table-cell>
              <table:table-cell office:value-type="float" office:value="0.02026953">
                <text:p>0.0202695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34.953186035156">
                <text:p>634.953186035156</text:p>
              </table:table-cell>
              <table:table-cell office:value-type="float" office:value="0.03236293">
                <text:p>0.03236293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35.072631835938">
                <text:p>635.072631835938</text:p>
              </table:table-cell>
              <table:table-cell office:value-type="float" office:value="0.03440981">
                <text:p>0.03440981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35.192138671875">
                <text:p>635.192138671875</text:p>
              </table:table-cell>
              <table:table-cell office:value-type="float" office:value="0.02538792">
                <text:p>0.02538792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35.311584472656">
                <text:p>635.311584472656</text:p>
              </table:table-cell>
              <table:table-cell office:value-type="float" office:value="0.01710032">
                <text:p>0.01710032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35.431091308594">
                <text:p>635.431091308594</text:p>
              </table:table-cell>
              <table:table-cell office:value-type="float" office:value="0.04438199">
                <text:p>0.04438199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35.550598144531">
                <text:p>635.550598144531</text:p>
              </table:table-cell>
              <table:table-cell office:value-type="float" office:value="0.03272821">
                <text:p>0.03272821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35.670043945313">
                <text:p>635.670043945313</text:p>
              </table:table-cell>
              <table:table-cell office:value-type="float" office:value="0.02003347">
                <text:p>0.0200334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5.78955078125">
                <text:p>635.78955078125</text:p>
              </table:table-cell>
              <table:table-cell office:value-type="float" office:value="0.02770021">
                <text:p>0.02770021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35.909057617188">
                <text:p>635.909057617188</text:p>
              </table:table-cell>
              <table:table-cell office:value-type="float" office:value="0.02512676">
                <text:p>0.02512676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36.028503417969">
                <text:p>636.028503417969</text:p>
              </table:table-cell>
              <table:table-cell office:value-type="float" office:value="0.02179675">
                <text:p>0.02179675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36.148010253906">
                <text:p>636.148010253906</text:p>
              </table:table-cell>
              <table:table-cell office:value-type="float" office:value="0.02185736">
                <text:p>0.02185736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36.267517089844">
                <text:p>636.267517089844</text:p>
              </table:table-cell>
              <table:table-cell office:value-type="float" office:value="0.03461107">
                <text:p>0.03461107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36.387023925781">
                <text:p>636.387023925781</text:p>
              </table:table-cell>
              <table:table-cell office:value-type="float" office:value="0.03556606">
                <text:p>0.03556606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36.506469726563">
                <text:p>636.506469726563</text:p>
              </table:table-cell>
              <table:table-cell office:value-type="float" office:value="0.02725087">
                <text:p>0.0272508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36.6259765625">
                <text:p>636.6259765625</text:p>
              </table:table-cell>
              <table:table-cell office:value-type="float" office:value="0.03476132">
                <text:p>0.03476132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36.745483398438">
                <text:p>636.745483398438</text:p>
              </table:table-cell>
              <table:table-cell office:value-type="float" office:value="0.01822556">
                <text:p>0.01822556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36.864990234375">
                <text:p>636.864990234375</text:p>
              </table:table-cell>
              <table:table-cell office:value-type="float" office:value="0.02406109">
                <text:p>0.0240610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36.984497070313">
                <text:p>636.984497070313</text:p>
              </table:table-cell>
              <table:table-cell office:value-type="float" office:value="0.01821934">
                <text:p>0.01821934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37.10400390625">
                <text:p>637.10400390625</text:p>
              </table:table-cell>
              <table:table-cell office:value-type="float" office:value="0.01820122">
                <text:p>0.01820122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37.223510742188">
                <text:p>637.223510742188</text:p>
              </table:table-cell>
              <table:table-cell office:value-type="float" office:value="0.0277102">
                <text:p>0.0277102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37.343017578125">
                <text:p>637.343017578125</text:p>
              </table:table-cell>
              <table:table-cell office:value-type="float" office:value="0.03623433">
                <text:p>0.03623433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37.462524414063">
                <text:p>637.462524414063</text:p>
              </table:table-cell>
              <table:table-cell office:value-type="float" office:value="0.01877377">
                <text:p>0.0187737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37.58203125">
                <text:p>637.58203125</text:p>
              </table:table-cell>
              <table:table-cell office:value-type="float" office:value="0.04513436">
                <text:p>0.04513436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37.701538085938">
                <text:p>637.701538085938</text:p>
              </table:table-cell>
              <table:table-cell office:value-type="float" office:value="0.02604082">
                <text:p>0.02604082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37.821044921875">
                <text:p>637.821044921875</text:p>
              </table:table-cell>
              <table:table-cell office:value-type="float" office:value="0.02200307">
                <text:p>0.02200307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37.940551757813">
                <text:p>637.940551757813</text:p>
              </table:table-cell>
              <table:table-cell office:value-type="float" office:value="0.01678278">
                <text:p>0.01678278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38.060119628906">
                <text:p>638.060119628906</text:p>
              </table:table-cell>
              <table:table-cell office:value-type="float" office:value="0.01551332">
                <text:p>0.01551332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38.179626464844">
                <text:p>638.179626464844</text:p>
              </table:table-cell>
              <table:table-cell office:value-type="float" office:value="0.01796353">
                <text:p>0.01796353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38.299133300781">
                <text:p>638.299133300781</text:p>
              </table:table-cell>
              <table:table-cell office:value-type="float" office:value="0.03501408">
                <text:p>0.03501408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38.418640136719">
                <text:p>638.418640136719</text:p>
              </table:table-cell>
              <table:table-cell office:value-type="float" office:value="0.03923547">
                <text:p>0.03923547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38.538208007813">
                <text:p>638.538208007813</text:p>
              </table:table-cell>
              <table:table-cell office:value-type="float" office:value="0.02062158">
                <text:p>0.02062158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8.65771484375">
                <text:p>638.65771484375</text:p>
              </table:table-cell>
              <table:table-cell office:value-type="float" office:value="0.02134152">
                <text:p>0.0213415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38.777221679688">
                <text:p>638.777221679688</text:p>
              </table:table-cell>
              <table:table-cell office:value-type="float" office:value="0.01887928">
                <text:p>0.01887928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38.896789550781">
                <text:p>638.896789550781</text:p>
              </table:table-cell>
              <table:table-cell office:value-type="float" office:value="0.0383281">
                <text:p>0.0383281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39.016296386719">
                <text:p>639.016296386719</text:p>
              </table:table-cell>
              <table:table-cell office:value-type="float" office:value="0.02760157">
                <text:p>0.02760157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39.135864257813">
                <text:p>639.135864257813</text:p>
              </table:table-cell>
              <table:table-cell office:value-type="float" office:value="0.01346499">
                <text:p>0.01346499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39.25537109375">
                <text:p>639.25537109375</text:p>
              </table:table-cell>
              <table:table-cell office:value-type="float" office:value="0.02014899">
                <text:p>0.02014899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39.374938964844">
                <text:p>639.374938964844</text:p>
              </table:table-cell>
              <table:table-cell office:value-type="float" office:value="0.02580926">
                <text:p>0.02580926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39.494445800781">
                <text:p>639.494445800781</text:p>
              </table:table-cell>
              <table:table-cell office:value-type="float" office:value="0.01935358">
                <text:p>0.0193535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39.614013671875">
                <text:p>639.614013671875</text:p>
              </table:table-cell>
              <table:table-cell office:value-type="float" office:value="0.02051912">
                <text:p>0.02051912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39.733520507813">
                <text:p>639.733520507813</text:p>
              </table:table-cell>
              <table:table-cell office:value-type="float" office:value="0.03632835">
                <text:p>0.03632835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39.853088378906">
                <text:p>639.853088378906</text:p>
              </table:table-cell>
              <table:table-cell office:value-type="float" office:value="0.01788047">
                <text:p>0.01788047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39.972595214844">
                <text:p>639.972595214844</text:p>
              </table:table-cell>
              <table:table-cell office:value-type="float" office:value="0.03518676">
                <text:p>0.03518676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40.092163085938">
                <text:p>640.092163085938</text:p>
              </table:table-cell>
              <table:table-cell office:value-type="float" office:value="0.01735833">
                <text:p>0.01735833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0.211730957031">
                <text:p>640.211730957031</text:p>
              </table:table-cell>
              <table:table-cell office:value-type="float" office:value="0.03233665">
                <text:p>0.03233665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40.331237792969">
                <text:p>640.331237792969</text:p>
              </table:table-cell>
              <table:table-cell office:value-type="float" office:value="0.02296272">
                <text:p>0.02296272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0.450805664063">
                <text:p>640.450805664063</text:p>
              </table:table-cell>
              <table:table-cell office:value-type="float" office:value="0.01644197">
                <text:p>0.01644197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40.570373535156">
                <text:p>640.570373535156</text:p>
              </table:table-cell>
              <table:table-cell office:value-type="float" office:value="0.02994834">
                <text:p>0.0299483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0.68994140625">
                <text:p>640.68994140625</text:p>
              </table:table-cell>
              <table:table-cell office:value-type="float" office:value="0.02913186">
                <text:p>0.02913186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40.809509277344">
                <text:p>640.809509277344</text:p>
              </table:table-cell>
              <table:table-cell office:value-type="float" office:value="0.01699333">
                <text:p>0.01699333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40.929016113281">
                <text:p>640.929016113281</text:p>
              </table:table-cell>
              <table:table-cell office:value-type="float" office:value="0.01290376">
                <text:p>0.01290376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1.048583984375">
                <text:p>641.048583984375</text:p>
              </table:table-cell>
              <table:table-cell office:value-type="float" office:value="0.0103232">
                <text:p>0.0103232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1.168151855469">
                <text:p>641.168151855469</text:p>
              </table:table-cell>
              <table:table-cell office:value-type="float" office:value="0.01667326">
                <text:p>0.01667326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41.287719726563">
                <text:p>641.287719726563</text:p>
              </table:table-cell>
              <table:table-cell office:value-type="float" office:value="0.0173644">
                <text:p>0.0173644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41.407287597656">
                <text:p>641.407287597656</text:p>
              </table:table-cell>
              <table:table-cell office:value-type="float" office:value="0.02341879">
                <text:p>0.02341879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41.52685546875">
                <text:p>641.52685546875</text:p>
              </table:table-cell>
              <table:table-cell office:value-type="float" office:value="0.03000934">
                <text:p>0.03000934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41.646423339844">
                <text:p>641.646423339844</text:p>
              </table:table-cell>
              <table:table-cell office:value-type="float" office:value="0.02067854">
                <text:p>0.02067854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41.765991210938">
                <text:p>641.765991210938</text:p>
              </table:table-cell>
              <table:table-cell office:value-type="float" office:value="0.01573161">
                <text:p>0.0157316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41.885559082031">
                <text:p>641.885559082031</text:p>
              </table:table-cell>
              <table:table-cell office:value-type="float" office:value="0.02564795">
                <text:p>0.02564795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42.005126953125">
                <text:p>642.005126953125</text:p>
              </table:table-cell>
              <table:table-cell office:value-type="float" office:value="0.01906938">
                <text:p>0.01906938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42.124694824219">
                <text:p>642.124694824219</text:p>
              </table:table-cell>
              <table:table-cell office:value-type="float" office:value="0.02243263">
                <text:p>0.02243263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42.244262695313">
                <text:p>642.244262695313</text:p>
              </table:table-cell>
              <table:table-cell office:value-type="float" office:value="0.01664594">
                <text:p>0.01664594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42.363891601563">
                <text:p>642.363891601563</text:p>
              </table:table-cell>
              <table:table-cell office:value-type="float" office:value="0.01417585">
                <text:p>0.0141758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42.483459472656">
                <text:p>642.483459472656</text:p>
              </table:table-cell>
              <table:table-cell office:value-type="float" office:value="0.01661173">
                <text:p>0.0166117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42.60302734375">
                <text:p>642.60302734375</text:p>
              </table:table-cell>
              <table:table-cell office:value-type="float" office:value="0.02874033">
                <text:p>0.0287403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42.722595214844">
                <text:p>642.722595214844</text:p>
              </table:table-cell>
              <table:table-cell office:value-type="float" office:value="0.01325175">
                <text:p>0.01325175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2.842163085938">
                <text:p>642.842163085938</text:p>
              </table:table-cell>
              <table:table-cell office:value-type="float" office:value="0.01573624">
                <text:p>0.01573624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42.961791992188">
                <text:p>642.961791992188</text:p>
              </table:table-cell>
              <table:table-cell office:value-type="float" office:value="0.01879732">
                <text:p>0.01879732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43.081359863281">
                <text:p>643.081359863281</text:p>
              </table:table-cell>
              <table:table-cell office:value-type="float" office:value="0.02795251">
                <text:p>0.02795251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43.200927734375">
                <text:p>643.200927734375</text:p>
              </table:table-cell>
              <table:table-cell office:value-type="float" office:value="0.02129997">
                <text:p>0.02129997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43.320556640625">
                <text:p>643.320556640625</text:p>
              </table:table-cell>
              <table:table-cell office:value-type="float" office:value="0.01922129">
                <text:p>0.01922129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43.440124511719">
                <text:p>643.440124511719</text:p>
              </table:table-cell>
              <table:table-cell office:value-type="float" office:value="0.03015951">
                <text:p>0.03015951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43.559753417969">
                <text:p>643.559753417969</text:p>
              </table:table-cell>
              <table:table-cell office:value-type="float" office:value="0.02797204">
                <text:p>0.0279720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43.679321289063">
                <text:p>643.679321289063</text:p>
              </table:table-cell>
              <table:table-cell office:value-type="float" office:value="0.02470928">
                <text:p>0.02470928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43.798950195313">
                <text:p>643.798950195313</text:p>
              </table:table-cell>
              <table:table-cell office:value-type="float" office:value="0.02036296">
                <text:p>0.02036296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43.918518066406">
                <text:p>643.918518066406</text:p>
              </table:table-cell>
              <table:table-cell office:value-type="float" office:value="0.01854568">
                <text:p>0.01854568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44.038146972656">
                <text:p>644.038146972656</text:p>
              </table:table-cell>
              <table:table-cell office:value-type="float" office:value="0.03551089">
                <text:p>0.03551089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44.15771484375">
                <text:p>644.15771484375</text:p>
              </table:table-cell>
              <table:table-cell office:value-type="float" office:value="0.01313113">
                <text:p>0.01313113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44.27734375">
                <text:p>644.27734375</text:p>
              </table:table-cell>
              <table:table-cell office:value-type="float" office:value="0.0137313">
                <text:p>0.0137313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44.396911621094">
                <text:p>644.396911621094</text:p>
              </table:table-cell>
              <table:table-cell office:value-type="float" office:value="0.01706588">
                <text:p>0.01706588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44.516540527344">
                <text:p>644.516540527344</text:p>
              </table:table-cell>
              <table:table-cell office:value-type="float" office:value="0.01639025">
                <text:p>0.0163902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44.636169433594">
                <text:p>644.636169433594</text:p>
              </table:table-cell>
              <table:table-cell office:value-type="float" office:value="0.01400571">
                <text:p>0.01400571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44.755737304688">
                <text:p>644.755737304688</text:p>
              </table:table-cell>
              <table:table-cell office:value-type="float" office:value="0.01520003">
                <text:p>0.0152000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44.875366210938">
                <text:p>644.875366210938</text:p>
              </table:table-cell>
              <table:table-cell office:value-type="float" office:value="0.02506636">
                <text:p>0.02506636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44.994995117188">
                <text:p>644.994995117188</text:p>
              </table:table-cell>
              <table:table-cell office:value-type="float" office:value="0.02455409">
                <text:p>0.02455409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45.114562988281">
                <text:p>645.114562988281</text:p>
              </table:table-cell>
              <table:table-cell office:value-type="float" office:value="0.02774293">
                <text:p>0.02774293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45.234191894531">
                <text:p>645.234191894531</text:p>
              </table:table-cell>
              <table:table-cell office:value-type="float" office:value="0.02626694">
                <text:p>0.02626694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45.353820800781">
                <text:p>645.353820800781</text:p>
              </table:table-cell>
              <table:table-cell office:value-type="float" office:value="0.01763685">
                <text:p>0.0176368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5.473449707031">
                <text:p>645.473449707031</text:p>
              </table:table-cell>
              <table:table-cell office:value-type="float" office:value="0.01389703">
                <text:p>0.0138970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45.593078613281">
                <text:p>645.593078613281</text:p>
              </table:table-cell>
              <table:table-cell office:value-type="float" office:value="0.01816669">
                <text:p>0.01816669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45.712707519531">
                <text:p>645.712707519531</text:p>
              </table:table-cell>
              <table:table-cell office:value-type="float" office:value="0.01551726">
                <text:p>0.01551726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45.832336425781">
                <text:p>645.832336425781</text:p>
              </table:table-cell>
              <table:table-cell office:value-type="float" office:value="0.01380278">
                <text:p>0.01380278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45.951965332031">
                <text:p>645.951965332031</text:p>
              </table:table-cell>
              <table:table-cell office:value-type="float" office:value="0.01730316">
                <text:p>0.01730316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46.071533203125">
                <text:p>646.071533203125</text:p>
              </table:table-cell>
              <table:table-cell office:value-type="float" office:value="0.01529303">
                <text:p>0.0152930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46.191162109375">
                <text:p>646.191162109375</text:p>
              </table:table-cell>
              <table:table-cell office:value-type="float" office:value="0.0119691">
                <text:p>0.0119691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46.310852050781">
                <text:p>646.310852050781</text:p>
              </table:table-cell>
              <table:table-cell office:value-type="float" office:value="0.02567263">
                <text:p>0.02567263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46.430480957031">
                <text:p>646.430480957031</text:p>
              </table:table-cell>
              <table:table-cell office:value-type="float" office:value="0.02001681">
                <text:p>0.02001681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46.550109863281">
                <text:p>646.550109863281</text:p>
              </table:table-cell>
              <table:table-cell office:value-type="float" office:value="0.02819948">
                <text:p>0.0281994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46.669738769531">
                <text:p>646.669738769531</text:p>
              </table:table-cell>
              <table:table-cell office:value-type="float" office:value="0.01498532">
                <text:p>0.01498532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46.789367675781">
                <text:p>646.789367675781</text:p>
              </table:table-cell>
              <table:table-cell office:value-type="float" office:value="0.02207029">
                <text:p>0.02207029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46.908996582031">
                <text:p>646.908996582031</text:p>
              </table:table-cell>
              <table:table-cell office:value-type="float" office:value="0.03872181">
                <text:p>0.03872181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47.028625488281">
                <text:p>647.028625488281</text:p>
              </table:table-cell>
              <table:table-cell office:value-type="float" office:value="0.02117862">
                <text:p>0.02117862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47.148254394531">
                <text:p>647.148254394531</text:p>
              </table:table-cell>
              <table:table-cell office:value-type="float" office:value="0.01505613">
                <text:p>0.0150561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47.267944335938">
                <text:p>647.267944335938</text:p>
              </table:table-cell>
              <table:table-cell office:value-type="float" office:value="0.01476498">
                <text:p>0.01476498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47.387573242188">
                <text:p>647.387573242188</text:p>
              </table:table-cell>
              <table:table-cell office:value-type="float" office:value="0.02195332">
                <text:p>0.02195332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47.507202148438">
                <text:p>647.507202148438</text:p>
              </table:table-cell>
              <table:table-cell office:value-type="float" office:value="0.01394995">
                <text:p>0.01394995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47.626831054688">
                <text:p>647.626831054688</text:p>
              </table:table-cell>
              <table:table-cell office:value-type="float" office:value="0.01938449">
                <text:p>0.01938449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47.746520996094">
                <text:p>647.746520996094</text:p>
              </table:table-cell>
              <table:table-cell office:value-type="float" office:value="0.0400761">
                <text:p>0.040076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47.866149902344">
                <text:p>647.866149902344</text:p>
              </table:table-cell>
              <table:table-cell office:value-type="float" office:value="0.01057374">
                <text:p>0.01057374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47.985778808594">
                <text:p>647.985778808594</text:p>
              </table:table-cell>
              <table:table-cell office:value-type="float" office:value="0.03765117">
                <text:p>0.03765117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48.10546875">
                <text:p>648.10546875</text:p>
              </table:table-cell>
              <table:table-cell office:value-type="float" office:value="0.009960945">
                <text:p>0.00996094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8.22509765625">
                <text:p>648.22509765625</text:p>
              </table:table-cell>
              <table:table-cell office:value-type="float" office:value="0.03425667">
                <text:p>0.03425667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48.344787597656">
                <text:p>648.344787597656</text:p>
              </table:table-cell>
              <table:table-cell office:value-type="float" office:value="0.02433977">
                <text:p>0.02433977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48.464416503906">
                <text:p>648.464416503906</text:p>
              </table:table-cell>
              <table:table-cell office:value-type="float" office:value="0.01652052">
                <text:p>0.0165205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48.584106445313">
                <text:p>648.584106445313</text:p>
              </table:table-cell>
              <table:table-cell office:value-type="float" office:value="0.01870162">
                <text:p>0.01870162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48.703735351563">
                <text:p>648.703735351563</text:p>
              </table:table-cell>
              <table:table-cell office:value-type="float" office:value="0.0172841">
                <text:p>0.0172841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48.823425292969">
                <text:p>648.823425292969</text:p>
              </table:table-cell>
              <table:table-cell office:value-type="float" office:value="0.006818437">
                <text:p>0.00681843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48.943054199219">
                <text:p>648.943054199219</text:p>
              </table:table-cell>
              <table:table-cell office:value-type="float" office:value="0.01281313">
                <text:p>0.01281313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49.062744140625">
                <text:p>649.062744140625</text:p>
              </table:table-cell>
              <table:table-cell office:value-type="float" office:value="0.01513749">
                <text:p>0.01513749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49.182434082031">
                <text:p>649.182434082031</text:p>
              </table:table-cell>
              <table:table-cell office:value-type="float" office:value="0.01613702">
                <text:p>0.01613702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49.302062988281">
                <text:p>649.302062988281</text:p>
              </table:table-cell>
              <table:table-cell office:value-type="float" office:value="0.02077511">
                <text:p>0.02077511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49.421752929688">
                <text:p>649.421752929688</text:p>
              </table:table-cell>
              <table:table-cell office:value-type="float" office:value="0.008573144">
                <text:p>0.008573144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49.541442871094">
                <text:p>649.541442871094</text:p>
              </table:table-cell>
              <table:table-cell office:value-type="float" office:value="0.01301004">
                <text:p>0.01301004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49.661071777344">
                <text:p>649.661071777344</text:p>
              </table:table-cell>
              <table:table-cell office:value-type="float" office:value="0.03081605">
                <text:p>0.0308160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49.78076171875">
                <text:p>649.78076171875</text:p>
              </table:table-cell>
              <table:table-cell office:value-type="float" office:value="0.01744856">
                <text:p>0.01744856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49.900451660156">
                <text:p>649.900451660156</text:p>
              </table:table-cell>
              <table:table-cell office:value-type="float" office:value="0.01893128">
                <text:p>0.01893128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50.020141601563">
                <text:p>650.020141601563</text:p>
              </table:table-cell>
              <table:table-cell office:value-type="float" office:value="0.01035287">
                <text:p>0.0103528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50.139770507813">
                <text:p>650.139770507813</text:p>
              </table:table-cell>
              <table:table-cell office:value-type="float" office:value="0.007710458">
                <text:p>0.007710458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50.259460449219">
                <text:p>650.259460449219</text:p>
              </table:table-cell>
              <table:table-cell office:value-type="float" office:value="0.009396303">
                <text:p>0.009396303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50.379150390625">
                <text:p>650.379150390625</text:p>
              </table:table-cell>
              <table:table-cell office:value-type="float" office:value="0.01444578">
                <text:p>0.01444578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50.498840332031">
                <text:p>650.498840332031</text:p>
              </table:table-cell>
              <table:table-cell office:value-type="float" office:value="0.0104283">
                <text:p>0.0104283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0.618530273438">
                <text:p>650.618530273438</text:p>
              </table:table-cell>
              <table:table-cell office:value-type="float" office:value="0.01912863">
                <text:p>0.01912863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50.738220214844">
                <text:p>650.738220214844</text:p>
              </table:table-cell>
              <table:table-cell office:value-type="float" office:value="0.01310573">
                <text:p>0.01310573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50.85791015625">
                <text:p>650.85791015625</text:p>
              </table:table-cell>
              <table:table-cell office:value-type="float" office:value="0.02027006">
                <text:p>0.02027006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0.977600097656">
                <text:p>650.977600097656</text:p>
              </table:table-cell>
              <table:table-cell office:value-type="float" office:value="0.02289479">
                <text:p>0.02289479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51.097290039063">
                <text:p>651.097290039063</text:p>
              </table:table-cell>
              <table:table-cell office:value-type="float" office:value="0.01456387">
                <text:p>0.01456387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51.216979980469">
                <text:p>651.216979980469</text:p>
              </table:table-cell>
              <table:table-cell office:value-type="float" office:value="0.02294654">
                <text:p>0.02294654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51.336669921875">
                <text:p>651.336669921875</text:p>
              </table:table-cell>
              <table:table-cell office:value-type="float" office:value="0.0134462">
                <text:p>0.0134462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51.456359863281">
                <text:p>651.456359863281</text:p>
              </table:table-cell>
              <table:table-cell office:value-type="float" office:value="0.01383256">
                <text:p>0.01383256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51.576049804688">
                <text:p>651.576049804688</text:p>
              </table:table-cell>
              <table:table-cell office:value-type="float" office:value="0.0113448">
                <text:p>0.0113448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1.695739746094">
                <text:p>651.695739746094</text:p>
              </table:table-cell>
              <table:table-cell office:value-type="float" office:value="0.01993733">
                <text:p>0.01993733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1.8154296875">
                <text:p>651.8154296875</text:p>
              </table:table-cell>
              <table:table-cell office:value-type="float" office:value="0.01247498">
                <text:p>0.01247498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51.935180664063">
                <text:p>651.935180664063</text:p>
              </table:table-cell>
              <table:table-cell office:value-type="float" office:value="0.007609453">
                <text:p>0.007609453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52.054870605469">
                <text:p>652.054870605469</text:p>
              </table:table-cell>
              <table:table-cell office:value-type="float" office:value="0.01504667">
                <text:p>0.01504667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52.174560546875">
                <text:p>652.174560546875</text:p>
              </table:table-cell>
              <table:table-cell office:value-type="float" office:value="0.01007689">
                <text:p>0.0100768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2.294250488281">
                <text:p>652.294250488281</text:p>
              </table:table-cell>
              <table:table-cell office:value-type="float" office:value="0.01153527">
                <text:p>0.01153527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2.414001464844">
                <text:p>652.414001464844</text:p>
              </table:table-cell>
              <table:table-cell office:value-type="float" office:value="0.0165744">
                <text:p>0.0165744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2.53369140625">
                <text:p>652.53369140625</text:p>
              </table:table-cell>
              <table:table-cell office:value-type="float" office:value="0.007586757">
                <text:p>0.007586757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52.653381347656">
                <text:p>652.653381347656</text:p>
              </table:table-cell>
              <table:table-cell office:value-type="float" office:value="0.01333316">
                <text:p>0.0133331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52.773071289063">
                <text:p>652.773071289063</text:p>
              </table:table-cell>
              <table:table-cell office:value-type="float" office:value="0.006259277">
                <text:p>0.006259277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52.892822265625">
                <text:p>652.892822265625</text:p>
              </table:table-cell>
              <table:table-cell office:value-type="float" office:value="0.01835074">
                <text:p>0.0183507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53.012512207031">
                <text:p>653.012512207031</text:p>
              </table:table-cell>
              <table:table-cell office:value-type="float" office:value="0.009178287">
                <text:p>0.009178287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53.132263183594">
                <text:p>653.132263183594</text:p>
              </table:table-cell>
              <table:table-cell office:value-type="float" office:value="0.01617598">
                <text:p>0.01617598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53.251953125">
                <text:p>653.251953125</text:p>
              </table:table-cell>
              <table:table-cell office:value-type="float" office:value="0.008178144">
                <text:p>0.008178144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53.371704101563">
                <text:p>653.371704101563</text:p>
              </table:table-cell>
              <table:table-cell office:value-type="float" office:value="0.01547622">
                <text:p>0.01547622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53.491394042969">
                <text:p>653.491394042969</text:p>
              </table:table-cell>
              <table:table-cell office:value-type="float" office:value="0.0298522">
                <text:p>0.0298522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53.611145019531">
                <text:p>653.611145019531</text:p>
              </table:table-cell>
              <table:table-cell office:value-type="float" office:value="0.01718756">
                <text:p>0.01718756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53.730834960938">
                <text:p>653.730834960938</text:p>
              </table:table-cell>
              <table:table-cell office:value-type="float" office:value="0.03189735">
                <text:p>0.03189735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53.8505859375">
                <text:p>653.8505859375</text:p>
              </table:table-cell>
              <table:table-cell office:value-type="float" office:value="0.01490661">
                <text:p>0.01490661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53.970275878906">
                <text:p>653.970275878906</text:p>
              </table:table-cell>
              <table:table-cell office:value-type="float" office:value="0.02804309">
                <text:p>0.02804309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54.090026855469">
                <text:p>654.090026855469</text:p>
              </table:table-cell>
              <table:table-cell office:value-type="float" office:value="0.005775215">
                <text:p>0.005775215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54.209716796875">
                <text:p>654.209716796875</text:p>
              </table:table-cell>
              <table:table-cell office:value-type="float" office:value="0.007046479">
                <text:p>0.00704647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54.329467773438">
                <text:p>654.329467773438</text:p>
              </table:table-cell>
              <table:table-cell office:value-type="float" office:value="0.001641816">
                <text:p>0.001641816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54.44921875">
                <text:p>654.44921875</text:p>
              </table:table-cell>
              <table:table-cell office:value-type="float" office:value="0.01934328">
                <text:p>0.01934328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54.568969726563">
                <text:p>654.568969726563</text:p>
              </table:table-cell>
              <table:table-cell office:value-type="float" office:value="0.007099615">
                <text:p>0.007099615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54.688659667969">
                <text:p>654.688659667969</text:p>
              </table:table-cell>
              <table:table-cell office:value-type="float" office:value="0.01702105">
                <text:p>0.0170210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54.808410644531">
                <text:p>654.808410644531</text:p>
              </table:table-cell>
              <table:table-cell office:value-type="float" office:value="0.01148161">
                <text:p>0.01148161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54.928161621094">
                <text:p>654.928161621094</text:p>
              </table:table-cell>
              <table:table-cell office:value-type="float" office:value="0.01117851">
                <text:p>0.01117851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5.047912597656">
                <text:p>655.047912597656</text:p>
              </table:table-cell>
              <table:table-cell office:value-type="float" office:value="0.02677773">
                <text:p>0.02677773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55.167602539063">
                <text:p>655.167602539063</text:p>
              </table:table-cell>
              <table:table-cell office:value-type="float" office:value="0.01075215">
                <text:p>0.01075215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5.287353515625">
                <text:p>655.287353515625</text:p>
              </table:table-cell>
              <table:table-cell office:value-type="float" office:value="0.01948688">
                <text:p>0.01948688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55.407104492188">
                <text:p>655.407104492188</text:p>
              </table:table-cell>
              <table:table-cell office:value-type="float" office:value="0.004238262">
                <text:p>0.004238262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55.52685546875">
                <text:p>655.52685546875</text:p>
              </table:table-cell>
              <table:table-cell office:value-type="float" office:value="0.01129169">
                <text:p>0.0112916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55.646606445313">
                <text:p>655.646606445313</text:p>
              </table:table-cell>
              <table:table-cell office:value-type="float" office:value="0.002091237">
                <text:p>0.002091237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55.766357421875">
                <text:p>655.766357421875</text:p>
              </table:table-cell>
              <table:table-cell office:value-type="float" office:value="0.01164584">
                <text:p>0.01164584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55.886108398438">
                <text:p>655.886108398438</text:p>
              </table:table-cell>
              <table:table-cell office:value-type="float" office:value="0.003618245">
                <text:p>0.003618245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56.005859375">
                <text:p>656.005859375</text:p>
              </table:table-cell>
              <table:table-cell office:value-type="float" office:value="0.001514938">
                <text:p>0.001514938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6.125610351563">
                <text:p>656.125610351563</text:p>
              </table:table-cell>
              <table:table-cell office:value-type="float" office:value="0.01296234">
                <text:p>0.01296234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56.245361328125">
                <text:p>656.245361328125</text:p>
              </table:table-cell>
              <table:table-cell office:value-type="float" office:value="0.007892509">
                <text:p>0.007892509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6.365112304688">
                <text:p>656.365112304688</text:p>
              </table:table-cell>
              <table:table-cell office:value-type="float" office:value="0.02585503">
                <text:p>0.02585503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56.48486328125">
                <text:p>656.48486328125</text:p>
              </table:table-cell>
              <table:table-cell office:value-type="float" office:value="0.009273464">
                <text:p>0.00927346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56.604614257813">
                <text:p>656.604614257813</text:p>
              </table:table-cell>
              <table:table-cell office:value-type="float" office:value="0.01241525">
                <text:p>0.0124152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56.724365234375">
                <text:p>656.724365234375</text:p>
              </table:table-cell>
              <table:table-cell office:value-type="float" office:value="0.02699853">
                <text:p>0.02699853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56.844116210938">
                <text:p>656.844116210938</text:p>
              </table:table-cell>
              <table:table-cell office:value-type="float" office:value="0.01173776">
                <text:p>0.01173776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56.9638671875">
                <text:p>656.9638671875</text:p>
              </table:table-cell>
              <table:table-cell office:value-type="float" office:value="0.009073655">
                <text:p>0.009073655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57.083679199219">
                <text:p>657.083679199219</text:p>
              </table:table-cell>
              <table:table-cell office:value-type="float" office:value="0.01389876">
                <text:p>0.01389876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57.203430175781">
                <text:p>657.203430175781</text:p>
              </table:table-cell>
              <table:table-cell office:value-type="float" office:value="0.007714665">
                <text:p>0.007714665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7.323181152344">
                <text:p>657.323181152344</text:p>
              </table:table-cell>
              <table:table-cell office:value-type="float" office:value="0.02421149">
                <text:p>0.02421149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57.442932128906">
                <text:p>657.442932128906</text:p>
              </table:table-cell>
              <table:table-cell office:value-type="float" office:value="0.01883416">
                <text:p>0.01883416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57.562744140625">
                <text:p>657.562744140625</text:p>
              </table:table-cell>
              <table:table-cell office:value-type="float" office:value="0.01440808">
                <text:p>0.01440808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7.682495117188">
                <text:p>657.682495117188</text:p>
              </table:table-cell>
              <table:table-cell office:value-type="float" office:value="0.02341115">
                <text:p>0.0234111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7.80224609375">
                <text:p>657.80224609375</text:p>
              </table:table-cell>
              <table:table-cell office:value-type="float" office:value="0.01809211">
                <text:p>0.01809211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57.921997070313">
                <text:p>657.921997070313</text:p>
              </table:table-cell>
              <table:table-cell office:value-type="float" office:value="0.00491645">
                <text:p>0.00491645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58.041809082031">
                <text:p>658.041809082031</text:p>
              </table:table-cell>
              <table:table-cell office:value-type="float" office:value="0.005136037">
                <text:p>0.005136037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58.161560058594">
                <text:p>658.161560058594</text:p>
              </table:table-cell>
              <table:table-cell office:value-type="float" office:value="0.001301187">
                <text:p>0.001301187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58.281372070313">
                <text:p>658.281372070313</text:p>
              </table:table-cell>
              <table:table-cell office:value-type="float" office:value="0.02186314">
                <text:p>0.0218631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58.401123046875">
                <text:p>658.401123046875</text:p>
              </table:table-cell>
              <table:table-cell office:value-type="float" office:value="0.03678046">
                <text:p>0.03678046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58.520935058594">
                <text:p>658.520935058594</text:p>
              </table:table-cell>
              <table:table-cell office:value-type="float" office:value="0.006120998">
                <text:p>0.00612099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58.640686035156">
                <text:p>658.640686035156</text:p>
              </table:table-cell>
              <table:table-cell office:value-type="float" office:value="0.003456512">
                <text:p>0.003456512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8.760437011719">
                <text:p>658.760437011719</text:p>
              </table:table-cell>
              <table:table-cell office:value-type="float" office:value="0.008257709">
                <text:p>0.008257709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58.880249023438">
                <text:p>658.880249023438</text:p>
              </table:table-cell>
              <table:table-cell office:value-type="float" office:value="0.004328277">
                <text:p>0.004328277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59.000061035156">
                <text:p>659.000061035156</text:p>
              </table:table-cell>
              <table:table-cell office:value-type="float" office:value="0.005427349">
                <text:p>0.005427349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59.119812011719">
                <text:p>659.119812011719</text:p>
              </table:table-cell>
              <table:table-cell office:value-type="float" office:value="0.00251382">
                <text:p>0.0025138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59.239624023438">
                <text:p>659.239624023438</text:p>
              </table:table-cell>
              <table:table-cell office:value-type="float" office:value="0.01428476">
                <text:p>0.01428476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59.359375">
                <text:p>659.359375</text:p>
              </table:table-cell>
              <table:table-cell office:value-type="float" office:value="0.01284235">
                <text:p>0.01284235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59.479187011719">
                <text:p>659.479187011719</text:p>
              </table:table-cell>
              <table:table-cell office:value-type="float" office:value="0.009707544">
                <text:p>0.009707544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59.598999023438">
                <text:p>659.598999023438</text:p>
              </table:table-cell>
              <table:table-cell office:value-type="float" office:value="0.01070098">
                <text:p>0.01070098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59.71875">
                <text:p>659.71875</text:p>
              </table:table-cell>
              <table:table-cell office:value-type="float" office:value="0.01260497">
                <text:p>0.01260497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59.838562011719">
                <text:p>659.838562011719</text:p>
              </table:table-cell>
              <table:table-cell office:value-type="float" office:value="0.003346788">
                <text:p>0.003346788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59.958374023438">
                <text:p>659.958374023438</text:p>
              </table:table-cell>
              <table:table-cell office:value-type="float" office:value="0.006993593">
                <text:p>0.006993593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60.078125">
                <text:p>660.078125</text:p>
              </table:table-cell>
              <table:table-cell office:value-type="float" office:value="0.001416685">
                <text:p>0.001416685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60.197937011719">
                <text:p>660.197937011719</text:p>
              </table:table-cell>
              <table:table-cell office:value-type="float" office:value="0.01382692">
                <text:p>0.0138269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60.317749023438">
                <text:p>660.317749023438</text:p>
              </table:table-cell>
              <table:table-cell office:value-type="float" office:value="0.01027989">
                <text:p>0.01027989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60.437561035156">
                <text:p>660.437561035156</text:p>
              </table:table-cell>
              <table:table-cell office:value-type="float" office:value="0.0210954">
                <text:p>0.0210954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60.557373046875">
                <text:p>660.557373046875</text:p>
              </table:table-cell>
              <table:table-cell office:value-type="float" office:value="-0.002178554">
                <text:p>-0.002178554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60.677124023438">
                <text:p>660.677124023438</text:p>
              </table:table-cell>
              <table:table-cell office:value-type="float" office:value="0.00330564">
                <text:p>0.00330564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60.796936035156">
                <text:p>660.796936035156</text:p>
              </table:table-cell>
              <table:table-cell office:value-type="float" office:value="0.007797267">
                <text:p>0.00779726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60.916748046875">
                <text:p>660.91674804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61.036560058594">
                <text:p>661.036560058594</text:p>
              </table:table-cell>
              <table:table-cell office:value-type="float" office:value="0.01116868">
                <text:p>0.01116868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61.156372070313">
                <text:p>661.156372070313</text:p>
              </table:table-cell>
              <table:table-cell office:value-type="float" office:value="0.01257825">
                <text:p>0.01257825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61.276184082031">
                <text:p>661.276184082031</text:p>
              </table:table-cell>
              <table:table-cell office:value-type="float" office:value="0.00718065">
                <text:p>0.00718065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61.39599609375">
                <text:p>661.39599609375</text:p>
              </table:table-cell>
              <table:table-cell office:value-type="float" office:value="0.008967168">
                <text:p>0.008967168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61.515808105469">
                <text:p>661.515808105469</text:p>
              </table:table-cell>
              <table:table-cell office:value-type="float" office:value="0.01828648">
                <text:p>0.01828648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61.635620117188">
                <text:p>661.635620117188</text:p>
              </table:table-cell>
              <table:table-cell office:value-type="float" office:value="0.005084683">
                <text:p>0.005084683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61.755432128906">
                <text:p>661.755432128906</text:p>
              </table:table-cell>
              <table:table-cell office:value-type="float" office:value="0.01303178">
                <text:p>0.01303178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61.875244140625">
                <text:p>661.875244140625</text:p>
              </table:table-cell>
              <table:table-cell office:value-type="float" office:value="0.01737401">
                <text:p>0.01737401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61.995056152344">
                <text:p>661.995056152344</text:p>
              </table:table-cell>
              <table:table-cell office:value-type="float" office:value="0.01051931">
                <text:p>0.01051931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62.114868164063">
                <text:p>662.114868164063</text:p>
              </table:table-cell>
              <table:table-cell office:value-type="float" office:value="0.005383414">
                <text:p>0.005383414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2.234680175781">
                <text:p>662.234680175781</text:p>
              </table:table-cell>
              <table:table-cell office:value-type="float" office:value="0.003438829">
                <text:p>0.003438829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62.354553222656">
                <text:p>662.354553222656</text:p>
              </table:table-cell>
              <table:table-cell office:value-type="float" office:value="0.002824867">
                <text:p>0.002824867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62.474365234375">
                <text:p>662.474365234375</text:p>
              </table:table-cell>
              <table:table-cell office:value-type="float" office:value="0.006815971">
                <text:p>0.006815971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62.594177246094">
                <text:p>662.594177246094</text:p>
              </table:table-cell>
              <table:table-cell office:value-type="float" office:value="0.008614389">
                <text:p>0.00861438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62.713989257813">
                <text:p>662.713989257813</text:p>
              </table:table-cell>
              <table:table-cell office:value-type="float" office:value="0.01294143">
                <text:p>0.01294143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62.833801269531">
                <text:p>662.833801269531</text:p>
              </table:table-cell>
              <table:table-cell office:value-type="float" office:value="-0.0007070416">
                <text:p>-0.0007070416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62.953674316406">
                <text:p>662.953674316406</text:p>
              </table:table-cell>
              <table:table-cell office:value-type="float" office:value="0.00432823">
                <text:p>0.00432823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63.073486328125">
                <text:p>663.073486328125</text:p>
              </table:table-cell>
              <table:table-cell office:value-type="float" office:value="0.006515594">
                <text:p>0.00651559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63.193298339844">
                <text:p>663.193298339844</text:p>
              </table:table-cell>
              <table:table-cell office:value-type="float" office:value="0.006431777">
                <text:p>0.006431777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63.313110351563">
                <text:p>663.313110351563</text:p>
              </table:table-cell>
              <table:table-cell office:value-type="float" office:value="0.008308354">
                <text:p>0.008308354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63.432983398438">
                <text:p>663.432983398438</text:p>
              </table:table-cell>
              <table:table-cell office:value-type="float" office:value="0.007002585">
                <text:p>0.007002585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63.552795410156">
                <text:p>663.552795410156</text:p>
              </table:table-cell>
              <table:table-cell office:value-type="float" office:value="0.01031965">
                <text:p>0.01031965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63.672668457031">
                <text:p>663.672668457031</text:p>
              </table:table-cell>
              <table:table-cell office:value-type="float" office:value="0.006562504">
                <text:p>0.006562504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63.79248046875">
                <text:p>663.79248046875</text:p>
              </table:table-cell>
              <table:table-cell office:value-type="float" office:value="0.008900309">
                <text:p>0.008900309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63.912292480469">
                <text:p>663.912292480469</text:p>
              </table:table-cell>
              <table:table-cell office:value-type="float" office:value="0.00706436">
                <text:p>0.00706436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64.032165527344">
                <text:p>664.032165527344</text:p>
              </table:table-cell>
              <table:table-cell office:value-type="float" office:value="0.01278395">
                <text:p>0.01278395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64.151977539063">
                <text:p>664.151977539063</text:p>
              </table:table-cell>
              <table:table-cell office:value-type="float" office:value="0.007915521">
                <text:p>0.007915521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64.271850585938">
                <text:p>664.271850585938</text:p>
              </table:table-cell>
              <table:table-cell office:value-type="float" office:value="0.0008970873">
                <text:p>0.0008970873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64.391662597656">
                <text:p>664.391662597656</text:p>
              </table:table-cell>
              <table:table-cell office:value-type="float" office:value="0.006555521">
                <text:p>0.006555521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64.511535644531">
                <text:p>664.511535644531</text:p>
              </table:table-cell>
              <table:table-cell office:value-type="float" office:value="0.009729334">
                <text:p>0.009729334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64.63134765625">
                <text:p>664.63134765625</text:p>
              </table:table-cell>
              <table:table-cell office:value-type="float" office:value="0.005565285">
                <text:p>0.005565285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64.751220703125">
                <text:p>664.751220703125</text:p>
              </table:table-cell>
              <table:table-cell office:value-type="float" office:value="-0.000646032">
                <text:p>-0.000646032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64.87109375">
                <text:p>664.87109375</text:p>
              </table:table-cell>
              <table:table-cell office:value-type="float" office:value="0.01202329">
                <text:p>0.01202329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64.990905761719">
                <text:p>664.990905761719</text:p>
              </table:table-cell>
              <table:table-cell office:value-type="float" office:value="0.011848">
                <text:p>0.01184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65.110778808594">
                <text:p>665.110778808594</text:p>
              </table:table-cell>
              <table:table-cell office:value-type="float" office:value="0.005890138">
                <text:p>0.005890138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65.230590820313">
                <text:p>665.230590820313</text:p>
              </table:table-cell>
              <table:table-cell office:value-type="float" office:value="0.01200562">
                <text:p>0.01200562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65.350463867188">
                <text:p>665.350463867188</text:p>
              </table:table-cell>
              <table:table-cell office:value-type="float" office:value="-0.0001792173">
                <text:p>-0.0001792173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65.470336914063">
                <text:p>665.470336914063</text:p>
              </table:table-cell>
              <table:table-cell office:value-type="float" office:value="0.01835741">
                <text:p>0.01835741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65.590148925781">
                <text:p>665.590148925781</text:p>
              </table:table-cell>
              <table:table-cell office:value-type="float" office:value="0.01418">
                <text:p>0.01418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65.710021972656">
                <text:p>665.710021972656</text:p>
              </table:table-cell>
              <table:table-cell office:value-type="float" office:value="0.00687638">
                <text:p>0.00687638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65.829895019531">
                <text:p>665.829895019531</text:p>
              </table:table-cell>
              <table:table-cell office:value-type="float" office:value="0.002091682">
                <text:p>0.002091682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65.949768066406">
                <text:p>665.949768066406</text:p>
              </table:table-cell>
              <table:table-cell office:value-type="float" office:value="0.02129699">
                <text:p>0.02129699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66.069580078125">
                <text:p>666.069580078125</text:p>
              </table:table-cell>
              <table:table-cell office:value-type="float" office:value="0.002262284">
                <text:p>0.002262284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66.189453125">
                <text:p>666.189453125</text:p>
              </table:table-cell>
              <table:table-cell office:value-type="float" office:value="0.02212748">
                <text:p>0.0221274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6.309326171875">
                <text:p>666.309326171875</text:p>
              </table:table-cell>
              <table:table-cell office:value-type="float" office:value="0.003848951">
                <text:p>0.003848951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66.42919921875">
                <text:p>666.42919921875</text:p>
              </table:table-cell>
              <table:table-cell office:value-type="float" office:value="0.01494293">
                <text:p>0.01494293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66.549072265625">
                <text:p>666.549072265625</text:p>
              </table:table-cell>
              <table:table-cell office:value-type="float" office:value="0.01401478">
                <text:p>0.01401478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66.6689453125">
                <text:p>666.6689453125</text:p>
              </table:table-cell>
              <table:table-cell office:value-type="float" office:value="0.006840293">
                <text:p>0.006840293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66.788818359375">
                <text:p>666.788818359375</text:p>
              </table:table-cell>
              <table:table-cell office:value-type="float" office:value="0.006583318">
                <text:p>0.00658331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66.90869140625">
                <text:p>666.90869140625</text:p>
              </table:table-cell>
              <table:table-cell office:value-type="float" office:value="0.002369196">
                <text:p>0.002369196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67.028564453125">
                <text:p>667.028564453125</text:p>
              </table:table-cell>
              <table:table-cell office:value-type="float" office:value="0.008228761">
                <text:p>0.008228761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67.1484375">
                <text:p>667.1484375</text:p>
              </table:table-cell>
              <table:table-cell office:value-type="float" office:value="0.007361339">
                <text:p>0.007361339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67.268310546875">
                <text:p>667.268310546875</text:p>
              </table:table-cell>
              <table:table-cell office:value-type="float" office:value="0.006954725">
                <text:p>0.006954725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67.38818359375">
                <text:p>667.38818359375</text:p>
              </table:table-cell>
              <table:table-cell office:value-type="float" office:value="0.01496178">
                <text:p>0.01496178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67.508056640625">
                <text:p>667.508056640625</text:p>
              </table:table-cell>
              <table:table-cell office:value-type="float" office:value="0.002514539">
                <text:p>0.002514539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67.6279296875">
                <text:p>667.6279296875</text:p>
              </table:table-cell>
              <table:table-cell office:value-type="float" office:value="0.0009614229">
                <text:p>0.0009614229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67.747802734375">
                <text:p>667.747802734375</text:p>
              </table:table-cell>
              <table:table-cell office:value-type="float" office:value="-0.0001003518">
                <text:p>-0.0001003518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67.86767578125">
                <text:p>667.86767578125</text:p>
              </table:table-cell>
              <table:table-cell office:value-type="float" office:value="-0.005409217">
                <text:p>-0.005409217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67.987548828125">
                <text:p>667.987548828125</text:p>
              </table:table-cell>
              <table:table-cell office:value-type="float" office:value="0.01144963">
                <text:p>0.01144963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68.107421875">
                <text:p>668.107421875</text:p>
              </table:table-cell>
              <table:table-cell office:value-type="float" office:value="-0.004332258">
                <text:p>-0.004332258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68.227294921875">
                <text:p>668.227294921875</text:p>
              </table:table-cell>
              <table:table-cell office:value-type="float" office:value="0.005699208">
                <text:p>0.00569920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68.34716796875">
                <text:p>668.34716796875</text:p>
              </table:table-cell>
              <table:table-cell office:value-type="float" office:value="0.01058589">
                <text:p>0.01058589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68.467102050781">
                <text:p>668.467102050781</text:p>
              </table:table-cell>
              <table:table-cell office:value-type="float" office:value="0.006136788">
                <text:p>0.006136788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68.586975097656">
                <text:p>668.586975097656</text:p>
              </table:table-cell>
              <table:table-cell office:value-type="float" office:value="0.00476185">
                <text:p>0.00476185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68.706848144531">
                <text:p>668.706848144531</text:p>
              </table:table-cell>
              <table:table-cell office:value-type="float" office:value="0.004305793">
                <text:p>0.004305793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8.826721191406">
                <text:p>668.826721191406</text:p>
              </table:table-cell>
              <table:table-cell office:value-type="float" office:value="0.00442509">
                <text:p>0.00442509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68.946594238281">
                <text:p>668.946594238281</text:p>
              </table:table-cell>
              <table:table-cell office:value-type="float" office:value="0.01217483">
                <text:p>0.01217483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69.066528320313">
                <text:p>669.066528320313</text:p>
              </table:table-cell>
              <table:table-cell office:value-type="float" office:value="0.007359449">
                <text:p>0.007359449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69.186401367188">
                <text:p>669.186401367188</text:p>
              </table:table-cell>
              <table:table-cell office:value-type="float" office:value="-0.0006612825">
                <text:p>-0.0006612825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69.306274414063">
                <text:p>669.306274414063</text:p>
              </table:table-cell>
              <table:table-cell office:value-type="float" office:value="0.01656853">
                <text:p>0.01656853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69.426208496094">
                <text:p>669.426208496094</text:p>
              </table:table-cell>
              <table:table-cell office:value-type="float" office:value="0.008722967">
                <text:p>0.008722967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69.546081542969">
                <text:p>669.546081542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69.665954589844">
                <text:p>669.66595458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69.785888671875">
                <text:p>669.785888671875</text:p>
              </table:table-cell>
              <table:table-cell office:value-type="float" office:value="0.006181458">
                <text:p>0.00618145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69.90576171875">
                <text:p>669.90576171875</text:p>
              </table:table-cell>
              <table:table-cell office:value-type="float" office:value="0.00535269">
                <text:p>0.00535269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70.025695800781">
                <text:p>670.025695800781</text:p>
              </table:table-cell>
              <table:table-cell office:value-type="float" office:value="-0.002004391">
                <text:p>-0.002004391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70.145568847656">
                <text:p>670.145568847656</text:p>
              </table:table-cell>
              <table:table-cell office:value-type="float" office:value="0.01686897">
                <text:p>0.01686897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70.265502929688">
                <text:p>670.265502929688</text:p>
              </table:table-cell>
              <table:table-cell office:value-type="float" office:value="0.008435088">
                <text:p>0.008435088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70.385375976563">
                <text:p>670.385375976563</text:p>
              </table:table-cell>
              <table:table-cell office:value-type="float" office:value="0.01548236">
                <text:p>0.01548236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70.505310058594">
                <text:p>670.505310058594</text:p>
              </table:table-cell>
              <table:table-cell office:value-type="float" office:value="0.008788954">
                <text:p>0.008788954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70.625183105469">
                <text:p>670.625183105469</text:p>
              </table:table-cell>
              <table:table-cell office:value-type="float" office:value="0.01149902">
                <text:p>0.01149902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70.7451171875">
                <text:p>670.7451171875</text:p>
              </table:table-cell>
              <table:table-cell office:value-type="float" office:value="0.005898173">
                <text:p>0.005898173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70.864990234375">
                <text:p>670.864990234375</text:p>
              </table:table-cell>
              <table:table-cell office:value-type="float" office:value="0.01451994">
                <text:p>0.01451994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70.984924316406">
                <text:p>670.984924316406</text:p>
              </table:table-cell>
              <table:table-cell office:value-type="float" office:value="0.01233986">
                <text:p>0.0123398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71.104858398438">
                <text:p>671.104858398438</text:p>
              </table:table-cell>
              <table:table-cell office:value-type="float" office:value="-0.001074219">
                <text:p>-0.001074219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71.224731445313">
                <text:p>671.224731445313</text:p>
              </table:table-cell>
              <table:table-cell office:value-type="float" office:value="0.006194841">
                <text:p>0.006194841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1.344665527344">
                <text:p>671.344665527344</text:p>
              </table:table-cell>
              <table:table-cell office:value-type="float" office:value="0.01216359">
                <text:p>0.01216359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71.464599609375">
                <text:p>671.464599609375</text:p>
              </table:table-cell>
              <table:table-cell office:value-type="float" office:value="-0.00327708">
                <text:p>-0.00327708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71.58447265625">
                <text:p>671.58447265625</text:p>
              </table:table-cell>
              <table:table-cell office:value-type="float" office:value="0.0006879056">
                <text:p>0.0006879056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71.704406738281">
                <text:p>671.704406738281</text:p>
              </table:table-cell>
              <table:table-cell office:value-type="float" office:value="0.01218619">
                <text:p>0.01218619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71.824340820313">
                <text:p>671.824340820313</text:p>
              </table:table-cell>
              <table:table-cell office:value-type="float" office:value="0.004777966">
                <text:p>0.004777966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71.944213867188">
                <text:p>671.944213867188</text:p>
              </table:table-cell>
              <table:table-cell office:value-type="float" office:value="0.003951218">
                <text:p>0.003951218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72.064147949219">
                <text:p>672.064147949219</text:p>
              </table:table-cell>
              <table:table-cell office:value-type="float" office:value="0.002011469">
                <text:p>0.002011469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72.18408203125">
                <text:p>672.18408203125</text:p>
              </table:table-cell>
              <table:table-cell office:value-type="float" office:value="0.002945318">
                <text:p>0.002945318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72.304016113281">
                <text:p>672.304016113281</text:p>
              </table:table-cell>
              <table:table-cell office:value-type="float" office:value="-0.0006101235">
                <text:p>-0.0006101235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72.423950195313">
                <text:p>672.423950195313</text:p>
              </table:table-cell>
              <table:table-cell office:value-type="float" office:value="-0.0050257">
                <text:p>-0.0050257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72.543823242188">
                <text:p>672.543823242188</text:p>
              </table:table-cell>
              <table:table-cell office:value-type="float" office:value="-0.0005490227">
                <text:p>-0.0005490227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72.663757324219">
                <text:p>672.663757324219</text:p>
              </table:table-cell>
              <table:table-cell office:value-type="float" office:value="0.008610419">
                <text:p>0.008610419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72.78369140625">
                <text:p>672.78369140625</text:p>
              </table:table-cell>
              <table:table-cell office:value-type="float" office:value="0.006570985">
                <text:p>0.006570985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72.903625488281">
                <text:p>672.903625488281</text:p>
              </table:table-cell>
              <table:table-cell office:value-type="float" office:value="0.0172686">
                <text:p>0.0172686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73.023559570313">
                <text:p>673.023559570313</text:p>
              </table:table-cell>
              <table:table-cell office:value-type="float" office:value="0.01473324">
                <text:p>0.0147332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73.143493652344">
                <text:p>673.143493652344</text:p>
              </table:table-cell>
              <table:table-cell office:value-type="float" office:value="0.00703776">
                <text:p>0.00703776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73.263427734375">
                <text:p>673.263427734375</text:p>
              </table:table-cell>
              <table:table-cell office:value-type="float" office:value="-0.005124481">
                <text:p>-0.00512448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73.383361816406">
                <text:p>673.383361816406</text:p>
              </table:table-cell>
              <table:table-cell office:value-type="float" office:value="0.02073307">
                <text:p>0.02073307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73.503295898438">
                <text:p>673.503295898438</text:p>
              </table:table-cell>
              <table:table-cell office:value-type="float" office:value="-0.004825633">
                <text:p>-0.004825633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73.623229980469">
                <text:p>673.623229980469</text:p>
              </table:table-cell>
              <table:table-cell office:value-type="float" office:value="0.001333628">
                <text:p>0.00133362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73.7431640625">
                <text:p>673.7431640625</text:p>
              </table:table-cell>
              <table:table-cell office:value-type="float" office:value="0.001849842">
                <text:p>0.001849842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73.863098144531">
                <text:p>673.863098144531</text:p>
              </table:table-cell>
              <table:table-cell office:value-type="float" office:value="0.006795108">
                <text:p>0.006795108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73.983032226563">
                <text:p>673.983032226563</text:p>
              </table:table-cell>
              <table:table-cell office:value-type="float" office:value="0.002411213">
                <text:p>0.002411213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74.102966308594">
                <text:p>674.102966308594</text:p>
              </table:table-cell>
              <table:table-cell office:value-type="float" office:value="0.01029915">
                <text:p>0.01029915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74.222900390625">
                <text:p>674.222900390625</text:p>
              </table:table-cell>
              <table:table-cell office:value-type="float" office:value="-0.003078151">
                <text:p>-0.003078151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74.342834472656">
                <text:p>674.342834472656</text:p>
              </table:table-cell>
              <table:table-cell office:value-type="float" office:value="-0.004131011">
                <text:p>-0.004131011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74.462768554688">
                <text:p>674.462768554688</text:p>
              </table:table-cell>
              <table:table-cell office:value-type="float" office:value="0.00626767">
                <text:p>0.0062676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74.582702636719">
                <text:p>674.582702636719</text:p>
              </table:table-cell>
              <table:table-cell office:value-type="float" office:value="0.007088814">
                <text:p>0.007088814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74.702697753906">
                <text:p>674.702697753906</text:p>
              </table:table-cell>
              <table:table-cell office:value-type="float" office:value="0.01054004">
                <text:p>0.01054004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74.822631835938">
                <text:p>674.822631835938</text:p>
              </table:table-cell>
              <table:table-cell office:value-type="float" office:value="0.0002344775">
                <text:p>0.0002344775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74.942565917969">
                <text:p>674.942565917969</text:p>
              </table:table-cell>
              <table:table-cell office:value-type="float" office:value="0.01498993">
                <text:p>0.0149899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75.0625">
                <text:p>675.0625</text:p>
              </table:table-cell>
              <table:table-cell office:value-type="float" office:value="-0.000655077">
                <text:p>-0.000655077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75.182495117188">
                <text:p>675.182495117188</text:p>
              </table:table-cell>
              <table:table-cell office:value-type="float" office:value="0.0005244901">
                <text:p>0.0005244901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75.302429199219">
                <text:p>675.302429199219</text:p>
              </table:table-cell>
              <table:table-cell office:value-type="float" office:value="0.008319643">
                <text:p>0.008319643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75.42236328125">
                <text:p>675.42236328125</text:p>
              </table:table-cell>
              <table:table-cell office:value-type="float" office:value="0.01524709">
                <text:p>0.01524709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75.542297363281">
                <text:p>675.542297363281</text:p>
              </table:table-cell>
              <table:table-cell office:value-type="float" office:value="0.013741">
                <text:p>0.013741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75.662292480469">
                <text:p>675.662292480469</text:p>
              </table:table-cell>
              <table:table-cell office:value-type="float" office:value="0.008566245">
                <text:p>0.008566245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75.7822265625">
                <text:p>675.7822265625</text:p>
              </table:table-cell>
              <table:table-cell office:value-type="float" office:value="0.009853235">
                <text:p>0.009853235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75.902160644531">
                <text:p>675.902160644531</text:p>
              </table:table-cell>
              <table:table-cell office:value-type="float" office:value="-0.003012203">
                <text:p>-0.00301220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76.022155761719">
                <text:p>676.022155761719</text:p>
              </table:table-cell>
              <table:table-cell office:value-type="float" office:value="0.01094916">
                <text:p>0.01094916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76.14208984375">
                <text:p>676.14208984375</text:p>
              </table:table-cell>
              <table:table-cell office:value-type="float" office:value="0.003189261">
                <text:p>0.003189261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76.262023925781">
                <text:p>676.262023925781</text:p>
              </table:table-cell>
              <table:table-cell office:value-type="float" office:value="-0.002818272">
                <text:p>-0.002818272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76.382019042969">
                <text:p>676.382019042969</text:p>
              </table:table-cell>
              <table:table-cell office:value-type="float" office:value="0.01124034">
                <text:p>0.01124034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76.501953125">
                <text:p>676.501953125</text:p>
              </table:table-cell>
              <table:table-cell office:value-type="float" office:value="0.004368108">
                <text:p>0.004368108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76.621948242188">
                <text:p>676.621948242188</text:p>
              </table:table-cell>
              <table:table-cell office:value-type="float" office:value="-0.003601653">
                <text:p>-0.003601653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76.741882324219">
                <text:p>676.741882324219</text:p>
              </table:table-cell>
              <table:table-cell office:value-type="float" office:value="-0.006568916">
                <text:p>-0.006568916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76.861877441406">
                <text:p>676.861877441406</text:p>
              </table:table-cell>
              <table:table-cell office:value-type="float" office:value="0.002172478">
                <text:p>0.002172478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76.981811523438">
                <text:p>676.981811523438</text:p>
              </table:table-cell>
              <table:table-cell office:value-type="float" office:value="0.005818697">
                <text:p>0.005818697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77.101806640625">
                <text:p>677.101806640625</text:p>
              </table:table-cell>
              <table:table-cell office:value-type="float" office:value="0.003723043">
                <text:p>0.003723043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77.221740722656">
                <text:p>677.221740722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77.341735839844">
                <text:p>677.341735839844</text:p>
              </table:table-cell>
              <table:table-cell office:value-type="float" office:value="0.01110223">
                <text:p>0.01110223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77.461669921875">
                <text:p>677.461669921875</text:p>
              </table:table-cell>
              <table:table-cell office:value-type="float" office:value="0.001507148">
                <text:p>0.001507148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77.581665039063">
                <text:p>677.581665039063</text:p>
              </table:table-cell>
              <table:table-cell office:value-type="float" office:value="0.007042065">
                <text:p>0.007042065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77.70166015625">
                <text:p>677.70166015625</text:p>
              </table:table-cell>
              <table:table-cell office:value-type="float" office:value="0.0003870276">
                <text:p>0.0003870276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77.821594238281">
                <text:p>677.821594238281</text:p>
              </table:table-cell>
              <table:table-cell office:value-type="float" office:value="0.007237653">
                <text:p>0.007237653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77.941589355469">
                <text:p>677.941589355469</text:p>
              </table:table-cell>
              <table:table-cell office:value-type="float" office:value="0.003618725">
                <text:p>0.003618725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78.061584472656">
                <text:p>678.061584472656</text:p>
              </table:table-cell>
              <table:table-cell office:value-type="float" office:value="0.0002482649">
                <text:p>0.0002482649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78.181518554688">
                <text:p>678.181518554688</text:p>
              </table:table-cell>
              <table:table-cell office:value-type="float" office:value="0.0005375056">
                <text:p>0.0005375056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78.301513671875">
                <text:p>678.301513671875</text:p>
              </table:table-cell>
              <table:table-cell office:value-type="float" office:value="0.004818607">
                <text:p>0.004818607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78.421508789063">
                <text:p>678.421508789063</text:p>
              </table:table-cell>
              <table:table-cell office:value-type="float" office:value="-0.001909152">
                <text:p>-0.001909152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78.541442871094">
                <text:p>678.541442871094</text:p>
              </table:table-cell>
              <table:table-cell office:value-type="float" office:value="0.01712108">
                <text:p>0.01712108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78.661437988281">
                <text:p>678.661437988281</text:p>
              </table:table-cell>
              <table:table-cell office:value-type="float" office:value="0.0008776507">
                <text:p>0.0008776507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78.781433105469">
                <text:p>678.781433105469</text:p>
              </table:table-cell>
              <table:table-cell office:value-type="float" office:value="0.005600961">
                <text:p>0.005600961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78.901428222656">
                <text:p>678.901428222656</text:p>
              </table:table-cell>
              <table:table-cell office:value-type="float" office:value="0.00756288">
                <text:p>0.00756288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79.021362304688">
                <text:p>679.021362304688</text:p>
              </table:table-cell>
              <table:table-cell office:value-type="float" office:value="0.005947359">
                <text:p>0.005947359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79.141357421875">
                <text:p>679.141357421875</text:p>
              </table:table-cell>
              <table:table-cell office:value-type="float" office:value="0.002695567">
                <text:p>0.002695567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79.261352539063">
                <text:p>679.261352539063</text:p>
              </table:table-cell>
              <table:table-cell office:value-type="float" office:value="0.009676045">
                <text:p>0.009676045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79.38134765625">
                <text:p>679.38134765625</text:p>
              </table:table-cell>
              <table:table-cell office:value-type="float" office:value="0.0105141">
                <text:p>0.010514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79.501342773438">
                <text:p>679.501342773438</text:p>
              </table:table-cell>
              <table:table-cell office:value-type="float" office:value="-0.0005638428">
                <text:p>-0.0005638428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79.621337890625">
                <text:p>679.621337890625</text:p>
              </table:table-cell>
              <table:table-cell office:value-type="float" office:value="0.007605946">
                <text:p>0.00760594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79.741333007813">
                <text:p>679.741333007813</text:p>
              </table:table-cell>
              <table:table-cell office:value-type="float" office:value="0.004430144">
                <text:p>0.004430144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79.861267089844">
                <text:p>679.861267089844</text:p>
              </table:table-cell>
              <table:table-cell office:value-type="float" office:value="0.006184138">
                <text:p>0.006184138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79.981262207031">
                <text:p>679.981262207031</text:p>
              </table:table-cell>
              <table:table-cell office:value-type="float" office:value="0.001834315">
                <text:p>0.001834315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80.101257324219">
                <text:p>680.101257324219</text:p>
              </table:table-cell>
              <table:table-cell office:value-type="float" office:value="-0.002016511">
                <text:p>-0.002016511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80.221252441406">
                <text:p>680.221252441406</text:p>
              </table:table-cell>
              <table:table-cell office:value-type="float" office:value="0.01180774">
                <text:p>0.01180774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80.341247558594">
                <text:p>680.341247558594</text:p>
              </table:table-cell>
              <table:table-cell office:value-type="float" office:value="-0.001159858">
                <text:p>-0.001159858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80.461242675781">
                <text:p>680.461242675781</text:p>
              </table:table-cell>
              <table:table-cell office:value-type="float" office:value="-0.0007921908">
                <text:p>-0.0007921908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80.581237792969">
                <text:p>680.581237792969</text:p>
              </table:table-cell>
              <table:table-cell office:value-type="float" office:value="0.0012864">
                <text:p>0.0012864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80.701232910156">
                <text:p>680.701232910156</text:p>
              </table:table-cell>
              <table:table-cell office:value-type="float" office:value="0.005611503">
                <text:p>0.005611503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80.821228027344">
                <text:p>680.821228027344</text:p>
              </table:table-cell>
              <table:table-cell office:value-type="float" office:value="0.005668593">
                <text:p>0.005668593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80.941223144531">
                <text:p>680.941223144531</text:p>
              </table:table-cell>
              <table:table-cell office:value-type="float" office:value="0.002473215">
                <text:p>0.002473215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81.061218261719">
                <text:p>681.061218261719</text:p>
              </table:table-cell>
              <table:table-cell office:value-type="float" office:value="0.0008645812">
                <text:p>0.0008645812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81.181274414063">
                <text:p>681.181274414063</text:p>
              </table:table-cell>
              <table:table-cell office:value-type="float" office:value="0.001178986">
                <text:p>0.001178986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1.30126953125">
                <text:p>681.30126953125</text:p>
              </table:table-cell>
              <table:table-cell office:value-type="float" office:value="0.005305279">
                <text:p>0.005305279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1.421264648438">
                <text:p>681.421264648438</text:p>
              </table:table-cell>
              <table:table-cell office:value-type="float" office:value="0.007535639">
                <text:p>0.007535639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81.541259765625">
                <text:p>681.541259765625</text:p>
              </table:table-cell>
              <table:table-cell office:value-type="float" office:value="-0.007032804">
                <text:p>-0.007032804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81.661254882813">
                <text:p>681.661254882813</text:p>
              </table:table-cell>
              <table:table-cell office:value-type="float" office:value="0.004194051">
                <text:p>0.004194051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1.78125">
                <text:p>681.78125</text:p>
              </table:table-cell>
              <table:table-cell office:value-type="float" office:value="-0.002180437">
                <text:p>-0.002180437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81.901245117188">
                <text:p>681.901245117188</text:p>
              </table:table-cell>
              <table:table-cell office:value-type="float" office:value="0.005772825">
                <text:p>0.005772825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82.021301269531">
                <text:p>682.021301269531</text:p>
              </table:table-cell>
              <table:table-cell office:value-type="float" office:value="0.0003315599">
                <text:p>0.0003315599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82.141296386719">
                <text:p>682.141296386719</text:p>
              </table:table-cell>
              <table:table-cell office:value-type="float" office:value="-0.001209383">
                <text:p>-0.001209383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82.261291503906">
                <text:p>682.261291503906</text:p>
              </table:table-cell>
              <table:table-cell office:value-type="float" office:value="-0.001173652">
                <text:p>-0.001173652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82.381286621094">
                <text:p>682.381286621094</text:p>
              </table:table-cell>
              <table:table-cell office:value-type="float" office:value="0.001302995">
                <text:p>0.001302995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82.501342773438">
                <text:p>682.501342773438</text:p>
              </table:table-cell>
              <table:table-cell office:value-type="float" office:value="0.005425548">
                <text:p>0.005425548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2.621337890625">
                <text:p>682.621337890625</text:p>
              </table:table-cell>
              <table:table-cell office:value-type="float" office:value="0.0006557454">
                <text:p>0.0006557454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82.741333007813">
                <text:p>682.741333007813</text:p>
              </table:table-cell>
              <table:table-cell office:value-type="float" office:value="-0.0006458502">
                <text:p>-0.0006458502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82.861389160156">
                <text:p>682.861389160156</text:p>
              </table:table-cell>
              <table:table-cell office:value-type="float" office:value="0.002282937">
                <text:p>0.002282937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82.981384277344">
                <text:p>682.981384277344</text:p>
              </table:table-cell>
              <table:table-cell office:value-type="float" office:value="0.003412482">
                <text:p>0.003412482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83.101379394531">
                <text:p>683.101379394531</text:p>
              </table:table-cell>
              <table:table-cell office:value-type="float" office:value="-0.003397968">
                <text:p>-0.003397968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83.221435546875">
                <text:p>683.221435546875</text:p>
              </table:table-cell>
              <table:table-cell office:value-type="float" office:value="0.002176117">
                <text:p>0.002176117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83.341430664063">
                <text:p>683.341430664063</text:p>
              </table:table-cell>
              <table:table-cell office:value-type="float" office:value="-0.005676226">
                <text:p>-0.005676226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83.46142578125">
                <text:p>683.46142578125</text:p>
              </table:table-cell>
              <table:table-cell office:value-type="float" office:value="-0.004593316">
                <text:p>-0.004593316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83.581481933594">
                <text:p>683.581481933594</text:p>
              </table:table-cell>
              <table:table-cell office:value-type="float" office:value="-0.001425653">
                <text:p>-0.001425653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83.701477050781">
                <text:p>683.701477050781</text:p>
              </table:table-cell>
              <table:table-cell office:value-type="float" office:value="0.0005182351">
                <text:p>0.0005182351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683.821533203125">
                <text:p>683.821533203125</text:p>
              </table:table-cell>
              <table:table-cell office:value-type="float" office:value="-0.002583833">
                <text:p>-0.002583833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683.941528320313">
                <text:p>683.941528320313</text:p>
              </table:table-cell>
              <table:table-cell office:value-type="float" office:value="-0.003113126">
                <text:p>-0.003113126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684.061584472656">
                <text:p>684.061584472656</text:p>
              </table:table-cell>
              <table:table-cell office:value-type="float" office:value="0.007066727">
                <text:p>0.007066727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84.181579589844">
                <text:p>684.181579589844</text:p>
              </table:table-cell>
              <table:table-cell office:value-type="float" office:value="-0.006655571">
                <text:p>-0.006655571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684.301635742188">
                <text:p>684.301635742188</text:p>
              </table:table-cell>
              <table:table-cell office:value-type="float" office:value="-0.001885084">
                <text:p>-0.001885084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684.421630859375">
                <text:p>684.421630859375</text:p>
              </table:table-cell>
              <table:table-cell office:value-type="float" office:value="-0.005530613">
                <text:p>-0.005530613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684.541687011719">
                <text:p>684.541687011719</text:p>
              </table:table-cell>
              <table:table-cell office:value-type="float" office:value="0.00675377">
                <text:p>0.00675377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684.661682128906">
                <text:p>684.661682128906</text:p>
              </table:table-cell>
              <table:table-cell office:value-type="float" office:value="-0.002557938">
                <text:p>-0.002557938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84.78173828125">
                <text:p>684.78173828125</text:p>
              </table:table-cell>
              <table:table-cell office:value-type="float" office:value="0.008105192">
                <text:p>0.008105192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84.901733398438">
                <text:p>684.901733398438</text:p>
              </table:table-cell>
              <table:table-cell office:value-type="float" office:value="0.0107253">
                <text:p>0.0107253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85.021789550781">
                <text:p>685.021789550781</text:p>
              </table:table-cell>
              <table:table-cell office:value-type="float" office:value="-0.002603622">
                <text:p>-0.002603622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85.141784667969">
                <text:p>685.141784667969</text:p>
              </table:table-cell>
              <table:table-cell office:value-type="float" office:value="0.003174728">
                <text:p>0.003174728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685.261840820313">
                <text:p>685.261840820313</text:p>
              </table:table-cell>
              <table:table-cell office:value-type="float" office:value="0.01171805">
                <text:p>0.01171805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685.381896972656">
                <text:p>685.381896972656</text:p>
              </table:table-cell>
              <table:table-cell office:value-type="float" office:value="0.004307078">
                <text:p>0.004307078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85.501892089844">
                <text:p>685.501892089844</text:p>
              </table:table-cell>
              <table:table-cell office:value-type="float" office:value="-0.001355078">
                <text:p>-0.001355078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685.621948242188">
                <text:p>685.621948242188</text:p>
              </table:table-cell>
              <table:table-cell office:value-type="float" office:value="0.01342343">
                <text:p>0.0134234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85.742004394531">
                <text:p>685.742004394531</text:p>
              </table:table-cell>
              <table:table-cell office:value-type="float" office:value="0.001108594">
                <text:p>0.001108594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685.861999511719">
                <text:p>685.861999511719</text:p>
              </table:table-cell>
              <table:table-cell office:value-type="float" office:value="0.002890441">
                <text:p>0.002890441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685.982055664063">
                <text:p>685.982055664063</text:p>
              </table:table-cell>
              <table:table-cell office:value-type="float" office:value="-0.001194988">
                <text:p>-0.001194988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686.102111816406">
                <text:p>686.102111816406</text:p>
              </table:table-cell>
              <table:table-cell office:value-type="float" office:value="0.004019489">
                <text:p>0.004019489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686.22216796875">
                <text:p>686.22216796875</text:p>
              </table:table-cell>
              <table:table-cell office:value-type="float" office:value="-0.005229104">
                <text:p>-0.005229104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86.342163085938">
                <text:p>686.342163085938</text:p>
              </table:table-cell>
              <table:table-cell office:value-type="float" office:value="-0.003179198">
                <text:p>-0.003179198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86.462219238281">
                <text:p>686.462219238281</text:p>
              </table:table-cell>
              <table:table-cell office:value-type="float" office:value="0.004328476">
                <text:p>0.004328476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86.582275390625">
                <text:p>686.582275390625</text:p>
              </table:table-cell>
              <table:table-cell office:value-type="float" office:value="0.001801757">
                <text:p>0.001801757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86.702331542969">
                <text:p>686.702331542969</text:p>
              </table:table-cell>
              <table:table-cell office:value-type="float" office:value="0.004342285">
                <text:p>0.004342285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86.822387695313">
                <text:p>686.822387695313</text:p>
              </table:table-cell>
              <table:table-cell office:value-type="float" office:value="0.0003360269">
                <text:p>0.0003360269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86.9423828125">
                <text:p>686.9423828125</text:p>
              </table:table-cell>
              <table:table-cell office:value-type="float" office:value="0.008573077">
                <text:p>0.008573077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687.062438964844">
                <text:p>687.062438964844</text:p>
              </table:table-cell>
              <table:table-cell office:value-type="float" office:value="0.004285051">
                <text:p>0.004285051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687.182495117188">
                <text:p>687.182495117188</text:p>
              </table:table-cell>
              <table:table-cell office:value-type="float" office:value="-0.007280493">
                <text:p>-0.007280493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87.302551269531">
                <text:p>687.302551269531</text:p>
              </table:table-cell>
              <table:table-cell office:value-type="float" office:value="0.003488386">
                <text:p>0.00348838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687.422607421875">
                <text:p>687.422607421875</text:p>
              </table:table-cell>
              <table:table-cell office:value-type="float" office:value="-0.003696491">
                <text:p>-0.003696491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87.542663574219">
                <text:p>687.542663574219</text:p>
              </table:table-cell>
              <table:table-cell office:value-type="float" office:value="-0.005658252">
                <text:p>-0.005658252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87.662719726563">
                <text:p>687.662719726563</text:p>
              </table:table-cell>
              <table:table-cell office:value-type="float" office:value="0.01194905">
                <text:p>0.01194905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87.782775878906">
                <text:p>687.782775878906</text:p>
              </table:table-cell>
              <table:table-cell office:value-type="float" office:value="0.00091668">
                <text:p>0.00091668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687.90283203125">
                <text:p>687.90283203125</text:p>
              </table:table-cell>
              <table:table-cell office:value-type="float" office:value="0.008454965">
                <text:p>0.008454965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8.022888183594">
                <text:p>688.022888183594</text:p>
              </table:table-cell>
              <table:table-cell office:value-type="float" office:value="0.01037645">
                <text:p>0.01037645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88.142944335938">
                <text:p>688.142944335938</text:p>
              </table:table-cell>
              <table:table-cell office:value-type="float" office:value="0.005756063">
                <text:p>0.005756063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88.263000488281">
                <text:p>688.263000488281</text:p>
              </table:table-cell>
              <table:table-cell office:value-type="float" office:value="-0.00253948">
                <text:p>-0.00253948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88.383056640625">
                <text:p>688.383056640625</text:p>
              </table:table-cell>
              <table:table-cell office:value-type="float" office:value="0.0002093969">
                <text:p>0.0002093969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88.503112792969">
                <text:p>688.503112792969</text:p>
              </table:table-cell>
              <table:table-cell office:value-type="float" office:value="-0.002166731">
                <text:p>-0.002166731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88.623168945313">
                <text:p>688.623168945313</text:p>
              </table:table-cell>
              <table:table-cell office:value-type="float" office:value="-0.003954595">
                <text:p>-0.003954595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88.743225097656">
                <text:p>688.743225097656</text:p>
              </table:table-cell>
              <table:table-cell office:value-type="float" office:value="-0.001353218">
                <text:p>-0.001353218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88.86328125">
                <text:p>688.86328125</text:p>
              </table:table-cell>
              <table:table-cell office:value-type="float" office:value="-0.0003458851">
                <text:p>-0.0003458851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688.983337402344">
                <text:p>688.983337402344</text:p>
              </table:table-cell>
              <table:table-cell office:value-type="float" office:value="-0.000956578">
                <text:p>-0.000956578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689.103393554688">
                <text:p>689.103393554688</text:p>
              </table:table-cell>
              <table:table-cell office:value-type="float" office:value="0.00169808">
                <text:p>0.00169808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89.223449707031">
                <text:p>689.223449707031</text:p>
              </table:table-cell>
              <table:table-cell office:value-type="float" office:value="0.001140216">
                <text:p>0.001140216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89.343505859375">
                <text:p>689.343505859375</text:p>
              </table:table-cell>
              <table:table-cell office:value-type="float" office:value="0.01614746">
                <text:p>0.01614746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689.463562011719">
                <text:p>689.463562011719</text:p>
              </table:table-cell>
              <table:table-cell office:value-type="float" office:value="0.004763298">
                <text:p>0.004763298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689.583679199219">
                <text:p>689.583679199219</text:p>
              </table:table-cell>
              <table:table-cell office:value-type="float" office:value="0.005569009">
                <text:p>0.005569009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89.703735351563">
                <text:p>689.703735351563</text:p>
              </table:table-cell>
              <table:table-cell office:value-type="float" office:value="0.006046859">
                <text:p>0.006046859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89.823791503906">
                <text:p>689.823791503906</text:p>
              </table:table-cell>
              <table:table-cell office:value-type="float" office:value="-0.001899254">
                <text:p>-0.001899254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689.94384765625">
                <text:p>689.94384765625</text:p>
              </table:table-cell>
              <table:table-cell office:value-type="float" office:value="-0.002234617">
                <text:p>-0.002234617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690.063903808594">
                <text:p>690.063903808594</text:p>
              </table:table-cell>
              <table:table-cell office:value-type="float" office:value="0.005246366">
                <text:p>0.005246366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90.184020996094">
                <text:p>690.184020996094</text:p>
              </table:table-cell>
              <table:table-cell office:value-type="float" office:value="0.00315873">
                <text:p>0.00315873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90.304077148438">
                <text:p>690.304077148438</text:p>
              </table:table-cell>
              <table:table-cell office:value-type="float" office:value="0.001318529">
                <text:p>0.001318529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690.424133300781">
                <text:p>690.424133300781</text:p>
              </table:table-cell>
              <table:table-cell office:value-type="float" office:value="0.004518697">
                <text:p>0.004518697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90.544189453125">
                <text:p>690.544189453125</text:p>
              </table:table-cell>
              <table:table-cell office:value-type="float" office:value="0.0218101">
                <text:p>0.0218101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90.664306640625">
                <text:p>690.664306640625</text:p>
              </table:table-cell>
              <table:table-cell office:value-type="float" office:value="-0.004164147">
                <text:p>-0.004164147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0.784362792969">
                <text:p>690.784362792969</text:p>
              </table:table-cell>
              <table:table-cell office:value-type="float" office:value="0.002341973">
                <text:p>0.002341973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90.904418945313">
                <text:p>690.904418945313</text:p>
              </table:table-cell>
              <table:table-cell office:value-type="float" office:value="0.03745471">
                <text:p>0.03745471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91.024475097656">
                <text:p>691.024475097656</text:p>
              </table:table-cell>
              <table:table-cell office:value-type="float" office:value="0.004983947">
                <text:p>0.004983947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91.144592285156">
                <text:p>691.144592285156</text:p>
              </table:table-cell>
              <table:table-cell office:value-type="float" office:value="0.004510344">
                <text:p>0.004510344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91.2646484375">
                <text:p>691.2646484375</text:p>
              </table:table-cell>
              <table:table-cell office:value-type="float" office:value="-0.0001104769">
                <text:p>-0.0001104769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1.384765625">
                <text:p>691.384765625</text:p>
              </table:table-cell>
              <table:table-cell office:value-type="float" office:value="0.01303546">
                <text:p>0.01303546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691.504821777344">
                <text:p>691.504821777344</text:p>
              </table:table-cell>
              <table:table-cell office:value-type="float" office:value="0.003069615">
                <text:p>0.003069615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691.624877929688">
                <text:p>691.624877929688</text:p>
              </table:table-cell>
              <table:table-cell office:value-type="float" office:value="-0.006893045">
                <text:p>-0.006893045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91.744995117188">
                <text:p>691.744995117188</text:p>
              </table:table-cell>
              <table:table-cell office:value-type="float" office:value="0.01058678">
                <text:p>0.01058678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691.865051269531">
                <text:p>691.865051269531</text:p>
              </table:table-cell>
              <table:table-cell office:value-type="float" office:value="-0.004681329">
                <text:p>-0.00468132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691.985168457031">
                <text:p>691.985168457031</text:p>
              </table:table-cell>
              <table:table-cell office:value-type="float" office:value="-0.002712006">
                <text:p>-0.002712006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92.105224609375">
                <text:p>692.105224609375</text:p>
              </table:table-cell>
              <table:table-cell office:value-type="float" office:value="0.009349429">
                <text:p>0.009349429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92.225280761719">
                <text:p>692.225280761719</text:p>
              </table:table-cell>
              <table:table-cell office:value-type="float" office:value="0.004667558">
                <text:p>0.004667558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692.345397949219">
                <text:p>692.345397949219</text:p>
              </table:table-cell>
              <table:table-cell office:value-type="float" office:value="0.01324624">
                <text:p>0.01324624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692.465454101563">
                <text:p>692.465454101563</text:p>
              </table:table-cell>
              <table:table-cell office:value-type="float" office:value="0.005444951">
                <text:p>0.005444951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692.585571289063">
                <text:p>692.585571289063</text:p>
              </table:table-cell>
              <table:table-cell office:value-type="float" office:value="0.007554704">
                <text:p>0.007554704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692.705627441406">
                <text:p>692.705627441406</text:p>
              </table:table-cell>
              <table:table-cell office:value-type="float" office:value="0.001307111">
                <text:p>0.001307111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692.825744628906">
                <text:p>692.825744628906</text:p>
              </table:table-cell>
              <table:table-cell office:value-type="float" office:value="0.003091995">
                <text:p>0.003091995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92.94580078125">
                <text:p>692.94580078125</text:p>
              </table:table-cell>
              <table:table-cell office:value-type="float" office:value="0.001876509">
                <text:p>0.001876509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693.06591796875">
                <text:p>693.06591796875</text:p>
              </table:table-cell>
              <table:table-cell office:value-type="float" office:value="0.002096711">
                <text:p>0.002096711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93.18603515625">
                <text:p>693.18603515625</text:p>
              </table:table-cell>
              <table:table-cell office:value-type="float" office:value="-0.005838369">
                <text:p>-0.005838369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93.306091308594">
                <text:p>693.306091308594</text:p>
              </table:table-cell>
              <table:table-cell office:value-type="float" office:value="-0.002829848">
                <text:p>-0.002829848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693.426208496094">
                <text:p>693.426208496094</text:p>
              </table:table-cell>
              <table:table-cell office:value-type="float" office:value="-0.009438802">
                <text:p>-0.00943880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93.546264648438">
                <text:p>693.546264648438</text:p>
              </table:table-cell>
              <table:table-cell office:value-type="float" office:value="0.000740786">
                <text:p>0.000740786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693.666381835938">
                <text:p>693.666381835938</text:p>
              </table:table-cell>
              <table:table-cell office:value-type="float" office:value="-0.003020369">
                <text:p>-0.003020369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93.786499023438">
                <text:p>693.786499023438</text:p>
              </table:table-cell>
              <table:table-cell office:value-type="float" office:value="0.01232532">
                <text:p>0.01232532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93.906555175781">
                <text:p>693.906555175781</text:p>
              </table:table-cell>
              <table:table-cell office:value-type="float" office:value="-0.004899348">
                <text:p>-0.004899348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94.026672363281">
                <text:p>694.026672363281</text:p>
              </table:table-cell>
              <table:table-cell office:value-type="float" office:value="-0.0001764246">
                <text:p>-0.0001764246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694.146728515625">
                <text:p>694.1467285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94.266845703125">
                <text:p>694.266845703125</text:p>
              </table:table-cell>
              <table:table-cell office:value-type="float" office:value="0.0002561336">
                <text:p>0.0002561336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694.386962890625">
                <text:p>694.386962890625</text:p>
              </table:table-cell>
              <table:table-cell office:value-type="float" office:value="0.0009278459">
                <text:p>0.0009278459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694.507080078125">
                <text:p>694.507080078125</text:p>
              </table:table-cell>
              <table:table-cell office:value-type="float" office:value="0.008532641">
                <text:p>0.008532641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694.627136230469">
                <text:p>694.627136230469</text:p>
              </table:table-cell>
              <table:table-cell office:value-type="float" office:value="0.0002347691">
                <text:p>0.0002347691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94.747253417969">
                <text:p>694.747253417969</text:p>
              </table:table-cell>
              <table:table-cell office:value-type="float" office:value="-0.002203794">
                <text:p>-0.002203794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694.867370605469">
                <text:p>694.867370605469</text:p>
              </table:table-cell>
              <table:table-cell office:value-type="float" office:value="-0.0069849">
                <text:p>-0.0069849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694.987426757813">
                <text:p>694.987426757813</text:p>
              </table:table-cell>
              <table:table-cell office:value-type="float" office:value="0.0002985437">
                <text:p>0.0002985437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695.107543945313">
                <text:p>695.107543945313</text:p>
              </table:table-cell>
              <table:table-cell office:value-type="float" office:value="0.002713681">
                <text:p>0.002713681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695.227661132813">
                <text:p>695.227661132813</text:p>
              </table:table-cell>
              <table:table-cell office:value-type="float" office:value="0.004859427">
                <text:p>0.004859427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95.347778320313">
                <text:p>695.347778320313</text:p>
              </table:table-cell>
              <table:table-cell office:value-type="float" office:value="-0.004344501">
                <text:p>-0.004344501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95.467895507813">
                <text:p>695.467895507813</text:p>
              </table:table-cell>
              <table:table-cell office:value-type="float" office:value="-0.006501374">
                <text:p>-0.006501374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95.587951660156">
                <text:p>695.587951660156</text:p>
              </table:table-cell>
              <table:table-cell office:value-type="float" office:value="0.01053507">
                <text:p>0.01053507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695.708068847656">
                <text:p>695.708068847656</text:p>
              </table:table-cell>
              <table:table-cell office:value-type="float" office:value="0.003974378">
                <text:p>0.003974378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95.828186035156">
                <text:p>695.828186035156</text:p>
              </table:table-cell>
              <table:table-cell office:value-type="float" office:value="-0.001248816">
                <text:p>-0.001248816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95.948303222656">
                <text:p>695.948303222656</text:p>
              </table:table-cell>
              <table:table-cell office:value-type="float" office:value="-0.000394358">
                <text:p>-0.000394358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96.068420410156">
                <text:p>696.068420410156</text:p>
              </table:table-cell>
              <table:table-cell office:value-type="float" office:value="-0.004531199">
                <text:p>-0.004531199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96.188537597656">
                <text:p>696.188537597656</text:p>
              </table:table-cell>
              <table:table-cell office:value-type="float" office:value="0.0241898">
                <text:p>0.0241898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96.308654785156">
                <text:p>696.308654785156</text:p>
              </table:table-cell>
              <table:table-cell office:value-type="float" office:value="-0.006743354">
                <text:p>-0.006743354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96.428771972656">
                <text:p>696.428771972656</text:p>
              </table:table-cell>
              <table:table-cell office:value-type="float" office:value="0.0138051">
                <text:p>0.0138051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96.548828125">
                <text:p>696.548828125</text:p>
              </table:table-cell>
              <table:table-cell office:value-type="float" office:value="-0.004362534">
                <text:p>-0.004362534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96.6689453125">
                <text:p>696.6689453125</text:p>
              </table:table-cell>
              <table:table-cell office:value-type="float" office:value="-0.004018549">
                <text:p>-0.004018549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96.7890625">
                <text:p>696.7890625</text:p>
              </table:table-cell>
              <table:table-cell office:value-type="float" office:value="-0.006847553">
                <text:p>-0.006847553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96.9091796875">
                <text:p>696.9091796875</text:p>
              </table:table-cell>
              <table:table-cell office:value-type="float" office:value="-0.005607991">
                <text:p>-0.005607991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97.029296875">
                <text:p>697.029296875</text:p>
              </table:table-cell>
              <table:table-cell office:value-type="float" office:value="-0.009159983">
                <text:p>-0.009159983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97.1494140625">
                <text:p>697.1494140625</text:p>
              </table:table-cell>
              <table:table-cell office:value-type="float" office:value="0.009102445">
                <text:p>0.009102445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97.26953125">
                <text:p>697.26953125</text:p>
              </table:table-cell>
              <table:table-cell office:value-type="float" office:value="0.005222397">
                <text:p>0.005222397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97.3896484375">
                <text:p>697.3896484375</text:p>
              </table:table-cell>
              <table:table-cell office:value-type="float" office:value="-0.005399513">
                <text:p>-0.005399513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97.509765625">
                <text:p>697.509765625</text:p>
              </table:table-cell>
              <table:table-cell office:value-type="float" office:value="0.002579601">
                <text:p>0.002579601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97.6298828125">
                <text:p>697.6298828125</text:p>
              </table:table-cell>
              <table:table-cell office:value-type="float" office:value="-0.00412504">
                <text:p>-0.0041250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97.75">
                <text:p>697.75</text:p>
              </table:table-cell>
              <table:table-cell office:value-type="float" office:value="0.02471907">
                <text:p>0.02471907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97.8701171875">
                <text:p>697.8701171875</text:p>
              </table:table-cell>
              <table:table-cell office:value-type="float" office:value="0.007165647">
                <text:p>0.007165647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97.990234375">
                <text:p>697.990234375</text:p>
              </table:table-cell>
              <table:table-cell office:value-type="float" office:value="0.01433544">
                <text:p>0.01433544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8.1103515625">
                <text:p>698.1103515625</text:p>
              </table:table-cell>
              <table:table-cell office:value-type="float" office:value="0.004042541">
                <text:p>0.004042541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698.23046875">
                <text:p>698.23046875</text:p>
              </table:table-cell>
              <table:table-cell office:value-type="float" office:value="-0.006065962">
                <text:p>-0.006065962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698.350646972656">
                <text:p>698.350646972656</text:p>
              </table:table-cell>
              <table:table-cell office:value-type="float" office:value="-0.0027439">
                <text:p>-0.0027439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98.470764160156">
                <text:p>698.470764160156</text:p>
              </table:table-cell>
              <table:table-cell office:value-type="float" office:value="0.004141543">
                <text:p>0.004141543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698.590881347656">
                <text:p>698.590881347656</text:p>
              </table:table-cell>
              <table:table-cell office:value-type="float" office:value="0.0035055">
                <text:p>0.003505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98.710998535156">
                <text:p>698.710998535156</text:p>
              </table:table-cell>
              <table:table-cell office:value-type="float" office:value="0.02263065">
                <text:p>0.02263065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98.831115722656">
                <text:p>698.831115722656</text:p>
              </table:table-cell>
              <table:table-cell office:value-type="float" office:value="-0.0009444893">
                <text:p>-0.000944489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98.951232910156">
                <text:p>698.951232910156</text:p>
              </table:table-cell>
              <table:table-cell office:value-type="float" office:value="0.001525416">
                <text:p>0.001525416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99.071350097656">
                <text:p>699.071350097656</text:p>
              </table:table-cell>
              <table:table-cell office:value-type="float" office:value="0.005235697">
                <text:p>0.005235697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99.191528320313">
                <text:p>699.191528320313</text:p>
              </table:table-cell>
              <table:table-cell office:value-type="float" office:value="0.001235506">
                <text:p>0.001235506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99.311645507813">
                <text:p>699.311645507813</text:p>
              </table:table-cell>
              <table:table-cell office:value-type="float" office:value="0.002984749">
                <text:p>0.00298474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699.431762695313">
                <text:p>699.431762695313</text:p>
              </table:table-cell>
              <table:table-cell office:value-type="float" office:value="0.005215317">
                <text:p>0.005215317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699.551879882813">
                <text:p>699.551879882813</text:p>
              </table:table-cell>
              <table:table-cell office:value-type="float" office:value="0.01084225">
                <text:p>0.01084225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699.671997070313">
                <text:p>699.671997070313</text:p>
              </table:table-cell>
              <table:table-cell office:value-type="float" office:value="0.0005365605">
                <text:p>0.0005365605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99.792175292969">
                <text:p>699.792175292969</text:p>
              </table:table-cell>
              <table:table-cell office:value-type="float" office:value="-0.001011965">
                <text:p>-0.001011965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699.912292480469">
                <text:p>699.912292480469</text:p>
              </table:table-cell>
              <table:table-cell office:value-type="float" office:value="0.02421843">
                <text:p>0.02421843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0.032409667969">
                <text:p>700.032409667969</text:p>
              </table:table-cell>
              <table:table-cell office:value-type="float" office:value="0.0110438">
                <text:p>0.0110438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0.152526855469">
                <text:p>700.152526855469</text:p>
              </table:table-cell>
              <table:table-cell office:value-type="float" office:value="0.00225486">
                <text:p>0.00225486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0.272705078125">
                <text:p>700.272705078125</text:p>
              </table:table-cell>
              <table:table-cell office:value-type="float" office:value="0.0004555792">
                <text:p>0.0004555792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0.392822265625">
                <text:p>700.392822265625</text:p>
              </table:table-cell>
              <table:table-cell office:value-type="float" office:value="0.003808799">
                <text:p>0.003808799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0.512939453125">
                <text:p>700.512939453125</text:p>
              </table:table-cell>
              <table:table-cell office:value-type="float" office:value="0.01038214">
                <text:p>0.01038214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00.633117675781">
                <text:p>700.633117675781</text:p>
              </table:table-cell>
              <table:table-cell office:value-type="float" office:value="0.002219872">
                <text:p>0.002219872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00.753234863281">
                <text:p>700.753234863281</text:p>
              </table:table-cell>
              <table:table-cell office:value-type="float" office:value="0.002097554">
                <text:p>0.002097554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0.873352050781">
                <text:p>700.873352050781</text:p>
              </table:table-cell>
              <table:table-cell office:value-type="float" office:value="-0.005252187">
                <text:p>-0.005252187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00.993530273438">
                <text:p>700.993530273438</text:p>
              </table:table-cell>
              <table:table-cell office:value-type="float" office:value="-0.001646628">
                <text:p>-0.001646628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01.113647460938">
                <text:p>701.113647460938</text:p>
              </table:table-cell>
              <table:table-cell office:value-type="float" office:value="0.003984517">
                <text:p>0.003984517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701.233764648438">
                <text:p>701.233764648438</text:p>
              </table:table-cell>
              <table:table-cell office:value-type="float" office:value="-0.001940944">
                <text:p>-0.00194094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01.353942871094">
                <text:p>701.353942871094</text:p>
              </table:table-cell>
              <table:table-cell office:value-type="float" office:value="0.01494385">
                <text:p>0.01494385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01.474060058594">
                <text:p>701.474060058594</text:p>
              </table:table-cell>
              <table:table-cell office:value-type="float" office:value="0.007582305">
                <text:p>0.007582305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01.594177246094">
                <text:p>701.594177246094</text:p>
              </table:table-cell>
              <table:table-cell office:value-type="float" office:value="-0.003497323">
                <text:p>-0.003497323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01.71435546875">
                <text:p>701.71435546875</text:p>
              </table:table-cell>
              <table:table-cell office:value-type="float" office:value="0.006765828">
                <text:p>0.006765828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01.83447265625">
                <text:p>701.83447265625</text:p>
              </table:table-cell>
              <table:table-cell office:value-type="float" office:value="-0.007144732">
                <text:p>-0.007144732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01.954650878906">
                <text:p>701.954650878906</text:p>
              </table:table-cell>
              <table:table-cell office:value-type="float" office:value="-0.003336102">
                <text:p>-0.003336102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02.074768066406">
                <text:p>702.074768066406</text:p>
              </table:table-cell>
              <table:table-cell office:value-type="float" office:value="0.005945149">
                <text:p>0.005945149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02.194946289063">
                <text:p>702.194946289063</text:p>
              </table:table-cell>
              <table:table-cell office:value-type="float" office:value="0.01101727">
                <text:p>0.01101727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02.315063476563">
                <text:p>702.315063476563</text:p>
              </table:table-cell>
              <table:table-cell office:value-type="float" office:value="-0.002929933">
                <text:p>-0.002929933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02.435241699219">
                <text:p>702.435241699219</text:p>
              </table:table-cell>
              <table:table-cell office:value-type="float" office:value="-0.003240024">
                <text:p>-0.003240024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02.555358886719">
                <text:p>702.555358886719</text:p>
              </table:table-cell>
              <table:table-cell office:value-type="float" office:value="0.009352718">
                <text:p>0.009352718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02.675537109375">
                <text:p>702.675537109375</text:p>
              </table:table-cell>
              <table:table-cell office:value-type="float" office:value="0.01618413">
                <text:p>0.01618413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02.795654296875">
                <text:p>702.795654296875</text:p>
              </table:table-cell>
              <table:table-cell office:value-type="float" office:value="-0.0008747025">
                <text:p>-0.0008747025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02.915832519531">
                <text:p>702.915832519531</text:p>
              </table:table-cell>
              <table:table-cell office:value-type="float" office:value="0.002247087">
                <text:p>0.002247087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.035949707031">
                <text:p>703.035949707031</text:p>
              </table:table-cell>
              <table:table-cell office:value-type="float" office:value="-0.002014271">
                <text:p>-0.002014271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703.156127929688">
                <text:p>703.156127929688</text:p>
              </table:table-cell>
              <table:table-cell office:value-type="float" office:value="-0.0006602708">
                <text:p>-0.0006602708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03.276245117188">
                <text:p>703.276245117188</text:p>
              </table:table-cell>
              <table:table-cell office:value-type="float" office:value="-0.0007256923">
                <text:p>-0.0007256923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03.396423339844">
                <text:p>703.396423339844</text:p>
              </table:table-cell>
              <table:table-cell office:value-type="float" office:value="-0.004005481">
                <text:p>-0.004005481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03.516540527344">
                <text:p>703.516540527344</text:p>
              </table:table-cell>
              <table:table-cell office:value-type="float" office:value="0.0005024195">
                <text:p>0.0005024195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703.63671875">
                <text:p>703.63671875</text:p>
              </table:table-cell>
              <table:table-cell office:value-type="float" office:value="0.01214168">
                <text:p>0.01214168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703.756896972656">
                <text:p>703.756896972656</text:p>
              </table:table-cell>
              <table:table-cell office:value-type="float" office:value="-0.007709529">
                <text:p>-0.007709529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703.877014160156">
                <text:p>703.877014160156</text:p>
              </table:table-cell>
              <table:table-cell office:value-type="float" office:value="0.007584603">
                <text:p>0.007584603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03.997192382813">
                <text:p>703.997192382813</text:p>
              </table:table-cell>
              <table:table-cell office:value-type="float" office:value="-0.003475505">
                <text:p>-0.003475505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04.117309570313">
                <text:p>704.117309570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704.237487792969">
                <text:p>704.237487792969</text:p>
              </table:table-cell>
              <table:table-cell office:value-type="float" office:value="-0.003984428">
                <text:p>-0.003984428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704.357666015625">
                <text:p>704.357666015625</text:p>
              </table:table-cell>
              <table:table-cell office:value-type="float" office:value="-0.003831958">
                <text:p>-0.003831958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704.477783203125">
                <text:p>704.477783203125</text:p>
              </table:table-cell>
              <table:table-cell office:value-type="float" office:value="0.01146918">
                <text:p>0.01146918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704.597961425781">
                <text:p>704.597961425781</text:p>
              </table:table-cell>
              <table:table-cell office:value-type="float" office:value="-0.002587452">
                <text:p>-0.002587452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04.718139648438">
                <text:p>704.718139648438</text:p>
              </table:table-cell>
              <table:table-cell office:value-type="float" office:value="-0.004554297">
                <text:p>-0.00455429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04.838256835938">
                <text:p>704.838256835938</text:p>
              </table:table-cell>
              <table:table-cell office:value-type="float" office:value="-0.007075341">
                <text:p>-0.007075341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04.958435058594">
                <text:p>704.958435058594</text:p>
              </table:table-cell>
              <table:table-cell office:value-type="float" office:value="-0.00694338">
                <text:p>-0.00694338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05.07861328125">
                <text:p>705.07861328125</text:p>
              </table:table-cell>
              <table:table-cell office:value-type="float" office:value="0.003396463">
                <text:p>0.003396463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05.19873046875">
                <text:p>705.19873046875</text:p>
              </table:table-cell>
              <table:table-cell office:value-type="float" office:value="0.001621824">
                <text:p>0.001621824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05.318908691406">
                <text:p>705.318908691406</text:p>
              </table:table-cell>
              <table:table-cell office:value-type="float" office:value="-0.002451401">
                <text:p>-0.002451401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05.439086914063">
                <text:p>705.439086914063</text:p>
              </table:table-cell>
              <table:table-cell office:value-type="float" office:value="0.0101657">
                <text:p>0.0101657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05.559265136719">
                <text:p>705.559265136719</text:p>
              </table:table-cell>
              <table:table-cell office:value-type="float" office:value="-0.001165037">
                <text:p>-0.00116503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05.679382324219">
                <text:p>705.679382324219</text:p>
              </table:table-cell>
              <table:table-cell office:value-type="float" office:value="0.002128683">
                <text:p>0.002128683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705.799560546875">
                <text:p>705.799560546875</text:p>
              </table:table-cell>
              <table:table-cell office:value-type="float" office:value="0.01185843">
                <text:p>0.01185843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705.919738769531">
                <text:p>705.919738769531</text:p>
              </table:table-cell>
              <table:table-cell office:value-type="float" office:value="-0.001139072">
                <text:p>-0.001139072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06.039916992188">
                <text:p>706.039916992188</text:p>
              </table:table-cell>
              <table:table-cell office:value-type="float" office:value="-0.001201359">
                <text:p>-0.001201359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706.160034179688">
                <text:p>706.160034179688</text:p>
              </table:table-cell>
              <table:table-cell office:value-type="float" office:value="0.01823074">
                <text:p>0.01823074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706.280212402344">
                <text:p>706.280212402344</text:p>
              </table:table-cell>
              <table:table-cell office:value-type="float" office:value="0.0002366174">
                <text:p>0.0002366174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706.400390625">
                <text:p>706.400390625</text:p>
              </table:table-cell>
              <table:table-cell office:value-type="float" office:value="0.003893424">
                <text:p>0.003893424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706.520568847656">
                <text:p>706.520568847656</text:p>
              </table:table-cell>
              <table:table-cell office:value-type="float" office:value="0.005788869">
                <text:p>0.005788869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706.640747070313">
                <text:p>706.640747070313</text:p>
              </table:table-cell>
              <table:table-cell office:value-type="float" office:value="-0.002707923">
                <text:p>-0.002707923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706.760925292969">
                <text:p>706.760925292969</text:p>
              </table:table-cell>
              <table:table-cell office:value-type="float" office:value="0.008790759">
                <text:p>0.008790759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706.881042480469">
                <text:p>706.881042480469</text:p>
              </table:table-cell>
              <table:table-cell office:value-type="float" office:value="0.001515685">
                <text:p>0.001515685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707.001220703125">
                <text:p>707.001220703125</text:p>
              </table:table-cell>
              <table:table-cell office:value-type="float" office:value="-0.00712159">
                <text:p>-0.00712159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07.121398925781">
                <text:p>707.121398925781</text:p>
              </table:table-cell>
              <table:table-cell office:value-type="float" office:value="-0.007579163">
                <text:p>-0.007579163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07.241577148438">
                <text:p>707.241577148438</text:p>
              </table:table-cell>
              <table:table-cell office:value-type="float" office:value="0.002748586">
                <text:p>0.002748586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707.361755371094">
                <text:p>707.361755371094</text:p>
              </table:table-cell>
              <table:table-cell office:value-type="float" office:value="0.004408782">
                <text:p>0.004408782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707.48193359375">
                <text:p>707.48193359375</text:p>
              </table:table-cell>
              <table:table-cell office:value-type="float" office:value="0.005102872">
                <text:p>0.005102872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07.602111816406">
                <text:p>707.602111816406</text:p>
              </table:table-cell>
              <table:table-cell office:value-type="float" office:value="-0.006273251">
                <text:p>-0.006273251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07.722290039063">
                <text:p>707.722290039063</text:p>
              </table:table-cell>
              <table:table-cell office:value-type="float" office:value="0.002652787">
                <text:p>0.002652787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707.842468261719">
                <text:p>707.842468261719</text:p>
              </table:table-cell>
              <table:table-cell office:value-type="float" office:value="0.004669856">
                <text:p>0.004669856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707.962646484375">
                <text:p>707.962646484375</text:p>
              </table:table-cell>
              <table:table-cell office:value-type="float" office:value="0.008486834">
                <text:p>0.008486834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708.082763671875">
                <text:p>708.082763671875</text:p>
              </table:table-cell>
              <table:table-cell office:value-type="float" office:value="-0.001434554">
                <text:p>-0.001434554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708.202941894531">
                <text:p>708.202941894531</text:p>
              </table:table-cell>
              <table:table-cell office:value-type="float" office:value="0.002489642">
                <text:p>0.002489642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708.323120117188">
                <text:p>708.323120117188</text:p>
              </table:table-cell>
              <table:table-cell office:value-type="float" office:value="0.004756294">
                <text:p>0.004756294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708.443298339844">
                <text:p>708.443298339844</text:p>
              </table:table-cell>
              <table:table-cell office:value-type="float" office:value="-0.00273431">
                <text:p>-0.00273431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08.5634765625">
                <text:p>708.5634765625</text:p>
              </table:table-cell>
              <table:table-cell office:value-type="float" office:value="-0.001983715">
                <text:p>-0.001983715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08.683654785156">
                <text:p>708.683654785156</text:p>
              </table:table-cell>
              <table:table-cell office:value-type="float" office:value="-0.003258765">
                <text:p>-0.003258765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08.803833007813">
                <text:p>708.803833007813</text:p>
              </table:table-cell>
              <table:table-cell office:value-type="float" office:value="0.01195115">
                <text:p>0.01195115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708.924011230469">
                <text:p>708.924011230469</text:p>
              </table:table-cell>
              <table:table-cell office:value-type="float" office:value="-0.00717115">
                <text:p>-0.00717115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709.044189453125">
                <text:p>709.044189453125</text:p>
              </table:table-cell>
              <table:table-cell office:value-type="float" office:value="-0.0004300127">
                <text:p>-0.0004300127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709.164367675781">
                <text:p>709.164367675781</text:p>
              </table:table-cell>
              <table:table-cell office:value-type="float" office:value="0.003310627">
                <text:p>0.003310627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09.284545898438">
                <text:p>709.284545898438</text:p>
              </table:table-cell>
              <table:table-cell office:value-type="float" office:value="0.002594975">
                <text:p>0.002594975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709.404724121094">
                <text:p>709.404724121094</text:p>
              </table:table-cell>
              <table:table-cell office:value-type="float" office:value="0.001938229">
                <text:p>0.001938229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09.52490234375">
                <text:p>709.52490234375</text:p>
              </table:table-cell>
              <table:table-cell office:value-type="float" office:value="-0.004408536">
                <text:p>-0.004408536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9.645141601563">
                <text:p>709.645141601563</text:p>
              </table:table-cell>
              <table:table-cell office:value-type="float" office:value="-0.005094363">
                <text:p>-0.005094363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709.765319824219">
                <text:p>709.765319824219</text:p>
              </table:table-cell>
              <table:table-cell office:value-type="float" office:value="0.003403217">
                <text:p>0.003403217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709.885498046875">
                <text:p>709.885498046875</text:p>
              </table:table-cell>
              <table:table-cell office:value-type="float" office:value="-0.0001382022">
                <text:p>-0.000138202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710.005676269531">
                <text:p>710.005676269531</text:p>
              </table:table-cell>
              <table:table-cell office:value-type="float" office:value="-0.002143553">
                <text:p>-0.002143553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710.125854492188">
                <text:p>710.125854492188</text:p>
              </table:table-cell>
              <table:table-cell office:value-type="float" office:value="0.005848882">
                <text:p>0.005848882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710.246032714844">
                <text:p>710.246032714844</text:p>
              </table:table-cell>
              <table:table-cell office:value-type="float" office:value="0.002438231">
                <text:p>0.002438231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710.3662109375">
                <text:p>710.3662109375</text:p>
              </table:table-cell>
              <table:table-cell office:value-type="float" office:value="-0.007582983">
                <text:p>-0.007582983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10.486389160156">
                <text:p>710.486389160156</text:p>
              </table:table-cell>
              <table:table-cell office:value-type="float" office:value="0.009528587">
                <text:p>0.009528587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710.606567382813">
                <text:p>710.606567382813</text:p>
              </table:table-cell>
              <table:table-cell office:value-type="float" office:value="-0.001047176">
                <text:p>-0.001047176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710.726745605469">
                <text:p>710.726745605469</text:p>
              </table:table-cell>
              <table:table-cell office:value-type="float" office:value="-0.005041488">
                <text:p>-0.005041488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710.846984863281">
                <text:p>710.846984863281</text:p>
              </table:table-cell>
              <table:table-cell office:value-type="float" office:value="0.002789231">
                <text:p>0.002789231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710.967163085938">
                <text:p>710.967163085938</text:p>
              </table:table-cell>
              <table:table-cell office:value-type="float" office:value="0.00103559">
                <text:p>0.00103559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11.087341308594">
                <text:p>711.087341308594</text:p>
              </table:table-cell>
              <table:table-cell office:value-type="float" office:value="0.00177661">
                <text:p>0.00177661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711.20751953125">
                <text:p>711.20751953125</text:p>
              </table:table-cell>
              <table:table-cell office:value-type="float" office:value="-0.007511213">
                <text:p>-0.007511213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711.327697753906">
                <text:p>711.327697753906</text:p>
              </table:table-cell>
              <table:table-cell office:value-type="float" office:value="-0.006139466">
                <text:p>-0.006139466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11.447875976563">
                <text:p>711.447875976563</text:p>
              </table:table-cell>
              <table:table-cell office:value-type="float" office:value="0.003772589">
                <text:p>0.003772589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11.568115234375">
                <text:p>711.568115234375</text:p>
              </table:table-cell>
              <table:table-cell office:value-type="float" office:value="-0.00208732">
                <text:p>-0.00208732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711.688293457031">
                <text:p>711.688293457031</text:p>
              </table:table-cell>
              <table:table-cell office:value-type="float" office:value="0.01292191">
                <text:p>0.01292191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711.808471679688">
                <text:p>711.808471679688</text:p>
              </table:table-cell>
              <table:table-cell office:value-type="float" office:value="-0.007051712">
                <text:p>-0.007051712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711.928649902344">
                <text:p>711.928649902344</text:p>
              </table:table-cell>
              <table:table-cell office:value-type="float" office:value="-0.002397364">
                <text:p>-0.002397364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712.048889160156">
                <text:p>712.048889160156</text:p>
              </table:table-cell>
              <table:table-cell office:value-type="float" office:value="-0.0008091649">
                <text:p>-0.0008091649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12.169067382813">
                <text:p>712.169067382813</text:p>
              </table:table-cell>
              <table:table-cell office:value-type="float" office:value="0.00725005">
                <text:p>0.00725005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12.289245605469">
                <text:p>712.289245605469</text:p>
              </table:table-cell>
              <table:table-cell office:value-type="float" office:value="0.004420216">
                <text:p>0.004420216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12.409423828125">
                <text:p>712.409423828125</text:p>
              </table:table-cell>
              <table:table-cell office:value-type="float" office:value="-0.005828606">
                <text:p>-0.005828606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712.529663085938">
                <text:p>712.529663085938</text:p>
              </table:table-cell>
              <table:table-cell office:value-type="float" office:value="0.007263809">
                <text:p>0.007263809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712.649841308594">
                <text:p>712.649841308594</text:p>
              </table:table-cell>
              <table:table-cell office:value-type="float" office:value="-0.004011622">
                <text:p>-0.004011622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712.77001953125">
                <text:p>712.77001953125</text:p>
              </table:table-cell>
              <table:table-cell office:value-type="float" office:value="-0.00915727">
                <text:p>-0.00915727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712.890197753906">
                <text:p>712.890197753906</text:p>
              </table:table-cell>
              <table:table-cell office:value-type="float" office:value="-0.003137536">
                <text:p>-0.003137536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713.010437011719">
                <text:p>713.010437011719</text:p>
              </table:table-cell>
              <table:table-cell office:value-type="float" office:value="0.01710145">
                <text:p>0.01710145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713.130615234375">
                <text:p>713.130615234375</text:p>
              </table:table-cell>
              <table:table-cell office:value-type="float" office:value="0.01623526">
                <text:p>0.01623526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713.250793457031">
                <text:p>713.250793457031</text:p>
              </table:table-cell>
              <table:table-cell office:value-type="float" office:value="0.01564904">
                <text:p>0.01564904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713.371032714844">
                <text:p>713.371032714844</text:p>
              </table:table-cell>
              <table:table-cell office:value-type="float" office:value="-0.007830038">
                <text:p>-0.007830038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713.4912109375">
                <text:p>713.4912109375</text:p>
              </table:table-cell>
              <table:table-cell office:value-type="float" office:value="0.0002694303">
                <text:p>0.0002694303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713.611389160156">
                <text:p>713.611389160156</text:p>
              </table:table-cell>
              <table:table-cell office:value-type="float" office:value="0.004762027">
                <text:p>0.004762027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13.731628417969">
                <text:p>713.731628417969</text:p>
              </table:table-cell>
              <table:table-cell office:value-type="float" office:value="0.005041694">
                <text:p>0.005041694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713.851806640625">
                <text:p>713.851806640625</text:p>
              </table:table-cell>
              <table:table-cell office:value-type="float" office:value="-0.005193816">
                <text:p>-0.005193816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713.971984863281">
                <text:p>713.971984863281</text:p>
              </table:table-cell>
              <table:table-cell office:value-type="float" office:value="-0.00103683">
                <text:p>-0.00103683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14.092224121094">
                <text:p>714.092224121094</text:p>
              </table:table-cell>
              <table:table-cell office:value-type="float" office:value="-0.009371134">
                <text:p>-0.009371134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714.21240234375">
                <text:p>714.21240234375</text:p>
              </table:table-cell>
              <table:table-cell office:value-type="float" office:value="0.009150713">
                <text:p>0.009150713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14.332580566406">
                <text:p>714.332580566406</text:p>
              </table:table-cell>
              <table:table-cell office:value-type="float" office:value="0.004215588">
                <text:p>0.004215588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714.452819824219">
                <text:p>714.452819824219</text:p>
              </table:table-cell>
              <table:table-cell office:value-type="float" office:value="0.0009131009">
                <text:p>0.0009131009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714.572998046875">
                <text:p>714.572998046875</text:p>
              </table:table-cell>
              <table:table-cell office:value-type="float" office:value="0.004883241">
                <text:p>0.004883241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714.693237304688">
                <text:p>714.693237304688</text:p>
              </table:table-cell>
              <table:table-cell office:value-type="float" office:value="0.01339803">
                <text:p>0.01339803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714.813415527344">
                <text:p>714.813415527344</text:p>
              </table:table-cell>
              <table:table-cell office:value-type="float" office:value="-0.001920469">
                <text:p>-0.001920469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714.93359375">
                <text:p>714.93359375</text:p>
              </table:table-cell>
              <table:table-cell office:value-type="float" office:value="0.004361575">
                <text:p>0.004361575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15.053833007813">
                <text:p>715.053833007813</text:p>
              </table:table-cell>
              <table:table-cell office:value-type="float" office:value="0.002876217">
                <text:p>0.002876217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15.174011230469">
                <text:p>715.174011230469</text:p>
              </table:table-cell>
              <table:table-cell office:value-type="float" office:value="0.005064519">
                <text:p>0.005064519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15.294250488281">
                <text:p>715.294250488281</text:p>
              </table:table-cell>
              <table:table-cell office:value-type="float" office:value="-0.00748719">
                <text:p>-0.00748719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15.414428710938">
                <text:p>715.414428710938</text:p>
              </table:table-cell>
              <table:table-cell office:value-type="float" office:value="-0.002692794">
                <text:p>-0.002692794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15.53466796875">
                <text:p>715.53466796875</text:p>
              </table:table-cell>
              <table:table-cell office:value-type="float" office:value="0.002347677">
                <text:p>0.002347677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715.654846191406">
                <text:p>715.654846191406</text:p>
              </table:table-cell>
              <table:table-cell office:value-type="float" office:value="-0.006128549">
                <text:p>-0.006128549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715.775024414063">
                <text:p>715.775024414063</text:p>
              </table:table-cell>
              <table:table-cell office:value-type="float" office:value="0.002336407">
                <text:p>0.002336407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715.895263671875">
                <text:p>715.895263671875</text:p>
              </table:table-cell>
              <table:table-cell office:value-type="float" office:value="-0.00135517">
                <text:p>-0.00135517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16.015441894531">
                <text:p>716.015441894531</text:p>
              </table:table-cell>
              <table:table-cell office:value-type="float" office:value="-0.004396981">
                <text:p>-0.004396981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16.135681152344">
                <text:p>716.13568115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716.255859375">
                <text:p>716.255859375</text:p>
              </table:table-cell>
              <table:table-cell office:value-type="float" office:value="-0.006385989">
                <text:p>-0.006385989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16.376098632813">
                <text:p>716.376098632813</text:p>
              </table:table-cell>
              <table:table-cell office:value-type="float" office:value="-0.009026561">
                <text:p>-0.009026561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16.496276855469">
                <text:p>716.496276855469</text:p>
              </table:table-cell>
              <table:table-cell office:value-type="float" office:value="0.005660569">
                <text:p>0.005660569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16.616516113281">
                <text:p>716.616516113281</text:p>
              </table:table-cell>
              <table:table-cell office:value-type="float" office:value="0.001195662">
                <text:p>0.001195662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716.736694335938">
                <text:p>716.736694335938</text:p>
              </table:table-cell>
              <table:table-cell office:value-type="float" office:value="0.001053974">
                <text:p>0.001053974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716.85693359375">
                <text:p>716.85693359375</text:p>
              </table:table-cell>
              <table:table-cell office:value-type="float" office:value="0.0008149674">
                <text:p>0.0008149674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716.977172851563">
                <text:p>716.977172851563</text:p>
              </table:table-cell>
              <table:table-cell office:value-type="float" office:value="0.001282912">
                <text:p>0.001282912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717.097351074219">
                <text:p>717.097351074219</text:p>
              </table:table-cell>
              <table:table-cell office:value-type="float" office:value="0.005654863">
                <text:p>0.005654863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717.217590332031">
                <text:p>717.217590332031</text:p>
              </table:table-cell>
              <table:table-cell office:value-type="float" office:value="-0.005197888">
                <text:p>-0.005197888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717.337768554688">
                <text:p>717.337768554688</text:p>
              </table:table-cell>
              <table:table-cell office:value-type="float" office:value="-0.008410728">
                <text:p>-0.008410728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717.4580078125">
                <text:p>717.4580078125</text:p>
              </table:table-cell>
              <table:table-cell office:value-type="float" office:value="0.001538485">
                <text:p>0.001538485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717.578186035156">
                <text:p>717.578186035156</text:p>
              </table:table-cell>
              <table:table-cell office:value-type="float" office:value="-0.0002049921">
                <text:p>-0.0002049921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17.698425292969">
                <text:p>717.698425292969</text:p>
              </table:table-cell>
              <table:table-cell office:value-type="float" office:value="0.001469664">
                <text:p>0.001469664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17.818603515625">
                <text:p>717.818603515625</text:p>
              </table:table-cell>
              <table:table-cell office:value-type="float" office:value="0.001201857">
                <text:p>0.001201857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17.938842773438">
                <text:p>717.938842773438</text:p>
              </table:table-cell>
              <table:table-cell office:value-type="float" office:value="-0.001482459">
                <text:p>-0.001482459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718.05908203125">
                <text:p>718.05908203125</text:p>
              </table:table-cell>
              <table:table-cell office:value-type="float" office:value="0.001864304">
                <text:p>0.001864304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718.179260253906">
                <text:p>718.179260253906</text:p>
              </table:table-cell>
              <table:table-cell office:value-type="float" office:value="-0.004372422">
                <text:p>-0.004372422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18.299499511719">
                <text:p>718.299499511719</text:p>
              </table:table-cell>
              <table:table-cell office:value-type="float" office:value="0.005373705">
                <text:p>0.005373705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718.419677734375">
                <text:p>718.419677734375</text:p>
              </table:table-cell>
              <table:table-cell office:value-type="float" office:value="-0.001186252">
                <text:p>-0.001186252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718.539916992188">
                <text:p>718.539916992188</text:p>
              </table:table-cell>
              <table:table-cell office:value-type="float" office:value="-0.002180529">
                <text:p>-0.002180529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718.66015625">
                <text:p>718.66015625</text:p>
              </table:table-cell>
              <table:table-cell office:value-type="float" office:value="0.001015409">
                <text:p>0.001015409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718.780334472656">
                <text:p>718.780334472656</text:p>
              </table:table-cell>
              <table:table-cell office:value-type="float" office:value="-0.002578672">
                <text:p>-0.00257867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18.900573730469">
                <text:p>718.900573730469</text:p>
              </table:table-cell>
              <table:table-cell office:value-type="float" office:value="0.001916093">
                <text:p>0.001916093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19.020812988281">
                <text:p>719.020812988281</text:p>
              </table:table-cell>
              <table:table-cell office:value-type="float" office:value="0.004452898">
                <text:p>0.004452898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19.140991210938">
                <text:p>719.140991210938</text:p>
              </table:table-cell>
              <table:table-cell office:value-type="float" office:value="0.007848275">
                <text:p>0.007848275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19.26123046875">
                <text:p>719.26123046875</text:p>
              </table:table-cell>
              <table:table-cell office:value-type="float" office:value="-0.0003842768">
                <text:p>-0.0003842768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719.381469726563">
                <text:p>719.381469726563</text:p>
              </table:table-cell>
              <table:table-cell office:value-type="float" office:value="-0.003078847">
                <text:p>-0.003078847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19.501647949219">
                <text:p>719.501647949219</text:p>
              </table:table-cell>
              <table:table-cell office:value-type="float" office:value="0.007619034">
                <text:p>0.007619034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719.621887207031">
                <text:p>719.621887207031</text:p>
              </table:table-cell>
              <table:table-cell office:value-type="float" office:value="-0.002144932">
                <text:p>-0.002144932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719.742126464844">
                <text:p>719.742126464844</text:p>
              </table:table-cell>
              <table:table-cell office:value-type="float" office:value="-0.008179768">
                <text:p>-0.008179768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719.8623046875">
                <text:p>719.8623046875</text:p>
              </table:table-cell>
              <table:table-cell office:value-type="float" office:value="-0.007662038">
                <text:p>-0.007662038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719.982543945313">
                <text:p>719.982543945313</text:p>
              </table:table-cell>
              <table:table-cell office:value-type="float" office:value="0.004879133">
                <text:p>0.004879133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20.102783203125">
                <text:p>720.102783203125</text:p>
              </table:table-cell>
              <table:table-cell office:value-type="float" office:value="-0.004974804">
                <text:p>-0.004974804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20.222961425781">
                <text:p>720.222961425781</text:p>
              </table:table-cell>
              <table:table-cell office:value-type="float" office:value="0.009204165">
                <text:p>0.009204165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20.343200683594">
                <text:p>720.343200683594</text:p>
              </table:table-cell>
              <table:table-cell office:value-type="float" office:value="-0.007969419">
                <text:p>-0.007969419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20.463439941406">
                <text:p>720.463439941406</text:p>
              </table:table-cell>
              <table:table-cell office:value-type="float" office:value="0.001616311">
                <text:p>0.001616311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720.583679199219">
                <text:p>720.583679199219</text:p>
              </table:table-cell>
              <table:table-cell office:value-type="float" office:value="0.02161575">
                <text:p>0.02161575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720.703857421875">
                <text:p>720.703857421875</text:p>
              </table:table-cell>
              <table:table-cell office:value-type="float" office:value="0.001423456">
                <text:p>0.001423456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720.824096679688">
                <text:p>720.824096679688</text:p>
              </table:table-cell>
              <table:table-cell office:value-type="float" office:value="0.001343413">
                <text:p>0.00134341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720.9443359375">
                <text:p>720.9443359375</text:p>
              </table:table-cell>
              <table:table-cell office:value-type="float" office:value="0.00508397">
                <text:p>0.00508397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721.064575195313">
                <text:p>721.064575195313</text:p>
              </table:table-cell>
              <table:table-cell office:value-type="float" office:value="0.005051622">
                <text:p>0.005051622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721.184753417969">
                <text:p>721.184753417969</text:p>
              </table:table-cell>
              <table:table-cell office:value-type="float" office:value="-0.003192198">
                <text:p>-0.003192198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721.304992675781">
                <text:p>721.304992675781</text:p>
              </table:table-cell>
              <table:table-cell office:value-type="float" office:value="0.001455365">
                <text:p>0.001455365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21.425231933594">
                <text:p>721.425231933594</text:p>
              </table:table-cell>
              <table:table-cell office:value-type="float" office:value="0.00148438">
                <text:p>0.00148438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721.545471191406">
                <text:p>721.545471191406</text:p>
              </table:table-cell>
              <table:table-cell office:value-type="float" office:value="0.01800053">
                <text:p>0.01800053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721.665649414063">
                <text:p>721.665649414063</text:p>
              </table:table-cell>
              <table:table-cell office:value-type="float" office:value="-0.008324681">
                <text:p>-0.008324681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21.785888671875">
                <text:p>721.785888671875</text:p>
              </table:table-cell>
              <table:table-cell office:value-type="float" office:value="0.01597753">
                <text:p>0.01597753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721.906127929688">
                <text:p>721.906127929688</text:p>
              </table:table-cell>
              <table:table-cell office:value-type="float" office:value="-0.001273211">
                <text:p>-0.001273211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722.0263671875">
                <text:p>722.0263671875</text:p>
              </table:table-cell>
              <table:table-cell office:value-type="float" office:value="-0.00567046">
                <text:p>-0.00567046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722.146606445313">
                <text:p>722.146606445313</text:p>
              </table:table-cell>
              <table:table-cell office:value-type="float" office:value="0.01347181">
                <text:p>0.0134718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722.266784667969">
                <text:p>722.266784667969</text:p>
              </table:table-cell>
              <table:table-cell office:value-type="float" office:value="-0.002458912">
                <text:p>-0.002458912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22.387023925781">
                <text:p>722.387023925781</text:p>
              </table:table-cell>
              <table:table-cell office:value-type="float" office:value="-0.006532736">
                <text:p>-0.006532736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2.507263183594">
                <text:p>722.507263183594</text:p>
              </table:table-cell>
              <table:table-cell office:value-type="float" office:value="-0.007666014">
                <text:p>-0.007666014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22.627502441406">
                <text:p>722.627502441406</text:p>
              </table:table-cell>
              <table:table-cell office:value-type="float" office:value="-0.005055226">
                <text:p>-0.005055226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722.747741699219">
                <text:p>722.747741699219</text:p>
              </table:table-cell>
              <table:table-cell office:value-type="float" office:value="0.002812264">
                <text:p>0.002812264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722.867980957031">
                <text:p>722.867980957031</text:p>
              </table:table-cell>
              <table:table-cell office:value-type="float" office:value="-0.006527157">
                <text:p>-0.006527157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722.988159179688">
                <text:p>722.988159179688</text:p>
              </table:table-cell>
              <table:table-cell office:value-type="float" office:value="0.001384886">
                <text:p>0.00138488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23.1083984375">
                <text:p>723.1083984375</text:p>
              </table:table-cell>
              <table:table-cell office:value-type="float" office:value="0.004561721">
                <text:p>0.00456172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723.228637695313">
                <text:p>723.228637695313</text:p>
              </table:table-cell>
              <table:table-cell office:value-type="float" office:value="0.0155568">
                <text:p>0.0155568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723.348876953125">
                <text:p>723.348876953125</text:p>
              </table:table-cell>
              <table:table-cell office:value-type="float" office:value="0.001899519">
                <text:p>0.001899519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723.469116210938">
                <text:p>723.469116210938</text:p>
              </table:table-cell>
              <table:table-cell office:value-type="float" office:value="-0.004098971">
                <text:p>-0.004098971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723.58935546875">
                <text:p>723.58935546875</text:p>
              </table:table-cell>
              <table:table-cell office:value-type="float" office:value="0.0009551222">
                <text:p>0.0009551222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23.709594726563">
                <text:p>723.709594726563</text:p>
              </table:table-cell>
              <table:table-cell office:value-type="float" office:value="-0.005081653">
                <text:p>-0.005081653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23.829772949219">
                <text:p>723.829772949219</text:p>
              </table:table-cell>
              <table:table-cell office:value-type="float" office:value="-0.005417388">
                <text:p>-0.005417388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23.950012207031">
                <text:p>723.950012207031</text:p>
              </table:table-cell>
              <table:table-cell office:value-type="float" office:value="0.002754466">
                <text:p>0.002754466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24.070251464844">
                <text:p>724.070251464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24.190490722656">
                <text:p>724.190490722656</text:p>
              </table:table-cell>
              <table:table-cell office:value-type="float" office:value="-0.01130789">
                <text:p>-0.01130789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24.310729980469">
                <text:p>724.310729980469</text:p>
              </table:table-cell>
              <table:table-cell office:value-type="float" office:value="-0.006989196">
                <text:p>-0.006989196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24.430969238281">
                <text:p>724.430969238281</text:p>
              </table:table-cell>
              <table:table-cell office:value-type="float" office:value="-0.007488319">
                <text:p>-0.007488319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24.551208496094">
                <text:p>724.551208496094</text:p>
              </table:table-cell>
              <table:table-cell office:value-type="float" office:value="-0.009919258">
                <text:p>-0.009919258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24.671447753906">
                <text:p>724.671447753906</text:p>
              </table:table-cell>
              <table:table-cell office:value-type="float" office:value="0.006009767">
                <text:p>0.006009767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24.791687011719">
                <text:p>724.791687011719</text:p>
              </table:table-cell>
              <table:table-cell office:value-type="float" office:value="-0.008246771">
                <text:p>-0.008246771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24.911865234375">
                <text:p>724.911865234375</text:p>
              </table:table-cell>
              <table:table-cell office:value-type="float" office:value="-0.007552215">
                <text:p>-0.007552215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25.032104492188">
                <text:p>725.032104492188</text:p>
              </table:table-cell>
              <table:table-cell office:value-type="float" office:value="0.0032463">
                <text:p>0.0032463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25.15234375">
                <text:p>725.15234375</text:p>
              </table:table-cell>
              <table:table-cell office:value-type="float" office:value="-0.005879134">
                <text:p>-0.005879134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25.272583007813">
                <text:p>725.272583007813</text:p>
              </table:table-cell>
              <table:table-cell office:value-type="float" office:value="-0.007385758">
                <text:p>-0.007385758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725.392822265625">
                <text:p>725.392822265625</text:p>
              </table:table-cell>
              <table:table-cell office:value-type="float" office:value="0.02413652">
                <text:p>0.02413652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725.513061523438">
                <text:p>725.513061523438</text:p>
              </table:table-cell>
              <table:table-cell office:value-type="float" office:value="-0.001097088">
                <text:p>-0.001097088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725.63330078125">
                <text:p>725.63330078125</text:p>
              </table:table-cell>
              <table:table-cell office:value-type="float" office:value="-0.0004620033">
                <text:p>-0.0004620033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725.753540039063">
                <text:p>725.753540039063</text:p>
              </table:table-cell>
              <table:table-cell office:value-type="float" office:value="-0.006253814">
                <text:p>-0.006253814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725.873779296875">
                <text:p>725.873779296875</text:p>
              </table:table-cell>
              <table:table-cell office:value-type="float" office:value="0.001579891">
                <text:p>0.001579891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725.994018554688">
                <text:p>725.994018554688</text:p>
              </table:table-cell>
              <table:table-cell office:value-type="float" office:value="-0.001943266">
                <text:p>-0.001943266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26.1142578125">
                <text:p>726.1142578125</text:p>
              </table:table-cell>
              <table:table-cell office:value-type="float" office:value="0.0003536904">
                <text:p>0.0003536904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726.234497070313">
                <text:p>726.234497070313</text:p>
              </table:table-cell>
              <table:table-cell office:value-type="float" office:value="-0.003092263">
                <text:p>-0.003092263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726.354736328125">
                <text:p>726.354736328125</text:p>
              </table:table-cell>
              <table:table-cell office:value-type="float" office:value="0.008404505">
                <text:p>0.008404505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26.474975585938">
                <text:p>726.474975585938</text:p>
              </table:table-cell>
              <table:table-cell office:value-type="float" office:value="-0.0001792598">
                <text:p>-0.000179259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26.59521484375">
                <text:p>726.59521484375</text:p>
              </table:table-cell>
              <table:table-cell office:value-type="float" office:value="0.0008695719">
                <text:p>0.0008695719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26.715454101563">
                <text:p>726.715454101563</text:p>
              </table:table-cell>
              <table:table-cell office:value-type="float" office:value="-0.003846493">
                <text:p>-0.003846493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26.835693359375">
                <text:p>726.835693359375</text:p>
              </table:table-cell>
              <table:table-cell office:value-type="float" office:value="-0.005042572">
                <text:p>-0.005042572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26.955932617188">
                <text:p>726.955932617188</text:p>
              </table:table-cell>
              <table:table-cell office:value-type="float" office:value="-0.009719428">
                <text:p>-0.009719428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27.076171875">
                <text:p>727.076171875</text:p>
              </table:table-cell>
              <table:table-cell office:value-type="float" office:value="0.005900511">
                <text:p>0.005900511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727.196411132813">
                <text:p>727.196411132813</text:p>
              </table:table-cell>
              <table:table-cell office:value-type="float" office:value="-0.001317637">
                <text:p>-0.001317637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727.316650390625">
                <text:p>727.316650390625</text:p>
              </table:table-cell>
              <table:table-cell office:value-type="float" office:value="0.01203322">
                <text:p>0.01203322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27.436889648438">
                <text:p>727.436889648438</text:p>
              </table:table-cell>
              <table:table-cell office:value-type="float" office:value="-0.0006781694">
                <text:p>-0.0006781694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27.55712890625">
                <text:p>727.55712890625</text:p>
              </table:table-cell>
              <table:table-cell office:value-type="float" office:value="-0.0004630262">
                <text:p>-0.0004630262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727.677368164063">
                <text:p>727.677368164063</text:p>
              </table:table-cell>
              <table:table-cell office:value-type="float" office:value="-0.0019773">
                <text:p>-0.0019773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27.797607421875">
                <text:p>727.797607421875</text:p>
              </table:table-cell>
              <table:table-cell office:value-type="float" office:value="-0.008118322">
                <text:p>-0.008118322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727.917846679688">
                <text:p>727.917846679688</text:p>
              </table:table-cell>
              <table:table-cell office:value-type="float" office:value="-0.01048734">
                <text:p>-0.01048734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728.0380859375">
                <text:p>728.0380859375</text:p>
              </table:table-cell>
              <table:table-cell office:value-type="float" office:value="0.002719382">
                <text:p>0.002719382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28.158325195313">
                <text:p>728.158325195313</text:p>
              </table:table-cell>
              <table:table-cell office:value-type="float" office:value="-0.008991357">
                <text:p>-0.008991357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28.278564453125">
                <text:p>728.278564453125</text:p>
              </table:table-cell>
              <table:table-cell office:value-type="float" office:value="-0.005148204">
                <text:p>-0.005148204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28.398803710938">
                <text:p>728.398803710938</text:p>
              </table:table-cell>
              <table:table-cell office:value-type="float" office:value="-0.007107205">
                <text:p>-0.007107205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28.51904296875">
                <text:p>728.51904296875</text:p>
              </table:table-cell>
              <table:table-cell office:value-type="float" office:value="0.005081158">
                <text:p>0.005081158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728.639282226563">
                <text:p>728.639282226563</text:p>
              </table:table-cell>
              <table:table-cell office:value-type="float" office:value="-0.007925573">
                <text:p>-0.007925573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728.759521484375">
                <text:p>728.759521484375</text:p>
              </table:table-cell>
              <table:table-cell office:value-type="float" office:value="0.001182809">
                <text:p>0.001182809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728.879760742188">
                <text:p>728.879760742188</text:p>
              </table:table-cell>
              <table:table-cell office:value-type="float" office:value="0.003000839">
                <text:p>0.003000839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729">
                <text:p>729</text:p>
              </table:table-cell>
              <table:table-cell office:value-type="float" office:value="-0.006911931">
                <text:p>-0.006911931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729.120239257813">
                <text:p>729.120239257813</text:p>
              </table:table-cell>
              <table:table-cell office:value-type="float" office:value="0.0005170349">
                <text:p>0.0005170349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729.240478515625">
                <text:p>729.240478515625</text:p>
              </table:table-cell>
              <table:table-cell office:value-type="float" office:value="0.008405771">
                <text:p>0.008405771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729.360778808594">
                <text:p>729.360778808594</text:p>
              </table:table-cell>
              <table:table-cell office:value-type="float" office:value="0.003657047">
                <text:p>0.003657047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29.481018066406">
                <text:p>729.481018066406</text:p>
              </table:table-cell>
              <table:table-cell office:value-type="float" office:value="-0.0002249078">
                <text:p>-0.0002249078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29.601257324219">
                <text:p>729.601257324219</text:p>
              </table:table-cell>
              <table:table-cell office:value-type="float" office:value="0.006047328">
                <text:p>0.006047328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29.721496582031">
                <text:p>729.721496582031</text:p>
              </table:table-cell>
              <table:table-cell office:value-type="float" office:value="0.02129818">
                <text:p>0.02129818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29.841735839844">
                <text:p>729.841735839844</text:p>
              </table:table-cell>
              <table:table-cell office:value-type="float" office:value="-0.006049477">
                <text:p>-0.006049477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29.961975097656">
                <text:p>729.961975097656</text:p>
              </table:table-cell>
              <table:table-cell office:value-type="float" office:value="-0.006984904">
                <text:p>-0.006984904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30.082214355469">
                <text:p>730.082214355469</text:p>
              </table:table-cell>
              <table:table-cell office:value-type="float" office:value="0.01036055">
                <text:p>0.01036055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730.202453613281">
                <text:p>730.202453613281</text:p>
              </table:table-cell>
              <table:table-cell office:value-type="float" office:value="0.00443463">
                <text:p>0.00443463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730.322692871094">
                <text:p>730.322692871094</text:p>
              </table:table-cell>
              <table:table-cell office:value-type="float" office:value="-0.001834278">
                <text:p>-0.001834278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730.442932128906">
                <text:p>730.442932128906</text:p>
              </table:table-cell>
              <table:table-cell office:value-type="float" office:value="0.001841311">
                <text:p>0.001841311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730.563171386719">
                <text:p>730.563171386719</text:p>
              </table:table-cell>
              <table:table-cell office:value-type="float" office:value="0.005540589">
                <text:p>0.005540589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30.683471679688">
                <text:p>730.683471679688</text:p>
              </table:table-cell>
              <table:table-cell office:value-type="float" office:value="-0.001500347">
                <text:p>-0.001500347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30.8037109375">
                <text:p>730.8037109375</text:p>
              </table:table-cell>
              <table:table-cell office:value-type="float" office:value="0.01104448">
                <text:p>0.01104448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730.923950195313">
                <text:p>730.923950195313</text:p>
              </table:table-cell>
              <table:table-cell office:value-type="float" office:value="0.005827894">
                <text:p>0.005827894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31.044189453125">
                <text:p>731.044189453125</text:p>
              </table:table-cell>
              <table:table-cell office:value-type="float" office:value="0.01305194">
                <text:p>0.01305194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31.164428710938">
                <text:p>731.164428710938</text:p>
              </table:table-cell>
              <table:table-cell office:value-type="float" office:value="-0.004298528">
                <text:p>-0.004298528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31.28466796875">
                <text:p>731.28466796875</text:p>
              </table:table-cell>
              <table:table-cell office:value-type="float" office:value="0.001183161">
                <text:p>0.001183161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31.404907226563">
                <text:p>731.404907226563</text:p>
              </table:table-cell>
              <table:table-cell office:value-type="float" office:value="-0.006029335">
                <text:p>-0.006029335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31.525146484375">
                <text:p>731.525146484375</text:p>
              </table:table-cell>
              <table:table-cell office:value-type="float" office:value="-0.002386479">
                <text:p>-0.002386479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1.645446777344">
                <text:p>731.645446777344</text:p>
              </table:table-cell>
              <table:table-cell office:value-type="float" office:value="0.007384975">
                <text:p>0.007384975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31.765686035156">
                <text:p>731.765686035156</text:p>
              </table:table-cell>
              <table:table-cell office:value-type="float" office:value="0.007711096">
                <text:p>0.007711096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31.885925292969">
                <text:p>731.885925292969</text:p>
              </table:table-cell>
              <table:table-cell office:value-type="float" office:value="0.004918856">
                <text:p>0.004918856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32.006164550781">
                <text:p>732.006164550781</text:p>
              </table:table-cell>
              <table:table-cell office:value-type="float" office:value="-0.003612084">
                <text:p>-0.003612084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32.126403808594">
                <text:p>732.126403808594</text:p>
              </table:table-cell>
              <table:table-cell office:value-type="float" office:value="0.01650825">
                <text:p>0.01650825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2.246643066406">
                <text:p>732.246643066406</text:p>
              </table:table-cell>
              <table:table-cell office:value-type="float" office:value="-0.004344833">
                <text:p>-0.004344833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32.366882324219">
                <text:p>732.366882324219</text:p>
              </table:table-cell>
              <table:table-cell office:value-type="float" office:value="-0.004941131">
                <text:p>-0.004941131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32.487182617188">
                <text:p>732.487182617188</text:p>
              </table:table-cell>
              <table:table-cell office:value-type="float" office:value="-0.005945861">
                <text:p>-0.005945861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32.607421875">
                <text:p>732.607421875</text:p>
              </table:table-cell>
              <table:table-cell office:value-type="float" office:value="-0.002103439">
                <text:p>-0.002103439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732.727661132813">
                <text:p>732.727661132813</text:p>
              </table:table-cell>
              <table:table-cell office:value-type="float" office:value="0.002912742">
                <text:p>0.002912742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32.847900390625">
                <text:p>732.847900390625</text:p>
              </table:table-cell>
              <table:table-cell office:value-type="float" office:value="-0.003309276">
                <text:p>-0.003309276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32.968139648438">
                <text:p>732.968139648438</text:p>
              </table:table-cell>
              <table:table-cell office:value-type="float" office:value="-0.002241394">
                <text:p>-0.002241394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33.08837890625">
                <text:p>733.08837890625</text:p>
              </table:table-cell>
              <table:table-cell office:value-type="float" office:value="-0.004652891">
                <text:p>-0.00465289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733.208679199219">
                <text:p>733.208679199219</text:p>
              </table:table-cell>
              <table:table-cell office:value-type="float" office:value="-0.007228847">
                <text:p>-0.007228847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33.328918457031">
                <text:p>733.328918457031</text:p>
              </table:table-cell>
              <table:table-cell office:value-type="float" office:value="-0.003851352">
                <text:p>-0.003851352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733.449157714844">
                <text:p>733.449157714844</text:p>
              </table:table-cell>
              <table:table-cell office:value-type="float" office:value="-0.0007149528">
                <text:p>-0.0007149528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3.569396972656">
                <text:p>733.569396972656</text:p>
              </table:table-cell>
              <table:table-cell office:value-type="float" office:value="0.001947925">
                <text:p>0.001947925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733.689636230469">
                <text:p>733.689636230469</text:p>
              </table:table-cell>
              <table:table-cell office:value-type="float" office:value="-0.00165047">
                <text:p>-0.00165047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733.809936523438">
                <text:p>733.809936523438</text:p>
              </table:table-cell>
              <table:table-cell office:value-type="float" office:value="-0.0003005078">
                <text:p>-0.0003005078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733.93017578125">
                <text:p>733.93017578125</text:p>
              </table:table-cell>
              <table:table-cell office:value-type="float" office:value="0.006913033">
                <text:p>0.006913033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734.050415039063">
                <text:p>734.050415039063</text:p>
              </table:table-cell>
              <table:table-cell office:value-type="float" office:value="0.0006816708">
                <text:p>0.0006816708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734.170654296875">
                <text:p>734.170654296875</text:p>
              </table:table-cell>
              <table:table-cell office:value-type="float" office:value="0.006218764">
                <text:p>0.006218764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734.290893554688">
                <text:p>734.290893554688</text:p>
              </table:table-cell>
              <table:table-cell office:value-type="float" office:value="-0.007427709">
                <text:p>-0.007427709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734.4111328125">
                <text:p>734.4111328125</text:p>
              </table:table-cell>
              <table:table-cell office:value-type="float" office:value="-0.00852704">
                <text:p>-0.00852704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734.531433105469">
                <text:p>734.531433105469</text:p>
              </table:table-cell>
              <table:table-cell office:value-type="float" office:value="-0.001950108">
                <text:p>-0.001950108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34.651672363281">
                <text:p>734.651672363281</text:p>
              </table:table-cell>
              <table:table-cell office:value-type="float" office:value="0.005777596">
                <text:p>0.005777596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734.771911621094">
                <text:p>734.771911621094</text:p>
              </table:table-cell>
              <table:table-cell office:value-type="float" office:value="-0.0004166015">
                <text:p>-0.0004166015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734.892150878906">
                <text:p>734.892150878906</text:p>
              </table:table-cell>
              <table:table-cell office:value-type="float" office:value="-0.0065566">
                <text:p>-0.0065566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735.012451171875">
                <text:p>735.012451171875</text:p>
              </table:table-cell>
              <table:table-cell office:value-type="float" office:value="-0.006725311">
                <text:p>-0.006725311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735.132690429688">
                <text:p>735.132690429688</text:p>
              </table:table-cell>
              <table:table-cell office:value-type="float" office:value="-0.001563203">
                <text:p>-0.001563203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735.2529296875">
                <text:p>735.2529296875</text:p>
              </table:table-cell>
              <table:table-cell office:value-type="float" office:value="0.01648072">
                <text:p>0.01648072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735.373168945313">
                <text:p>735.373168945313</text:p>
              </table:table-cell>
              <table:table-cell office:value-type="float" office:value="0.003209741">
                <text:p>0.003209741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35.493408203125">
                <text:p>735.493408203125</text:p>
              </table:table-cell>
              <table:table-cell office:value-type="float" office:value="-0.001372446">
                <text:p>-0.001372446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5.613708496094">
                <text:p>735.613708496094</text:p>
              </table:table-cell>
              <table:table-cell office:value-type="float" office:value="0.003074988">
                <text:p>0.003074988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735.733947753906">
                <text:p>735.733947753906</text:p>
              </table:table-cell>
              <table:table-cell office:value-type="float" office:value="0.004959842">
                <text:p>0.004959842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735.854187011719">
                <text:p>735.854187011719</text:p>
              </table:table-cell>
              <table:table-cell office:value-type="float" office:value="0.007795892">
                <text:p>0.007795892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735.974426269531">
                <text:p>735.974426269531</text:p>
              </table:table-cell>
              <table:table-cell office:value-type="float" office:value="0.002447729">
                <text:p>0.002447729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36.094665527344">
                <text:p>736.094665527344</text:p>
              </table:table-cell>
              <table:table-cell office:value-type="float" office:value="0.003573885">
                <text:p>0.003573885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736.214965820313">
                <text:p>736.214965820313</text:p>
              </table:table-cell>
              <table:table-cell office:value-type="float" office:value="-0.005106207">
                <text:p>-0.005106207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736.335205078125">
                <text:p>736.335205078125</text:p>
              </table:table-cell>
              <table:table-cell office:value-type="float" office:value="0.0006120636">
                <text:p>0.0006120636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36.455444335938">
                <text:p>736.455444335938</text:p>
              </table:table-cell>
              <table:table-cell office:value-type="float" office:value="0.004409553">
                <text:p>0.004409553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36.57568359375">
                <text:p>736.57568359375</text:p>
              </table:table-cell>
              <table:table-cell office:value-type="float" office:value="0.002871979">
                <text:p>0.002871979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36.695983886719">
                <text:p>736.695983886719</text:p>
              </table:table-cell>
              <table:table-cell office:value-type="float" office:value="0.01062943">
                <text:p>0.01062943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36.816223144531">
                <text:p>736.816223144531</text:p>
              </table:table-cell>
              <table:table-cell office:value-type="float" office:value="0.006825048">
                <text:p>0.006825048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736.936462402344">
                <text:p>736.936462402344</text:p>
              </table:table-cell>
              <table:table-cell office:value-type="float" office:value="0.009879665">
                <text:p>0.009879665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737.056701660156">
                <text:p>737.056701660156</text:p>
              </table:table-cell>
              <table:table-cell office:value-type="float" office:value="-0.000708078">
                <text:p>-0.000708078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737.177001953125">
                <text:p>737.177001953125</text:p>
              </table:table-cell>
              <table:table-cell office:value-type="float" office:value="0.004358981">
                <text:p>0.004358981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37.297241210938">
                <text:p>737.297241210938</text:p>
              </table:table-cell>
              <table:table-cell office:value-type="float" office:value="0.005453724">
                <text:p>0.005453724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737.41748046875">
                <text:p>737.41748046875</text:p>
              </table:table-cell>
              <table:table-cell office:value-type="float" office:value="0.003273494">
                <text:p>0.003273494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737.537719726563">
                <text:p>737.537719726563</text:p>
              </table:table-cell>
              <table:table-cell office:value-type="float" office:value="0.003140363">
                <text:p>0.003140363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737.658020019531">
                <text:p>737.658020019531</text:p>
              </table:table-cell>
              <table:table-cell office:value-type="float" office:value="-0.00769207">
                <text:p>-0.00769207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737.778259277344">
                <text:p>737.778259277344</text:p>
              </table:table-cell>
              <table:table-cell office:value-type="float" office:value="0.005496084">
                <text:p>0.005496084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737.898498535156">
                <text:p>737.898498535156</text:p>
              </table:table-cell>
              <table:table-cell office:value-type="float" office:value="0.001626431">
                <text:p>0.001626431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738.018737792969">
                <text:p>738.018737792969</text:p>
              </table:table-cell>
              <table:table-cell office:value-type="float" office:value="0.004030226">
                <text:p>0.004030226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738.139038085938">
                <text:p>738.139038085938</text:p>
              </table:table-cell>
              <table:table-cell office:value-type="float" office:value="0.00491368">
                <text:p>0.00491368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738.25927734375">
                <text:p>738.25927734375</text:p>
              </table:table-cell>
              <table:table-cell office:value-type="float" office:value="-0.0009747098">
                <text:p>-0.0009747098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738.379516601563">
                <text:p>738.379516601563</text:p>
              </table:table-cell>
              <table:table-cell office:value-type="float" office:value="0.01454097">
                <text:p>0.01454097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738.499755859375">
                <text:p>738.499755859375</text:p>
              </table:table-cell>
              <table:table-cell office:value-type="float" office:value="0.004493607">
                <text:p>0.004493607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738.620056152344">
                <text:p>738.620056152344</text:p>
              </table:table-cell>
              <table:table-cell office:value-type="float" office:value="-0.004029883">
                <text:p>-0.004029883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738.740295410156">
                <text:p>738.740295410156</text:p>
              </table:table-cell>
              <table:table-cell office:value-type="float" office:value="-0.0009578957">
                <text:p>-0.0009578957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38.860534667969">
                <text:p>738.860534667969</text:p>
              </table:table-cell>
              <table:table-cell office:value-type="float" office:value="-0.005382779">
                <text:p>-0.005382779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738.980773925781">
                <text:p>738.980773925781</text:p>
              </table:table-cell>
              <table:table-cell office:value-type="float" office:value="0.01120483">
                <text:p>0.01120483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739.10107421875">
                <text:p>739.10107421875</text:p>
              </table:table-cell>
              <table:table-cell office:value-type="float" office:value="-0.003518251">
                <text:p>-0.003518251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739.221313476563">
                <text:p>739.221313476563</text:p>
              </table:table-cell>
              <table:table-cell office:value-type="float" office:value="0.006592175">
                <text:p>0.006592175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739.341552734375">
                <text:p>739.341552734375</text:p>
              </table:table-cell>
              <table:table-cell office:value-type="float" office:value="0.0004219916">
                <text:p>0.0004219916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39.461791992188">
                <text:p>739.461791992188</text:p>
              </table:table-cell>
              <table:table-cell office:value-type="float" office:value="-0.0002235615">
                <text:p>-0.0002235615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739.582092285156">
                <text:p>739.582092285156</text:p>
              </table:table-cell>
              <table:table-cell office:value-type="float" office:value="-0.004375155">
                <text:p>-0.004375155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739.702331542969">
                <text:p>739.702331542969</text:p>
              </table:table-cell>
              <table:table-cell office:value-type="float" office:value="-0.009308999">
                <text:p>-0.009308999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739.822570800781">
                <text:p>739.822570800781</text:p>
              </table:table-cell>
              <table:table-cell office:value-type="float" office:value="-0.00330239">
                <text:p>-0.00330239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39.942810058594">
                <text:p>739.942810058594</text:p>
              </table:table-cell>
              <table:table-cell office:value-type="float" office:value="-0.009422373">
                <text:p>-0.009422373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40.063110351563">
                <text:p>740.063110351563</text:p>
              </table:table-cell>
              <table:table-cell office:value-type="float" office:value="-0.004590552">
                <text:p>-0.004590552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740.183349609375">
                <text:p>740.183349609375</text:p>
              </table:table-cell>
              <table:table-cell office:value-type="float" office:value="-0.002303094">
                <text:p>-0.002303094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740.303588867188">
                <text:p>740.303588867188</text:p>
              </table:table-cell>
              <table:table-cell office:value-type="float" office:value="-0.0006439621">
                <text:p>-0.0006439621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40.423889160156">
                <text:p>740.423889160156</text:p>
              </table:table-cell>
              <table:table-cell office:value-type="float" office:value="0.008570463">
                <text:p>0.008570463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40.544128417969">
                <text:p>740.544128417969</text:p>
              </table:table-cell>
              <table:table-cell office:value-type="float" office:value="0.01190308">
                <text:p>0.01190308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40.664367675781">
                <text:p>740.664367675781</text:p>
              </table:table-cell>
              <table:table-cell office:value-type="float" office:value="-0.007317971">
                <text:p>-0.007317971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40.784606933594">
                <text:p>740.784606933594</text:p>
              </table:table-cell>
              <table:table-cell office:value-type="float" office:value="0.008311342">
                <text:p>0.008311342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40.904907226563">
                <text:p>740.904907226563</text:p>
              </table:table-cell>
              <table:table-cell office:value-type="float" office:value="0.0009458644">
                <text:p>0.0009458644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741.025146484375">
                <text:p>741.025146484375</text:p>
              </table:table-cell>
              <table:table-cell office:value-type="float" office:value="-0.006553091">
                <text:p>-0.006553091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741.145385742188">
                <text:p>741.145385742188</text:p>
              </table:table-cell>
              <table:table-cell office:value-type="float" office:value="-0.004656584">
                <text:p>-0.004656584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741.265625">
                <text:p>741.265625</text:p>
              </table:table-cell>
              <table:table-cell office:value-type="float" office:value="0.02022943">
                <text:p>0.02022943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41.385925292969">
                <text:p>741.385925292969</text:p>
              </table:table-cell>
              <table:table-cell office:value-type="float" office:value="-0.005644399">
                <text:p>-0.005644399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41.506164550781">
                <text:p>741.506164550781</text:p>
              </table:table-cell>
              <table:table-cell office:value-type="float" office:value="-0.0005678507">
                <text:p>-0.0005678507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741.626403808594">
                <text:p>741.626403808594</text:p>
              </table:table-cell>
              <table:table-cell office:value-type="float" office:value="0.007589695">
                <text:p>0.007589695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1.746704101563">
                <text:p>741.746704101563</text:p>
              </table:table-cell>
              <table:table-cell office:value-type="float" office:value="-0.0005103187">
                <text:p>-0.0005103187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741.866943359375">
                <text:p>741.866943359375</text:p>
              </table:table-cell>
              <table:table-cell office:value-type="float" office:value="0.01728458">
                <text:p>0.01728458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741.987182617188">
                <text:p>741.987182617188</text:p>
              </table:table-cell>
              <table:table-cell office:value-type="float" office:value="-0.003007012">
                <text:p>-0.003007012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742.107421875">
                <text:p>742.107421875</text:p>
              </table:table-cell>
              <table:table-cell office:value-type="float" office:value="0.004737736">
                <text:p>0.004737736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42.227722167969">
                <text:p>742.227722167969</text:p>
              </table:table-cell>
              <table:table-cell office:value-type="float" office:value="0.006517951">
                <text:p>0.006517951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742.347961425781">
                <text:p>742.347961425781</text:p>
              </table:table-cell>
              <table:table-cell office:value-type="float" office:value="0.002267641">
                <text:p>0.002267641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742.468200683594">
                <text:p>742.468200683594</text:p>
              </table:table-cell>
              <table:table-cell office:value-type="float" office:value="-0.004236736">
                <text:p>-0.004236736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742.588439941406">
                <text:p>742.588439941406</text:p>
              </table:table-cell>
              <table:table-cell office:value-type="float" office:value="0.0003284813">
                <text:p>0.0003284813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742.708740234375">
                <text:p>742.708740234375</text:p>
              </table:table-cell>
              <table:table-cell office:value-type="float" office:value="-0.003072347">
                <text:p>-0.003072347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742.828979492188">
                <text:p>742.828979492188</text:p>
              </table:table-cell>
              <table:table-cell office:value-type="float" office:value="-0.002973397">
                <text:p>-0.002973397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742.94921875">
                <text:p>742.94921875</text:p>
              </table:table-cell>
              <table:table-cell office:value-type="float" office:value="0.005109818">
                <text:p>0.005109818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743.069519042969">
                <text:p>743.069519042969</text:p>
              </table:table-cell>
              <table:table-cell office:value-type="float" office:value="0.0108487">
                <text:p>0.0108487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43.189758300781">
                <text:p>743.189758300781</text:p>
              </table:table-cell>
              <table:table-cell office:value-type="float" office:value="0.001234681">
                <text:p>0.001234681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43.309997558594">
                <text:p>743.309997558594</text:p>
              </table:table-cell>
              <table:table-cell office:value-type="float" office:value="-0.009496887">
                <text:p>-0.009496887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743.430236816406">
                <text:p>743.430236816406</text:p>
              </table:table-cell>
              <table:table-cell office:value-type="float" office:value="0.003402582">
                <text:p>0.003402582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43.550537109375">
                <text:p>743.550537109375</text:p>
              </table:table-cell>
              <table:table-cell office:value-type="float" office:value="-0.009055168">
                <text:p>-0.009055168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743.670776367188">
                <text:p>743.670776367188</text:p>
              </table:table-cell>
              <table:table-cell office:value-type="float" office:value="-0.006830998">
                <text:p>-0.006830998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43.791015625">
                <text:p>743.791015625</text:p>
              </table:table-cell>
              <table:table-cell office:value-type="float" office:value="-0.006381767">
                <text:p>-0.006381767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743.911254882813">
                <text:p>743.911254882813</text:p>
              </table:table-cell>
              <table:table-cell office:value-type="float" office:value="0.02966961">
                <text:p>0.02966961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744.031555175781">
                <text:p>744.031555175781</text:p>
              </table:table-cell>
              <table:table-cell office:value-type="float" office:value="-0.007256545">
                <text:p>-0.007256545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744.151794433594">
                <text:p>744.151794433594</text:p>
              </table:table-cell>
              <table:table-cell office:value-type="float" office:value="-0.05623533">
                <text:p>-0.05623533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744.272033691406">
                <text:p>744.272033691406</text:p>
              </table:table-cell>
              <table:table-cell office:value-type="float" office:value="-0.05785015">
                <text:p>-0.05785015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44.392333984375">
                <text:p>744.392333984375</text:p>
              </table:table-cell>
              <table:table-cell office:value-type="float" office:value="-0.0589988">
                <text:p>-0.0589988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744.512573242188">
                <text:p>744.512573242188</text:p>
              </table:table-cell>
              <table:table-cell office:value-type="float" office:value="-0.05945754">
                <text:p>-0.05945754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44.6328125">
                <text:p>744.6328125</text:p>
              </table:table-cell>
              <table:table-cell office:value-type="float" office:value="-0.05994065">
                <text:p>-0.05994065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744.753051757813">
                <text:p>744.753051757813</text:p>
              </table:table-cell>
              <table:table-cell office:value-type="float" office:value="-0.05961225">
                <text:p>-0.05961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