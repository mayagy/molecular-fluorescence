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831942">
            <text:p>0.006831942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203348">
            <text:p>0.00203348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4265194">
            <text:p>0.004265194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303879">
            <text:p>0.01303879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8736539">
            <text:p>0.008736539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996946">
            <text:p>0.004996946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76085">
            <text:p>0.0176085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2125609">
            <text:p>-0.002125609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1188011">
            <text:p>0.0001188011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613886">
            <text:p>0.006613886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964669">
            <text:p>0.009964669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76333">
            <text:p>0.01176333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544864">
            <text:p>-0.002544864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318212">
            <text:p>0.002318212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06109368">
            <text:p>0.0006109368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982119">
            <text:p>0.006982119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413693">
            <text:p>-0.002413693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265844">
            <text:p>0.00265844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4004067">
            <text:p>0.04004067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433927">
            <text:p>-0.006433927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506368">
            <text:p>-0.003506368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215276">
            <text:p>0.01215276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857796">
            <text:p>0.01857796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162985">
            <text:p>-0.001162985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792917">
            <text:p>-0.005792917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574042">
            <text:p>0.004574042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3484466">
            <text:p>-0.003484466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874158">
            <text:p>0.002874158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8810248">
            <text:p>0.008810248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781118">
            <text:p>0.003781118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1923491">
            <text:p>0.001923491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738713">
            <text:p>0.01738713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8112698">
            <text:p>-0.008112698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591331">
            <text:p>0.001591331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2896675">
            <text:p>0.0002896675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4718016">
            <text:p>-0.004718016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272167">
            <text:p>0.00272167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4775193">
            <text:p>0.004775193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971589">
            <text:p>0.003971589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981364">
            <text:p>0.005981364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245319">
            <text:p>0.003245319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673296">
            <text:p>0.001673296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041766">
            <text:p>0.008041766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72146">
            <text:p>0.0172146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921179">
            <text:p>-0.003921179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953172">
            <text:p>0.00953172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479034">
            <text:p>0.02479034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866006">
            <text:p>0.01866006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550701">
            <text:p>0.005550701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523022">
            <text:p>0.009523022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052461">
            <text:p>0.004052461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170843">
            <text:p>0.007170843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78611">
            <text:p>-0.00178611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576171">
            <text:p>0.005576171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988822">
            <text:p>0.01988822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764354">
            <text:p>-0.002764354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877126">
            <text:p>0.008877126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2899959">
            <text:p>-0.002899959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7400067">
            <text:p>-0.007400067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0.00028413">
            <text:p>0.00028413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3854">
            <text:p>0.0033854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700873">
            <text:p>0.006700873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245727">
            <text:p>-0.002245727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335529">
            <text:p>-0.001335529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372557">
            <text:p>-0.008372557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836865">
            <text:p>0.002836865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357621">
            <text:p>0.02357621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864413">
            <text:p>0.001864413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8470811">
            <text:p>0.008470811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8437661">
            <text:p>0.008437661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781646">
            <text:p>0.01781646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30981">
            <text:p>-0.0030981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4020403">
            <text:p>-0.004020403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1581224">
            <text:p>0.001581224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2901543">
            <text:p>0.002901543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3108944">
            <text:p>-0.003108944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056302">
            <text:p>0.008056302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241963">
            <text:p>0.04241963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1963654">
            <text:p>0.001963654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365115">
            <text:p>0.001365115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7958523">
            <text:p>-0.007958523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775722">
            <text:p>0.01775722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455875">
            <text:p>0.009455875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1017549">
            <text:p>0.01017549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429213">
            <text:p>-0.003429213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965832">
            <text:p>0.005965832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721168">
            <text:p>0.01721168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168394">
            <text:p>0.01168394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060333">
            <text:p>0.03060333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162589">
            <text:p>0.01162589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021108">
            <text:p>0.02021108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4145252">
            <text:p>-0.004145252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462346">
            <text:p>-0.004462346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2942584">
            <text:p>0.002942584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624642">
            <text:p>0.009624642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8190828">
            <text:p>-0.0008190828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4179224">
            <text:p>-0.004179224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476079">
            <text:p>0.006476079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05276586">
            <text:p>-0.0005276586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9247078">
            <text:p>-0.009247078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168061">
            <text:p>-0.003168061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035818">
            <text:p>0.02035818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332817">
            <text:p>0.01332817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4531429">
            <text:p>0.004531429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7951507">
            <text:p>-0.007951507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9478132">
            <text:p>0.0009478132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01722933">
            <text:p>-0.0001722933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6275349">
            <text:p>0.006275349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074458">
            <text:p>0.05074458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2142709">
            <text:p>-0.002142709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1740634">
            <text:p>0.001740634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988388">
            <text:p>0.001988388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7590006">
            <text:p>-0.007590006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363147">
            <text:p>0.008363147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3587605">
            <text:p>0.003587605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123118">
            <text:p>-0.01123118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02436258">
            <text:p>0.0002436258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877374">
            <text:p>0.004877374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4959504">
            <text:p>-0.0004959504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6457666">
            <text:p>0.0006457666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6305235">
            <text:p>-0.006305235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54608">
            <text:p>0.01754608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2805169">
            <text:p>-0.0002805169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007072">
            <text:p>0.009007072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8054502">
            <text:p>0.008054502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274873">
            <text:p>0.009274873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4850153">
            <text:p>0.0004850153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13682">
            <text:p>0.013682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147876">
            <text:p>0.007147876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152962">
            <text:p>0.03152962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140344">
            <text:p>0.009140344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446704">
            <text:p>0.006446704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104191">
            <text:p>-0.001104191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09902707">
            <text:p>0.009902707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101945">
            <text:p>0.02101945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6030269">
            <text:p>-0.006030269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828392">
            <text:p>0.002828392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90231">
            <text:p>0.01790231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3821157">
            <text:p>0.003821157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5351642">
            <text:p>-0.005351642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710183">
            <text:p>-0.002710183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1113746">
            <text:p>-0.001113746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559812">
            <text:p>0.002559812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6688874">
            <text:p>-0.006688874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9556104">
            <text:p>-0.009556104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500376">
            <text:p>0.02500376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530008">
            <text:p>0.001530008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70379">
            <text:p>0.00370379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3773527">
            <text:p>-0.003773527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2099761">
            <text:p>-0.002099761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3604727">
            <text:p>-0.003604727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696519">
            <text:p>-0.003696519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889165">
            <text:p>-0.002889165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322324">
            <text:p>0.01322324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6267">
            <text:p>0.0116267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219112">
            <text:p>-0.002219112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583729">
            <text:p>0.02583729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519163">
            <text:p>0.006519163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321961">
            <text:p>0.01321961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448195">
            <text:p>-0.004448195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2641542">
            <text:p>-0.002641542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901834">
            <text:p>0.003901834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448438">
            <text:p>0.009448438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5154117">
            <text:p>-0.005154117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435141">
            <text:p>0.009435141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693893">
            <text:p>0.002693893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90905">
            <text:p>0.01090905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199439">
            <text:p>0.003199439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3842977">
            <text:p>0.003842977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06392455">
            <text:p>0.0006392455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690877">
            <text:p>0.01690877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339112">
            <text:p>0.002339112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818702">
            <text:p>0.01818702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637965">
            <text:p>0.006637965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9327118">
            <text:p>0.009327118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8639838">
            <text:p>-0.008639838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872176">
            <text:p>0.01872176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730994">
            <text:p>0.01730994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591679">
            <text:p>0.01591679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299939">
            <text:p>-0.004299939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4230778">
            <text:p>-0.0004230778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41125">
            <text:p>-0.00241125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3174382">
            <text:p>-0.003174382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678452">
            <text:p>0.01678452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5378183">
            <text:p>0.005378183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453524">
            <text:p>0.02453524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080347">
            <text:p>0.02080347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51505">
            <text:p>0.0151505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2487866">
            <text:p>-0.002487866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2645325">
            <text:p>-0.002645325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string">
            <text:p>-4.599682E-05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69545">
            <text:p>0.01069545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590268">
            <text:p>0.004590268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465954">
            <text:p>-0.000465954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227977">
            <text:p>0.01227977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4455566">
            <text:p>-0.004455566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948538">
            <text:p>0.007948538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614926">
            <text:p>0.01614926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23843">
            <text:p>0.01323843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196725">
            <text:p>-0.00196725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7717866">
            <text:p>-0.007717866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1010331">
            <text:p>0.01010331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140723">
            <text:p>0.001140723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68027">
            <text:p>-0.00268027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05962">
            <text:p>-0.00305962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0724022">
            <text:p>0.000724022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198967">
            <text:p>0.004198967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8408929">
            <text:p>-0.008408929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053415">
            <text:p>0.01053415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3160129">
            <text:p>-0.003160129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6719803">
            <text:p>0.006719803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392874">
            <text:p>-0.00392874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string">
            <text:p>-6.033675E-05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7085404">
            <text:p>-0.0007085404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2910891">
            <text:p>0.0002910891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748212">
            <text:p>0.006748212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145246">
            <text:p>0.01145246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33776">
            <text:p>-0.00133776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060311">
            <text:p>0.002060311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454235">
            <text:p>0.02454235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70581">
            <text:p>-0.00670581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5087469">
            <text:p>-0.005087469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00855">
            <text:p>0.00300855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2113436">
            <text:p>-0.002113436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112487">
            <text:p>0.01112487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41754">
            <text:p>0.01141754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851979">
            <text:p>-0.001851979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192135">
            <text:p>-0.003192135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4482535">
            <text:p>-0.004482535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033927">
            <text:p>0.003033927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801873">
            <text:p>-0.002801873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446981">
            <text:p>-0.004446981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262508">
            <text:p>0.001262508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265931">
            <text:p>0.01265931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07074">
            <text:p>0.0307074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9206627">
            <text:p>-0.009206627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8677589">
            <text:p>-0.008677589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683786">
            <text:p>0.003683786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267315">
            <text:p>-0.00267315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6011955">
            <text:p>0.006011955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201212">
            <text:p>-0.01201212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09952">
            <text:p>0.00409952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1867199">
            <text:p>-0.001867199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195266">
            <text:p>0.002195266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102353">
            <text:p>0.007102353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09361401">
            <text:p>0.0009361401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337074">
            <text:p>0.01337074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9211487">
            <text:p>-0.009211487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8528648">
            <text:p>-0.0008528648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2323523">
            <text:p>-0.002323523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144026">
            <text:p>0.02144026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3166724">
            <text:p>-0.0003166724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591504">
            <text:p>0.005591504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09951694">
            <text:p>0.0009951694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133891">
            <text:p>0.01133891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8038826">
            <text:p>-0.008038826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9090356">
            <text:p>-0.009090356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214095">
            <text:p>0.009214095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35242">
            <text:p>0.00335242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896605">
            <text:p>-0.006896605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310466">
            <text:p>-0.004310466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509266">
            <text:p>0.01509266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79248">
            <text:p>0.01079248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55741">
            <text:p>0.01055741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835183">
            <text:p>-0.007835183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1644931">
            <text:p>-0.001644931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290318">
            <text:p>0.005290318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2695151">
            <text:p>0.002695151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911382">
            <text:p>0.005911382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607109">
            <text:p>0.004607109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480977">
            <text:p>0.01480977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11716">
            <text:p>-0.0111716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897227">
            <text:p>0.003897227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532905">
            <text:p>0.002532905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260874">
            <text:p>0.01260874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9914513">
            <text:p>0.009914513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870787">
            <text:p>-0.008870787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85516">
            <text:p>0.01185516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225254">
            <text:p>0.001225254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8682823">
            <text:p>-0.008682823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802354">
            <text:p>0.001802354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2380936">
            <text:p>-0.0002380936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322146">
            <text:p>0.002322146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497438">
            <text:p>0.00497438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613594">
            <text:p>-0.002613594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146304">
            <text:p>0.002146304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812597">
            <text:p>0.01812597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5253272">
            <text:p>-0.005253272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7262087">
            <text:p>-0.007262087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65195">
            <text:p>0.0165195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215742">
            <text:p>0.01215742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6552587">
            <text:p>-0.0006552587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2963094">
            <text:p>-0.002963094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853149">
            <text:p>0.005853149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606752">
            <text:p>0.00606752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9343116">
            <text:p>0.009343116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437238">
            <text:p>-0.001437238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71335">
            <text:p>-0.00371335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639071">
            <text:p>0.01639071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5222138">
            <text:p>-0.005222138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536468">
            <text:p>0.004536468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302268">
            <text:p>0.002302268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351475">
            <text:p>0.005351475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3626993">
            <text:p>0.003626993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062197">
            <text:p>0.004062197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59965">
            <text:p>0.00159965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78997">
            <text:p>0.01178997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276592">
            <text:p>0.001276592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805192">
            <text:p>0.00805192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2305628">
            <text:p>-0.002305628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192686">
            <text:p>0.004192686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947671">
            <text:p>0.003947671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372917">
            <text:p>0.001372917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210278">
            <text:p>0.009210278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95953">
            <text:p>0.01395953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557613">
            <text:p>0.01557613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728351">
            <text:p>-0.00728351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95035">
            <text:p>0.01095035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798573">
            <text:p>-0.002798573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771106">
            <text:p>-0.005771106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548175">
            <text:p>0.003548175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2660621">
            <text:p>0.002660621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05978904">
            <text:p>-0.0005978904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6110463">
            <text:p>-0.006110463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6128636">
            <text:p>-0.006128636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7146134">
            <text:p>-0.007146134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9040317">
            <text:p>-0.009040317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-0.0002572069">
            <text:p>-0.0002572069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4827366">
            <text:p>0.004827366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548214">
            <text:p>0.004548214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385207">
            <text:p>0.008385207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973003">
            <text:p>-0.003973003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7040641">
            <text:p>-0.0007040641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619684">
            <text:p>0.01619684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087819">
            <text:p>0.001087819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1401187">
            <text:p>-0.001401187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06316">
            <text:p>0.0106316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90967">
            <text:p>0.01090967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1431554">
            <text:p>0.001431554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867555">
            <text:p>0.007867555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6319173">
            <text:p>-0.006319173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145503">
            <text:p>0.001145503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00424">
            <text:p>0.01000424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5848865">
            <text:p>-0.005848865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52457">
            <text:p>0.00352457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568452">
            <text:p>0.01568452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5859">
            <text:p>0.0055859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668362">
            <text:p>0.001668362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8873708">
            <text:p>-0.008873708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280365">
            <text:p>0.01280365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4922621">
            <text:p>-0.0004922621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25846">
            <text:p>-0.00125846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07502792">
            <text:p>0.0007502792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256144">
            <text:p>0.007256144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6104068">
            <text:p>-0.006104068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358443">
            <text:p>0.01358443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635">
            <text:p>0.011635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028284">
            <text:p>0.01028284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288999">
            <text:p>0.00288999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144817">
            <text:p>0.003144817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856339">
            <text:p>-0.003856339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229014">
            <text:p>0.006229014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8512158">
            <text:p>-0.008512158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-0.0003496436">
            <text:p>-0.0003496436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string">
            <text:p>-1.862411E-05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2012597">
            <text:p>0.002012597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107207">
            <text:p>0.003107207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078166">
            <text:p>-0.006078166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5227174">
            <text:p>-0.005227174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904759">
            <text:p>0.008904759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636477">
            <text:p>0.002636477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01812839">
            <text:p>-0.0001812839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1084424">
            <text:p>-0.001084424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812143">
            <text:p>0.003812143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825395">
            <text:p>0.01825395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42317">
            <text:p>0.01042317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1954219">
            <text:p>-0.001954219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267646">
            <text:p>-0.00267646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59315">
            <text:p>0.00859315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25048">
            <text:p>0.0125048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66434">
            <text:p>0.00166434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09263974">
            <text:p>-0.0009263974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6729192">
            <text:p>-0.0006729192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293453">
            <text:p>0.006293453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511559">
            <text:p>0.006511559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6457498">
            <text:p>-0.006457498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43408">
            <text:p>0.0143408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922379">
            <text:p>0.008922379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464538">
            <text:p>0.005464538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5595375">
            <text:p>-0.005595375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7001913">
            <text:p>-0.007001913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708861">
            <text:p>-0.004708861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592827">
            <text:p>-0.002592827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5498101">
            <text:p>-0.005498101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094799">
            <text:p>0.007094799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09928525">
            <text:p>0.009928525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215517">
            <text:p>0.003215517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7313944">
            <text:p>0.007313944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4774881">
            <text:p>-0.004774881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6472484">
            <text:p>-0.006472484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9115684">
            <text:p>-0.009115684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96958">
            <text:p>0.01096958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889134">
            <text:p>0.02889134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224938">
            <text:p>0.004224938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911679">
            <text:p>0.007911679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114444">
            <text:p>0.009114444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0842312">
            <text:p>-0.000842312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015074">
            <text:p>0.01015074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4108235">
            <text:p>0.004108235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754749">
            <text:p>0.004754749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2309551">
            <text:p>-0.002309551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4218344">
            <text:p>0.0004218344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975656">
            <text:p>-0.000975656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69677">
            <text:p>0.00169677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1336663">
            <text:p>-0.001336663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09939079">
            <text:p>0.009939079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964313">
            <text:p>-0.002964313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6240951">
            <text:p>0.0006240951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289735">
            <text:p>0.01289735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631563">
            <text:p>0.01631563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046351">
            <text:p>0.02046351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04304">
            <text:p>0.01004304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6366817">
            <text:p>-0.006366817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2587011">
            <text:p>-0.002587011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7997145">
            <text:p>-0.007997145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8271568">
            <text:p>-0.008271568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5238378">
            <text:p>0.0005238378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2565648">
            <text:p>-0.002565648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7621181">
            <text:p>0.0007621181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1691548">
            <text:p>-0.001691548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2658657">
            <text:p>0.002658657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7961848">
            <text:p>0.007961848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870601">
            <text:p>-0.006870601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3408386">
            <text:p>-0.003408386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07157">
            <text:p>-0.0107157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string">
            <text:p>1.648575E-05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754695">
            <text:p>-0.008754695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8202215">
            <text:p>-0.008202215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8015005">
            <text:p>-0.008015005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4636204">
            <text:p>-0.0004636204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716891">
            <text:p>0.003716891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6915279">
            <text:p>0.006915279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4449677">
            <text:p>-0.004449677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339138">
            <text:p>0.00339138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6253183">
            <text:p>-0.006253183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856406">
            <text:p>0.009856406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261931">
            <text:p>0.008261931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045762">
            <text:p>0.02045762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99569">
            <text:p>0.01199569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521177">
            <text:p>0.002521177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404273">
            <text:p>-0.004404273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9861444">
            <text:p>-0.009861444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014347">
            <text:p>0.007014347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7037018">
            <text:p>-0.007037018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3812545">
            <text:p>0.003812545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735375">
            <text:p>-0.005735375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4827084">
            <text:p>-0.004827084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879643">
            <text:p>0.001879643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77348">
            <text:p>0.01277348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8095807">
            <text:p>-0.008095807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905397">
            <text:p>-0.004905397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919471">
            <text:p>-0.007919471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827602">
            <text:p>0.003827602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239826">
            <text:p>-0.005239826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6376116">
            <text:p>-0.006376116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5688048">
            <text:p>-0.005688048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1153726">
            <text:p>-0.001153726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3066635">
            <text:p>0.003066635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013088">
            <text:p>-0.01013088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-0.0008228584">
            <text:p>-0.0008228584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5905646">
            <text:p>0.005905646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070729">
            <text:p>-0.01070729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479001">
            <text:p>-0.001479001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060201">
            <text:p>0.03060201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580848">
            <text:p>-0.001580848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8458392">
            <text:p>0.0008458392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905289">
            <text:p>-0.006905289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085494">
            <text:p>0.01085494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644402">
            <text:p>0.00644402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36623">
            <text:p>-0.00536623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string">
            <text:p>7.15182E-0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4618876">
            <text:p>-0.004618876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8840267">
            <text:p>-0.008840267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624219">
            <text:p>-0.002624219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308095">
            <text:p>-0.005308095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7128445">
            <text:p>0.007128445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8895763">
            <text:p>0.008895763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4478838">
            <text:p>-0.004478838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2159029">
            <text:p>-0.002159029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04859929">
            <text:p>-0.0004859929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814306">
            <text:p>-0.000814306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973893">
            <text:p>-0.003973893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967451">
            <text:p>-0.007967451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111199">
            <text:p>0.003111199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402102">
            <text:p>-0.001402102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587866">
            <text:p>0.007587866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8300105">
            <text:p>-0.0008300105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6664">
            <text:p>-0.0036664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977286">
            <text:p>-0.002977286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6614455">
            <text:p>-0.006614455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1480099">
            <text:p>0.001480099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471435">
            <text:p>-0.002471435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62247">
            <text:p>-0.01062247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0644563">
            <text:p>-0.000644563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1816346">
            <text:p>-0.001816346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512437">
            <text:p>0.001512437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97148">
            <text:p>0.01297148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552733">
            <text:p>0.01552733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5881891">
            <text:p>-0.005881891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916054">
            <text:p>0.003916054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7152594">
            <text:p>-0.007152594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6746323">
            <text:p>0.006746323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68022">
            <text:p>-0.00468022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078604">
            <text:p>0.002078604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915942">
            <text:p>-0.005915942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7078972">
            <text:p>-0.007078972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3552534">
            <text:p>-0.003552534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239253">
            <text:p>0.01239253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979797">
            <text:p>0.009979797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055719">
            <text:p>-0.007055719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2325864">
            <text:p>-0.0002325864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5100038">
            <text:p>0.005100038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08047353">
            <text:p>0.0008047353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78042">
            <text:p>0.00178042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53984">
            <text:p>0.00253984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234373">
            <text:p>0.004234373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000978">
            <text:p>0.01000978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7189704">
            <text:p>-0.007189704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34795">
            <text:p>0.00634795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093521">
            <text:p>-0.01093521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6797984">
            <text:p>-0.006797984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2383743">
            <text:p>-0.002383743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134628">
            <text:p>0.01134628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069165">
            <text:p>-0.005069165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382748">
            <text:p>-0.002382748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5448407">
            <text:p>-0.005448407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144325">
            <text:p>0.01144325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981534">
            <text:p>0.006981534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170454">
            <text:p>-0.01170454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8256773">
            <text:p>-0.008256773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645629">
            <text:p>-0.001645629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032274">
            <text:p>-0.01032274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504335">
            <text:p>0.01504335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408612">
            <text:p>-0.001408612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55074">
            <text:p>-0.0055074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4581607">
            <text:p>-0.004581607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8321">
            <text:p>-0.0048321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130706">
            <text:p>0.01130706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056429">
            <text:p>0.01056429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283005">
            <text:p>0.01283005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9169912">
            <text:p>0.009169912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6378968">
            <text:p>-0.006378968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9365082">
            <text:p>0.009365082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09841442">
            <text:p>0.0009841442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5541379">
            <text:p>0.005541379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933477">
            <text:p>-0.004933477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636482">
            <text:p>0.004636482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670127">
            <text:p>0.01670127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2824089">
            <text:p>-0.002824089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607142">
            <text:p>0.007607142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408874">
            <text:p>0.00408874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9103994">
            <text:p>0.009103994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17524">
            <text:p>0.00317524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400138">
            <text:p>0.01400138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101606">
            <text:p>0.003101606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236562">
            <text:p>-0.00236562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1161621">
            <text:p>-0.001161621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22999">
            <text:p>0.0122999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397302">
            <text:p>0.01397302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1281788">
            <text:p>-0.0001281788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1231336">
            <text:p>-0.001231336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8809585">
            <text:p>-0.008809585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183648">
            <text:p>0.01183648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7489506">
            <text:p>-0.007489506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159752">
            <text:p>0.01159752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174246">
            <text:p>0.01174246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9132061">
            <text:p>-0.009132061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609093">
            <text:p>-0.003609093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677644">
            <text:p>0.01677644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78769">
            <text:p>0.01378769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5685261">
            <text:p>-0.005685261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463761">
            <text:p>0.01463761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7244334">
            <text:p>0.007244334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3450855">
            <text:p>-0.003450855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321626">
            <text:p>0.004321626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4008884">
            <text:p>-0.004008884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8240706">
            <text:p>-0.008240706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65433">
            <text:p>0.01265433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608892">
            <text:p>-0.003608892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377621">
            <text:p>0.01377621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7376918">
            <text:p>0.0007376918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643056">
            <text:p>0.007643056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917164">
            <text:p>0.002917164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794678">
            <text:p>0.002794678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44514">
            <text:p>0.0044514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9938667">
            <text:p>0.0009938667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895647">
            <text:p>-0.002895647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4753995">
            <text:p>-0.004753995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313491">
            <text:p>0.008313491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5620408">
            <text:p>-0.005620408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46512">
            <text:p>0.0146512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535289">
            <text:p>0.004535289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6788006">
            <text:p>-0.0006788006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6718295">
            <text:p>0.0006718295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336222">
            <text:p>0.01336222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20436">
            <text:p>0.00220436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75438">
            <text:p>0.00475438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318657">
            <text:p>0.002318657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606882">
            <text:p>0.001606882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559098">
            <text:p>-0.004559098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788937">
            <text:p>-0.00788937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221741">
            <text:p>0.006221741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8024">
            <text:p>0.0048024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string">
            <text:p>-1.590619E-05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8258783">
            <text:p>-0.008258783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843361">
            <text:p>0.002843361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204497">
            <text:p>-0.001204497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790655">
            <text:p>0.001790655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2087733">
            <text:p>-0.002087733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143394">
            <text:p>0.004143394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450258">
            <text:p>-0.003450258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370527">
            <text:p>0.01370527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3441066">
            <text:p>-0.003441066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3740577">
            <text:p>-0.003740577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2155235">
            <text:p>-0.002155235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946057">
            <text:p>-0.002946057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427832">
            <text:p>0.01427832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string">
            <text:p>1.617139E-05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7544209">
            <text:p>0.0007544209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716683">
            <text:p>0.001716683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148708">
            <text:p>-0.003148708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69657">
            <text:p>0.01469657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8981997">
            <text:p>0.0008981997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6454174">
            <text:p>0.0006454174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646692">
            <text:p>-0.00646692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576639">
            <text:p>0.01576639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1650709">
            <text:p>-0.001650709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224127">
            <text:p>0.01224127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9521308">
            <text:p>-0.009521308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049427">
            <text:p>0.004049427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1039675">
            <text:p>-0.01039675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79346">
            <text:p>0.01279346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64972">
            <text:p>0.00264972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7693621">
            <text:p>-0.007693621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1970047">
            <text:p>0.0001970047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663351">
            <text:p>0.01663351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152076">
            <text:p>0.01152076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4275343">
            <text:p>-0.004275343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722441">
            <text:p>-0.007722441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2743367">
            <text:p>-0.0002743367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7213051">
            <text:p>0.0007213051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498353">
            <text:p>0.004498353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361715">
            <text:p>0.01361715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882003">
            <text:p>-0.002882003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1929883">
            <text:p>-0.001929883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5651433">
            <text:p>-0.005651433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004894">
            <text:p>-0.01004894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7253509">
            <text:p>0.0007253509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6598915">
            <text:p>-0.006598915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230379">
            <text:p>0.01230379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160397">
            <text:p>0.02160397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6140491">
            <text:p>-0.006140491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445828">
            <text:p>0.001445828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885853">
            <text:p>0.005885853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619273">
            <text:p>-0.001619273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8049938">
            <text:p>-0.008049938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406099">
            <text:p>0.003406099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663146">
            <text:p>-0.002663146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412068">
            <text:p>0.008412068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3056264">
            <text:p>-0.003056264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9348835">
            <text:p>0.009348835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2451801">
            <text:p>-0.002451801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8511249">
            <text:p>-0.008511249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2375616">
            <text:p>-0.002375616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6707806">
            <text:p>-0.006707806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384887">
            <text:p>0.04384887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3336701">
            <text:p>-0.003336701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045026">
            <text:p>0.003045026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781536">
            <text:p>0.002781536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74617">
            <text:p>0.0474617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08814583">
            <text:p>-0.0008814583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142332">
            <text:p>-0.001142332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4416888">
            <text:p>-0.004416888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7346345">
            <text:p>-0.007346345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916875">
            <text:p>-0.002916875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258605">
            <text:p>0.01258605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3830237">
            <text:p>-0.003830237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509388">
            <text:p>0.001509388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970661">
            <text:p>-0.003970661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535286">
            <text:p>0.005535286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1366">
            <text:p>0.0031366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217738">
            <text:p>-0.00217738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572343">
            <text:p>0.005572343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985684">
            <text:p>-0.002985684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1656809">
            <text:p>0.001656809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703156">
            <text:p>0.000703156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5564006">
            <text:p>0.005564006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058958">
            <text:p>-0.003058958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3818445">
            <text:p>-0.003818445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627911">
            <text:p>-0.002627911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347768">
            <text:p>-0.001347768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805681">
            <text:p>-0.001805681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6453027">
            <text:p>-0.006453027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75372">
            <text:p>-0.00575372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901409">
            <text:p>-0.003901409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134203">
            <text:p>0.02134203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1984502">
            <text:p>-0.001984502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728734">
            <text:p>0.01728734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3153938">
            <text:p>-0.003153938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783153">
            <text:p>0.008783153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08217613">
            <text:p>-0.0008217613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2175931">
            <text:p>-0.002175931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6613524">
            <text:p>-0.006613524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3172719">
            <text:p>-0.003172719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692337">
            <text:p>-0.00692337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string">
            <text:p>2.473681E-05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3006258">
            <text:p>-0.003006258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611999">
            <text:p>0.002611999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713539">
            <text:p>-0.001713539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382837">
            <text:p>0.006382837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995761">
            <text:p>-0.003995761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740719">
            <text:p>0.006740719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077872">
            <text:p>0.007077872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07079427">
            <text:p>-0.0007079427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595371">
            <text:p>0.005595371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658701">
            <text:p>0.004658701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09518202">
            <text:p>0.0009518202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1355022">
            <text:p>-0.001355022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01866114">
            <text:p>-0.0001866114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367481">
            <text:p>-0.00367481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27098">
            <text:p>0.00127098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1808201">
            <text:p>0.001808201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5847775">
            <text:p>-0.005847775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059463">
            <text:p>0.01059463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056329">
            <text:p>-0.002056329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51083">
            <text:p>-0.00151083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179798">
            <text:p>0.000179798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6121843">
            <text:p>0.006121843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693739">
            <text:p>0.005693739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504127">
            <text:p>0.003504127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362501">
            <text:p>0.01362501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660027">
            <text:p>0.002660027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234258">
            <text:p>0.01234258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07770841">
            <text:p>-0.0007770841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5974926">
            <text:p>-0.005974926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59267">
            <text:p>0.00259267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7345635">
            <text:p>-0.007345635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683492">
            <text:p>0.002683492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2571065">
            <text:p>-0.002571065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9712665">
            <text:p>-0.0009712665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1307288">
            <text:p>-0.001307288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9652156">
            <text:p>-0.009652156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642871">
            <text:p>0.009642871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9367421">
            <text:p>-0.009367421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349429">
            <text:p>0.005349429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845924">
            <text:p>0.005845924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447713">
            <text:p>0.005447713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840798">
            <text:p>-0.008840798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3492192">
            <text:p>0.003492192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437288">
            <text:p>0.01437288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5101991">
            <text:p>-0.005101991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6056652">
            <text:p>0.0006056652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string">
            <text:p>2.452549E-05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12501">
            <text:p>0.01012501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392452">
            <text:p>-0.002392452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2212533">
            <text:p>-0.002212533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3401756">
            <text:p>-0.003401756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715939">
            <text:p>0.01715939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8082111">
            <text:p>-0.008082111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683888">
            <text:p>0.006683888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5383272">
            <text:p>-0.0005383272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7241454">
            <text:p>-0.007241454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910494">
            <text:p>0.000910494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613817">
            <text:p>-0.006613817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879117">
            <text:p>-0.007879117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4728278">
            <text:p>-0.004728278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517229">
            <text:p>0.001517229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3884387">
            <text:p>-0.003884387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720112">
            <text:p>0.01720112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5188189">
            <text:p>0.005188189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867471">
            <text:p>-0.001867471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979108">
            <text:p>0.008979108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3026264">
            <text:p>-0.003026264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37219">
            <text:p>0.0137219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500535">
            <text:p>0.005500535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7974267">
            <text:p>0.007974267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076914">
            <text:p>0.003076914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966968">
            <text:p>0.01966968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120493">
            <text:p>-0.0112049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3129243">
            <text:p>-0.003129243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014429">
            <text:p>-0.005014429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424869">
            <text:p>-0.001424869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4041247">
            <text:p>-0.004041247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375013">
            <text:p>-0.002375013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503387">
            <text:p>-0.006503387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2460043">
            <text:p>0.002460043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338993">
            <text:p>0.002338993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351429">
            <text:p>-0.008351429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157124">
            <text:p>-0.002157124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6565125">
            <text:p>-0.006565125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979738">
            <text:p>0.001979738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424677">
            <text:p>-0.000424677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491903">
            <text:p>0.001491903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2018255">
            <text:p>-0.002018255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476918">
            <text:p>0.003476918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1910152">
            <text:p>0.001910152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2576169">
            <text:p>-0.002576169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996544">
            <text:p>0.01996544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853802">
            <text:p>0.007853802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670914">
            <text:p>-0.004670914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709053">
            <text:p>0.002709053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712922">
            <text:p>0.02712922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660845">
            <text:p>0.006660845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424555">
            <text:p>0.01424555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703807">
            <text:p>0.006703807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520225">
            <text:p>0.003520225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567627">
            <text:p>0.02567627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2879643">
            <text:p>0.002879643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412439">
            <text:p>0.02412439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09124978">
            <text:p>0.0009124978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3019526">
            <text:p>0.003019526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301553">
            <text:p>0.001301553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8154631">
            <text:p>-0.008154631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9230408">
            <text:p>0.009230408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020197">
            <text:p>0.002020197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8908543">
            <text:p>-0.008908543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304471">
            <text:p>-0.00304471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string">
            <text:p>3.696897E-05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496458">
            <text:p>-0.001496458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9249275">
            <text:p>-0.009249275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6501357">
            <text:p>-0.006501357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1027394">
            <text:p>-0.0001027394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4826554">
            <text:p>0.0004826554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002878">
            <text:p>-0.00300287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55984">
            <text:p>-0.00155984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862215">
            <text:p>-0.006862215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103124">
            <text:p>0.002103124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312531">
            <text:p>0.00312531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2982367">
            <text:p>-0.002982367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57299">
            <text:p>0.01257299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07227293">
            <text:p>0.0007227293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9082265">
            <text:p>0.009082265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006684">
            <text:p>-0.01006684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692012">
            <text:p>0.006692012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4264827">
            <text:p>-0.004264827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270413">
            <text:p>-0.00270413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010355">
            <text:p>0.004010355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573924">
            <text:p>0.002573924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08547953">
            <text:p>0.0008547953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3948793">
            <text:p>-0.003948793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364001">
            <text:p>-0.002364001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384277">
            <text:p>-0.00384277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3671627">
            <text:p>0.0003671627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521668">
            <text:p>-0.006521668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666526">
            <text:p>0.006666526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840184">
            <text:p>-0.004840184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9399176">
            <text:p>-0.009399176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669396">
            <text:p>-0.008669396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2763707">
            <text:p>-0.0002763707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3358598">
            <text:p>-0.003358598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57942">
            <text:p>0.00057942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4735088">
            <text:p>-0.004735088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4649337">
            <text:p>-0.004649337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2188841">
            <text:p>0.0002188841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3583013">
            <text:p>-0.003583013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5305372">
            <text:p>-0.005305372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214239">
            <text:p>0.01214239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3514593">
            <text:p>0.003514593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114789">
            <text:p>0.02114789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003877">
            <text:p>-0.01003877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5831821">
            <text:p>-0.005831821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76798">
            <text:p>0.00176798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2864567">
            <text:p>0.002864567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545153">
            <text:p>-0.01545153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8687345">
            <text:p>-0.008687345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120334">
            <text:p>0.03120334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95005">
            <text:p>0.01595005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414771">
            <text:p>0.005414771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796">
            <text:p>0.004796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1025047">
            <text:p>0.01025047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string">
            <text:p>9.187489E-05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134966">
            <text:p>0.001134966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280709">
            <text:p>0.004280709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4921664">
            <text:p>-0.004921664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8779038">
            <text:p>-0.008779038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6013172">
            <text:p>-0.006013172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string">
            <text:p>-5.436454E-05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134113">
            <text:p>0.01134113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724878">
            <text:p>0.006724878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109672">
            <text:p>0.009109672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692049">
            <text:p>0.001692049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283012">
            <text:p>0.01283012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3041659">
            <text:p>-0.003041659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4408432">
            <text:p>-0.004408432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744043">
            <text:p>-0.00744043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6166078">
            <text:p>-0.006166078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4546757">
            <text:p>-0.004546757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157138">
            <text:p>0.002157138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288595">
            <text:p>0.004288595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4864724">
            <text:p>0.004864724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42125">
            <text:p>0.0142125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340135">
            <text:p>-0.00340135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176117">
            <text:p>-0.005176117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447952">
            <text:p>0.001447952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144026">
            <text:p>0.01144026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8735715">
            <text:p>-0.008735715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4073158">
            <text:p>0.004073158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202406">
            <text:p>-0.00202406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819065">
            <text:p>0.008819065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976302">
            <text:p>0.005976302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777715">
            <text:p>-0.001777715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214394">
            <text:p>0.02214394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333294">
            <text:p>-0.00333294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8478762">
            <text:p>-0.008478762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9156826">
            <text:p>-0.009156826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8683869">
            <text:p>0.008683869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6404008">
            <text:p>-0.006404008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16247">
            <text:p>0.0116247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420496">
            <text:p>0.006420496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480052">
            <text:p>-0.002480052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440548">
            <text:p>-0.00440548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30943">
            <text:p>0.00230943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9063807">
            <text:p>-0.009063807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70329">
            <text:p>0.01070329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425698">
            <text:p>-0.000425698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3415381">
            <text:p>-0.003415381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030266">
            <text:p>-0.01030266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740829">
            <text:p>0.004740829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67253">
            <text:p>0.01067253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263786">
            <text:p>0.006263786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4187049">
            <text:p>-0.004187049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563898">
            <text:p>0.003563898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string">
            <text:p>5.039168E-05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7035069">
            <text:p>-0.007035069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2265885">
            <text:p>-0.002265885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549974">
            <text:p>0.01549974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5291448">
            <text:p>-0.005291448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441128">
            <text:p>-0.003441128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388186">
            <text:p>-0.01388186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2063119">
            <text:p>-0.002063119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698858">
            <text:p>0.005698858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152183">
            <text:p>0.005152183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4556061">
            <text:p>-0.004556061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6541715">
            <text:p>-0.006541715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690051">
            <text:p>0.003690051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16963">
            <text:p>0.0116963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304886">
            <text:p>-0.005304886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105896">
            <text:p>0.01105896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03348364">
            <text:p>-0.0003348364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711066">
            <text:p>-0.002711066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2697568">
            <text:p>0.002697568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679548">
            <text:p>0.008679548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698727">
            <text:p>0.008698727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4329226">
            <text:p>-0.004329226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329603">
            <text:p>-0.004329603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851479">
            <text:p>0.003851479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71143">
            <text:p>0.00271143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1065696">
            <text:p>0.001065696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9628321">
            <text:p>-0.009628321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3029427">
            <text:p>0.003029427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405147">
            <text:p>0.005405147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335601">
            <text:p>-0.006335601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9909331">
            <text:p>-0.009909331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1342642">
            <text:p>-0.001342642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9207354">
            <text:p>0.009207354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310184">
            <text:p>-0.002310184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6904213">
            <text:p>-0.006904213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4247562">
            <text:p>-0.004247562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515437">
            <text:p>0.003515437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0.0002801974">
            <text:p>0.0002801974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076568">
            <text:p>0.007076568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978181">
            <text:p>-0.006978181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494908">
            <text:p>-0.00494908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6397014">
            <text:p>-0.006397014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7509">
            <text:p>0.017509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54629">
            <text:p>0.0254629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string">
            <text:p>-4.980625E-05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608475">
            <text:p>-0.005608475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669912">
            <text:p>0.007669912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string">
            <text:p>-1.635228E-05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991369">
            <text:p>0.007991369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8606321">
            <text:p>0.008606321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370689">
            <text:p>-0.00370689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212467">
            <text:p>0.01212467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2463932">
            <text:p>-0.002463932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7435937">
            <text:p>0.0007435937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2842321">
            <text:p>-0.002842321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927878">
            <text:p>0.006927878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179562">
            <text:p>-0.001179562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796585">
            <text:p>-0.003796585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6125085">
            <text:p>-0.006125085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848683">
            <text:p>0.003848683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5550022">
            <text:p>-0.005550022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558578">
            <text:p>-0.001558578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3461587">
            <text:p>-0.003461587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913751">
            <text:p>0.00913751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087479">
            <text:p>0.01087479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9287">
            <text:p>0.0069287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00758">
            <text:p>0.0200758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6297369">
            <text:p>-0.006297369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1750476">
            <text:p>-0.001750476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1855493">
            <text:p>0.001855493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74613">
            <text:p>0.00474613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3449295">
            <text:p>-0.003449295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32032">
            <text:p>0.0132032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746777">
            <text:p>0.01746777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846848">
            <text:p>0.008846848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043922">
            <text:p>0.003043922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108232">
            <text:p>0.003108232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423348">
            <text:p>-0.001423348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047542">
            <text:p>0.005047542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542787">
            <text:p>-0.002542787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070872">
            <text:p>-0.004070872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5145203">
            <text:p>-0.005145203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549065">
            <text:p>0.01549065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string">
            <text:p>-1.59845E-05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3045131">
            <text:p>0.003045131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410935">
            <text:p>-0.008410935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5705999">
            <text:p>-0.005705999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190953">
            <text:p>0.02190953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4003007">
            <text:p>-0.004003007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1966011">
            <text:p>-0.001966011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4004303">
            <text:p>-0.004004303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435037">
            <text:p>0.002435037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129018">
            <text:p>-0.002129018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512306">
            <text:p>-0.001512306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5865714">
            <text:p>0.005865714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8729047">
            <text:p>-0.008729047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8224978">
            <text:p>-0.008224978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224446">
            <text:p>-0.004224446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26806">
            <text:p>0.01226806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2623693">
            <text:p>0.002623693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008302">
            <text:p>-0.01008302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048903">
            <text:p>0.003048903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1735391">
            <text:p>-0.001735391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679909">
            <text:p>0.02679909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8035164">
            <text:p>-0.0008035164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463511">
            <text:p>-0.001463511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5884256">
            <text:p>0.005884256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3274445">
            <text:p>0.003274445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839076">
            <text:p>-0.008839076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6481427">
            <text:p>0.006481427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548572">
            <text:p>0.003548572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1022981">
            <text:p>-0.001022981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37158">
            <text:p>0.00337158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3435694">
            <text:p>0.003435694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-0.0003181185">
            <text:p>-0.0003181185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5157021">
            <text:p>-0.0005157021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709008">
            <text:p>0.004709008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651859">
            <text:p>-0.003651859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542494">
            <text:p>0.01542494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5287434">
            <text:p>0.005287434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156509">
            <text:p>-0.006156509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09791493">
            <text:p>-0.009791493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string">
            <text:p>5.695688E-05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665075">
            <text:p>0.007665075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042337">
            <text:p>-0.008042337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163953">
            <text:p>-0.01163953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778938">
            <text:p>-0.002778938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3375682">
            <text:p>0.003375682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561501">
            <text:p>-0.008561501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686594">
            <text:p>-0.00686594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4137859">
            <text:p>0.004137859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08509">
            <text:p>0.0208509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5094952">
            <text:p>-0.005094952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8609562">
            <text:p>-0.008609562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6234686">
            <text:p>-0.006234686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600506">
            <text:p>0.0600506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198931">
            <text:p>-0.000198931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2689642">
            <text:p>-0.002689642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773119">
            <text:p>0.007773119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215797">
            <text:p>0.03215797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3172684">
            <text:p>-0.0003172684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594016">
            <text:p>-0.01594016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144501">
            <text:p>0.02144501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16298">
            <text:p>0.0116298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217409">
            <text:p>-0.002217409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1198574">
            <text:p>-0.001198574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6531958">
            <text:p>0.006531958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string">
            <text:p>-8.916604E-0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8181574">
            <text:p>0.0008181574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575604">
            <text:p>0.01575604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894764">
            <text:p>0.001894764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109986">
            <text:p>0.006109986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057765">
            <text:p>-0.01057765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574772">
            <text:p>0.001574772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9575527">
            <text:p>0.009575527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5040763">
            <text:p>-0.005040763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0.0007870003">
            <text:p>0.0007870003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188589">
            <text:p>0.02188589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994364">
            <text:p>0.002994364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1378872">
            <text:p>-0.001378872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0.0006325971">
            <text:p>0.0006325971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1755359">
            <text:p>-0.001755359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93285">
            <text:p>0.0093285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4507126">
            <text:p>0.004507126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4301766">
            <text:p>-0.004301766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0.0002062492">
            <text:p>0.0002062492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961131">
            <text:p>0.003961131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5411684">
            <text:p>-0.005411684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646902">
            <text:p>-0.009646902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674857">
            <text:p>0.002674857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907206">
            <text:p>-0.003907206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5417324">
            <text:p>0.005417324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643814">
            <text:p>0.02643814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3846166">
            <text:p>-0.003846166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0.0006327316">
            <text:p>0.0006327316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2339048">
            <text:p>0.002339048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3859235">
            <text:p>-0.003859235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037016">
            <text:p>-0.002037016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5561843">
            <text:p>0.005561843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8009754">
            <text:p>0.008009754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2494268">
            <text:p>-0.002494268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9089932">
            <text:p>-0.009089932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7453447">
            <text:p>0.007453447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0.0004930862">
            <text:p>0.0004930862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290227">
            <text:p>-0.005290227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1901587">
            <text:p>0.001901587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89401">
            <text:p>0.00189401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852874">
            <text:p>0.004852874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514918">
            <text:p>-0.004514918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3782988">
            <text:p>-0.0003782988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806783">
            <text:p>0.005806783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4079618">
            <text:p>0.004079618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3720802">
            <text:p>-0.003720802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1965453">
            <text:p>0.001965453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400039">
            <text:p>0.01400039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2634312">
            <text:p>-0.002634312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09420135">
            <text:p>-0.0009420135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2492801">
            <text:p>-0.002492801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571564">
            <text:p>0.01571564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326274">
            <text:p>0.00326274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5032004">
            <text:p>0.005032004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1000502">
            <text:p>0.01000502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2335567">
            <text:p>0.002335567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4917089">
            <text:p>0.004917089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4851277">
            <text:p>-0.004851277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7769144">
            <text:p>-0.007769144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5754499">
            <text:p>-0.005754499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245246">
            <text:p>0.01245246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374203">
            <text:p>-0.007374203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1449503">
            <text:p>-0.001449503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7475905">
            <text:p>0.007475905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069679">
            <text:p>0.01069679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230514">
            <text:p>0.01230514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7608585">
            <text:p>-0.007608585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05637683">
            <text:p>-0.0005637683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1153115">
            <text:p>-0.001153115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036152">
            <text:p>-0.01036152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1488029">
            <text:p>0.001488029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692847">
            <text:p>0.01692847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2090042">
            <text:p>0.002090042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018708">
            <text:p>0.01018708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09759523">
            <text:p>-0.009759523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7498988">
            <text:p>0.007498988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2891181">
            <text:p>-0.002891181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109111">
            <text:p>-0.002109111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222916">
            <text:p>-0.01222916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7008621">
            <text:p>0.007008621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3448929">
            <text:p>0.003448929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1434373">
            <text:p>0.001434373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173477">
            <text:p>-0.01173477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923011">
            <text:p>0.00923011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5066342">
            <text:p>-0.005066342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0389571">
            <text:p>-0.000389571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300322">
            <text:p>-0.01300322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1460835">
            <text:p>0.001460835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28268">
            <text:p>0.0128268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2446343">
            <text:p>0.002446343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177067">
            <text:p>-0.01177067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8362639">
            <text:p>0.008362639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102364">
            <text:p>0.01102364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6093454">
            <text:p>-0.006093454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1575098">
            <text:p>-0.001575098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3218568">
            <text:p>0.003218568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8568863">
            <text:p>0.008568863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32264">
            <text:p>-0.01032264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4255275">
            <text:p>0.004255275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1025999">
            <text:p>0.01025999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6527807">
            <text:p>0.006527807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1013127">
            <text:p>0.01013127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6143266">
            <text:p>-0.006143266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1999178">
            <text:p>-0.001999178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689543">
            <text:p>0.00689543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09485833">
            <text:p>-0.009485833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2712964">
            <text:p>-0.002712964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700005">
            <text:p>0.01700005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5500708">
            <text:p>-0.005500708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2789187">
            <text:p>-0.002789187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280585">
            <text:p>-0.00280585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3015739">
            <text:p>0.003015739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87787">
            <text:p>-0.00187787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32619">
            <text:p>-0.01032619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494459">
            <text:p>-0.01494459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747755">
            <text:p>0.006747755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974867">
            <text:p>0.00974867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5748596">
            <text:p>-0.005748596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163484">
            <text:p>-0.002163484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106623">
            <text:p>0.01106623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203311">
            <text:p>0.01203311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6377471">
            <text:p>-0.006377471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4584479">
            <text:p>-0.004584479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8397463">
            <text:p>0.008397463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889939">
            <text:p>0.008889939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435787">
            <text:p>-0.009435787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09890856">
            <text:p>-0.009890856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155808">
            <text:p>0.01155808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3001166">
            <text:p>-0.0003001166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5736776">
            <text:p>-0.005736776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0245">
            <text:p>-0.0040245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609648">
            <text:p>-0.004609648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546065">
            <text:p>0.008546065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5250766">
            <text:p>-0.005250766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423537">
            <text:p>-0.01423537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506677">
            <text:p>0.01506677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string">
            <text:p>6.129232E-06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024978">
            <text:p>-0.01024978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9564797">
            <text:p>0.009564797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4162462">
            <text:p>0.004162462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3284365">
            <text:p>0.003284365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284311">
            <text:p>-0.01284311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805408">
            <text:p>0.01805408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9631569">
            <text:p>0.009631569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234316">
            <text:p>0.01234316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06179842">
            <text:p>-0.0006179842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09323793">
            <text:p>-0.0009323793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1831601">
            <text:p>-0.001831601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5733483">
            <text:p>0.005733483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249906">
            <text:p>0.01249906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4305216">
            <text:p>0.0004305216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487045">
            <text:p>0.007487045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656515">
            <text:p>0.01656515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624846">
            <text:p>-0.006624846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417702">
            <text:p>-0.001417702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100997">
            <text:p>0.01100997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397146">
            <text:p>0.03397146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15833">
            <text:p>0.0115833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069877">
            <text:p>-0.007069877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6861">
            <text:p>0.0046861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string">
            <text:p>-7.88675E-05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6530441">
            <text:p>0.006530441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488693">
            <text:p>-0.00488693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8675593">
            <text:p>0.008675593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771236">
            <text:p>0.03771236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440524">
            <text:p>0.01440524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29863">
            <text:p>-0.01029863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804873">
            <text:p>-0.003804873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74417">
            <text:p>0.01074417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622297">
            <text:p>-0.002622297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287392">
            <text:p>0.008287392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322913">
            <text:p>0.01322913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06325465">
            <text:p>-0.0006325465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88145">
            <text:p>-0.01088145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5666927">
            <text:p>-0.0005666927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909211">
            <text:p>0.005909211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004435">
            <text:p>-0.001004435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711833">
            <text:p>-0.009711833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8195752">
            <text:p>0.008195752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3443651">
            <text:p>0.003443651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6550501">
            <text:p>0.006550501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058445">
            <text:p>-0.003058445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721672">
            <text:p>0.005721672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156072">
            <text:p>0.001156072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03018">
            <text:p>0.0103018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3459813">
            <text:p>-0.0003459813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2341704">
            <text:p>0.002341704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33858">
            <text:p>0.01233858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8823548">
            <text:p>-0.008823548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400214">
            <text:p>-0.005400214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470156">
            <text:p>0.006470156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609698">
            <text:p>0.005609698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089344">
            <text:p>-0.008089344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367955">
            <text:p>0.01367955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7365042">
            <text:p>0.007365042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806189">
            <text:p>0.005806189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566642">
            <text:p>-0.001566642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68558">
            <text:p>-0.01068558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583991">
            <text:p>0.001583991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17429">
            <text:p>-0.00417429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93421">
            <text:p>-0.00593421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123301">
            <text:p>-0.009123301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528677">
            <text:p>0.006528677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842442">
            <text:p>-0.003842442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140053">
            <text:p>-0.003140053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795479">
            <text:p>-0.007795479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391539">
            <text:p>0.003391539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386027">
            <text:p>0.01386027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7116621">
            <text:p>-0.007116621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381104">
            <text:p>-0.01381104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494277">
            <text:p>-0.008494277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754375">
            <text:p>0.001754375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841901">
            <text:p>-0.004841901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710441">
            <text:p>-0.006710441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4359995">
            <text:p>0.00435999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5483425">
            <text:p>0.005483425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1905475">
            <text:p>-0.001905475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9679382">
            <text:p>-0.009679382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82078">
            <text:p>0.01682078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3047731">
            <text:p>-0.003047731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317967">
            <text:p>-0.01317967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3669518">
            <text:p>0.003669518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491996">
            <text:p>0.02491996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2081456">
            <text:p>-0.002081456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6448008">
            <text:p>-0.006448008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8119076">
            <text:p>0.008119076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721946">
            <text:p>-0.004721946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1690907">
            <text:p>0.001690907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294475">
            <text:p>-0.006294475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9389629">
            <text:p>-0.009389629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1371994">
            <text:p>0.001371994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016536">
            <text:p>-0.01016536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5911814">
            <text:p>-0.005911814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7939591">
            <text:p>-0.007939591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1278883">
            <text:p>-0.001278883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242251">
            <text:p>0.009242251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210683">
            <text:p>-0.00210683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55819">
            <text:p>-0.00355819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09761991">
            <text:p>-0.0009761991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6964463">
            <text:p>-0.006964463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7396794">
            <text:p>-0.007396794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746382">
            <text:p>-0.005746382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508226">
            <text:p>0.02508226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1194888">
            <text:p>-0.001194888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2671057">
            <text:p>0.002671057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9875366">
            <text:p>0.009875366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8967642">
            <text:p>0.008967642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9118716">
            <text:p>0.009118716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04728714">
            <text:p>0.0004728714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802734">
            <text:p>-0.005802734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3510257">
            <text:p>-0.003510257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121563">
            <text:p>0.005121563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049398">
            <text:p>-0.01049398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4560778">
            <text:p>0.004560778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06541">
            <text:p>0.00506541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05118138">
            <text:p>-0.0005118138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9805952">
            <text:p>-0.009805952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06547">
            <text:p>0.0106547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413385">
            <text:p>0.04413385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1377637">
            <text:p>0.001377637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668345">
            <text:p>0.01668345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232345">
            <text:p>-0.01232345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6694734">
            <text:p>0.006694734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2919927">
            <text:p>0.002919927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728701">
            <text:p>0.01728701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45454">
            <text:p>-0.00145454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198162">
            <text:p>0.0198162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398521">
            <text:p>0.01398521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5373428">
            <text:p>0.005373428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88783">
            <text:p>-0.00888783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3038179">
            <text:p>0.003038179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798353">
            <text:p>0.001798353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353805">
            <text:p>-0.01353805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9289348">
            <text:p>-0.009289348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572446">
            <text:p>0.008572446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1476827">
            <text:p>-0.001476827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892526">
            <text:p>-0.007892526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152962">
            <text:p>-0.01152962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271945">
            <text:p>0.01271945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5876478">
            <text:p>0.005876478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6263564">
            <text:p>-0.006263564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3041125">
            <text:p>-0.003041125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581979">
            <text:p>0.01581979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624065">
            <text:p>0.02624065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566891">
            <text:p>-0.004566891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2788367">
            <text:p>0.002788367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240904">
            <text:p>0.002240904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883613">
            <text:p>0.01883613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250587">
            <text:p>0.02250587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248474">
            <text:p>-0.01248474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626214">
            <text:p>0.005626214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5292946">
            <text:p>-0.005292946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8441979">
            <text:p>-0.008441979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158178">
            <text:p>-0.007158178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028739">
            <text:p>0.004028739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7230678">
            <text:p>-0.007230678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6643161">
            <text:p>-0.006643161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167304">
            <text:p>0.002167304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7349157">
            <text:p>0.007349157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1836727">
            <text:p>0.001836727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185056">
            <text:p>-0.01185056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161109">
            <text:p>-0.01161109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0820455">
            <text:p>0.000820455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034168">
            <text:p>0.007034168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7085341">
            <text:p>0.007085341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280376">
            <text:p>-0.01280376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484342">
            <text:p>0.01484342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02369397">
            <text:p>0.0002369397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8600166">
            <text:p>-0.008600166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6265308">
            <text:p>-0.006265308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581695">
            <text:p>0.01581695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1642878">
            <text:p>0.001642878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379422">
            <text:p>-0.01379422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8911285">
            <text:p>-0.008911285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52481">
            <text:p>0.0152481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9043507">
            <text:p>-0.009043507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4943069">
            <text:p>-0.004943069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339743">
            <text:p>-0.01339743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6385201">
            <text:p>-0.006385201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032375">
            <text:p>0.01032375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423985">
            <text:p>-0.01423985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163697">
            <text:p>-0.005163697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729497">
            <text:p>0.002729497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-0.0002629675">
            <text:p>-0.0002629675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182446">
            <text:p>-0.01182446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5970602">
            <text:p>-0.005970602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204406">
            <text:p>0.01204406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2668605">
            <text:p>-0.002668605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3449711">
            <text:p>-0.003449711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268295">
            <text:p>-0.01268295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3036835">
            <text:p>-0.003036835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1959626">
            <text:p>0.01959626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9406899">
            <text:p>-0.009406899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6583682">
            <text:p>-0.006583682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1504919">
            <text:p>0.001504919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0507167">
            <text:p>0.000507167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7230233">
            <text:p>-0.007230233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724433">
            <text:p>-0.004724433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2140467">
            <text:p>0.002140467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300381">
            <text:p>0.01300381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6114039">
            <text:p>-0.006114039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576235">
            <text:p>-0.005576235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932455">
            <text:p>0.006932455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4160917">
            <text:p>-0.004160917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1016963">
            <text:p>-0.01016963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6339901">
            <text:p>-0.006339901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09290138">
            <text:p>0.0009290138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3557024">
            <text:p>0.003557024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2985124">
            <text:p>0.002985124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121265">
            <text:p>-0.01121265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586463">
            <text:p>-0.00586463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2944556">
            <text:p>0.002944556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039412">
            <text:p>-0.01039412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5506455">
            <text:p>-0.005506455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3810086">
            <text:p>-0.003810086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460078">
            <text:p>0.01460078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933499">
            <text:p>-0.00933499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594935">
            <text:p>-0.003594935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233847">
            <text:p>0.01233847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661612">
            <text:p>0.01661612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629816">
            <text:p>-0.007629816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2596627">
            <text:p>0.002596627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6023248">
            <text:p>-0.006023248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728394">
            <text:p>0.00728394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518365">
            <text:p>-0.01518365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08570261">
            <text:p>0.0008570261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3726153">
            <text:p>0.003726153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98484">
            <text:p>0.0098484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374933">
            <text:p>-0.002374933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9241657">
            <text:p>-0.009241657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1630981">
            <text:p>0.001630981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634864">
            <text:p>0.01634864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245795">
            <text:p>-0.01245795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567616">
            <text:p>-0.01567616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49295">
            <text:p>0.00749295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1166582">
            <text:p>-0.001166582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571246">
            <text:p>-0.003571246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186267">
            <text:p>-0.01186267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2684862">
            <text:p>-0.002684862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3243437">
            <text:p>0.003243437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386772">
            <text:p>-0.01386772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5089823">
            <text:p>-0.005089823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28925">
            <text:p>0.01228925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09721162">
            <text:p>0.0009721162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6683323">
            <text:p>0.006683323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8909809">
            <text:p>-0.008909809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440337">
            <text:p>-0.001440337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288608">
            <text:p>0.02288608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199355">
            <text:p>-0.01199355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8633255">
            <text:p>-0.008633255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105101">
            <text:p>0.02105101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01832303">
            <text:p>0.0001832303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144455">
            <text:p>-0.003144455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702123">
            <text:p>-0.002702123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609725">
            <text:p>0.004609725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1825006">
            <text:p>0.001825006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8191973">
            <text:p>0.0008191973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260157">
            <text:p>-0.005260157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8936782">
            <text:p>0.008936782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3517592">
            <text:p>-0.003517592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086225">
            <text:p>0.01086225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0983578">
            <text:p>0.000983578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7163771">
            <text:p>0.007163771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6693423">
            <text:p>0.006693423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6724811">
            <text:p>0.006724811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1044403">
            <text:p>-0.01044403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4157183">
            <text:p>0.004157183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770133">
            <text:p>0.01770133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425217">
            <text:p>-0.005425217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263759">
            <text:p>-0.01263759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5554904">
            <text:p>0.005554904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2743323">
            <text:p>-0.002743323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393892">
            <text:p>-0.01393892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351534">
            <text:p>-0.01351534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6535418">
            <text:p>0.006535418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3400597">
            <text:p>-0.003400597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2414757">
            <text:p>-0.002414757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8466787">
            <text:p>-0.008466787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4238424">
            <text:p>0.004238424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88407">
            <text:p>0.00388407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465428">
            <text:p>-0.01465428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110199">
            <text:p>-0.006110199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7483911">
            <text:p>0.007483911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string">
            <text:p>-3.97433E-05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177139">
            <text:p>-0.01177139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20155">
            <text:p>0.01220155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517334">
            <text:p>0.00517334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345621">
            <text:p>-0.01345621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234514">
            <text:p>-0.00234514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5402591">
            <text:p>-0.005402591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8866678">
            <text:p>0.008866678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string">
            <text:p>6.554665E-05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4121281">
            <text:p>-0.004121281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1187738">
            <text:p>0.001187738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23838">
            <text:p>0.01023838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3720158">
            <text:p>-0.003720158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037106">
            <text:p>-0.01037106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9173325">
            <text:p>0.009173325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00420652">
            <text:p>0.000420652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4851514">
            <text:p>-0.004851514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221782">
            <text:p>-0.01221782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3993923">
            <text:p>0.003993923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515666">
            <text:p>0.003515666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20987">
            <text:p>-0.0120987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1772774">
            <text:p>0.001772774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103463">
            <text:p>0.00103463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1406006">
            <text:p>0.001406006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947419">
            <text:p>-0.005947419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9167303">
            <text:p>-0.009167303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040645">
            <text:p>0.01040645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5572309">
            <text:p>-0.005572309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824017">
            <text:p>-0.00824017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08303669">
            <text:p>-0.0008303669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128875">
            <text:p>0.01128875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3290964">
            <text:p>0.003290964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687779">
            <text:p>0.000687779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1194">
            <text:p>-0.011194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482203">
            <text:p>-0.00482203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467178">
            <text:p>0.005467178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1382878">
            <text:p>0.001382878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575306">
            <text:p>-0.001575306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4832659">
            <text:p>-0.004832659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1591748">
            <text:p>-0.001591748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7478021">
            <text:p>-0.007478021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5734267">
            <text:p>-0.005734267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2313033">
            <text:p>-0.002313033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5627185">
            <text:p>0.005627185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228081">
            <text:p>-0.01228081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156856">
            <text:p>-0.01156856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353936">
            <text:p>0.00353936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706091">
            <text:p>0.007706091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263261">
            <text:p>-0.01263261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4748524">
            <text:p>0.004748524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3670499">
            <text:p>-0.003670499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6212">
            <text:p>0.026212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329493">
            <text:p>-0.001329493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9411334">
            <text:p>0.009411334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4421775">
            <text:p>-0.004421775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7109651">
            <text:p>-0.007109651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264768">
            <text:p>0.01264768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033201">
            <text:p>-0.01033201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8614797">
            <text:p>0.008614797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4723326">
            <text:p>0.004723326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513068">
            <text:p>-0.004513068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2182224">
            <text:p>0.002182224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135507">
            <text:p>0.02135507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3225282">
            <text:p>0.003225282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3141787">
            <text:p>-0.003141787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1005102">
            <text:p>-0.01005102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4755368">
            <text:p>0.004755368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136912">
            <text:p>0.006136912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0002189144">
            <text:p>0.0002189144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065171">
            <text:p>-0.01065171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599204">
            <text:p>0.00599204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641498">
            <text:p>0.01641498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4506398">
            <text:p>-0.004506398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24194">
            <text:p>-0.00124194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474508">
            <text:p>0.01474508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06516719">
            <text:p>-0.0006516719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3345276">
            <text:p>0.003345276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313504">
            <text:p>-0.01313504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3566008">
            <text:p>0.003566008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70357">
            <text:p>0.0270357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6993843">
            <text:p>-0.006993843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6230746">
            <text:p>-0.006230746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7597465">
            <text:p>0.007597465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2491094">
            <text:p>-0.002491094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7551093">
            <text:p>-0.007551093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432612">
            <text:p>-0.01432612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-0.0005331833">
            <text:p>-0.0005331833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65702">
            <text:p>0.0265702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429676">
            <text:p>-0.003429676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230261">
            <text:p>0.00230261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1988553">
            <text:p>0.001988553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08386751">
            <text:p>0.0008386751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09701906">
            <text:p>-0.009701906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089999">
            <text:p>-0.01089999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string">
            <text:p>-4.042426E-05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2100841">
            <text:p>0.002100841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33467">
            <text:p>-0.0133467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4435438">
            <text:p>-0.004435438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7068959">
            <text:p>0.007068959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08406072">
            <text:p>0.0008406072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3298576">
            <text:p>-0.003298576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6608883">
            <text:p>0.06608883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-0.0009391584">
            <text:p>-0.0009391584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2531326">
            <text:p>-0.002531326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3612233">
            <text:p>0.003612233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164145">
            <text:p>-0.01164145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1826821">
            <text:p>0.001826821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4380429">
            <text:p>-0.004380429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8881639">
            <text:p>-0.008881639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1579759">
            <text:p>0.001579759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593934">
            <text:p>0.004593934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1051574">
            <text:p>-0.001051574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6064963">
            <text:p>-0.006064963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8927139">
            <text:p>-0.008927139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2800708">
            <text:p>-0.002800708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6367003">
            <text:p>0.006367003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09882633">
            <text:p>-0.009882633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7120825">
            <text:p>-0.007120825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0001600848">
            <text:p>0.0001600848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3780771">
            <text:p>-0.003780771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07748538">
            <text:p>-0.0007748538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245388">
            <text:p>-0.01245388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08448632">
            <text:p>-0.0008448632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539307">
            <text:p>0.004539307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5118169">
            <text:p>0.005118169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7668978">
            <text:p>-0.007668978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2352994">
            <text:p>-0.002352994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0002021747">
            <text:p>0.0002021747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143531">
            <text:p>-0.002143531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1798913">
            <text:p>-0.001798913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8165625">
            <text:p>0.008165625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41965">
            <text:p>0.0241965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05834451">
            <text:p>-0.0005834451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5162939">
            <text:p>-0.005162939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541702">
            <text:p>0.002541702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108032">
            <text:p>0.01108032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7951736">
            <text:p>-0.007951736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6179649">
            <text:p>-0.006179649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660416">
            <text:p>0.001660416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04764028">
            <text:p>0.0004764028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1762377">
            <text:p>0.001762377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792813">
            <text:p>-0.004792813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7616357">
            <text:p>0.007616357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08785275">
            <text:p>0.0008785275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1991984">
            <text:p>0.001991984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4893584">
            <text:p>0.004893584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9878622">
            <text:p>0.009878622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1775015">
            <text:p>-0.001775015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4937129">
            <text:p>-0.004937129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243185">
            <text:p>-0.01243185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5502643">
            <text:p>-0.005502643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05045512">
            <text:p>-0.0005045512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194178">
            <text:p>-0.01194178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8736185">
            <text:p>-0.008736185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1465237">
            <text:p>-0.001465237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1501424">
            <text:p>-0.001501424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5522589">
            <text:p>-0.005522589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0001709092">
            <text:p>0.0001709092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090411">
            <text:p>0.001090411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5494953">
            <text:p>-0.005494953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7192403">
            <text:p>-0.007192403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802934">
            <text:p>-0.00802934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889964">
            <text:p>0.01889964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5303675">
            <text:p>0.005303675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5413498">
            <text:p>-0.005413498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229079">
            <text:p>-0.001229079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466589">
            <text:p>0.01466589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2204556">
            <text:p>-0.002204556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2556658">
            <text:p>-0.002556658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4912148">
            <text:p>-0.004912148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7655432">
            <text:p>0.007655432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3931976">
            <text:p>0.003931976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1175835">
            <text:p>-0.001175835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9099227">
            <text:p>-0.009099227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2960175">
            <text:p>-0.002960175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4610644">
            <text:p>0.004610644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409658">
            <text:p>-0.00409658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133005">
            <text:p>-0.01133005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5848226">
            <text:p>0.005848226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2022717">
            <text:p>0.002022717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171158">
            <text:p>-0.01171158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9289356">
            <text:p>0.009289356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2367862">
            <text:p>-0.002367862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4439489">
            <text:p>-0.004439489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006966">
            <text:p>-0.01006966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16983">
            <text:p>-0.0116983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2681765">
            <text:p>-0.002681765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477662">
            <text:p>-0.00477662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1094431">
            <text:p>-0.001094431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2575483">
            <text:p>-0.002575483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3479816">
            <text:p>-0.003479816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5241466">
            <text:p>0.005241466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5176912">
            <text:p>0.05176912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03087913">
            <text:p>-0.0003087913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1130684">
            <text:p>0.01130684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179405">
            <text:p>-0.00179405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2088303">
            <text:p>0.02088303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09829503">
            <text:p>-0.009829503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62064">
            <text:p>0.0062064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5742354">
            <text:p>0.005742354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8632088">
            <text:p>-0.008632088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09225247">
            <text:p>-0.009225247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1011004">
            <text:p>0.01011004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5522482">
            <text:p>0.005522482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4178708">
            <text:p>-0.004178708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7562438">
            <text:p>0.007562438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6330732">
            <text:p>0.006330732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8092228">
            <text:p>0.008092228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1100722">
            <text:p>0.01100722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1769962">
            <text:p>-0.001769962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2228252">
            <text:p>0.002228252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8095868">
            <text:p>0.008095868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5506265">
            <text:p>-0.005506265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2843529">
            <text:p>0.002843529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001713472">
            <text:p>0.001713472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5921138">
            <text:p>0.005921138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3303952">
            <text:p>-0.003303952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175189">
            <text:p>-0.01175189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03357234">
            <text:p>-0.0003357234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6488448">
            <text:p>0.006488448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0009592366">
            <text:p>0.0009592366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4092767">
            <text:p>0.004092767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0.0002288143">
            <text:p>0.0002288143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490384">
            <text:p>0.01490384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002085983">
            <text:p>0.002085983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418533">
            <text:p>0.00418533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03217934">
            <text:p>-0.0003217934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2918996">
            <text:p>-0.002918996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4708967">
            <text:p>-0.004708967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02812878">
            <text:p>-0.0002812878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08350587">
            <text:p>-0.0008350587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479039">
            <text:p>0.01479039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3283815">
            <text:p>0.03283815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4173914">
            <text:p>-0.004173914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1981234">
            <text:p>0.001981234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7576083">
            <text:p>0.007576083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4894187">
            <text:p>-0.004894187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3354424">
            <text:p>0.003354424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547008">
            <text:p>0.01547008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3557642">
            <text:p>0.003557642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6106935">
            <text:p>0.006106935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003123717">
            <text:p>0.003123717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1621701">
            <text:p>-0.001621701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8325651">
            <text:p>0.008325651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484327">
            <text:p>0.01484327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7845066">
            <text:p>0.007845066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299419">
            <text:p>0.02299419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1057414">
            <text:p>0.01057414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6376033">
            <text:p>-0.006376033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7037582">
            <text:p>-0.007037582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4985547">
            <text:p>0.004985547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001117333">
            <text:p>0.001117333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7027182">
            <text:p>0.007027182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03490708">
            <text:p>-0.0003490708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5639928">
            <text:p>0.005639928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4186064">
            <text:p>0.004186064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05630096">
            <text:p>-0.0005630096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3956664">
            <text:p>-0.003956664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863098">
            <text:p>0.01863098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1651099">
            <text:p>-0.001651099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00380981">
            <text:p>0.00380981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2329553">
            <text:p>-0.002329553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00164382">
            <text:p>0.00164382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1757512">
            <text:p>-0.001757512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4678685">
            <text:p>-0.004678685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001722092">
            <text:p>0.001722092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607846">
            <text:p>0.02607846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605785">
            <text:p>0.00605785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4678835">
            <text:p>-0.004678835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5516776">
            <text:p>0.005516776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1060326">
            <text:p>0.01060326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2052953">
            <text:p>-0.002052953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2479877">
            <text:p>-0.002479877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00177967">
            <text:p>0.00177967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239197">
            <text:p>-0.00239197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587591">
            <text:p>0.01587591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5978905">
            <text:p>0.005978905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4471159">
            <text:p>0.04471159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1515737">
            <text:p>0.01515737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5611081">
            <text:p>0.005611081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0002135185">
            <text:p>0.0002135185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7927381">
            <text:p>0.007927381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5946609">
            <text:p>0.005946609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2124859">
            <text:p>0.02124859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4691525">
            <text:p>-0.004691525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217458">
            <text:p>0.0217458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1177636">
            <text:p>0.01177636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7548335">
            <text:p>0.007548335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5901282">
            <text:p>0.005901282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7224835">
            <text:p>0.007224835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001942999">
            <text:p>0.001942999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156458">
            <text:p>-0.00156458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04391463">
            <text:p>-0.004391463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1447484">
            <text:p>0.01447484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9377464">
            <text:p>0.009377464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1128533">
            <text:p>0.01128533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04565271">
            <text:p>-0.004565271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2690398">
            <text:p>0.02690398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1300759">
            <text:p>0.01300759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1971122">
            <text:p>-0.001971122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0001241563">
            <text:p>0.0001241563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08205969">
            <text:p>0.008205969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2738195">
            <text:p>0.02738195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002684131">
            <text:p>0.002684131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00387942">
            <text:p>0.00387942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1440637">
            <text:p>0.01440637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125438">
            <text:p>0.0125438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002523748">
            <text:p>0.002523748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06579873">
            <text:p>-0.006579873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005359987">
            <text:p>0.005359987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001780972">
            <text:p>0.001780972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003597366">
            <text:p>0.003597366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216921">
            <text:p>0.0216921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002485511">
            <text:p>0.002485511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2133309">
            <text:p>0.02133309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002330283">
            <text:p>0.002330283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1617555">
            <text:p>0.01617555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2211875">
            <text:p>0.02211875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1121324">
            <text:p>0.01121324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2759467">
            <text:p>0.02759467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001751051">
            <text:p>0.001751051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1336546">
            <text:p>0.01336546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008791389">
            <text:p>0.008791389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002347009">
            <text:p>0.002347009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01888696">
            <text:p>-0.001888696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170865">
            <text:p>0.0170865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1407041">
            <text:p>0.01407041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002766703">
            <text:p>0.002766703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00890589">
            <text:p>0.00890589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2133433">
            <text:p>0.02133433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004408198">
            <text:p>0.004408198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2995505">
            <text:p>0.02995505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2429309">
            <text:p>0.02429309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1605177">
            <text:p>0.01605177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1331032">
            <text:p>0.01331032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009543835">
            <text:p>0.009543835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001014437">
            <text:p>0.001014437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18609">
            <text:p>0.018609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2667709">
            <text:p>0.02667709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01123667">
            <text:p>0.01123667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1752154">
            <text:p>0.01752154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158745">
            <text:p>0.0158745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1507185">
            <text:p>0.01507185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01527785">
            <text:p>0.01527785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1595202">
            <text:p>0.01595202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1754148">
            <text:p>0.01754148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0152425">
            <text:p>0.0152425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009072698">
            <text:p>0.009072698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006222725">
            <text:p>0.006222725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2048448">
            <text:p>0.02048448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6875482">
            <text:p>0.06875482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2624469">
            <text:p>0.02624469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2081433">
            <text:p>0.02081433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2200821">
            <text:p>0.02200821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01897872">
            <text:p>0.01897872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2274182">
            <text:p>0.02274182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2441681">
            <text:p>0.02441681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01709694">
            <text:p>0.01709694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01949139">
            <text:p>0.01949139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02172484">
            <text:p>0.02172484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01754684">
            <text:p>0.01754684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2581764">
            <text:p>0.02581764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4956612">
            <text:p>0.04956612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2737392">
            <text:p>0.02737392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4184192">
            <text:p>0.04184192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01778706">
            <text:p>0.01778706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02194192">
            <text:p>0.02194192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2570323">
            <text:p>0.02570323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01645918">
            <text:p>0.01645918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346866">
            <text:p>0.0346866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0222373">
            <text:p>0.0222373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02258013">
            <text:p>0.02258013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5260497">
            <text:p>0.05260497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02754134">
            <text:p>0.02754134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3660908">
            <text:p>0.03660908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354355">
            <text:p>0.0354355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02227669">
            <text:p>0.02227669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4472721">
            <text:p>0.04472721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3998938">
            <text:p>0.03998938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03189284">
            <text:p>0.03189284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3905423">
            <text:p>0.03905423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02964048">
            <text:p>0.02964048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03039283">
            <text:p>0.03039283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4276563">
            <text:p>0.04276563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02763229">
            <text:p>0.02763229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03475603">
            <text:p>0.03475603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03219172">
            <text:p>0.03219172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03030762">
            <text:p>0.03030762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4373917">
            <text:p>0.04373917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4078071">
            <text:p>0.04078071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4218867">
            <text:p>0.04218867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03232199">
            <text:p>0.03232199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03769338">
            <text:p>0.03769338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04043366">
            <text:p>0.04043366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4969282">
            <text:p>0.04969282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5557672">
            <text:p>0.05557672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5367068">
            <text:p>0.05367068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04611141">
            <text:p>0.04611141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04393306">
            <text:p>0.04393306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03624805">
            <text:p>0.03624805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04032812">
            <text:p>0.04032812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04702707">
            <text:p>0.04702707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05180695">
            <text:p>0.05180695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716201">
            <text:p>0.0716201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05212836">
            <text:p>0.05212836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5630643">
            <text:p>0.05630643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05514488">
            <text:p>0.05514488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5921713">
            <text:p>0.05921713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05302842">
            <text:p>0.05302842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6170936">
            <text:p>0.06170936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05831618">
            <text:p>0.05831618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6422468">
            <text:p>0.06422468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05046029">
            <text:p>0.05046029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9823534">
            <text:p>0.09823534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6725574">
            <text:p>0.06725574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9530335">
            <text:p>0.09530335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6829609">
            <text:p>0.06829609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1010179">
            <text:p>0.1010179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06885089">
            <text:p>0.06885089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7567776">
            <text:p>0.07567776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06266195">
            <text:p>0.06266195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8209015">
            <text:p>0.08209015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7694901">
            <text:p>0.07694901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06785487">
            <text:p>0.06785487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7762635">
            <text:p>0.07762635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07759663">
            <text:p>0.07759663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07903942">
            <text:p>0.07903942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07883053">
            <text:p>0.07883053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07356296">
            <text:p>0.07356296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928007">
            <text:p>0.0928007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07981444">
            <text:p>0.07981444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08022356">
            <text:p>0.08022356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08828088">
            <text:p>0.08828088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08916038">
            <text:p>0.08916038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106747">
            <text:p>0.106747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09205353">
            <text:p>0.09205353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0924451">
            <text:p>0.0924451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08969247">
            <text:p>0.08969247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09889517">
            <text:p>0.09889517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1019086">
            <text:p>0.1019086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1001224">
            <text:p>0.1001224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1143663">
            <text:p>0.1143663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103309">
            <text:p>0.103309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110846">
            <text:p>0.110846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1244345">
            <text:p>0.1244345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1116063">
            <text:p>0.1116063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1036622">
            <text:p>0.1036622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1197035">
            <text:p>0.1197035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120263">
            <text:p>0.120263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1138737">
            <text:p>0.1138737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1315501">
            <text:p>0.1315501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1227743">
            <text:p>0.1227743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1194151">
            <text:p>0.1194151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1377578">
            <text:p>0.1377578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1266531">
            <text:p>0.1266531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139268">
            <text:p>0.139268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1220868">
            <text:p>0.1220868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1386741">
            <text:p>0.1386741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1446245">
            <text:p>0.1446245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1319821">
            <text:p>0.1319821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1442303">
            <text:p>0.1442303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1397946">
            <text:p>0.1397946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1418298">
            <text:p>0.1418298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1510649">
            <text:p>0.1510649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1499664">
            <text:p>0.1499664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1531882">
            <text:p>0.1531882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1630003">
            <text:p>0.1630003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1508212">
            <text:p>0.1508212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164114">
            <text:p>0.164114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1656954">
            <text:p>0.1656954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1693392">
            <text:p>0.1693392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156625">
            <text:p>0.156625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1683519">
            <text:p>0.1683519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1730694">
            <text:p>0.1730694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1760085">
            <text:p>0.1760085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1637425">
            <text:p>0.1637425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1781798">
            <text:p>0.1781798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186081">
            <text:p>0.186081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1893728">
            <text:p>0.1893728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1858742">
            <text:p>0.1858742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1982651">
            <text:p>0.1982651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2020055">
            <text:p>0.2020055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2052002">
            <text:p>0.2052002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1886373">
            <text:p>0.1886373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2017246">
            <text:p>0.2017246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2038667">
            <text:p>0.2038667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203299">
            <text:p>0.203299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2062585">
            <text:p>0.2062585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2143902">
            <text:p>0.2143902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2056999">
            <text:p>0.2056999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2151614">
            <text:p>0.2151614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2192383">
            <text:p>0.2192383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2213948">
            <text:p>0.2213948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2110687">
            <text:p>0.2110687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2221961">
            <text:p>0.2221961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2254865">
            <text:p>0.2254865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2230329">
            <text:p>0.2230329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2160848">
            <text:p>0.2160848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2232966">
            <text:p>0.2232966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2399359">
            <text:p>0.2399359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2265946">
            <text:p>0.2265946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2432089">
            <text:p>0.2432089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2367187">
            <text:p>0.2367187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2482379">
            <text:p>0.2482379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2393122">
            <text:p>0.2393122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236947">
            <text:p>0.236947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2458792">
            <text:p>0.2458792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2447886">
            <text:p>0.2447886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2582968">
            <text:p>0.2582968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2533945">
            <text:p>0.2533945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2593369">
            <text:p>0.2593369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2726185">
            <text:p>0.2726185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268813">
            <text:p>0.268813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2654346">
            <text:p>0.2654346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2739499">
            <text:p>0.2739499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2590154">
            <text:p>0.2590154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2724188">
            <text:p>0.2724188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26858">
            <text:p>0.26858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2739857">
            <text:p>0.2739857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2866767">
            <text:p>0.2866767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2844371">
            <text:p>0.2844371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2818754">
            <text:p>0.2818754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2863617">
            <text:p>0.2863617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281983">
            <text:p>0.281983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2891666">
            <text:p>0.2891666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2794412">
            <text:p>0.2794412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2951367">
            <text:p>0.2951367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283602">
            <text:p>0.283602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3096507">
            <text:p>0.3096507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2924036">
            <text:p>0.2924036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2888151">
            <text:p>0.2888151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3029688">
            <text:p>0.3029688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2955055">
            <text:p>0.2955055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3145086">
            <text:p>0.3145086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3012014">
            <text:p>0.3012014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3052517">
            <text:p>0.3052517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3211332">
            <text:p>0.3211332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3046855">
            <text:p>0.3046855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3079498">
            <text:p>0.3079498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3071749">
            <text:p>0.3071749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3103698">
            <text:p>0.3103698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3176141">
            <text:p>0.3176141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3346756">
            <text:p>0.3346756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309682">
            <text:p>0.309682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3289699">
            <text:p>0.3289699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3205261">
            <text:p>0.3205261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3163366">
            <text:p>0.3163366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3095001">
            <text:p>0.3095001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3240074">
            <text:p>0.3240074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3200602">
            <text:p>0.3200602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3443236">
            <text:p>0.3443236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3289373">
            <text:p>0.3289373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3246335">
            <text:p>0.3246335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3268023">
            <text:p>0.3268023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3221104">
            <text:p>0.3221104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324771">
            <text:p>0.324771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3235281">
            <text:p>0.3235281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3299764">
            <text:p>0.3299764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3311978">
            <text:p>0.3311978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3346927">
            <text:p>0.3346927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3359358">
            <text:p>0.3359358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3374151">
            <text:p>0.3374151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3439845">
            <text:p>0.3439845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3427592">
            <text:p>0.3427592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3315115">
            <text:p>0.3315115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3392543">
            <text:p>0.3392543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3331164">
            <text:p>0.3331164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3500721">
            <text:p>0.3500721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3519016">
            <text:p>0.3519016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3439318">
            <text:p>0.3439318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3425712">
            <text:p>0.3425712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3399117">
            <text:p>0.3399117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3399569">
            <text:p>0.3399569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3499795">
            <text:p>0.3499795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3439711">
            <text:p>0.3439711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3374095">
            <text:p>0.3374095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3617193">
            <text:p>0.3617193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3456212">
            <text:p>0.3456212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33535">
            <text:p>0.33535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3477147">
            <text:p>0.3477147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3437535">
            <text:p>0.3437535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3463401">
            <text:p>0.3463401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3347985">
            <text:p>0.3347985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339274">
            <text:p>0.339274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3435104">
            <text:p>0.3435104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3558735">
            <text:p>0.3558735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3440185">
            <text:p>0.3440185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3480576">
            <text:p>0.3480576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3490461">
            <text:p>0.3490461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3545762">
            <text:p>0.3545762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3432676">
            <text:p>0.3432676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3481572">
            <text:p>0.3481572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3480938">
            <text:p>0.3480938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3487051">
            <text:p>0.3487051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3537709">
            <text:p>0.3537709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3357409">
            <text:p>0.3357409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3478896">
            <text:p>0.3478896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3564552">
            <text:p>0.3564552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3449714">
            <text:p>0.3449714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350715">
            <text:p>0.350715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3494173">
            <text:p>0.3494173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3454472">
            <text:p>0.3454472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3385446">
            <text:p>0.3385446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3528403">
            <text:p>0.3528403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3720221">
            <text:p>0.3720221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3389845">
            <text:p>0.3389845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3407142">
            <text:p>0.3407142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3511768">
            <text:p>0.3511768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3435827">
            <text:p>0.3435827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3418494">
            <text:p>0.3418494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3493253">
            <text:p>0.3493253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3409786">
            <text:p>0.3409786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3555097">
            <text:p>0.3555097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3401523">
            <text:p>0.340152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3334289">
            <text:p>0.3334289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3531068">
            <text:p>0.3531068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3583058">
            <text:p>0.3583058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3376117">
            <text:p>0.3376117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3504809">
            <text:p>0.3504809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3443041">
            <text:p>0.3443041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3442091">
            <text:p>0.3442091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3421937">
            <text:p>0.3421937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3286324">
            <text:p>0.3286324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3338174">
            <text:p>0.3338174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3329476">
            <text:p>0.3329476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3414739">
            <text:p>0.3414739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3525247">
            <text:p>0.3525247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3307881">
            <text:p>0.3307881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3402457">
            <text:p>0.3402457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3531217">
            <text:p>0.3531217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3267575">
            <text:p>0.3267575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3285349">
            <text:p>0.3285349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3345877">
            <text:p>0.3345877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3287857">
            <text:p>0.3287857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3218455">
            <text:p>0.3218455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3431746">
            <text:p>0.3431746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3404115">
            <text:p>0.3404115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3312537">
            <text:p>0.3312537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3382661">
            <text:p>0.3382661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3621005">
            <text:p>0.3621005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3299034">
            <text:p>0.3299034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3300842">
            <text:p>0.3300842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3378148">
            <text:p>0.3378148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3313644">
            <text:p>0.3313644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3182037">
            <text:p>0.3182037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3234442">
            <text:p>0.3234442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3181365">
            <text:p>0.3181365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3313331">
            <text:p>0.3313331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3253151">
            <text:p>0.3253151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336949">
            <text:p>0.336949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3240206">
            <text:p>0.3240206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3180111">
            <text:p>0.3180111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3219675">
            <text:p>0.3219675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3257165">
            <text:p>0.3257165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3113405">
            <text:p>0.3113405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3393778">
            <text:p>0.3393778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3225116">
            <text:p>0.3225116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3146203">
            <text:p>0.3146203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318746">
            <text:p>0.318746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3359128">
            <text:p>0.3359128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3243702">
            <text:p>0.3243702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3170618">
            <text:p>0.3170618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3099791">
            <text:p>0.3099791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3265088">
            <text:p>0.3265088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3129399">
            <text:p>0.3129399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3163573">
            <text:p>0.3163573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308382">
            <text:p>0.308382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3316823">
            <text:p>0.3316823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3351991">
            <text:p>0.3351991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2994261">
            <text:p>0.2994261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3024616">
            <text:p>0.3024616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3147694">
            <text:p>0.3147694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3135619">
            <text:p>0.3135619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2885158">
            <text:p>0.2885158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3062093">
            <text:p>0.3062093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3097371">
            <text:p>0.3097371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3214189">
            <text:p>0.3214189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2853788">
            <text:p>0.2853788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3000746">
            <text:p>0.3000746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3008529">
            <text:p>0.3008529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3046188">
            <text:p>0.3046188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2968049">
            <text:p>0.2968049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2837996">
            <text:p>0.2837996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2810002">
            <text:p>0.2810002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2873545">
            <text:p>0.2873545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2891736">
            <text:p>0.2891736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2736305">
            <text:p>0.2736305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2840281">
            <text:p>0.2840281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2985068">
            <text:p>0.2985068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2980301">
            <text:p>0.2980301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281689">
            <text:p>0.281689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2761353">
            <text:p>0.2761353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2827321">
            <text:p>0.2827321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2727763">
            <text:p>0.2727763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2792266">
            <text:p>0.2792266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2790478">
            <text:p>0.2790478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2764824">
            <text:p>0.2764824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264162">
            <text:p>0.264162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2789303">
            <text:p>0.2789303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2672387">
            <text:p>0.2672387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2903155">
            <text:p>0.2903155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2646067">
            <text:p>0.2646067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2759162">
            <text:p>0.2759162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2621454">
            <text:p>0.2621454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2590077">
            <text:p>0.2590077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2554805">
            <text:p>0.2554805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2609184">
            <text:p>0.2609184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2660242">
            <text:p>0.2660242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252505">
            <text:p>0.252505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2519355">
            <text:p>0.2519355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2651205">
            <text:p>0.2651205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2555984">
            <text:p>0.2555984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2546661">
            <text:p>0.2546661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2650843">
            <text:p>0.2650843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2482025">
            <text:p>0.2482025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2554732">
            <text:p>0.2554732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2464386">
            <text:p>0.2464386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2481526">
            <text:p>0.2481526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2440713">
            <text:p>0.2440713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2432449">
            <text:p>0.2432449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2394816">
            <text:p>0.2394816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2484738">
            <text:p>0.2484738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2459484">
            <text:p>0.2459484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2434264">
            <text:p>0.2434264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2443344">
            <text:p>0.2443344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247853">
            <text:p>0.247853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235087">
            <text:p>0.235087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259147">
            <text:p>0.259147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2332283">
            <text:p>0.2332283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2482866">
            <text:p>0.2482866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2298352">
            <text:p>0.2298352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2283954">
            <text:p>0.2283954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227537">
            <text:p>0.227537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2285147">
            <text:p>0.2285147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2355491">
            <text:p>0.2355491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2324007">
            <text:p>0.2324007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2209078">
            <text:p>0.2209078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2327023">
            <text:p>0.2327023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2359868">
            <text:p>0.2359868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2220312">
            <text:p>0.2220312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2389089">
            <text:p>0.2389089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2151411">
            <text:p>0.2151411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2190242">
            <text:p>0.2190242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2312977">
            <text:p>0.2312977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2216901">
            <text:p>0.2216901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2256595">
            <text:p>0.2256595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2101492">
            <text:p>0.2101492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2236162">
            <text:p>0.2236162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2086862">
            <text:p>0.2086862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2124946">
            <text:p>0.2124946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2143459">
            <text:p>0.2143459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2097317">
            <text:p>0.2097317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2278274">
            <text:p>0.2278274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2078803">
            <text:p>0.2078803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2060859">
            <text:p>0.2060859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2069726">
            <text:p>0.2069726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2072972">
            <text:p>0.2072972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2178303">
            <text:p>0.2178303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2349478">
            <text:p>0.2349478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1977823">
            <text:p>0.1977823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203624">
            <text:p>0.203624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2081536">
            <text:p>0.2081536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2002169">
            <text:p>0.2002169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2050458">
            <text:p>0.2050458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1970213">
            <text:p>0.1970213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19683">
            <text:p>0.19683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1984274">
            <text:p>0.1984274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1924319">
            <text:p>0.1924319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1909821">
            <text:p>0.1909821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2025834">
            <text:p>0.2025834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2103089">
            <text:p>0.2103089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1985957">
            <text:p>0.1985957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1932391">
            <text:p>0.1932391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1920985">
            <text:p>0.1920985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202704">
            <text:p>0.202704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1953075">
            <text:p>0.1953075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1909159">
            <text:p>0.1909159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1893165">
            <text:p>0.1893165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1987716">
            <text:p>0.1987716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2020005">
            <text:p>0.2020005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1919328">
            <text:p>0.1919328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1983521">
            <text:p>0.1983521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1836585">
            <text:p>0.1836585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1794745">
            <text:p>0.1794745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1828046">
            <text:p>0.1828046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1843567">
            <text:p>0.1843567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1863705">
            <text:p>0.1863705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187619">
            <text:p>0.187619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1820296">
            <text:p>0.1820296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1837348">
            <text:p>0.1837348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1775447">
            <text:p>0.1775447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1736038">
            <text:p>0.1736038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1819444">
            <text:p>0.1819444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1715592">
            <text:p>0.1715592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1753899">
            <text:p>0.1753899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2054981">
            <text:p>0.2054981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1771609">
            <text:p>0.1771609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1706651">
            <text:p>0.1706651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1756806">
            <text:p>0.1756806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1706618">
            <text:p>0.1706618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1676247">
            <text:p>0.1676247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1793682">
            <text:p>0.1793682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1633366">
            <text:p>0.1633366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179241">
            <text:p>0.17924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173807">
            <text:p>0.173807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1675413">
            <text:p>0.1675413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1767744">
            <text:p>0.1767744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1773372">
            <text:p>0.1773372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1693998">
            <text:p>0.1693998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168193">
            <text:p>0.168193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1659358">
            <text:p>0.1659358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1558097">
            <text:p>0.1558097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1707733">
            <text:p>0.1707733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1713465">
            <text:p>0.1713465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1612417">
            <text:p>0.1612417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1858825">
            <text:p>0.1858825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1547989">
            <text:p>0.1547989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1637807">
            <text:p>0.1637807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1678114">
            <text:p>0.1678114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1524857">
            <text:p>0.1524857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1558837">
            <text:p>0.1558837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1605742">
            <text:p>0.1605742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1637283">
            <text:p>0.1637283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1629339">
            <text:p>0.1629339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1709299">
            <text:p>0.1709299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1654325">
            <text:p>0.1654325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1656227">
            <text:p>0.1656227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1530748">
            <text:p>0.1530748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1545113">
            <text:p>0.1545113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1665487">
            <text:p>0.1665487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1589328">
            <text:p>0.1589328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1639007">
            <text:p>0.1639007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1476413">
            <text:p>0.1476413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1561077">
            <text:p>0.1561077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1617147">
            <text:p>0.1617147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1638415">
            <text:p>0.1638415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1545884">
            <text:p>0.1545884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1560496">
            <text:p>0.1560496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1560792">
            <text:p>0.1560792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1643294">
            <text:p>0.1643294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1528439">
            <text:p>0.1528439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1474353">
            <text:p>0.1474353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1444933">
            <text:p>0.1444933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1495927">
            <text:p>0.1495927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1451446">
            <text:p>0.1451446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1552177">
            <text:p>0.1552177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1423566">
            <text:p>0.1423566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1454153">
            <text:p>0.1454153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143171">
            <text:p>0.143171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1381096">
            <text:p>0.1381096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1526029">
            <text:p>0.1526029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1387271">
            <text:p>0.1387271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1457343">
            <text:p>0.1457343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1404935">
            <text:p>0.1404935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1447065">
            <text:p>0.1447065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1349507">
            <text:p>0.1349507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181908">
            <text:p>0.181908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1500877">
            <text:p>0.1500877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1374503">
            <text:p>0.1374503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1377065">
            <text:p>0.1377065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1483427">
            <text:p>0.1483427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1487444">
            <text:p>0.1487444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1359666">
            <text:p>0.1359666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1346502">
            <text:p>0.1346502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1457825">
            <text:p>0.1457825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1372298">
            <text:p>0.1372298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1519474">
            <text:p>0.1519474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1361011">
            <text:p>0.1361011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1506477">
            <text:p>0.1506477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137814">
            <text:p>0.137814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1413264">
            <text:p>0.1413264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1293096">
            <text:p>0.1293096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1310393">
            <text:p>0.1310393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153736">
            <text:p>0.153736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1302631">
            <text:p>0.1302631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1273181">
            <text:p>0.1273181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1260343">
            <text:p>0.1260343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1314571">
            <text:p>0.1314571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1273452">
            <text:p>0.1273452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1245065">
            <text:p>0.1245065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1223834">
            <text:p>0.1223834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1193628">
            <text:p>0.1193628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1375943">
            <text:p>0.1375943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1247971">
            <text:p>0.1247971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1269683">
            <text:p>0.1269683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1285141">
            <text:p>0.1285141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1249543">
            <text:p>0.1249543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1248484">
            <text:p>0.1248484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1272459">
            <text:p>0.1272459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1312412">
            <text:p>0.1312412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118936">
            <text:p>0.118936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1233957">
            <text:p>0.1233957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1291421">
            <text:p>0.1291421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1244096">
            <text:p>0.1244096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1212698">
            <text:p>0.1212698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1279013">
            <text:p>0.1279013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1373266">
            <text:p>0.1373266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1490556">
            <text:p>0.1490556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1244859">
            <text:p>0.1244859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135523">
            <text:p>0.135523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1162242">
            <text:p>0.1162242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1224635">
            <text:p>0.1224635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1206548">
            <text:p>0.1206548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1310744">
            <text:p>0.1310744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1227237">
            <text:p>0.1227237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1260166">
            <text:p>0.1260166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1201724">
            <text:p>0.1201724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1350445">
            <text:p>0.1350445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1182256">
            <text:p>0.1182256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1242324">
            <text:p>0.1242324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1193697">
            <text:p>0.1193697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1150264">
            <text:p>0.1150264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1198791">
            <text:p>0.1198791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1167522">
            <text:p>0.1167522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1318655">
            <text:p>0.1318655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1181147">
            <text:p>0.1181147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1117056">
            <text:p>0.1117056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1387641">
            <text:p>0.1387641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1230898">
            <text:p>0.1230898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1252119">
            <text:p>0.1252119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1165097">
            <text:p>0.1165097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1126756">
            <text:p>0.1126756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1248445">
            <text:p>0.1248445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1187498">
            <text:p>0.1187498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1141409">
            <text:p>0.1141409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1222036">
            <text:p>0.1222036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1093017">
            <text:p>0.1093017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1127401">
            <text:p>0.1127401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1250577">
            <text:p>0.1250577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1254732">
            <text:p>0.1254732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1162032">
            <text:p>0.1162032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1003008">
            <text:p>0.1003008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119541">
            <text:p>0.119541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1048712">
            <text:p>0.1048712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1097725">
            <text:p>0.1097725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1165909">
            <text:p>0.1165909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1176588">
            <text:p>0.1176588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1089261">
            <text:p>0.1089261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1173715">
            <text:p>0.1173715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1068023">
            <text:p>0.1068023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1030167">
            <text:p>0.1030167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1312282">
            <text:p>0.1312282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1011259">
            <text:p>0.1011259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1058017">
            <text:p>0.1058017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9646423">
            <text:p>0.09646423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1076098">
            <text:p>0.1076098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9611667">
            <text:p>0.09611667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1082748">
            <text:p>0.1082748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1072909">
            <text:p>0.1072909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1044015">
            <text:p>0.1044015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101842">
            <text:p>0.10184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1050772">
            <text:p>0.1050772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1059811">
            <text:p>0.1059811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9979254">
            <text:p>0.09979254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1078034">
            <text:p>0.1078034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111771">
            <text:p>0.111771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9425128">
            <text:p>0.09425128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1058682">
            <text:p>0.1058682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108239">
            <text:p>0.108239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9347551">
            <text:p>0.09347551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9631633">
            <text:p>0.09631633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857649">
            <text:p>0.0857649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9832054">
            <text:p>0.09832054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1021976">
            <text:p>0.1021976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1066843">
            <text:p>0.1066843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1062943">
            <text:p>0.1062943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9949615">
            <text:p>0.09949615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9803492">
            <text:p>0.09803492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9493791">
            <text:p>0.09493791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8846436">
            <text:p>0.08846436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9089943">
            <text:p>0.09089943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9193688">
            <text:p>0.09193688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8876695">
            <text:p>0.08876695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1111286">
            <text:p>0.1111286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9569614">
            <text:p>0.09569614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9039786">
            <text:p>0.09039786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9457894">
            <text:p>0.09457894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1069506">
            <text:p>0.1069506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1026007">
            <text:p>0.1026007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9173186">
            <text:p>0.09173186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8645954">
            <text:p>0.08645954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855174">
            <text:p>0.0855174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936405">
            <text:p>0.0936405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8864736">
            <text:p>0.08864736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920909">
            <text:p>0.0920909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8604278">
            <text:p>0.08604278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1000965">
            <text:p>0.1000965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1015332">
            <text:p>0.1015332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9246612">
            <text:p>0.09246612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1024977">
            <text:p>0.1024977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847678">
            <text:p>0.0847678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9806605">
            <text:p>0.09806605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8363395">
            <text:p>0.08363395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9049249">
            <text:p>0.09049249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8338641">
            <text:p>0.08338641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8363562">
            <text:p>0.08363562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8103675">
            <text:p>0.08103675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1054825">
            <text:p>0.1054825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9664678">
            <text:p>0.09664678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8986904">
            <text:p>0.08986904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8841947">
            <text:p>0.08841947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9105425">
            <text:p>0.09105425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1055605">
            <text:p>0.1055605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9436851">
            <text:p>0.09436851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7790941">
            <text:p>0.07790941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8413082">
            <text:p>0.08413082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8300919">
            <text:p>0.08300919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7974246">
            <text:p>0.07974246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8898142">
            <text:p>0.08898142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9862926">
            <text:p>0.09862926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8632196">
            <text:p>0.08632196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8544914">
            <text:p>0.08544914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7295974">
            <text:p>0.07295974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7609507">
            <text:p>0.07609507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7390761">
            <text:p>0.07390761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9503756">
            <text:p>0.09503756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8487485">
            <text:p>0.08487485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8391044">
            <text:p>0.08391044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7941659">
            <text:p>0.07941659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7838305">
            <text:p>0.07838305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8062309">
            <text:p>0.08062309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7556508">
            <text:p>0.07556508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7586911">
            <text:p>0.07586911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9430302">
            <text:p>0.09430302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8056398">
            <text:p>0.08056398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7769383">
            <text:p>0.07769383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7130416">
            <text:p>0.07130416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7942762">
            <text:p>0.07942762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7236754">
            <text:p>0.07236754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8318277">
            <text:p>0.08318277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7887594">
            <text:p>0.07887594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7503977">
            <text:p>0.07503977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7131678">
            <text:p>0.07131678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6510605">
            <text:p>0.06510605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7688145">
            <text:p>0.07688145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7711055">
            <text:p>0.07711055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7612538">
            <text:p>0.07612538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7474717">
            <text:p>0.07474717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7611952">
            <text:p>0.07611952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6795978">
            <text:p>0.06795978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808379">
            <text:p>0.0808379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8181291">
            <text:p>0.08181291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6959722">
            <text:p>0.06959722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6383051">
            <text:p>0.06383051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8149973">
            <text:p>0.08149973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6602331">
            <text:p>0.06602331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7285281">
            <text:p>0.07285281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6701825">
            <text:p>0.06701825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7099241">
            <text:p>0.07099241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7514606">
            <text:p>0.07514606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6452528">
            <text:p>0.06452528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5930756">
            <text:p>0.05930756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6349702">
            <text:p>0.06349702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6126161">
            <text:p>0.06126161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5663139">
            <text:p>0.05663139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6307243">
            <text:p>0.06307243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8293452">
            <text:p>0.08293452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6057861">
            <text:p>0.06057861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6003851">
            <text:p>0.06003851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5974574">
            <text:p>0.05974574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7198079">
            <text:p>0.07198079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6069062">
            <text:p>0.06069062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6730507">
            <text:p>0.06730507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6531238">
            <text:p>0.06531238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898782">
            <text:p>0.0898782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6725629">
            <text:p>0.06725629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6769677">
            <text:p>0.06769677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597773">
            <text:p>0.0597773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7263488">
            <text:p>0.07263488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5992205">
            <text:p>0.05992205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6296416">
            <text:p>0.06296416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5906885">
            <text:p>0.05906885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6067816">
            <text:p>0.06067816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6731842">
            <text:p>0.06731842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5579318">
            <text:p>0.05579318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744246">
            <text:p>0.0744246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5602498">
            <text:p>0.05602498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5065676">
            <text:p>0.05065676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5356603">
            <text:p>0.05356603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604823">
            <text:p>0.0604823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5693359">
            <text:p>0.05693359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6761154">
            <text:p>0.06761154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5296145">
            <text:p>0.05296145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5826084">
            <text:p>0.05826084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6617824">
            <text:p>0.06617824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5639357">
            <text:p>0.05639357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8147339">
            <text:p>0.08147339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6430231">
            <text:p>0.06430231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5514676">
            <text:p>0.05514676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6087238">
            <text:p>0.06087238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6461056">
            <text:p>0.06461056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6390789">
            <text:p>0.06390789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5310039">
            <text:p>0.05310039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5829233">
            <text:p>0.05829233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7136711">
            <text:p>0.07136711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4869704">
            <text:p>0.04869704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6140764">
            <text:p>0.06140764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444985">
            <text:p>0.0444985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6749692">
            <text:p>0.06749692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5020801">
            <text:p>0.05020801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6057137">
            <text:p>0.06057137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5556415">
            <text:p>0.05556415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4913877">
            <text:p>0.04913877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560193">
            <text:p>0.0560193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4491439">
            <text:p>0.04491439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7278706">
            <text:p>0.07278706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5856536">
            <text:p>0.05856536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5554592">
            <text:p>0.05554592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4491635">
            <text:p>0.04491635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4889116">
            <text:p>0.04889116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4712683">
            <text:p>0.04712683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4078558">
            <text:p>0.04078558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7620181">
            <text:p>0.07620181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449117">
            <text:p>0.0449117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4511938">
            <text:p>0.04511938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506467">
            <text:p>0.0506467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4083263">
            <text:p>0.04083263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4296599">
            <text:p>0.04296599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7005121">
            <text:p>0.07005121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490268">
            <text:p>0.0490268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7528638">
            <text:p>0.07528638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3839123">
            <text:p>0.03839123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5692096">
            <text:p>0.05692096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6142185">
            <text:p>0.06142185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4404882">
            <text:p>0.04404882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46514">
            <text:p>0.046514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4626279">
            <text:p>0.04626279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4140745">
            <text:p>0.04140745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4758969">
            <text:p>0.04758969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490983">
            <text:p>0.0490983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4595878">
            <text:p>0.04595878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367185">
            <text:p>0.0367185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3972694">
            <text:p>0.03972694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4938884">
            <text:p>0.04938884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4451069">
            <text:p>0.04451069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3865982">
            <text:p>0.03865982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4569161">
            <text:p>0.04569161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4388275">
            <text:p>0.04388275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4242218">
            <text:p>0.04242218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3294629">
            <text:p>0.03294629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3467886">
            <text:p>0.03467886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4223397">
            <text:p>0.04223397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5748227">
            <text:p>0.05748227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4894091">
            <text:p>0.04894091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4406622">
            <text:p>0.04406622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4196062">
            <text:p>0.04196062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4685726">
            <text:p>0.04685726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328623">
            <text:p>0.0328623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382028">
            <text:p>0.0382028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4481752">
            <text:p>0.04481752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3896783">
            <text:p>0.03896783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3691611">
            <text:p>0.03691611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429999">
            <text:p>0.0429999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4504144">
            <text:p>0.04504144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3377631">
            <text:p>0.03377631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3244623">
            <text:p>0.03244623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4297378">
            <text:p>0.04297378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4439954">
            <text:p>0.04439954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574478">
            <text:p>0.0574478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315633">
            <text:p>0.0315633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5364459">
            <text:p>0.05364459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3839619">
            <text:p>0.03839619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5403545">
            <text:p>0.05403545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4489449">
            <text:p>0.04489449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4622218">
            <text:p>0.04622218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5004385">
            <text:p>0.05004385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3813629">
            <text:p>0.03813629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2906287">
            <text:p>0.02906287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3105029">
            <text:p>0.03105029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458387">
            <text:p>0.0458387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4241226">
            <text:p>0.04241226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3393064">
            <text:p>0.03393064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3108907">
            <text:p>0.03108907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2807841">
            <text:p>0.02807841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4326559">
            <text:p>0.04326559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4756494">
            <text:p>0.04756494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2616557">
            <text:p>0.02616557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3967041">
            <text:p>0.03967041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2757817">
            <text:p>0.02757817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3120146">
            <text:p>0.03120146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3042005">
            <text:p>0.03042005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2790028">
            <text:p>0.02790028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5507599">
            <text:p>0.05507599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4485441">
            <text:p>0.04485441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4417431">
            <text:p>0.04417431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2674928">
            <text:p>0.02674928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3005409">
            <text:p>0.03005409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3450843">
            <text:p>0.03450843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6125438">
            <text:p>0.06125438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4462822">
            <text:p>0.04462822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4344372">
            <text:p>0.04344372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2698706">
            <text:p>0.02698706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3948366">
            <text:p>0.03948366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3076749">
            <text:p>0.03076749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2590327">
            <text:p>0.02590327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3068714">
            <text:p>0.03068714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3573433">
            <text:p>0.03573433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4331963">
            <text:p>0.04331963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3223065">
            <text:p>0.03223065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3088984">
            <text:p>0.03088984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3929049">
            <text:p>0.03929049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4306892">
            <text:p>0.04306892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251089">
            <text:p>0.0251089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389173">
            <text:p>0.0389173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2832047">
            <text:p>0.02832047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4608345">
            <text:p>0.04608345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2161466">
            <text:p>0.02161466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2984691">
            <text:p>0.02984691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2963079">
            <text:p>0.02963079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4067726">
            <text:p>0.04067726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3018764">
            <text:p>0.03018764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3101407">
            <text:p>0.03101407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2631607">
            <text:p>0.02631607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2190079">
            <text:p>0.02190079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3682376">
            <text:p>0.03682376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606663">
            <text:p>0.0606663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2304856">
            <text:p>0.02304856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2762669">
            <text:p>0.02762669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2512215">
            <text:p>0.02512215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3945852">
            <text:p>0.03945852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1957942">
            <text:p>0.01957942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279379">
            <text:p>0.0279379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2492482">
            <text:p>0.02492482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2083545">
            <text:p>0.02083545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211897">
            <text:p>0.0211897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2798118">
            <text:p>0.02798118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2272392">
            <text:p>0.02272392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4747609">
            <text:p>0.04747609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2189287">
            <text:p>0.02189287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1903643">
            <text:p>0.01903643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320121">
            <text:p>0.0320121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3473958">
            <text:p>0.03473958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2523392">
            <text:p>0.02523392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1574219">
            <text:p>0.01574219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4456731">
            <text:p>0.04456731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3341051">
            <text:p>0.03341051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1924342">
            <text:p>0.01924342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2834715">
            <text:p>0.02834715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2519893">
            <text:p>0.02519893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2006917">
            <text:p>0.02006917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2031587">
            <text:p>0.02031587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3428769">
            <text:p>0.03428769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3497707">
            <text:p>0.03497707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255326">
            <text:p>0.0255326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3484118">
            <text:p>0.03484118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162548">
            <text:p>0.0162548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2191154">
            <text:p>0.02191154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1661564">
            <text:p>0.01661564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1631996">
            <text:p>0.01631996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2708761">
            <text:p>0.02708761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3653717">
            <text:p>0.03653717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1719448">
            <text:p>0.01719448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4615174">
            <text:p>0.04615174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253477">
            <text:p>0.0253477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2132857">
            <text:p>0.02132857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1561296">
            <text:p>0.01561296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1425718">
            <text:p>0.01425718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1698825">
            <text:p>0.01698825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3475836">
            <text:p>0.03475836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3827178">
            <text:p>0.03827178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1817013">
            <text:p>0.01817013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190523">
            <text:p>0.0190523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1503254">
            <text:p>0.01503254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3453748">
            <text:p>0.03453748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2399971">
            <text:p>0.02399971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1027406">
            <text:p>0.01027406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1765009">
            <text:p>0.01765009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2375476">
            <text:p>0.02375476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1861886">
            <text:p>0.01861886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1885852">
            <text:p>0.01885852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3589116">
            <text:p>0.03589116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1642307">
            <text:p>0.01642307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3465176">
            <text:p>0.03465176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164759">
            <text:p>0.0164759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3210662">
            <text:p>0.03210662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2147048">
            <text:p>0.02147048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139955">
            <text:p>0.0139955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2924768">
            <text:p>0.02924768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2823865">
            <text:p>0.02823865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1439673">
            <text:p>0.01439673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09849646">
            <text:p>0.009849646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08912832">
            <text:p>0.008912832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1492721">
            <text:p>0.01492721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1535417">
            <text:p>0.01535417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2189097">
            <text:p>0.02189097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2798337">
            <text:p>0.02798337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1874642">
            <text:p>0.01874642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1312338">
            <text:p>0.01312338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2369901">
            <text:p>0.02369901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1765941">
            <text:p>0.01765941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2088303">
            <text:p>0.02088303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1540873">
            <text:p>0.01540873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12929">
            <text:p>0.012929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1556442">
            <text:p>0.01556442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2712672">
            <text:p>0.02712672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10324">
            <text:p>0.010324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1425359">
            <text:p>0.01425359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1697555">
            <text:p>0.01697555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252199">
            <text:p>0.0252199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2018163">
            <text:p>0.02018163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1684043">
            <text:p>0.01684043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2897709">
            <text:p>0.02897709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2620468">
            <text:p>0.02620468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2291469">
            <text:p>0.02291469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1847985">
            <text:p>0.01847985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1648865">
            <text:p>0.01648865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357043">
            <text:p>0.0357043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1163579">
            <text:p>0.01163579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1202248">
            <text:p>0.01202248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1629149">
            <text:p>0.01629149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154308">
            <text:p>0.0154308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127413">
            <text:p>0.0127413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1386217">
            <text:p>0.01386217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2337136">
            <text:p>0.02337136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2299058">
            <text:p>0.02299058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266428">
            <text:p>0.0266428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248369">
            <text:p>0.0248369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1566811">
            <text:p>0.01566811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113363">
            <text:p>0.0113363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1617055">
            <text:p>0.01617055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1312823">
            <text:p>0.01312823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1146576">
            <text:p>0.01146576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1523916">
            <text:p>0.01523916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1356784">
            <text:p>0.01356784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0894108">
            <text:p>0.00894108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2406747">
            <text:p>0.02406747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1844954">
            <text:p>0.01844954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765007">
            <text:p>0.02765007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1410944">
            <text:p>0.01410944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2113425">
            <text:p>0.02113425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4089645">
            <text:p>0.04089645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2068842">
            <text:p>0.02068842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1345841">
            <text:p>0.01345841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1313736">
            <text:p>0.01313736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2052577">
            <text:p>0.02052577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1226935">
            <text:p>0.01226935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771287">
            <text:p>0.01771287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982804">
            <text:p>0.03982804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08510388">
            <text:p>0.008510388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774471">
            <text:p>0.03774471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07524987">
            <text:p>0.007524987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3360515">
            <text:p>0.03360515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2312103">
            <text:p>0.02312103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1474954">
            <text:p>0.01474954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775469">
            <text:p>0.01775469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1620446">
            <text:p>0.01620446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05584352">
            <text:p>0.005584352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1046172">
            <text:p>0.01046172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1415876">
            <text:p>0.01415876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1486987">
            <text:p>0.01486987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979582">
            <text:p>0.01979582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06578805">
            <text:p>0.006578805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1106509">
            <text:p>0.01106509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315348">
            <text:p>0.0315348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747465">
            <text:p>0.01747465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764016">
            <text:p>0.01764016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9434209">
            <text:p>0.009434209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05349163">
            <text:p>0.005349163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06698363">
            <text:p>0.006698363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1303278">
            <text:p>0.01303278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969297">
            <text:p>0.00969297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803505">
            <text:p>0.01803505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1157985">
            <text:p>0.01157985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2033789">
            <text:p>0.02033789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224857">
            <text:p>0.0224857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145167">
            <text:p>0.0145167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2357501">
            <text:p>0.02357501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129123">
            <text:p>0.0129123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1331495">
            <text:p>0.01331495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9913415">
            <text:p>0.009913415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930948">
            <text:p>0.01930948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1154286">
            <text:p>0.01154286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06616962">
            <text:p>0.006616962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1521786">
            <text:p>0.01521786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8417847">
            <text:p>0.008417847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9600799">
            <text:p>0.009600799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1506992">
            <text:p>0.01506992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05075138">
            <text:p>0.005075138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111919">
            <text:p>0.0111919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04845516">
            <text:p>0.004845516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744935">
            <text:p>0.01744935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802872">
            <text:p>0.00802872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1543235">
            <text:p>0.01543235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748006">
            <text:p>0.00748006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1581614">
            <text:p>0.01581614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3060324">
            <text:p>0.03060324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627822">
            <text:p>0.01627822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33823">
            <text:p>0.033823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1503133">
            <text:p>0.01503133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7853">
            <text:p>0.027853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04310898">
            <text:p>0.004310898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6082308">
            <text:p>0.006082308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string">
            <text:p>-4.679414E-05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836487">
            <text:p>0.01836487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6721127">
            <text:p>0.006721127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591744">
            <text:p>0.01591744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1042528">
            <text:p>0.01042528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100835">
            <text:p>0.0100835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707513">
            <text:p>0.02707513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1032498">
            <text:p>0.0103249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931001">
            <text:p>0.01931001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0.002532667">
            <text:p>0.002532667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1173308">
            <text:p>0.01173308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0.001382382">
            <text:p>0.001382382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1207683">
            <text:p>0.01207683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03128895">
            <text:p>0.003128895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0.001658694">
            <text:p>0.001658694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1196692">
            <text:p>0.01196692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7556032">
            <text:p>0.007556032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611902">
            <text:p>0.02611902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8357915">
            <text:p>0.008357915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1163184">
            <text:p>0.01163184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794407">
            <text:p>0.02794407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108049">
            <text:p>0.0108049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7803188">
            <text:p>0.007803188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1348691">
            <text:p>0.01348691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5889158">
            <text:p>0.005889158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464796">
            <text:p>0.02464796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82117">
            <text:p>0.0182117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53913">
            <text:p>0.0153913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414697">
            <text:p>0.02414697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866001">
            <text:p>0.01866001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4512">
            <text:p>0.004512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057788">
            <text:p>0.0057788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0.001268843">
            <text:p>0.001268843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2316112">
            <text:p>0.02316112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883124">
            <text:p>0.03883124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05440522">
            <text:p>0.005440522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2968795">
            <text:p>0.002968795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8187164">
            <text:p>0.008187164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2759162">
            <text:p>0.002759162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5832276">
            <text:p>0.005832276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1578047">
            <text:p>0.001578047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383166">
            <text:p>0.01383166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263266">
            <text:p>0.01263266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9556261">
            <text:p>0.009556261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1125777">
            <text:p>0.01125777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1259626">
            <text:p>0.01259626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3057266">
            <text:p>0.003057266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6314863">
            <text:p>0.006314863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0.0007517286">
            <text:p>0.0007517286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48853">
            <text:p>0.0148853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1117345">
            <text:p>0.01117345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2228559">
            <text:p>0.02228559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2705993">
            <text:p>-0.002705993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2205521">
            <text:p>0.002205521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7525982">
            <text:p>0.007525982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1505094">
            <text:p>-0.001505094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1241704">
            <text:p>0.01241704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278302">
            <text:p>0.01278302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6187141">
            <text:p>0.006187141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8218521">
            <text:p>0.008218521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905379">
            <text:p>0.01905379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4778353">
            <text:p>0.004778353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23231">
            <text:p>0.0123231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838419">
            <text:p>0.01838419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1054196">
            <text:p>0.01054196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5518436">
            <text:p>0.005518436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3094859">
            <text:p>0.003094859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327308">
            <text:p>0.00327308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7256551">
            <text:p>0.007256551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9688328">
            <text:p>0.009688328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428673">
            <text:p>0.01428673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1345982">
            <text:p>-0.001345982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3867329">
            <text:p>0.003867329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6334711">
            <text:p>0.006334711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6959846">
            <text:p>0.006959846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9413077">
            <text:p>0.009413077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6575107">
            <text:p>0.006575107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939954">
            <text:p>0.00939954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6799079">
            <text:p>0.006799079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8969899">
            <text:p>0.008969899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6960317">
            <text:p>0.006960317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198611">
            <text:p>0.01198611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6906707">
            <text:p>0.006906707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0.001044409">
            <text:p>0.001044409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5971867">
            <text:p>0.005971867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1149284">
            <text:p>0.01149284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631727">
            <text:p>0.00631727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07182019">
            <text:p>-0.0007182019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320138">
            <text:p>0.01320138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267605">
            <text:p>0.01267605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5680386">
            <text:p>0.005680386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276268">
            <text:p>0.01276268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02477457">
            <text:p>-0.0002477457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931236">
            <text:p>0.01931236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508521">
            <text:p>0.01508521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5898546">
            <text:p>0.005898546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1289897">
            <text:p>0.001289897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206315">
            <text:p>0.0206315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0.001435156">
            <text:p>0.001435156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341065">
            <text:p>0.02341065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3517114">
            <text:p>0.003517114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514523">
            <text:p>0.01514523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404319">
            <text:p>0.01404319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7571516">
            <text:p>0.007571516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6483774">
            <text:p>0.006483774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2404559">
            <text:p>0.002404559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8393642">
            <text:p>0.008393642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8511795">
            <text:p>0.008511795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7288045">
            <text:p>0.007288045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527469">
            <text:p>0.01527469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2176986">
            <text:p>0.002176986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01875242">
            <text:p>-0.0001875242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01175106">
            <text:p>-0.0001175106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5974625">
            <text:p>-0.005974625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183946">
            <text:p>0.01183946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5355076">
            <text:p>-0.005355076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5738762">
            <text:p>0.005738762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1042743">
            <text:p>0.01042743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5829517">
            <text:p>0.005829517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4033683">
            <text:p>0.004033683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3797347">
            <text:p>0.003797347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3964902">
            <text:p>0.003964902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274316">
            <text:p>0.01274316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8277188">
            <text:p>0.008277188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03526087">
            <text:p>-0.0003526087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799131">
            <text:p>0.01799131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9475501">
            <text:p>0.009475501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0.0005455723">
            <text:p>0.0005455723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string">
            <text:p>3.152763E-05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6263382">
            <text:p>0.006263382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4670721">
            <text:p>0.004670721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1963014">
            <text:p>-0.001963014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838329">
            <text:p>0.01838329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8802833">
            <text:p>0.008802833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684408">
            <text:p>0.01684408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8972746">
            <text:p>0.008972746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1182459">
            <text:p>0.01182459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4619741">
            <text:p>0.004619741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494442">
            <text:p>0.01494442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290237">
            <text:p>0.01290237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1093482">
            <text:p>-0.001093482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9480779">
            <text:p>0.009480779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291725">
            <text:p>0.01291725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2637993">
            <text:p>-0.002637993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1651235">
            <text:p>0.001651235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346929">
            <text:p>0.01346929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474404">
            <text:p>0.00474404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4158384">
            <text:p>0.004158384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1816525">
            <text:p>0.001816525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2973105">
            <text:p>0.002973105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06289836">
            <text:p>-0.0006289836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5374794">
            <text:p>-0.005374794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06937305">
            <text:p>-0.0006937305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863698">
            <text:p>0.00863698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6462225">
            <text:p>0.006462225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866142">
            <text:p>0.01866142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440659">
            <text:p>0.01440659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6999263">
            <text:p>0.006999263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5247416">
            <text:p>-0.005247416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32596">
            <text:p>0.0232596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5435118">
            <text:p>-0.005435118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1284168">
            <text:p>0.001284168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1994606">
            <text:p>0.001994606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6771256">
            <text:p>0.006771256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270277">
            <text:p>0.00270277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106389">
            <text:p>0.0106389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289695">
            <text:p>-0.00289695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4855101">
            <text:p>-0.004855101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6152992">
            <text:p>0.006152992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7069751">
            <text:p>0.00706975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1063401">
            <text:p>0.01063401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0.0004280736">
            <text:p>0.0004280736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518993">
            <text:p>0.0151899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1630432">
            <text:p>-0.001630432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01990946">
            <text:p>-0.0001990946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8159488">
            <text:p>0.008159488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61977">
            <text:p>0.0161977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43637">
            <text:p>0.0143637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9638141">
            <text:p>0.009638141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110761">
            <text:p>0.0110761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4435585">
            <text:p>-0.004435585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180028">
            <text:p>0.01180028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3578908">
            <text:p>0.003578908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3657045">
            <text:p>-0.003657045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19581">
            <text:p>0.0119581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4467302">
            <text:p>0.004467302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4162154">
            <text:p>-0.004162154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7175665">
            <text:p>-0.007175665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1885082">
            <text:p>0.001885082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5715812">
            <text:p>0.005715812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36421">
            <text:p>0.0036421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0683539">
            <text:p>-0.000683539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183172">
            <text:p>0.01183172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05881126">
            <text:p>0.0005881126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7579796">
            <text:p>0.007579796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0.0007307115">
            <text:p>0.0007307115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7552518">
            <text:p>0.007552518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4330076">
            <text:p>0.004330076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09035355">
            <text:p>0.0009035355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0.0009359819">
            <text:p>0.0009359819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4690227">
            <text:p>0.004690227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2546986">
            <text:p>-0.002546986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833728">
            <text:p>0.01833728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1734587">
            <text:p>0.001734587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590532">
            <text:p>0.00590532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8210036">
            <text:p>0.008210036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6280105">
            <text:p>0.006280105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3073754">
            <text:p>0.003073754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1038492">
            <text:p>0.01038492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128035">
            <text:p>0.01128035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1025782">
            <text:p>-0.001025782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811261">
            <text:p>0.00811261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3842586">
            <text:p>0.003842586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6537442">
            <text:p>0.006537442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1640328">
            <text:p>0.001640328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1984415">
            <text:p>-0.001984415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23033">
            <text:p>0.0123033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07993561">
            <text:p>-0.0007993561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161178">
            <text:p>-0.00161178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2091483">
            <text:p>0.002091483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5968312">
            <text:p>0.005968312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6195266">
            <text:p>0.006195266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2337855">
            <text:p>0.002337855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07285133">
            <text:p>0.0007285133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05939681">
            <text:p>0.0005939681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4806373">
            <text:p>0.004806373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7454604">
            <text:p>0.007454604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7376882">
            <text:p>-0.007376882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3816532">
            <text:p>0.003816532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2797712">
            <text:p>-0.002797712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5526933">
            <text:p>0.005526933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0.0003303934">
            <text:p>0.0003303934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1578349">
            <text:p>-0.001578349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1459538">
            <text:p>-0.001459538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1754349">
            <text:p>0.001754349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527012">
            <text:p>0.00527012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06256499">
            <text:p>0.0006256499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09711523">
            <text:p>-0.0009711523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1996146">
            <text:p>0.001996146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3376823">
            <text:p>0.003376823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451304">
            <text:p>-0.00451304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1428878">
            <text:p>0.001428878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6510689">
            <text:p>-0.006510689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4183178">
            <text:p>-0.004183178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2180923">
            <text:p>-0.002180923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02187849">
            <text:p>-0.0002187849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2824876">
            <text:p>-0.002824876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3632388">
            <text:p>-0.003632388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6368898">
            <text:p>0.006368898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815997">
            <text:p>-0.00815997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2418317">
            <text:p>-0.002418317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5799863">
            <text:p>-0.005799863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7546128">
            <text:p>0.007546128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2228418">
            <text:p>-0.002228418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799026">
            <text:p>0.008799026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090766">
            <text:p>0.01090766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1816682">
            <text:p>-0.001816682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302281">
            <text:p>0.00302281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79981">
            <text:p>0.01179981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4878981">
            <text:p>0.004878981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1796302">
            <text:p>-0.001796302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383583">
            <text:p>0.01383583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1427238">
            <text:p>0.001427238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2370235">
            <text:p>0.002370235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06817025">
            <text:p>-0.0006817025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419161">
            <text:p>0.00419161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5632611">
            <text:p>-0.005632611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4733901">
            <text:p>-0.004733901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4288274">
            <text:p>0.004288274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1509431">
            <text:p>0.001509431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5304668">
            <text:p>0.005304668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03185723">
            <text:p>-0.0003185723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9503996">
            <text:p>0.009503996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4282979">
            <text:p>0.004282979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7073204">
            <text:p>-0.007073204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3509892">
            <text:p>0.003509892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3862142">
            <text:p>-0.003862142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6433663">
            <text:p>-0.006433663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295">
            <text:p>0.01295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09919037">
            <text:p>0.0009919037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8333942">
            <text:p>0.008333942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1011725">
            <text:p>0.01011725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5588306">
            <text:p>0.005588306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2759913">
            <text:p>-0.002759913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05795371">
            <text:p>-0.0005795371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3117905">
            <text:p>-0.003117905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4389317">
            <text:p>-0.004389317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2146259">
            <text:p>-0.002146259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09944588">
            <text:p>-0.0009944588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1742733">
            <text:p>-0.001742733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2458418">
            <text:p>0.002458418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1419956">
            <text:p>0.001419956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85098">
            <text:p>0.0185098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5660053">
            <text:p>0.005660053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6579328">
            <text:p>0.006579328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6478252">
            <text:p>0.006478252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1960044">
            <text:p>-0.001960044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2206799">
            <text:p>-0.002206799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5562291">
            <text:p>0.005562291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3296735">
            <text:p>0.003296735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09960936">
            <text:p>0.0009960936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4502522">
            <text:p>0.004502522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22274">
            <text:p>0.0222274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5402576">
            <text:p>-0.005402576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1663055">
            <text:p>0.001663055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4070856">
            <text:p>0.04070856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4778598">
            <text:p>0.004778598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5169304">
            <text:p>0.005169304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string">
            <text:p>-6.346608E-05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431538">
            <text:p>0.01431538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3965863">
            <text:p>0.003965863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8516313">
            <text:p>-0.008516313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12515">
            <text:p>0.0112515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4813574">
            <text:p>-0.004813574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3641383">
            <text:p>-0.003641383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270842">
            <text:p>0.009270842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5021322">
            <text:p>0.005021322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422993">
            <text:p>0.01422993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541905">
            <text:p>0.00541905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7435495">
            <text:p>0.007435495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168147">
            <text:p>0.00168147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2850717">
            <text:p>0.002850717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1357195">
            <text:p>0.001357195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1484139">
            <text:p>0.001484139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6346748">
            <text:p>-0.006346748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3336712">
            <text:p>-0.003336712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9462485">
            <text:p>-0.009462485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06696691">
            <text:p>0.0006696691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2804361">
            <text:p>-0.002804361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40784">
            <text:p>0.01340784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5178954">
            <text:p>-0.005178954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0.0004908564">
            <text:p>0.0004908564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1153356">
            <text:p>0.001153356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01908909">
            <text:p>0.0001908909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02515508">
            <text:p>0.0002515508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509802">
            <text:p>0.009509802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03383322">
            <text:p>0.0003383322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2482133">
            <text:p>-0.002482133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8952259">
            <text:p>-0.008952259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04062506">
            <text:p>0.0004062506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2470052">
            <text:p>0.002470052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4681474">
            <text:p>0.004681474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5528412">
            <text:p>-0.005528412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6999056">
            <text:p>-0.006999056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085189">
            <text:p>0.01085189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3292027">
            <text:p>0.003292027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128747">
            <text:p>-0.00128747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0435346">
            <text:p>-0.000435346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4878892">
            <text:p>-0.004878892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482611">
            <text:p>0.02482611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6204407">
            <text:p>-0.006204407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85995">
            <text:p>0.01385995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5366789">
            <text:p>-0.005366789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4869852">
            <text:p>-0.004869852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8103178">
            <text:p>-0.008103178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6442446">
            <text:p>-0.006442446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001673">
            <text:p>-0.01001673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67844">
            <text:p>0.00867844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5027804">
            <text:p>0.005027804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605558">
            <text:p>-0.00605558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1712383">
            <text:p>0.001712383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4232956">
            <text:p>-0.004232956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711965">
            <text:p>0.02711965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939695">
            <text:p>0.007939695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77539">
            <text:p>0.01477539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3654616">
            <text:p>0.003654616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6710382">
            <text:p>-0.006710382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3112797">
            <text:p>-0.003112797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441609">
            <text:p>0.00441609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915572">
            <text:p>0.003915572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489816">
            <text:p>0.02489816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05335214">
            <text:p>-0.0005335214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07229919">
            <text:p>0.0007229919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114294">
            <text:p>0.006114294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06308639">
            <text:p>0.0006308639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2368949">
            <text:p>0.002368949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5296935">
            <text:p>0.005296935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19454">
            <text:p>0.01119454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03463656">
            <text:p>-0.0003463656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153421">
            <text:p>-0.00153421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596929">
            <text:p>0.02596929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44119">
            <text:p>0.01144119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77667">
            <text:p>0.00277667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01982463">
            <text:p>-0.0001982463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4363797">
            <text:p>0.004363797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164966">
            <text:p>0.01164966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2363847">
            <text:p>0.002363847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2034631">
            <text:p>0.002034631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523623">
            <text:p>-0.00523623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2629766">
            <text:p>-0.002629766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4946114">
            <text:p>0.004946114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2927971">
            <text:p>-0.002927971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622656">
            <text:p>0.01622656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517581">
            <text:p>0.007517581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3920055">
            <text:p>-0.003920055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684055">
            <text:p>0.006684055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8466007">
            <text:p>-0.008466007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4249651">
            <text:p>-0.004249651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432878">
            <text:p>0.005432878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134924">
            <text:p>0.01134924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4024649">
            <text:p>-0.004024649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3392755">
            <text:p>-0.003392755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295866">
            <text:p>0.009295866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766217">
            <text:p>0.01766217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5874191">
            <text:p>-0.0005874191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2508341">
            <text:p>0.002508341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1813576">
            <text:p>-0.001813576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06832457">
            <text:p>-0.0006832457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1144419">
            <text:p>-0.001144419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449609">
            <text:p>-0.00449609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9958789">
            <text:p>0.0009958789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69156">
            <text:p>0.01269156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9189752">
            <text:p>-0.009189752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275782">
            <text:p>0.007275782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4419649">
            <text:p>-0.004419649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1522499">
            <text:p>-0.001522499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4508782">
            <text:p>-0.004508782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4788377">
            <text:p>-0.004788377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10854">
            <text:p>0.01110854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3282289">
            <text:p>-0.003282289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5009923">
            <text:p>-0.005009923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8374242">
            <text:p>-0.008374242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7592376">
            <text:p>-0.007592376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3583412">
            <text:p>0.003583412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1689283">
            <text:p>0.001689283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3111467">
            <text:p>-0.003111467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157919">
            <text:p>0.01157919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1003022">
            <text:p>-0.001003022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2206631">
            <text:p>0.002206631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328351">
            <text:p>0.01328351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1774162">
            <text:p>-0.001774162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1656023">
            <text:p>-0.001656023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2035017">
            <text:p>0.02035017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07927049">
            <text:p>-0.0007927049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3607504">
            <text:p>0.003607504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377113">
            <text:p>0.005377113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2846641">
            <text:p>-0.002846641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466182">
            <text:p>0.009466182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1621125">
            <text:p>0.001621125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7342552">
            <text:p>-0.007342552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8367533">
            <text:p>-0.008367533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658172">
            <text:p>0.002658172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445523">
            <text:p>0.004445523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5806648">
            <text:p>0.005806648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6382381">
            <text:p>-0.006382381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749786">
            <text:p>0.002749786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73243">
            <text:p>0.00473243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829691">
            <text:p>0.008829691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2011956">
            <text:p>-0.002011956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618495">
            <text:p>0.002618495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4876008">
            <text:p>0.004876008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3336041">
            <text:p>-0.003336041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962416">
            <text:p>-0.001962416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3839354">
            <text:p>-0.003839354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67839">
            <text:p>0.01267839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8162945">
            <text:p>-0.008162945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1121924">
            <text:p>-0.001121924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7143">
            <text:p>0.0037143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592648">
            <text:p>0.002592648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1993935">
            <text:p>0.001993935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4564018">
            <text:p>-0.004564018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5321902">
            <text:p>-0.005321902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138827">
            <text:p>0.003138827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07262799">
            <text:p>-0.0007262799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405292">
            <text:p>-0.002405292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464716">
            <text:p>0.006464716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1460539">
            <text:p>0.001460539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7184881">
            <text:p>-0.007184881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84286">
            <text:p>0.00984286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1341102">
            <text:p>-0.001341102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6224721">
            <text:p>-0.006224721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1904596">
            <text:p>0.001904596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0177498">
            <text:p>0.000177498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908052">
            <text:p>0.001908052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8973818">
            <text:p>-0.008973818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6344496">
            <text:p>-0.006344496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838467">
            <text:p>0.003838467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2579438">
            <text:p>-0.002579438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39181">
            <text:p>0.0139181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751246">
            <text:p>-0.00751246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855208">
            <text:p>-0.002855208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03430528">
            <text:p>-0.0003430528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7775269">
            <text:p>0.007775269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897138">
            <text:p>0.004897138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5900531">
            <text:p>-0.005900531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484432">
            <text:p>0.007484432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450878">
            <text:p>-0.00450878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9332017">
            <text:p>-0.009332017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3603195">
            <text:p>-0.003603195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731562">
            <text:p>0.01731562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737668">
            <text:p>0.01737668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665566">
            <text:p>0.01665566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9223659">
            <text:p>-0.009223659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0113383">
            <text:p>-0.000113383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5396363">
            <text:p>0.005396363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116339">
            <text:p>0.005116339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6054271">
            <text:p>-0.006054271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08293411">
            <text:p>-0.0008293411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000496">
            <text:p>-0.01000496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9635">
            <text:p>0.0099635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729837">
            <text:p>0.004729837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string">
            <text:p>1.817388E-05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410779">
            <text:p>0.004410779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44167">
            <text:p>0.0144167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2917888">
            <text:p>-0.002917888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16007">
            <text:p>0.00416007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514555">
            <text:p>0.002514555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4330598">
            <text:p>0.004330598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8500774">
            <text:p>-0.008500774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3398576">
            <text:p>-0.003398576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1809448">
            <text:p>0.001809448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6666163">
            <text:p>-0.006666163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3344873">
            <text:p>0.003344873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1368595">
            <text:p>-0.001368595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5148234">
            <text:p>-0.005148234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string">
            <text:p>-4.042417E-06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7390094">
            <text:p>-0.007390094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9937237">
            <text:p>-0.009937237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473676">
            <text:p>0.005473676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414804">
            <text:p>0.001414804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09756869">
            <text:p>0.0009756869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08952489">
            <text:p>0.0008952489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436526">
            <text:p>0.001436526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694552">
            <text:p>0.005694552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484302">
            <text:p>-0.005484302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9318983">
            <text:p>-0.009318983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674279">
            <text:p>0.001674279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3804257">
            <text:p>-0.0003804257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112332">
            <text:p>0.001112332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09541889">
            <text:p>0.0009541889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1410431">
            <text:p>-0.001410431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871332">
            <text:p>0.001871332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5221452">
            <text:p>-0.005221452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628917">
            <text:p>0.005628917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1437628">
            <text:p>-0.001437628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2440667">
            <text:p>-0.002440667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6932965">
            <text:p>0.0006932965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247018">
            <text:p>-0.00247018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725972">
            <text:p>0.001725972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22128">
            <text:p>0.00422128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912131">
            <text:p>0.007912131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04216266">
            <text:p>-0.0004216266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4085556">
            <text:p>-0.004085556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9711734">
            <text:p>0.009711734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2925632">
            <text:p>-0.002925632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8310352">
            <text:p>-0.008310352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8451773">
            <text:p>-0.008451773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564125">
            <text:p>0.004564125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5269169">
            <text:p>-0.005269169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1022911">
            <text:p>0.01022911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8485265">
            <text:p>-0.008485265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891281">
            <text:p>0.001891281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340013">
            <text:p>0.02340013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33676">
            <text:p>0.00133676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09418296">
            <text:p>0.0009418296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559646">
            <text:p>0.005559646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4748761">
            <text:p>0.004748761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3787175">
            <text:p>-0.003787175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724431">
            <text:p>0.001724431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080445">
            <text:p>0.001080445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09477">
            <text:p>0.01809477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9179878">
            <text:p>-0.009179878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671521">
            <text:p>0.01671521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788122">
            <text:p>-0.001788122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6815913">
            <text:p>-0.006815913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481753">
            <text:p>0.01481753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2590022">
            <text:p>-0.002590022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7377923">
            <text:p>-0.007377923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8681986">
            <text:p>-0.008681986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719496">
            <text:p>-0.004719496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879984">
            <text:p>0.002879984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7145833">
            <text:p>-0.007145833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262699">
            <text:p>0.001262699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146845">
            <text:p>0.004146845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688941">
            <text:p>0.01688941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09028396">
            <text:p>0.0009028396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4576791">
            <text:p>-0.004576791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66498">
            <text:p>0.00166498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5455174">
            <text:p>-0.005455174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6072071">
            <text:p>-0.006072071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2840064">
            <text:p>0.002840064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0.0001805023">
            <text:p>0.0001805023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186174">
            <text:p>-0.01186174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7470286">
            <text:p>-0.007470286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8151922">
            <text:p>-0.008151922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00744">
            <text:p>-0.0100744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681228">
            <text:p>0.006681228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8307874">
            <text:p>-0.008307874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8027063">
            <text:p>-0.008027063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300288">
            <text:p>0.003300288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6359707">
            <text:p>-0.006359707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7492378">
            <text:p>-0.007492378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575223">
            <text:p>0.02575223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1545582">
            <text:p>-0.001545582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147239">
            <text:p>-0.00147239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6539661">
            <text:p>-0.006539661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039552">
            <text:p>0.002039552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102371">
            <text:p>-0.001102371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0284745">
            <text:p>0.000284745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3379747">
            <text:p>-0.00337974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007878">
            <text:p>0.009007878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string">
            <text:p>6.824754E-05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04464432">
            <text:p>0.0004464432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4442383">
            <text:p>-0.004442383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569509">
            <text:p>-0.004569509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063513">
            <text:p>-0.01063513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469261">
            <text:p>0.006469261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072173">
            <text:p>-0.001072173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8741">
            <text:p>0.0118741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08655106">
            <text:p>-0.0008655106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string">
            <text:p>6.581179E-05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837013">
            <text:p>-0.001837013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8260106">
            <text:p>-0.008260106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156255">
            <text:p>-0.01156255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841751">
            <text:p>0.002841751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02804">
            <text:p>-0.0102804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5147259">
            <text:p>-0.005147259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8628945">
            <text:p>-0.008628945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209688">
            <text:p>0.005209688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9163109">
            <text:p>-0.009163109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1522355">
            <text:p>0.001522355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055443">
            <text:p>0.003055443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539051">
            <text:p>-0.006539051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655394">
            <text:p>0.000655394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9376448">
            <text:p>0.009376448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932789">
            <text:p>0.003932789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01913898">
            <text:p>-0.0001913898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505797">
            <text:p>0.006505797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378578">
            <text:p>0.02378578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6257914">
            <text:p>-0.006257914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8055419">
            <text:p>-0.008055419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105339">
            <text:p>0.01105339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529665">
            <text:p>0.004529665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235227">
            <text:p>-0.00235227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066259">
            <text:p>0.002066259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803903">
            <text:p>0.005803903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190046">
            <text:p>-0.00190046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96612">
            <text:p>0.01196612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3923">
            <text:p>0.0063923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350849">
            <text:p>0.01350849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5165649">
            <text:p>-0.005165649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23915">
            <text:p>0.00123915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6835881">
            <text:p>-0.006835881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349715">
            <text:p>-0.002349715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8444759">
            <text:p>0.008444759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211484">
            <text:p>0.008211484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968953">
            <text:p>0.005968953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993044">
            <text:p>-0.002993044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27282">
            <text:p>0.01727282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4379869">
            <text:p>-0.004379869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874658">
            <text:p>-0.004874658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6913075">
            <text:p>-0.006913075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040579">
            <text:p>-0.002040579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680076">
            <text:p>0.003680076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3646942">
            <text:p>-0.003646942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2268256">
            <text:p>-0.002268256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5293894">
            <text:p>-0.005293894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8332209">
            <text:p>-0.008332209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952216">
            <text:p>-0.003952216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5772921">
            <text:p>-0.0005772921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647243">
            <text:p>0.002647243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887714">
            <text:p>-0.001887714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04236166">
            <text:p>-0.0004236166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291769">
            <text:p>0.007291769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1279443">
            <text:p>0.001279443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581686">
            <text:p>0.006581686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7650668">
            <text:p>-0.007650668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9628029">
            <text:p>-0.009628029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2375257">
            <text:p>-0.002375257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5481401">
            <text:p>0.005481401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1175911">
            <text:p>-0.001175911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7366243">
            <text:p>-0.007366243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6579802">
            <text:p>-0.006579802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08219904">
            <text:p>-0.0008219904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82963">
            <text:p>0.0182963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390718">
            <text:p>0.003390718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257502">
            <text:p>-0.001257502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756271">
            <text:p>0.003756271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84677">
            <text:p>0.00584677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9196526">
            <text:p>0.009196526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394267">
            <text:p>0.002394267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50962">
            <text:p>0.00350962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5237259">
            <text:p>-0.005237259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6799516">
            <text:p>0.0006799516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348741">
            <text:p>0.005348741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078802">
            <text:p>0.003078802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189745">
            <text:p>0.01189745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784691">
            <text:p>0.00784691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18814">
            <text:p>0.01118814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837566">
            <text:p>-0.000837566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831113">
            <text:p>0.004831113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372074">
            <text:p>0.005372074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2935629">
            <text:p>0.002935629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4119052">
            <text:p>0.004119052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8192463">
            <text:p>-0.008192463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930861">
            <text:p>0.005930861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728717">
            <text:p>0.002728717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265618">
            <text:p>0.005265618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5182222">
            <text:p>0.005182222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1707812">
            <text:p>-0.001707812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589913">
            <text:p>0.01589913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735881">
            <text:p>0.004735881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4567009">
            <text:p>-0.004567009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1380556">
            <text:p>-0.001380556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625831">
            <text:p>-0.00625831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10361">
            <text:p>0.01210361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3693003">
            <text:p>-0.003693003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113222">
            <text:p>0.007113222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05253462">
            <text:p>0.0005253462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2522292">
            <text:p>-0.0002522292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4180346">
            <text:p>-0.004180346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881512">
            <text:p>-0.009881512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3346829">
            <text:p>-0.003346829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028156">
            <text:p>-0.01028156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096749">
            <text:p>-0.004096749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746281">
            <text:p>-0.002746281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6125233">
            <text:p>-0.0006125233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759555">
            <text:p>0.009759555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425185">
            <text:p>0.01425185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7353513">
            <text:p>-0.007353513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588287">
            <text:p>0.008588287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08982676">
            <text:p>0.0008982676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6833845">
            <text:p>-0.006833845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5773116">
            <text:p>-0.005773116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229355">
            <text:p>0.02229355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66463">
            <text:p>-0.0066463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2564651">
            <text:p>-0.0002564651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481831">
            <text:p>0.008481831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2039953">
            <text:p>-0.0002039953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847927">
            <text:p>0.01847927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3003455">
            <text:p>-0.003003455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6161043">
            <text:p>0.006161043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529072">
            <text:p>0.007529072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341554">
            <text:p>0.002341554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669827">
            <text:p>-0.004669827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1891571">
            <text:p>0.0001891571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1502624">
            <text:p>-0.001502624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3193826">
            <text:p>-0.003193826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5268055">
            <text:p>0.005268055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277992">
            <text:p>0.01277992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08948771">
            <text:p>0.0008948771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00015">
            <text:p>-0.0100015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530812">
            <text:p>0.003530812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8734669">
            <text:p>-0.008734669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7168629">
            <text:p>-0.007168629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7300522">
            <text:p>-0.007300522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101604">
            <text:p>0.03101604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927529">
            <text:p>-0.007927529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763008">
            <text:p>-0.05763008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893598">
            <text:p>-0.05893598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037011">
            <text:p>-0.06037011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071885">
            <text:p>-0.06071885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136148">
            <text:p>-0.06136148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113232">
            <text:p>-0.0611323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51:07.51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8cm" svg:width="10.685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831942">
                <text:p>0.006831942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203348">
                <text:p>0.00203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4265194">
                <text:p>0.004265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303879">
                <text:p>0.01303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8736539">
                <text:p>0.00873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996946">
                <text:p>0.004996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76085">
                <text:p>0.0176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2125609">
                <text:p>-0.002125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1188011">
                <text:p>0.0001188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613886">
                <text:p>0.006613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964669">
                <text:p>0.009964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76333">
                <text:p>0.01176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544864">
                <text:p>-0.00254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318212">
                <text:p>0.002318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06109368">
                <text:p>0.0006109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982119">
                <text:p>0.00698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413693">
                <text:p>-0.002413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265844">
                <text:p>0.00265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4004067">
                <text:p>0.04004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433927">
                <text:p>-0.006433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506368">
                <text:p>-0.003506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215276">
                <text:p>0.01215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857796">
                <text:p>0.01857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162985">
                <text:p>-0.001162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792917">
                <text:p>-0.005792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574042">
                <text:p>0.004574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3484466">
                <text:p>-0.00348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874158">
                <text:p>0.002874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8810248">
                <text:p>0.008810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781118">
                <text:p>0.003781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1923491">
                <text:p>0.001923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738713">
                <text:p>0.01738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8112698">
                <text:p>-0.008112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591331">
                <text:p>0.001591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2896675">
                <text:p>0.0002896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4718016">
                <text:p>-0.004718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272167">
                <text:p>0.00272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4775193">
                <text:p>0.004775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971589">
                <text:p>0.003971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981364">
                <text:p>0.005981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245319">
                <text:p>0.003245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673296">
                <text:p>0.001673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041766">
                <text:p>0.008041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72146">
                <text:p>0.0172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921179">
                <text:p>-0.003921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953172">
                <text:p>0.00953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479034">
                <text:p>0.02479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866006">
                <text:p>0.01866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550701">
                <text:p>0.005550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523022">
                <text:p>0.009523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052461">
                <text:p>0.004052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170843">
                <text:p>0.007170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78611">
                <text:p>-0.00178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576171">
                <text:p>0.005576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988822">
                <text:p>0.01988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764354">
                <text:p>-0.002764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877126">
                <text:p>0.008877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2899959">
                <text:p>-0.0028999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7400067">
                <text:p>-0.007400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0.00028413">
                <text:p>0.00028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3854">
                <text:p>0.0033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700873">
                <text:p>0.0067008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245727">
                <text:p>-0.0022457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335529">
                <text:p>-0.001335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372557">
                <text:p>-0.008372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836865">
                <text:p>0.0028368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357621">
                <text:p>0.02357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864413">
                <text:p>0.001864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8470811">
                <text:p>0.008470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8437661">
                <text:p>0.0084376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781646">
                <text:p>0.01781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30981">
                <text:p>-0.0030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4020403">
                <text:p>-0.004020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1581224">
                <text:p>0.001581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2901543">
                <text:p>0.0029015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3108944">
                <text:p>-0.003108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056302">
                <text:p>0.008056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241963">
                <text:p>0.04241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1963654">
                <text:p>0.001963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365115">
                <text:p>0.001365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7958523">
                <text:p>-0.007958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775722">
                <text:p>0.017757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455875">
                <text:p>0.009455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1017549">
                <text:p>0.01017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429213">
                <text:p>-0.003429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965832">
                <text:p>0.005965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721168">
                <text:p>0.01721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168394">
                <text:p>0.01168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060333">
                <text:p>0.03060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162589">
                <text:p>0.011625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021108">
                <text:p>0.02021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4145252">
                <text:p>-0.004145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462346">
                <text:p>-0.004462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2942584">
                <text:p>0.00294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624642">
                <text:p>0.009624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8190828">
                <text:p>-0.0008190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4179224">
                <text:p>-0.004179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476079">
                <text:p>0.006476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05276586">
                <text:p>-0.00052765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9247078">
                <text:p>-0.009247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168061">
                <text:p>-0.0031680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035818">
                <text:p>0.02035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332817">
                <text:p>0.01332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4531429">
                <text:p>0.00453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7951507">
                <text:p>-0.00795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9478132">
                <text:p>0.0009478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01722933">
                <text:p>-0.0001722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6275349">
                <text:p>0.0062753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074458">
                <text:p>0.05074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2142709">
                <text:p>-0.0021427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1740634">
                <text:p>0.001740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988388">
                <text:p>0.001988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7590006">
                <text:p>-0.00759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363147">
                <text:p>0.008363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3587605">
                <text:p>0.003587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123118">
                <text:p>-0.01123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02436258">
                <text:p>0.0002436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877374">
                <text:p>0.004877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4959504">
                <text:p>-0.00049595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6457666">
                <text:p>0.00064576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6305235">
                <text:p>-0.006305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54608">
                <text:p>0.01754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2805169">
                <text:p>-0.0002805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007072">
                <text:p>0.009007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8054502">
                <text:p>0.008054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274873">
                <text:p>0.009274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4850153">
                <text:p>0.00048501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13682">
                <text:p>0.013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147876">
                <text:p>0.007147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152962">
                <text:p>0.03152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140344">
                <text:p>0.009140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446704">
                <text:p>0.0064467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104191">
                <text:p>-0.0011041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09902707">
                <text:p>0.0099027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101945">
                <text:p>0.021019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6030269">
                <text:p>-0.006030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828392">
                <text:p>0.002828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90231">
                <text:p>0.017902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3821157">
                <text:p>0.0038211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5351642">
                <text:p>-0.0053516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710183">
                <text:p>-0.0027101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1113746">
                <text:p>-0.001113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559812">
                <text:p>0.0025598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6688874">
                <text:p>-0.006688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9556104">
                <text:p>-0.009556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500376">
                <text:p>0.02500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530008">
                <text:p>0.0015300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70379">
                <text:p>0.003703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3773527">
                <text:p>-0.003773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2099761">
                <text:p>-0.002099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3604727">
                <text:p>-0.003604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696519">
                <text:p>-0.0036965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889165">
                <text:p>-0.002889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322324">
                <text:p>0.013223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6267">
                <text:p>0.01162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219112">
                <text:p>-0.002219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583729">
                <text:p>0.0258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519163">
                <text:p>0.006519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321961">
                <text:p>0.013219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448195">
                <text:p>-0.004448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2641542">
                <text:p>-0.002641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901834">
                <text:p>0.003901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448438">
                <text:p>0.0094484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5154117">
                <text:p>-0.005154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435141">
                <text:p>0.009435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693893">
                <text:p>0.0026938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90905">
                <text:p>0.010909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199439">
                <text:p>0.003199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3842977">
                <text:p>0.0038429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06392455">
                <text:p>0.0006392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690877">
                <text:p>0.016908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339112">
                <text:p>0.002339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818702">
                <text:p>0.018187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637965">
                <text:p>0.006637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9327118">
                <text:p>0.009327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8639838">
                <text:p>-0.0086398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872176">
                <text:p>0.018721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730994">
                <text:p>0.01730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591679">
                <text:p>0.01591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299939">
                <text:p>-0.004299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4230778">
                <text:p>-0.00042307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41125">
                <text:p>-0.00241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3174382">
                <text:p>-0.0031743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678452">
                <text:p>0.01678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5378183">
                <text:p>0.005378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453524">
                <text:p>0.02453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080347">
                <text:p>0.02080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51505">
                <text:p>0.0151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2487866">
                <text:p>-0.0024878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2645325">
                <text:p>-0.002645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69545">
                <text:p>0.01069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590268">
                <text:p>0.004590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465954">
                <text:p>-0.000465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227977">
                <text:p>0.012279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4455566">
                <text:p>-0.004455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948538">
                <text:p>0.0079485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614926">
                <text:p>0.01614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23843">
                <text:p>0.013238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196725">
                <text:p>-0.001967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7717866">
                <text:p>-0.0077178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1010331">
                <text:p>0.010103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140723">
                <text:p>0.0011407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68027">
                <text:p>-0.002680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05962">
                <text:p>-0.003059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0724022">
                <text:p>0.0007240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198967">
                <text:p>0.0041989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8408929">
                <text:p>-0.008408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053415">
                <text:p>0.010534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3160129">
                <text:p>-0.0031601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6719803">
                <text:p>0.0067198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392874">
                <text:p>-0.003928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7085404">
                <text:p>-0.00070854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2910891">
                <text:p>0.00029108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748212">
                <text:p>0.0067482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145246">
                <text:p>0.011452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33776">
                <text:p>-0.001337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060311">
                <text:p>0.0020603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454235">
                <text:p>0.024542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70581">
                <text:p>-0.006705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5087469">
                <text:p>-0.005087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00855">
                <text:p>0.003008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2113436">
                <text:p>-0.002113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112487">
                <text:p>0.011124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41754">
                <text:p>0.011417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851979">
                <text:p>-0.001851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192135">
                <text:p>-0.0031921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4482535">
                <text:p>-0.004482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033927">
                <text:p>0.0030339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801873">
                <text:p>-0.0028018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446981">
                <text:p>-0.0044469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262508">
                <text:p>0.001262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265931">
                <text:p>0.012659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07074">
                <text:p>0.03070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9206627">
                <text:p>-0.0092066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8677589">
                <text:p>-0.0086775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683786">
                <text:p>0.0036837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267315">
                <text:p>-0.002673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6011955">
                <text:p>0.0060119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201212">
                <text:p>-0.012012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09952">
                <text:p>0.004099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1867199">
                <text:p>-0.0018671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195266">
                <text:p>0.002195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102353">
                <text:p>0.007102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09361401">
                <text:p>0.00093614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337074">
                <text:p>0.01337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9211487">
                <text:p>-0.0092114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8528648">
                <text:p>-0.00085286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2323523">
                <text:p>-0.0023235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144026">
                <text:p>0.02144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3166724">
                <text:p>-0.0003166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591504">
                <text:p>0.0055915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09951694">
                <text:p>0.00099516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133891">
                <text:p>0.011338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8038826">
                <text:p>-0.0080388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9090356">
                <text:p>-0.0090903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214095">
                <text:p>0.0092140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35242">
                <text:p>0.003352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896605">
                <text:p>-0.0068966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310466">
                <text:p>-0.0043104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509266">
                <text:p>0.01509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79248">
                <text:p>0.010792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55741">
                <text:p>0.010557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835183">
                <text:p>-0.0078351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1644931">
                <text:p>-0.0016449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290318">
                <text:p>0.005290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2695151">
                <text:p>0.0026951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911382">
                <text:p>0.0059113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607109">
                <text:p>0.0046071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480977">
                <text:p>0.014809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11716">
                <text:p>-0.01117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897227">
                <text:p>0.0038972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532905">
                <text:p>0.0025329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260874">
                <text:p>0.012608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9914513">
                <text:p>0.009914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870787">
                <text:p>-0.008870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85516">
                <text:p>0.01185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225254">
                <text:p>0.0012252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8682823">
                <text:p>-0.0086828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802354">
                <text:p>0.0018023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2380936">
                <text:p>-0.00023809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322146">
                <text:p>0.0023221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497438">
                <text:p>0.004974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613594">
                <text:p>-0.0026135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146304">
                <text:p>0.0021463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812597">
                <text:p>0.018125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5253272">
                <text:p>-0.0052532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7262087">
                <text:p>-0.0072620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65195">
                <text:p>0.01651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215742">
                <text:p>0.012157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6552587">
                <text:p>-0.00065525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2963094">
                <text:p>-0.0029630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853149">
                <text:p>0.0058531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606752">
                <text:p>0.006067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9343116">
                <text:p>0.009343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437238">
                <text:p>-0.0014372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71335">
                <text:p>-0.003713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639071">
                <text:p>0.016390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5222138">
                <text:p>-0.0052221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536468">
                <text:p>0.0045364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302268">
                <text:p>0.0023022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351475">
                <text:p>0.0053514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3626993">
                <text:p>0.003626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062197">
                <text:p>0.0040621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59965">
                <text:p>0.00159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78997">
                <text:p>0.01178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276592">
                <text:p>0.0012765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805192">
                <text:p>0.008051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2305628">
                <text:p>-0.0023056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192686">
                <text:p>0.0041926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947671">
                <text:p>0.0039476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372917">
                <text:p>0.0013729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210278">
                <text:p>0.0092102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95953">
                <text:p>0.013959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557613">
                <text:p>0.015576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728351">
                <text:p>-0.007283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95035">
                <text:p>0.01095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798573">
                <text:p>-0.0027985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771106">
                <text:p>-0.005771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548175">
                <text:p>0.0035481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2660621">
                <text:p>0.0026606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05978904">
                <text:p>-0.0005978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6110463">
                <text:p>-0.0061104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6128636">
                <text:p>-0.0061286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7146134">
                <text:p>-0.007146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9040317">
                <text:p>-0.0090403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-0.0002572069">
                <text:p>-0.00025720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4827366">
                <text:p>0.0048273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548214">
                <text:p>0.0045482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385207">
                <text:p>0.0083852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973003">
                <text:p>-0.0039730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7040641">
                <text:p>-0.00070406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619684">
                <text:p>0.016196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087819">
                <text:p>0.0010878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1401187">
                <text:p>-0.001401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06316">
                <text:p>0.01063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90967">
                <text:p>0.010909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1431554">
                <text:p>0.0014315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867555">
                <text:p>0.0078675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6319173">
                <text:p>-0.0063191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145503">
                <text:p>0.0011455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00424">
                <text:p>0.010004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5848865">
                <text:p>-0.0058488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52457">
                <text:p>0.003524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568452">
                <text:p>0.015684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5859">
                <text:p>0.0055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668362">
                <text:p>0.0016683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8873708">
                <text:p>-0.0088737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280365">
                <text:p>0.012803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4922621">
                <text:p>-0.00049226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25846">
                <text:p>-0.001258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07502792">
                <text:p>0.00075027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256144">
                <text:p>0.007256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6104068">
                <text:p>-0.0061040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358443">
                <text:p>0.013584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635">
                <text:p>0.0116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028284">
                <text:p>0.010282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288999">
                <text:p>0.00288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144817">
                <text:p>0.0031448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856339">
                <text:p>-0.0038563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229014">
                <text:p>0.006229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8512158">
                <text:p>-0.0085121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-0.0003496436">
                <text:p>-0.00034964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2012597">
                <text:p>0.0020125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107207">
                <text:p>0.0031072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078166">
                <text:p>-0.0060781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5227174">
                <text:p>-0.0052271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904759">
                <text:p>0.0089047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636477">
                <text:p>0.0026364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01812839">
                <text:p>-0.00018128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1084424">
                <text:p>-0.0010844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812143">
                <text:p>0.0038121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825395">
                <text:p>0.018253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42317">
                <text:p>0.010423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1954219">
                <text:p>-0.0019542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267646">
                <text:p>-0.002676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59315">
                <text:p>0.008593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25048">
                <text:p>0.01250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66434">
                <text:p>0.001664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09263974">
                <text:p>-0.00092639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6729192">
                <text:p>-0.0006729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293453">
                <text:p>0.0062934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511559">
                <text:p>0.0065115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6457498">
                <text:p>-0.0064574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43408">
                <text:p>0.01434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922379">
                <text:p>0.0089223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464538">
                <text:p>0.0054645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5595375">
                <text:p>-0.0055953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7001913">
                <text:p>-0.0070019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708861">
                <text:p>-0.0047088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592827">
                <text:p>-0.002592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5498101">
                <text:p>-0.0054981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094799">
                <text:p>0.0070947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09928525">
                <text:p>0.0099285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215517">
                <text:p>0.0032155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7313944">
                <text:p>0.0073139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4774881">
                <text:p>-0.0047748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6472484">
                <text:p>-0.0064724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9115684">
                <text:p>-0.0091156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96958">
                <text:p>0.010969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889134">
                <text:p>0.028891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224938">
                <text:p>0.0042249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911679">
                <text:p>0.0079116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114444">
                <text:p>0.0091144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0842312">
                <text:p>-0.0008423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015074">
                <text:p>0.010150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4108235">
                <text:p>0.0041082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754749">
                <text:p>0.0047547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2309551">
                <text:p>-0.0023095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4218344">
                <text:p>0.00042183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975656">
                <text:p>-0.0009756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69677">
                <text:p>0.001696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1336663">
                <text:p>-0.0013366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09939079">
                <text:p>0.0099390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964313">
                <text:p>-0.0029643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6240951">
                <text:p>0.00062409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289735">
                <text:p>0.012897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631563">
                <text:p>0.016315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046351">
                <text:p>0.020463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04304">
                <text:p>0.010043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6366817">
                <text:p>-0.0063668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2587011">
                <text:p>-0.002587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7997145">
                <text:p>-0.0079971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8271568">
                <text:p>-0.0082715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5238378">
                <text:p>0.00052383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2565648">
                <text:p>-0.0025656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7621181">
                <text:p>0.0007621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1691548">
                <text:p>-0.0016915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2658657">
                <text:p>0.0026586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7961848">
                <text:p>0.007961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870601">
                <text:p>-0.0068706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3408386">
                <text:p>-0.0034083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07157">
                <text:p>-0.01071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754695">
                <text:p>-0.0087546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8202215">
                <text:p>-0.0082022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8015005">
                <text:p>-0.008015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4636204">
                <text:p>-0.00046362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716891">
                <text:p>0.0037168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6915279">
                <text:p>0.0069152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4449677">
                <text:p>-0.0044496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339138">
                <text:p>0.003391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6253183">
                <text:p>-0.0062531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856406">
                <text:p>0.0098564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261931">
                <text:p>0.0082619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045762">
                <text:p>0.020457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99569">
                <text:p>0.011995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521177">
                <text:p>0.0025211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404273">
                <text:p>-0.0044042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9861444">
                <text:p>-0.0098614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014347">
                <text:p>0.0070143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7037018">
                <text:p>-0.0070370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3812545">
                <text:p>0.0038125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735375">
                <text:p>-0.005735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4827084">
                <text:p>-0.0048270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879643">
                <text:p>0.0018796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77348">
                <text:p>0.012773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8095807">
                <text:p>-0.0080958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905397">
                <text:p>-0.0049053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919471">
                <text:p>-0.007919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827602">
                <text:p>0.0038276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239826">
                <text:p>-0.0052398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6376116">
                <text:p>-0.0063761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5688048">
                <text:p>-0.0056880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1153726">
                <text:p>-0.0011537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3066635">
                <text:p>0.0030666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013088">
                <text:p>-0.010130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-0.0008228584">
                <text:p>-0.00082285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5905646">
                <text:p>0.0059056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070729">
                <text:p>-0.010707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479001">
                <text:p>-0.0014790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060201">
                <text:p>0.030602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580848">
                <text:p>-0.001580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8458392">
                <text:p>0.00084583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905289">
                <text:p>-0.0069052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085494">
                <text:p>0.010854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644402">
                <text:p>0.006444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36623">
                <text:p>-0.005366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4618876">
                <text:p>-0.0046188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8840267">
                <text:p>-0.008840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624219">
                <text:p>-0.0026242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308095">
                <text:p>-0.0053080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7128445">
                <text:p>0.0071284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8895763">
                <text:p>0.0088957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4478838">
                <text:p>-0.0044788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2159029">
                <text:p>-0.0021590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04859929">
                <text:p>-0.00048599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814306">
                <text:p>-0.0008143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973893">
                <text:p>-0.0039738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967451">
                <text:p>-0.0079674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111199">
                <text:p>0.0031111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402102">
                <text:p>-0.0014021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587866">
                <text:p>0.0075878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8300105">
                <text:p>-0.00083001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6664">
                <text:p>-0.00366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977286">
                <text:p>-0.0029772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6614455">
                <text:p>-0.006614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1480099">
                <text:p>0.0014800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471435">
                <text:p>-0.0024714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62247">
                <text:p>-0.010622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0644563">
                <text:p>-0.0006445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1816346">
                <text:p>-0.0018163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512437">
                <text:p>0.0015124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97148">
                <text:p>0.012971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552733">
                <text:p>0.015527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5881891">
                <text:p>-0.0058818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916054">
                <text:p>0.0039160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7152594">
                <text:p>-0.0071525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6746323">
                <text:p>0.0067463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68022">
                <text:p>-0.004680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078604">
                <text:p>0.0020786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915942">
                <text:p>-0.0059159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7078972">
                <text:p>-0.0070789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3552534">
                <text:p>-0.0035525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239253">
                <text:p>0.012392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979797">
                <text:p>0.0099797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055719">
                <text:p>-0.0070557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2325864">
                <text:p>-0.00023258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5100038">
                <text:p>0.0051000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08047353">
                <text:p>0.00080473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78042">
                <text:p>0.001780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53984">
                <text:p>0.002539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234373">
                <text:p>0.0042343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000978">
                <text:p>0.010009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7189704">
                <text:p>-0.0071897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34795">
                <text:p>0.006347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093521">
                <text:p>-0.010935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6797984">
                <text:p>-0.00679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2383743">
                <text:p>-0.0023837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134628">
                <text:p>0.011346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069165">
                <text:p>-0.0050691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382748">
                <text:p>-0.0023827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5448407">
                <text:p>-0.0054484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144325">
                <text:p>0.011443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981534">
                <text:p>0.0069815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170454">
                <text:p>-0.011704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8256773">
                <text:p>-0.0082567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645629">
                <text:p>-0.0016456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032274">
                <text:p>-0.010322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504335">
                <text:p>0.015043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408612">
                <text:p>-0.0014086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55074">
                <text:p>-0.00550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4581607">
                <text:p>-0.0045816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8321">
                <text:p>-0.00483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130706">
                <text:p>0.011307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056429">
                <text:p>0.010564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283005">
                <text:p>0.012830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9169912">
                <text:p>0.0091699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6378968">
                <text:p>-0.0063789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9365082">
                <text:p>0.0093650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09841442">
                <text:p>0.00098414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5541379">
                <text:p>0.0055413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933477">
                <text:p>-0.0049334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636482">
                <text:p>0.0046364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670127">
                <text:p>0.016701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2824089">
                <text:p>-0.0028240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607142">
                <text:p>0.0076071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408874">
                <text:p>0.004088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9103994">
                <text:p>0.0091039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17524">
                <text:p>0.003175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400138">
                <text:p>0.014001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101606">
                <text:p>0.0031016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236562">
                <text:p>-0.002365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1161621">
                <text:p>-0.0011616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22999">
                <text:p>0.01229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397302">
                <text:p>0.013973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1281788">
                <text:p>-0.00012817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1231336">
                <text:p>-0.0012313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8809585">
                <text:p>-0.008809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183648">
                <text:p>0.011836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7489506">
                <text:p>-0.0074895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159752">
                <text:p>0.011597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174246">
                <text:p>0.011742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9132061">
                <text:p>-0.0091320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609093">
                <text:p>-0.0036090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677644">
                <text:p>0.016776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78769">
                <text:p>0.013787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5685261">
                <text:p>-0.0056852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463761">
                <text:p>0.014637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7244334">
                <text:p>0.0072443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3450855">
                <text:p>-0.0034508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321626">
                <text:p>0.0043216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4008884">
                <text:p>-0.0040088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8240706">
                <text:p>-0.0082407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65433">
                <text:p>0.012654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608892">
                <text:p>-0.0036088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377621">
                <text:p>0.013776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7376918">
                <text:p>0.00073769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643056">
                <text:p>0.0076430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917164">
                <text:p>0.0029171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794678">
                <text:p>0.0027946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44514">
                <text:p>0.00445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9938667">
                <text:p>0.0009938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895647">
                <text:p>-0.0028956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4753995">
                <text:p>-0.0047539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313491">
                <text:p>0.0083134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5620408">
                <text:p>-0.0056204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46512">
                <text:p>0.01465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535289">
                <text:p>0.0045352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6788006">
                <text:p>-0.00067880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6718295">
                <text:p>0.00067182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336222">
                <text:p>0.013362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20436">
                <text:p>0.002204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75438">
                <text:p>0.004754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318657">
                <text:p>0.0023186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606882">
                <text:p>0.0016068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559098">
                <text:p>-0.0045590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788937">
                <text:p>-0.007889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221741">
                <text:p>0.0062217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8024">
                <text:p>0.00480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8258783">
                <text:p>-0.0082587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843361">
                <text:p>0.00284336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204497">
                <text:p>-0.0012044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790655">
                <text:p>0.0017906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2087733">
                <text:p>-0.0020877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143394">
                <text:p>0.0041433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450258">
                <text:p>-0.0034502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370527">
                <text:p>0.013705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3441066">
                <text:p>-0.0034410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3740577">
                <text:p>-0.0037405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2155235">
                <text:p>-0.0021552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946057">
                <text:p>-0.0029460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427832">
                <text:p>0.014278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7544209">
                <text:p>0.00075442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716683">
                <text:p>0.0017166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148708">
                <text:p>-0.0031487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69657">
                <text:p>0.014696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8981997">
                <text:p>0.00089819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6454174">
                <text:p>0.00064541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646692">
                <text:p>-0.006466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576639">
                <text:p>0.015766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1650709">
                <text:p>-0.0016507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224127">
                <text:p>0.012241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9521308">
                <text:p>-0.0095213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049427">
                <text:p>0.0040494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1039675">
                <text:p>-0.010396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79346">
                <text:p>0.012793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64972">
                <text:p>0.002649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7693621">
                <text:p>-0.0076936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1970047">
                <text:p>0.00019700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663351">
                <text:p>0.016633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152076">
                <text:p>0.011520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4275343">
                <text:p>-0.0042753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722441">
                <text:p>-0.0077224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2743367">
                <text:p>-0.00027433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7213051">
                <text:p>0.00072130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498353">
                <text:p>0.0044983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361715">
                <text:p>0.013617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882003">
                <text:p>-0.0028820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1929883">
                <text:p>-0.0019298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5651433">
                <text:p>-0.0056514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004894">
                <text:p>-0.010048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7253509">
                <text:p>0.00072535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6598915">
                <text:p>-0.0065989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230379">
                <text:p>0.012303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160397">
                <text:p>0.021603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6140491">
                <text:p>-0.0061404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445828">
                <text:p>0.0014458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885853">
                <text:p>0.0058858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619273">
                <text:p>-0.0016192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8049938">
                <text:p>-0.0080499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406099">
                <text:p>0.0034060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663146">
                <text:p>-0.0026631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412068">
                <text:p>0.0084120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3056264">
                <text:p>-0.0030562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9348835">
                <text:p>0.0093488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2451801">
                <text:p>-0.0024518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8511249">
                <text:p>-0.0085112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2375616">
                <text:p>-0.0023756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6707806">
                <text:p>-0.0067078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384887">
                <text:p>0.043848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3336701">
                <text:p>-0.0033367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045026">
                <text:p>0.0030450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781536">
                <text:p>0.0027815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74617">
                <text:p>0.04746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08814583">
                <text:p>-0.00088145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142332">
                <text:p>-0.0011423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4416888">
                <text:p>-0.0044168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7346345">
                <text:p>-0.007346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916875">
                <text:p>-0.0029168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258605">
                <text:p>0.012586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3830237">
                <text:p>-0.0038302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509388">
                <text:p>0.0015093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970661">
                <text:p>-0.0039706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535286">
                <text:p>0.0055352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1366">
                <text:p>0.00313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217738">
                <text:p>-0.002177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572343">
                <text:p>0.0055723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985684">
                <text:p>-0.0029856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1656809">
                <text:p>0.0016568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703156">
                <text:p>0.0007031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5564006">
                <text:p>0.0055640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058958">
                <text:p>-0.0030589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3818445">
                <text:p>-0.0038184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627911">
                <text:p>-0.0026279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347768">
                <text:p>-0.0013477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805681">
                <text:p>-0.0018056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6453027">
                <text:p>-0.0064530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75372">
                <text:p>-0.005753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901409">
                <text:p>-0.0039014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134203">
                <text:p>0.021342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1984502">
                <text:p>-0.0019845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728734">
                <text:p>0.017287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3153938">
                <text:p>-0.0031539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783153">
                <text:p>0.0087831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08217613">
                <text:p>-0.00082176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2175931">
                <text:p>-0.0021759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6613524">
                <text:p>-0.0066135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3172719">
                <text:p>-0.0031727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692337">
                <text:p>-0.006923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3006258">
                <text:p>-0.0030062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611999">
                <text:p>0.0026119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713539">
                <text:p>-0.0017135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382837">
                <text:p>0.0063828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995761">
                <text:p>-0.0039957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740719">
                <text:p>0.0067407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077872">
                <text:p>0.0070778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07079427">
                <text:p>-0.00070794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595371">
                <text:p>0.0055953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658701">
                <text:p>0.0046587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09518202">
                <text:p>0.00095182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1355022">
                <text:p>-0.0013550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01866114">
                <text:p>-0.00018661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367481">
                <text:p>-0.003674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27098">
                <text:p>0.001270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1808201">
                <text:p>0.0018082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5847775">
                <text:p>-0.0058477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059463">
                <text:p>0.010594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056329">
                <text:p>-0.0020563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51083">
                <text:p>-0.001510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179798">
                <text:p>0.0001797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6121843">
                <text:p>0.0061218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693739">
                <text:p>0.0056937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504127">
                <text:p>0.0035041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362501">
                <text:p>0.013625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660027">
                <text:p>0.0026600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234258">
                <text:p>0.012342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07770841">
                <text:p>-0.00077708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5974926">
                <text:p>-0.0059749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59267">
                <text:p>0.002592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7345635">
                <text:p>-0.0073456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683492">
                <text:p>0.00268349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2571065">
                <text:p>-0.0025710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9712665">
                <text:p>-0.00097126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1307288">
                <text:p>-0.0013072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9652156">
                <text:p>-0.0096521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642871">
                <text:p>0.0096428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9367421">
                <text:p>-0.0093674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349429">
                <text:p>0.0053494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845924">
                <text:p>0.0058459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447713">
                <text:p>0.0054477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840798">
                <text:p>-0.0088407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3492192">
                <text:p>0.0034921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437288">
                <text:p>0.014372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5101991">
                <text:p>-0.0051019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6056652">
                <text:p>0.00060566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12501">
                <text:p>0.010125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392452">
                <text:p>-0.0023924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2212533">
                <text:p>-0.0022125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3401756">
                <text:p>-0.0034017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715939">
                <text:p>0.017159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8082111">
                <text:p>-0.0080821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683888">
                <text:p>0.0066838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5383272">
                <text:p>-0.00053832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7241454">
                <text:p>-0.0072414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910494">
                <text:p>0.0009104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613817">
                <text:p>-0.0066138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879117">
                <text:p>-0.0078791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4728278">
                <text:p>-0.0047282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517229">
                <text:p>0.0015172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3884387">
                <text:p>-0.00388438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720112">
                <text:p>0.01720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5188189">
                <text:p>0.0051881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867471">
                <text:p>-0.0018674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979108">
                <text:p>0.0089791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3026264">
                <text:p>-0.003026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37219">
                <text:p>0.01372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500535">
                <text:p>0.0055005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7974267">
                <text:p>0.0079742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076914">
                <text:p>0.0030769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966968">
                <text:p>0.019669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120493">
                <text:p>-0.011204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3129243">
                <text:p>-0.0031292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014429">
                <text:p>-0.0050144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424869">
                <text:p>-0.0014248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4041247">
                <text:p>-0.0040412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375013">
                <text:p>-0.0023750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503387">
                <text:p>-0.0065033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2460043">
                <text:p>0.002460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338993">
                <text:p>0.0023389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351429">
                <text:p>-0.0083514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157124">
                <text:p>-0.0021571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6565125">
                <text:p>-0.006565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979738">
                <text:p>0.0019797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424677">
                <text:p>-0.0004246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491903">
                <text:p>0.0014919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2018255">
                <text:p>-0.0020182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476918">
                <text:p>0.0034769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1910152">
                <text:p>0.0019101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2576169">
                <text:p>-0.0025761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996544">
                <text:p>0.019965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853802">
                <text:p>0.0078538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670914">
                <text:p>-0.0046709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709053">
                <text:p>0.0027090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712922">
                <text:p>0.027129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660845">
                <text:p>0.0066608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424555">
                <text:p>0.014245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703807">
                <text:p>0.0067038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520225">
                <text:p>0.0035202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567627">
                <text:p>0.025676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2879643">
                <text:p>0.002879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412439">
                <text:p>0.0241243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09124978">
                <text:p>0.00091249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3019526">
                <text:p>0.0030195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301553">
                <text:p>0.0013015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8154631">
                <text:p>-0.0081546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9230408">
                <text:p>0.0092304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020197">
                <text:p>0.0020201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8908543">
                <text:p>-0.0089085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304471">
                <text:p>-0.0030447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496458">
                <text:p>-0.0014964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9249275">
                <text:p>-0.0092492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6501357">
                <text:p>-0.0065013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1027394">
                <text:p>-0.00010273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4826554">
                <text:p>0.00048265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002878">
                <text:p>-0.0030028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55984">
                <text:p>-0.001559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862215">
                <text:p>-0.0068622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103124">
                <text:p>0.0021031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312531">
                <text:p>0.003125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2982367">
                <text:p>-0.0029823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57299">
                <text:p>0.012572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07227293">
                <text:p>0.00072272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9082265">
                <text:p>0.0090822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006684">
                <text:p>-0.010066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692012">
                <text:p>0.0066920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4264827">
                <text:p>-0.0042648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270413">
                <text:p>-0.002704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010355">
                <text:p>0.0040103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573924">
                <text:p>0.0025739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08547953">
                <text:p>0.00085479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3948793">
                <text:p>-0.0039487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364001">
                <text:p>-0.002364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384277">
                <text:p>-0.003842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3671627">
                <text:p>0.00036716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521668">
                <text:p>-0.0065216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666526">
                <text:p>0.0066665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840184">
                <text:p>-0.0048401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9399176">
                <text:p>-0.009399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669396">
                <text:p>-0.0086693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2763707">
                <text:p>-0.00027637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3358598">
                <text:p>-0.0033585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57942">
                <text:p>0.0005794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4735088">
                <text:p>-0.0047350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4649337">
                <text:p>-0.0046493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2188841">
                <text:p>0.00021888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3583013">
                <text:p>-0.0035830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5305372">
                <text:p>-0.0053053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214239">
                <text:p>0.012142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3514593">
                <text:p>0.0035145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114789">
                <text:p>0.021147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003877">
                <text:p>-0.010038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5831821">
                <text:p>-0.0058318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76798">
                <text:p>0.001767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2864567">
                <text:p>0.0028645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545153">
                <text:p>-0.015451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8687345">
                <text:p>-0.0086873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120334">
                <text:p>0.031203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95005">
                <text:p>0.015950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414771">
                <text:p>0.0054147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1025047">
                <text:p>0.010250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134966">
                <text:p>0.0011349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280709">
                <text:p>0.0042807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4921664">
                <text:p>-0.0049216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8779038">
                <text:p>-0.0087790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6013172">
                <text:p>-0.0060131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134113">
                <text:p>0.011341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724878">
                <text:p>0.0067248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109672">
                <text:p>0.0091096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692049">
                <text:p>0.0016920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283012">
                <text:p>0.012830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3041659">
                <text:p>-0.00304165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4408432">
                <text:p>-0.0044084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744043">
                <text:p>-0.007440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6166078">
                <text:p>-0.0061660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4546757">
                <text:p>-0.0045467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157138">
                <text:p>0.0021571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288595">
                <text:p>0.0042885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4864724">
                <text:p>0.0048647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42125">
                <text:p>0.01421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340135">
                <text:p>-0.003401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176117">
                <text:p>-0.0051761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447952">
                <text:p>0.0014479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144026">
                <text:p>0.0114402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8735715">
                <text:p>-0.0087357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4073158">
                <text:p>0.0040731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202406">
                <text:p>-0.002024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819065">
                <text:p>0.0088190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976302">
                <text:p>0.0059763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777715">
                <text:p>-0.0017777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214394">
                <text:p>0.0221439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333294">
                <text:p>-0.003332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8478762">
                <text:p>-0.0084787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9156826">
                <text:p>-0.0091568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8683869">
                <text:p>0.0086838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6404008">
                <text:p>-0.0064040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16247">
                <text:p>0.01162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420496">
                <text:p>0.0064204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480052">
                <text:p>-0.0024800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440548">
                <text:p>-0.004405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30943">
                <text:p>0.002309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9063807">
                <text:p>-0.0090638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70329">
                <text:p>0.010703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425698">
                <text:p>-0.0004256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3415381">
                <text:p>-0.00341538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030266">
                <text:p>-0.010302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740829">
                <text:p>0.0047408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67253">
                <text:p>0.010672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263786">
                <text:p>0.0062637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4187049">
                <text:p>-0.0041870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563898">
                <text:p>0.0035638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7035069">
                <text:p>-0.0070350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2265885">
                <text:p>-0.0022658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549974">
                <text:p>0.015499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5291448">
                <text:p>-0.0052914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441128">
                <text:p>-0.003441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388186">
                <text:p>-0.013881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2063119">
                <text:p>-0.0020631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698858">
                <text:p>0.0056988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152183">
                <text:p>0.0051521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4556061">
                <text:p>-0.0045560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6541715">
                <text:p>-0.0065417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690051">
                <text:p>0.0036900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16963">
                <text:p>0.01169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304886">
                <text:p>-0.0053048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105896">
                <text:p>0.011058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03348364">
                <text:p>-0.00033483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711066">
                <text:p>-0.0027110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2697568">
                <text:p>0.0026975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679548">
                <text:p>0.0086795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698727">
                <text:p>0.0086987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4329226">
                <text:p>-0.0043292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329603">
                <text:p>-0.0043296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851479">
                <text:p>0.0038514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71143">
                <text:p>0.002711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1065696">
                <text:p>0.0010656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9628321">
                <text:p>-0.0096283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3029427">
                <text:p>0.0030294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405147">
                <text:p>0.00540514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335601">
                <text:p>-0.0063356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9909331">
                <text:p>-0.0099093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1342642">
                <text:p>-0.0013426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9207354">
                <text:p>0.0092073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310184">
                <text:p>-0.0023101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6904213">
                <text:p>-0.0069042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4247562">
                <text:p>-0.0042475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515437">
                <text:p>0.0035154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0.0002801974">
                <text:p>0.00028019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076568">
                <text:p>0.0070765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978181">
                <text:p>-0.0069781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494908">
                <text:p>-0.004949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6397014">
                <text:p>-0.0063970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7509">
                <text:p>0.0175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54629">
                <text:p>0.02546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608475">
                <text:p>-0.0056084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669912">
                <text:p>0.0076699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991369">
                <text:p>0.0079913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8606321">
                <text:p>0.0086063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370689">
                <text:p>-0.003706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212467">
                <text:p>0.012124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2463932">
                <text:p>-0.0024639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7435937">
                <text:p>0.00074359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2842321">
                <text:p>-0.0028423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927878">
                <text:p>0.0069278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179562">
                <text:p>-0.0011795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796585">
                <text:p>-0.0037965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6125085">
                <text:p>-0.00612508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848683">
                <text:p>0.0038486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5550022">
                <text:p>-0.0055500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558578">
                <text:p>-0.0015585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3461587">
                <text:p>-0.0034615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913751">
                <text:p>0.009137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087479">
                <text:p>0.010874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9287">
                <text:p>0.00692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00758">
                <text:p>0.020075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6297369">
                <text:p>-0.0062973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1750476">
                <text:p>-0.0017504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1855493">
                <text:p>0.0018554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74613">
                <text:p>0.004746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3449295">
                <text:p>-0.0034492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32032">
                <text:p>0.01320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746777">
                <text:p>0.0174677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846848">
                <text:p>0.0088468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043922">
                <text:p>0.0030439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108232">
                <text:p>0.00310823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423348">
                <text:p>-0.0014233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047542">
                <text:p>0.0050475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542787">
                <text:p>-0.00254278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070872">
                <text:p>-0.0040708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5145203">
                <text:p>-0.00514520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549065">
                <text:p>0.0154906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3045131">
                <text:p>0.00304513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410935">
                <text:p>-0.00841093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5705999">
                <text:p>-0.0057059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190953">
                <text:p>0.021909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4003007">
                <text:p>-0.00400300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1966011">
                <text:p>-0.0019660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4004303">
                <text:p>-0.0040043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435037">
                <text:p>0.0024350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129018">
                <text:p>-0.00212901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512306">
                <text:p>-0.00151230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5865714">
                <text:p>0.0058657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8729047">
                <text:p>-0.0087290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8224978">
                <text:p>-0.00822497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224446">
                <text:p>-0.0042244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26806">
                <text:p>0.012268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2623693">
                <text:p>0.00262369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008302">
                <text:p>-0.0100830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048903">
                <text:p>0.0030489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1735391">
                <text:p>-0.0017353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679909">
                <text:p>0.0267990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8035164">
                <text:p>-0.00080351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463511">
                <text:p>-0.0014635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5884256">
                <text:p>0.00588425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3274445">
                <text:p>0.00327444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839076">
                <text:p>-0.0088390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6481427">
                <text:p>0.0064814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548572">
                <text:p>0.0035485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1022981">
                <text:p>-0.00102298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37158">
                <text:p>0.0033715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3435694">
                <text:p>0.00343569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-0.0003181185">
                <text:p>-0.00031811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5157021">
                <text:p>-0.00051570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709008">
                <text:p>0.0047090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651859">
                <text:p>-0.00365185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542494">
                <text:p>0.0154249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5287434">
                <text:p>0.0052874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156509">
                <text:p>-0.00615650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09791493">
                <text:p>-0.00979149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665075">
                <text:p>0.0076650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042337">
                <text:p>-0.0080423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163953">
                <text:p>-0.011639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778938">
                <text:p>-0.0027789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3375682">
                <text:p>0.0033756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561501">
                <text:p>-0.00856150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686594">
                <text:p>-0.0068659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4137859">
                <text:p>0.00413785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08509">
                <text:p>0.02085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5094952">
                <text:p>-0.00509495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8609562">
                <text:p>-0.00860956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6234686">
                <text:p>-0.00623468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600506">
                <text:p>0.060050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198931">
                <text:p>-0.00019893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2689642">
                <text:p>-0.00268964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773119">
                <text:p>0.00777311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215797">
                <text:p>0.032157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3172684">
                <text:p>-0.000317268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594016">
                <text:p>-0.0159401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144501">
                <text:p>0.021445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16298">
                <text:p>0.011629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217409">
                <text:p>-0.0022174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1198574">
                <text:p>-0.00119857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6531958">
                <text:p>0.0065319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8181574">
                <text:p>0.000818157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575604">
                <text:p>0.0157560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894764">
                <text:p>0.0018947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109986">
                <text:p>0.00610998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057765">
                <text:p>-0.010577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574772">
                <text:p>0.00157477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9575527">
                <text:p>0.0095755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5040763">
                <text:p>-0.00504076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0.0007870003">
                <text:p>0.000787000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188589">
                <text:p>0.021885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994364">
                <text:p>0.00299436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1378872">
                <text:p>-0.00137887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0.0006325971">
                <text:p>0.000632597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1755359">
                <text:p>-0.0017553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93285">
                <text:p>0.00932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4507126">
                <text:p>0.0045071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4301766">
                <text:p>-0.0043017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0.0002062492">
                <text:p>0.000206249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961131">
                <text:p>0.0039611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5411684">
                <text:p>-0.00541168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646902">
                <text:p>-0.00964690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674857">
                <text:p>0.0026748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907206">
                <text:p>-0.00390720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5417324">
                <text:p>0.00541732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643814">
                <text:p>0.026438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3846166">
                <text:p>-0.00384616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0.0006327316">
                <text:p>0.00063273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2339048">
                <text:p>0.0023390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3859235">
                <text:p>-0.00385923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037016">
                <text:p>-0.0020370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5561843">
                <text:p>0.00556184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8009754">
                <text:p>0.00800975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2494268">
                <text:p>-0.00249426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9089932">
                <text:p>-0.00908993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7453447">
                <text:p>0.00745344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0.0004930862">
                <text:p>0.000493086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290227">
                <text:p>-0.00529022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1901587">
                <text:p>0.00190158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89401">
                <text:p>0.0018940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852874">
                <text:p>0.00485287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514918">
                <text:p>-0.0045149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3782988">
                <text:p>-0.000378298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806783">
                <text:p>0.0058067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4079618">
                <text:p>0.0040796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3720802">
                <text:p>-0.00372080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1965453">
                <text:p>0.00196545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400039">
                <text:p>0.0140003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2634312">
                <text:p>-0.0026343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09420135">
                <text:p>-0.000942013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2492801">
                <text:p>-0.0024928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571564">
                <text:p>0.015715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326274">
                <text:p>0.0032627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5032004">
                <text:p>0.0050320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1000502">
                <text:p>0.010005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2335567">
                <text:p>0.00233556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4917089">
                <text:p>0.0049170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4851277">
                <text:p>-0.0048512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7769144">
                <text:p>-0.00776914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5754499">
                <text:p>-0.00575449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245246">
                <text:p>0.0124524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374203">
                <text:p>-0.00737420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1449503">
                <text:p>-0.0014495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7475905">
                <text:p>0.0074759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069679">
                <text:p>0.0106967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230514">
                <text:p>0.012305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7608585">
                <text:p>-0.00760858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05637683">
                <text:p>-0.000563768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1153115">
                <text:p>-0.00115311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036152">
                <text:p>-0.0103615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1488029">
                <text:p>0.0014880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692847">
                <text:p>0.0169284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2090042">
                <text:p>0.00209004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018708">
                <text:p>0.010187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09759523">
                <text:p>-0.0097595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7498988">
                <text:p>0.00749898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2891181">
                <text:p>-0.0028911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109111">
                <text:p>-0.00210911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222916">
                <text:p>-0.012229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7008621">
                <text:p>0.0070086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3448929">
                <text:p>0.00344892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1434373">
                <text:p>0.00143437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173477">
                <text:p>-0.0117347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923011">
                <text:p>0.0092301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5066342">
                <text:p>-0.0050663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0389571">
                <text:p>-0.00038957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300322">
                <text:p>-0.0130032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1460835">
                <text:p>0.00146083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28268">
                <text:p>0.012826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2446343">
                <text:p>0.0024463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177067">
                <text:p>-0.0117706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8362639">
                <text:p>0.0083626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102364">
                <text:p>0.011023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6093454">
                <text:p>-0.00609345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1575098">
                <text:p>-0.00157509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3218568">
                <text:p>0.00321856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8568863">
                <text:p>0.00856886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32264">
                <text:p>-0.0103226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4255275">
                <text:p>0.00425527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1025999">
                <text:p>0.0102599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6527807">
                <text:p>0.0065278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1013127">
                <text:p>0.010131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6143266">
                <text:p>-0.0061432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1999178">
                <text:p>-0.00199917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689543">
                <text:p>0.0068954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09485833">
                <text:p>-0.0094858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2712964">
                <text:p>-0.0027129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700005">
                <text:p>0.017000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5500708">
                <text:p>-0.0055007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2789187">
                <text:p>-0.0027891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280585">
                <text:p>-0.002805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3015739">
                <text:p>0.00301573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87787">
                <text:p>-0.001877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32619">
                <text:p>-0.0103261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494459">
                <text:p>-0.0149445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747755">
                <text:p>0.0067477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974867">
                <text:p>0.009748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5748596">
                <text:p>-0.00574859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163484">
                <text:p>-0.0021634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106623">
                <text:p>0.0110662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203311">
                <text:p>0.012033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6377471">
                <text:p>-0.00637747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4584479">
                <text:p>-0.00458447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8397463">
                <text:p>0.0083974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889939">
                <text:p>0.0088899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435787">
                <text:p>-0.0094357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09890856">
                <text:p>-0.0098908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155808">
                <text:p>0.011558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3001166">
                <text:p>-0.000300116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5736776">
                <text:p>-0.00573677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0245">
                <text:p>-0.00402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609648">
                <text:p>-0.00460964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546065">
                <text:p>0.0085460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5250766">
                <text:p>-0.00525076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423537">
                <text:p>-0.0142353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506677">
                <text:p>0.0150667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024978">
                <text:p>-0.0102497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9564797">
                <text:p>0.00956479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4162462">
                <text:p>0.00416246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3284365">
                <text:p>0.00328436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284311">
                <text:p>-0.012843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805408">
                <text:p>0.0180540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9631569">
                <text:p>0.00963156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234316">
                <text:p>0.012343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06179842">
                <text:p>-0.000617984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09323793">
                <text:p>-0.000932379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1831601">
                <text:p>-0.0018316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5733483">
                <text:p>0.0057334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249906">
                <text:p>0.0124990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4305216">
                <text:p>0.000430521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487045">
                <text:p>0.00748704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656515">
                <text:p>0.0165651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624846">
                <text:p>-0.00662484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417702">
                <text:p>-0.00141770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100997">
                <text:p>0.0110099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397146">
                <text:p>0.0339714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15833">
                <text:p>0.011583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069877">
                <text:p>-0.00706987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6861">
                <text:p>0.004686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6530441">
                <text:p>0.00653044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488693">
                <text:p>-0.0048869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8675593">
                <text:p>0.00867559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771236">
                <text:p>0.0377123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440524">
                <text:p>0.0144052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29863">
                <text:p>-0.0102986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804873">
                <text:p>-0.00380487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74417">
                <text:p>0.010744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622297">
                <text:p>-0.00262229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287392">
                <text:p>0.00828739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322913">
                <text:p>0.0132291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06325465">
                <text:p>-0.00063254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88145">
                <text:p>-0.0108814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5666927">
                <text:p>-0.000566692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909211">
                <text:p>0.00590921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004435">
                <text:p>-0.00100443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711833">
                <text:p>-0.00971183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8195752">
                <text:p>0.00819575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3443651">
                <text:p>0.00344365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6550501">
                <text:p>0.00655050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058445">
                <text:p>-0.00305844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721672">
                <text:p>0.00572167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156072">
                <text:p>0.00115607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03018">
                <text:p>0.01030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3459813">
                <text:p>-0.000345981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2341704">
                <text:p>0.00234170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33858">
                <text:p>0.0123385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8823548">
                <text:p>-0.00882354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400214">
                <text:p>-0.0054002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470156">
                <text:p>0.00647015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609698">
                <text:p>0.00560969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089344">
                <text:p>-0.0080893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367955">
                <text:p>0.013679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7365042">
                <text:p>0.00736504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806189">
                <text:p>0.00580618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566642">
                <text:p>-0.00156664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68558">
                <text:p>-0.0106855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583991">
                <text:p>0.0015839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17429">
                <text:p>-0.0041742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93421">
                <text:p>-0.0059342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123301">
                <text:p>-0.00912330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528677">
                <text:p>0.0065286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842442">
                <text:p>-0.0038424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140053">
                <text:p>-0.00314005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795479">
                <text:p>-0.00779547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391539">
                <text:p>0.00339153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386027">
                <text:p>0.0138602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7116621">
                <text:p>-0.00711662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381104">
                <text:p>-0.0138110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494277">
                <text:p>-0.00849427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754375">
                <text:p>0.00175437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841901">
                <text:p>-0.00484190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710441">
                <text:p>-0.0067104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4359995">
                <text:p>0.00435999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5483425">
                <text:p>0.0054834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1905475">
                <text:p>-0.0019054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9679382">
                <text:p>-0.00967938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82078">
                <text:p>0.0168207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3047731">
                <text:p>-0.00304773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317967">
                <text:p>-0.013179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3669518">
                <text:p>0.00366951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491996">
                <text:p>0.0249199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2081456">
                <text:p>-0.0020814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6448008">
                <text:p>-0.0064480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8119076">
                <text:p>0.00811907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721946">
                <text:p>-0.00472194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1690907">
                <text:p>0.0016909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294475">
                <text:p>-0.0062944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9389629">
                <text:p>-0.0093896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1371994">
                <text:p>0.00137199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016536">
                <text:p>-0.010165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5911814">
                <text:p>-0.0059118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7939591">
                <text:p>-0.00793959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1278883">
                <text:p>-0.00127888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242251">
                <text:p>0.0092422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210683">
                <text:p>-0.0021068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55819">
                <text:p>-0.003558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09761991">
                <text:p>-0.00097619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6964463">
                <text:p>-0.00696446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7396794">
                <text:p>-0.00739679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746382">
                <text:p>-0.00574638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508226">
                <text:p>0.025082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1194888">
                <text:p>-0.00119488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2671057">
                <text:p>0.00267105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9875366">
                <text:p>0.00987536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8967642">
                <text:p>0.0089676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9118716">
                <text:p>0.0091187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04728714">
                <text:p>0.000472871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802734">
                <text:p>-0.00580273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3510257">
                <text:p>-0.00351025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121563">
                <text:p>0.00512156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049398">
                <text:p>-0.0104939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4560778">
                <text:p>0.00456077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06541">
                <text:p>0.0050654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05118138">
                <text:p>-0.000511813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9805952">
                <text:p>-0.00980595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06547">
                <text:p>0.010654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413385">
                <text:p>0.0441338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1377637">
                <text:p>0.00137763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668345">
                <text:p>0.0166834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232345">
                <text:p>-0.0123234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6694734">
                <text:p>0.00669473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2919927">
                <text:p>0.00291992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728701">
                <text:p>0.0172870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45454">
                <text:p>-0.0014545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198162">
                <text:p>0.019816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398521">
                <text:p>0.0139852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5373428">
                <text:p>0.00537342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88783">
                <text:p>-0.0088878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3038179">
                <text:p>0.00303817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798353">
                <text:p>0.00179835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353805">
                <text:p>-0.0135380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9289348">
                <text:p>-0.00928934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572446">
                <text:p>0.0085724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1476827">
                <text:p>-0.00147682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892526">
                <text:p>-0.00789252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152962">
                <text:p>-0.0115296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271945">
                <text:p>0.0127194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5876478">
                <text:p>0.0058764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6263564">
                <text:p>-0.00626356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3041125">
                <text:p>-0.00304112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581979">
                <text:p>0.0158197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624065">
                <text:p>0.0262406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566891">
                <text:p>-0.00456689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2788367">
                <text:p>0.00278836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240904">
                <text:p>0.00224090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883613">
                <text:p>0.0188361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250587">
                <text:p>0.0225058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248474">
                <text:p>-0.0124847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626214">
                <text:p>0.00562621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5292946">
                <text:p>-0.0052929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8441979">
                <text:p>-0.00844197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158178">
                <text:p>-0.00715817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028739">
                <text:p>0.00402873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7230678">
                <text:p>-0.00723067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6643161">
                <text:p>-0.00664316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167304">
                <text:p>0.00216730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7349157">
                <text:p>0.00734915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1836727">
                <text:p>0.00183672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185056">
                <text:p>-0.0118505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161109">
                <text:p>-0.011611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0820455">
                <text:p>0.0008204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034168">
                <text:p>0.00703416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7085341">
                <text:p>0.00708534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280376">
                <text:p>-0.0128037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484342">
                <text:p>0.0148434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02369397">
                <text:p>0.000236939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8600166">
                <text:p>-0.0086001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6265308">
                <text:p>-0.00626530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581695">
                <text:p>0.0158169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1642878">
                <text:p>0.0016428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379422">
                <text:p>-0.013794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8911285">
                <text:p>-0.0089112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52481">
                <text:p>0.015248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9043507">
                <text:p>-0.00904350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4943069">
                <text:p>-0.00494306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339743">
                <text:p>-0.0133974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6385201">
                <text:p>-0.00638520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032375">
                <text:p>0.0103237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423985">
                <text:p>-0.0142398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163697">
                <text:p>-0.00516369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729497">
                <text:p>0.00272949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-0.0002629675">
                <text:p>-0.000262967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182446">
                <text:p>-0.0118244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5970602">
                <text:p>-0.00597060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204406">
                <text:p>0.0120440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2668605">
                <text:p>-0.00266860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3449711">
                <text:p>-0.0034497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268295">
                <text:p>-0.0126829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3036835">
                <text:p>-0.0030368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1959626">
                <text:p>0.0195962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9406899">
                <text:p>-0.00940689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6583682">
                <text:p>-0.00658368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1504919">
                <text:p>0.00150491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0507167">
                <text:p>0.00050716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7230233">
                <text:p>-0.00723023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724433">
                <text:p>-0.00472443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2140467">
                <text:p>0.0021404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300381">
                <text:p>0.0130038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6114039">
                <text:p>-0.00611403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576235">
                <text:p>-0.00557623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932455">
                <text:p>0.0069324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4160917">
                <text:p>-0.00416091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1016963">
                <text:p>-0.0101696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6339901">
                <text:p>-0.00633990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09290138">
                <text:p>0.000929013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3557024">
                <text:p>0.00355702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2985124">
                <text:p>0.00298512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121265">
                <text:p>-0.0112126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586463">
                <text:p>-0.0058646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2944556">
                <text:p>0.00294455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039412">
                <text:p>-0.0103941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5506455">
                <text:p>-0.00550645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3810086">
                <text:p>-0.0038100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460078">
                <text:p>0.0146007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933499">
                <text:p>-0.0093349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594935">
                <text:p>-0.00359493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233847">
                <text:p>0.0123384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661612">
                <text:p>0.0166161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629816">
                <text:p>-0.00762981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2596627">
                <text:p>0.00259662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6023248">
                <text:p>-0.00602324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728394">
                <text:p>0.007283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518365">
                <text:p>-0.015183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08570261">
                <text:p>0.000857026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3726153">
                <text:p>0.0037261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98484">
                <text:p>0.00984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374933">
                <text:p>-0.00237493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9241657">
                <text:p>-0.00924165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1630981">
                <text:p>0.00163098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634864">
                <text:p>0.0163486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245795">
                <text:p>-0.0124579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567616">
                <text:p>-0.0156761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49295">
                <text:p>0.007492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1166582">
                <text:p>-0.00116658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571246">
                <text:p>-0.00357124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186267">
                <text:p>-0.011862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2684862">
                <text:p>-0.00268486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3243437">
                <text:p>0.00324343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386772">
                <text:p>-0.0138677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5089823">
                <text:p>-0.00508982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28925">
                <text:p>0.0122892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09721162">
                <text:p>0.000972116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6683323">
                <text:p>0.00668332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8909809">
                <text:p>-0.00890980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440337">
                <text:p>-0.00144033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288608">
                <text:p>0.0228860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199355">
                <text:p>-0.0119935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8633255">
                <text:p>-0.00863325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105101">
                <text:p>0.021051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01832303">
                <text:p>0.000183230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144455">
                <text:p>-0.00314445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702123">
                <text:p>-0.00270212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609725">
                <text:p>0.00460972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1825006">
                <text:p>0.00182500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8191973">
                <text:p>0.000819197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260157">
                <text:p>-0.00526015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8936782">
                <text:p>0.00893678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3517592">
                <text:p>-0.00351759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086225">
                <text:p>0.0108622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0983578">
                <text:p>0.00098357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7163771">
                <text:p>0.00716377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6693423">
                <text:p>0.00669342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6724811">
                <text:p>0.00672481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1044403">
                <text:p>-0.0104440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4157183">
                <text:p>0.00415718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770133">
                <text:p>0.0177013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425217">
                <text:p>-0.00542521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263759">
                <text:p>-0.0126375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5554904">
                <text:p>0.00555490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2743323">
                <text:p>-0.00274332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393892">
                <text:p>-0.013938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351534">
                <text:p>-0.0135153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6535418">
                <text:p>0.00653541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3400597">
                <text:p>-0.00340059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2414757">
                <text:p>-0.00241475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8466787">
                <text:p>-0.00846678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4238424">
                <text:p>0.00423842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88407">
                <text:p>0.003884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465428">
                <text:p>-0.0146542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110199">
                <text:p>-0.00611019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7483911">
                <text:p>0.00748391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177139">
                <text:p>-0.0117713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20155">
                <text:p>0.0122015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517334">
                <text:p>0.0051733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345621">
                <text:p>-0.013456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234514">
                <text:p>-0.0023451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5402591">
                <text:p>-0.0054025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8866678">
                <text:p>0.00886667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4121281">
                <text:p>-0.00412128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1187738">
                <text:p>0.00118773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23838">
                <text:p>0.0102383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3720158">
                <text:p>-0.00372015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037106">
                <text:p>-0.0103710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9173325">
                <text:p>0.00917332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00420652">
                <text:p>0.00042065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4851514">
                <text:p>-0.0048515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221782">
                <text:p>-0.012217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3993923">
                <text:p>0.00399392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515666">
                <text:p>0.00351566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20987">
                <text:p>-0.012098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1772774">
                <text:p>0.00177277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103463">
                <text:p>0.0010346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1406006">
                <text:p>0.00140600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947419">
                <text:p>-0.0059474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9167303">
                <text:p>-0.00916730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040645">
                <text:p>0.0104064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5572309">
                <text:p>-0.00557230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824017">
                <text:p>-0.008240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08303669">
                <text:p>-0.000830366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128875">
                <text:p>0.0112887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3290964">
                <text:p>0.00329096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687779">
                <text:p>0.00068777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1194">
                <text:p>-0.01119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482203">
                <text:p>-0.0048220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467178">
                <text:p>0.00546717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1382878">
                <text:p>0.00138287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575306">
                <text:p>-0.0015753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4832659">
                <text:p>-0.00483265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1591748">
                <text:p>-0.00159174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7478021">
                <text:p>-0.00747802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5734267">
                <text:p>-0.00573426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2313033">
                <text:p>-0.00231303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5627185">
                <text:p>0.00562718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228081">
                <text:p>-0.012280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156856">
                <text:p>-0.011568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353936">
                <text:p>0.0035393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706091">
                <text:p>0.00770609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263261">
                <text:p>-0.0126326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4748524">
                <text:p>0.00474852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3670499">
                <text:p>-0.00367049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6212">
                <text:p>0.02621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329493">
                <text:p>-0.0013294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9411334">
                <text:p>0.00941133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4421775">
                <text:p>-0.00442177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7109651">
                <text:p>-0.00710965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264768">
                <text:p>0.0126476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033201">
                <text:p>-0.0103320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8614797">
                <text:p>0.00861479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4723326">
                <text:p>0.00472332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513068">
                <text:p>-0.00451306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2182224">
                <text:p>0.0021822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135507">
                <text:p>0.0213550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3225282">
                <text:p>0.00322528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3141787">
                <text:p>-0.00314178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1005102">
                <text:p>-0.010051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4755368">
                <text:p>0.00475536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136912">
                <text:p>0.00613691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0002189144">
                <text:p>0.000218914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065171">
                <text:p>-0.010651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599204">
                <text:p>0.0059920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641498">
                <text:p>0.0164149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4506398">
                <text:p>-0.00450639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24194">
                <text:p>-0.0012419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474508">
                <text:p>0.0147450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06516719">
                <text:p>-0.00065167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3345276">
                <text:p>0.00334527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313504">
                <text:p>-0.013135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3566008">
                <text:p>0.00356600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70357">
                <text:p>0.027035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6993843">
                <text:p>-0.00699384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6230746">
                <text:p>-0.00623074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7597465">
                <text:p>0.00759746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2491094">
                <text:p>-0.00249109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7551093">
                <text:p>-0.00755109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432612">
                <text:p>-0.0143261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-0.0005331833">
                <text:p>-0.000533183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65702">
                <text:p>0.026570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429676">
                <text:p>-0.00342967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230261">
                <text:p>0.0023026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1988553">
                <text:p>0.0019885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08386751">
                <text:p>0.000838675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09701906">
                <text:p>-0.00970190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089999">
                <text:p>-0.0108999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2100841">
                <text:p>0.00210084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33467">
                <text:p>-0.01334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4435438">
                <text:p>-0.00443543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7068959">
                <text:p>0.00706895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08406072">
                <text:p>0.000840607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3298576">
                <text:p>-0.0032985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6608883">
                <text:p>0.0660888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-0.0009391584">
                <text:p>-0.000939158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2531326">
                <text:p>-0.00253132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3612233">
                <text:p>0.0036122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164145">
                <text:p>-0.011641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1826821">
                <text:p>0.00182682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4380429">
                <text:p>-0.0043804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8881639">
                <text:p>-0.00888163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1579759">
                <text:p>0.00157975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593934">
                <text:p>0.00459393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1051574">
                <text:p>-0.00105157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6064963">
                <text:p>-0.00606496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8927139">
                <text:p>-0.00892713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2800708">
                <text:p>-0.00280070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6367003">
                <text:p>0.00636700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09882633">
                <text:p>-0.00988263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7120825">
                <text:p>-0.00712082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0001600848">
                <text:p>0.000160084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3780771">
                <text:p>-0.00378077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07748538">
                <text:p>-0.000774853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245388">
                <text:p>-0.0124538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08448632">
                <text:p>-0.00084486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539307">
                <text:p>0.00453930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5118169">
                <text:p>0.00511816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7668978">
                <text:p>-0.00766897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2352994">
                <text:p>-0.00235299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0002021747">
                <text:p>0.000202174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143531">
                <text:p>-0.00214353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1798913">
                <text:p>-0.00179891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8165625">
                <text:p>0.00816562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41965">
                <text:p>0.024196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05834451">
                <text:p>-0.000583445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5162939">
                <text:p>-0.00516293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541702">
                <text:p>0.00254170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108032">
                <text:p>0.0110803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7951736">
                <text:p>-0.00795173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6179649">
                <text:p>-0.00617964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660416">
                <text:p>0.00166041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04764028">
                <text:p>0.000476402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1762377">
                <text:p>0.00176237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792813">
                <text:p>-0.00479281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7616357">
                <text:p>0.00761635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08785275">
                <text:p>0.000878527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1991984">
                <text:p>0.00199198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4893584">
                <text:p>0.00489358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9878622">
                <text:p>0.0098786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1775015">
                <text:p>-0.00177501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4937129">
                <text:p>-0.00493712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243185">
                <text:p>-0.0124318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5502643">
                <text:p>-0.0055026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05045512">
                <text:p>-0.000504551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194178">
                <text:p>-0.0119417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8736185">
                <text:p>-0.00873618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1465237">
                <text:p>-0.00146523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1501424">
                <text:p>-0.00150142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5522589">
                <text:p>-0.00552258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0001709092">
                <text:p>0.000170909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090411">
                <text:p>0.00109041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5494953">
                <text:p>-0.00549495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7192403">
                <text:p>-0.00719240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802934">
                <text:p>-0.0080293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889964">
                <text:p>0.0188996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5303675">
                <text:p>0.00530367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5413498">
                <text:p>-0.00541349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229079">
                <text:p>-0.00122907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466589">
                <text:p>0.0146658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2204556">
                <text:p>-0.00220455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2556658">
                <text:p>-0.00255665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4912148">
                <text:p>-0.00491214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7655432">
                <text:p>0.00765543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3931976">
                <text:p>0.00393197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1175835">
                <text:p>-0.00117583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9099227">
                <text:p>-0.00909922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2960175">
                <text:p>-0.00296017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4610644">
                <text:p>0.0046106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409658">
                <text:p>-0.0040965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133005">
                <text:p>-0.0113300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5848226">
                <text:p>0.00584822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2022717">
                <text:p>0.00202271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171158">
                <text:p>-0.0117115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9289356">
                <text:p>0.00928935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2367862">
                <text:p>-0.00236786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4439489">
                <text:p>-0.00443948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006966">
                <text:p>-0.0100696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16983">
                <text:p>-0.011698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2681765">
                <text:p>-0.00268176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477662">
                <text:p>-0.0047766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1094431">
                <text:p>-0.0010944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2575483">
                <text:p>-0.00257548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3479816">
                <text:p>-0.00347981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5241466">
                <text:p>0.00524146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5176912">
                <text:p>0.0517691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03087913">
                <text:p>-0.000308791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1130684">
                <text:p>0.0113068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179405">
                <text:p>-0.0017940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2088303">
                <text:p>0.0208830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09829503">
                <text:p>-0.00982950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62064">
                <text:p>0.006206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5742354">
                <text:p>0.00574235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8632088">
                <text:p>-0.00863208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09225247">
                <text:p>-0.00922524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1011004">
                <text:p>0.0101100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5522482">
                <text:p>0.00552248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4178708">
                <text:p>-0.00417870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7562438">
                <text:p>0.00756243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6330732">
                <text:p>0.0063307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8092228">
                <text:p>0.0080922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1100722">
                <text:p>0.0110072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1769962">
                <text:p>-0.00176996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2228252">
                <text:p>0.00222825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8095868">
                <text:p>0.00809586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5506265">
                <text:p>-0.00550626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2843529">
                <text:p>0.00284352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001713472">
                <text:p>0.0017134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5921138">
                <text:p>0.00592113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3303952">
                <text:p>-0.00330395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175189">
                <text:p>-0.0117518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03357234">
                <text:p>-0.000335723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6488448">
                <text:p>0.00648844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0009592366">
                <text:p>0.000959236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4092767">
                <text:p>0.00409276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0.0002288143">
                <text:p>0.00022881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490384">
                <text:p>0.0149038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002085983">
                <text:p>0.00208598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418533">
                <text:p>0.0041853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03217934">
                <text:p>-0.000321793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2918996">
                <text:p>-0.00291899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4708967">
                <text:p>-0.0047089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02812878">
                <text:p>-0.000281287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08350587">
                <text:p>-0.000835058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479039">
                <text:p>0.0147903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3283815">
                <text:p>0.032838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4173914">
                <text:p>-0.00417391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1981234">
                <text:p>0.00198123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7576083">
                <text:p>0.00757608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4894187">
                <text:p>-0.00489418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3354424">
                <text:p>0.00335442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547008">
                <text:p>0.0154700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3557642">
                <text:p>0.00355764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6106935">
                <text:p>0.00610693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003123717">
                <text:p>0.00312371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1621701">
                <text:p>-0.00162170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8325651">
                <text:p>0.00832565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484327">
                <text:p>0.0148432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7845066">
                <text:p>0.00784506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299419">
                <text:p>0.022994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1057414">
                <text:p>0.0105741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6376033">
                <text:p>-0.0063760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7037582">
                <text:p>-0.0070375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4985547">
                <text:p>0.00498554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001117333">
                <text:p>0.00111733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7027182">
                <text:p>0.00702718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03490708">
                <text:p>-0.000349070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5639928">
                <text:p>0.00563992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4186064">
                <text:p>0.00418606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05630096">
                <text:p>-0.000563009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3956664">
                <text:p>-0.00395666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863098">
                <text:p>0.0186309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1651099">
                <text:p>-0.00165109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00380981">
                <text:p>0.0038098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2329553">
                <text:p>-0.00232955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00164382">
                <text:p>0.0016438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1757512">
                <text:p>-0.0017575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4678685">
                <text:p>-0.00467868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001722092">
                <text:p>0.00172209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607846">
                <text:p>0.0260784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605785">
                <text:p>0.0060578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4678835">
                <text:p>-0.00467883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5516776">
                <text:p>0.00551677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1060326">
                <text:p>0.0106032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2052953">
                <text:p>-0.00205295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2479877">
                <text:p>-0.00247987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00177967">
                <text:p>0.0017796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239197">
                <text:p>-0.0023919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587591">
                <text:p>0.0158759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5978905">
                <text:p>0.00597890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4471159">
                <text:p>0.0447115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1515737">
                <text:p>0.0151573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5611081">
                <text:p>0.00561108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0002135185">
                <text:p>0.000213518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7927381">
                <text:p>0.00792738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5946609">
                <text:p>0.00594660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2124859">
                <text:p>0.0212485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4691525">
                <text:p>-0.00469152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217458">
                <text:p>0.021745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1177636">
                <text:p>0.0117763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7548335">
                <text:p>0.00754833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5901282">
                <text:p>0.00590128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7224835">
                <text:p>0.00722483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001942999">
                <text:p>0.00194299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156458">
                <text:p>-0.0015645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04391463">
                <text:p>-0.00439146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1447484">
                <text:p>0.0144748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9377464">
                <text:p>0.00937746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1128533">
                <text:p>0.0112853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04565271">
                <text:p>-0.00456527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2690398">
                <text:p>0.0269039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1300759">
                <text:p>0.0130075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1971122">
                <text:p>-0.00197112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0001241563">
                <text:p>0.000124156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08205969">
                <text:p>0.00820596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2738195">
                <text:p>0.0273819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002684131">
                <text:p>0.00268413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00387942">
                <text:p>0.0038794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1440637">
                <text:p>0.0144063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125438">
                <text:p>0.012543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002523748">
                <text:p>0.00252374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06579873">
                <text:p>-0.00657987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005359987">
                <text:p>0.00535998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001780972">
                <text:p>0.00178097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003597366">
                <text:p>0.00359736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216921">
                <text:p>0.021692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002485511">
                <text:p>0.00248551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2133309">
                <text:p>0.0213330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002330283">
                <text:p>0.00233028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1617555">
                <text:p>0.0161755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2211875">
                <text:p>0.0221187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1121324">
                <text:p>0.0112132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2759467">
                <text:p>0.0275946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001751051">
                <text:p>0.00175105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1336546">
                <text:p>0.0133654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008791389">
                <text:p>0.00879138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002347009">
                <text:p>0.00234700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01888696">
                <text:p>-0.00188869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170865">
                <text:p>0.017086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1407041">
                <text:p>0.0140704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002766703">
                <text:p>0.00276670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00890589">
                <text:p>0.0089058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2133433">
                <text:p>0.0213343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004408198">
                <text:p>0.00440819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2995505">
                <text:p>0.0299550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2429309">
                <text:p>0.0242930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1605177">
                <text:p>0.0160517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1331032">
                <text:p>0.013310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009543835">
                <text:p>0.00954383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001014437">
                <text:p>0.00101443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18609">
                <text:p>0.01860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2667709">
                <text:p>0.0266770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01123667">
                <text:p>0.0112366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1752154">
                <text:p>0.0175215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158745">
                <text:p>0.015874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1507185">
                <text:p>0.0150718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01527785">
                <text:p>0.0152778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1595202">
                <text:p>0.0159520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1754148">
                <text:p>0.0175414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0152425">
                <text:p>0.015242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009072698">
                <text:p>0.00907269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006222725">
                <text:p>0.00622272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2048448">
                <text:p>0.0204844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6875482">
                <text:p>0.0687548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2624469">
                <text:p>0.026244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2081433">
                <text:p>0.020814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2200821">
                <text:p>0.0220082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01897872">
                <text:p>0.0189787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2274182">
                <text:p>0.0227418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2441681">
                <text:p>0.0244168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01709694">
                <text:p>0.017096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01949139">
                <text:p>0.0194913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02172484">
                <text:p>0.0217248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01754684">
                <text:p>0.0175468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2581764">
                <text:p>0.0258176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4956612">
                <text:p>0.0495661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2737392">
                <text:p>0.0273739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4184192">
                <text:p>0.0418419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01778706">
                <text:p>0.0177870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02194192">
                <text:p>0.0219419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2570323">
                <text:p>0.0257032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01645918">
                <text:p>0.0164591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346866">
                <text:p>0.034686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0222373">
                <text:p>0.022237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02258013">
                <text:p>0.0225801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5260497">
                <text:p>0.0526049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02754134">
                <text:p>0.0275413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3660908">
                <text:p>0.0366090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354355">
                <text:p>0.03543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02227669">
                <text:p>0.0222766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4472721">
                <text:p>0.044727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3998938">
                <text:p>0.0399893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03189284">
                <text:p>0.031892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3905423">
                <text:p>0.0390542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02964048">
                <text:p>0.0296404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03039283">
                <text:p>0.0303928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4276563">
                <text:p>0.0427656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02763229">
                <text:p>0.0276322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03475603">
                <text:p>0.0347560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03219172">
                <text:p>0.0321917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03030762">
                <text:p>0.0303076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4373917">
                <text:p>0.0437391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4078071">
                <text:p>0.0407807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4218867">
                <text:p>0.0421886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03232199">
                <text:p>0.0323219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03769338">
                <text:p>0.0376933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04043366">
                <text:p>0.040433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4969282">
                <text:p>0.0496928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5557672">
                <text:p>0.0555767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5367068">
                <text:p>0.0536706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04611141">
                <text:p>0.0461114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04393306">
                <text:p>0.0439330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03624805">
                <text:p>0.0362480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04032812">
                <text:p>0.0403281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04702707">
                <text:p>0.0470270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05180695">
                <text:p>0.051806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716201">
                <text:p>0.071620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05212836">
                <text:p>0.0521283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5630643">
                <text:p>0.0563064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05514488">
                <text:p>0.0551448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5921713">
                <text:p>0.0592171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05302842">
                <text:p>0.053028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6170936">
                <text:p>0.0617093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05831618">
                <text:p>0.0583161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6422468">
                <text:p>0.0642246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05046029">
                <text:p>0.0504602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9823534">
                <text:p>0.0982353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6725574">
                <text:p>0.0672557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9530335">
                <text:p>0.095303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6829609">
                <text:p>0.0682960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1010179">
                <text:p>0.101017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06885089">
                <text:p>0.0688508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7567776">
                <text:p>0.0756777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06266195">
                <text:p>0.062661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8209015">
                <text:p>0.0820901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7694901">
                <text:p>0.0769490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06785487">
                <text:p>0.0678548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7762635">
                <text:p>0.0776263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07759663">
                <text:p>0.0775966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07903942">
                <text:p>0.0790394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07883053">
                <text:p>0.0788305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07356296">
                <text:p>0.0735629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928007">
                <text:p>0.092800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07981444">
                <text:p>0.0798144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08022356">
                <text:p>0.080223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08828088">
                <text:p>0.0882808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08916038">
                <text:p>0.0891603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106747">
                <text:p>0.10674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09205353">
                <text:p>0.0920535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0924451">
                <text:p>0.092445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08969247">
                <text:p>0.0896924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09889517">
                <text:p>0.0988951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1019086">
                <text:p>0.101908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1001224">
                <text:p>0.100122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1143663">
                <text:p>0.114366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103309">
                <text:p>0.1033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110846">
                <text:p>0.11084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1244345">
                <text:p>0.124434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1116063">
                <text:p>0.111606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1036622">
                <text:p>0.10366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1197035">
                <text:p>0.119703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120263">
                <text:p>0.12026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1138737">
                <text:p>0.113873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1315501">
                <text:p>0.131550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1227743">
                <text:p>0.122774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1194151">
                <text:p>0.119415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1377578">
                <text:p>0.137757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1266531">
                <text:p>0.126653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139268">
                <text:p>0.13926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1220868">
                <text:p>0.122086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1386741">
                <text:p>0.138674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1446245">
                <text:p>0.144624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1319821">
                <text:p>0.131982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1442303">
                <text:p>0.144230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1397946">
                <text:p>0.139794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1418298">
                <text:p>0.141829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1510649">
                <text:p>0.151064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1499664">
                <text:p>0.149966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1531882">
                <text:p>0.153188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1630003">
                <text:p>0.163000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1508212">
                <text:p>0.150821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164114">
                <text:p>0.16411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1656954">
                <text:p>0.165695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1693392">
                <text:p>0.169339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156625">
                <text:p>0.15662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1683519">
                <text:p>0.168351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1730694">
                <text:p>0.17306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1760085">
                <text:p>0.176008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1637425">
                <text:p>0.163742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1781798">
                <text:p>0.178179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186081">
                <text:p>0.18608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1893728">
                <text:p>0.189372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1858742">
                <text:p>0.185874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1982651">
                <text:p>0.198265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2020055">
                <text:p>0.202005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2052002">
                <text:p>0.205200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1886373">
                <text:p>0.18863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2017246">
                <text:p>0.201724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2038667">
                <text:p>0.203866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203299">
                <text:p>0.20329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2062585">
                <text:p>0.206258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2143902">
                <text:p>0.214390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2056999">
                <text:p>0.205699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2151614">
                <text:p>0.215161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2192383">
                <text:p>0.219238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2213948">
                <text:p>0.221394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2110687">
                <text:p>0.211068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2221961">
                <text:p>0.222196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2254865">
                <text:p>0.225486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2230329">
                <text:p>0.223032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2160848">
                <text:p>0.216084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2232966">
                <text:p>0.223296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2399359">
                <text:p>0.239935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2265946">
                <text:p>0.226594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2432089">
                <text:p>0.243208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2367187">
                <text:p>0.236718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2482379">
                <text:p>0.248237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2393122">
                <text:p>0.239312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236947">
                <text:p>0.23694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2458792">
                <text:p>0.245879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2447886">
                <text:p>0.244788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2582968">
                <text:p>0.258296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2533945">
                <text:p>0.253394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2593369">
                <text:p>0.259336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2726185">
                <text:p>0.27261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268813">
                <text:p>0.26881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2654346">
                <text:p>0.26543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2739499">
                <text:p>0.273949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2590154">
                <text:p>0.259015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2724188">
                <text:p>0.272418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26858">
                <text:p>0.2685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2739857">
                <text:p>0.27398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2866767">
                <text:p>0.286676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2844371">
                <text:p>0.284437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2818754">
                <text:p>0.281875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2863617">
                <text:p>0.286361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281983">
                <text:p>0.28198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2891666">
                <text:p>0.289166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2794412">
                <text:p>0.279441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2951367">
                <text:p>0.295136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283602">
                <text:p>0.28360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3096507">
                <text:p>0.309650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2924036">
                <text:p>0.292403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2888151">
                <text:p>0.288815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3029688">
                <text:p>0.302968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2955055">
                <text:p>0.295505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3145086">
                <text:p>0.314508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3012014">
                <text:p>0.301201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3052517">
                <text:p>0.305251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3211332">
                <text:p>0.321133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3046855">
                <text:p>0.304685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3079498">
                <text:p>0.30794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3071749">
                <text:p>0.307174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3103698">
                <text:p>0.310369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3176141">
                <text:p>0.317614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3346756">
                <text:p>0.334675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309682">
                <text:p>0.30968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3289699">
                <text:p>0.328969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3205261">
                <text:p>0.320526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3163366">
                <text:p>0.316336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3095001">
                <text:p>0.309500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3240074">
                <text:p>0.324007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3200602">
                <text:p>0.320060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3443236">
                <text:p>0.344323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3289373">
                <text:p>0.328937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3246335">
                <text:p>0.324633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3268023">
                <text:p>0.326802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3221104">
                <text:p>0.322110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324771">
                <text:p>0.32477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3235281">
                <text:p>0.323528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3299764">
                <text:p>0.329976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3311978">
                <text:p>0.331197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3346927">
                <text:p>0.334692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3359358">
                <text:p>0.335935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3374151">
                <text:p>0.337415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3439845">
                <text:p>0.343984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3427592">
                <text:p>0.342759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3315115">
                <text:p>0.331511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3392543">
                <text:p>0.339254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3331164">
                <text:p>0.333116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3500721">
                <text:p>0.350072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3519016">
                <text:p>0.351901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3439318">
                <text:p>0.343931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3425712">
                <text:p>0.342571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3399117">
                <text:p>0.33991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3399569">
                <text:p>0.339956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3499795">
                <text:p>0.349979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3439711">
                <text:p>0.343971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3374095">
                <text:p>0.337409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3617193">
                <text:p>0.361719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3456212">
                <text:p>0.345621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33535">
                <text:p>0.3353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3477147">
                <text:p>0.34771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3437535">
                <text:p>0.343753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3463401">
                <text:p>0.346340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3347985">
                <text:p>0.334798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339274">
                <text:p>0.33927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3435104">
                <text:p>0.343510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3558735">
                <text:p>0.355873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3440185">
                <text:p>0.344018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3480576">
                <text:p>0.348057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3490461">
                <text:p>0.349046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3545762">
                <text:p>0.354576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3432676">
                <text:p>0.343267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3481572">
                <text:p>0.348157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3480938">
                <text:p>0.348093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3487051">
                <text:p>0.348705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3537709">
                <text:p>0.353770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3357409">
                <text:p>0.335740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3478896">
                <text:p>0.347889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3564552">
                <text:p>0.356455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3449714">
                <text:p>0.344971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350715">
                <text:p>0.35071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3494173">
                <text:p>0.349417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3454472">
                <text:p>0.345447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3385446">
                <text:p>0.338544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3528403">
                <text:p>0.352840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3720221">
                <text:p>0.372022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3389845">
                <text:p>0.338984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3407142">
                <text:p>0.340714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3511768">
                <text:p>0.351176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3435827">
                <text:p>0.343582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3418494">
                <text:p>0.341849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3493253">
                <text:p>0.349325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3409786">
                <text:p>0.340978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3555097">
                <text:p>0.355509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3401523">
                <text:p>0.340152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3334289">
                <text:p>0.333428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3531068">
                <text:p>0.353106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3583058">
                <text:p>0.358305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3376117">
                <text:p>0.337611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3504809">
                <text:p>0.350480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3443041">
                <text:p>0.344304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3442091">
                <text:p>0.344209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3421937">
                <text:p>0.342193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3286324">
                <text:p>0.328632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3338174">
                <text:p>0.333817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3329476">
                <text:p>0.332947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3414739">
                <text:p>0.341473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3525247">
                <text:p>0.352524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3307881">
                <text:p>0.330788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3402457">
                <text:p>0.340245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3531217">
                <text:p>0.353121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3267575">
                <text:p>0.326757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3285349">
                <text:p>0.328534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3345877">
                <text:p>0.334587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3287857">
                <text:p>0.328785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3218455">
                <text:p>0.321845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3431746">
                <text:p>0.343174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3404115">
                <text:p>0.340411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3312537">
                <text:p>0.331253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3382661">
                <text:p>0.338266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3621005">
                <text:p>0.362100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3299034">
                <text:p>0.329903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3300842">
                <text:p>0.330084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3378148">
                <text:p>0.337814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3313644">
                <text:p>0.331364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3182037">
                <text:p>0.318203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3234442">
                <text:p>0.323444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3181365">
                <text:p>0.318136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3313331">
                <text:p>0.331333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3253151">
                <text:p>0.325315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336949">
                <text:p>0.33694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3240206">
                <text:p>0.324020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3180111">
                <text:p>0.318011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3219675">
                <text:p>0.32196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3257165">
                <text:p>0.325716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3113405">
                <text:p>0.311340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3393778">
                <text:p>0.339377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3225116">
                <text:p>0.322511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3146203">
                <text:p>0.314620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318746">
                <text:p>0.31874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3359128">
                <text:p>0.335912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3243702">
                <text:p>0.324370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3170618">
                <text:p>0.317061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3099791">
                <text:p>0.309979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3265088">
                <text:p>0.326508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3129399">
                <text:p>0.312939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3163573">
                <text:p>0.316357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308382">
                <text:p>0.30838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3316823">
                <text:p>0.331682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3351991">
                <text:p>0.335199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2994261">
                <text:p>0.299426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3024616">
                <text:p>0.302461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3147694">
                <text:p>0.314769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3135619">
                <text:p>0.313561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2885158">
                <text:p>0.288515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3062093">
                <text:p>0.306209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3097371">
                <text:p>0.309737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3214189">
                <text:p>0.321418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2853788">
                <text:p>0.285378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3000746">
                <text:p>0.300074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3008529">
                <text:p>0.300852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3046188">
                <text:p>0.304618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2968049">
                <text:p>0.296804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2837996">
                <text:p>0.283799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2810002">
                <text:p>0.281000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2873545">
                <text:p>0.287354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2891736">
                <text:p>0.289173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2736305">
                <text:p>0.273630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2840281">
                <text:p>0.284028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2985068">
                <text:p>0.298506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2980301">
                <text:p>0.298030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281689">
                <text:p>0.28168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2761353">
                <text:p>0.276135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2827321">
                <text:p>0.282732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2727763">
                <text:p>0.272776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2792266">
                <text:p>0.279226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2790478">
                <text:p>0.279047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2764824">
                <text:p>0.276482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264162">
                <text:p>0.26416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2789303">
                <text:p>0.278930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2672387">
                <text:p>0.267238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2903155">
                <text:p>0.290315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2646067">
                <text:p>0.264606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2759162">
                <text:p>0.275916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2621454">
                <text:p>0.262145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2590077">
                <text:p>0.259007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2554805">
                <text:p>0.255480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2609184">
                <text:p>0.260918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2660242">
                <text:p>0.266024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252505">
                <text:p>0.25250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2519355">
                <text:p>0.251935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2651205">
                <text:p>0.265120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2555984">
                <text:p>0.25559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2546661">
                <text:p>0.254666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2650843">
                <text:p>0.265084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2482025">
                <text:p>0.248202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2554732">
                <text:p>0.255473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2464386">
                <text:p>0.246438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2481526">
                <text:p>0.248152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2440713">
                <text:p>0.244071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2432449">
                <text:p>0.243244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2394816">
                <text:p>0.239481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2484738">
                <text:p>0.248473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2459484">
                <text:p>0.245948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2434264">
                <text:p>0.243426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2443344">
                <text:p>0.244334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247853">
                <text:p>0.24785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235087">
                <text:p>0.23508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259147">
                <text:p>0.25914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2332283">
                <text:p>0.233228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2482866">
                <text:p>0.248286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2298352">
                <text:p>0.229835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2283954">
                <text:p>0.228395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227537">
                <text:p>0.22753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2285147">
                <text:p>0.228514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2355491">
                <text:p>0.235549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2324007">
                <text:p>0.232400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2209078">
                <text:p>0.220907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2327023">
                <text:p>0.232702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2359868">
                <text:p>0.235986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2220312">
                <text:p>0.222031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2389089">
                <text:p>0.238908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2151411">
                <text:p>0.215141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2190242">
                <text:p>0.219024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2312977">
                <text:p>0.231297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2216901">
                <text:p>0.221690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2256595">
                <text:p>0.225659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2101492">
                <text:p>0.21014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2236162">
                <text:p>0.223616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2086862">
                <text:p>0.208686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2124946">
                <text:p>0.212494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2143459">
                <text:p>0.214345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2097317">
                <text:p>0.209731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2278274">
                <text:p>0.227827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2078803">
                <text:p>0.207880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2060859">
                <text:p>0.206085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2069726">
                <text:p>0.206972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2072972">
                <text:p>0.207297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2178303">
                <text:p>0.217830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2349478">
                <text:p>0.234947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1977823">
                <text:p>0.197782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203624">
                <text:p>0.20362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2081536">
                <text:p>0.208153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2002169">
                <text:p>0.200216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2050458">
                <text:p>0.205045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1970213">
                <text:p>0.197021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19683">
                <text:p>0.1968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1984274">
                <text:p>0.198427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1924319">
                <text:p>0.19243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1909821">
                <text:p>0.190982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2025834">
                <text:p>0.202583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2103089">
                <text:p>0.210308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1985957">
                <text:p>0.198595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1932391">
                <text:p>0.193239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1920985">
                <text:p>0.192098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202704">
                <text:p>0.20270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1953075">
                <text:p>0.19530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1909159">
                <text:p>0.190915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1893165">
                <text:p>0.18931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1987716">
                <text:p>0.198771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2020005">
                <text:p>0.202000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1919328">
                <text:p>0.191932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1983521">
                <text:p>0.198352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1836585">
                <text:p>0.183658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1794745">
                <text:p>0.179474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1828046">
                <text:p>0.182804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1843567">
                <text:p>0.184356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1863705">
                <text:p>0.186370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187619">
                <text:p>0.18761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1820296">
                <text:p>0.182029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1837348">
                <text:p>0.183734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1775447">
                <text:p>0.177544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1736038">
                <text:p>0.173603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1819444">
                <text:p>0.181944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1715592">
                <text:p>0.171559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1753899">
                <text:p>0.175389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2054981">
                <text:p>0.205498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1771609">
                <text:p>0.177160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1706651">
                <text:p>0.170665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1756806">
                <text:p>0.175680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1706618">
                <text:p>0.170661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1676247">
                <text:p>0.167624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1793682">
                <text:p>0.179368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1633366">
                <text:p>0.163336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179241">
                <text:p>0.17924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173807">
                <text:p>0.17380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1675413">
                <text:p>0.167541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1767744">
                <text:p>0.176774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1773372">
                <text:p>0.177337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1693998">
                <text:p>0.169399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168193">
                <text:p>0.16819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1659358">
                <text:p>0.165935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1558097">
                <text:p>0.155809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1707733">
                <text:p>0.170773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1713465">
                <text:p>0.171346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1612417">
                <text:p>0.161241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1858825">
                <text:p>0.185882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1547989">
                <text:p>0.154798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1637807">
                <text:p>0.163780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1678114">
                <text:p>0.167811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1524857">
                <text:p>0.152485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1558837">
                <text:p>0.155883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1605742">
                <text:p>0.160574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1637283">
                <text:p>0.163728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1629339">
                <text:p>0.162933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1709299">
                <text:p>0.170929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1654325">
                <text:p>0.165432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1656227">
                <text:p>0.165622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1530748">
                <text:p>0.153074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1545113">
                <text:p>0.154511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1665487">
                <text:p>0.166548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1589328">
                <text:p>0.158932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1639007">
                <text:p>0.163900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1476413">
                <text:p>0.147641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1561077">
                <text:p>0.156107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1617147">
                <text:p>0.161714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1638415">
                <text:p>0.163841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1545884">
                <text:p>0.154588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1560496">
                <text:p>0.156049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1560792">
                <text:p>0.156079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1643294">
                <text:p>0.164329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1528439">
                <text:p>0.152843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1474353">
                <text:p>0.147435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1444933">
                <text:p>0.144493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1495927">
                <text:p>0.1495927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1451446">
                <text:p>0.14514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1552177">
                <text:p>0.155217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1423566">
                <text:p>0.142356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1454153">
                <text:p>0.145415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143171">
                <text:p>0.14317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1381096">
                <text:p>0.138109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1526029">
                <text:p>0.15260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1387271">
                <text:p>0.138727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1457343">
                <text:p>0.145734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1404935">
                <text:p>0.140493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1447065">
                <text:p>0.144706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1349507">
                <text:p>0.134950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181908">
                <text:p>0.18190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1500877">
                <text:p>0.150087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1374503">
                <text:p>0.137450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1377065">
                <text:p>0.137706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1483427">
                <text:p>0.148342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1487444">
                <text:p>0.1487444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1346502">
                <text:p>0.134650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1457825">
                <text:p>0.145782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1372298">
                <text:p>0.137229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1519474">
                <text:p>0.151947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1361011">
                <text:p>0.136101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1506477">
                <text:p>0.150647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137814">
                <text:p>0.13781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1413264">
                <text:p>0.141326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1293096">
                <text:p>0.129309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1310393">
                <text:p>0.131039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153736">
                <text:p>0.15373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1302631">
                <text:p>0.130263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1273181">
                <text:p>0.127318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1260343">
                <text:p>0.126034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1314571">
                <text:p>0.131457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1273452">
                <text:p>0.127345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1245065">
                <text:p>0.124506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1223834">
                <text:p>0.122383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1193628">
                <text:p>0.119362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1375943">
                <text:p>0.137594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1247971">
                <text:p>0.124797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1269683">
                <text:p>0.126968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1285141">
                <text:p>0.128514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1249543">
                <text:p>0.124954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1248484">
                <text:p>0.124848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1272459">
                <text:p>0.127245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1312412">
                <text:p>0.131241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118936">
                <text:p>0.11893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1233957">
                <text:p>0.1233957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1291421">
                <text:p>0.129142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1244096">
                <text:p>0.124409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1212698">
                <text:p>0.121269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1279013">
                <text:p>0.127901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1373266">
                <text:p>0.137326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1490556">
                <text:p>0.149055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1244859">
                <text:p>0.124485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135523">
                <text:p>0.13552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1162242">
                <text:p>0.116224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1224635">
                <text:p>0.122463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1206548">
                <text:p>0.120654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1310744">
                <text:p>0.131074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1227237">
                <text:p>0.122723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1260166">
                <text:p>0.126016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1201724">
                <text:p>0.120172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1350445">
                <text:p>0.135044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1182256">
                <text:p>0.118225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1242324">
                <text:p>0.124232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1193697">
                <text:p>0.119369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1150264">
                <text:p>0.115026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1198791">
                <text:p>0.119879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1167522">
                <text:p>0.116752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1318655">
                <text:p>0.131865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1181147">
                <text:p>0.118114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1117056">
                <text:p>0.111705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1387641">
                <text:p>0.138764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1230898">
                <text:p>0.123089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1252119">
                <text:p>0.125211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1165097">
                <text:p>0.116509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1126756">
                <text:p>0.112675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1248445">
                <text:p>0.12484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1187498">
                <text:p>0.118749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1141409">
                <text:p>0.114140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1222036">
                <text:p>0.122203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1093017">
                <text:p>0.109301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1127401">
                <text:p>0.112740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1250577">
                <text:p>0.125057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1254732">
                <text:p>0.125473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1162032">
                <text:p>0.116203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1003008">
                <text:p>0.100300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119541">
                <text:p>0.1195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1048712">
                <text:p>0.104871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1097725">
                <text:p>0.109772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1165909">
                <text:p>0.116590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1176588">
                <text:p>0.117658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1089261">
                <text:p>0.108926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1173715">
                <text:p>0.117371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1068023">
                <text:p>0.106802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1030167">
                <text:p>0.103016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1312282">
                <text:p>0.131228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1011259">
                <text:p>0.101125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1058017">
                <text:p>0.105801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9646423">
                <text:p>0.0964642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1076098">
                <text:p>0.107609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9611667">
                <text:p>0.0961166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1082748">
                <text:p>0.108274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1072909">
                <text:p>0.107290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1044015">
                <text:p>0.104401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101842">
                <text:p>0.10184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1050772">
                <text:p>0.105077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1059811">
                <text:p>0.105981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9979254">
                <text:p>0.0997925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1078034">
                <text:p>0.107803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111771">
                <text:p>0.11177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9425128">
                <text:p>0.0942512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1058682">
                <text:p>0.105868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108239">
                <text:p>0.10823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9347551">
                <text:p>0.09347551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9631633">
                <text:p>0.0963163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857649">
                <text:p>0.085764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9832054">
                <text:p>0.0983205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1021976">
                <text:p>0.1021976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1066843">
                <text:p>0.106684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1062943">
                <text:p>0.106294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9949615">
                <text:p>0.0994961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9803492">
                <text:p>0.0980349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9493791">
                <text:p>0.0949379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8846436">
                <text:p>0.0884643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9089943">
                <text:p>0.09089943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9193688">
                <text:p>0.0919368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8876695">
                <text:p>0.0887669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1111286">
                <text:p>0.111128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9569614">
                <text:p>0.0956961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9039786">
                <text:p>0.0903978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9457894">
                <text:p>0.0945789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1069506">
                <text:p>0.106950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1026007">
                <text:p>0.102600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9173186">
                <text:p>0.0917318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8645954">
                <text:p>0.0864595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855174">
                <text:p>0.085517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936405">
                <text:p>0.093640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8864736">
                <text:p>0.0886473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920909">
                <text:p>0.092090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8604278">
                <text:p>0.0860427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1000965">
                <text:p>0.100096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1015332">
                <text:p>0.101533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9246612">
                <text:p>0.0924661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1024977">
                <text:p>0.102497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847678">
                <text:p>0.084767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9806605">
                <text:p>0.0980660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8363395">
                <text:p>0.0836339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9049249">
                <text:p>0.09049249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8338641">
                <text:p>0.0833864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8363562">
                <text:p>0.0836356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8103675">
                <text:p>0.0810367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1054825">
                <text:p>0.105482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9664678">
                <text:p>0.0966467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8986904">
                <text:p>0.0898690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8841947">
                <text:p>0.08841947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9105425">
                <text:p>0.0910542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1055605">
                <text:p>0.105560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9436851">
                <text:p>0.09436851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7790941">
                <text:p>0.077909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8413082">
                <text:p>0.0841308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8300919">
                <text:p>0.0830091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7974246">
                <text:p>0.0797424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8898142">
                <text:p>0.0889814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9862926">
                <text:p>0.0986292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8632196">
                <text:p>0.0863219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8544914">
                <text:p>0.0854491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7295974">
                <text:p>0.0729597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7609507">
                <text:p>0.07609507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7390761">
                <text:p>0.0739076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9503756">
                <text:p>0.0950375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8487485">
                <text:p>0.0848748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8391044">
                <text:p>0.0839104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7941659">
                <text:p>0.0794165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7838305">
                <text:p>0.0783830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8062309">
                <text:p>0.0806230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7556508">
                <text:p>0.0755650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7586911">
                <text:p>0.0758691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9430302">
                <text:p>0.0943030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8056398">
                <text:p>0.0805639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7769383">
                <text:p>0.0776938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7130416">
                <text:p>0.0713041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7942762">
                <text:p>0.0794276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7236754">
                <text:p>0.0723675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8318277">
                <text:p>0.08318277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7887594">
                <text:p>0.07887594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7503977">
                <text:p>0.0750397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7131678">
                <text:p>0.0713167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6510605">
                <text:p>0.0651060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7688145">
                <text:p>0.0768814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7711055">
                <text:p>0.0771105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7612538">
                <text:p>0.0761253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7474717">
                <text:p>0.07474717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7611952">
                <text:p>0.0761195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6795978">
                <text:p>0.0679597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808379">
                <text:p>0.080837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8181291">
                <text:p>0.0818129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6959722">
                <text:p>0.0695972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6383051">
                <text:p>0.0638305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8149973">
                <text:p>0.0814997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6602331">
                <text:p>0.0660233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7285281">
                <text:p>0.0728528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6701825">
                <text:p>0.0670182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7099241">
                <text:p>0.0709924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7514606">
                <text:p>0.0751460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6452528">
                <text:p>0.0645252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5930756">
                <text:p>0.05930756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6349702">
                <text:p>0.0634970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6126161">
                <text:p>0.0612616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5663139">
                <text:p>0.0566313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6307243">
                <text:p>0.0630724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8293452">
                <text:p>0.0829345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6057861">
                <text:p>0.0605786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6003851">
                <text:p>0.0600385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5974574">
                <text:p>0.0597457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7198079">
                <text:p>0.0719807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6069062">
                <text:p>0.0606906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6730507">
                <text:p>0.0673050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6531238">
                <text:p>0.0653123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898782">
                <text:p>0.089878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6725629">
                <text:p>0.0672562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6769677">
                <text:p>0.0676967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597773">
                <text:p>0.059777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7263488">
                <text:p>0.0726348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5992205">
                <text:p>0.0599220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6296416">
                <text:p>0.0629641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5906885">
                <text:p>0.0590688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6067816">
                <text:p>0.0606781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6731842">
                <text:p>0.0673184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5579318">
                <text:p>0.0557931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744246">
                <text:p>0.074424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5602498">
                <text:p>0.0560249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5065676">
                <text:p>0.0506567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5356603">
                <text:p>0.0535660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604823">
                <text:p>0.060482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5693359">
                <text:p>0.0569335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6761154">
                <text:p>0.0676115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5296145">
                <text:p>0.0529614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5826084">
                <text:p>0.0582608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6617824">
                <text:p>0.0661782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5639357">
                <text:p>0.05639357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8147339">
                <text:p>0.0814733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6430231">
                <text:p>0.0643023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5514676">
                <text:p>0.0551467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6087238">
                <text:p>0.0608723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6461056">
                <text:p>0.0646105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6390789">
                <text:p>0.0639078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5310039">
                <text:p>0.0531003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5829233">
                <text:p>0.0582923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7136711">
                <text:p>0.0713671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4869704">
                <text:p>0.0486970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6140764">
                <text:p>0.0614076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444985">
                <text:p>0.044498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6749692">
                <text:p>0.0674969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5020801">
                <text:p>0.0502080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6057137">
                <text:p>0.06057137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5556415">
                <text:p>0.0555641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4913877">
                <text:p>0.0491387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560193">
                <text:p>0.056019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4491439">
                <text:p>0.0449143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7278706">
                <text:p>0.0727870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5856536">
                <text:p>0.0585653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5554592">
                <text:p>0.0555459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4491635">
                <text:p>0.0449163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4889116">
                <text:p>0.0488911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4712683">
                <text:p>0.0471268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4078558">
                <text:p>0.0407855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7620181">
                <text:p>0.0762018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449117">
                <text:p>0.044911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4511938">
                <text:p>0.0451193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506467">
                <text:p>0.050646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4083263">
                <text:p>0.0408326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4296599">
                <text:p>0.0429659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7005121">
                <text:p>0.0700512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490268">
                <text:p>0.0490268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7528638">
                <text:p>0.0752863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3839123">
                <text:p>0.0383912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5692096">
                <text:p>0.0569209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6142185">
                <text:p>0.0614218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4404882">
                <text:p>0.0440488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46514">
                <text:p>0.046514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4626279">
                <text:p>0.0462627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4140745">
                <text:p>0.0414074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4758969">
                <text:p>0.0475896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490983">
                <text:p>0.049098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4595878">
                <text:p>0.0459587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367185">
                <text:p>0.036718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3972694">
                <text:p>0.0397269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4938884">
                <text:p>0.0493888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4451069">
                <text:p>0.0445106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3865982">
                <text:p>0.0386598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4569161">
                <text:p>0.0456916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4388275">
                <text:p>0.0438827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4242218">
                <text:p>0.0424221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3294629">
                <text:p>0.03294629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3467886">
                <text:p>0.0346788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4223397">
                <text:p>0.0422339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5748227">
                <text:p>0.0574822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4894091">
                <text:p>0.0489409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4406622">
                <text:p>0.044066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4196062">
                <text:p>0.0419606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4685726">
                <text:p>0.04685726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328623">
                <text:p>0.032862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382028">
                <text:p>0.038202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4481752">
                <text:p>0.0448175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3896783">
                <text:p>0.0389678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3691611">
                <text:p>0.0369161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429999">
                <text:p>0.042999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4504144">
                <text:p>0.0450414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3377631">
                <text:p>0.0337763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3244623">
                <text:p>0.0324462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4297378">
                <text:p>0.0429737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4439954">
                <text:p>0.0443995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574478">
                <text:p>0.057447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315633">
                <text:p>0.031563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5364459">
                <text:p>0.0536445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3839619">
                <text:p>0.0383961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5403545">
                <text:p>0.0540354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4489449">
                <text:p>0.0448944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4622218">
                <text:p>0.0462221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5004385">
                <text:p>0.0500438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3813629">
                <text:p>0.0381362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2906287">
                <text:p>0.0290628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3105029">
                <text:p>0.031050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458387">
                <text:p>0.045838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4241226">
                <text:p>0.0424122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3393064">
                <text:p>0.0339306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3108907">
                <text:p>0.0310890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2807841">
                <text:p>0.0280784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4326559">
                <text:p>0.0432655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4756494">
                <text:p>0.0475649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2616557">
                <text:p>0.0261655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3967041">
                <text:p>0.0396704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2757817">
                <text:p>0.0275781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3120146">
                <text:p>0.0312014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3042005">
                <text:p>0.0304200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2790028">
                <text:p>0.0279002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5507599">
                <text:p>0.0550759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4485441">
                <text:p>0.0448544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4417431">
                <text:p>0.04417431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2674928">
                <text:p>0.0267492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3005409">
                <text:p>0.0300540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3450843">
                <text:p>0.0345084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6125438">
                <text:p>0.0612543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4462822">
                <text:p>0.0446282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4344372">
                <text:p>0.0434437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2698706">
                <text:p>0.0269870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3948366">
                <text:p>0.0394836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3076749">
                <text:p>0.03076749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2590327">
                <text:p>0.0259032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3068714">
                <text:p>0.0306871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3573433">
                <text:p>0.0357343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4331963">
                <text:p>0.0433196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3223065">
                <text:p>0.0322306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3088984">
                <text:p>0.0308898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3929049">
                <text:p>0.0392904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4306892">
                <text:p>0.0430689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251089">
                <text:p>0.0251089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389173">
                <text:p>0.038917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2832047">
                <text:p>0.0283204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4608345">
                <text:p>0.0460834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2161466">
                <text:p>0.0216146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2984691">
                <text:p>0.02984691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2963079">
                <text:p>0.0296307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4067726">
                <text:p>0.0406772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3018764">
                <text:p>0.0301876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3101407">
                <text:p>0.0310140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2631607">
                <text:p>0.0263160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2190079">
                <text:p>0.02190079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3682376">
                <text:p>0.0368237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606663">
                <text:p>0.060666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2304856">
                <text:p>0.0230485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2762669">
                <text:p>0.0276266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2512215">
                <text:p>0.0251221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3945852">
                <text:p>0.0394585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1957942">
                <text:p>0.0195794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279379">
                <text:p>0.027937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2492482">
                <text:p>0.0249248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2083545">
                <text:p>0.0208354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211897">
                <text:p>0.021189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2798118">
                <text:p>0.0279811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2272392">
                <text:p>0.0227239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4747609">
                <text:p>0.0474760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2189287">
                <text:p>0.0218928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1903643">
                <text:p>0.0190364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320121">
                <text:p>0.032012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3473958">
                <text:p>0.0347395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2523392">
                <text:p>0.0252339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1574219">
                <text:p>0.0157421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4456731">
                <text:p>0.0445673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3341051">
                <text:p>0.0334105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1924342">
                <text:p>0.0192434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2834715">
                <text:p>0.0283471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2519893">
                <text:p>0.02519893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2006917">
                <text:p>0.0200691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2031587">
                <text:p>0.0203158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3428769">
                <text:p>0.0342876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3497707">
                <text:p>0.0349770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255326">
                <text:p>0.025532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3484118">
                <text:p>0.0348411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162548">
                <text:p>0.016254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2191154">
                <text:p>0.0219115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1661564">
                <text:p>0.0166156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1631996">
                <text:p>0.0163199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2708761">
                <text:p>0.0270876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3653717">
                <text:p>0.036537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1719448">
                <text:p>0.0171944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4615174">
                <text:p>0.0461517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253477">
                <text:p>0.0253477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2132857">
                <text:p>0.0213285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1561296">
                <text:p>0.0156129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1425718">
                <text:p>0.0142571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1698825">
                <text:p>0.01698825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3475836">
                <text:p>0.0347583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3827178">
                <text:p>0.0382717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1817013">
                <text:p>0.0181701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190523">
                <text:p>0.0190523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1503254">
                <text:p>0.0150325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3453748">
                <text:p>0.03453748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2399971">
                <text:p>0.0239997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1027406">
                <text:p>0.0102740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1765009">
                <text:p>0.0176500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2375476">
                <text:p>0.0237547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1861886">
                <text:p>0.0186188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1885852">
                <text:p>0.0188585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3589116">
                <text:p>0.0358911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1642307">
                <text:p>0.0164230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3465176">
                <text:p>0.0346517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164759">
                <text:p>0.016475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3210662">
                <text:p>0.0321066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2147048">
                <text:p>0.0214704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139955">
                <text:p>0.013995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2924768">
                <text:p>0.0292476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2823865">
                <text:p>0.0282386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1439673">
                <text:p>0.0143967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09849646">
                <text:p>0.009849646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08912832">
                <text:p>0.00891283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1492721">
                <text:p>0.0149272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1535417">
                <text:p>0.0153541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2189097">
                <text:p>0.0218909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2798337">
                <text:p>0.0279833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1874642">
                <text:p>0.0187464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1312338">
                <text:p>0.0131233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2369901">
                <text:p>0.0236990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1765941">
                <text:p>0.0176594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2088303">
                <text:p>0.0208830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1540873">
                <text:p>0.01540873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12929">
                <text:p>0.01292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1556442">
                <text:p>0.0155644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2712672">
                <text:p>0.0271267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1425359">
                <text:p>0.0142535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1697555">
                <text:p>0.0169755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252199">
                <text:p>0.025219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2018163">
                <text:p>0.0201816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1684043">
                <text:p>0.01684043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2897709">
                <text:p>0.0289770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2620468">
                <text:p>0.0262046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2291469">
                <text:p>0.0229146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1847985">
                <text:p>0.0184798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1648865">
                <text:p>0.0164886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357043">
                <text:p>0.035704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1163579">
                <text:p>0.0116357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1202248">
                <text:p>0.0120224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1629149">
                <text:p>0.0162914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154308">
                <text:p>0.015430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127413">
                <text:p>0.0127413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1386217">
                <text:p>0.0138621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2337136">
                <text:p>0.0233713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2299058">
                <text:p>0.0229905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266428">
                <text:p>0.026642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248369">
                <text:p>0.024836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1566811">
                <text:p>0.0156681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113363">
                <text:p>0.011336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1617055">
                <text:p>0.0161705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1312823">
                <text:p>0.0131282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1146576">
                <text:p>0.01146576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1523916">
                <text:p>0.01523916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1356784">
                <text:p>0.01356784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0894108">
                <text:p>0.0089410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2406747">
                <text:p>0.0240674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1844954">
                <text:p>0.0184495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765007">
                <text:p>0.0276500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1410944">
                <text:p>0.0141094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2113425">
                <text:p>0.0211342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4089645">
                <text:p>0.0408964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2068842">
                <text:p>0.0206884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1345841">
                <text:p>0.0134584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1313736">
                <text:p>0.0131373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2052577">
                <text:p>0.0205257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1226935">
                <text:p>0.0122693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771287">
                <text:p>0.0177128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982804">
                <text:p>0.03982804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08510388">
                <text:p>0.00851038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774471">
                <text:p>0.0377447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07524987">
                <text:p>0.007524987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3360515">
                <text:p>0.0336051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2312103">
                <text:p>0.0231210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1474954">
                <text:p>0.01474954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775469">
                <text:p>0.0177546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1620446">
                <text:p>0.0162044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05584352">
                <text:p>0.00558435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1046172">
                <text:p>0.0104617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1415876">
                <text:p>0.0141587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1486987">
                <text:p>0.0148698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979582">
                <text:p>0.0197958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06578805">
                <text:p>0.00657880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1106509">
                <text:p>0.0110650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315348">
                <text:p>0.031534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747465">
                <text:p>0.0174746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764016">
                <text:p>0.0176401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9434209">
                <text:p>0.009434209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05349163">
                <text:p>0.005349163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06698363">
                <text:p>0.00669836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1303278">
                <text:p>0.0130327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969297">
                <text:p>0.0096929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803505">
                <text:p>0.0180350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1157985">
                <text:p>0.0115798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2033789">
                <text:p>0.0203378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224857">
                <text:p>0.022485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145167">
                <text:p>0.014516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2357501">
                <text:p>0.0235750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129123">
                <text:p>0.0129123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1331495">
                <text:p>0.0133149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9913415">
                <text:p>0.00991341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930948">
                <text:p>0.0193094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1154286">
                <text:p>0.0115428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06616962">
                <text:p>0.00661696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1521786">
                <text:p>0.01521786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8417847">
                <text:p>0.00841784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9600799">
                <text:p>0.009600799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1506992">
                <text:p>0.0150699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05075138">
                <text:p>0.00507513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111919">
                <text:p>0.011191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04845516">
                <text:p>0.00484551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744935">
                <text:p>0.0174493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802872">
                <text:p>0.0080287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1543235">
                <text:p>0.0154323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748006">
                <text:p>0.0074800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1581614">
                <text:p>0.0158161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3060324">
                <text:p>0.0306032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627822">
                <text:p>0.0162782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33823">
                <text:p>0.03382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1503133">
                <text:p>0.0150313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7853">
                <text:p>0.02785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04310898">
                <text:p>0.004310898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6082308">
                <text:p>0.00608230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836487">
                <text:p>0.0183648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6721127">
                <text:p>0.00672112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591744">
                <text:p>0.0159174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1042528">
                <text:p>0.0104252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100835">
                <text:p>0.010083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707513">
                <text:p>0.0270751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1032498">
                <text:p>0.0103249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931001">
                <text:p>0.0193100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0.002532667">
                <text:p>0.002532667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1173308">
                <text:p>0.0117330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0.001382382">
                <text:p>0.0013823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1207683">
                <text:p>0.0120768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03128895">
                <text:p>0.00312889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0.001658694">
                <text:p>0.001658694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1196692">
                <text:p>0.0119669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7556032">
                <text:p>0.00755603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611902">
                <text:p>0.0261190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8357915">
                <text:p>0.00835791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1163184">
                <text:p>0.0116318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794407">
                <text:p>0.0279440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108049">
                <text:p>0.010804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7803188">
                <text:p>0.007803188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1348691">
                <text:p>0.0134869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5889158">
                <text:p>0.00588915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464796">
                <text:p>0.02464796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82117">
                <text:p>0.018211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53913">
                <text:p>0.015391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414697">
                <text:p>0.02414697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866001">
                <text:p>0.0186600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4512">
                <text:p>0.00451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057788">
                <text:p>0.005778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0.001268843">
                <text:p>0.00126884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2316112">
                <text:p>0.0231611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883124">
                <text:p>0.0388312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05440522">
                <text:p>0.00544052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2968795">
                <text:p>0.00296879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8187164">
                <text:p>0.00818716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2759162">
                <text:p>0.00275916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5832276">
                <text:p>0.00583227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1578047">
                <text:p>0.001578047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383166">
                <text:p>0.01383166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263266">
                <text:p>0.0126326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9556261">
                <text:p>0.00955626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1125777">
                <text:p>0.0112577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1259626">
                <text:p>0.01259626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3057266">
                <text:p>0.00305726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6314863">
                <text:p>0.006314863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0.0007517286">
                <text:p>0.0007517286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48853">
                <text:p>0.014885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1117345">
                <text:p>0.01117345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2228559">
                <text:p>0.022285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2705993">
                <text:p>-0.00270599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2205521">
                <text:p>0.00220552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7525982">
                <text:p>0.007525982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1505094">
                <text:p>-0.00150509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1241704">
                <text:p>0.0124170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278302">
                <text:p>0.0127830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6187141">
                <text:p>0.00618714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8218521">
                <text:p>0.00821852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905379">
                <text:p>0.0190537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4778353">
                <text:p>0.00477835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23231">
                <text:p>0.012323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838419">
                <text:p>0.0183841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1054196">
                <text:p>0.0105419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5518436">
                <text:p>0.005518436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3094859">
                <text:p>0.00309485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327308">
                <text:p>0.0032730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7256551">
                <text:p>0.00725655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9688328">
                <text:p>0.00968832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428673">
                <text:p>0.0142867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1345982">
                <text:p>-0.00134598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3867329">
                <text:p>0.00386732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6334711">
                <text:p>0.00633471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6959846">
                <text:p>0.006959846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9413077">
                <text:p>0.00941307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6575107">
                <text:p>0.00657510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939954">
                <text:p>0.0093995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6799079">
                <text:p>0.00679907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8969899">
                <text:p>0.00896989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6960317">
                <text:p>0.00696031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198611">
                <text:p>0.0119861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6906707">
                <text:p>0.006906707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0.001044409">
                <text:p>0.00104440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5971867">
                <text:p>0.00597186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1149284">
                <text:p>0.0114928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631727">
                <text:p>0.0063172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07182019">
                <text:p>-0.000718201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320138">
                <text:p>0.0132013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267605">
                <text:p>0.0126760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5680386">
                <text:p>0.00568038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276268">
                <text:p>0.0127626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02477457">
                <text:p>-0.000247745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931236">
                <text:p>0.0193123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508521">
                <text:p>0.0150852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5898546">
                <text:p>0.005898546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1289897">
                <text:p>0.00128989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206315">
                <text:p>0.020631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0.001435156">
                <text:p>0.00143515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341065">
                <text:p>0.0234106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3517114">
                <text:p>0.00351711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514523">
                <text:p>0.0151452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404319">
                <text:p>0.0140431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7571516">
                <text:p>0.007571516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6483774">
                <text:p>0.00648377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2404559">
                <text:p>0.002404559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8393642">
                <text:p>0.00839364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8511795">
                <text:p>0.00851179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7288045">
                <text:p>0.00728804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527469">
                <text:p>0.0152746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2176986">
                <text:p>0.002176986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01875242">
                <text:p>-0.000187524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01175106">
                <text:p>-0.000117510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5974625">
                <text:p>-0.00597462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183946">
                <text:p>0.01183946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5355076">
                <text:p>-0.005355076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5738762">
                <text:p>0.00573876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1042743">
                <text:p>0.0104274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5829517">
                <text:p>0.005829517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4033683">
                <text:p>0.004033683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3797347">
                <text:p>0.003797347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3964902">
                <text:p>0.00396490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274316">
                <text:p>0.01274316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8277188">
                <text:p>0.00827718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03526087">
                <text:p>-0.000352608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799131">
                <text:p>0.0179913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9475501">
                <text:p>0.00947550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0.0005455723">
                <text:p>0.0005455723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6263382">
                <text:p>0.00626338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4670721">
                <text:p>0.00467072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1963014">
                <text:p>-0.00196301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838329">
                <text:p>0.0183832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8802833">
                <text:p>0.00880283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684408">
                <text:p>0.01684408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8972746">
                <text:p>0.008972746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1182459">
                <text:p>0.0118245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4619741">
                <text:p>0.00461974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494442">
                <text:p>0.0149444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290237">
                <text:p>0.01290237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1093482">
                <text:p>-0.00109348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9480779">
                <text:p>0.00948077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291725">
                <text:p>0.0129172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2637993">
                <text:p>-0.00263799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1651235">
                <text:p>0.001651235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346929">
                <text:p>0.0134692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474404">
                <text:p>0.00474404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4158384">
                <text:p>0.004158384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1816525">
                <text:p>0.00181652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2973105">
                <text:p>0.002973105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06289836">
                <text:p>-0.000628983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5374794">
                <text:p>-0.00537479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06937305">
                <text:p>-0.000693730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863698">
                <text:p>0.0086369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6462225">
                <text:p>0.00646222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866142">
                <text:p>0.0186614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440659">
                <text:p>0.01440659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6999263">
                <text:p>0.00699926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5247416">
                <text:p>-0.005247416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32596">
                <text:p>0.0232596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5435118">
                <text:p>-0.00543511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1284168">
                <text:p>0.00128416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1994606">
                <text:p>0.00199460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6771256">
                <text:p>0.006771256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270277">
                <text:p>0.0027027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106389">
                <text:p>0.010638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289695">
                <text:p>-0.0028969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4855101">
                <text:p>-0.004855101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6152992">
                <text:p>0.00615299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7069751">
                <text:p>0.00706975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1063401">
                <text:p>0.01063401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0.0004280736">
                <text:p>0.000428073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518993">
                <text:p>0.0151899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1630432">
                <text:p>-0.00163043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01990946">
                <text:p>-0.0001990946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8159488">
                <text:p>0.00815948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61977">
                <text:p>0.0161977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43637">
                <text:p>0.0143637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9638141">
                <text:p>0.009638141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110761">
                <text:p>0.011076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4435585">
                <text:p>-0.00443558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180028">
                <text:p>0.0118002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3578908">
                <text:p>0.00357890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3657045">
                <text:p>-0.00365704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19581">
                <text:p>0.0119581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4467302">
                <text:p>0.00446730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4162154">
                <text:p>-0.004162154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7175665">
                <text:p>-0.00717566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1885082">
                <text:p>0.00188508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5715812">
                <text:p>0.005715812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36421">
                <text:p>0.003642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0683539">
                <text:p>-0.00068353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183172">
                <text:p>0.0118317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05881126">
                <text:p>0.000588112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7579796">
                <text:p>0.00757979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0.0007307115">
                <text:p>0.000730711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7552518">
                <text:p>0.00755251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4330076">
                <text:p>0.00433007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09035355">
                <text:p>0.000903535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0.0009359819">
                <text:p>0.000935981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4690227">
                <text:p>0.004690227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2546986">
                <text:p>-0.002546986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833728">
                <text:p>0.0183372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1734587">
                <text:p>0.00173458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590532">
                <text:p>0.0059053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8210036">
                <text:p>0.00821003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6280105">
                <text:p>0.00628010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3073754">
                <text:p>0.00307375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1038492">
                <text:p>0.0103849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128035">
                <text:p>0.0112803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1025782">
                <text:p>-0.00102578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811261">
                <text:p>0.0081126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3842586">
                <text:p>0.003842586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6537442">
                <text:p>0.00653744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1640328">
                <text:p>0.00164032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1984415">
                <text:p>-0.0019844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23033">
                <text:p>0.012303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07993561">
                <text:p>-0.000799356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161178">
                <text:p>-0.0016117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2091483">
                <text:p>0.00209148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5968312">
                <text:p>0.00596831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6195266">
                <text:p>0.006195266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2337855">
                <text:p>0.00233785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07285133">
                <text:p>0.000728513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05939681">
                <text:p>0.0005939681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4806373">
                <text:p>0.00480637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7454604">
                <text:p>0.00745460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7376882">
                <text:p>-0.00737688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3816532">
                <text:p>0.003816532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2797712">
                <text:p>-0.00279771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5526933">
                <text:p>0.005526933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0.0003303934">
                <text:p>0.0003303934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1578349">
                <text:p>-0.001578349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1459538">
                <text:p>-0.001459538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1754349">
                <text:p>0.00175434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527012">
                <text:p>0.0052701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06256499">
                <text:p>0.000625649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09711523">
                <text:p>-0.0009711523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1996146">
                <text:p>0.001996146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3376823">
                <text:p>0.003376823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451304">
                <text:p>-0.00451304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1428878">
                <text:p>0.001428878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6510689">
                <text:p>-0.006510689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4183178">
                <text:p>-0.00418317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2180923">
                <text:p>-0.00218092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02187849">
                <text:p>-0.000218784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2824876">
                <text:p>-0.00282487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3632388">
                <text:p>-0.003632388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6368898">
                <text:p>0.00636889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815997">
                <text:p>-0.00815997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2418317">
                <text:p>-0.00241831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5799863">
                <text:p>-0.00579986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7546128">
                <text:p>0.00754612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2228418">
                <text:p>-0.002228418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799026">
                <text:p>0.00879902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090766">
                <text:p>0.01090766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1816682">
                <text:p>-0.001816682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302281">
                <text:p>0.0030228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79981">
                <text:p>0.01179981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4878981">
                <text:p>0.004878981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1796302">
                <text:p>-0.00179630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383583">
                <text:p>0.013835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1427238">
                <text:p>0.00142723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2370235">
                <text:p>0.00237023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06817025">
                <text:p>-0.0006817025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419161">
                <text:p>0.00419161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5632611">
                <text:p>-0.00563261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4733901">
                <text:p>-0.004733901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4288274">
                <text:p>0.004288274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1509431">
                <text:p>0.001509431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5304668">
                <text:p>0.005304668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03185723">
                <text:p>-0.0003185723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9503996">
                <text:p>0.009503996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4282979">
                <text:p>0.00428297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7073204">
                <text:p>-0.007073204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3509892">
                <text:p>0.00350989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3862142">
                <text:p>-0.00386214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6433663">
                <text:p>-0.006433663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09919037">
                <text:p>0.0009919037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8333942">
                <text:p>0.00833394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1011725">
                <text:p>0.0101172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5588306">
                <text:p>0.00558830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2759913">
                <text:p>-0.002759913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05795371">
                <text:p>-0.000579537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3117905">
                <text:p>-0.00311790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4389317">
                <text:p>-0.00438931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2146259">
                <text:p>-0.00214625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09944588">
                <text:p>-0.0009944588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1742733">
                <text:p>-0.00174273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2458418">
                <text:p>0.00245841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1419956">
                <text:p>0.001419956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85098">
                <text:p>0.018509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5660053">
                <text:p>0.00566005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6579328">
                <text:p>0.006579328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6478252">
                <text:p>0.00647825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1960044">
                <text:p>-0.001960044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2206799">
                <text:p>-0.002206799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5562291">
                <text:p>0.005562291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3296735">
                <text:p>0.00329673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09960936">
                <text:p>0.000996093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4502522">
                <text:p>0.00450252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22274">
                <text:p>0.0222274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5402576">
                <text:p>-0.005402576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1663055">
                <text:p>0.001663055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4070856">
                <text:p>0.04070856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4778598">
                <text:p>0.004778598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5169304">
                <text:p>0.005169304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431538">
                <text:p>0.0143153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3965863">
                <text:p>0.003965863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8516313">
                <text:p>-0.00851631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12515">
                <text:p>0.011251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4813574">
                <text:p>-0.004813574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3641383">
                <text:p>-0.003641383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270842">
                <text:p>0.009270842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5021322">
                <text:p>0.00502132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422993">
                <text:p>0.0142299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541905">
                <text:p>0.00541905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7435495">
                <text:p>0.00743549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168147">
                <text:p>0.00168147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2850717">
                <text:p>0.002850717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1357195">
                <text:p>0.00135719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1484139">
                <text:p>0.001484139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6346748">
                <text:p>-0.006346748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3336712">
                <text:p>-0.00333671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9462485">
                <text:p>-0.009462485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06696691">
                <text:p>0.0006696691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2804361">
                <text:p>-0.002804361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40784">
                <text:p>0.0134078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5178954">
                <text:p>-0.00517895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0.0004908564">
                <text:p>0.000490856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1153356">
                <text:p>0.001153356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01908909">
                <text:p>0.000190890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02515508">
                <text:p>0.000251550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509802">
                <text:p>0.00950980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03383322">
                <text:p>0.000338332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2482133">
                <text:p>-0.00248213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8952259">
                <text:p>-0.00895225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04062506">
                <text:p>0.000406250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2470052">
                <text:p>0.002470052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4681474">
                <text:p>0.00468147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5528412">
                <text:p>-0.00552841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6999056">
                <text:p>-0.006999056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085189">
                <text:p>0.0108518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3292027">
                <text:p>0.00329202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128747">
                <text:p>-0.00128747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0435346">
                <text:p>-0.000435346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4878892">
                <text:p>-0.00487889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482611">
                <text:p>0.02482611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6204407">
                <text:p>-0.006204407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85995">
                <text:p>0.01385995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5366789">
                <text:p>-0.00536678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4869852">
                <text:p>-0.004869852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8103178">
                <text:p>-0.00810317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6442446">
                <text:p>-0.00644244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001673">
                <text:p>-0.01001673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67844">
                <text:p>0.00867844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5027804">
                <text:p>0.005027804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605558">
                <text:p>-0.00605558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1712383">
                <text:p>0.00171238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4232956">
                <text:p>-0.004232956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711965">
                <text:p>0.0271196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939695">
                <text:p>0.00793969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77539">
                <text:p>0.01477539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3654616">
                <text:p>0.003654616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6710382">
                <text:p>-0.00671038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3112797">
                <text:p>-0.003112797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441609">
                <text:p>0.0044160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915572">
                <text:p>0.00391557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489816">
                <text:p>0.02489816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05335214">
                <text:p>-0.0005335214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07229919">
                <text:p>0.0007229919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114294">
                <text:p>0.006114294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06308639">
                <text:p>0.000630863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2368949">
                <text:p>0.00236894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5296935">
                <text:p>0.00529693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19454">
                <text:p>0.0111945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03463656">
                <text:p>-0.000346365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153421">
                <text:p>-0.0015342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596929">
                <text:p>0.0259692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44119">
                <text:p>0.0114411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77667">
                <text:p>0.00277667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01982463">
                <text:p>-0.000198246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4363797">
                <text:p>0.00436379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164966">
                <text:p>0.0116496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2363847">
                <text:p>0.00236384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2034631">
                <text:p>0.002034631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523623">
                <text:p>-0.0052362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2629766">
                <text:p>-0.002629766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4946114">
                <text:p>0.004946114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2927971">
                <text:p>-0.00292797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622656">
                <text:p>0.01622656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517581">
                <text:p>0.00751758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3920055">
                <text:p>-0.003920055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684055">
                <text:p>0.00668405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8466007">
                <text:p>-0.008466007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4249651">
                <text:p>-0.00424965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432878">
                <text:p>0.005432878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134924">
                <text:p>0.0113492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4024649">
                <text:p>-0.00402464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3392755">
                <text:p>-0.003392755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295866">
                <text:p>0.009295866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766217">
                <text:p>0.01766217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5874191">
                <text:p>-0.000587419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2508341">
                <text:p>0.00250834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1813576">
                <text:p>-0.001813576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06832457">
                <text:p>-0.0006832457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1144419">
                <text:p>-0.001144419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449609">
                <text:p>-0.0044960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9958789">
                <text:p>0.0009958789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69156">
                <text:p>0.01269156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9189752">
                <text:p>-0.0091897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275782">
                <text:p>0.00727578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4419649">
                <text:p>-0.00441964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1522499">
                <text:p>-0.00152249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4508782">
                <text:p>-0.00450878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4788377">
                <text:p>-0.00478837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10854">
                <text:p>0.0111085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3282289">
                <text:p>-0.00328228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5009923">
                <text:p>-0.005009923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8374242">
                <text:p>-0.00837424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7592376">
                <text:p>-0.007592376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3583412">
                <text:p>0.00358341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1689283">
                <text:p>0.0016892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3111467">
                <text:p>-0.003111467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157919">
                <text:p>0.0115791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1003022">
                <text:p>-0.00100302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2206631">
                <text:p>0.002206631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328351">
                <text:p>0.0132835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1774162">
                <text:p>-0.00177416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1656023">
                <text:p>-0.00165602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2035017">
                <text:p>0.02035017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07927049">
                <text:p>-0.000792704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3607504">
                <text:p>0.00360750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377113">
                <text:p>0.005377113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2846641">
                <text:p>-0.00284664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466182">
                <text:p>0.00946618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1621125">
                <text:p>0.00162112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7342552">
                <text:p>-0.00734255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8367533">
                <text:p>-0.00836753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658172">
                <text:p>0.002658172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445523">
                <text:p>0.004445523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5806648">
                <text:p>0.005806648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6382381">
                <text:p>-0.00638238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749786">
                <text:p>0.002749786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73243">
                <text:p>0.0047324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829691">
                <text:p>0.00882969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2011956">
                <text:p>-0.002011956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618495">
                <text:p>0.002618495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4876008">
                <text:p>0.004876008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3336041">
                <text:p>-0.00333604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962416">
                <text:p>-0.001962416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3839354">
                <text:p>-0.003839354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67839">
                <text:p>0.01267839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8162945">
                <text:p>-0.00816294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1121924">
                <text:p>-0.00112192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7143">
                <text:p>0.003714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592648">
                <text:p>0.00259264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1993935">
                <text:p>0.00199393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4564018">
                <text:p>-0.004564018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5321902">
                <text:p>-0.00532190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138827">
                <text:p>0.003138827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07262799">
                <text:p>-0.0007262799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405292">
                <text:p>-0.002405292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464716">
                <text:p>0.00646471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1460539">
                <text:p>0.00146053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7184881">
                <text:p>-0.007184881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84286">
                <text:p>0.0098428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1341102">
                <text:p>-0.00134110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6224721">
                <text:p>-0.00622472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1904596">
                <text:p>0.001904596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0177498">
                <text:p>0.00017749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908052">
                <text:p>0.001908052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8973818">
                <text:p>-0.008973818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6344496">
                <text:p>-0.00634449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838467">
                <text:p>0.003838467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2579438">
                <text:p>-0.00257943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39181">
                <text:p>0.013918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751246">
                <text:p>-0.00751246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855208">
                <text:p>-0.002855208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03430528">
                <text:p>-0.0003430528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7775269">
                <text:p>0.007775269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897138">
                <text:p>0.00489713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5900531">
                <text:p>-0.005900531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484432">
                <text:p>0.00748443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450878">
                <text:p>-0.00450878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9332017">
                <text:p>-0.009332017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3603195">
                <text:p>-0.00360319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731562">
                <text:p>0.0173156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737668">
                <text:p>0.01737668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665566">
                <text:p>0.01665566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9223659">
                <text:p>-0.00922365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0113383">
                <text:p>-0.00011338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5396363">
                <text:p>0.005396363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116339">
                <text:p>0.005116339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6054271">
                <text:p>-0.00605427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08293411">
                <text:p>-0.000829341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000496">
                <text:p>-0.01000496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9635">
                <text:p>0.0099635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729837">
                <text:p>0.0047298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410779">
                <text:p>0.00441077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44167">
                <text:p>0.0144167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2917888">
                <text:p>-0.00291788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16007">
                <text:p>0.00416007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514555">
                <text:p>0.002514555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4330598">
                <text:p>0.004330598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8500774">
                <text:p>-0.008500774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3398576">
                <text:p>-0.00339857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1809448">
                <text:p>0.001809448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6666163">
                <text:p>-0.006666163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3344873">
                <text:p>0.00334487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1368595">
                <text:p>-0.00136859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5148234">
                <text:p>-0.005148234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7390094">
                <text:p>-0.00739009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9937237">
                <text:p>-0.009937237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473676">
                <text:p>0.00547367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414804">
                <text:p>0.00141480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09756869">
                <text:p>0.000975686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08952489">
                <text:p>0.000895248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436526">
                <text:p>0.001436526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694552">
                <text:p>0.005694552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484302">
                <text:p>-0.005484302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9318983">
                <text:p>-0.009318983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674279">
                <text:p>0.00167427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3804257">
                <text:p>-0.000380425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112332">
                <text:p>0.001112332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09541889">
                <text:p>0.000954188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1410431">
                <text:p>-0.001410431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871332">
                <text:p>0.00187133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5221452">
                <text:p>-0.00522145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628917">
                <text:p>0.005628917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1437628">
                <text:p>-0.00143762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2440667">
                <text:p>-0.00244066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6932965">
                <text:p>0.000693296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247018">
                <text:p>-0.00247018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725972">
                <text:p>0.001725972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22128">
                <text:p>0.0042212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912131">
                <text:p>0.007912131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04216266">
                <text:p>-0.0004216266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4085556">
                <text:p>-0.00408555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9711734">
                <text:p>0.00971173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2925632">
                <text:p>-0.002925632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8310352">
                <text:p>-0.008310352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8451773">
                <text:p>-0.00845177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564125">
                <text:p>0.00456412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5269169">
                <text:p>-0.00526916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1022911">
                <text:p>0.01022911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8485265">
                <text:p>-0.008485265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891281">
                <text:p>0.001891281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340013">
                <text:p>0.02340013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33676">
                <text:p>0.00133676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09418296">
                <text:p>0.0009418296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559646">
                <text:p>0.005559646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4748761">
                <text:p>0.00474876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3787175">
                <text:p>-0.003787175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724431">
                <text:p>0.001724431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080445">
                <text:p>0.00108044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09477">
                <text:p>0.0180947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9179878">
                <text:p>-0.00917987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671521">
                <text:p>0.0167152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788122">
                <text:p>-0.00178812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6815913">
                <text:p>-0.0068159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481753">
                <text:p>0.0148175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2590022">
                <text:p>-0.002590022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7377923">
                <text:p>-0.007377923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8681986">
                <text:p>-0.00868198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719496">
                <text:p>-0.004719496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879984">
                <text:p>0.00287998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7145833">
                <text:p>-0.007145833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262699">
                <text:p>0.00126269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146845">
                <text:p>0.00414684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688941">
                <text:p>0.01688941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09028396">
                <text:p>0.000902839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4576791">
                <text:p>-0.00457679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66498">
                <text:p>0.00166498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5455174">
                <text:p>-0.00545517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6072071">
                <text:p>-0.006072071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2840064">
                <text:p>0.00284006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0.0001805023">
                <text:p>0.0001805023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186174">
                <text:p>-0.0118617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7470286">
                <text:p>-0.007470286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8151922">
                <text:p>-0.00815192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00744">
                <text:p>-0.0100744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681228">
                <text:p>0.006681228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8307874">
                <text:p>-0.00830787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8027063">
                <text:p>-0.00802706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300288">
                <text:p>0.003300288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6359707">
                <text:p>-0.006359707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7492378">
                <text:p>-0.00749237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575223">
                <text:p>0.02575223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1545582">
                <text:p>-0.001545582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147239">
                <text:p>-0.0014723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6539661">
                <text:p>-0.00653966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039552">
                <text:p>0.00203955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102371">
                <text:p>-0.00110237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0284745">
                <text:p>0.000284745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3379747">
                <text:p>-0.00337974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007878">
                <text:p>0.00900787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04464432">
                <text:p>0.000446443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4442383">
                <text:p>-0.004442383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569509">
                <text:p>-0.00456950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063513">
                <text:p>-0.01063513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469261">
                <text:p>0.00646926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072173">
                <text:p>-0.00107217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8741">
                <text:p>0.011874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08655106">
                <text:p>-0.0008655106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837013">
                <text:p>-0.00183701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8260106">
                <text:p>-0.00826010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156255">
                <text:p>-0.0115625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841751">
                <text:p>0.00284175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02804">
                <text:p>-0.0102804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5147259">
                <text:p>-0.00514725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8628945">
                <text:p>-0.00862894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209688">
                <text:p>0.005209688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9163109">
                <text:p>-0.00916310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1522355">
                <text:p>0.001522355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055443">
                <text:p>0.003055443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539051">
                <text:p>-0.00653905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655394">
                <text:p>0.000655394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9376448">
                <text:p>0.00937644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932789">
                <text:p>0.00393278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01913898">
                <text:p>-0.0001913898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505797">
                <text:p>0.00650579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378578">
                <text:p>0.0237857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6257914">
                <text:p>-0.00625791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8055419">
                <text:p>-0.00805541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105339">
                <text:p>0.0110533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529665">
                <text:p>0.00452966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235227">
                <text:p>-0.00235227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066259">
                <text:p>0.00206625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803903">
                <text:p>0.005803903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190046">
                <text:p>-0.00190046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96612">
                <text:p>0.0119661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3923">
                <text:p>0.006392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350849">
                <text:p>0.0135084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5165649">
                <text:p>-0.00516564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23915">
                <text:p>0.0012391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6835881">
                <text:p>-0.006835881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349715">
                <text:p>-0.00234971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8444759">
                <text:p>0.00844475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211484">
                <text:p>0.008211484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968953">
                <text:p>0.00596895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993044">
                <text:p>-0.002993044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27282">
                <text:p>0.0172728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4379869">
                <text:p>-0.00437986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874658">
                <text:p>-0.004874658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6913075">
                <text:p>-0.006913075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040579">
                <text:p>-0.002040579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680076">
                <text:p>0.003680076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3646942">
                <text:p>-0.00364694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2268256">
                <text:p>-0.00226825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5293894">
                <text:p>-0.00529389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8332209">
                <text:p>-0.00833220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952216">
                <text:p>-0.00395221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5772921">
                <text:p>-0.0005772921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647243">
                <text:p>0.00264724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887714">
                <text:p>-0.001887714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04236166">
                <text:p>-0.0004236166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291769">
                <text:p>0.00729176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1279443">
                <text:p>0.001279443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581686">
                <text:p>0.006581686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7650668">
                <text:p>-0.00765066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9628029">
                <text:p>-0.009628029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2375257">
                <text:p>-0.002375257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5481401">
                <text:p>0.005481401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1175911">
                <text:p>-0.00117591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7366243">
                <text:p>-0.007366243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6579802">
                <text:p>-0.00657980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08219904">
                <text:p>-0.0008219904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82963">
                <text:p>0.0182963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390718">
                <text:p>0.003390718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257502">
                <text:p>-0.00125750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756271">
                <text:p>0.00375627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84677">
                <text:p>0.0058467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9196526">
                <text:p>0.009196526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394267">
                <text:p>0.002394267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50962">
                <text:p>0.00350962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5237259">
                <text:p>-0.00523725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6799516">
                <text:p>0.0006799516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348741">
                <text:p>0.005348741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078802">
                <text:p>0.00307880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189745">
                <text:p>0.011897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784691">
                <text:p>0.0078469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18814">
                <text:p>0.0111881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837566">
                <text:p>-0.000837566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831113">
                <text:p>0.004831113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372074">
                <text:p>0.00537207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2935629">
                <text:p>0.00293562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4119052">
                <text:p>0.00411905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8192463">
                <text:p>-0.00819246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930861">
                <text:p>0.00593086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728717">
                <text:p>0.00272871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265618">
                <text:p>0.005265618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5182222">
                <text:p>0.005182222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1707812">
                <text:p>-0.001707812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589913">
                <text:p>0.0158991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735881">
                <text:p>0.004735881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4567009">
                <text:p>-0.004567009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1380556">
                <text:p>-0.001380556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625831">
                <text:p>-0.00625831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10361">
                <text:p>0.0121036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3693003">
                <text:p>-0.003693003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113222">
                <text:p>0.00711322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05253462">
                <text:p>0.0005253462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2522292">
                <text:p>-0.000252229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4180346">
                <text:p>-0.00418034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881512">
                <text:p>-0.009881512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3346829">
                <text:p>-0.003346829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028156">
                <text:p>-0.01028156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096749">
                <text:p>-0.00409674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746281">
                <text:p>-0.002746281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6125233">
                <text:p>-0.0006125233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759555">
                <text:p>0.009759555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425185">
                <text:p>0.01425185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7353513">
                <text:p>-0.007353513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588287">
                <text:p>0.008588287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08982676">
                <text:p>0.0008982676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6833845">
                <text:p>-0.006833845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5773116">
                <text:p>-0.005773116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229355">
                <text:p>0.0222935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66463">
                <text:p>-0.0066463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2564651">
                <text:p>-0.0002564651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481831">
                <text:p>0.008481831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2039953">
                <text:p>-0.0002039953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847927">
                <text:p>0.01847927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3003455">
                <text:p>-0.003003455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6161043">
                <text:p>0.00616104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529072">
                <text:p>0.00752907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341554">
                <text:p>0.0023415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669827">
                <text:p>-0.00466982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1891571">
                <text:p>0.0001891571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1502624">
                <text:p>-0.001502624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3193826">
                <text:p>-0.003193826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5268055">
                <text:p>0.00526805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277992">
                <text:p>0.0127799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08948771">
                <text:p>0.000894877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00015">
                <text:p>-0.0100015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530812">
                <text:p>0.003530812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8734669">
                <text:p>-0.00873466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7168629">
                <text:p>-0.00716862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7300522">
                <text:p>-0.00730052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101604">
                <text:p>0.0310160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927529">
                <text:p>-0.007927529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763008">
                <text:p>-0.05763008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893598">
                <text:p>-0.0589359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037011">
                <text:p>-0.0603701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071885">
                <text:p>-0.06071885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136148">
                <text:p>-0.06136148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113232">
                <text:p>-0.06113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