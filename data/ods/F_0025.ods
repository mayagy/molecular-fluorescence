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7184095">
            <text:p>0.007184095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692133">
            <text:p>0.001692133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4327025">
            <text:p>0.004327025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194513">
            <text:p>0.01194513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7269333">
            <text:p>0.007269333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5118443">
            <text:p>0.005118443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636463">
            <text:p>0.01636463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33005">
            <text:p>-0.00133005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float" office:value="0.0001174109">
            <text:p>0.0001174109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7050622">
            <text:p>0.007050622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09449945">
            <text:p>0.009449945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147078">
            <text:p>0.01147078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20496">
            <text:p>-0.0020496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329735">
            <text:p>0.00329735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2758843">
            <text:p>0.002758843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743039">
            <text:p>0.00743039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1471581">
            <text:p>-0.001471581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3427848">
            <text:p>0.003427848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3754941">
            <text:p>0.03754941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62276">
            <text:p>-0.0062276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3985852">
            <text:p>-0.003985852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092967">
            <text:p>0.01092967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745164">
            <text:p>0.01745164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155379">
            <text:p>-0.00155379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4423795">
            <text:p>-0.004423795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4141641">
            <text:p>0.004141641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2832866">
            <text:p>-0.002832866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275879">
            <text:p>0.00275879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7954897">
            <text:p>0.007954897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3789315">
            <text:p>0.003789315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2661975">
            <text:p>0.002661975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1608878">
            <text:p>0.01608878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6952016">
            <text:p>-0.006952016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2535797">
            <text:p>0.002535797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117797">
            <text:p>0.00117797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3040456">
            <text:p>-0.003040456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2801158">
            <text:p>0.002801158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5625033">
            <text:p>0.005625033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4337349">
            <text:p>0.004337349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5884795">
            <text:p>0.005884795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3255837">
            <text:p>0.003255837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20625">
            <text:p>0.0020625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7854911">
            <text:p>0.007854911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60405">
            <text:p>0.0160405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3576584">
            <text:p>-0.003576584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09446333">
            <text:p>0.009446333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312023">
            <text:p>0.02312023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74856">
            <text:p>0.0174856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573502">
            <text:p>0.005573502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09391253">
            <text:p>0.009391253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4113978">
            <text:p>0.004113978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655056">
            <text:p>0.007655056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1288399">
            <text:p>-0.001288399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573698">
            <text:p>0.00573698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1912137">
            <text:p>0.01912137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215628">
            <text:p>-0.00215628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08828813">
            <text:p>0.008828813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205553">
            <text:p>-0.00205553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6127396">
            <text:p>-0.006127396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03171016">
            <text:p>-0.0003171016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361695">
            <text:p>0.00361695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6616237">
            <text:p>0.006616237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2188486">
            <text:p>-0.002188486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08845323">
            <text:p>-0.0008845323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8204512">
            <text:p>-0.008204512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3410883">
            <text:p>0.003410883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169017">
            <text:p>0.02169017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855883">
            <text:p>0.001855883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7897749">
            <text:p>0.007897749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9115468">
            <text:p>0.009115468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653759">
            <text:p>0.01653759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161022">
            <text:p>-0.002161022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2969009">
            <text:p>-0.002969009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2227206">
            <text:p>0.002227206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3503527">
            <text:p>0.003503527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2143702">
            <text:p>-0.002143702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7394271">
            <text:p>0.007394271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3867776">
            <text:p>0.03867776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2852992">
            <text:p>0.002852992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1649117">
            <text:p>0.001649117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6548284">
            <text:p>-0.006548284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647736">
            <text:p>0.01647736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9462813">
            <text:p>0.009462813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08779342">
            <text:p>0.008779342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3019564">
            <text:p>-0.003019564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766791">
            <text:p>0.005766791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62464">
            <text:p>0.0162464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12716">
            <text:p>0.0112716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2765118">
            <text:p>0.02765118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09655911">
            <text:p>0.009655911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201614">
            <text:p>0.0201614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3015964">
            <text:p>-0.003015964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3146847">
            <text:p>-0.003146847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3901187">
            <text:p>0.003901187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9109051">
            <text:p>0.009109051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03712248">
            <text:p>-0.0003712248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3441968">
            <text:p>-0.003441968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7342705">
            <text:p>0.007342705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0.0001391959">
            <text:p>0.0001391959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07749694">
            <text:p>-0.007749694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281373">
            <text:p>-0.00281373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1956093">
            <text:p>0.01956093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223799">
            <text:p>0.01223799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3900077">
            <text:p>0.003900077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8417755">
            <text:p>-0.008417755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0.0006942765">
            <text:p>0.0006942765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0.0005556678">
            <text:p>0.0005556678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6131912">
            <text:p>0.006131912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4543154">
            <text:p>0.04543154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203439">
            <text:p>-0.00203439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2632812">
            <text:p>0.002632812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2467065">
            <text:p>0.002467065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6279503">
            <text:p>-0.006279503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8389103">
            <text:p>0.008389103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471223">
            <text:p>0.00471223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014457">
            <text:p>-0.01014457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0.0009846442">
            <text:p>0.0009846442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5258446">
            <text:p>0.005258446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0.0003561125">
            <text:p>0.0003561125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08237438">
            <text:p>0.0008237438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5011703">
            <text:p>-0.005011703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722232">
            <text:p>0.01722232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string">
            <text:p>-5.343428E-05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8423345">
            <text:p>0.008423345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6911364">
            <text:p>0.006911364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423112">
            <text:p>0.009423112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0.001758758">
            <text:p>0.001758758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06474202">
            <text:p>0.006474202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7155493">
            <text:p>0.007155493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3017316">
            <text:p>0.03017316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1047618">
            <text:p>0.01047618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6972458">
            <text:p>0.006972458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08134191">
            <text:p>-0.0008134191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059288">
            <text:p>0.01059288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1993265">
            <text:p>0.01993265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5211352">
            <text:p>-0.005211352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2383435">
            <text:p>0.002383435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755696">
            <text:p>0.01755696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4911768">
            <text:p>0.004911768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4825067">
            <text:p>-0.004825067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2334283">
            <text:p>-0.002334283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0.0001794381">
            <text:p>0.0001794381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2989253">
            <text:p>0.002989253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6012904">
            <text:p>-0.006012904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7877297">
            <text:p>-0.007877297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381091">
            <text:p>0.02381091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2014434">
            <text:p>0.002014434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3995169">
            <text:p>0.003995169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1788148">
            <text:p>-0.001788148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09655984">
            <text:p>-0.0009655984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2297468">
            <text:p>-0.002297468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20368">
            <text:p>-0.00320368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1914701">
            <text:p>-0.001914701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297832">
            <text:p>0.01297832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133335">
            <text:p>0.01133335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2039299">
            <text:p>-0.002039299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395942">
            <text:p>0.02395942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6629365">
            <text:p>0.006629365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218483">
            <text:p>0.01218483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3563941">
            <text:p>-0.003563941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2523171">
            <text:p>-0.002523171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367772">
            <text:p>0.00367772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73156">
            <text:p>0.00973156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4486785">
            <text:p>-0.004486785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09282603">
            <text:p>0.009282603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2987501">
            <text:p>0.002987501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090466">
            <text:p>0.01090466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505144">
            <text:p>0.003505144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3900385">
            <text:p>0.003900385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0.002146477">
            <text:p>0.002146477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676166">
            <text:p>0.01676166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3170136">
            <text:p>0.003170136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725405">
            <text:p>0.01725405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7246672">
            <text:p>0.007246672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8739042">
            <text:p>0.008739042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7469342">
            <text:p>-0.007469342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1741002">
            <text:p>0.01741002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650261">
            <text:p>0.01650261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487286">
            <text:p>0.01487286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33816">
            <text:p>-0.00433816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04768434">
            <text:p>-0.0004768434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1819492">
            <text:p>-0.001819492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259192">
            <text:p>-0.00259192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57953">
            <text:p>0.0157953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4248081">
            <text:p>0.004248081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308227">
            <text:p>0.02308227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197265">
            <text:p>0.0197265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431848">
            <text:p>0.01431848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1830723">
            <text:p>-0.001830723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1587505">
            <text:p>-0.001587505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0.001587289">
            <text:p>0.001587289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028437">
            <text:p>0.01028437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4534158">
            <text:p>0.004534158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0.0002178926">
            <text:p>0.0002178926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135586">
            <text:p>0.01135586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3222486">
            <text:p>-0.003222486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7412646">
            <text:p>0.007412646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579619">
            <text:p>0.01579619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322074">
            <text:p>0.01322074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2013972">
            <text:p>-0.002013972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6410159">
            <text:p>-0.006410159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9325644">
            <text:p>0.009325644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1751869">
            <text:p>0.001751869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2355029">
            <text:p>-0.002355029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2816247">
            <text:p>-0.002816247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2110594">
            <text:p>0.002110594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254388">
            <text:p>0.004254388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7367694">
            <text:p>-0.007367694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09481356">
            <text:p>0.009481356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1678139">
            <text:p>-0.001678139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8559015">
            <text:p>0.008559015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2748352">
            <text:p>-0.002748352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0.0001880655">
            <text:p>0.0001880655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string">
            <text:p>9.785565E-05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0.001342142">
            <text:p>0.001342142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6690309">
            <text:p>0.006690309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068009">
            <text:p>0.01068009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06105349">
            <text:p>-0.0006105349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2890331">
            <text:p>0.002890331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28854">
            <text:p>0.0228854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611659">
            <text:p>-0.00611659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4051059">
            <text:p>-0.004051059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137554">
            <text:p>0.003137554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346106">
            <text:p>-0.001346106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03586">
            <text:p>0.0103586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19977">
            <text:p>0.0119977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0663134">
            <text:p>-0.000663134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272355">
            <text:p>-0.00272355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340453">
            <text:p>-0.00340453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3751995">
            <text:p>0.003751995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13519">
            <text:p>-0.0013519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3681802">
            <text:p>-0.003681802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581946">
            <text:p>0.001581946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192812">
            <text:p>0.01192812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28736">
            <text:p>0.028736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08577254">
            <text:p>-0.008577254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8225883">
            <text:p>-0.008225883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3771165">
            <text:p>0.003771165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1951336">
            <text:p>-0.001951336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4924263">
            <text:p>0.004924263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122293">
            <text:p>-0.01122293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4119808">
            <text:p>0.004119808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1047646">
            <text:p>-0.001047646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3068831">
            <text:p>0.003068831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732838">
            <text:p>0.00732838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2303508">
            <text:p>0.002303508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320115">
            <text:p>0.01320115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7841771">
            <text:p>-0.007841771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02233016">
            <text:p>-0.0002233016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09673753">
            <text:p>-0.0009673753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005765">
            <text:p>0.02005765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-0.0003390645">
            <text:p>-0.0003390645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5045156">
            <text:p>0.005045156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1924523">
            <text:p>0.001924523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032681">
            <text:p>0.01032681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7832495">
            <text:p>-0.007832495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08642647">
            <text:p>-0.008642647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93063">
            <text:p>0.0093063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4160148">
            <text:p>0.004160148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6290735">
            <text:p>-0.006290735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4300908">
            <text:p>-0.004300908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397416">
            <text:p>0.01397416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053376">
            <text:p>0.01053376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1022424">
            <text:p>0.01022424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687317">
            <text:p>-0.00687317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03818349">
            <text:p>-0.0003818349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5954166">
            <text:p>0.005954166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559608">
            <text:p>0.003559608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633355">
            <text:p>0.005633355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4733592">
            <text:p>0.004733592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383998">
            <text:p>0.01383998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009322">
            <text:p>-0.01009322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3298094">
            <text:p>0.003298094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172686">
            <text:p>0.002172686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162367">
            <text:p>0.01162367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08600599">
            <text:p>0.008600599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08190093">
            <text:p>-0.008190093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104259">
            <text:p>0.01104259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2467036">
            <text:p>0.002467036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07212173">
            <text:p>-0.007212173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2103503">
            <text:p>0.002103503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string">
            <text:p>-7.135161E-05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3850023">
            <text:p>0.003850023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5354585">
            <text:p>0.005354585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317655">
            <text:p>-0.002317655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2778865">
            <text:p>0.002778865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736144">
            <text:p>0.01736144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4450233">
            <text:p>-0.004450233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6401183">
            <text:p>-0.006401183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552721">
            <text:p>0.01552721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175227">
            <text:p>0.01175227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08586774">
            <text:p>-0.0008586774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1463952">
            <text:p>-0.001463952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6312625">
            <text:p>0.006312625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531311">
            <text:p>0.00531311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08432407">
            <text:p>0.008432407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1207897">
            <text:p>-0.001207897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3203941">
            <text:p>-0.003203941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531526">
            <text:p>0.01531526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4225345">
            <text:p>-0.004225345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5094655">
            <text:p>0.005094655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3468585">
            <text:p>0.003468585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5874032">
            <text:p>0.005874032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4237433">
            <text:p>0.004237433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4540326">
            <text:p>0.004540326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3679698">
            <text:p>0.003679698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039665">
            <text:p>0.01039665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1668348">
            <text:p>0.001668348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763629">
            <text:p>0.00763629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1382726">
            <text:p>-0.001382726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4794936">
            <text:p>0.004794936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343859">
            <text:p>0.003343859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0.001324654">
            <text:p>0.001324654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09075276">
            <text:p>0.009075276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341655">
            <text:p>0.01341655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363842">
            <text:p>0.01363842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5422375">
            <text:p>-0.005422375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07082">
            <text:p>0.0107082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1755535">
            <text:p>-0.001755535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4249114">
            <text:p>-0.004249114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3857686">
            <text:p>0.003857686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3618263">
            <text:p>0.003618263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0.0006801881">
            <text:p>0.0006801881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4548329">
            <text:p>-0.004548329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5158496">
            <text:p>-0.005158496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5322476">
            <text:p>-0.005322476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07938386">
            <text:p>-0.007938386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-0.0001822345">
            <text:p>-0.0001822345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5590433">
            <text:p>0.005590433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4922355">
            <text:p>0.004922355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858432">
            <text:p>0.00858432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3331915">
            <text:p>-0.003331915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01390588">
            <text:p>-0.0001390588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480411">
            <text:p>0.01480411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1497926">
            <text:p>0.001497926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06292738">
            <text:p>-0.0006292738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09890143">
            <text:p>0.009890143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014884">
            <text:p>0.01014884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2827022">
            <text:p>0.002827022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7717647">
            <text:p>0.007717647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4627523">
            <text:p>-0.004627523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2054945">
            <text:p>0.002054945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1054407">
            <text:p>0.01054407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4652482">
            <text:p>-0.004652482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2630735">
            <text:p>0.002630735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484283">
            <text:p>0.01484283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6331527">
            <text:p>0.006331527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1403815">
            <text:p>0.001403815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08830399">
            <text:p>-0.008830399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200169">
            <text:p>0.01200169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03778274">
            <text:p>-0.0003778274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1316383">
            <text:p>-0.001316383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0.001102889">
            <text:p>0.001102889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6596778">
            <text:p>0.006596778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4838071">
            <text:p>-0.004838071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321614">
            <text:p>0.01321614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153416">
            <text:p>0.01153416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09714437">
            <text:p>0.009714437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3767615">
            <text:p>0.003767615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3910331">
            <text:p>0.003910331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313908">
            <text:p>-0.003313908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6734564">
            <text:p>0.006734564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6938807">
            <text:p>-0.006938807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string">
            <text:p>7.51008E-05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0.0009191104">
            <text:p>0.0009191104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2271652">
            <text:p>0.002271652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3685542">
            <text:p>0.003685542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6108887">
            <text:p>-0.006108887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4542339">
            <text:p>-0.004542339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8301056">
            <text:p>0.008301056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3154869">
            <text:p>0.003154869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0.0004225183">
            <text:p>0.0004225183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string">
            <text:p>3.073632E-05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3726109">
            <text:p>0.003726109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1747832">
            <text:p>0.01747832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08127">
            <text:p>0.0108127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06379001">
            <text:p>-0.0006379001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08242569">
            <text:p>-0.0008242569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8370447">
            <text:p>0.008370447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264149">
            <text:p>0.01264149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2171946">
            <text:p>0.002171946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string">
            <text:p>5.750145E-05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02692814">
            <text:p>-0.0002692814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6449861">
            <text:p>0.006449861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7001682">
            <text:p>0.007001682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5571315">
            <text:p>-0.005571315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269872">
            <text:p>0.01269872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8546601">
            <text:p>0.008546601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680542">
            <text:p>0.005680542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4849762">
            <text:p>-0.004849762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6231574">
            <text:p>-0.006231574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3913023">
            <text:p>-0.003913023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2317121">
            <text:p>-0.002317121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4572137">
            <text:p>-0.004572137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7458708">
            <text:p>0.007458708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08692375">
            <text:p>0.008692375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3427275">
            <text:p>0.003427275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1449922">
            <text:p>0.01449922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3536517">
            <text:p>-0.003536517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5131274">
            <text:p>-0.005131274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7882896">
            <text:p>-0.007882896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1008026">
            <text:p>0.01008026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2734366">
            <text:p>0.02734366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384481">
            <text:p>0.00384481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7622358">
            <text:p>0.007622358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918918">
            <text:p>0.00918918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string">
            <text:p>-7.770536E-05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09096493">
            <text:p>0.009096493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3576066">
            <text:p>0.003576066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5461111">
            <text:p>0.005461111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09393726">
            <text:p>-0.0009393726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0.0003916145">
            <text:p>0.0003916145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0.0001748814">
            <text:p>0.0001748814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2245991">
            <text:p>0.002245991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06856081">
            <text:p>-0.0006856081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09138837">
            <text:p>0.009138837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2603692">
            <text:p>-0.002603692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157439">
            <text:p>0.00157439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247657">
            <text:p>0.01247657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532443">
            <text:p>0.01532443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195643">
            <text:p>0.0195643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1001704">
            <text:p>0.01001704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4659963">
            <text:p>-0.004659963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1712783">
            <text:p>-0.001712783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67816">
            <text:p>-0.0067816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8197437">
            <text:p>-0.008197437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0.001566926">
            <text:p>0.001566926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3285399">
            <text:p>-0.003285399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6650702">
            <text:p>0.0006650702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08286733">
            <text:p>-0.0008286733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3619897">
            <text:p>0.003619897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7246345">
            <text:p>0.007246345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6079914">
            <text:p>-0.006079914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2528818">
            <text:p>-0.002528818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09428336">
            <text:p>-0.009428336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0.0008024076">
            <text:p>0.0008024076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07368655">
            <text:p>-0.007368655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7700267">
            <text:p>-0.007700267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7142024">
            <text:p>-0.007142024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string">
            <text:p>-9.679687E-05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701162">
            <text:p>0.003701162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6504564">
            <text:p>0.006504564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3392374">
            <text:p>-0.003392374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3172093">
            <text:p>0.003172093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5480822">
            <text:p>-0.005480822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09641285">
            <text:p>0.009641285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8849206">
            <text:p>0.008849206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1975618">
            <text:p>0.01975618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161516">
            <text:p>0.01161516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3271254">
            <text:p>0.003271254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3673156">
            <text:p>-0.003673156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08265694">
            <text:p>-0.008265694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6423581">
            <text:p>0.006423581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5848534">
            <text:p>-0.005848534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063882">
            <text:p>0.004063882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5220287">
            <text:p>-0.005220287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3931993">
            <text:p>-0.003931993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2129101">
            <text:p>0.002129101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245805">
            <text:p>0.01245805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7306302">
            <text:p>-0.007306302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414395">
            <text:p>-0.00414395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6931444">
            <text:p>-0.006931444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4256832">
            <text:p>0.004256832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4771303">
            <text:p>-0.004771303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4982001">
            <text:p>-0.004982001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4879459">
            <text:p>-0.004879459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01370387">
            <text:p>-0.0001370387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3558641">
            <text:p>0.003558641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09532745">
            <text:p>-0.009532745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float" office:value="0.0007215403">
            <text:p>0.0007215403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588171">
            <text:p>0.00588171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0905618">
            <text:p>-0.00905618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08276292">
            <text:p>-0.0008276292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2793301">
            <text:p>0.02793301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04536695">
            <text:p>-0.0004536695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1321562">
            <text:p>0.001321562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6525946">
            <text:p>-0.006525946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148196">
            <text:p>0.01148196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7358097">
            <text:p>0.007358097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4765183">
            <text:p>-0.004765183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float" office:value="0.0002682815">
            <text:p>0.0002682815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4313871">
            <text:p>-0.004313871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7189821">
            <text:p>-0.007189821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2539022">
            <text:p>-0.002539022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4909882">
            <text:p>-0.004909882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6982635">
            <text:p>0.006982635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8938695">
            <text:p>0.008938695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4172842">
            <text:p>-0.004172842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1534872">
            <text:p>-0.001534872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string">
            <text:p>9.526144E-05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0.000133065">
            <text:p>0.000133065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2876131">
            <text:p>-0.002876131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7929559">
            <text:p>-0.007929559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3561497">
            <text:p>0.003561497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1096502">
            <text:p>-0.001096502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7652778">
            <text:p>0.007652778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05746741">
            <text:p>-0.0005746741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2863565">
            <text:p>-0.002863565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2207953">
            <text:p>-0.002207953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5823063">
            <text:p>-0.005823063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2117567">
            <text:p>0.002117567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1557122">
            <text:p>-0.001557122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044006">
            <text:p>-0.01044006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string">
            <text:p>-1.450861E-06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1214809">
            <text:p>-0.001214809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2540883">
            <text:p>0.002540883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245948">
            <text:p>0.01245948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474476">
            <text:p>0.01474476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4367583">
            <text:p>-0.004367583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4183961">
            <text:p>0.004183961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6054688">
            <text:p>-0.006054688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7093453">
            <text:p>0.007093453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3801752">
            <text:p>-0.003801752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2111832">
            <text:p>0.002111832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4749934">
            <text:p>-0.004749934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5729944">
            <text:p>-0.005729944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2515869">
            <text:p>-0.002515869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175215">
            <text:p>0.01175215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1023624">
            <text:p>0.01023624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6168342">
            <text:p>-0.006168342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03210458">
            <text:p>-0.0003210458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459159">
            <text:p>0.00459159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1081199">
            <text:p>0.001081199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2078206">
            <text:p>0.002078206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3778191">
            <text:p>0.003778191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5099331">
            <text:p>0.005099331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09913513">
            <text:p>0.009913513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6275289">
            <text:p>-0.006275289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6045256">
            <text:p>0.006045256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09037751">
            <text:p>-0.009037751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5840343">
            <text:p>-0.005840343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1632159">
            <text:p>-0.001632159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119156">
            <text:p>0.01119156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4098261">
            <text:p>-0.004098261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158481">
            <text:p>-0.00158481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4697593">
            <text:p>-0.004697593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050165">
            <text:p>0.01050165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6088431">
            <text:p>0.006088431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013766">
            <text:p>-0.01013766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6977567">
            <text:p>-0.006977567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08672612">
            <text:p>-0.0008672612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08489948">
            <text:p>-0.008489948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454357">
            <text:p>0.01454357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04830117">
            <text:p>-0.0004830117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4484132">
            <text:p>-0.004484132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-0.005081014">
            <text:p>-0.005081014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4188305">
            <text:p>-0.004188305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078433">
            <text:p>0.01078433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045029">
            <text:p>0.01045029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197089">
            <text:p>0.01197089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08275039">
            <text:p>0.008275039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4948428">
            <text:p>-0.004948428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8093289">
            <text:p>0.008093289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1657281">
            <text:p>0.001657281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838049">
            <text:p>0.004838049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4169852">
            <text:p>-0.004169852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5132719">
            <text:p>0.005132719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549151">
            <text:p>0.01549151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1867992">
            <text:p>-0.001867992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7661338">
            <text:p>0.007661338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5883841">
            <text:p>0.005883841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8265625">
            <text:p>0.008265625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071214">
            <text:p>0.003071214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318442">
            <text:p>0.01318442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800279">
            <text:p>0.003800279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212074">
            <text:p>-0.00212074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03579503">
            <text:p>-0.0003579503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120471">
            <text:p>0.01120471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282833">
            <text:p>0.01282833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0.0007176326">
            <text:p>0.0007176326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01056779">
            <text:p>-0.0001056779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7884568">
            <text:p>-0.007884568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06515">
            <text:p>0.0106515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5720843">
            <text:p>-0.005720843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057104">
            <text:p>0.01057104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169695">
            <text:p>0.01169695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08910256">
            <text:p>-0.008910256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3232814">
            <text:p>-0.003232814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619785">
            <text:p>0.01619785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82978">
            <text:p>0.01382978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412126">
            <text:p>-0.00412126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403311">
            <text:p>0.01403311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8248673">
            <text:p>0.008248673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2515035">
            <text:p>-0.002515035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4860598">
            <text:p>0.004860598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3811037">
            <text:p>-0.003811037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738242">
            <text:p>-0.00738242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209426">
            <text:p>0.01209426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3423449">
            <text:p>-0.003423449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176503">
            <text:p>0.01176503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0.001565483">
            <text:p>0.001565483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7456786">
            <text:p>0.007456786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3151207">
            <text:p>0.003151207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3391844">
            <text:p>0.003391844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412967">
            <text:p>0.00412967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1815851">
            <text:p>0.001815851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247346">
            <text:p>-0.00247346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3973276">
            <text:p>-0.003973276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461981">
            <text:p>0.008461981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4108427">
            <text:p>-0.004108427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384634">
            <text:p>0.01384634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556488">
            <text:p>0.004556488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05583251">
            <text:p>-0.0005583251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03812425">
            <text:p>0.0003812425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280906">
            <text:p>0.01280906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196188">
            <text:p>0.00196188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419478">
            <text:p>0.004419478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2166436">
            <text:p>0.002166436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121111">
            <text:p>0.00121111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4314012">
            <text:p>-0.004314012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6618796">
            <text:p>-0.006618796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5777046">
            <text:p>0.005777046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4983541">
            <text:p>0.004983541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float" office:value="0.0003280053">
            <text:p>0.0003280053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717619">
            <text:p>-0.00717619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3372698">
            <text:p>0.003372698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08913859">
            <text:p>-0.0008913859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280803">
            <text:p>0.00280803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07041001">
            <text:p>-0.0007041001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43148">
            <text:p>0.0043148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2192266">
            <text:p>-0.002192266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267201">
            <text:p>0.01267201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2221963">
            <text:p>-0.002221963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3978303">
            <text:p>-0.003978303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1506764">
            <text:p>-0.001506764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2469633">
            <text:p>-0.002469633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32386">
            <text:p>0.0132386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0.0003061049">
            <text:p>0.0003061049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0.00114252">
            <text:p>0.00114252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487557">
            <text:p>0.001487557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2947729">
            <text:p>-0.002947729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450802">
            <text:p>0.01450802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1206376">
            <text:p>0.001206376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0.0008694101">
            <text:p>0.0008694101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5269085">
            <text:p>-0.005269085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527907">
            <text:p>0.01527907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string">
            <text:p>3.181022E-05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200826">
            <text:p>0.01200826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08151358">
            <text:p>-0.008151358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5141414">
            <text:p>0.005141414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0895334">
            <text:p>-0.00895334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203524">
            <text:p>0.01203524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190203">
            <text:p>0.002190203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6984759">
            <text:p>-0.006984759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0.0004699283">
            <text:p>0.0004699283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482021">
            <text:p>0.01482021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146126">
            <text:p>0.01146126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2878828">
            <text:p>-0.002878828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6468027">
            <text:p>-0.006468027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0.0002923447">
            <text:p>0.0002923447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0.0007563743">
            <text:p>0.0007563743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4559744">
            <text:p>0.004559744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398577">
            <text:p>0.01398577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2121976">
            <text:p>-0.002121976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1039366">
            <text:p>-0.001039366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3891477">
            <text:p>-0.003891477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08592314">
            <text:p>-0.008592314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1401707">
            <text:p>0.001401707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4951483">
            <text:p>-0.004951483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097856">
            <text:p>0.01097856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091279">
            <text:p>0.02091279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5253229">
            <text:p>-0.005253229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224092">
            <text:p>0.001224092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6002896">
            <text:p>0.006002896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1428834">
            <text:p>-0.001428834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7128836">
            <text:p>-0.007128836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268298">
            <text:p>0.003268298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220927">
            <text:p>-0.00220927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7838763">
            <text:p>0.007838763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2017785">
            <text:p>-0.002017785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1004346">
            <text:p>0.01004346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1636175">
            <text:p>-0.001636175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6544262">
            <text:p>-0.006544262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1502264">
            <text:p>-0.001502264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5149339">
            <text:p>-0.005149339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096585">
            <text:p>0.04096585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2340766">
            <text:p>-0.002340766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2931279">
            <text:p>0.002931279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414015">
            <text:p>0.002414015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4432233">
            <text:p>0.04432233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string">
            <text:p>-1.147734E-05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746725">
            <text:p>-0.001746725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375255">
            <text:p>-0.00375255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6434993">
            <text:p>-0.006434993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2068947">
            <text:p>-0.002068947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160654">
            <text:p>0.01160654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2891783">
            <text:p>-0.002891783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2586923">
            <text:p>0.002586923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2890531">
            <text:p>-0.002890531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6053268">
            <text:p>0.006053268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3706261">
            <text:p>0.003706261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1544831">
            <text:p>-0.001544831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5862997">
            <text:p>0.005862997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1776693">
            <text:p>-0.001776693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3053647">
            <text:p>0.003053647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1488829">
            <text:p>0.001488829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6543387">
            <text:p>0.006543387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2917058">
            <text:p>-0.002917058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01659407">
            <text:p>-0.0001659407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2850718">
            <text:p>-0.002850718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16547">
            <text:p>-0.0016547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1261054">
            <text:p>-0.001261054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5756752">
            <text:p>-0.005756752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4919734">
            <text:p>-0.004919734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3144385">
            <text:p>-0.003144385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2002761">
            <text:p>0.02002761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1780258">
            <text:p>-0.001780258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593033">
            <text:p>0.01593033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178644">
            <text:p>-0.00178644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9417109">
            <text:p>0.009417109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0.0002166855">
            <text:p>0.0002166855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07780822">
            <text:p>-0.0007780822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5826871">
            <text:p>-0.005826871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1760356">
            <text:p>-0.001760356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5073842">
            <text:p>-0.005073842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string">
            <text:p>3.489507E-05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2722672">
            <text:p>-0.002722672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3749483">
            <text:p>0.003749483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1979237">
            <text:p>-0.001979237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5905346">
            <text:p>0.005905346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3057542">
            <text:p>-0.003057542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6142932">
            <text:p>0.006142932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7503645">
            <text:p>0.007503645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03229995">
            <text:p>-0.0003229995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637401">
            <text:p>0.005637401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4651686">
            <text:p>0.004651686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1732431">
            <text:p>0.001732431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04734505">
            <text:p>-0.0004734505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0.0007770255">
            <text:p>0.0007770255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2206612">
            <text:p>-0.002206612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494131">
            <text:p>0.001494131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287255">
            <text:p>0.00287255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4646183">
            <text:p>-0.004646183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09785666">
            <text:p>0.009785666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1764465">
            <text:p>-0.001764465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1115826">
            <text:p>-0.001115826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0.0008249303">
            <text:p>0.0008249303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5655517">
            <text:p>0.005655517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968708">
            <text:p>0.005968708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3787722">
            <text:p>0.003787722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239655">
            <text:p>0.01239655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2844045">
            <text:p>0.002844045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185688">
            <text:p>0.01185688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01019499">
            <text:p>-0.0001019499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4690531">
            <text:p>-0.004690531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2416206">
            <text:p>0.002416206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5810194">
            <text:p>-0.005810194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3266557">
            <text:p>0.003266557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09744894">
            <text:p>-0.0009744894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1092364">
            <text:p>-0.001092364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03821897">
            <text:p>-0.0003821897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8182854">
            <text:p>-0.008182854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09750854">
            <text:p>0.009750854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08681813">
            <text:p>-0.008681813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5239593">
            <text:p>0.005239593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5380789">
            <text:p>0.005380789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5818985">
            <text:p>0.005818985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8361046">
            <text:p>-0.008361046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2955093">
            <text:p>0.002955093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324442">
            <text:p>0.01324442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335824">
            <text:p>-0.00335824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0.001290851">
            <text:p>0.001290851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0.0005927372">
            <text:p>0.0005927372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1110787">
            <text:p>0.01110787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1192793">
            <text:p>-0.001192793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1118475">
            <text:p>-0.001118475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2482737">
            <text:p>-0.002482737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662125">
            <text:p>0.01662125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6137224">
            <text:p>-0.006137224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7089677">
            <text:p>0.007089677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0.0002345604">
            <text:p>0.0002345604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6578025">
            <text:p>-0.006578025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1380176">
            <text:p>0.001380176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5782822">
            <text:p>-0.005782822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727643">
            <text:p>-0.00727643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3938723">
            <text:p>-0.003938723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1853818">
            <text:p>0.001853818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3825466">
            <text:p>-0.003825466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633328">
            <text:p>0.01633328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6044866">
            <text:p>0.006044866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05869618">
            <text:p>-0.0005869618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9087467">
            <text:p>0.009087467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1883762">
            <text:p>-0.001883762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317358">
            <text:p>0.01317358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604659">
            <text:p>0.00604659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7814107">
            <text:p>0.007814107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728536">
            <text:p>0.003728536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1936393">
            <text:p>0.01936393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09363483">
            <text:p>-0.009363483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2798494">
            <text:p>-0.002798494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5311904">
            <text:p>-0.005311904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1181704">
            <text:p>-0.001181704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3465972">
            <text:p>-0.003465972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2191752">
            <text:p>-0.002191752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6051255">
            <text:p>-0.006051255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2080987">
            <text:p>0.002080987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2427905">
            <text:p>0.002427905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07917871">
            <text:p>-0.007917871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1485503">
            <text:p>-0.001485503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5098324">
            <text:p>-0.005098324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2679431">
            <text:p>0.002679431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0.0001887088">
            <text:p>0.0001887088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2754678">
            <text:p>0.002754678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04008962">
            <text:p>-0.0004008962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905565">
            <text:p>0.003905565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2033438">
            <text:p>0.002033438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1989776">
            <text:p>-0.001989776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1868051">
            <text:p>0.01868051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7461232">
            <text:p>0.007461232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3826618">
            <text:p>-0.003826618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2466584">
            <text:p>0.002466584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519354">
            <text:p>0.02519354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36037">
            <text:p>0.00636037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332762">
            <text:p>0.01332762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6191965">
            <text:p>0.006191965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3667539">
            <text:p>0.003667539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336453">
            <text:p>0.02336453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4151481">
            <text:p>0.004151481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239566">
            <text:p>0.02239566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2053161">
            <text:p>0.002053161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2898743">
            <text:p>0.002898743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2032604">
            <text:p>0.002032604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7016999">
            <text:p>-0.007016999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8708535">
            <text:p>0.008708535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3027603">
            <text:p>0.003027603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07353673">
            <text:p>-0.007353673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2327461">
            <text:p>-0.002327461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0.0001631157">
            <text:p>0.0001631157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1048114">
            <text:p>-0.001048114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08621926">
            <text:p>-0.008621926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5616428">
            <text:p>-0.005616428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-0.0005578204">
            <text:p>-0.0005578204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0.0005759289">
            <text:p>0.0005759289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191895">
            <text:p>-0.00191895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07815821">
            <text:p>-0.0007815821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600357">
            <text:p>-0.00600357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3037828">
            <text:p>0.003037828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3310813">
            <text:p>0.003310813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1659688">
            <text:p>-0.001659688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34926">
            <text:p>0.01234926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2904352">
            <text:p>0.002904352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8620801">
            <text:p>0.008620801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08312459">
            <text:p>-0.008312459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7098354">
            <text:p>0.007098354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3530902">
            <text:p>-0.003530902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371026">
            <text:p>-0.00371026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454385">
            <text:p>0.004454385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2846782">
            <text:p>0.002846782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0.0006027321">
            <text:p>0.0006027321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3705614">
            <text:p>-0.003705614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2858086">
            <text:p>-0.002858086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3015719">
            <text:p>-0.003015719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0.001732669">
            <text:p>0.001732669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5610077">
            <text:p>-0.005610077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6442973">
            <text:p>0.006442973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3424101">
            <text:p>-0.003424101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07532786">
            <text:p>-0.007532786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07398245">
            <text:p>-0.007398245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string">
            <text:p>7.036854E-05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1800413">
            <text:p>-0.001800413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9707729">
            <text:p>0.0009707729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3550213">
            <text:p>-0.003550213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3398725">
            <text:p>-0.003398725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09958381">
            <text:p>0.0009958381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2728915">
            <text:p>-0.002728915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196893">
            <text:p>-0.00196893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138076">
            <text:p>0.01138076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3714671">
            <text:p>0.003714671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1980889">
            <text:p>0.01980889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09288617">
            <text:p>-0.009288617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5035864">
            <text:p>-0.005035864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1433362">
            <text:p>0.001433362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3828755">
            <text:p>0.003828755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383247">
            <text:p>-0.01383247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7115962">
            <text:p>-0.007115962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2963876">
            <text:p>0.02963876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547099">
            <text:p>0.01547099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615759">
            <text:p>0.005615759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4953451">
            <text:p>0.004953451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0.01194766">
            <text:p>0.01194766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0.001307084">
            <text:p>0.001307084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898755">
            <text:p>0.001898755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3752355">
            <text:p>0.003752355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3876732">
            <text:p>-0.003876732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08854559">
            <text:p>-0.008854559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5122054">
            <text:p>-0.005122054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-0.0003512321">
            <text:p>-0.0003512321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09740232">
            <text:p>0.009740232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6788007">
            <text:p>0.006788007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9208652">
            <text:p>0.009208652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1701996">
            <text:p>0.001701996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205376">
            <text:p>0.01205376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1194379">
            <text:p>-0.001194379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-0.003288031">
            <text:p>-0.003288031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6029613">
            <text:p>-0.006029613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4865804">
            <text:p>-0.004865804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3300429">
            <text:p>-0.003300429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967155">
            <text:p>0.002967155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3591051">
            <text:p>0.003591051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5249911">
            <text:p>0.005249911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361886">
            <text:p>0.01361886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2437305">
            <text:p>-0.002437305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4368125">
            <text:p>-0.004368125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1710207">
            <text:p>0.001710207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061552">
            <text:p>0.01061552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07924136">
            <text:p>-0.007924136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3428747">
            <text:p>0.003428747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1525113">
            <text:p>-0.001525113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7890178">
            <text:p>0.007890178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6192878">
            <text:p>0.006192878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07636256">
            <text:p>-0.0007636256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176951">
            <text:p>0.02176951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1541739">
            <text:p>-0.001541739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6547885">
            <text:p>-0.006547885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7401039">
            <text:p>-0.007401039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936025">
            <text:p>0.00936025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4686452">
            <text:p>-0.004686452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063153">
            <text:p>0.01063153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7009039">
            <text:p>0.007009039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1921569">
            <text:p>-0.001921569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3902989">
            <text:p>-0.003902989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334779">
            <text:p>0.002334779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08458082">
            <text:p>-0.008458082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71383">
            <text:p>0.01071383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05935279">
            <text:p>-0.0005935279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2730619">
            <text:p>-0.002730619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09128335">
            <text:p>-0.009128335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5446631">
            <text:p>0.005446631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1084067">
            <text:p>0.01084067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6214229">
            <text:p>0.006214229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3117291">
            <text:p>-0.003117291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4245975">
            <text:p>0.004245975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0.0001852883">
            <text:p>0.0001852883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5782329">
            <text:p>-0.005782329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1959667">
            <text:p>-0.001959667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471787">
            <text:p>0.01471787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3851652">
            <text:p>-0.003851652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2419997">
            <text:p>-0.002419997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270965">
            <text:p>-0.01270965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07654966">
            <text:p>-0.0007654966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668906">
            <text:p>0.005668906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163345">
            <text:p>0.005163345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5094695">
            <text:p>-0.005094695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6226742">
            <text:p>-0.006226742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4006688">
            <text:p>0.004006688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096084">
            <text:p>0.01096084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4294113">
            <text:p>-0.004294113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1021968">
            <text:p>0.01021968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0.0006112697">
            <text:p>0.0006112697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1669077">
            <text:p>-0.001669077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3334074">
            <text:p>0.003334074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962587">
            <text:p>0.00962587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8995269">
            <text:p>0.008995269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3192508">
            <text:p>-0.003192508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379216">
            <text:p>-0.00379216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997241">
            <text:p>0.003997241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3798294">
            <text:p>0.003798294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0881904">
            <text:p>0.000881904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08786445">
            <text:p>-0.008786445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2430959">
            <text:p>0.002430959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5335549">
            <text:p>0.005335549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6931768">
            <text:p>-0.006931768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08820752">
            <text:p>-0.008820752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06809686">
            <text:p>-0.0006809686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8450659">
            <text:p>0.008450659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188742">
            <text:p>-0.00188742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5148766">
            <text:p>-0.005148766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2820088">
            <text:p>-0.002820088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4222907">
            <text:p>0.004222907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0.0002806269">
            <text:p>0.0002806269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7292529">
            <text:p>0.007292529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5908485">
            <text:p>-0.005908485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3785949">
            <text:p>-0.003785949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5082973">
            <text:p>-0.005082973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587993">
            <text:p>0.01587993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408334">
            <text:p>0.02408334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-0.0001703866">
            <text:p>-0.0001703866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5003556">
            <text:p>-0.005003556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7989839">
            <text:p>0.007989839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0.0004452351">
            <text:p>0.0004452351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7251383">
            <text:p>0.007251383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7275337">
            <text:p>0.007275337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292756">
            <text:p>-0.00292756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159632">
            <text:p>0.01159632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1376458">
            <text:p>-0.001376458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8876474">
            <text:p>0.0008876474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195877">
            <text:p>-0.00195877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887202">
            <text:p>0.006887202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04945405">
            <text:p>-0.0004945405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3009403">
            <text:p>-0.003009403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4229005">
            <text:p>-0.004229005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4800546">
            <text:p>0.004800546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4591428">
            <text:p>-0.004591428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171332">
            <text:p>-0.00171332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2130455">
            <text:p>-0.002130455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8463993">
            <text:p>0.008463993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09641576">
            <text:p>0.009641576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6806818">
            <text:p>0.006806818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1909784">
            <text:p>0.01909784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5224501">
            <text:p>-0.005224501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163251">
            <text:p>-0.00163251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1366317">
            <text:p>0.001366317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499703">
            <text:p>0.00499703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2469205">
            <text:p>-0.002469205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167923">
            <text:p>0.01167923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639876">
            <text:p>0.01639876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309437">
            <text:p>0.008309437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4345906">
            <text:p>0.004345906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3638585">
            <text:p>0.003638585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06780245">
            <text:p>-0.0006780245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5386488">
            <text:p>0.005386488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1639025">
            <text:p>-0.001639025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3498212">
            <text:p>-0.003498212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4146797">
            <text:p>-0.004146797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428685">
            <text:p>0.01428685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04972032">
            <text:p>-0.0004972032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2599237">
            <text:p>0.002599237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7555875">
            <text:p>-0.007555875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4847139">
            <text:p>-0.004847139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2011226">
            <text:p>0.02011226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3403283">
            <text:p>-0.003403283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1823861">
            <text:p>-0.001823861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2361921">
            <text:p>-0.002361921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783545">
            <text:p>0.002783545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1456373">
            <text:p>-0.001456373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147369">
            <text:p>-0.00147369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51256">
            <text:p>0.00651256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6811631">
            <text:p>-0.006811631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6858413">
            <text:p>-0.006858413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3587149">
            <text:p>-0.003587149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215815">
            <text:p>0.01215815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3118144">
            <text:p>0.003118144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09189552">
            <text:p>-0.009189552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238347">
            <text:p>0.00238347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1800474">
            <text:p>-0.001800474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453531">
            <text:p>0.02453531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03228823">
            <text:p>-0.0003228823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138072">
            <text:p>-0.00138072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5006991">
            <text:p>0.005006991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3251756">
            <text:p>0.003251756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08527114">
            <text:p>-0.008527114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5164272">
            <text:p>0.005164272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319856">
            <text:p>0.00319856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02577961">
            <text:p>-0.0002577961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3184287">
            <text:p>0.003184287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3787282">
            <text:p>0.003787282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0.000765434">
            <text:p>0.000765434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03643661">
            <text:p>-0.0003643661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446186">
            <text:p>0.00446186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3179766">
            <text:p>-0.003179766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457834">
            <text:p>0.01457834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4226782">
            <text:p>0.004226782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6520926">
            <text:p>-0.006520926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09519982">
            <text:p>-0.009519982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08935033">
            <text:p>-0.0008935033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7297867">
            <text:p>0.007297867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837195">
            <text:p>-0.00837195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137624">
            <text:p>-0.01137624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2616506">
            <text:p>-0.002616506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2580809">
            <text:p>0.002580809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08265628">
            <text:p>-0.008265628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6550148">
            <text:p>-0.006550148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4334956">
            <text:p>0.004334956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1997621">
            <text:p>0.01997621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4137998">
            <text:p>-0.004137998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6468789">
            <text:p>-0.006468789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5387784">
            <text:p>-0.005387784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5482358">
            <text:p>0.05482358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-0.000319294">
            <text:p>-0.000319294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3013066">
            <text:p>-0.003013066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7103513">
            <text:p>0.007103513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2949729">
            <text:p>0.02949729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09399719">
            <text:p>-0.0009399719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581707">
            <text:p>-0.01581707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1887099">
            <text:p>0.01887099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071323">
            <text:p>0.01071323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2263795">
            <text:p>-0.002263795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2236899">
            <text:p>-0.002236899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5989464">
            <text:p>0.005989464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float" office:value="0.0007998333">
            <text:p>0.0007998333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string">
            <text:p>6.046475E-05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384628">
            <text:p>0.01384628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2123857">
            <text:p>0.002123857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6831749">
            <text:p>0.006831749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0975723">
            <text:p>-0.00975723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1522421">
            <text:p>0.001522421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8615094">
            <text:p>0.008615094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4584684">
            <text:p>-0.004584684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-0.0001307027">
            <text:p>-0.0001307027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1907176">
            <text:p>0.01907176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2162617">
            <text:p>0.002162617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1363588">
            <text:p>-0.001363588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-0.0002015642">
            <text:p>-0.0002015642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296014">
            <text:p>-0.00296014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7776481">
            <text:p>0.007776481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3951617">
            <text:p>0.003951617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4840072">
            <text:p>-0.004840072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-0.0008335569">
            <text:p>-0.0008335569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3250245">
            <text:p>0.003250245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4679428">
            <text:p>-0.004679428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8877189">
            <text:p>-0.008877189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1945754">
            <text:p>0.001945754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2793672">
            <text:p>-0.002793672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506776">
            <text:p>0.00506776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343984">
            <text:p>0.02343984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3967497">
            <text:p>-0.003967497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-0.0001275783">
            <text:p>-0.0001275783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1557752">
            <text:p>0.001557752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4733825">
            <text:p>-0.004733825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292558">
            <text:p>-0.00292558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4556628">
            <text:p>0.004556628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6611381">
            <text:p>0.006611381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3241972">
            <text:p>-0.003241972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09951963">
            <text:p>-0.009951963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5797038">
            <text:p>0.005797038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07892069">
            <text:p>-0.0007892069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6246697">
            <text:p>-0.006246697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08005338">
            <text:p>0.0008005338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1949168">
            <text:p>0.001949168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4540798">
            <text:p>0.004540798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4573877">
            <text:p>-0.004573877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-0.0002643454">
            <text:p>-0.0002643454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5265746">
            <text:p>0.005265746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3895423">
            <text:p>0.003895423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3715905">
            <text:p>-0.003715905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06003464">
            <text:p>0.0006003464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2572">
            <text:p>0.012572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2947654">
            <text:p>-0.002947654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2323537">
            <text:p>-0.002323537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4237838">
            <text:p>-0.004237838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389912">
            <text:p>0.01389912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1215933">
            <text:p>0.001215933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3415278">
            <text:p>0.003415278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07676583">
            <text:p>0.007676583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1043023">
            <text:p>0.001043023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3643028">
            <text:p>0.003643028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6589853">
            <text:p>-0.006589853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8258339">
            <text:p>-0.008258339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6092248">
            <text:p>-0.006092248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123534">
            <text:p>0.01123534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7837513">
            <text:p>-0.007837513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2140937">
            <text:p>-0.002140937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7525906">
            <text:p>0.007525906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1013294">
            <text:p>0.01013294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09541581">
            <text:p>0.009541581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9090758">
            <text:p>-0.009090758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1731635">
            <text:p>-0.001731635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170957">
            <text:p>-0.00170957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139414">
            <text:p>-0.01139414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0.0002846498">
            <text:p>0.0002846498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34266">
            <text:p>0.0134266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07888206">
            <text:p>0.0007888206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07907646">
            <text:p>0.007907646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1038156">
            <text:p>-0.01038156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6010125">
            <text:p>0.006010125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3988513">
            <text:p>-0.003988513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2632972">
            <text:p>-0.002632972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261592">
            <text:p>-0.01261592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6329998">
            <text:p>0.006329998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3047028">
            <text:p>0.003047028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0.0001704073">
            <text:p>0.0001704073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189779">
            <text:p>-0.01189779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8322938">
            <text:p>0.008322938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5558586">
            <text:p>-0.005558586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104416">
            <text:p>-0.00104416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435112">
            <text:p>-0.01435112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0.0006230104">
            <text:p>0.0006230104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11206">
            <text:p>0.0111206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1653195">
            <text:p>0.001653195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221959">
            <text:p>-0.01221959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651572">
            <text:p>0.00651572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0938126">
            <text:p>0.00938126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698439">
            <text:p>-0.00698439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3685155">
            <text:p>-0.003685155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2679711">
            <text:p>0.002679711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6914176">
            <text:p>0.006914176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09593055">
            <text:p>-0.009593055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2407039">
            <text:p>0.002407039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09753824">
            <text:p>0.009753824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5231112">
            <text:p>0.005231112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07817466">
            <text:p>0.007817466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7080392">
            <text:p>-0.007080392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2091051">
            <text:p>-0.002091051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5761988">
            <text:p>0.005761988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1032874">
            <text:p>-0.01032874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3995467">
            <text:p>-0.003995467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490662">
            <text:p>0.01490662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6184823">
            <text:p>-0.006184823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3842223">
            <text:p>-0.003842223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3441307">
            <text:p>-0.003441307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1895252">
            <text:p>0.001895252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1054449">
            <text:p>-0.001054449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04507">
            <text:p>-0.0104507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510427">
            <text:p>-0.01510427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642903">
            <text:p>0.00642903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09020201">
            <text:p>0.009020201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6192218">
            <text:p>-0.006192218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2502176">
            <text:p>-0.002502176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1054278">
            <text:p>0.01054278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068786">
            <text:p>0.01068786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6850555">
            <text:p>-0.006850555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5058929">
            <text:p>-0.005058929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7130548">
            <text:p>0.007130548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8038917">
            <text:p>0.008038917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09900062">
            <text:p>-0.009900062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038281">
            <text:p>-0.01038281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003145">
            <text:p>0.01003145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03861953">
            <text:p>-0.0003861953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6598715">
            <text:p>-0.006598715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4604799">
            <text:p>-0.004604799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3691586">
            <text:p>-0.003691586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295565">
            <text:p>0.008295565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05284192">
            <text:p>-0.005284192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396734">
            <text:p>-0.01396734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394042">
            <text:p>0.01394042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0.0007652407">
            <text:p>0.0007652407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09582978">
            <text:p>-0.009582978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08573538">
            <text:p>0.008573538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4279835">
            <text:p>0.004279835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2728303">
            <text:p>0.002728303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332416">
            <text:p>-0.01332416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1541958">
            <text:p>0.01541958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8498902">
            <text:p>0.008498902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111152">
            <text:p>0.01111152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1356809">
            <text:p>-0.001356809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1517684">
            <text:p>-0.001517684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2340717">
            <text:p>-0.002340717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7599011">
            <text:p>0.007599011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117723">
            <text:p>0.01117723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02737737">
            <text:p>0.0002737737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7553478">
            <text:p>0.007553478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57913">
            <text:p>0.0157913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5813944">
            <text:p>-0.005813944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1431507">
            <text:p>-0.001431507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066164">
            <text:p>0.01066164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158226">
            <text:p>0.03158226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1006556">
            <text:p>0.01006556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6541329">
            <text:p>-0.006541329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4294358">
            <text:p>0.004294358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string">
            <text:p>6.360861E-05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5539363">
            <text:p>0.005539363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5264279">
            <text:p>-0.005264279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7437091">
            <text:p>0.007437091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3428448">
            <text:p>0.03428448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281436">
            <text:p>0.01281436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064546">
            <text:p>-0.01064546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2241096">
            <text:p>-0.002241096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8901">
            <text:p>0.0108901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1435685">
            <text:p>-0.001435685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9175122">
            <text:p>0.009175122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351943">
            <text:p>0.01351943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-0.000229803">
            <text:p>-0.000229803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007282">
            <text:p>-0.01007282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0.0002626255">
            <text:p>0.0002626255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5827293">
            <text:p>0.005827293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1742378">
            <text:p>-0.001742378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09187668">
            <text:p>-0.009187668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771826">
            <text:p>0.00771826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3514931">
            <text:p>0.003514931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544547">
            <text:p>0.00544547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3995364">
            <text:p>-0.003995364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792466">
            <text:p>0.005792466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1454655">
            <text:p>0.001454655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09741846">
            <text:p>0.009741846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02828542">
            <text:p>-0.0002828542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3895521">
            <text:p>0.003895521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239402">
            <text:p>0.01239402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740139">
            <text:p>-0.00740139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4385259">
            <text:p>-0.004385259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6667191">
            <text:p>0.006667191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6745022">
            <text:p>0.006745022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686928">
            <text:p>-0.00686928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262498">
            <text:p>0.01262498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7613925">
            <text:p>0.007613925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6382742">
            <text:p>0.006382742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133274">
            <text:p>-0.00133274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049609">
            <text:p>-0.01049609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2258727">
            <text:p>0.002258727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3832374">
            <text:p>-0.003832374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4914082">
            <text:p>-0.004914082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09105474">
            <text:p>-0.009105474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6741485">
            <text:p>0.006741485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3100575">
            <text:p>-0.003100575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2531158">
            <text:p>-0.002531158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6903694">
            <text:p>-0.006903694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46024">
            <text:p>0.0046024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436603">
            <text:p>0.01436603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5946264">
            <text:p>-0.005946264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163049">
            <text:p>-0.01163049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6473847">
            <text:p>-0.006473847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3086258">
            <text:p>0.003086258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3603756">
            <text:p>-0.003603756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6489384">
            <text:p>-0.006489384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5104449">
            <text:p>0.005104449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5142876">
            <text:p>0.005142876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2339231">
            <text:p>-0.002339231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09452047">
            <text:p>-0.009452047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656595">
            <text:p>0.01656595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1746311">
            <text:p>-0.001746311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180555">
            <text:p>-0.01180555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4411692">
            <text:p>0.004411692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360276">
            <text:p>0.02360276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08573282">
            <text:p>-0.0008573282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4916957">
            <text:p>-0.004916957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0811028">
            <text:p>0.00811028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2925229">
            <text:p>-0.002925229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3655578">
            <text:p>0.003655578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563528">
            <text:p>-0.00563528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6868916">
            <text:p>-0.006868916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3009259">
            <text:p>0.003009259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08671004">
            <text:p>-0.008671004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5152124">
            <text:p>-0.005152124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7473833">
            <text:p>-0.007473833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0.0002378923">
            <text:p>0.0002378923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09702109">
            <text:p>0.009702109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1222636">
            <text:p>-0.001222636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3242871">
            <text:p>-0.003242871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0.0006833087">
            <text:p>0.0006833087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5488467">
            <text:p>-0.005488467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5855497">
            <text:p>-0.005855497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4169655">
            <text:p>-0.004169655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489089">
            <text:p>0.02489089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0.001625245">
            <text:p>0.001625245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3982728">
            <text:p>0.003982728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1074598">
            <text:p>0.01074598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1046469">
            <text:p>0.01046469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1017158">
            <text:p>0.01017158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244282">
            <text:p>0.00244282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4482966">
            <text:p>-0.004482966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2245462">
            <text:p>-0.002245462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6444365">
            <text:p>0.006444365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09236948">
            <text:p>-0.009236948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4774495">
            <text:p>0.004774495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5383521">
            <text:p>0.005383521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string">
            <text:p>8.19705E-05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0746714">
            <text:p>-0.00746714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1049949">
            <text:p>0.01049949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290661">
            <text:p>0.04290661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2960403">
            <text:p>0.002960403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679798">
            <text:p>0.01679798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09610306">
            <text:p>-0.009610306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8303015">
            <text:p>0.008303015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6301804">
            <text:p>0.006301804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65548">
            <text:p>0.0165548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01403709">
            <text:p>-0.0001403709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2110627">
            <text:p>0.02110627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605029">
            <text:p>0.01605029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7258786">
            <text:p>0.007258786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6845258">
            <text:p>-0.006845258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4902397">
            <text:p>0.004902397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3394173">
            <text:p>0.003394173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131077">
            <text:p>-0.01131077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06975955">
            <text:p>-0.006975955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1031664">
            <text:p>0.01031664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0.001033961">
            <text:p>0.001033961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5760604">
            <text:p>-0.005760604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09607255">
            <text:p>-0.009607255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415157">
            <text:p>0.01415157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8442179">
            <text:p>0.008442179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3068805">
            <text:p>-0.003068805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03577434">
            <text:p>-0.0003577434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781709">
            <text:p>0.01781709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70964">
            <text:p>0.0270964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12094">
            <text:p>-0.0012094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4839092">
            <text:p>0.004839092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541135">
            <text:p>0.00541135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200555">
            <text:p>0.0200555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279165">
            <text:p>0.02279165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09407774">
            <text:p>-0.009407774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749894">
            <text:p>0.00749894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2015299">
            <text:p>-0.002015299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5819919">
            <text:p>-0.005819919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4682991">
            <text:p>-0.004682991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6568117">
            <text:p>0.006568117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2979915">
            <text:p>-0.002979915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324279">
            <text:p>-0.00324279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4571465">
            <text:p>0.004571465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1171436">
            <text:p>0.01171436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5616401">
            <text:p>0.005616401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07374694">
            <text:p>-0.007374694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0761214">
            <text:p>-0.00761214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4973671">
            <text:p>0.004973671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1051091">
            <text:p>0.01051091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9239901">
            <text:p>0.009239901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08520439">
            <text:p>-0.008520439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715856">
            <text:p>0.01715856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0.004162318">
            <text:p>0.004162318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4302252">
            <text:p>-0.004302252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3393064">
            <text:p>-0.003393064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810027">
            <text:p>0.01810027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5089366">
            <text:p>0.005089366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0947716">
            <text:p>-0.00947716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41928">
            <text:p>-0.0041928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776461">
            <text:p>0.01776461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4227385">
            <text:p>-0.004227385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1521445">
            <text:p>-0.001521445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08452925">
            <text:p>-0.008452925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1402355">
            <text:p>-0.001402355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449276">
            <text:p>0.01449276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08466619">
            <text:p>-0.008466619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07448187">
            <text:p>-0.0007448187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8043657">
            <text:p>0.008043657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0.004809291">
            <text:p>0.004809291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07483874">
            <text:p>-0.007483874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09462154">
            <text:p>-0.0009462154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558229">
            <text:p>0.01558229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0.002898257">
            <text:p>0.002898257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0.001149888">
            <text:p>0.001149888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0773156">
            <text:p>-0.00773156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0.002526253">
            <text:p>0.002526253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2389967">
            <text:p>0.02389967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3814526">
            <text:p>-0.003814526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1435968">
            <text:p>-0.001435968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7605677">
            <text:p>0.007605677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7035921">
            <text:p>0.007035921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04965885">
            <text:p>-0.0004965885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0.001694786">
            <text:p>0.001694786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9134421">
            <text:p>0.009134421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92648">
            <text:p>0.0192648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0.0008726385">
            <text:p>0.0008726385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0.001056909">
            <text:p>0.001056909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1330342">
            <text:p>0.01330342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0.002368503">
            <text:p>0.002368503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02891767">
            <text:p>-0.002891767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0.0008341558">
            <text:p>0.0008341558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7785981">
            <text:p>0.007785981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1049963">
            <text:p>0.01049963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9347864">
            <text:p>0.009347864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03226094">
            <text:p>-0.003226094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0.002202305">
            <text:p>0.002202305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1043029">
            <text:p>0.01043029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02143508">
            <text:p>-0.002143508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0.002665194">
            <text:p>0.002665194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0.005228537">
            <text:p>0.005228537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2220928">
            <text:p>0.02220928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0502632">
            <text:p>-0.000502632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0.004686771">
            <text:p>0.004686771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2070984">
            <text:p>0.02070984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2456668">
            <text:p>0.02456668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0.0009155495">
            <text:p>0.0009155495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1099945">
            <text:p>0.01099945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0.003638898">
            <text:p>0.003638898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1621888">
            <text:p>0.01621888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05303707">
            <text:p>-0.005303707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0.009491595">
            <text:p>0.009491595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1388104">
            <text:p>0.01388104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1952521">
            <text:p>0.01952521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0.008356331">
            <text:p>0.008356331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0.002465399">
            <text:p>0.002465399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1224385">
            <text:p>0.01224385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2610433">
            <text:p>0.02610433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004589444">
            <text:p>-0.0004589444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03237061">
            <text:p>-0.003237061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1903319">
            <text:p>0.01903319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0.01147027">
            <text:p>0.01147027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0.009263601">
            <text:p>0.009263601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0.001625113">
            <text:p>0.001625113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0.01065843">
            <text:p>0.01065843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1618095">
            <text:p>0.01618095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005950925">
            <text:p>-0.0005950925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0.007954965">
            <text:p>0.007954965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2559959">
            <text:p>0.02559959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1507831">
            <text:p>0.01507831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1934309">
            <text:p>0.01934309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0.005397398">
            <text:p>0.005397398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0.01334738">
            <text:p>0.01334738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3610944">
            <text:p>0.03610944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0.003170909">
            <text:p>0.003170909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0.006446416">
            <text:p>0.006446416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3541296">
            <text:p>0.03541296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0.01724224">
            <text:p>0.01724224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0.01364257">
            <text:p>0.01364257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0.01429936">
            <text:p>0.01429936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2157412">
            <text:p>0.02157412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19481">
            <text:p>0.019481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1800202">
            <text:p>0.01800202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0.01275387">
            <text:p>0.01275387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2689041">
            <text:p>0.02689041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0.01541271">
            <text:p>0.01541271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2840987">
            <text:p>0.02840987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2043972">
            <text:p>0.02043972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2559593">
            <text:p>0.02559593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2732905">
            <text:p>0.02732905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2624816">
            <text:p>0.02624816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0.01043693">
            <text:p>0.01043693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2516592">
            <text:p>0.02516592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3849156">
            <text:p>0.03849156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0.01588552">
            <text:p>0.01588552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0.01089616">
            <text:p>0.01089616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2886871">
            <text:p>0.02886871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0.02158752">
            <text:p>0.02158752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0.01047546">
            <text:p>0.01047546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0.01173385">
            <text:p>0.01173385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3182257">
            <text:p>0.03182257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0.02277913">
            <text:p>0.02277913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0.02311774">
            <text:p>0.02311774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0.0175685">
            <text:p>0.0175685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3144355">
            <text:p>0.03144355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3168647">
            <text:p>0.03168647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0.01311959">
            <text:p>0.01311959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0.02273822">
            <text:p>0.02273822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362775">
            <text:p>0.0362775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0.03039263">
            <text:p>0.03039263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0.01862453">
            <text:p>0.01862453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4384954">
            <text:p>0.04384954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3673787">
            <text:p>0.03673787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0.01968662">
            <text:p>0.01968662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0.0313324">
            <text:p>0.0313324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0.02962226">
            <text:p>0.02962226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4432444">
            <text:p>0.04432444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0.0356722">
            <text:p>0.0356722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0.03234093">
            <text:p>0.03234093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3763064">
            <text:p>0.03763064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4870215">
            <text:p>0.04870215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0.03481229">
            <text:p>0.03481229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0.02915352">
            <text:p>0.02915352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500062">
            <text:p>0.0500062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0.04058789">
            <text:p>0.04058789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0.0368857">
            <text:p>0.0368857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0.03085649">
            <text:p>0.03085649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4697012">
            <text:p>0.04697012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4814435">
            <text:p>0.04814435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0.03319828">
            <text:p>0.03319828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4792778">
            <text:p>0.04792778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4872977">
            <text:p>0.04872977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5155414">
            <text:p>0.05155414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0.04275596">
            <text:p>0.04275596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0.04215417">
            <text:p>0.04215417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6148221">
            <text:p>0.06148221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0.04809966">
            <text:p>0.04809966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0.04545852">
            <text:p>0.04545852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0.05436134">
            <text:p>0.05436134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6765465">
            <text:p>0.06765465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6081937">
            <text:p>0.06081937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5845508">
            <text:p>0.05845508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0.04848374">
            <text:p>0.04848374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0.05626361">
            <text:p>0.05626361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6842739">
            <text:p>0.06842739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6350247">
            <text:p>0.06350247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0.06212865">
            <text:p>0.06212865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0.06187871">
            <text:p>0.06187871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0.06562858">
            <text:p>0.06562858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0.06245831">
            <text:p>0.06245831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0.06412544">
            <text:p>0.06412544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0.0692734">
            <text:p>0.0692734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7932739">
            <text:p>0.07932739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0.06320766">
            <text:p>0.06320766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0.06517254">
            <text:p>0.06517254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8197287">
            <text:p>0.08197287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8710329">
            <text:p>0.08710329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0.06841313">
            <text:p>0.06841313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8735075">
            <text:p>0.08735075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0.08112688">
            <text:p>0.08112688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1113099">
            <text:p>0.1113099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0.08532234">
            <text:p>0.08532234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9755529">
            <text:p>0.09755529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0.08738124">
            <text:p>0.08738124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0.08744911">
            <text:p>0.08744911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1062949">
            <text:p>0.1062949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0.08682298">
            <text:p>0.08682298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1071147">
            <text:p>0.1071147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1067901">
            <text:p>0.1067901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0.09895211">
            <text:p>0.09895211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1076809">
            <text:p>0.1076809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1290628">
            <text:p>0.1290628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1140761">
            <text:p>0.1140761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0.1080746">
            <text:p>0.1080746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0.1048731">
            <text:p>0.1048731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1215747">
            <text:p>0.1215747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1255508">
            <text:p>0.1255508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0.1208838">
            <text:p>0.1208838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0.1115975">
            <text:p>0.1115975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1319648">
            <text:p>0.1319648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1457074">
            <text:p>0.1457074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0.1277539">
            <text:p>0.1277539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0.1325119">
            <text:p>0.1325119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1496877">
            <text:p>0.1496877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0.1379296">
            <text:p>0.1379296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1431985">
            <text:p>0.1431985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0.1313273">
            <text:p>0.1313273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1509132">
            <text:p>0.1509132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1774331">
            <text:p>0.1774331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0.1458793">
            <text:p>0.1458793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0.1508415">
            <text:p>0.1508415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1674834">
            <text:p>0.1674834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0.1610256">
            <text:p>0.1610256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0.1563612">
            <text:p>0.1563612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0.1548881">
            <text:p>0.1548881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0.1723234">
            <text:p>0.1723234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1975982">
            <text:p>0.1975982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0.1725562">
            <text:p>0.1725562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1829886">
            <text:p>0.1829886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1866179">
            <text:p>0.1866179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1887645">
            <text:p>0.1887645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0.1817127">
            <text:p>0.1817127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0.1826269">
            <text:p>0.1826269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0.1981729">
            <text:p>0.1981729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2050053">
            <text:p>0.2050053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0.1929143">
            <text:p>0.1929143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0.2052131">
            <text:p>0.2052131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2188973">
            <text:p>0.2188973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2148949">
            <text:p>0.2148949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0.2167556">
            <text:p>0.2167556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2871545">
            <text:p>0.2871545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0.2288043">
            <text:p>0.2288043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0.2302532">
            <text:p>0.2302532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2387325">
            <text:p>0.2387325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0.2283643">
            <text:p>0.2283643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2461198">
            <text:p>0.2461198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0.2440472">
            <text:p>0.2440472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0.2434676">
            <text:p>0.2434676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2562127">
            <text:p>0.2562127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2643758">
            <text:p>0.2643758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0.2642537">
            <text:p>0.2642537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0.2595974">
            <text:p>0.2595974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0.2631037">
            <text:p>0.2631037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0.2740801">
            <text:p>0.2740801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2887692">
            <text:p>0.2887692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0.2746715">
            <text:p>0.2746715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0.2841054">
            <text:p>0.2841054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0.2928946">
            <text:p>0.2928946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0.2959068">
            <text:p>0.2959068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0.3004378">
            <text:p>0.3004378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0.2948057">
            <text:p>0.2948057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0.3129191">
            <text:p>0.3129191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3230937">
            <text:p>0.3230937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3257244">
            <text:p>0.3257244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0.3181327">
            <text:p>0.3181327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0.3274767">
            <text:p>0.3274767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0.3347595">
            <text:p>0.3347595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0.334708">
            <text:p>0.334708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0.3418203">
            <text:p>0.3418203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3563457">
            <text:p>0.3563457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3782934">
            <text:p>0.3782934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0.3534561">
            <text:p>0.3534561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0.3580984">
            <text:p>0.3580984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3695452">
            <text:p>0.3695452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3822612">
            <text:p>0.3822612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0.366247">
            <text:p>0.366247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0.3761072">
            <text:p>0.3761072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3862391">
            <text:p>0.3862391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3950462">
            <text:p>0.3950462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3940906">
            <text:p>0.3940906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0.3977406">
            <text:p>0.3977406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4137026">
            <text:p>0.4137026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4121055">
            <text:p>0.4121055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4134149">
            <text:p>0.4134149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4241392">
            <text:p>0.4241392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4334404">
            <text:p>0.4334404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0.4269139">
            <text:p>0.4269139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0.4250339">
            <text:p>0.4250339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0.4258401">
            <text:p>0.4258401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0.4375346">
            <text:p>0.4375346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0.4473578">
            <text:p>0.4473578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0.4393961">
            <text:p>0.4393961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0.4469443">
            <text:p>0.4469443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0.460026">
            <text:p>0.460026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0.4612059">
            <text:p>0.4612059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0.4627756">
            <text:p>0.4627756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0.4709632">
            <text:p>0.4709632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4792036">
            <text:p>0.4792036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0.4779849">
            <text:p>0.4779849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0.4779622">
            <text:p>0.4779622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0.4816875">
            <text:p>0.4816875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5091458">
            <text:p>0.5091458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505109">
            <text:p>0.505109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0.4953455">
            <text:p>0.4953455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0.5038982">
            <text:p>0.5038982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5244655">
            <text:p>0.5244655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0.5142261">
            <text:p>0.5142261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0.5158045">
            <text:p>0.5158045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0.5167352">
            <text:p>0.5167352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5356109">
            <text:p>0.5356109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5370824">
            <text:p>0.5370824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0.5305191">
            <text:p>0.5305191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0.529359">
            <text:p>0.529359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0.5382643">
            <text:p>0.5382643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5469333">
            <text:p>0.5469333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0.5463478">
            <text:p>0.5463478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0.5433609">
            <text:p>0.5433609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5610914">
            <text:p>0.5610914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5623233">
            <text:p>0.5623233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0.5506264">
            <text:p>0.5506264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5749488">
            <text:p>0.5749488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0.5657779">
            <text:p>0.5657779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0.56837">
            <text:p>0.56837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0.5658096">
            <text:p>0.5658096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0.5656685">
            <text:p>0.5656685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0.5787914">
            <text:p>0.5787914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0.5792233">
            <text:p>0.5792233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0.5835759">
            <text:p>0.5835759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0.5862295">
            <text:p>0.5862295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0.5884396">
            <text:p>0.5884396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5998537">
            <text:p>0.5998537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6424502">
            <text:p>0.6424502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0.5979856">
            <text:p>0.5979856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6119077">
            <text:p>0.6119077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0.6047156">
            <text:p>0.6047156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6255735">
            <text:p>0.6255735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0.6033393">
            <text:p>0.6033393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6150585">
            <text:p>0.6150585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6218408">
            <text:p>0.6218408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0.6057283">
            <text:p>0.6057283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0.6081378">
            <text:p>0.6081378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6301233">
            <text:p>0.6301233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6284714">
            <text:p>0.6284714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0.6145704">
            <text:p>0.6145704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6307184">
            <text:p>0.6307184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6341835">
            <text:p>0.6341835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6347455">
            <text:p>0.6347455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6396238">
            <text:p>0.6396238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0.6263146">
            <text:p>0.6263146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6346857">
            <text:p>0.6346857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6413703">
            <text:p>0.6413703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0.6249728">
            <text:p>0.6249728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6336926">
            <text:p>0.6336926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0.6418763">
            <text:p>0.6418763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6459002">
            <text:p>0.6459002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0.6400673">
            <text:p>0.6400673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0.6308386">
            <text:p>0.6308386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0.6424313">
            <text:p>0.6424313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6492342">
            <text:p>0.6492342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0.6442485">
            <text:p>0.6442485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6491637">
            <text:p>0.6491637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0.6476716">
            <text:p>0.6476716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6606032">
            <text:p>0.6606032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0.6468583">
            <text:p>0.6468583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6522993">
            <text:p>0.6522993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0.6475618">
            <text:p>0.6475618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0.6465117">
            <text:p>0.6465117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0.6433542">
            <text:p>0.6433542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0.6490946">
            <text:p>0.6490946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0.6500166">
            <text:p>0.6500166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6646945">
            <text:p>0.6646945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671848">
            <text:p>0.671848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0.6469294">
            <text:p>0.6469294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6513144">
            <text:p>0.6513144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6584596">
            <text:p>0.6584596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0.645646">
            <text:p>0.645646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6555002">
            <text:p>0.6555002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6559352">
            <text:p>0.6559352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6525484">
            <text:p>0.6525484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6556428">
            <text:p>0.6556428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0.653012">
            <text:p>0.653012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0.6484038">
            <text:p>0.6484038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657237">
            <text:p>0.657237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6551791">
            <text:p>0.6551791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6546758">
            <text:p>0.6546758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6667914">
            <text:p>0.6667914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6582841">
            <text:p>0.6582841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0.6410555">
            <text:p>0.6410555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0.6384692">
            <text:p>0.6384692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6513964">
            <text:p>0.6513964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0.6464329">
            <text:p>0.6464329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6519525">
            <text:p>0.6519525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0.6411361">
            <text:p>0.6411361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6480086">
            <text:p>0.6480086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6468309">
            <text:p>0.6468309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0.6407256">
            <text:p>0.6407256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0.6380429">
            <text:p>0.6380429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6561124">
            <text:p>0.6561124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0.6372285">
            <text:p>0.6372285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0.6406654">
            <text:p>0.6406654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0.6328859">
            <text:p>0.6328859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0.637248">
            <text:p>0.637248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0.6271459">
            <text:p>0.6271459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0.6285409">
            <text:p>0.6285409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0.6333809">
            <text:p>0.6333809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6544008">
            <text:p>0.6544008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636096">
            <text:p>0.636096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0.6258928">
            <text:p>0.6258928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6320524">
            <text:p>0.6320524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6402192">
            <text:p>0.6402192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0.6199085">
            <text:p>0.6199085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0.6197883">
            <text:p>0.6197883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0.6250662">
            <text:p>0.6250662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0.6215981">
            <text:p>0.6215981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632346">
            <text:p>0.632346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6240826">
            <text:p>0.6240826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6575214">
            <text:p>0.6575214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631992">
            <text:p>0.631992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6178206">
            <text:p>0.6178206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0.6138186">
            <text:p>0.6138186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6188055">
            <text:p>0.6188055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6191467">
            <text:p>0.6191467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6277943">
            <text:p>0.6277943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0.6045255">
            <text:p>0.6045255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6276001">
            <text:p>0.6276001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6176804">
            <text:p>0.6176804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6074979">
            <text:p>0.6074979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609847">
            <text:p>0.609847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6090683">
            <text:p>0.6090683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0.6065358">
            <text:p>0.6065358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0.5983377">
            <text:p>0.5983377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0.5935301">
            <text:p>0.5935301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6106113">
            <text:p>0.6106113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607124">
            <text:p>0.607124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5995746">
            <text:p>0.5995746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0.5883506">
            <text:p>0.5883506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614232">
            <text:p>0.614232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6031473">
            <text:p>0.6031473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0.5853524">
            <text:p>0.5853524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0.5840082">
            <text:p>0.5840082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5921251">
            <text:p>0.5921251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6063872">
            <text:p>0.6063872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0.5823044">
            <text:p>0.5823044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0.5822343">
            <text:p>0.5822343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5880426">
            <text:p>0.5880426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5906639">
            <text:p>0.5906639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0.5762442">
            <text:p>0.5762442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0.5660264">
            <text:p>0.5660264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0.5757334">
            <text:p>0.5757334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0.573545">
            <text:p>0.573545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0.571852">
            <text:p>0.571852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5859736">
            <text:p>0.5859736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0.5666245">
            <text:p>0.5666245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5855079">
            <text:p>0.5855079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0.5640521">
            <text:p>0.5640521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5665926">
            <text:p>0.5665926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5749786">
            <text:p>0.5749786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5681161">
            <text:p>0.5681161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5798835">
            <text:p>0.5798835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0.5529503">
            <text:p>0.5529503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5630444">
            <text:p>0.5630444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0.5560676">
            <text:p>0.5560676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0.5471279">
            <text:p>0.5471279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0.5433295">
            <text:p>0.5433295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5590649">
            <text:p>0.5590649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5574449">
            <text:p>0.5574449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0.5403442">
            <text:p>0.5403442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0.5484949">
            <text:p>0.5484949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5519816">
            <text:p>0.5519816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0.5406668">
            <text:p>0.5406668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5609416">
            <text:p>0.5609416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5535384">
            <text:p>0.5535384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5442839">
            <text:p>0.5442839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5400693">
            <text:p>0.5400693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0.5327384">
            <text:p>0.5327384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0.5245736">
            <text:p>0.5245736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5394344">
            <text:p>0.5394344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5453585">
            <text:p>0.5453585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0.5259773">
            <text:p>0.5259773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5303376">
            <text:p>0.5303376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5310599">
            <text:p>0.5310599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5248477">
            <text:p>0.5248477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0.5217355">
            <text:p>0.5217355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5227289">
            <text:p>0.5227289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5242407">
            <text:p>0.5242407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0.5198933">
            <text:p>0.5198933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0.509254">
            <text:p>0.509254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0.5064743">
            <text:p>0.5064743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5180931">
            <text:p>0.5180931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5633666">
            <text:p>0.5633666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5181623">
            <text:p>0.5181623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5098872">
            <text:p>0.5098872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5102377">
            <text:p>0.5102377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0.5053171">
            <text:p>0.5053171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505105">
            <text:p>0.505105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5078205">
            <text:p>0.5078205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0.5007555">
            <text:p>0.5007555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0.4957522">
            <text:p>0.4957522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0.4966643">
            <text:p>0.4966643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0.4929414">
            <text:p>0.4929414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496019">
            <text:p>0.496019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5179035">
            <text:p>0.5179035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4925554">
            <text:p>0.4925554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5025597">
            <text:p>0.5025597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0.4772711">
            <text:p>0.4772711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0.4840868">
            <text:p>0.4840868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4843922">
            <text:p>0.4843922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0.4738821">
            <text:p>0.4738821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4888036">
            <text:p>0.4888036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0.4745352">
            <text:p>0.4745352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0.4709145">
            <text:p>0.4709145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497437">
            <text:p>0.497437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0.4732268">
            <text:p>0.4732268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4788232">
            <text:p>0.4788232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4743594">
            <text:p>0.4743594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0.4613311">
            <text:p>0.4613311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4808821">
            <text:p>0.4808821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4737516">
            <text:p>0.4737516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0.4630084">
            <text:p>0.4630084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4682653">
            <text:p>0.4682653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0.4563571">
            <text:p>0.4563571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0.4550177">
            <text:p>0.4550177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4626882">
            <text:p>0.4626882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0.4477882">
            <text:p>0.4477882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0.4530875">
            <text:p>0.4530875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0.4479651">
            <text:p>0.4479651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0.4426939">
            <text:p>0.4426939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4538189">
            <text:p>0.4538189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4480451">
            <text:p>0.4480451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4491501">
            <text:p>0.4491501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0.4351895">
            <text:p>0.4351895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0.4366276">
            <text:p>0.4366276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0.4397619">
            <text:p>0.4397619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4474566">
            <text:p>0.4474566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4481651">
            <text:p>0.4481651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4461682">
            <text:p>0.4461682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0.4349391">
            <text:p>0.4349391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0.4322978">
            <text:p>0.4322978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0.4186037">
            <text:p>0.4186037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0.4239908">
            <text:p>0.4239908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0.428378">
            <text:p>0.428378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0.4290837">
            <text:p>0.4290837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444601">
            <text:p>0.444601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0.4251879">
            <text:p>0.4251879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4266007">
            <text:p>0.4266007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0.4231376">
            <text:p>0.4231376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4238019">
            <text:p>0.4238019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0.4143845">
            <text:p>0.4143845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4231814">
            <text:p>0.4231814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0.4166501">
            <text:p>0.4166501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4166991">
            <text:p>0.4166991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0.4029923">
            <text:p>0.4029923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4443128">
            <text:p>0.4443128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413955">
            <text:p>0.413955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4352263">
            <text:p>0.4352263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4113777">
            <text:p>0.4113777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4378699">
            <text:p>0.4378699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0.4059887">
            <text:p>0.4059887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4088332">
            <text:p>0.4088332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0.3956457">
            <text:p>0.3956457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4098761">
            <text:p>0.4098761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4042514">
            <text:p>0.4042514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0.3918492">
            <text:p>0.3918492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3965853">
            <text:p>0.3965853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0.3975397">
            <text:p>0.3975397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0.3935247">
            <text:p>0.3935247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0.3917156">
            <text:p>0.3917156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0.3827038">
            <text:p>0.3827038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3984431">
            <text:p>0.3984431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0.3848363">
            <text:p>0.3848363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0.3819418">
            <text:p>0.3819418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0.387414">
            <text:p>0.387414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0.3862843">
            <text:p>0.3862843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4018264">
            <text:p>0.4018264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0.3819138">
            <text:p>0.3819138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0.3820043">
            <text:p>0.3820043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0.3753437">
            <text:p>0.3753437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0.3809061">
            <text:p>0.3809061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3808873">
            <text:p>0.3808873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0.3754676">
            <text:p>0.3754676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3886017">
            <text:p>0.3886017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0.3737167">
            <text:p>0.3737167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3785189">
            <text:p>0.3785189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3896584">
            <text:p>0.3896584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0.3721785">
            <text:p>0.3721785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0.3618252">
            <text:p>0.3618252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3741889">
            <text:p>0.3741889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3735655">
            <text:p>0.3735655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0.3635615">
            <text:p>0.3635615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3761185">
            <text:p>0.3761185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0.3676026">
            <text:p>0.3676026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0.3594216">
            <text:p>0.3594216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374476">
            <text:p>0.374476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0.3620496">
            <text:p>0.3620496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3712341">
            <text:p>0.3712341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0.3519679">
            <text:p>0.3519679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3648378">
            <text:p>0.3648378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3646119">
            <text:p>0.3646119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0.3497095">
            <text:p>0.3497095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3608169">
            <text:p>0.3608169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0.3513026">
            <text:p>0.3513026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0.3516009">
            <text:p>0.3516009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3560244">
            <text:p>0.3560244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0.3525027">
            <text:p>0.3525027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0.3543837">
            <text:p>0.3543837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3600626">
            <text:p>0.3600626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0.3424798">
            <text:p>0.3424798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3529231">
            <text:p>0.3529231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3514256">
            <text:p>0.3514256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3534957">
            <text:p>0.3534957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0.3384864">
            <text:p>0.3384864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0.3445204">
            <text:p>0.3445204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3489727">
            <text:p>0.3489727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3480648">
            <text:p>0.3480648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0.3326018">
            <text:p>0.3326018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0.3435006">
            <text:p>0.3435006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344946">
            <text:p>0.344946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3466868">
            <text:p>0.3466868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3392083">
            <text:p>0.3392083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3478998">
            <text:p>0.3478998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3517707">
            <text:p>0.3517707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3503848">
            <text:p>0.3503848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0.3324206">
            <text:p>0.3324206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3385498">
            <text:p>0.3385498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3387604">
            <text:p>0.3387604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3365421">
            <text:p>0.3365421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334709">
            <text:p>0.334709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3383061">
            <text:p>0.3383061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0.3300449">
            <text:p>0.3300449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3352673">
            <text:p>0.3352673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3342133">
            <text:p>0.3342133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3343903">
            <text:p>0.3343903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0.3224749">
            <text:p>0.3224749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3304154">
            <text:p>0.3304154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3279069">
            <text:p>0.3279069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0.3242325">
            <text:p>0.3242325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0.3135639">
            <text:p>0.3135639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0.3172086">
            <text:p>0.3172086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3303626">
            <text:p>0.3303626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0.3138298">
            <text:p>0.3138298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3224881">
            <text:p>0.3224881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0.3183514">
            <text:p>0.3183514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3269472">
            <text:p>0.3269472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0.3146658">
            <text:p>0.3146658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0.3097146">
            <text:p>0.3097146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0.3157614">
            <text:p>0.3157614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0.3122704">
            <text:p>0.3122704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3204602">
            <text:p>0.3204602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0.3147951">
            <text:p>0.3147951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3158378">
            <text:p>0.3158378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3263604">
            <text:p>0.3263604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3197239">
            <text:p>0.3197239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3119629">
            <text:p>0.3119629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3149043">
            <text:p>0.3149043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0.2985247">
            <text:p>0.2985247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3083455">
            <text:p>0.3083455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0.302414">
            <text:p>0.302414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0.306789">
            <text:p>0.306789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3141528">
            <text:p>0.3141528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309176">
            <text:p>0.309176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3047976">
            <text:p>0.3047976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3056864">
            <text:p>0.3056864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0.2991889">
            <text:p>0.2991889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3051704">
            <text:p>0.3051704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0.2928358">
            <text:p>0.2928358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3037673">
            <text:p>0.3037673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0.2906375">
            <text:p>0.2906375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3133744">
            <text:p>0.3133744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0.2949449">
            <text:p>0.2949449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0.2893668">
            <text:p>0.2893668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3000962">
            <text:p>0.3000962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0.289428">
            <text:p>0.289428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3057624">
            <text:p>0.3057624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0.2915176">
            <text:p>0.2915176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2922034">
            <text:p>0.2922034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304845">
            <text:p>0.304845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0.2883198">
            <text:p>0.2883198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0.2872628">
            <text:p>0.2872628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0.2863866">
            <text:p>0.2863866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0.2861251">
            <text:p>0.2861251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2899844">
            <text:p>0.2899844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3038076">
            <text:p>0.3038076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0.2792479">
            <text:p>0.2792479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294805">
            <text:p>0.294805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2856331">
            <text:p>0.2856331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0.2800136">
            <text:p>0.2800136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0.272149">
            <text:p>0.272149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2830892">
            <text:p>0.2830892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0.2765671">
            <text:p>0.2765671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2982853">
            <text:p>0.2982853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2800864">
            <text:p>0.2800864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2771573">
            <text:p>0.2771573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2778789">
            <text:p>0.2778789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0.2711473">
            <text:p>0.2711473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0.2712801">
            <text:p>0.2712801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0.268621">
            <text:p>0.268621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0.2727545">
            <text:p>0.2727545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0.2722434">
            <text:p>0.2722434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2729723">
            <text:p>0.2729723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2727075">
            <text:p>0.2727075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2720198">
            <text:p>0.2720198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2772797">
            <text:p>0.2772797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2730648">
            <text:p>0.2730648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0.2627592">
            <text:p>0.2627592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2693336">
            <text:p>0.2693336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0.2616093">
            <text:p>0.2616093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2756271">
            <text:p>0.2756271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276206">
            <text:p>0.276206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2668639">
            <text:p>0.2668639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2652671">
            <text:p>0.2652671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2611628">
            <text:p>0.2611628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2605438">
            <text:p>0.2605438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266613">
            <text:p>0.266613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2598522">
            <text:p>0.2598522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0.2541071">
            <text:p>0.2541071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2737727">
            <text:p>0.2737727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2585173">
            <text:p>0.2585173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0.2483826">
            <text:p>0.2483826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2579427">
            <text:p>0.2579427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0.2540533">
            <text:p>0.2540533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2549037">
            <text:p>0.2549037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0.2423481">
            <text:p>0.2423481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0.2461231">
            <text:p>0.2461231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0.2503432">
            <text:p>0.2503432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2600189">
            <text:p>0.2600189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0.246538">
            <text:p>0.246538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250746">
            <text:p>0.250746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2509594">
            <text:p>0.2509594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254278">
            <text:p>0.254278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0.2428802">
            <text:p>0.2428802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2493652">
            <text:p>0.2493652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2465626">
            <text:p>0.2465626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2458461">
            <text:p>0.2458461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2494007">
            <text:p>0.2494007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0.2331185">
            <text:p>0.2331185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2445583">
            <text:p>0.2445583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2487046">
            <text:p>0.2487046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0.2391274">
            <text:p>0.2391274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2440164">
            <text:p>0.2440164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2432047">
            <text:p>0.2432047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2366842">
            <text:p>0.2366842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0.2303614">
            <text:p>0.2303614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2424949">
            <text:p>0.2424949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2607817">
            <text:p>0.2607817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0.2301596">
            <text:p>0.2301596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0.2291014">
            <text:p>0.2291014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2400015">
            <text:p>0.2400015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233908">
            <text:p>0.233908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0.2296673">
            <text:p>0.2296673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2370763">
            <text:p>0.2370763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0.2287397">
            <text:p>0.2287397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2410793">
            <text:p>0.2410793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0.2255136">
            <text:p>0.2255136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0.2190576">
            <text:p>0.2190576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2378555">
            <text:p>0.2378555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2426919">
            <text:p>0.2426919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0.2220957">
            <text:p>0.2220957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2332487">
            <text:p>0.2332487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2280292">
            <text:p>0.2280292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227981">
            <text:p>0.227981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2245398">
            <text:p>0.2245398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0.2141394">
            <text:p>0.2141394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0.2179659">
            <text:p>0.2179659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0.2152698">
            <text:p>0.2152698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2242906">
            <text:p>0.2242906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2325945">
            <text:p>0.2325945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0.2124616">
            <text:p>0.2124616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2222644">
            <text:p>0.2222644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2304999">
            <text:p>0.2304999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0.2107265">
            <text:p>0.2107265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0.2103139">
            <text:p>0.2103139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2158591">
            <text:p>0.2158591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0.2095382">
            <text:p>0.2095382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0.2031985">
            <text:p>0.2031985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2228907">
            <text:p>0.2228907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2207732">
            <text:p>0.2207732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2124917">
            <text:p>0.2124917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2189262">
            <text:p>0.2189262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2426784">
            <text:p>0.2426784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2116953">
            <text:p>0.2116953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2126923">
            <text:p>0.2126923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2184071">
            <text:p>0.2184071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2109278">
            <text:p>0.2109278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0.2000713">
            <text:p>0.2000713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2069789">
            <text:p>0.2069789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200453">
            <text:p>0.200453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2111332">
            <text:p>0.2111332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2074393">
            <text:p>0.2074393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2170036">
            <text:p>0.2170036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2062844">
            <text:p>0.2062844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2012445">
            <text:p>0.2012445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2046574">
            <text:p>0.2046574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2080792">
            <text:p>0.2080792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1944927">
            <text:p>0.1944927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2191691">
            <text:p>0.2191691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2041965">
            <text:p>0.2041965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1981868">
            <text:p>0.1981868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2029248">
            <text:p>0.2029248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217853">
            <text:p>0.217853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205675">
            <text:p>0.205675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1997541">
            <text:p>0.1997541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1939711">
            <text:p>0.1939711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2070187">
            <text:p>0.2070187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1966777">
            <text:p>0.1966777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1992392">
            <text:p>0.1992392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1920447">
            <text:p>0.1920447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2159126">
            <text:p>0.2159126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2167832">
            <text:p>0.2167832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1859141">
            <text:p>0.1859141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1902632">
            <text:p>0.1902632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199759">
            <text:p>0.199759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1995412">
            <text:p>0.1995412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1766889">
            <text:p>0.1766889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192633">
            <text:p>0.192633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1947772">
            <text:p>0.1947772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2068773">
            <text:p>0.2068773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1741786">
            <text:p>0.1741786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1887982">
            <text:p>0.1887982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1882818">
            <text:p>0.1882818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1920685">
            <text:p>0.1920685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1857808">
            <text:p>0.1857808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1732954">
            <text:p>0.1732954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1716709">
            <text:p>0.1716709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1776416">
            <text:p>0.1776416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179919">
            <text:p>0.179919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1651141">
            <text:p>0.1651141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1758418">
            <text:p>0.1758418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1880359">
            <text:p>0.1880359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1874513">
            <text:p>0.1874513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1721787">
            <text:p>0.1721787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1678547">
            <text:p>0.1678547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1759802">
            <text:p>0.1759802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1650248">
            <text:p>0.1650248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1722371">
            <text:p>0.1722371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1727615">
            <text:p>0.1727615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1719281">
            <text:p>0.1719281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160125">
            <text:p>0.160125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174425">
            <text:p>0.174425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1624106">
            <text:p>0.1624106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1840379">
            <text:p>0.1840379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1612133">
            <text:p>0.1612133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1732835">
            <text:p>0.1732835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1595222">
            <text:p>0.1595222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1570206">
            <text:p>0.1570206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1551169">
            <text:p>0.1551169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1591287">
            <text:p>0.1591287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1652412">
            <text:p>0.1652412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1531783">
            <text:p>0.1531783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1522696">
            <text:p>0.1522696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1627532">
            <text:p>0.1627532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1552398">
            <text:p>0.1552398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1558744">
            <text:p>0.1558744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1651403">
            <text:p>0.1651403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151099">
            <text:p>0.151099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1561826">
            <text:p>0.1561826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1486514">
            <text:p>0.1486514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150282">
            <text:p>0.150282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1479885">
            <text:p>0.1479885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1478826">
            <text:p>0.1478826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1444532">
            <text:p>0.1444532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1519034">
            <text:p>0.1519034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1512893">
            <text:p>0.1512893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1492722">
            <text:p>0.1492722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149946">
            <text:p>0.149946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1527933">
            <text:p>0.1527933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1407487">
            <text:p>0.1407487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1634601">
            <text:p>0.1634601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1392511">
            <text:p>0.1392511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15593">
            <text:p>0.15593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1380824">
            <text:p>0.1380824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136047">
            <text:p>0.136047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1395961">
            <text:p>0.1395961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137447">
            <text:p>0.137447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1435176">
            <text:p>0.1435176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1416449">
            <text:p>0.1416449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1318188">
            <text:p>0.1318188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1440031">
            <text:p>0.1440031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1462706">
            <text:p>0.1462706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1335843">
            <text:p>0.1335843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1487379">
            <text:p>0.1487379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1283472">
            <text:p>0.1283472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1318589">
            <text:p>0.1318589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1418976">
            <text:p>0.1418976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1348326">
            <text:p>0.1348326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1383423">
            <text:p>0.1383423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1235734">
            <text:p>0.1235734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1370032">
            <text:p>0.1370032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1237504">
            <text:p>0.1237504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1275491">
            <text:p>0.1275491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1311799">
            <text:p>0.1311799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1244034">
            <text:p>0.1244034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1425283">
            <text:p>0.1425283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1240973">
            <text:p>0.1240973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1225568">
            <text:p>0.1225568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1250608">
            <text:p>0.1250608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1266606">
            <text:p>0.1266606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1340595">
            <text:p>0.1340595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1507769">
            <text:p>0.1507769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1164645">
            <text:p>0.1164645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1228463">
            <text:p>0.1228463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1273088">
            <text:p>0.1273088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1193957">
            <text:p>0.1193957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1240303">
            <text:p>0.1240303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1176067">
            <text:p>0.1176067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11746">
            <text:p>0.11746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1192127">
            <text:p>0.1192127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1131868">
            <text:p>0.1131868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1128168">
            <text:p>0.1128168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1223551">
            <text:p>0.1223551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131025">
            <text:p>0.131025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1204285">
            <text:p>0.1204285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1158554">
            <text:p>0.1158554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1136225">
            <text:p>0.1136225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1251984">
            <text:p>0.1251984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1179046">
            <text:p>0.1179046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1144117">
            <text:p>0.1144117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1129873">
            <text:p>0.1129873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1229516">
            <text:p>0.1229516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1243985">
            <text:p>0.1243985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1167169">
            <text:p>0.1167169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1220142">
            <text:p>0.1220142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1105494">
            <text:p>0.1105494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1061413">
            <text:p>0.1061413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1086309">
            <text:p>0.1086309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1086948">
            <text:p>0.1086948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1104217">
            <text:p>0.1104217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1136604">
            <text:p>0.1136604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1089707">
            <text:p>0.1089707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110739">
            <text:p>0.110739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1052404">
            <text:p>0.1052404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1027225">
            <text:p>0.1027225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1101947">
            <text:p>0.1101947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0997664">
            <text:p>0.0997664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1031467">
            <text:p>0.1031467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1304137">
            <text:p>0.1304137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1051534">
            <text:p>0.1051534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09880935">
            <text:p>0.09880935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1052166">
            <text:p>0.1052166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09903546">
            <text:p>0.09903546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09704093">
            <text:p>0.09704093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1095101">
            <text:p>0.1095101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09376539">
            <text:p>0.09376539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1092212">
            <text:p>0.1092212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1039354">
            <text:p>0.1039354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09968026">
            <text:p>0.09968026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107107">
            <text:p>0.107107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1066231">
            <text:p>0.1066231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1006172">
            <text:p>0.1006172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09957521">
            <text:p>0.09957521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09910932">
            <text:p>0.09910932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8948401">
            <text:p>0.08948401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1029384">
            <text:p>0.1029384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1027062">
            <text:p>0.1027062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09468574">
            <text:p>0.09468574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1170487">
            <text:p>0.1170487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8836354">
            <text:p>0.08836354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09751739">
            <text:p>0.09751739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1004712">
            <text:p>0.1004712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8783498">
            <text:p>0.08783498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9026447">
            <text:p>0.09026447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09695411">
            <text:p>0.09695411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0982901">
            <text:p>0.0982901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09689891">
            <text:p>0.09689891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1053675">
            <text:p>0.1053675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09936775">
            <text:p>0.09936775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1002711">
            <text:p>0.1002711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8792791">
            <text:p>0.08792791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8991537">
            <text:p>0.08991537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1006298">
            <text:p>0.1006298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9454372">
            <text:p>0.09454372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09930078">
            <text:p>0.09930078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829781">
            <text:p>0.0829781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9294306">
            <text:p>0.09294306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09748609">
            <text:p>0.09748609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1000381">
            <text:p>0.1000381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9231683">
            <text:p>0.09231683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9250965">
            <text:p>0.09250965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9362724">
            <text:p>0.09362724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1011707">
            <text:p>0.1011707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9097209">
            <text:p>0.09097209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8554243">
            <text:p>0.08554243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848095">
            <text:p>0.0848095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8819189">
            <text:p>0.08819189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8324673">
            <text:p>0.08324673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9433514">
            <text:p>0.09433514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8114114">
            <text:p>0.08114114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8474758">
            <text:p>0.08474758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8353877">
            <text:p>0.08353877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7870431">
            <text:p>0.07870431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9084936">
            <text:p>0.09084936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7864312">
            <text:p>0.07864312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8586337">
            <text:p>0.08586337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8012931">
            <text:p>0.08012931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8381689">
            <text:p>0.08381689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07461746">
            <text:p>0.07461746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1189388">
            <text:p>0.1189388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9032818">
            <text:p>0.09032818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7882225">
            <text:p>0.07882225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7918363">
            <text:p>0.07918363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8913182">
            <text:p>0.08913182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9093175">
            <text:p>0.09093175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7801902">
            <text:p>0.07801902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7630218">
            <text:p>0.07630218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8630213">
            <text:p>0.08630213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7876391">
            <text:p>0.07876391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9307657">
            <text:p>0.09307657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7890908">
            <text:p>0.07890908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9029706">
            <text:p>0.09029706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800147">
            <text:p>0.0800147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8289154">
            <text:p>0.08289154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7194843">
            <text:p>0.07194843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7397735">
            <text:p>0.07397735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9524921">
            <text:p>0.09524921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737218">
            <text:p>0.0737218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7092277">
            <text:p>0.07092277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709985">
            <text:p>0.0709985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7570239">
            <text:p>0.07570239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7023679">
            <text:p>0.07023679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06901395">
            <text:p>0.06901395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0674756">
            <text:p>0.0674756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06402307">
            <text:p>0.06402307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8086056">
            <text:p>0.08086056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6960654">
            <text:p>0.06960654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7167576">
            <text:p>0.07167576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7385429">
            <text:p>0.07385429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7037497">
            <text:p>0.07037497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6930604">
            <text:p>0.06930604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717804">
            <text:p>0.0717804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7660492">
            <text:p>0.07660492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06634843">
            <text:p>0.06634843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6930249">
            <text:p>0.06930249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7482056">
            <text:p>0.07482056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7111243">
            <text:p>0.07111243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679494">
            <text:p>0.0679494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7300583">
            <text:p>0.07300583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8224547">
            <text:p>0.08224547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939851">
            <text:p>0.0939851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7220324">
            <text:p>0.07220324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8031346">
            <text:p>0.08031346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640127">
            <text:p>0.0640127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6909203">
            <text:p>0.06909203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6902912">
            <text:p>0.06902912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7738388">
            <text:p>0.07738388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701035">
            <text:p>0.0701035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7366056">
            <text:p>0.07366056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6697418">
            <text:p>0.06697418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8184291">
            <text:p>0.08184291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6775196">
            <text:p>0.06775196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7086899">
            <text:p>0.07086899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6726252">
            <text:p>0.06726252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650337">
            <text:p>0.0650337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6814466">
            <text:p>0.06814466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6539516">
            <text:p>0.06539516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7992511">
            <text:p>0.07992511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6692919">
            <text:p>0.06692919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06237648">
            <text:p>0.06237648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8609223">
            <text:p>0.08609223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7064256">
            <text:p>0.07064256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7233027">
            <text:p>0.07233027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6638704">
            <text:p>0.06638704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619501">
            <text:p>0.0619501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7381586">
            <text:p>0.07381586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6994239">
            <text:p>0.06994239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6426531">
            <text:p>0.06426531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7279167">
            <text:p>0.07279167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6110399">
            <text:p>0.06110399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6361511">
            <text:p>0.06361511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7563568">
            <text:p>0.07563568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7527053">
            <text:p>0.07527053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6761362">
            <text:p>0.06761362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05305253">
            <text:p>0.05305253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7087394">
            <text:p>0.07087394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05676504">
            <text:p>0.05676504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6153125">
            <text:p>0.06153125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6785896">
            <text:p>0.06785896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6957165">
            <text:p>0.06957165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6198021">
            <text:p>0.06198021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6827676">
            <text:p>0.06827676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5982289">
            <text:p>0.05982289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05581232">
            <text:p>0.05581232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8375442">
            <text:p>0.08375442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055074">
            <text:p>0.055074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6001387">
            <text:p>0.06001387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520796">
            <text:p>0.0520796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6272752">
            <text:p>0.06272752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52205">
            <text:p>0.052205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6314315">
            <text:p>0.06314315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6243095">
            <text:p>0.06243095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6017169">
            <text:p>0.06017169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5652013">
            <text:p>0.05652013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6065787">
            <text:p>0.06065787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6017919">
            <text:p>0.06017919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5554826">
            <text:p>0.05554826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6320795">
            <text:p>0.06320795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6703224">
            <text:p>0.06703224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4980525">
            <text:p>0.04980525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6173855">
            <text:p>0.06173855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6378387">
            <text:p>0.06378387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499333">
            <text:p>0.0499333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5306137">
            <text:p>0.05306137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04361748">
            <text:p>0.04361748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556495">
            <text:p>0.0556495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5866212">
            <text:p>0.05866212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6389598">
            <text:p>0.06389598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634857">
            <text:p>0.0634857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5684565">
            <text:p>0.05684565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55773">
            <text:p>0.055773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5364022">
            <text:p>0.05364022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4733079">
            <text:p>0.04733079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5001354">
            <text:p>0.05001354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5072061">
            <text:p>0.05072061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4766462">
            <text:p>0.04766462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6861741">
            <text:p>0.06861741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5355383">
            <text:p>0.05355383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494585">
            <text:p>0.0494585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5324067">
            <text:p>0.05324067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6440704">
            <text:p>0.06440704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6178478">
            <text:p>0.06178478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5089206">
            <text:p>0.05089206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4716359">
            <text:p>0.04716359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4655514">
            <text:p>0.04655514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5344607">
            <text:p>0.05344607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4929804">
            <text:p>0.04929804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5283756">
            <text:p>0.05283756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475102">
            <text:p>0.0475102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6071922">
            <text:p>0.06071922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6049975">
            <text:p>0.06049975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5476118">
            <text:p>0.05476118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6231107">
            <text:p>0.06231107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4587641">
            <text:p>0.04587641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587045">
            <text:p>0.0587045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4677213">
            <text:p>0.04677213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5282496">
            <text:p>0.05282496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4597659">
            <text:p>0.04597659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4497555">
            <text:p>0.04497555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4325849">
            <text:p>0.04325849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6677939">
            <text:p>0.06677939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5890713">
            <text:p>0.05890713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5315363">
            <text:p>0.05315363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51904">
            <text:p>0.051904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5460532">
            <text:p>0.05460532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6819525">
            <text:p>0.06819525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5762708">
            <text:p>0.05762708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4278135">
            <text:p>0.04278135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4839052">
            <text:p>0.04839052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4718199">
            <text:p>0.04718199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4549323">
            <text:p>0.04549323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522036">
            <text:p>0.0522036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6232102">
            <text:p>0.06232102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5027888">
            <text:p>0.05027888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4973583">
            <text:p>0.04973583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03902533">
            <text:p>0.03902533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4202617">
            <text:p>0.04202617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4062119">
            <text:p>0.04062119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5980409">
            <text:p>0.05980409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5059858">
            <text:p>0.05059858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4847765">
            <text:p>0.04847765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4563719">
            <text:p>0.04563719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4468689">
            <text:p>0.04468689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4778611">
            <text:p>0.04778611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4295883">
            <text:p>0.04295883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429997">
            <text:p>0.0429997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6105791">
            <text:p>0.06105791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4853435">
            <text:p>0.04853435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4471496">
            <text:p>0.04471496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4017137">
            <text:p>0.04017137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4728928">
            <text:p>0.04728928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4100973">
            <text:p>0.04100973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5035573">
            <text:p>0.05035573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4699567">
            <text:p>0.04699567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4349504">
            <text:p>0.04349504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4086788">
            <text:p>0.04086788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3428912">
            <text:p>0.03428912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4649007">
            <text:p>0.04649007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4704386">
            <text:p>0.04704386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4473423">
            <text:p>0.04473423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440683">
            <text:p>0.0440683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459867">
            <text:p>0.0459867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3805642">
            <text:p>0.03805642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5071859">
            <text:p>0.05071859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5154344">
            <text:p>0.05154344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4017373">
            <text:p>0.04017373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349567">
            <text:p>0.0349567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5221133">
            <text:p>0.05221133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3618286">
            <text:p>0.03618286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4366748">
            <text:p>0.04366748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386195">
            <text:p>0.0386195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4327784">
            <text:p>0.04327784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460716">
            <text:p>0.0460716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366835">
            <text:p>0.0366835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3098736">
            <text:p>0.03098736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3548227">
            <text:p>0.03548227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3335154">
            <text:p>0.03335154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2982737">
            <text:p>0.02982737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3626115">
            <text:p>0.03626115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549002">
            <text:p>0.0549002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3350903">
            <text:p>0.03350903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3362392">
            <text:p>0.03362392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3300036">
            <text:p>0.03300036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4492904">
            <text:p>0.04492904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3465829">
            <text:p>0.03465829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4047067">
            <text:p>0.04047067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3949375">
            <text:p>0.03949375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6300487">
            <text:p>0.06300487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418415">
            <text:p>0.0418415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4219815">
            <text:p>0.04219815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3419284">
            <text:p>0.03419284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465313">
            <text:p>0.0465313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3436817">
            <text:p>0.03436817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3853372">
            <text:p>0.03853372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3339205">
            <text:p>0.03339205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3610093">
            <text:p>0.03610093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4228832">
            <text:p>0.04228832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3191167">
            <text:p>0.03191167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4835785">
            <text:p>0.04835785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3178344">
            <text:p>0.03178344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2715429">
            <text:p>0.02715429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3132874">
            <text:p>0.03132874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3756316">
            <text:p>0.03756316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3359882">
            <text:p>0.03359882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4353084">
            <text:p>0.04353084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2984311">
            <text:p>0.02984311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3677968">
            <text:p>0.03677968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4252472">
            <text:p>0.04252472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3401723">
            <text:p>0.03401723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5581997">
            <text:p>0.05581997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4119878">
            <text:p>0.04119878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330708">
            <text:p>0.0330708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3810376">
            <text:p>0.03810376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4190409">
            <text:p>0.04190409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4153692">
            <text:p>0.04153692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3202487">
            <text:p>0.03202487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3583372">
            <text:p>0.03583372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4923795">
            <text:p>0.04923795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2814976">
            <text:p>0.02814976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4036849">
            <text:p>0.04036849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2494442">
            <text:p>0.02494442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4604001">
            <text:p>0.04604001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3051209">
            <text:p>0.03051209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3981408">
            <text:p>0.03981408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3449396">
            <text:p>0.03449396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2913216">
            <text:p>0.02913216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3515858">
            <text:p>0.03515858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2453109">
            <text:p>0.02453109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5032855">
            <text:p>0.05032855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3769542">
            <text:p>0.03769542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3529869">
            <text:p>0.03529869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2543151">
            <text:p>0.02543151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2897096">
            <text:p>0.02897096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2851037">
            <text:p>0.02851037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2217986">
            <text:p>0.02217986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5524103">
            <text:p>0.05524103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2669281">
            <text:p>0.02669281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2646042">
            <text:p>0.02646042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3150074">
            <text:p>0.03150074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2372294">
            <text:p>0.02372294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2508051">
            <text:p>0.02508051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5050337">
            <text:p>0.05050337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3158344">
            <text:p>0.03158344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5449438">
            <text:p>0.05449438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2098161">
            <text:p>0.02098161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3858434">
            <text:p>0.03858434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4152214">
            <text:p>0.04152214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2696183">
            <text:p>0.02696183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2850723">
            <text:p>0.02850723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284869">
            <text:p>0.0284869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2425853">
            <text:p>0.02425853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3109468">
            <text:p>0.03109468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3169665">
            <text:p>0.03169665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2908733">
            <text:p>0.02908733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2019278">
            <text:p>0.02019278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2313061">
            <text:p>0.02313061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3297935">
            <text:p>0.03297935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2800862">
            <text:p>0.02800862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2256204">
            <text:p>0.02256204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291712">
            <text:p>0.0291712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2757698">
            <text:p>0.02757698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2654809">
            <text:p>0.02654809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0.01772812">
            <text:p>0.01772812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1865141">
            <text:p>0.01865141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2689573">
            <text:p>0.02689573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4087376">
            <text:p>0.04087376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3236973">
            <text:p>0.03236973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2865331">
            <text:p>0.02865331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2646092">
            <text:p>0.02646092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3062168">
            <text:p>0.03062168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1824857">
            <text:p>0.01824857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2387664">
            <text:p>0.02387664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2988757">
            <text:p>0.02988757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2447505">
            <text:p>0.02447505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2252174">
            <text:p>0.02252174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2900901">
            <text:p>0.02900901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3021187">
            <text:p>0.03021187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2059257">
            <text:p>0.02059257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189999">
            <text:p>0.0189999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2818542">
            <text:p>0.02818542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3019077">
            <text:p>0.03019077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4248167">
            <text:p>0.04248167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0.01822517">
            <text:p>0.01822517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3819008">
            <text:p>0.03819008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2446435">
            <text:p>0.02446435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3892613">
            <text:p>0.03892613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3075331">
            <text:p>0.03075331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3310134">
            <text:p>0.03310134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3654808">
            <text:p>0.03654808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2524783">
            <text:p>0.02524783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0.01749189">
            <text:p>0.01749189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1872306">
            <text:p>0.01872306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3208733">
            <text:p>0.03208733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2958014">
            <text:p>0.02958014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2204135">
            <text:p>0.02204135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1855759">
            <text:p>0.01855759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0.01685492">
            <text:p>0.01685492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2977682">
            <text:p>0.02977682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3502167">
            <text:p>0.03502167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0.01410514">
            <text:p>0.01410514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2731514">
            <text:p>0.02731514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0.01600922">
            <text:p>0.01600922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2005911">
            <text:p>0.02005911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1910821">
            <text:p>0.01910821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1627628">
            <text:p>0.01627628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4242421">
            <text:p>0.04242421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3251511">
            <text:p>0.03251511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3235091">
            <text:p>0.03235091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1551993">
            <text:p>0.01551993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2001949">
            <text:p>0.02001949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22729">
            <text:p>0.022729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4769991">
            <text:p>0.04769991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3185803">
            <text:p>0.03185803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318601">
            <text:p>0.0318601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1658447">
            <text:p>0.01658447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2707481">
            <text:p>0.02707481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202301">
            <text:p>0.0202301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0.01549558">
            <text:p>0.01549558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2052168">
            <text:p>0.02052168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2431028">
            <text:p>0.02431028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3123216">
            <text:p>0.03123216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2250496">
            <text:p>0.02250496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2053778">
            <text:p>0.02053778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2824154">
            <text:p>0.02824154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3177149">
            <text:p>0.03177149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1669773">
            <text:p>0.01669773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2829935">
            <text:p>0.02829935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1838813">
            <text:p>0.01838813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3570068">
            <text:p>0.03570068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0.01230536">
            <text:p>0.01230536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2019664">
            <text:p>0.02019664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2004094">
            <text:p>0.02004094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2989994">
            <text:p>0.02989994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1944823">
            <text:p>0.01944823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2161653">
            <text:p>0.02161653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1785974">
            <text:p>0.01785974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0.0133479">
            <text:p>0.0133479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2714386">
            <text:p>0.02714386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4841376">
            <text:p>0.04841376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1337061">
            <text:p>0.01337061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1860416">
            <text:p>0.01860416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1576787">
            <text:p>0.01576787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3012493">
            <text:p>0.03012493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0.0112477">
            <text:p>0.0112477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1898769">
            <text:p>0.01898769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1738688">
            <text:p>0.01738688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1353582">
            <text:p>0.01353582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1283311">
            <text:p>0.01283311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189158">
            <text:p>0.0189158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1534791">
            <text:p>0.01534791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3765865">
            <text:p>0.03765865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1382851">
            <text:p>0.01382851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0.01160635">
            <text:p>0.01160635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2291679">
            <text:p>0.02291679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2645076">
            <text:p>0.02645076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173084">
            <text:p>0.0173084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0.008029184">
            <text:p>0.008029184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3437066">
            <text:p>0.03437066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2523525">
            <text:p>0.02523525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0.01197792">
            <text:p>0.01197792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2006005">
            <text:p>0.02006005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1719479">
            <text:p>0.01719479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1325331">
            <text:p>0.01325331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1293971">
            <text:p>0.01293971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2591543">
            <text:p>0.02591543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2653013">
            <text:p>0.02653013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1911033">
            <text:p>0.01911033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2665758">
            <text:p>0.02665758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0.009598792">
            <text:p>0.009598792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1530205">
            <text:p>0.01530205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0.009627601">
            <text:p>0.009627601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0.01028554">
            <text:p>0.01028554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1988602">
            <text:p>0.01988602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2808261">
            <text:p>0.02808261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0.01084183">
            <text:p>0.01084183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3721894">
            <text:p>0.03721894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1756046">
            <text:p>0.01756046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1480039">
            <text:p>0.01480039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0.008804071">
            <text:p>0.008804071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0.007987637">
            <text:p>0.007987637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0.00976098">
            <text:p>0.00976098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2716861">
            <text:p>0.02716861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3115014">
            <text:p>0.03115014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1271055">
            <text:p>0.01271055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1300727">
            <text:p>0.01300727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0.01023602">
            <text:p>0.01023602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2781327">
            <text:p>0.02781327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1652689">
            <text:p>0.01652689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0.004926095">
            <text:p>0.004926095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0.01254035">
            <text:p>0.01254035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1760359">
            <text:p>0.01760359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1148679">
            <text:p>0.01148679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1371557">
            <text:p>0.01371557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2884907">
            <text:p>0.02884907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0.01066487">
            <text:p>0.01066487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2788774">
            <text:p>0.02788774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0.01005416">
            <text:p>0.01005416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2524089">
            <text:p>0.02524089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1536511">
            <text:p>0.01536511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0.008727828">
            <text:p>0.008727828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2197246">
            <text:p>0.02197246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2143819">
            <text:p>0.02143819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0.008907881">
            <text:p>0.008907881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0.004641379">
            <text:p>0.004641379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0.003608281">
            <text:p>0.003608281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0.009488057">
            <text:p>0.009488057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0.01067771">
            <text:p>0.01067771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1598564">
            <text:p>0.01598564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2221963">
            <text:p>0.02221963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1385524">
            <text:p>0.01385524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0.008237465">
            <text:p>0.008237465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1798681">
            <text:p>0.01798681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1259189">
            <text:p>0.01259189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1520088">
            <text:p>0.01520088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0.01003287">
            <text:p>0.01003287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0.007517826">
            <text:p>0.007517826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0.01052924">
            <text:p>0.01052924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2147156">
            <text:p>0.02147156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0.005486775">
            <text:p>0.005486775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0.009067379">
            <text:p>0.009067379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1188593">
            <text:p>0.01188593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2014478">
            <text:p>0.02014478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1464981">
            <text:p>0.01464981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1242658">
            <text:p>0.01242658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2309195">
            <text:p>0.02309195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2061898">
            <text:p>0.02061898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1728872">
            <text:p>0.01728872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1387698">
            <text:p>0.01387698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1222155">
            <text:p>0.01222155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2947335">
            <text:p>0.02947335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0.006907042">
            <text:p>0.006907042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0.007819407">
            <text:p>0.007819407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1130744">
            <text:p>0.01130744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1021186">
            <text:p>0.01021186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0.007848096">
            <text:p>0.007848096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0.00876512">
            <text:p>0.00876512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1895464">
            <text:p>0.01895464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1880857">
            <text:p>0.01880857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2184625">
            <text:p>0.02184625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1987243">
            <text:p>0.01987243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1161719">
            <text:p>0.01161719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0.007572351">
            <text:p>0.007572351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1171122">
            <text:p>0.01171122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0910586">
            <text:p>0.00910586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0.008287392">
            <text:p>0.008287392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1150751">
            <text:p>0.01150751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08658669">
            <text:p>0.008658669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0.005073052">
            <text:p>0.005073052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189831">
            <text:p>0.0189831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1447039">
            <text:p>0.01447039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221016">
            <text:p>0.0221016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0.009491306">
            <text:p>0.009491306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1672821">
            <text:p>0.01672821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3511344">
            <text:p>0.03511344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1563733">
            <text:p>0.01563733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09983267">
            <text:p>0.009983267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09779431">
            <text:p>0.009779431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1664685">
            <text:p>0.01664685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08337157">
            <text:p>0.008337157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1365171">
            <text:p>0.01365171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3482464">
            <text:p>0.03482464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0.005222529">
            <text:p>0.005222529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3184652">
            <text:p>0.03184652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0.004178899">
            <text:p>0.004178899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2894809">
            <text:p>0.02894809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1922088">
            <text:p>0.01922088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1091189">
            <text:p>0.01091189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1384175">
            <text:p>0.01384175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1214452">
            <text:p>0.01214452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0.00254574">
            <text:p>0.00254574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0.007821759">
            <text:p>0.007821759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1037369">
            <text:p>0.01037369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1227284">
            <text:p>0.01227284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1596112">
            <text:p>0.01596112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0.004177298">
            <text:p>0.004177298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0.008388183">
            <text:p>0.008388183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2627065">
            <text:p>0.02627065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1294582">
            <text:p>0.01294582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1490068">
            <text:p>0.01490068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0.006315496">
            <text:p>0.006315496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0.002741106">
            <text:p>0.002741106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0.004654044">
            <text:p>0.004654044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09731953">
            <text:p>0.009731953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0.00588926">
            <text:p>0.00588926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1570995">
            <text:p>0.01570995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0.009180898">
            <text:p>0.009180898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1596678">
            <text:p>0.01596678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1870555">
            <text:p>0.01870555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1106771">
            <text:p>0.01106771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1967635">
            <text:p>0.01967635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09435858">
            <text:p>0.009435858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0977228">
            <text:p>0.00977228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0.007412259">
            <text:p>0.007412259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1566047">
            <text:p>0.01566047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0832752">
            <text:p>0.00832752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0.00373366">
            <text:p>0.00373366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1126067">
            <text:p>0.01126067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0.006406576">
            <text:p>0.006406576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0.006498724">
            <text:p>0.006498724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1253424">
            <text:p>0.01253424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0.003040352">
            <text:p>0.003040352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09373498">
            <text:p>0.009373498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0.002916797">
            <text:p>0.002916797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1456616">
            <text:p>0.01456616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0.005335866">
            <text:p>0.005335866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1214016">
            <text:p>0.01214016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0.005051732">
            <text:p>0.005051732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1227523">
            <text:p>0.01227523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2650985">
            <text:p>0.02650985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1337247">
            <text:p>0.01337247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2867655">
            <text:p>0.02867655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1267675">
            <text:p>0.01267675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2387435">
            <text:p>0.02387435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0.002649264">
            <text:p>0.002649264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0.003728675">
            <text:p>0.003728675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-0.002261785">
            <text:p>-0.002261785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1548974">
            <text:p>0.01548974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0.004171308">
            <text:p>0.004171308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1264804">
            <text:p>0.01264804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08161253">
            <text:p>0.008161253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0.007577164">
            <text:p>0.007577164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2437565">
            <text:p>0.02437565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07718098">
            <text:p>0.007718098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677792">
            <text:p>0.01677792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0.001101891">
            <text:p>0.001101891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09166847">
            <text:p>0.009166847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0.0002224896">
            <text:p>0.0002224896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08817843">
            <text:p>0.008817843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0.002163906">
            <text:p>0.002163906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-0.0009411047">
            <text:p>-0.0009411047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09691231">
            <text:p>0.009691231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0.005822762">
            <text:p>0.005822762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2266128">
            <text:p>0.02266128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0.006331685">
            <text:p>0.006331685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09504596">
            <text:p>0.009504596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426451">
            <text:p>0.02426451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09332678">
            <text:p>0.009332678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0.006770644">
            <text:p>0.006770644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1093323">
            <text:p>0.01093323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0.004859184">
            <text:p>0.004859184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2182504">
            <text:p>0.02182504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603355">
            <text:p>0.01603355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1236484">
            <text:p>0.01236484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2187855">
            <text:p>0.02187855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151328">
            <text:p>0.0151328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0.002997714">
            <text:p>0.002997714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0.003805564">
            <text:p>0.003805564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-0.0007520574">
            <text:p>-0.0007520574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1931759">
            <text:p>0.01931759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441951">
            <text:p>0.03441951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0.004057831">
            <text:p>0.004057831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0.001244344">
            <text:p>0.001244344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0.006868576">
            <text:p>0.006868576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0.002241401">
            <text:p>0.002241401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0.003763724">
            <text:p>0.003763724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0.0008673702">
            <text:p>0.0008673702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1193619">
            <text:p>0.01193619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1073568">
            <text:p>0.01073568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7831383">
            <text:p>0.007831383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07366961">
            <text:p>0.007366961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1082033">
            <text:p>0.01082033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0.0009416832">
            <text:p>0.0009416832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0.005345299">
            <text:p>0.005345299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0.0001297265">
            <text:p>0.0001297265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130207">
            <text:p>0.0130207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09855494">
            <text:p>0.009855494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1965182">
            <text:p>0.01965182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03323197">
            <text:p>-0.003323197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0.001479504">
            <text:p>0.001479504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05763318">
            <text:p>0.005763318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02158292">
            <text:p>-0.002158292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1020225">
            <text:p>0.01020225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1103622">
            <text:p>0.01103622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0.005569839">
            <text:p>0.005569839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6747">
            <text:p>0.006747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643802">
            <text:p>0.01643802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0.003629436">
            <text:p>0.003629436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1133657">
            <text:p>0.01133657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608082">
            <text:p>0.01608082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09095355">
            <text:p>0.009095355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0.004048576">
            <text:p>0.004048576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0.002227126">
            <text:p>0.002227126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0.001707397">
            <text:p>0.001707397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06234357">
            <text:p>0.006234357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8490021">
            <text:p>0.008490021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1219024">
            <text:p>0.01219024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1404926">
            <text:p>-0.001404926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0.002828765">
            <text:p>0.002828765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05008865">
            <text:p>0.005008865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05375399">
            <text:p>0.005375399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7660081">
            <text:p>0.007660081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05388156">
            <text:p>0.005388156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8245024">
            <text:p>0.008245024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05722713">
            <text:p>0.005722713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7226241">
            <text:p>0.007226241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0630647">
            <text:p>0.00630647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1029658">
            <text:p>0.01029658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0.006308306">
            <text:p>0.006308306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0.0004048213">
            <text:p>0.0004048213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0.005007896">
            <text:p>0.005007896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9772168">
            <text:p>0.009772168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0.00484734">
            <text:p>0.00484734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09618974">
            <text:p>-0.0009618974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1137251">
            <text:p>0.01137251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1126379">
            <text:p>0.01126379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0.005449594">
            <text:p>0.005449594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1062828">
            <text:p>0.01062828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07969318">
            <text:p>-0.0007969318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692466">
            <text:p>0.01692466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388363">
            <text:p>0.01388363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4421476">
            <text:p>0.004421476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0.001475391">
            <text:p>0.001475391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1847048">
            <text:p>0.01847048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0.0009129389">
            <text:p>0.0009129389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2138526">
            <text:p>0.02138526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0.002407931">
            <text:p>0.002407931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1384833">
            <text:p>0.01384833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1269347">
            <text:p>0.01269347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6666768">
            <text:p>0.006666768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05966516">
            <text:p>0.005966516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0.002366163">
            <text:p>0.002366163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7558977">
            <text:p>0.007558977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7760023">
            <text:p>0.007760023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6324524">
            <text:p>0.006324524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1433443">
            <text:p>0.01433443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0.001555254">
            <text:p>0.001555254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-0.0001919269">
            <text:p>-0.0001919269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string">
            <text:p>-7.543933E-05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06052447">
            <text:p>-0.006052447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1053318">
            <text:p>0.01053318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04877647">
            <text:p>-0.004877647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5532118">
            <text:p>0.005532118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09290642">
            <text:p>0.009290642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6339938">
            <text:p>0.006339938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0.003299655">
            <text:p>0.003299655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0.003660133">
            <text:p>0.003660133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0.004144083">
            <text:p>0.004144083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1188683">
            <text:p>0.01188683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7453547">
            <text:p>0.007453547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09029444">
            <text:p>-0.0009029444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672938">
            <text:p>0.01672938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8781122">
            <text:p>0.008781122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string">
            <text:p>1.960609E-05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-0.0002599582">
            <text:p>-0.0002599582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6405041">
            <text:p>0.006405041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04815818">
            <text:p>0.004815818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1587886">
            <text:p>-0.001587886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660503">
            <text:p>0.01660503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8723466">
            <text:p>0.008723466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60651">
            <text:p>0.0160651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8589937">
            <text:p>0.008589937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1058619">
            <text:p>0.01058619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0.005147304">
            <text:p>0.005147304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406342">
            <text:p>0.01406342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1248445">
            <text:p>0.01248445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06514317">
            <text:p>-0.0006514317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6731288">
            <text:p>0.006731288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1163626">
            <text:p>0.01163626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2737613">
            <text:p>-0.002737613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0.0005099376">
            <text:p>0.0005099376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231629">
            <text:p>0.01231629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4054531">
            <text:p>0.004054531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0.004507335">
            <text:p>0.004507335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0.001432846">
            <text:p>0.001432846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0.002605322">
            <text:p>0.002605322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09790951">
            <text:p>-0.0009790951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04455272">
            <text:p>-0.004455272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09235971">
            <text:p>-0.0009235971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8750076">
            <text:p>0.008750076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668039">
            <text:p>0.00668039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61208">
            <text:p>0.0161208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3649">
            <text:p>0.013649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6940716">
            <text:p>0.006940716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04890114">
            <text:p>-0.004890114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124808">
            <text:p>0.02124808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04755351">
            <text:p>-0.004755351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0.001713467">
            <text:p>0.001713467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0.00156878">
            <text:p>0.00156878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6451237">
            <text:p>0.006451237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0.002364024">
            <text:p>0.002364024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09699556">
            <text:p>0.009699556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2765334">
            <text:p>-0.002765334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5008793">
            <text:p>-0.005008793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5713328">
            <text:p>0.005713328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6393407">
            <text:p>0.006393407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102823">
            <text:p>0.0102823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string">
            <text:p>-3.49665E-05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456247">
            <text:p>0.01456247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1540584">
            <text:p>-0.001540584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0.0006501364">
            <text:p>0.0006501364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9011955">
            <text:p>0.009011955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542443">
            <text:p>0.01542443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395121">
            <text:p>0.01395121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9135786">
            <text:p>0.009135786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0999993">
            <text:p>0.00999993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3468817">
            <text:p>-0.003468817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1197123">
            <text:p>0.01197123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3007855">
            <text:p>0.003007855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333916">
            <text:p>-0.00333916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1154885">
            <text:p>0.01154885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4182322">
            <text:p>0.004182322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3610335">
            <text:p>-0.003610335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07186555">
            <text:p>-0.007186555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0.001759976">
            <text:p>0.001759976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5655521">
            <text:p>0.005655521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0.003205079">
            <text:p>0.003205079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08102104">
            <text:p>-0.0008102104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1174811">
            <text:p>0.01174811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0.001622343">
            <text:p>0.001622343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6901866">
            <text:p>0.006901866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0.0003755778">
            <text:p>0.0003755778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7532705">
            <text:p>0.007532705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3820946">
            <text:p>0.003820946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0.001190316">
            <text:p>0.001190316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0.0005667272">
            <text:p>0.0005667272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510939">
            <text:p>0.00510939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191408">
            <text:p>-0.00191408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716979">
            <text:p>0.01716979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0.001684842">
            <text:p>0.001684842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62646">
            <text:p>0.0062646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785502">
            <text:p>0.00785502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6281056">
            <text:p>0.006281056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0.002655223">
            <text:p>0.002655223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09464878">
            <text:p>0.009464878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1015582">
            <text:p>0.01015582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06890096">
            <text:p>-0.0006890096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7887843">
            <text:p>0.007887843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0.004733682">
            <text:p>0.004733682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6296758">
            <text:p>0.006296758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0.002028034">
            <text:p>0.002028034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1822048">
            <text:p>-0.001822048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22061">
            <text:p>0.0122061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06749844">
            <text:p>-0.0006749844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08128593">
            <text:p>-0.0008128593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0.002149648">
            <text:p>0.002149648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5794195">
            <text:p>0.005794195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5937838">
            <text:p>0.005937838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0.002734503">
            <text:p>0.002734503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0.0007802355">
            <text:p>0.0007802355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0.0009801351">
            <text:p>0.0009801351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5004149">
            <text:p>0.005004149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7198151">
            <text:p>0.007198151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06154125">
            <text:p>-0.006154125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4580399">
            <text:p>0.004580399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235919">
            <text:p>-0.00235919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5015625">
            <text:p>0.005015625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0.0004646043">
            <text:p>0.0004646043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03591685">
            <text:p>-0.0003591685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05759991">
            <text:p>-0.0005759991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0.002476994">
            <text:p>0.002476994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5963306">
            <text:p>0.005963306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0.001418276">
            <text:p>0.001418276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04870714">
            <text:p>-0.0004870714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0.002528736">
            <text:p>0.002528736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4709789">
            <text:p>0.004709789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395542">
            <text:p>-0.00395542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0.002487868">
            <text:p>0.002487868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05230725">
            <text:p>-0.005230725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3903104">
            <text:p>-0.003903104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1695503">
            <text:p>-0.001695503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0.0006360138">
            <text:p>0.0006360138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222559">
            <text:p>-0.00222559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2632418">
            <text:p>-0.002632418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7283136">
            <text:p>0.007283136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06814319">
            <text:p>-0.006814319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1866585">
            <text:p>-0.001866585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4868863">
            <text:p>-0.004868863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7333856">
            <text:p>0.007333856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1837216">
            <text:p>-0.001837216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9440647">
            <text:p>0.009440647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1018791">
            <text:p>0.01018791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1152187">
            <text:p>-0.001152187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3857828">
            <text:p>0.003857828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186472">
            <text:p>0.01186472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4773031">
            <text:p>0.004773031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1121247">
            <text:p>-0.001121247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289941">
            <text:p>0.01289941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0.001686499">
            <text:p>0.001686499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0.00298578">
            <text:p>0.00298578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05409674">
            <text:p>-0.0005409674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4298246">
            <text:p>0.004298246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4236632">
            <text:p>-0.004236632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3187132">
            <text:p>-0.003187132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4267463">
            <text:p>0.004267463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0.001992234">
            <text:p>0.001992234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5076712">
            <text:p>0.005076712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0.00179159">
            <text:p>0.00179159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1063432">
            <text:p>0.01063432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464772">
            <text:p>0.00464772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06354868">
            <text:p>-0.006354868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3718901">
            <text:p>0.003718901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3396458">
            <text:p>-0.003396458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5463886">
            <text:p>-0.005463886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25816">
            <text:p>0.0125816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0.001078891">
            <text:p>0.001078891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0.008336294">
            <text:p>0.008336294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1027366">
            <text:p>0.01027366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606543">
            <text:p>0.00606543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1202597">
            <text:p>-0.001202597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02754786">
            <text:p>-0.0002754786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2133602">
            <text:p>-0.002133602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2720115">
            <text:p>-0.002720115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110736">
            <text:p>-0.00110736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string">
            <text:p>6.861677E-05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1249692">
            <text:p>-0.001249692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3262365">
            <text:p>0.003262365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0.002071433">
            <text:p>0.002071433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702856">
            <text:p>0.01702856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5427342">
            <text:p>0.005427342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6201532">
            <text:p>0.006201532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6641956">
            <text:p>0.006641956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1389184">
            <text:p>-0.001389184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161396">
            <text:p>-0.00161396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554247">
            <text:p>0.00554247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3435829">
            <text:p>0.003435829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0.00111198">
            <text:p>0.00111198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4294569">
            <text:p>0.004294569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071452">
            <text:p>0.02071452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4351882">
            <text:p>-0.004351882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0.002312954">
            <text:p>0.002312954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3735761">
            <text:p>0.03735761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5275756">
            <text:p>0.005275756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5365275">
            <text:p>0.005365275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0.0004332071">
            <text:p>0.0004332071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315932">
            <text:p>0.01315932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9727483">
            <text:p>0.009727483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06736196">
            <text:p>-0.006736196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1073439">
            <text:p>0.01073439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4142822">
            <text:p>-0.004142822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2538093">
            <text:p>-0.002538093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9643198">
            <text:p>0.009643198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6217729">
            <text:p>0.006217729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303779">
            <text:p>0.01303779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5624052">
            <text:p>0.005624052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7312617">
            <text:p>0.007312617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0.001599862">
            <text:p>0.001599862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3072952">
            <text:p>0.003072952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0.002074681">
            <text:p>0.002074681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0.00207872">
            <text:p>0.00207872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5653127">
            <text:p>-0.005653127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2452993">
            <text:p>-0.002452993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07593106">
            <text:p>-0.007593106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0.001347797">
            <text:p>0.001347797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1623129">
            <text:p>-0.001623129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327864">
            <text:p>0.01327864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4399992">
            <text:p>-0.004399992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0.0004621559">
            <text:p>0.0004621559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0.001288152">
            <text:p>0.001288152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0.000419475">
            <text:p>0.000419475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0.001070026">
            <text:p>0.001070026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9218047">
            <text:p>0.009218047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0.0006172582">
            <text:p>0.0006172582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2057594">
            <text:p>-0.002057594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06841406">
            <text:p>-0.006841406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0.0003126875">
            <text:p>0.0003126875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2838754">
            <text:p>0.002838754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4603423">
            <text:p>0.004603423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3712727">
            <text:p>-0.003712727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5274772">
            <text:p>-0.005274772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1079754">
            <text:p>0.01079754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4603004">
            <text:p>0.004603004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03957523">
            <text:p>-0.0003957523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0.0004418347">
            <text:p>0.0004418347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3736401">
            <text:p>-0.003736401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387512">
            <text:p>0.02387512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5733391">
            <text:p>-0.005733391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403941">
            <text:p>0.01403941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448386">
            <text:p>-0.00448386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4212857">
            <text:p>-0.004212857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5806649">
            <text:p>-0.005806649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4903113">
            <text:p>-0.004903113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09309511">
            <text:p>-0.009309511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8884302">
            <text:p>0.008884302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4658907">
            <text:p>0.004658907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4877115">
            <text:p>-0.004877115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2547902">
            <text:p>0.002547902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3576827">
            <text:p>-0.003576827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530428">
            <text:p>0.02530428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8049567">
            <text:p>0.008049567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44007">
            <text:p>0.0144007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5121243">
            <text:p>0.005121243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5434799">
            <text:p>-0.005434799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1533274">
            <text:p>-0.001533274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5156526">
            <text:p>0.005156526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3792356">
            <text:p>0.003792356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319586">
            <text:p>0.02319586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02460892">
            <text:p>-0.0002460892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0.002012064">
            <text:p>0.002012064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6120862">
            <text:p>0.006120862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0.0006208929">
            <text:p>0.0006208929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3044261">
            <text:p>0.003044261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4956394">
            <text:p>0.004956394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061382">
            <text:p>0.01061382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0.0009157147">
            <text:p>0.0009157147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09992163">
            <text:p>-0.0009992163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41992">
            <text:p>0.0241992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129117">
            <text:p>0.01129117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3189631">
            <text:p>0.003189631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0.0004953386">
            <text:p>0.0004953386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4236883">
            <text:p>0.004236883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10797">
            <text:p>0.0110797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3217711">
            <text:p>0.003217711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2751951">
            <text:p>0.002751951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4297622">
            <text:p>-0.004297622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1304112">
            <text:p>-0.001304112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3969695">
            <text:p>0.003969695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2163077">
            <text:p>-0.002163077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480309">
            <text:p>0.01480309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7321864">
            <text:p>0.007321864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2792401">
            <text:p>-0.002792401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6539536">
            <text:p>0.006539536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06907073">
            <text:p>-0.006907073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2903351">
            <text:p>-0.002903351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6074216">
            <text:p>0.006074216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082585">
            <text:p>0.01082585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3057725">
            <text:p>-0.003057725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2483958">
            <text:p>-0.002483958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987027">
            <text:p>0.00987027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663033">
            <text:p>0.01663033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-0.0001215973">
            <text:p>-0.0001215973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3095478">
            <text:p>0.003095478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1766638">
            <text:p>-0.001766638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01053111">
            <text:p>-0.0001053111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08888397">
            <text:p>-0.0008888397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3334318">
            <text:p>-0.003334318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1220428">
            <text:p>0.001220428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241207">
            <text:p>0.01241207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07623859">
            <text:p>-0.007623859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7444063">
            <text:p>0.007444063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3420853">
            <text:p>-0.003420853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string">
            <text:p>9.469273E-05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3988256">
            <text:p>-0.003988256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315853">
            <text:p>-0.00315853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15853">
            <text:p>0.0115853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2111894">
            <text:p>-0.002111894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4285404">
            <text:p>-0.004285404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06695722">
            <text:p>-0.006695722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6370353">
            <text:p>-0.006370353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3861353">
            <text:p>0.003861353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0.002172584">
            <text:p>0.002172584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1713081">
            <text:p>-0.001713081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084519">
            <text:p>0.01084519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09174442">
            <text:p>-0.0009174442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2316135">
            <text:p>0.002316135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241778">
            <text:p>0.01241778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1038272">
            <text:p>-0.001038272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0444461">
            <text:p>-0.000444461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188644">
            <text:p>0.0188644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0.0001218638">
            <text:p>0.0001218638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4182146">
            <text:p>0.004182146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5490569">
            <text:p>0.005490569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1920041">
            <text:p>-0.001920041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9333369">
            <text:p>0.009333369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0.002603899">
            <text:p>0.002603899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6002517">
            <text:p>-0.006002517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06200753">
            <text:p>-0.006200753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3379822">
            <text:p>0.003379822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783617">
            <text:p>0.004783617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5106008">
            <text:p>0.005106008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523951">
            <text:p>-0.00523951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3499973">
            <text:p>0.003499973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523906">
            <text:p>0.00523906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9224001">
            <text:p>0.009224001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07903284">
            <text:p>-0.0007903284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3121953">
            <text:p>0.003121953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4684607">
            <text:p>0.004684607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1759885">
            <text:p>-0.001759885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1012679">
            <text:p>-0.001012679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2055431">
            <text:p>-0.002055431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288666">
            <text:p>0.01288666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06489237">
            <text:p>-0.006489237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04793892">
            <text:p>-0.0004793892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3501086">
            <text:p>0.003501086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3379075">
            <text:p>0.003379075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278152">
            <text:p>0.00278152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376107">
            <text:p>-0.00376107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44172">
            <text:p>-0.0044172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3609044">
            <text:p>0.003609044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07365241">
            <text:p>-0.0007365241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1536928">
            <text:p>-0.001536928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6620179">
            <text:p>0.006620179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2680996">
            <text:p>0.002680996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655953">
            <text:p>-0.00655953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1013401">
            <text:p>0.01013401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07459781">
            <text:p>-0.0007459781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5357978">
            <text:p>-0.005357978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3520555">
            <text:p>0.003520555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0.001673394">
            <text:p>0.001673394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0.001893338">
            <text:p>0.001893338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06925459">
            <text:p>-0.006925459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514201">
            <text:p>-0.00514201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4337381">
            <text:p>0.004337381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2274926">
            <text:p>-0.002274926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340624">
            <text:p>0.01340624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6225978">
            <text:p>-0.006225978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260923">
            <text:p>-0.00260923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string">
            <text:p>9.332871E-06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8435811">
            <text:p>0.008435811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5005411">
            <text:p>0.005005411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4716549">
            <text:p>-0.004716549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7202739">
            <text:p>0.007202739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3406143">
            <text:p>-0.003406143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08543088">
            <text:p>-0.008543088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2540903">
            <text:p>-0.002540903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709747">
            <text:p>0.01709747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697226">
            <text:p>0.01697226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653481">
            <text:p>0.01653481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07247706">
            <text:p>-0.007247706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0.001157257">
            <text:p>0.001157257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4687222">
            <text:p>0.004687222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5540617">
            <text:p>0.005540617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4463431">
            <text:p>-0.004463431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0.0008072417">
            <text:p>0.0008072417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08573862">
            <text:p>-0.008573862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09422687">
            <text:p>0.009422687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5143236">
            <text:p>0.005143236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0.0008425412">
            <text:p>0.0008425412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5409201">
            <text:p>0.005409201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406368">
            <text:p>0.01406368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1720739">
            <text:p>-0.001720739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82625">
            <text:p>0.00482625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3277593">
            <text:p>0.003277593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5093219">
            <text:p>0.005093219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06918982">
            <text:p>-0.006918982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1615302">
            <text:p>-0.001615302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2390912">
            <text:p>0.002390912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5195273">
            <text:p>-0.005195273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3851505">
            <text:p>0.003851505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01364365">
            <text:p>-0.0001364365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4429165">
            <text:p>-0.004429165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0.0006196874">
            <text:p>0.0006196874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5956815">
            <text:p>-0.005956815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0876359">
            <text:p>-0.00876359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5744302">
            <text:p>0.005744302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1160548">
            <text:p>0.001160548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1124016">
            <text:p>0.001124016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0.0007233587">
            <text:p>0.0007233587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1375231">
            <text:p>0.001375231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6477518">
            <text:p>0.006477518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5376869">
            <text:p>-0.005376869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08517436">
            <text:p>-0.008517436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1861399">
            <text:p>0.001861399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0.0007768644">
            <text:p>0.0007768644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0.00269816">
            <text:p>0.00269816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1656253">
            <text:p>0.001656253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05011607">
            <text:p>-0.0005011607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2150756">
            <text:p>0.002150756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3836567">
            <text:p>-0.003836567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338719">
            <text:p>0.005338719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02750298">
            <text:p>-0.0002750298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1940766">
            <text:p>-0.001940766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08498177">
            <text:p>0.0008498177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1568317">
            <text:p>-0.001568317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2089787">
            <text:p>0.002089787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4752961">
            <text:p>0.004752961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7949369">
            <text:p>0.007949369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string">
            <text:p>6.100002E-05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2560739">
            <text:p>-0.002560739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08710131">
            <text:p>0.008710131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1866274">
            <text:p>-0.001866274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6950187">
            <text:p>-0.006950187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06920658">
            <text:p>-0.006920658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5926246">
            <text:p>0.005926246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3962384">
            <text:p>-0.003962384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1029766">
            <text:p>0.01029766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07738145">
            <text:p>-0.007738145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1771267">
            <text:p>0.001771267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189018">
            <text:p>0.02189018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2058504">
            <text:p>0.002058504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1389319">
            <text:p>0.001389319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57168">
            <text:p>0.0057168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078318">
            <text:p>0.005078318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2597813">
            <text:p>-0.002597813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1676549">
            <text:p>0.001676549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1849645">
            <text:p>0.001849645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779125">
            <text:p>0.01779125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07827448">
            <text:p>-0.007827448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660109">
            <text:p>0.01660109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1042126">
            <text:p>-0.001042126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4821458">
            <text:p>-0.004821458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41263">
            <text:p>0.0141263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1762165">
            <text:p>-0.001762165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5884092">
            <text:p>-0.005884092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07399872">
            <text:p>-0.007399872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4038858">
            <text:p>-0.004038858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379142">
            <text:p>0.00379142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6282531">
            <text:p>-0.006282531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1336753">
            <text:p>0.001336753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5196177">
            <text:p>0.005196177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55662">
            <text:p>0.0155662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178322">
            <text:p>0.00178322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4184726">
            <text:p>-0.004184726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1618149">
            <text:p>0.001618149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4202436">
            <text:p>-0.004202436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512296">
            <text:p>-0.00512296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3973798">
            <text:p>0.003973798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0.0004821126">
            <text:p>0.0004821126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038559">
            <text:p>-0.01038559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5712134">
            <text:p>-0.005712134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6149236">
            <text:p>-0.006149236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08684615">
            <text:p>-0.008684615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6151151">
            <text:p>0.006151151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06186649">
            <text:p>-0.006186649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7216695">
            <text:p>-0.007216695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2910198">
            <text:p>0.002910198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5498204">
            <text:p>-0.005498204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6656208">
            <text:p>-0.006656208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400568">
            <text:p>0.02400568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048841">
            <text:p>-0.00048841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02966779">
            <text:p>-0.0002966779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5421909">
            <text:p>-0.005421909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1850078">
            <text:p>0.001850078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1316561">
            <text:p>-0.001316561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0.001157446">
            <text:p>0.001157446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2128584">
            <text:p>-0.002128584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9081607">
            <text:p>0.009081607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0.0009400236">
            <text:p>0.0009400236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0.002182513">
            <text:p>0.002182513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2809669">
            <text:p>-0.002809669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3927309">
            <text:p>-0.003927309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08981861">
            <text:p>-0.008981861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6397119">
            <text:p>0.006397119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03533938">
            <text:p>-0.0003533938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222534">
            <text:p>0.01222534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-0.0001446424">
            <text:p>-0.0001446424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string">
            <text:p>5.889176E-05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139643">
            <text:p>-0.00139643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6860309">
            <text:p>-0.006860309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031738">
            <text:p>-0.01031738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306329">
            <text:p>0.00306329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09205405">
            <text:p>-0.009205405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4604083">
            <text:p>-0.004604083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7358198">
            <text:p>-0.007358198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5340281">
            <text:p>0.005340281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08232913">
            <text:p>-0.008232913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1039109">
            <text:p>0.001039109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4398006">
            <text:p>0.004398006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5799599">
            <text:p>-0.005799599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0.0009181485">
            <text:p>0.0009181485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9348657">
            <text:p>0.009348657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442044">
            <text:p>0.00442044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0.000108749">
            <text:p>0.000108749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6755755">
            <text:p>0.006755755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235078">
            <text:p>0.02235078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4967099">
            <text:p>-0.004967099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6917988">
            <text:p>-0.006917988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016876">
            <text:p>0.01016876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750372">
            <text:p>0.004750372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2063388">
            <text:p>-0.002063388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2823956">
            <text:p>0.002823956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78758">
            <text:p>0.00578758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05936763">
            <text:p>-0.0005936763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165291">
            <text:p>0.01165291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6526562">
            <text:p>0.006526562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335781">
            <text:p>0.01335781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3179379">
            <text:p>-0.003179379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1511539">
            <text:p>0.001511539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5697747">
            <text:p>-0.005697747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2039812">
            <text:p>-0.002039812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8579575">
            <text:p>0.008579575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8040213">
            <text:p>0.008040213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6469131">
            <text:p>0.006469131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2728073">
            <text:p>-0.002728073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766819">
            <text:p>0.01766819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3828365">
            <text:p>-0.003828365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3856947">
            <text:p>-0.003856947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5397101">
            <text:p>-0.005397101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1332407">
            <text:p>-0.001332407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386892">
            <text:p>0.00386892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3131219">
            <text:p>-0.003131219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1688217">
            <text:p>-0.001688217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4593754">
            <text:p>-0.004593754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6231756">
            <text:p>-0.006231756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2612591">
            <text:p>-0.002612591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0.0007218854">
            <text:p>0.0007218854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3551686">
            <text:p>0.003551686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1190785">
            <text:p>-0.001190785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0.0005676413">
            <text:p>0.0005676413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7502608">
            <text:p>0.007502608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0.002048824">
            <text:p>0.002048824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409009">
            <text:p>0.006409009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6375775">
            <text:p>-0.006375775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07927327">
            <text:p>-0.007927327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08845697">
            <text:p>-0.0008845697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6713213">
            <text:p>0.006713213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0.0004463354">
            <text:p>0.0004463354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5878849">
            <text:p>-0.005878849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4808436">
            <text:p>-0.004808436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1544581">
            <text:p>-0.001544581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630594">
            <text:p>0.01630594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838767">
            <text:p>0.003838767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04702849">
            <text:p>-0.0004702849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206935">
            <text:p>0.003206935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6357975">
            <text:p>0.006357975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900565">
            <text:p>0.00900565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3084622">
            <text:p>0.003084622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3437518">
            <text:p>0.003437518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4185537">
            <text:p>-0.004185537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1586031">
            <text:p>0.001586031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563438">
            <text:p>0.00563438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3783442">
            <text:p>0.003783442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104862">
            <text:p>0.01104862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6892968">
            <text:p>0.006892968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034283">
            <text:p>0.01034283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02510258">
            <text:p>-0.0002510258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5454782">
            <text:p>0.005454782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5449283">
            <text:p>0.005449283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3350488">
            <text:p>0.003350488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4288752">
            <text:p>0.004288752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7045567">
            <text:p>-0.007045567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5617459">
            <text:p>0.005617459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682562">
            <text:p>0.002682562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4732394">
            <text:p>0.004732394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460708">
            <text:p>0.00460708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05489201">
            <text:p>-0.0005489201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475819">
            <text:p>0.01475819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5108175">
            <text:p>0.005108175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3598433">
            <text:p>-0.003598433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02786231">
            <text:p>-0.0002786231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409734">
            <text:p>-0.00409734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257825">
            <text:p>0.01257825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2787679">
            <text:p>-0.002787679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7092534">
            <text:p>0.007092534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0.0008194618">
            <text:p>0.0008194618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0.0007426669">
            <text:p>0.0007426669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3827641">
            <text:p>-0.003827641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08920091">
            <text:p>-0.008920091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216527">
            <text:p>-0.00216527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08498826">
            <text:p>-0.008498826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3986207">
            <text:p>-0.003986207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1681382">
            <text:p>-0.001681382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string">
            <text:p>3.200536E-05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09756041">
            <text:p>0.009756041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333196">
            <text:p>0.01333196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619687">
            <text:p>-0.00619687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8763067">
            <text:p>0.008763067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1399925">
            <text:p>0.001399925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569514">
            <text:p>-0.00569514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4061643">
            <text:p>-0.004061643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181579">
            <text:p>0.02181579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5422493">
            <text:p>-0.005422493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0.0001308442">
            <text:p>0.0001308442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8392955">
            <text:p>0.008392955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0.0001454319">
            <text:p>0.0001454319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1713433">
            <text:p>0.01713433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1992188">
            <text:p>-0.001992188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6004767">
            <text:p>0.006004767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7733166">
            <text:p>0.007733166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2617881">
            <text:p>0.002617881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4168782">
            <text:p>-0.004168782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0.0009735927">
            <text:p>0.0009735927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1225068">
            <text:p>-0.001225068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1712368">
            <text:p>-0.001712368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5657527">
            <text:p>0.005657527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155939">
            <text:p>0.01155939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247823">
            <text:p>0.00247823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0841229">
            <text:p>-0.00841229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3593168">
            <text:p>0.003593168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7331706">
            <text:p>-0.007331706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605683">
            <text:p>-0.00605683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6169042">
            <text:p>-0.006169042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2918373">
            <text:p>0.02918373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6971113">
            <text:p>-0.006971113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5585399">
            <text:p>-0.05585399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5691338">
            <text:p>-0.05691338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5919703">
            <text:p>-0.05919703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5885117">
            <text:p>-0.05885117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5923674">
            <text:p>-0.05923674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5978185">
            <text:p>-0.0597818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4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46:58.36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604cm" svg:y="1.067cm" svg:width="10.869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7184095">
                <text:p>0.007184095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692133">
                <text:p>0.001692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4327025">
                <text:p>0.004327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194513">
                <text:p>0.01194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7269333">
                <text:p>0.007269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5118443">
                <text:p>0.005118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636463">
                <text:p>0.01636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33005">
                <text:p>-0.00133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0.0001174109">
                <text:p>0.0001174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7050622">
                <text:p>0.007050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09449945">
                <text:p>0.009449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147078">
                <text:p>0.01147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20496">
                <text:p>-0.0020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329735">
                <text:p>0.00329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2758843">
                <text:p>0.0027588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743039">
                <text:p>0.00743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1471581">
                <text:p>-0.0014715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3427848">
                <text:p>0.003427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3754941">
                <text:p>0.03754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62276">
                <text:p>-0.0062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3985852">
                <text:p>-0.003985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092967">
                <text:p>0.010929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745164">
                <text:p>0.01745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155379">
                <text:p>-0.00155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4423795">
                <text:p>-0.004423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4141641">
                <text:p>0.004141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2832866">
                <text:p>-0.0028328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275879">
                <text:p>0.002758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7954897">
                <text:p>0.007954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3789315">
                <text:p>0.0037893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2661975">
                <text:p>0.002661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1608878">
                <text:p>0.016088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6952016">
                <text:p>-0.006952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2535797">
                <text:p>0.002535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117797">
                <text:p>0.00117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3040456">
                <text:p>-0.003040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2801158">
                <text:p>0.002801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5625033">
                <text:p>0.0056250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4337349">
                <text:p>0.0043373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5884795">
                <text:p>0.005884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3255837">
                <text:p>0.0032558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20625">
                <text:p>0.002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7854911">
                <text:p>0.0078549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60405">
                <text:p>0.01604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3576584">
                <text:p>-0.0035765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09446333">
                <text:p>0.009446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312023">
                <text:p>0.02312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74856">
                <text:p>0.0174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573502">
                <text:p>0.005573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09391253">
                <text:p>0.009391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4113978">
                <text:p>0.004113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655056">
                <text:p>0.0076550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1288399">
                <text:p>-0.001288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573698">
                <text:p>0.00573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1912137">
                <text:p>0.019121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215628">
                <text:p>-0.00215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08828813">
                <text:p>0.008828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205553">
                <text:p>-0.002055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6127396">
                <text:p>-0.0061273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03171016">
                <text:p>-0.0003171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361695">
                <text:p>0.00361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6616237">
                <text:p>0.006616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2188486">
                <text:p>-0.0021884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08845323">
                <text:p>-0.00088453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8204512">
                <text:p>-0.0082045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3410883">
                <text:p>0.0034108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169017">
                <text:p>0.02169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855883">
                <text:p>0.0018558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7897749">
                <text:p>0.0078977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9115468">
                <text:p>0.009115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653759">
                <text:p>0.016537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161022">
                <text:p>-0.002161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2969009">
                <text:p>-0.002969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2227206">
                <text:p>0.002227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3503527">
                <text:p>0.003503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2143702">
                <text:p>-0.0021437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7394271">
                <text:p>0.007394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3867776">
                <text:p>0.03867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2852992">
                <text:p>0.0028529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1649117">
                <text:p>0.001649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6548284">
                <text:p>-0.0065482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647736">
                <text:p>0.016477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9462813">
                <text:p>0.0094628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08779342">
                <text:p>0.0087793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3019564">
                <text:p>-0.003019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766791">
                <text:p>0.0057667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62464">
                <text:p>0.0162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12716">
                <text:p>0.0112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2765118">
                <text:p>0.02765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09655911">
                <text:p>0.0096559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201614">
                <text:p>0.02016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3015964">
                <text:p>-0.0030159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3146847">
                <text:p>-0.0031468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3901187">
                <text:p>0.0039011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9109051">
                <text:p>0.0091090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03712248">
                <text:p>-0.0003712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3441968">
                <text:p>-0.003441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7342705">
                <text:p>0.0073427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0.0001391959">
                <text:p>0.00013919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07749694">
                <text:p>-0.007749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281373">
                <text:p>-0.002813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1956093">
                <text:p>0.019560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223799">
                <text:p>0.01223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3900077">
                <text:p>0.0039000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8417755">
                <text:p>-0.0084177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0.0006942765">
                <text:p>0.00069427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0.0005556678">
                <text:p>0.00055566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6131912">
                <text:p>0.0061319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4543154">
                <text:p>0.04543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203439">
                <text:p>-0.002034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2632812">
                <text:p>0.0026328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2467065">
                <text:p>0.0024670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6279503">
                <text:p>-0.0062795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8389103">
                <text:p>0.0083891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471223">
                <text:p>0.004712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014457">
                <text:p>-0.010144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0.0009846442">
                <text:p>0.00098464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5258446">
                <text:p>0.0052584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0.0003561125">
                <text:p>0.0003561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08237438">
                <text:p>0.00082374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5011703">
                <text:p>-0.005011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722232">
                <text:p>0.017222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8423345">
                <text:p>0.0084233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6911364">
                <text:p>0.0069113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423112">
                <text:p>0.009423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0.001758758">
                <text:p>0.0017587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06474202">
                <text:p>0.0064742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7155493">
                <text:p>0.0071554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3017316">
                <text:p>0.030173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1047618">
                <text:p>0.010476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6972458">
                <text:p>0.0069724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08134191">
                <text:p>-0.00081341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059288">
                <text:p>0.010592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1993265">
                <text:p>0.019932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5211352">
                <text:p>-0.0052113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2383435">
                <text:p>0.0023834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755696">
                <text:p>0.017556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4911768">
                <text:p>0.004911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4825067">
                <text:p>-0.0048250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2334283">
                <text:p>-0.0023342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0.0001794381">
                <text:p>0.00017943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2989253">
                <text:p>0.0029892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6012904">
                <text:p>-0.0060129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7877297">
                <text:p>-0.0078772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381091">
                <text:p>0.02381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2014434">
                <text:p>0.0020144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3995169">
                <text:p>0.0039951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1788148">
                <text:p>-0.0017881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09655984">
                <text:p>-0.00096559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2297468">
                <text:p>-0.0022974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20368">
                <text:p>-0.003203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1914701">
                <text:p>-0.0019147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297832">
                <text:p>0.012978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133335">
                <text:p>0.011333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2039299">
                <text:p>-0.0020392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395942">
                <text:p>0.023959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6629365">
                <text:p>0.0066293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218483">
                <text:p>0.012184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3563941">
                <text:p>-0.0035639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2523171">
                <text:p>-0.0025231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367772">
                <text:p>0.003677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73156">
                <text:p>0.009731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4486785">
                <text:p>-0.0044867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09282603">
                <text:p>0.0092826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2987501">
                <text:p>0.0029875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090466">
                <text:p>0.010904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505144">
                <text:p>0.0035051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3900385">
                <text:p>0.0039003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0.002146477">
                <text:p>0.0021464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676166">
                <text:p>0.016761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3170136">
                <text:p>0.0031701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725405">
                <text:p>0.017254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7246672">
                <text:p>0.0072466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8739042">
                <text:p>0.0087390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7469342">
                <text:p>-0.0074693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1741002">
                <text:p>0.01741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650261">
                <text:p>0.016502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487286">
                <text:p>0.014872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33816">
                <text:p>-0.004338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04768434">
                <text:p>-0.00047684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1819492">
                <text:p>-0.0018194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259192">
                <text:p>-0.00259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57953">
                <text:p>0.01579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4248081">
                <text:p>0.0042480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308227">
                <text:p>0.023082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197265">
                <text:p>0.0197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431848">
                <text:p>0.01431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1830723">
                <text:p>-0.0018307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1587505">
                <text:p>-0.0015875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0.001587289">
                <text:p>0.0015872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028437">
                <text:p>0.010284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4534158">
                <text:p>0.0045341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0.0002178926">
                <text:p>0.00021789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135586">
                <text:p>0.011355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3222486">
                <text:p>-0.0032224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7412646">
                <text:p>0.0074126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579619">
                <text:p>0.015796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322074">
                <text:p>0.013220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2013972">
                <text:p>-0.0020139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6410159">
                <text:p>-0.0064101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9325644">
                <text:p>0.0093256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1751869">
                <text:p>0.0017518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2355029">
                <text:p>-0.0023550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2816247">
                <text:p>-0.0028162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2110594">
                <text:p>0.0021105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254388">
                <text:p>0.0042543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7367694">
                <text:p>-0.0073676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09481356">
                <text:p>0.0094813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1678139">
                <text:p>-0.0016781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8559015">
                <text:p>0.0085590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2748352">
                <text:p>-0.0027483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0.0001880655">
                <text:p>0.00018806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0.001342142">
                <text:p>0.0013421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6690309">
                <text:p>0.0066903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068009">
                <text:p>0.010680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06105349">
                <text:p>-0.00061053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2890331">
                <text:p>0.0028903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28854">
                <text:p>0.02288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611659">
                <text:p>-0.006116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4051059">
                <text:p>-0.004051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137554">
                <text:p>0.003137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346106">
                <text:p>-0.0013461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03586">
                <text:p>0.01035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19977">
                <text:p>0.01199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0663134">
                <text:p>-0.0006631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272355">
                <text:p>-0.002723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340453">
                <text:p>-0.003404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3751995">
                <text:p>0.0037519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13519">
                <text:p>-0.00135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3681802">
                <text:p>-0.0036818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581946">
                <text:p>0.0015819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192812">
                <text:p>0.011928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28736">
                <text:p>0.0287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08577254">
                <text:p>-0.0085772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8225883">
                <text:p>-0.0082258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3771165">
                <text:p>0.0037711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1951336">
                <text:p>-0.0019513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4924263">
                <text:p>0.0049242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122293">
                <text:p>-0.011222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4119808">
                <text:p>0.0041198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1047646">
                <text:p>-0.0010476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3068831">
                <text:p>0.0030688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732838">
                <text:p>0.007328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2303508">
                <text:p>0.0023035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320115">
                <text:p>0.013201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7841771">
                <text:p>-0.0078417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02233016">
                <text:p>-0.00022330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09673753">
                <text:p>-0.0009673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005765">
                <text:p>0.020057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-0.0003390645">
                <text:p>-0.00033906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5045156">
                <text:p>0.0050451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1924523">
                <text:p>0.0019245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032681">
                <text:p>0.010326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7832495">
                <text:p>-0.0078324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08642647">
                <text:p>-0.0086426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93063">
                <text:p>0.00930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4160148">
                <text:p>0.0041601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6290735">
                <text:p>-0.0062907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4300908">
                <text:p>-0.0043009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397416">
                <text:p>0.013974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053376">
                <text:p>0.010533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1022424">
                <text:p>0.010224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687317">
                <text:p>-0.006873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03818349">
                <text:p>-0.00038183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5954166">
                <text:p>0.0059541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559608">
                <text:p>0.0035596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633355">
                <text:p>0.005633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4733592">
                <text:p>0.0047335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383998">
                <text:p>0.013839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009322">
                <text:p>-0.010093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3298094">
                <text:p>0.0032980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172686">
                <text:p>0.0021726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162367">
                <text:p>0.011623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08600599">
                <text:p>0.0086005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08190093">
                <text:p>-0.0081900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104259">
                <text:p>0.011042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2467036">
                <text:p>0.0024670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07212173">
                <text:p>-0.0072121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2103503">
                <text:p>0.0021035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3850023">
                <text:p>0.0038500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5354585">
                <text:p>0.0053545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317655">
                <text:p>-0.0023176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2778865">
                <text:p>0.0027788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736144">
                <text:p>0.017361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4450233">
                <text:p>-0.0044502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6401183">
                <text:p>-0.0064011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552721">
                <text:p>0.015527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175227">
                <text:p>0.011752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08586774">
                <text:p>-0.00085867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1463952">
                <text:p>-0.0014639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6312625">
                <text:p>0.006312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531311">
                <text:p>0.005313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08432407">
                <text:p>0.0084324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1207897">
                <text:p>-0.0012078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3203941">
                <text:p>-0.0032039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531526">
                <text:p>0.015315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4225345">
                <text:p>-0.0042253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5094655">
                <text:p>0.0050946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3468585">
                <text:p>0.0034685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5874032">
                <text:p>0.0058740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4237433">
                <text:p>0.0042374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4540326">
                <text:p>0.0045403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3679698">
                <text:p>0.0036796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039665">
                <text:p>0.010396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1668348">
                <text:p>0.0016683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763629">
                <text:p>0.007636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1382726">
                <text:p>-0.0013827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4794936">
                <text:p>0.0047949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343859">
                <text:p>0.0033438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0.001324654">
                <text:p>0.0013246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09075276">
                <text:p>0.0090752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341655">
                <text:p>0.013416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363842">
                <text:p>0.013638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5422375">
                <text:p>-0.005422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07082">
                <text:p>0.01070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1755535">
                <text:p>-0.0017555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4249114">
                <text:p>-0.0042491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3857686">
                <text:p>0.0038576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3618263">
                <text:p>0.0036182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0.0006801881">
                <text:p>0.00068018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4548329">
                <text:p>-0.0045483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5158496">
                <text:p>-0.0051584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5322476">
                <text:p>-0.0053224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07938386">
                <text:p>-0.0079383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-0.0001822345">
                <text:p>-0.00018223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5590433">
                <text:p>0.0055904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4922355">
                <text:p>0.0049223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858432">
                <text:p>0.008584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3331915">
                <text:p>-0.0033319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01390588">
                <text:p>-0.00013905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480411">
                <text:p>0.014804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1497926">
                <text:p>0.0014979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06292738">
                <text:p>-0.00062927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09890143">
                <text:p>0.0098901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014884">
                <text:p>0.010148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2827022">
                <text:p>0.0028270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7717647">
                <text:p>0.0077176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4627523">
                <text:p>-0.0046275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2054945">
                <text:p>0.002054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1054407">
                <text:p>0.010544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4652482">
                <text:p>-0.0046524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2630735">
                <text:p>0.0026307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484283">
                <text:p>0.014842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6331527">
                <text:p>0.0063315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1403815">
                <text:p>0.0014038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08830399">
                <text:p>-0.0088303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200169">
                <text:p>0.012001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03778274">
                <text:p>-0.00037782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1316383">
                <text:p>-0.0013163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0.001102889">
                <text:p>0.0011028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6596778">
                <text:p>0.0065967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4838071">
                <text:p>-0.0048380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321614">
                <text:p>0.013216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153416">
                <text:p>0.011534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09714437">
                <text:p>0.0097144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3767615">
                <text:p>0.0037676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3910331">
                <text:p>0.0039103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313908">
                <text:p>-0.0033139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6734564">
                <text:p>0.0067345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6938807">
                <text:p>-0.0069388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0.0009191104">
                <text:p>0.00091911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2271652">
                <text:p>0.0022716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3685542">
                <text:p>0.0036855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6108887">
                <text:p>-0.0061088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4542339">
                <text:p>-0.0045423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8301056">
                <text:p>0.0083010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3154869">
                <text:p>0.0031548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0.0004225183">
                <text:p>0.00042251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3726109">
                <text:p>0.0037261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1747832">
                <text:p>0.017478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08127">
                <text:p>0.01081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06379001">
                <text:p>-0.00063790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08242569">
                <text:p>-0.00082425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8370447">
                <text:p>0.0083704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264149">
                <text:p>0.012641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2171946">
                <text:p>0.0021719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02692814">
                <text:p>-0.00026928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6449861">
                <text:p>0.0064498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7001682">
                <text:p>0.0070016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5571315">
                <text:p>-0.0055713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269872">
                <text:p>0.012698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8546601">
                <text:p>0.0085466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680542">
                <text:p>0.0056805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4849762">
                <text:p>-0.0048497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6231574">
                <text:p>-0.0062315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3913023">
                <text:p>-0.0039130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2317121">
                <text:p>-0.0023171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4572137">
                <text:p>-0.0045721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7458708">
                <text:p>0.0074587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08692375">
                <text:p>0.008692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3427275">
                <text:p>0.0034272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1449922">
                <text:p>0.014499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3536517">
                <text:p>-0.003536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5131274">
                <text:p>-0.0051312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7882896">
                <text:p>-0.0078828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1008026">
                <text:p>0.010080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2734366">
                <text:p>0.027343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384481">
                <text:p>0.003844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7622358">
                <text:p>0.0076223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918918">
                <text:p>0.009189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09096493">
                <text:p>0.0090964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3576066">
                <text:p>0.0035760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5461111">
                <text:p>0.0054611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09393726">
                <text:p>-0.00093937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0.0003916145">
                <text:p>0.00039161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0.0001748814">
                <text:p>0.00017488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2245991">
                <text:p>0.0022459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06856081">
                <text:p>-0.00068560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09138837">
                <text:p>0.0091388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2603692">
                <text:p>-0.0026036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157439">
                <text:p>0.001574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247657">
                <text:p>0.012476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532443">
                <text:p>0.015324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195643">
                <text:p>0.01956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1001704">
                <text:p>0.010017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4659963">
                <text:p>-0.0046599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1712783">
                <text:p>-0.0017127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67816">
                <text:p>-0.00678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8197437">
                <text:p>-0.0081974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0.001566926">
                <text:p>0.0015669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3285399">
                <text:p>-0.003285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6650702">
                <text:p>0.00066507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08286733">
                <text:p>-0.00082867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3619897">
                <text:p>0.0036198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7246345">
                <text:p>0.0072463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6079914">
                <text:p>-0.0060799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2528818">
                <text:p>-0.0025288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09428336">
                <text:p>-0.0094283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0.0008024076">
                <text:p>0.00080240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07368655">
                <text:p>-0.0073686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7700267">
                <text:p>-0.0077002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7142024">
                <text:p>-0.0071420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701162">
                <text:p>0.0037011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6504564">
                <text:p>0.0065045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3392374">
                <text:p>-0.0033923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3172093">
                <text:p>0.0031720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5480822">
                <text:p>-0.0054808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09641285">
                <text:p>0.0096412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8849206">
                <text:p>0.0088492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1975618">
                <text:p>0.019756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161516">
                <text:p>0.011615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3271254">
                <text:p>0.0032712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3673156">
                <text:p>-0.0036731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08265694">
                <text:p>-0.0082656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6423581">
                <text:p>0.0064235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5848534">
                <text:p>-0.0058485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063882">
                <text:p>0.0040638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5220287">
                <text:p>-0.0052202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3931993">
                <text:p>-0.0039319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2129101">
                <text:p>0.0021291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245805">
                <text:p>0.012458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7306302">
                <text:p>-0.0073063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414395">
                <text:p>-0.004143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6931444">
                <text:p>-0.0069314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4256832">
                <text:p>0.0042568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4771303">
                <text:p>-0.0047713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4982001">
                <text:p>-0.0049820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4879459">
                <text:p>-0.0048794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01370387">
                <text:p>-0.00013703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3558641">
                <text:p>0.0035586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09532745">
                <text:p>-0.0095327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0.0007215403">
                <text:p>0.00072154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588171">
                <text:p>0.005881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0905618">
                <text:p>-0.009056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08276292">
                <text:p>-0.00082762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2793301">
                <text:p>0.027933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04536695">
                <text:p>-0.00045366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1321562">
                <text:p>0.0013215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6525946">
                <text:p>-0.0065259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148196">
                <text:p>0.011481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7358097">
                <text:p>0.0073580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4765183">
                <text:p>-0.0047651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0.0002682815">
                <text:p>0.00026828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4313871">
                <text:p>-0.0043138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7189821">
                <text:p>-0.0071898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2539022">
                <text:p>-0.0025390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4909882">
                <text:p>-0.0049098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6982635">
                <text:p>0.0069826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8938695">
                <text:p>0.0089386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4172842">
                <text:p>-0.0041728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1534872">
                <text:p>-0.0015348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0.000133065">
                <text:p>0.0001330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2876131">
                <text:p>-0.0028761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7929559">
                <text:p>-0.0079295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3561497">
                <text:p>0.0035614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1096502">
                <text:p>-0.0010965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7652778">
                <text:p>0.0076527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05746741">
                <text:p>-0.000574674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2863565">
                <text:p>-0.0028635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2207953">
                <text:p>-0.0022079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5823063">
                <text:p>-0.0058230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2117567">
                <text:p>0.0021175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1557122">
                <text:p>-0.0015571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044006">
                <text:p>-0.010440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1214809">
                <text:p>-0.0012148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2540883">
                <text:p>0.0025408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245948">
                <text:p>0.012459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474476">
                <text:p>0.014744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4367583">
                <text:p>-0.0043675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4183961">
                <text:p>0.0041839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6054688">
                <text:p>-0.0060546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7093453">
                <text:p>0.0070934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3801752">
                <text:p>-0.0038017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2111832">
                <text:p>0.0021118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4749934">
                <text:p>-0.0047499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5729944">
                <text:p>-0.0057299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2515869">
                <text:p>-0.0025158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175215">
                <text:p>0.011752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1023624">
                <text:p>0.010236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6168342">
                <text:p>-0.0061683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03210458">
                <text:p>-0.00032104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459159">
                <text:p>0.0045915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1081199">
                <text:p>0.0010811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2078206">
                <text:p>0.0020782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3778191">
                <text:p>0.0037781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5099331">
                <text:p>0.0050993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09913513">
                <text:p>0.0099135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6275289">
                <text:p>-0.0062752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6045256">
                <text:p>0.0060452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09037751">
                <text:p>-0.0090377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5840343">
                <text:p>-0.00584034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1632159">
                <text:p>-0.0016321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119156">
                <text:p>0.011191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4098261">
                <text:p>-0.0040982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158481">
                <text:p>-0.001584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4697593">
                <text:p>-0.0046975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050165">
                <text:p>0.010501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6088431">
                <text:p>0.0060884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013766">
                <text:p>-0.010137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6977567">
                <text:p>-0.0069775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08672612">
                <text:p>-0.00086726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08489948">
                <text:p>-0.0084899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454357">
                <text:p>0.014543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04830117">
                <text:p>-0.00048301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4484132">
                <text:p>-0.00448413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-0.005081014">
                <text:p>-0.0050810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4188305">
                <text:p>-0.0041883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078433">
                <text:p>0.010784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045029">
                <text:p>0.010450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197089">
                <text:p>0.011970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08275039">
                <text:p>0.0082750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4948428">
                <text:p>-0.0049484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8093289">
                <text:p>0.0080932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1657281">
                <text:p>0.0016572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838049">
                <text:p>0.0048380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4169852">
                <text:p>-0.0041698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5132719">
                <text:p>0.0051327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549151">
                <text:p>0.015491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1867992">
                <text:p>-0.0018679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7661338">
                <text:p>0.0076613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5883841">
                <text:p>0.0058838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8265625">
                <text:p>0.0082656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071214">
                <text:p>0.0030712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318442">
                <text:p>0.013184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800279">
                <text:p>0.0038002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212074">
                <text:p>-0.002120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03579503">
                <text:p>-0.00035795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120471">
                <text:p>0.011204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282833">
                <text:p>0.012828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0.0007176326">
                <text:p>0.00071763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01056779">
                <text:p>-0.00010567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7884568">
                <text:p>-0.0078845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06515">
                <text:p>0.01065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5720843">
                <text:p>-0.0057208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057104">
                <text:p>0.010571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169695">
                <text:p>0.011696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08910256">
                <text:p>-0.0089102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3232814">
                <text:p>-0.0032328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619785">
                <text:p>0.016197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82978">
                <text:p>0.013829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412126">
                <text:p>-0.004121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403311">
                <text:p>0.014033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8248673">
                <text:p>0.0082486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2515035">
                <text:p>-0.00251503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4860598">
                <text:p>0.0048605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3811037">
                <text:p>-0.0038110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738242">
                <text:p>-0.007382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209426">
                <text:p>0.012094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3423449">
                <text:p>-0.0034234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176503">
                <text:p>0.011765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0.001565483">
                <text:p>0.0015654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7456786">
                <text:p>0.0074567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3151207">
                <text:p>0.0031512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3391844">
                <text:p>0.0033918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412967">
                <text:p>0.004129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1815851">
                <text:p>0.0018158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247346">
                <text:p>-0.002473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3973276">
                <text:p>-0.0039732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461981">
                <text:p>0.00846198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4108427">
                <text:p>-0.0041084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384634">
                <text:p>0.0138463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556488">
                <text:p>0.0045564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05583251">
                <text:p>-0.00055832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03812425">
                <text:p>0.00038124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280906">
                <text:p>0.012809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196188">
                <text:p>0.001961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419478">
                <text:p>0.0044194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2166436">
                <text:p>0.0021664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121111">
                <text:p>0.001211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4314012">
                <text:p>-0.0043140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6618796">
                <text:p>-0.0066187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5777046">
                <text:p>0.0057770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4983541">
                <text:p>0.00498354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0.0003280053">
                <text:p>0.00032800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717619">
                <text:p>-0.007176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3372698">
                <text:p>0.0033726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08913859">
                <text:p>-0.000891385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280803">
                <text:p>0.002808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07041001">
                <text:p>-0.00070410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43148">
                <text:p>0.00431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2192266">
                <text:p>-0.00219226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267201">
                <text:p>0.012672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2221963">
                <text:p>-0.002221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3978303">
                <text:p>-0.0039783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1506764">
                <text:p>-0.0015067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2469633">
                <text:p>-0.0024696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32386">
                <text:p>0.01323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0.0003061049">
                <text:p>0.00030610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0.00114252">
                <text:p>0.001142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487557">
                <text:p>0.0014875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2947729">
                <text:p>-0.0029477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450802">
                <text:p>0.014508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1206376">
                <text:p>0.0012063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0.0008694101">
                <text:p>0.000869410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5269085">
                <text:p>-0.00526908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527907">
                <text:p>0.015279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200826">
                <text:p>0.0120082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08151358">
                <text:p>-0.0081513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5141414">
                <text:p>0.0051414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0895334">
                <text:p>-0.008953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203524">
                <text:p>0.012035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190203">
                <text:p>0.00219020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6984759">
                <text:p>-0.00698475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0.0004699283">
                <text:p>0.00046992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482021">
                <text:p>0.014820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146126">
                <text:p>0.011461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2878828">
                <text:p>-0.0028788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6468027">
                <text:p>-0.0064680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0.0002923447">
                <text:p>0.00029234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0.0007563743">
                <text:p>0.00075637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4559744">
                <text:p>0.0045597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398577">
                <text:p>0.013985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2121976">
                <text:p>-0.0021219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1039366">
                <text:p>-0.0010393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3891477">
                <text:p>-0.0038914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08592314">
                <text:p>-0.0085923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1401707">
                <text:p>0.0014017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4951483">
                <text:p>-0.0049514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097856">
                <text:p>0.010978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091279">
                <text:p>0.020912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5253229">
                <text:p>-0.0052532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224092">
                <text:p>0.0012240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6002896">
                <text:p>0.0060028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1428834">
                <text:p>-0.0014288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7128836">
                <text:p>-0.0071288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268298">
                <text:p>0.0032682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220927">
                <text:p>-0.002209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7838763">
                <text:p>0.0078387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2017785">
                <text:p>-0.00201778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1004346">
                <text:p>0.010043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1636175">
                <text:p>-0.0016361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6544262">
                <text:p>-0.0065442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1502264">
                <text:p>-0.0015022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5149339">
                <text:p>-0.00514933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096585">
                <text:p>0.040965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2340766">
                <text:p>-0.0023407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2931279">
                <text:p>0.00293127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414015">
                <text:p>0.0024140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4432233">
                <text:p>0.044322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746725">
                <text:p>-0.0017467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375255">
                <text:p>-0.003752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6434993">
                <text:p>-0.0064349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2068947">
                <text:p>-0.0020689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160654">
                <text:p>0.011606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2891783">
                <text:p>-0.0028917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2586923">
                <text:p>0.0025869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2890531">
                <text:p>-0.0028905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6053268">
                <text:p>0.0060532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3706261">
                <text:p>0.0037062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1544831">
                <text:p>-0.0015448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5862997">
                <text:p>0.0058629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1776693">
                <text:p>-0.0017766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3053647">
                <text:p>0.00305364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1488829">
                <text:p>0.0014888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6543387">
                <text:p>0.0065433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2917058">
                <text:p>-0.0029170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01659407">
                <text:p>-0.000165940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2850718">
                <text:p>-0.0028507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16547">
                <text:p>-0.00165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1261054">
                <text:p>-0.0012610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5756752">
                <text:p>-0.0057567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4919734">
                <text:p>-0.0049197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3144385">
                <text:p>-0.0031443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2002761">
                <text:p>0.020027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1780258">
                <text:p>-0.0017802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593033">
                <text:p>0.015930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178644">
                <text:p>-0.001786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9417109">
                <text:p>0.00941710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0.0002166855">
                <text:p>0.00021668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07780822">
                <text:p>-0.00077808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5826871">
                <text:p>-0.0058268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1760356">
                <text:p>-0.0017603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5073842">
                <text:p>-0.0050738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2722672">
                <text:p>-0.00272267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3749483">
                <text:p>0.0037494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1979237">
                <text:p>-0.0019792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5905346">
                <text:p>0.0059053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3057542">
                <text:p>-0.0030575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6142932">
                <text:p>0.0061429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7503645">
                <text:p>0.0075036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03229995">
                <text:p>-0.00032299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637401">
                <text:p>0.0056374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4651686">
                <text:p>0.00465168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1732431">
                <text:p>0.0017324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04734505">
                <text:p>-0.00047345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0.0007770255">
                <text:p>0.00077702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2206612">
                <text:p>-0.0022066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494131">
                <text:p>0.0014941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287255">
                <text:p>0.002872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4646183">
                <text:p>-0.00464618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09785666">
                <text:p>0.0097856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1764465">
                <text:p>-0.00176446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1115826">
                <text:p>-0.0011158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0.0008249303">
                <text:p>0.00082493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5655517">
                <text:p>0.0056555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968708">
                <text:p>0.0059687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3787722">
                <text:p>0.00378772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239655">
                <text:p>0.012396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2844045">
                <text:p>0.0028440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185688">
                <text:p>0.011856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01019499">
                <text:p>-0.00010194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4690531">
                <text:p>-0.0046905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2416206">
                <text:p>0.00241620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5810194">
                <text:p>-0.0058101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3266557">
                <text:p>0.0032665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09744894">
                <text:p>-0.000974489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1092364">
                <text:p>-0.0010923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03821897">
                <text:p>-0.00038218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8182854">
                <text:p>-0.00818285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09750854">
                <text:p>0.0097508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08681813">
                <text:p>-0.0086818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5239593">
                <text:p>0.0052395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5380789">
                <text:p>0.00538078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5818985">
                <text:p>0.0058189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8361046">
                <text:p>-0.0083610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2955093">
                <text:p>0.0029550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324442">
                <text:p>0.0132444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335824">
                <text:p>-0.003358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0.001290851">
                <text:p>0.00129085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0.0005927372">
                <text:p>0.000592737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1110787">
                <text:p>0.011107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1192793">
                <text:p>-0.0011927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1118475">
                <text:p>-0.0011184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2482737">
                <text:p>-0.00248273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662125">
                <text:p>0.016621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6137224">
                <text:p>-0.0061372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7089677">
                <text:p>0.00708967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0.0002345604">
                <text:p>0.00023456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6578025">
                <text:p>-0.0065780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1380176">
                <text:p>0.00138017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5782822">
                <text:p>-0.0057828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727643">
                <text:p>-0.0072764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3938723">
                <text:p>-0.0039387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1853818">
                <text:p>0.00185381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3825466">
                <text:p>-0.00382546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633328">
                <text:p>0.016333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6044866">
                <text:p>0.00604486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05869618">
                <text:p>-0.00058696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9087467">
                <text:p>0.0090874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1883762">
                <text:p>-0.0018837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317358">
                <text:p>0.013173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604659">
                <text:p>0.006046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7814107">
                <text:p>0.0078141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728536">
                <text:p>0.0037285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1936393">
                <text:p>0.019363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09363483">
                <text:p>-0.0093634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2798494">
                <text:p>-0.0027984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5311904">
                <text:p>-0.00531190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1181704">
                <text:p>-0.0011817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3465972">
                <text:p>-0.0034659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2191752">
                <text:p>-0.0021917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6051255">
                <text:p>-0.0060512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2080987">
                <text:p>0.0020809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2427905">
                <text:p>0.0024279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07917871">
                <text:p>-0.00791787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1485503">
                <text:p>-0.0014855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5098324">
                <text:p>-0.0050983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2679431">
                <text:p>0.00267943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0.0001887088">
                <text:p>0.00018870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2754678">
                <text:p>0.0027546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04008962">
                <text:p>-0.00040089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905565">
                <text:p>0.00390556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2033438">
                <text:p>0.00203343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1989776">
                <text:p>-0.0019897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1868051">
                <text:p>0.0186805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7461232">
                <text:p>0.0074612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3826618">
                <text:p>-0.0038266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2466584">
                <text:p>0.0024665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519354">
                <text:p>0.025193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36037">
                <text:p>0.006360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332762">
                <text:p>0.013327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6191965">
                <text:p>0.00619196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3667539">
                <text:p>0.0036675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336453">
                <text:p>0.0233645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4151481">
                <text:p>0.0041514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239566">
                <text:p>0.022395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2053161">
                <text:p>0.00205316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2898743">
                <text:p>0.00289874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2032604">
                <text:p>0.0020326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7016999">
                <text:p>-0.0070169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8708535">
                <text:p>0.00870853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3027603">
                <text:p>0.00302760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07353673">
                <text:p>-0.00735367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2327461">
                <text:p>-0.00232746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0.0001631157">
                <text:p>0.00016311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1048114">
                <text:p>-0.0010481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08621926">
                <text:p>-0.00862192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5616428">
                <text:p>-0.00561642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-0.0005578204">
                <text:p>-0.00055782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0.0005759289">
                <text:p>0.000575928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191895">
                <text:p>-0.001918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07815821">
                <text:p>-0.00078158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600357">
                <text:p>-0.006003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3037828">
                <text:p>0.0030378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3310813">
                <text:p>0.0033108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1659688">
                <text:p>-0.0016596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34926">
                <text:p>0.012349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2904352">
                <text:p>0.00290435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8620801">
                <text:p>0.0086208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08312459">
                <text:p>-0.0083124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7098354">
                <text:p>0.0070983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3530902">
                <text:p>-0.0035309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371026">
                <text:p>-0.003710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454385">
                <text:p>0.00445438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2846782">
                <text:p>0.00284678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0.0006027321">
                <text:p>0.00060273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3705614">
                <text:p>-0.0037056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2858086">
                <text:p>-0.00285808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3015719">
                <text:p>-0.0030157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0.001732669">
                <text:p>0.00173266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5610077">
                <text:p>-0.0056100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6442973">
                <text:p>0.00644297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3424101">
                <text:p>-0.0034241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07532786">
                <text:p>-0.00753278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07398245">
                <text:p>-0.0073982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1800413">
                <text:p>-0.0018004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9707729">
                <text:p>0.000970772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3550213">
                <text:p>-0.0035502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3398725">
                <text:p>-0.0033987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09958381">
                <text:p>0.000995838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2728915">
                <text:p>-0.0027289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196893">
                <text:p>-0.001968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138076">
                <text:p>0.011380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3714671">
                <text:p>0.00371467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1980889">
                <text:p>0.0198088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09288617">
                <text:p>-0.0092886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5035864">
                <text:p>-0.0050358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1433362">
                <text:p>0.0014333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3828755">
                <text:p>0.0038287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383247">
                <text:p>-0.0138324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7115962">
                <text:p>-0.0071159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2963876">
                <text:p>0.0296387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547099">
                <text:p>0.0154709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615759">
                <text:p>0.00561575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4953451">
                <text:p>0.0049534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0.01194766">
                <text:p>0.011947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0.001307084">
                <text:p>0.0013070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898755">
                <text:p>0.0018987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3752355">
                <text:p>0.0037523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3876732">
                <text:p>-0.0038767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08854559">
                <text:p>-0.00885455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5122054">
                <text:p>-0.0051220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-0.0003512321">
                <text:p>-0.00035123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09740232">
                <text:p>0.0097402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6788007">
                <text:p>0.0067880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9208652">
                <text:p>0.0092086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1701996">
                <text:p>0.00170199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205376">
                <text:p>0.0120537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1194379">
                <text:p>-0.0011943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-0.003288031">
                <text:p>-0.00328803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6029613">
                <text:p>-0.0060296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4865804">
                <text:p>-0.0048658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3300429">
                <text:p>-0.0033004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967155">
                <text:p>0.0029671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3591051">
                <text:p>0.0035910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5249911">
                <text:p>0.0052499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361886">
                <text:p>0.0136188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2437305">
                <text:p>-0.0024373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4368125">
                <text:p>-0.0043681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1710207">
                <text:p>0.00171020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061552">
                <text:p>0.010615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07924136">
                <text:p>-0.0079241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3428747">
                <text:p>0.0034287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1525113">
                <text:p>-0.0015251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7890178">
                <text:p>0.00789017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6192878">
                <text:p>0.0061928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07636256">
                <text:p>-0.00076362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176951">
                <text:p>0.021769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1541739">
                <text:p>-0.0015417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6547885">
                <text:p>-0.00654788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7401039">
                <text:p>-0.00740103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936025">
                <text:p>0.009360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4686452">
                <text:p>-0.00468645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063153">
                <text:p>0.010631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7009039">
                <text:p>0.00700903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1921569">
                <text:p>-0.00192156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3902989">
                <text:p>-0.00390298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334779">
                <text:p>0.00233477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08458082">
                <text:p>-0.0084580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71383">
                <text:p>0.010713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05935279">
                <text:p>-0.000593527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2730619">
                <text:p>-0.0027306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09128335">
                <text:p>-0.00912833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5446631">
                <text:p>0.0054466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1084067">
                <text:p>0.010840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6214229">
                <text:p>0.0062142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3117291">
                <text:p>-0.0031172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4245975">
                <text:p>0.0042459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0.0001852883">
                <text:p>0.000185288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5782329">
                <text:p>-0.0057823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1959667">
                <text:p>-0.0019596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471787">
                <text:p>0.014717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3851652">
                <text:p>-0.00385165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2419997">
                <text:p>-0.00241999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270965">
                <text:p>-0.012709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07654966">
                <text:p>-0.00076549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668906">
                <text:p>0.00566890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163345">
                <text:p>0.0051633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5094695">
                <text:p>-0.0050946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6226742">
                <text:p>-0.0062267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4006688">
                <text:p>0.00400668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096084">
                <text:p>0.010960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4294113">
                <text:p>-0.0042941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1021968">
                <text:p>0.0102196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0.0006112697">
                <text:p>0.00061126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1669077">
                <text:p>-0.00166907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3334074">
                <text:p>0.00333407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962587">
                <text:p>0.009625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8995269">
                <text:p>0.0089952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3192508">
                <text:p>-0.00319250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379216">
                <text:p>-0.003792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997241">
                <text:p>0.00399724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3798294">
                <text:p>0.0037982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0881904">
                <text:p>0.00088190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08786445">
                <text:p>-0.0087864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2430959">
                <text:p>0.00243095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5335549">
                <text:p>0.00533554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6931768">
                <text:p>-0.0069317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08820752">
                <text:p>-0.0088207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06809686">
                <text:p>-0.00068096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8450659">
                <text:p>0.00845065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188742">
                <text:p>-0.0018874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5148766">
                <text:p>-0.00514876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2820088">
                <text:p>-0.00282008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4222907">
                <text:p>0.0042229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0.0002806269">
                <text:p>0.000280626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7292529">
                <text:p>0.00729252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5908485">
                <text:p>-0.0059084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3785949">
                <text:p>-0.0037859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5082973">
                <text:p>-0.00508297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587993">
                <text:p>0.0158799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408334">
                <text:p>0.024083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-0.0001703866">
                <text:p>-0.000170386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5003556">
                <text:p>-0.0050035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7989839">
                <text:p>0.0079898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0.0004452351">
                <text:p>0.00044523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7251383">
                <text:p>0.00725138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7275337">
                <text:p>0.0072753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292756">
                <text:p>-0.0029275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159632">
                <text:p>0.011596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1376458">
                <text:p>-0.0013764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8876474">
                <text:p>0.000887647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195877">
                <text:p>-0.001958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887202">
                <text:p>0.00688720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04945405">
                <text:p>-0.00049454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3009403">
                <text:p>-0.00300940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4229005">
                <text:p>-0.0042290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4800546">
                <text:p>0.00480054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4591428">
                <text:p>-0.00459142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171332">
                <text:p>-0.001713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2130455">
                <text:p>-0.0021304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8463993">
                <text:p>0.0084639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09641576">
                <text:p>0.0096415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6806818">
                <text:p>0.0068068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1909784">
                <text:p>0.019097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5224501">
                <text:p>-0.00522450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163251">
                <text:p>-0.0016325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1366317">
                <text:p>0.00136631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499703">
                <text:p>0.0049970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2469205">
                <text:p>-0.0024692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167923">
                <text:p>0.0116792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639876">
                <text:p>0.0163987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309437">
                <text:p>0.00830943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4345906">
                <text:p>0.00434590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3638585">
                <text:p>0.00363858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06780245">
                <text:p>-0.000678024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5386488">
                <text:p>0.00538648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1639025">
                <text:p>-0.0016390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3498212">
                <text:p>-0.00349821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4146797">
                <text:p>-0.00414679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428685">
                <text:p>0.0142868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04972032">
                <text:p>-0.00049720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2599237">
                <text:p>0.00259923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7555875">
                <text:p>-0.00755587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4847139">
                <text:p>-0.00484713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2011226">
                <text:p>0.0201122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3403283">
                <text:p>-0.00340328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1823861">
                <text:p>-0.00182386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2361921">
                <text:p>-0.00236192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783545">
                <text:p>0.00278354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1456373">
                <text:p>-0.00145637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147369">
                <text:p>-0.001473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51256">
                <text:p>0.0065125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6811631">
                <text:p>-0.00681163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6858413">
                <text:p>-0.00685841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3587149">
                <text:p>-0.00358714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215815">
                <text:p>0.012158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3118144">
                <text:p>0.00311814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09189552">
                <text:p>-0.00918955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238347">
                <text:p>0.0023834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1800474">
                <text:p>-0.0018004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453531">
                <text:p>0.0245353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03228823">
                <text:p>-0.000322882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138072">
                <text:p>-0.0013807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5006991">
                <text:p>0.00500699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3251756">
                <text:p>0.00325175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08527114">
                <text:p>-0.00852711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5164272">
                <text:p>0.00516427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319856">
                <text:p>0.0031985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02577961">
                <text:p>-0.000257796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3184287">
                <text:p>0.00318428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3787282">
                <text:p>0.00378728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0.000765434">
                <text:p>0.00076543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03643661">
                <text:p>-0.000364366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446186">
                <text:p>0.0044618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3179766">
                <text:p>-0.00317976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457834">
                <text:p>0.0145783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4226782">
                <text:p>0.00422678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6520926">
                <text:p>-0.00652092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09519982">
                <text:p>-0.00951998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08935033">
                <text:p>-0.000893503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7297867">
                <text:p>0.00729786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837195">
                <text:p>-0.0083719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137624">
                <text:p>-0.0113762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2616506">
                <text:p>-0.00261650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2580809">
                <text:p>0.00258080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08265628">
                <text:p>-0.00826562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6550148">
                <text:p>-0.00655014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4334956">
                <text:p>0.00433495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1997621">
                <text:p>0.0199762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4137998">
                <text:p>-0.00413799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6468789">
                <text:p>-0.00646878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5387784">
                <text:p>-0.00538778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5482358">
                <text:p>0.0548235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-0.000319294">
                <text:p>-0.00031929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3013066">
                <text:p>-0.00301306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7103513">
                <text:p>0.0071035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2949729">
                <text:p>0.0294972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09399719">
                <text:p>-0.000939971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581707">
                <text:p>-0.0158170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1887099">
                <text:p>0.018870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071323">
                <text:p>0.0107132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2263795">
                <text:p>-0.00226379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2236899">
                <text:p>-0.00223689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5989464">
                <text:p>0.00598946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0.0007998333">
                <text:p>0.000799833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384628">
                <text:p>0.0138462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2123857">
                <text:p>0.00212385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6831749">
                <text:p>0.00683174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0975723">
                <text:p>-0.0097572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1522421">
                <text:p>0.00152242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8615094">
                <text:p>0.00861509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4584684">
                <text:p>-0.00458468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-0.0001307027">
                <text:p>-0.000130702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1907176">
                <text:p>0.0190717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2162617">
                <text:p>0.0021626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1363588">
                <text:p>-0.00136358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-0.0002015642">
                <text:p>-0.000201564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296014">
                <text:p>-0.0029601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7776481">
                <text:p>0.00777648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3951617">
                <text:p>0.00395161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4840072">
                <text:p>-0.00484007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-0.0008335569">
                <text:p>-0.00083355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3250245">
                <text:p>0.00325024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4679428">
                <text:p>-0.00467942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8877189">
                <text:p>-0.00887718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1945754">
                <text:p>0.00194575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2793672">
                <text:p>-0.00279367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506776">
                <text:p>0.0050677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343984">
                <text:p>0.0234398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3967497">
                <text:p>-0.00396749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-0.0001275783">
                <text:p>-0.000127578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1557752">
                <text:p>0.00155775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4733825">
                <text:p>-0.00473382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292558">
                <text:p>-0.0029255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4556628">
                <text:p>0.00455662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6611381">
                <text:p>0.00661138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3241972">
                <text:p>-0.00324197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09951963">
                <text:p>-0.00995196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5797038">
                <text:p>0.00579703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07892069">
                <text:p>-0.000789206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6246697">
                <text:p>-0.00624669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08005338">
                <text:p>0.000800533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1949168">
                <text:p>0.00194916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4540798">
                <text:p>0.00454079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4573877">
                <text:p>-0.00457387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-0.0002643454">
                <text:p>-0.000264345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5265746">
                <text:p>0.00526574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3895423">
                <text:p>0.00389542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3715905">
                <text:p>-0.0037159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06003464">
                <text:p>0.000600346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2572">
                <text:p>0.01257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2947654">
                <text:p>-0.00294765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2323537">
                <text:p>-0.00232353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4237838">
                <text:p>-0.00423783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389912">
                <text:p>0.0138991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1215933">
                <text:p>0.0012159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3415278">
                <text:p>0.00341527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07676583">
                <text:p>0.00767658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1043023">
                <text:p>0.00104302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3643028">
                <text:p>0.00364302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6589853">
                <text:p>-0.00658985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8258339">
                <text:p>-0.00825833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6092248">
                <text:p>-0.00609224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123534">
                <text:p>0.011235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7837513">
                <text:p>-0.00783751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2140937">
                <text:p>-0.00214093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7525906">
                <text:p>0.00752590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1013294">
                <text:p>0.0101329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09541581">
                <text:p>0.00954158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9090758">
                <text:p>-0.00909075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1731635">
                <text:p>-0.00173163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170957">
                <text:p>-0.0017095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139414">
                <text:p>-0.011394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0.0002846498">
                <text:p>0.000284649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34266">
                <text:p>0.013426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07888206">
                <text:p>0.000788820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07907646">
                <text:p>0.00790764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1038156">
                <text:p>-0.0103815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6010125">
                <text:p>0.00601012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3988513">
                <text:p>-0.00398851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2632972">
                <text:p>-0.00263297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261592">
                <text:p>-0.0126159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6329998">
                <text:p>0.00632999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3047028">
                <text:p>0.00304702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0.0001704073">
                <text:p>0.000170407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189779">
                <text:p>-0.0118977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8322938">
                <text:p>0.00832293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5558586">
                <text:p>-0.00555858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104416">
                <text:p>-0.0010441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435112">
                <text:p>-0.0143511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0.0006230104">
                <text:p>0.000623010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11206">
                <text:p>0.011120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1653195">
                <text:p>0.00165319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221959">
                <text:p>-0.0122195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651572">
                <text:p>0.0065157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0938126">
                <text:p>0.0093812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698439">
                <text:p>-0.0069843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3685155">
                <text:p>-0.00368515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2679711">
                <text:p>0.0026797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6914176">
                <text:p>0.00691417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09593055">
                <text:p>-0.0095930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2407039">
                <text:p>0.00240703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09753824">
                <text:p>0.00975382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5231112">
                <text:p>0.00523111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07817466">
                <text:p>0.00781746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7080392">
                <text:p>-0.00708039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2091051">
                <text:p>-0.00209105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5761988">
                <text:p>0.00576198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1032874">
                <text:p>-0.0103287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3995467">
                <text:p>-0.00399546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490662">
                <text:p>0.0149066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6184823">
                <text:p>-0.00618482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3842223">
                <text:p>-0.00384222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3441307">
                <text:p>-0.00344130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1895252">
                <text:p>0.0018952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1054449">
                <text:p>-0.00105444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04507">
                <text:p>-0.010450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510427">
                <text:p>-0.0151042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642903">
                <text:p>0.0064290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09020201">
                <text:p>0.00902020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6192218">
                <text:p>-0.0061922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2502176">
                <text:p>-0.00250217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1054278">
                <text:p>0.0105427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068786">
                <text:p>0.0106878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6850555">
                <text:p>-0.0068505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5058929">
                <text:p>-0.00505892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7130548">
                <text:p>0.00713054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8038917">
                <text:p>0.00803891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09900062">
                <text:p>-0.00990006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038281">
                <text:p>-0.0103828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003145">
                <text:p>0.0100314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03861953">
                <text:p>-0.000386195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6598715">
                <text:p>-0.00659871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4604799">
                <text:p>-0.00460479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3691586">
                <text:p>-0.00369158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295565">
                <text:p>0.00829556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05284192">
                <text:p>-0.00528419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396734">
                <text:p>-0.0139673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394042">
                <text:p>0.0139404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0.0007652407">
                <text:p>0.000765240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09582978">
                <text:p>-0.00958297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08573538">
                <text:p>0.00857353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4279835">
                <text:p>0.00427983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2728303">
                <text:p>0.00272830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332416">
                <text:p>-0.0133241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1541958">
                <text:p>0.0154195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8498902">
                <text:p>0.00849890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111152">
                <text:p>0.0111115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1356809">
                <text:p>-0.00135680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1517684">
                <text:p>-0.00151768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2340717">
                <text:p>-0.00234071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7599011">
                <text:p>0.00759901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117723">
                <text:p>0.0111772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02737737">
                <text:p>0.000273773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7553478">
                <text:p>0.00755347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57913">
                <text:p>0.01579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5813944">
                <text:p>-0.00581394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1431507">
                <text:p>-0.00143150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066164">
                <text:p>0.0106616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158226">
                <text:p>0.0315822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1006556">
                <text:p>0.0100655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6541329">
                <text:p>-0.00654132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4294358">
                <text:p>0.00429435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5539363">
                <text:p>0.00553936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5264279">
                <text:p>-0.00526427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7437091">
                <text:p>0.00743709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3428448">
                <text:p>0.0342844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281436">
                <text:p>0.0128143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064546">
                <text:p>-0.0106454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2241096">
                <text:p>-0.00224109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8901">
                <text:p>0.010890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1435685">
                <text:p>-0.00143568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9175122">
                <text:p>0.00917512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351943">
                <text:p>0.0135194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-0.000229803">
                <text:p>-0.00022980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007282">
                <text:p>-0.0100728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0.0002626255">
                <text:p>0.000262625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5827293">
                <text:p>0.00582729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1742378">
                <text:p>-0.00174237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09187668">
                <text:p>-0.00918766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771826">
                <text:p>0.0077182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3514931">
                <text:p>0.00351493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544547">
                <text:p>0.0054454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3995364">
                <text:p>-0.00399536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792466">
                <text:p>0.00579246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1454655">
                <text:p>0.00145465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09741846">
                <text:p>0.00974184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02828542">
                <text:p>-0.000282854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3895521">
                <text:p>0.00389552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239402">
                <text:p>0.0123940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740139">
                <text:p>-0.0074013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4385259">
                <text:p>-0.00438525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6667191">
                <text:p>0.00666719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6745022">
                <text:p>0.0067450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686928">
                <text:p>-0.0068692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262498">
                <text:p>0.0126249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7613925">
                <text:p>0.00761392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6382742">
                <text:p>0.00638274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133274">
                <text:p>-0.0013327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049609">
                <text:p>-0.0104960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2258727">
                <text:p>0.0022587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3832374">
                <text:p>-0.00383237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4914082">
                <text:p>-0.00491408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09105474">
                <text:p>-0.00910547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6741485">
                <text:p>0.00674148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3100575">
                <text:p>-0.00310057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2531158">
                <text:p>-0.00253115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6903694">
                <text:p>-0.00690369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46024">
                <text:p>0.004602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436603">
                <text:p>0.0143660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5946264">
                <text:p>-0.00594626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163049">
                <text:p>-0.0116304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6473847">
                <text:p>-0.00647384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3086258">
                <text:p>0.00308625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3603756">
                <text:p>-0.00360375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6489384">
                <text:p>-0.00648938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5104449">
                <text:p>0.00510444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5142876">
                <text:p>0.00514287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2339231">
                <text:p>-0.00233923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09452047">
                <text:p>-0.00945204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656595">
                <text:p>0.0165659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1746311">
                <text:p>-0.00174631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180555">
                <text:p>-0.0118055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4411692">
                <text:p>0.00441169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360276">
                <text:p>0.0236027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08573282">
                <text:p>-0.000857328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4916957">
                <text:p>-0.00491695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0811028">
                <text:p>0.0081102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2925229">
                <text:p>-0.00292522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3655578">
                <text:p>0.00365557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563528">
                <text:p>-0.0056352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6868916">
                <text:p>-0.00686891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3009259">
                <text:p>0.00300925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08671004">
                <text:p>-0.00867100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5152124">
                <text:p>-0.00515212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7473833">
                <text:p>-0.0074738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0.0002378923">
                <text:p>0.000237892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09702109">
                <text:p>0.00970210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1222636">
                <text:p>-0.00122263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3242871">
                <text:p>-0.00324287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0.0006833087">
                <text:p>0.000683308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5488467">
                <text:p>-0.00548846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5855497">
                <text:p>-0.00585549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4169655">
                <text:p>-0.00416965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489089">
                <text:p>0.0248908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0.001625245">
                <text:p>0.00162524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3982728">
                <text:p>0.00398272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1074598">
                <text:p>0.0107459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1046469">
                <text:p>0.0104646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1017158">
                <text:p>0.0101715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244282">
                <text:p>0.0024428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4482966">
                <text:p>-0.00448296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2245462">
                <text:p>-0.00224546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6444365">
                <text:p>0.00644436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09236948">
                <text:p>-0.00923694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4774495">
                <text:p>0.00477449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5383521">
                <text:p>0.00538352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0746714">
                <text:p>-0.0074671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1049949">
                <text:p>0.0104994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290661">
                <text:p>0.0429066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2960403">
                <text:p>0.00296040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679798">
                <text:p>0.0167979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09610306">
                <text:p>-0.00961030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8303015">
                <text:p>0.00830301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6301804">
                <text:p>0.00630180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65548">
                <text:p>0.016554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01403709">
                <text:p>-0.000140370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2110627">
                <text:p>0.0211062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605029">
                <text:p>0.0160502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7258786">
                <text:p>0.00725878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6845258">
                <text:p>-0.00684525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4902397">
                <text:p>0.00490239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3394173">
                <text:p>0.00339417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131077">
                <text:p>-0.0113107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06975955">
                <text:p>-0.00697595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1031664">
                <text:p>0.0103166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0.001033961">
                <text:p>0.00103396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5760604">
                <text:p>-0.00576060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09607255">
                <text:p>-0.00960725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415157">
                <text:p>0.0141515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8442179">
                <text:p>0.00844217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3068805">
                <text:p>-0.00306880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03577434">
                <text:p>-0.000357743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781709">
                <text:p>0.0178170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70964">
                <text:p>0.027096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12094">
                <text:p>-0.001209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4839092">
                <text:p>0.00483909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541135">
                <text:p>0.0054113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200555">
                <text:p>0.020055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279165">
                <text:p>0.0227916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09407774">
                <text:p>-0.00940777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749894">
                <text:p>0.0074989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2015299">
                <text:p>-0.00201529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5819919">
                <text:p>-0.00581991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4682991">
                <text:p>-0.00468299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6568117">
                <text:p>0.00656811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2979915">
                <text:p>-0.00297991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324279">
                <text:p>-0.003242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4571465">
                <text:p>0.00457146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1171436">
                <text:p>0.0117143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5616401">
                <text:p>0.00561640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07374694">
                <text:p>-0.00737469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0761214">
                <text:p>-0.0076121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4973671">
                <text:p>0.00497367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1051091">
                <text:p>0.0105109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9239901">
                <text:p>0.00923990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08520439">
                <text:p>-0.00852043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715856">
                <text:p>0.0171585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0.004162318">
                <text:p>0.00416231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4302252">
                <text:p>-0.00430225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3393064">
                <text:p>-0.00339306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810027">
                <text:p>0.0181002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5089366">
                <text:p>0.00508936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0947716">
                <text:p>-0.0094771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41928">
                <text:p>-0.004192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776461">
                <text:p>0.0177646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4227385">
                <text:p>-0.00422738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1521445">
                <text:p>-0.00152144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08452925">
                <text:p>-0.00845292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1402355">
                <text:p>-0.00140235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449276">
                <text:p>0.0144927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08466619">
                <text:p>-0.00846661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07448187">
                <text:p>-0.000744818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8043657">
                <text:p>0.00804365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0.004809291">
                <text:p>0.00480929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07483874">
                <text:p>-0.00748387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09462154">
                <text:p>-0.000946215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558229">
                <text:p>0.0155822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0.002898257">
                <text:p>0.00289825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0.001149888">
                <text:p>0.00114988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0773156">
                <text:p>-0.0077315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0.002526253">
                <text:p>0.00252625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2389967">
                <text:p>0.0238996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3814526">
                <text:p>-0.00381452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1435968">
                <text:p>-0.00143596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7605677">
                <text:p>0.00760567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7035921">
                <text:p>0.00703592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04965885">
                <text:p>-0.000496588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0.001694786">
                <text:p>0.00169478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9134421">
                <text:p>0.00913442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92648">
                <text:p>0.019264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0.0008726385">
                <text:p>0.000872638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0.001056909">
                <text:p>0.00105690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1330342">
                <text:p>0.0133034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0.002368503">
                <text:p>0.00236850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02891767">
                <text:p>-0.00289176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0.0008341558">
                <text:p>0.000834155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7785981">
                <text:p>0.00778598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1049963">
                <text:p>0.0104996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9347864">
                <text:p>0.00934786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03226094">
                <text:p>-0.00322609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0.002202305">
                <text:p>0.00220230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1043029">
                <text:p>0.0104302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02143508">
                <text:p>-0.00214350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0.002665194">
                <text:p>0.00266519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0.005228537">
                <text:p>0.00522853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2220928">
                <text:p>0.0222092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0502632">
                <text:p>-0.0005026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0.004686771">
                <text:p>0.00468677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2070984">
                <text:p>0.0207098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2456668">
                <text:p>0.0245666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0.0009155495">
                <text:p>0.000915549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1099945">
                <text:p>0.0109994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0.003638898">
                <text:p>0.00363889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1621888">
                <text:p>0.0162188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05303707">
                <text:p>-0.00530370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0.009491595">
                <text:p>0.00949159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1388104">
                <text:p>0.0138810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1952521">
                <text:p>0.0195252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0.008356331">
                <text:p>0.00835633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0.002465399">
                <text:p>0.00246539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1224385">
                <text:p>0.0122438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2610433">
                <text:p>0.0261043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004589444">
                <text:p>-0.000458944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03237061">
                <text:p>-0.00323706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1903319">
                <text:p>0.0190331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0.01147027">
                <text:p>0.0114702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0.009263601">
                <text:p>0.00926360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0.001625113">
                <text:p>0.00162511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0.01065843">
                <text:p>0.0106584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1618095">
                <text:p>0.0161809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005950925">
                <text:p>-0.000595092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0.007954965">
                <text:p>0.00795496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2559959">
                <text:p>0.0255995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1507831">
                <text:p>0.0150783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1934309">
                <text:p>0.0193430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0.005397398">
                <text:p>0.00539739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0.01334738">
                <text:p>0.0133473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3610944">
                <text:p>0.0361094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0.003170909">
                <text:p>0.00317090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0.006446416">
                <text:p>0.00644641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3541296">
                <text:p>0.0354129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0.01724224">
                <text:p>0.0172422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0.01364257">
                <text:p>0.0136425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0.01429936">
                <text:p>0.0142993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2157412">
                <text:p>0.0215741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19481">
                <text:p>0.01948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1800202">
                <text:p>0.0180020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0.01275387">
                <text:p>0.0127538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2689041">
                <text:p>0.0268904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0.01541271">
                <text:p>0.0154127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2840987">
                <text:p>0.0284098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2043972">
                <text:p>0.0204397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2559593">
                <text:p>0.0255959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2732905">
                <text:p>0.0273290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2624816">
                <text:p>0.0262481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0.01043693">
                <text:p>0.0104369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2516592">
                <text:p>0.0251659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3849156">
                <text:p>0.0384915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0.01588552">
                <text:p>0.0158855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0.01089616">
                <text:p>0.0108961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2886871">
                <text:p>0.0288687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0.02158752">
                <text:p>0.0215875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0.01047546">
                <text:p>0.0104754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0.01173385">
                <text:p>0.0117338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3182257">
                <text:p>0.0318225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0.02277913">
                <text:p>0.0227791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0.02311774">
                <text:p>0.0231177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0.0175685">
                <text:p>0.017568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3144355">
                <text:p>0.0314435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3168647">
                <text:p>0.0316864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0.01311959">
                <text:p>0.0131195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0.02273822">
                <text:p>0.0227382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362775">
                <text:p>0.036277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0.03039263">
                <text:p>0.0303926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0.01862453">
                <text:p>0.0186245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4384954">
                <text:p>0.0438495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3673787">
                <text:p>0.0367378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0.01968662">
                <text:p>0.0196866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0.0313324">
                <text:p>0.031332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0.02962226">
                <text:p>0.0296222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4432444">
                <text:p>0.0443244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0.0356722">
                <text:p>0.035672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0.03234093">
                <text:p>0.0323409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3763064">
                <text:p>0.0376306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4870215">
                <text:p>0.0487021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0.03481229">
                <text:p>0.0348122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0.02915352">
                <text:p>0.0291535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500062">
                <text:p>0.050006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0.04058789">
                <text:p>0.0405878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0.0368857">
                <text:p>0.036885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0.03085649">
                <text:p>0.0308564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4697012">
                <text:p>0.0469701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4814435">
                <text:p>0.0481443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0.03319828">
                <text:p>0.0331982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4792778">
                <text:p>0.0479277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4872977">
                <text:p>0.0487297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5155414">
                <text:p>0.0515541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0.04275596">
                <text:p>0.0427559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0.04215417">
                <text:p>0.0421541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6148221">
                <text:p>0.0614822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0.04809966">
                <text:p>0.0480996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0.04545852">
                <text:p>0.0454585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0.05436134">
                <text:p>0.0543613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6765465">
                <text:p>0.0676546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6081937">
                <text:p>0.0608193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5845508">
                <text:p>0.0584550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0.04848374">
                <text:p>0.0484837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0.05626361">
                <text:p>0.0562636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6842739">
                <text:p>0.0684273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6350247">
                <text:p>0.0635024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0.06212865">
                <text:p>0.0621286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0.06187871">
                <text:p>0.0618787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0.06562858">
                <text:p>0.0656285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0.06245831">
                <text:p>0.0624583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0.06412544">
                <text:p>0.0641254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0.0692734">
                <text:p>0.069273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7932739">
                <text:p>0.0793273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0.06320766">
                <text:p>0.0632076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0.06517254">
                <text:p>0.0651725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8197287">
                <text:p>0.0819728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8710329">
                <text:p>0.0871032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0.06841313">
                <text:p>0.0684131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8735075">
                <text:p>0.0873507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0.08112688">
                <text:p>0.0811268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1113099">
                <text:p>0.111309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0.08532234">
                <text:p>0.0853223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9755529">
                <text:p>0.097555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0.08738124">
                <text:p>0.0873812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0.08744911">
                <text:p>0.0874491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1062949">
                <text:p>0.106294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0.08682298">
                <text:p>0.0868229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1071147">
                <text:p>0.107114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1067901">
                <text:p>0.106790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0.09895211">
                <text:p>0.0989521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1076809">
                <text:p>0.107680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1290628">
                <text:p>0.129062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1140761">
                <text:p>0.114076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0.1080746">
                <text:p>0.108074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0.1048731">
                <text:p>0.104873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1215747">
                <text:p>0.121574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1255508">
                <text:p>0.125550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0.1208838">
                <text:p>0.120883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0.1115975">
                <text:p>0.111597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1319648">
                <text:p>0.131964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1457074">
                <text:p>0.145707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0.1277539">
                <text:p>0.127753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0.1325119">
                <text:p>0.132511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1496877">
                <text:p>0.149687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0.1379296">
                <text:p>0.137929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1431985">
                <text:p>0.143198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0.1313273">
                <text:p>0.131327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1509132">
                <text:p>0.150913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1774331">
                <text:p>0.177433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0.1458793">
                <text:p>0.145879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0.1508415">
                <text:p>0.150841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1674834">
                <text:p>0.167483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0.1610256">
                <text:p>0.161025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0.1563612">
                <text:p>0.156361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0.1548881">
                <text:p>0.154888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0.1723234">
                <text:p>0.172323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1975982">
                <text:p>0.197598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0.1725562">
                <text:p>0.172556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1829886">
                <text:p>0.182988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1866179">
                <text:p>0.186617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1887645">
                <text:p>0.188764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0.1817127">
                <text:p>0.181712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0.1826269">
                <text:p>0.182626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0.1981729">
                <text:p>0.198172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2050053">
                <text:p>0.205005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0.1929143">
                <text:p>0.192914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0.2052131">
                <text:p>0.205213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2188973">
                <text:p>0.218897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2148949">
                <text:p>0.214894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0.2167556">
                <text:p>0.216755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2871545">
                <text:p>0.287154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0.2288043">
                <text:p>0.228804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0.2302532">
                <text:p>0.230253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2387325">
                <text:p>0.238732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0.2283643">
                <text:p>0.228364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2461198">
                <text:p>0.246119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0.2440472">
                <text:p>0.244047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0.2434676">
                <text:p>0.243467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2562127">
                <text:p>0.256212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2643758">
                <text:p>0.264375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0.2642537">
                <text:p>0.264253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0.2595974">
                <text:p>0.259597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0.2631037">
                <text:p>0.263103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0.2740801">
                <text:p>0.274080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2887692">
                <text:p>0.288769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0.2746715">
                <text:p>0.274671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0.2841054">
                <text:p>0.284105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0.2928946">
                <text:p>0.292894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0.2959068">
                <text:p>0.295906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0.3004378">
                <text:p>0.300437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0.2948057">
                <text:p>0.294805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0.3129191">
                <text:p>0.312919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3230937">
                <text:p>0.323093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3257244">
                <text:p>0.325724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0.3181327">
                <text:p>0.318132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0.3274767">
                <text:p>0.327476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0.3347595">
                <text:p>0.334759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0.334708">
                <text:p>0.33470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0.3418203">
                <text:p>0.341820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3563457">
                <text:p>0.356345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3782934">
                <text:p>0.378293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0.3534561">
                <text:p>0.353456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0.3580984">
                <text:p>0.358098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3695452">
                <text:p>0.369545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3822612">
                <text:p>0.382261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0.366247">
                <text:p>0.36624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0.3761072">
                <text:p>0.376107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3862391">
                <text:p>0.386239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3950462">
                <text:p>0.395046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3940906">
                <text:p>0.394090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0.3977406">
                <text:p>0.397740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4137026">
                <text:p>0.413702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4121055">
                <text:p>0.412105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4134149">
                <text:p>0.41341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4241392">
                <text:p>0.424139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4334404">
                <text:p>0.433440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0.4269139">
                <text:p>0.426913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0.4250339">
                <text:p>0.425033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0.4258401">
                <text:p>0.425840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0.4375346">
                <text:p>0.437534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0.4473578">
                <text:p>0.447357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0.4393961">
                <text:p>0.439396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0.4469443">
                <text:p>0.446944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0.460026">
                <text:p>0.46002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0.4612059">
                <text:p>0.461205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0.4627756">
                <text:p>0.462775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0.4709632">
                <text:p>0.470963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4792036">
                <text:p>0.479203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0.4779849">
                <text:p>0.477984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0.4779622">
                <text:p>0.477962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0.4816875">
                <text:p>0.481687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5091458">
                <text:p>0.509145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505109">
                <text:p>0.50510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0.4953455">
                <text:p>0.495345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0.5038982">
                <text:p>0.503898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5244655">
                <text:p>0.524465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0.5142261">
                <text:p>0.514226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0.5158045">
                <text:p>0.515804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0.5167352">
                <text:p>0.516735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5356109">
                <text:p>0.535610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5370824">
                <text:p>0.537082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0.5305191">
                <text:p>0.530519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0.529359">
                <text:p>0.52935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0.5382643">
                <text:p>0.538264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5469333">
                <text:p>0.546933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0.5463478">
                <text:p>0.546347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0.5433609">
                <text:p>0.543360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5610914">
                <text:p>0.561091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5623233">
                <text:p>0.562323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0.5506264">
                <text:p>0.550626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5749488">
                <text:p>0.574948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0.5657779">
                <text:p>0.565777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0.56837">
                <text:p>0.5683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0.5658096">
                <text:p>0.565809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0.5656685">
                <text:p>0.565668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0.5787914">
                <text:p>0.578791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0.5792233">
                <text:p>0.579223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0.5835759">
                <text:p>0.583575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0.5862295">
                <text:p>0.586229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0.5884396">
                <text:p>0.588439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5998537">
                <text:p>0.599853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6424502">
                <text:p>0.642450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0.5979856">
                <text:p>0.597985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6119077">
                <text:p>0.611907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0.6047156">
                <text:p>0.604715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6255735">
                <text:p>0.625573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0.6033393">
                <text:p>0.603339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6150585">
                <text:p>0.615058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6218408">
                <text:p>0.621840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0.6057283">
                <text:p>0.605728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0.6081378">
                <text:p>0.608137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6301233">
                <text:p>0.630123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6284714">
                <text:p>0.628471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0.6145704">
                <text:p>0.614570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6307184">
                <text:p>0.630718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6341835">
                <text:p>0.634183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6347455">
                <text:p>0.634745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6396238">
                <text:p>0.639623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0.6263146">
                <text:p>0.626314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6346857">
                <text:p>0.634685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6413703">
                <text:p>0.641370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0.6249728">
                <text:p>0.624972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6336926">
                <text:p>0.633692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0.6418763">
                <text:p>0.641876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6459002">
                <text:p>0.645900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0.6400673">
                <text:p>0.640067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0.6308386">
                <text:p>0.630838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0.6424313">
                <text:p>0.642431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6492342">
                <text:p>0.649234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0.6442485">
                <text:p>0.644248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6491637">
                <text:p>0.649163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0.6476716">
                <text:p>0.647671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6606032">
                <text:p>0.660603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0.6468583">
                <text:p>0.646858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6522993">
                <text:p>0.652299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0.6475618">
                <text:p>0.647561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0.6465117">
                <text:p>0.646511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0.6433542">
                <text:p>0.643354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0.6490946">
                <text:p>0.649094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0.6500166">
                <text:p>0.650016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6646945">
                <text:p>0.664694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671848">
                <text:p>0.67184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0.6469294">
                <text:p>0.646929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6513144">
                <text:p>0.651314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6584596">
                <text:p>0.658459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0.645646">
                <text:p>0.64564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6555002">
                <text:p>0.655500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6559352">
                <text:p>0.655935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6525484">
                <text:p>0.652548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6556428">
                <text:p>0.655642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0.653012">
                <text:p>0.65301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0.6484038">
                <text:p>0.648403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657237">
                <text:p>0.65723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6551791">
                <text:p>0.655179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6546758">
                <text:p>0.654675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6667914">
                <text:p>0.666791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6582841">
                <text:p>0.658284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0.6410555">
                <text:p>0.641055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0.6384692">
                <text:p>0.638469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6513964">
                <text:p>0.651396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0.6464329">
                <text:p>0.646432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6519525">
                <text:p>0.651952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0.6411361">
                <text:p>0.641136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6480086">
                <text:p>0.648008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6468309">
                <text:p>0.646830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0.6407256">
                <text:p>0.640725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0.6380429">
                <text:p>0.638042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6561124">
                <text:p>0.656112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0.6372285">
                <text:p>0.637228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0.6406654">
                <text:p>0.640665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0.6328859">
                <text:p>0.632885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0.637248">
                <text:p>0.63724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0.6271459">
                <text:p>0.627145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0.6285409">
                <text:p>0.628540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0.6333809">
                <text:p>0.633380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6544008">
                <text:p>0.654400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636096">
                <text:p>0.63609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0.6258928">
                <text:p>0.625892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6320524">
                <text:p>0.632052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6402192">
                <text:p>0.640219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0.6199085">
                <text:p>0.619908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0.6197883">
                <text:p>0.619788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0.6250662">
                <text:p>0.625066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0.6215981">
                <text:p>0.621598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632346">
                <text:p>0.63234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6240826">
                <text:p>0.624082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6575214">
                <text:p>0.657521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631992">
                <text:p>0.63199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6178206">
                <text:p>0.617820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0.6138186">
                <text:p>0.613818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6188055">
                <text:p>0.618805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6191467">
                <text:p>0.619146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6277943">
                <text:p>0.627794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0.6045255">
                <text:p>0.604525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6276001">
                <text:p>0.627600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6176804">
                <text:p>0.617680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6074979">
                <text:p>0.607497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609847">
                <text:p>0.60984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6090683">
                <text:p>0.609068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0.6065358">
                <text:p>0.606535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0.5983377">
                <text:p>0.598337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0.5935301">
                <text:p>0.593530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6106113">
                <text:p>0.610611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607124">
                <text:p>0.60712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5995746">
                <text:p>0.599574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0.5883506">
                <text:p>0.588350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614232">
                <text:p>0.61423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6031473">
                <text:p>0.603147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0.5853524">
                <text:p>0.585352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0.5840082">
                <text:p>0.584008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5921251">
                <text:p>0.592125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6063872">
                <text:p>0.606387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0.5823044">
                <text:p>0.582304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0.5822343">
                <text:p>0.582234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5880426">
                <text:p>0.588042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5906639">
                <text:p>0.590663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0.5762442">
                <text:p>0.576244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0.5660264">
                <text:p>0.566026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0.5757334">
                <text:p>0.575733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0.573545">
                <text:p>0.57354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0.571852">
                <text:p>0.57185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5859736">
                <text:p>0.585973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0.5666245">
                <text:p>0.566624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5855079">
                <text:p>0.585507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0.5640521">
                <text:p>0.564052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5665926">
                <text:p>0.566592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5749786">
                <text:p>0.574978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5681161">
                <text:p>0.568116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5798835">
                <text:p>0.579883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0.5529503">
                <text:p>0.552950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5630444">
                <text:p>0.563044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0.5560676">
                <text:p>0.556067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0.5471279">
                <text:p>0.547127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0.5433295">
                <text:p>0.543329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5590649">
                <text:p>0.559064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5574449">
                <text:p>0.557444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0.5403442">
                <text:p>0.540344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0.5484949">
                <text:p>0.548494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5519816">
                <text:p>0.551981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0.5406668">
                <text:p>0.540666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5609416">
                <text:p>0.560941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5535384">
                <text:p>0.553538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5442839">
                <text:p>0.544283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5400693">
                <text:p>0.540069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0.5327384">
                <text:p>0.532738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0.5245736">
                <text:p>0.524573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5394344">
                <text:p>0.539434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5453585">
                <text:p>0.545358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0.5259773">
                <text:p>0.525977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5303376">
                <text:p>0.530337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5310599">
                <text:p>0.531059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5248477">
                <text:p>0.524847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0.5217355">
                <text:p>0.521735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5227289">
                <text:p>0.522728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5242407">
                <text:p>0.524240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0.5198933">
                <text:p>0.519893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0.509254">
                <text:p>0.50925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0.5064743">
                <text:p>0.506474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5180931">
                <text:p>0.518093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5633666">
                <text:p>0.563366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5181623">
                <text:p>0.518162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5098872">
                <text:p>0.509887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5102377">
                <text:p>0.510237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0.5053171">
                <text:p>0.505317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505105">
                <text:p>0.50510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5078205">
                <text:p>0.507820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0.5007555">
                <text:p>0.500755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0.4957522">
                <text:p>0.495752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0.4966643">
                <text:p>0.496664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0.4929414">
                <text:p>0.492941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496019">
                <text:p>0.49601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5179035">
                <text:p>0.517903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4925554">
                <text:p>0.492555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5025597">
                <text:p>0.502559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0.4772711">
                <text:p>0.477271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0.4840868">
                <text:p>0.484086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4843922">
                <text:p>0.484392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0.4738821">
                <text:p>0.473882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4888036">
                <text:p>0.488803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0.4745352">
                <text:p>0.474535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0.4709145">
                <text:p>0.470914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497437">
                <text:p>0.49743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0.4732268">
                <text:p>0.473226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4788232">
                <text:p>0.478823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4743594">
                <text:p>0.474359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0.4613311">
                <text:p>0.461331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4808821">
                <text:p>0.480882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4737516">
                <text:p>0.473751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0.4630084">
                <text:p>0.463008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4682653">
                <text:p>0.468265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0.4563571">
                <text:p>0.456357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0.4550177">
                <text:p>0.455017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4626882">
                <text:p>0.462688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0.4477882">
                <text:p>0.447788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0.4530875">
                <text:p>0.453087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0.4479651">
                <text:p>0.447965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0.4426939">
                <text:p>0.442693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4538189">
                <text:p>0.453818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4480451">
                <text:p>0.448045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4491501">
                <text:p>0.449150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0.4351895">
                <text:p>0.435189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0.4366276">
                <text:p>0.436627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0.4397619">
                <text:p>0.439761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4474566">
                <text:p>0.447456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4481651">
                <text:p>0.448165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4461682">
                <text:p>0.446168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0.4349391">
                <text:p>0.434939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0.4322978">
                <text:p>0.432297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0.4186037">
                <text:p>0.418603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0.4239908">
                <text:p>0.423990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0.428378">
                <text:p>0.42837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0.4290837">
                <text:p>0.429083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444601">
                <text:p>0.44460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0.4251879">
                <text:p>0.425187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4266007">
                <text:p>0.426600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0.4231376">
                <text:p>0.423137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4238019">
                <text:p>0.423801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0.4143845">
                <text:p>0.414384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4231814">
                <text:p>0.423181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0.4166501">
                <text:p>0.416650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4166991">
                <text:p>0.416699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0.4029923">
                <text:p>0.402992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4443128">
                <text:p>0.444312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413955">
                <text:p>0.41395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4352263">
                <text:p>0.435226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4113777">
                <text:p>0.411377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4378699">
                <text:p>0.437869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0.4059887">
                <text:p>0.405988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4088332">
                <text:p>0.408833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0.3956457">
                <text:p>0.395645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4098761">
                <text:p>0.40987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4042514">
                <text:p>0.404251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0.3918492">
                <text:p>0.391849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3965853">
                <text:p>0.396585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0.3975397">
                <text:p>0.397539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0.3935247">
                <text:p>0.393524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0.3917156">
                <text:p>0.391715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0.3827038">
                <text:p>0.382703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3984431">
                <text:p>0.398443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0.3848363">
                <text:p>0.384836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0.3819418">
                <text:p>0.381941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0.387414">
                <text:p>0.38741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0.3862843">
                <text:p>0.386284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4018264">
                <text:p>0.401826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0.3819138">
                <text:p>0.381913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0.3820043">
                <text:p>0.382004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0.3753437">
                <text:p>0.375343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0.3809061">
                <text:p>0.380906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3808873">
                <text:p>0.380887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0.3754676">
                <text:p>0.375467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3886017">
                <text:p>0.388601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0.3737167">
                <text:p>0.373716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3785189">
                <text:p>0.378518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3896584">
                <text:p>0.389658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0.3721785">
                <text:p>0.372178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0.3618252">
                <text:p>0.361825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3741889">
                <text:p>0.374188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3735655">
                <text:p>0.373565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0.3635615">
                <text:p>0.36356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3761185">
                <text:p>0.376118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0.3676026">
                <text:p>0.367602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0.3594216">
                <text:p>0.359421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374476">
                <text:p>0.37447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0.3620496">
                <text:p>0.362049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3712341">
                <text:p>0.371234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0.3519679">
                <text:p>0.351967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3648378">
                <text:p>0.364837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3646119">
                <text:p>0.364611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0.3497095">
                <text:p>0.349709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3608169">
                <text:p>0.360816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0.3513026">
                <text:p>0.351302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0.3516009">
                <text:p>0.351600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3560244">
                <text:p>0.356024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0.3525027">
                <text:p>0.352502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0.3543837">
                <text:p>0.354383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3600626">
                <text:p>0.360062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0.3424798">
                <text:p>0.342479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3529231">
                <text:p>0.352923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3514256">
                <text:p>0.351425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3534957">
                <text:p>0.353495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0.3384864">
                <text:p>0.338486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0.3445204">
                <text:p>0.344520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3489727">
                <text:p>0.348972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3480648">
                <text:p>0.348064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0.3326018">
                <text:p>0.332601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0.3435006">
                <text:p>0.343500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344946">
                <text:p>0.34494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3466868">
                <text:p>0.346686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3392083">
                <text:p>0.339208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3478998">
                <text:p>0.347899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3517707">
                <text:p>0.351770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3503848">
                <text:p>0.350384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0.3324206">
                <text:p>0.332420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3385498">
                <text:p>0.338549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3387604">
                <text:p>0.338760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3365421">
                <text:p>0.336542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334709">
                <text:p>0.33470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3383061">
                <text:p>0.338306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0.3300449">
                <text:p>0.330044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3352673">
                <text:p>0.335267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3342133">
                <text:p>0.334213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3343903">
                <text:p>0.334390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0.3224749">
                <text:p>0.322474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3304154">
                <text:p>0.330415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3279069">
                <text:p>0.327906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0.3242325">
                <text:p>0.324232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0.3135639">
                <text:p>0.313563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0.3172086">
                <text:p>0.317208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3303626">
                <text:p>0.330362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0.3138298">
                <text:p>0.313829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3224881">
                <text:p>0.322488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0.3183514">
                <text:p>0.318351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3269472">
                <text:p>0.326947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0.3146658">
                <text:p>0.314665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0.3097146">
                <text:p>0.309714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0.3157614">
                <text:p>0.315761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0.3122704">
                <text:p>0.312270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3204602">
                <text:p>0.320460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0.3147951">
                <text:p>0.314795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3158378">
                <text:p>0.315837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3263604">
                <text:p>0.326360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3197239">
                <text:p>0.319723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3119629">
                <text:p>0.311962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3149043">
                <text:p>0.314904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0.2985247">
                <text:p>0.298524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3083455">
                <text:p>0.308345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0.302414">
                <text:p>0.30241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0.306789">
                <text:p>0.30678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3141528">
                <text:p>0.314152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309176">
                <text:p>0.30917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3047976">
                <text:p>0.304797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3056864">
                <text:p>0.305686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0.2991889">
                <text:p>0.299188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3051704">
                <text:p>0.305170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0.2928358">
                <text:p>0.292835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3037673">
                <text:p>0.303767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0.2906375">
                <text:p>0.290637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3133744">
                <text:p>0.313374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0.2949449">
                <text:p>0.294944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0.2893668">
                <text:p>0.289366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3000962">
                <text:p>0.300096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0.289428">
                <text:p>0.28942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3057624">
                <text:p>0.305762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0.2915176">
                <text:p>0.291517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2922034">
                <text:p>0.292203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304845">
                <text:p>0.30484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0.2883198">
                <text:p>0.288319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0.2872628">
                <text:p>0.287262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0.2863866">
                <text:p>0.286386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0.2861251">
                <text:p>0.286125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2899844">
                <text:p>0.289984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3038076">
                <text:p>0.303807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0.2792479">
                <text:p>0.279247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294805">
                <text:p>0.29480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2856331">
                <text:p>0.285633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0.2800136">
                <text:p>0.280013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0.272149">
                <text:p>0.27214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2830892">
                <text:p>0.283089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0.2765671">
                <text:p>0.276567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2982853">
                <text:p>0.298285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2800864">
                <text:p>0.280086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2771573">
                <text:p>0.2771573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2778789">
                <text:p>0.277878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0.2711473">
                <text:p>0.271147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0.2712801">
                <text:p>0.271280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0.268621">
                <text:p>0.26862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0.2727545">
                <text:p>0.272754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0.2722434">
                <text:p>0.272243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2729723">
                <text:p>0.272972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2727075">
                <text:p>0.272707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2720198">
                <text:p>0.272019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2772797">
                <text:p>0.277279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2730648">
                <text:p>0.273064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0.2627592">
                <text:p>0.262759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2693336">
                <text:p>0.269333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0.2616093">
                <text:p>0.261609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2756271">
                <text:p>0.275627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276206">
                <text:p>0.27620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2668639">
                <text:p>0.266863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2652671">
                <text:p>0.265267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2611628">
                <text:p>0.261162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2605438">
                <text:p>0.260543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266613">
                <text:p>0.26661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2598522">
                <text:p>0.259852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0.2541071">
                <text:p>0.254107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2737727">
                <text:p>0.273772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2585173">
                <text:p>0.258517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0.2483826">
                <text:p>0.248382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2579427">
                <text:p>0.257942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0.2540533">
                <text:p>0.254053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2549037">
                <text:p>0.254903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0.2423481">
                <text:p>0.242348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0.2461231">
                <text:p>0.246123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0.2503432">
                <text:p>0.250343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2600189">
                <text:p>0.260018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0.246538">
                <text:p>0.246538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250746">
                <text:p>0.25074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2509594">
                <text:p>0.250959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254278">
                <text:p>0.25427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0.2428802">
                <text:p>0.242880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2493652">
                <text:p>0.249365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2465626">
                <text:p>0.246562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2458461">
                <text:p>0.245846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2494007">
                <text:p>0.249400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0.2331185">
                <text:p>0.233118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2445583">
                <text:p>0.244558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2487046">
                <text:p>0.2487046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0.2391274">
                <text:p>0.239127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2440164">
                <text:p>0.244016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2432047">
                <text:p>0.243204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2366842">
                <text:p>0.236684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0.2303614">
                <text:p>0.230361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2424949">
                <text:p>0.242494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2607817">
                <text:p>0.260781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0.2301596">
                <text:p>0.2301596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0.2291014">
                <text:p>0.22910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2400015">
                <text:p>0.240001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233908">
                <text:p>0.23390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0.2296673">
                <text:p>0.229667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2370763">
                <text:p>0.237076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0.2287397">
                <text:p>0.228739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2410793">
                <text:p>0.241079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0.2255136">
                <text:p>0.225513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0.2190576">
                <text:p>0.219057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2378555">
                <text:p>0.237855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2426919">
                <text:p>0.242691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0.2220957">
                <text:p>0.222095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2332487">
                <text:p>0.233248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2280292">
                <text:p>0.228029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227981">
                <text:p>0.22798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2245398">
                <text:p>0.224539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0.2141394">
                <text:p>0.214139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0.2179659">
                <text:p>0.217965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0.2152698">
                <text:p>0.215269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2242906">
                <text:p>0.224290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2325945">
                <text:p>0.232594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0.2124616">
                <text:p>0.212461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2222644">
                <text:p>0.222264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2304999">
                <text:p>0.230499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0.2107265">
                <text:p>0.210726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0.2103139">
                <text:p>0.210313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2158591">
                <text:p>0.215859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0.2095382">
                <text:p>0.209538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0.2031985">
                <text:p>0.203198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2228907">
                <text:p>0.222890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2207732">
                <text:p>0.220773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2124917">
                <text:p>0.2124917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2189262">
                <text:p>0.218926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2426784">
                <text:p>0.242678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2116953">
                <text:p>0.211695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2126923">
                <text:p>0.212692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2184071">
                <text:p>0.218407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2109278">
                <text:p>0.210927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0.2000713">
                <text:p>0.20007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2069789">
                <text:p>0.206978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2111332">
                <text:p>0.21113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2074393">
                <text:p>0.207439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2170036">
                <text:p>0.217003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2062844">
                <text:p>0.206284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2012445">
                <text:p>0.201244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2046574">
                <text:p>0.204657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2080792">
                <text:p>0.208079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1944927">
                <text:p>0.194492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2191691">
                <text:p>0.219169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2041965">
                <text:p>0.204196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1981868">
                <text:p>0.198186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2029248">
                <text:p>0.202924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217853">
                <text:p>0.217853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205675">
                <text:p>0.20567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1997541">
                <text:p>0.199754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1939711">
                <text:p>0.193971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2070187">
                <text:p>0.207018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1966777">
                <text:p>0.196677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1992392">
                <text:p>0.199239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1920447">
                <text:p>0.192044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2159126">
                <text:p>0.215912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2167832">
                <text:p>0.216783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1859141">
                <text:p>0.185914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1902632">
                <text:p>0.1902632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199759">
                <text:p>0.19975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1995412">
                <text:p>0.199541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1766889">
                <text:p>0.176688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192633">
                <text:p>0.19263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1947772">
                <text:p>0.194777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2068773">
                <text:p>0.206877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1741786">
                <text:p>0.1741786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1887982">
                <text:p>0.188798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1882818">
                <text:p>0.1882818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1920685">
                <text:p>0.192068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1857808">
                <text:p>0.185780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1732954">
                <text:p>0.173295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1716709">
                <text:p>0.171670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1776416">
                <text:p>0.177641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179919">
                <text:p>0.179919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1651141">
                <text:p>0.165114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1758418">
                <text:p>0.175841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1880359">
                <text:p>0.188035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1874513">
                <text:p>0.187451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1721787">
                <text:p>0.172178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1678547">
                <text:p>0.167854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1759802">
                <text:p>0.175980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1650248">
                <text:p>0.165024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1722371">
                <text:p>0.172237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1727615">
                <text:p>0.172761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1719281">
                <text:p>0.1719281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160125">
                <text:p>0.16012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174425">
                <text:p>0.17442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1624106">
                <text:p>0.162410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1840379">
                <text:p>0.184037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1612133">
                <text:p>0.161213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1732835">
                <text:p>0.173283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1595222">
                <text:p>0.15952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1570206">
                <text:p>0.157020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1551169">
                <text:p>0.155116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1591287">
                <text:p>0.159128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1652412">
                <text:p>0.165241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1531783">
                <text:p>0.153178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1522696">
                <text:p>0.152269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1627532">
                <text:p>0.162753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1552398">
                <text:p>0.155239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1558744">
                <text:p>0.155874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1651403">
                <text:p>0.1651403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151099">
                <text:p>0.15109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1561826">
                <text:p>0.156182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1486514">
                <text:p>0.148651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150282">
                <text:p>0.15028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1479885">
                <text:p>0.147988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1478826">
                <text:p>0.147882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1444532">
                <text:p>0.144453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1519034">
                <text:p>0.151903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1512893">
                <text:p>0.151289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1492722">
                <text:p>0.149272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149946">
                <text:p>0.14994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1527933">
                <text:p>0.152793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1407487">
                <text:p>0.140748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1634601">
                <text:p>0.1634601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1392511">
                <text:p>0.139251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15593">
                <text:p>0.1559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1380824">
                <text:p>0.138082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136047">
                <text:p>0.13604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1395961">
                <text:p>0.139596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137447">
                <text:p>0.13744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1435176">
                <text:p>0.143517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1416449">
                <text:p>0.1416449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1318188">
                <text:p>0.131818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1440031">
                <text:p>0.144003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1462706">
                <text:p>0.146270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1335843">
                <text:p>0.133584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1487379">
                <text:p>0.148737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1283472">
                <text:p>0.128347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1318589">
                <text:p>0.131858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1418976">
                <text:p>0.141897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1348326">
                <text:p>0.134832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1383423">
                <text:p>0.1383423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1235734">
                <text:p>0.123573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1370032">
                <text:p>0.137003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1237504">
                <text:p>0.123750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1275491">
                <text:p>0.1275491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1311799">
                <text:p>0.131179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1244034">
                <text:p>0.124403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1425283">
                <text:p>0.142528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1240973">
                <text:p>0.124097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1225568">
                <text:p>0.122556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1250608">
                <text:p>0.125060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1266606">
                <text:p>0.1266606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1340595">
                <text:p>0.134059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1507769">
                <text:p>0.150776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1164645">
                <text:p>0.116464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1228463">
                <text:p>0.122846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1273088">
                <text:p>0.1273088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1193957">
                <text:p>0.119395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1240303">
                <text:p>0.124030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1176067">
                <text:p>0.117606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11746">
                <text:p>0.1174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1192127">
                <text:p>0.119212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1131868">
                <text:p>0.113186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1128168">
                <text:p>0.112816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1223551">
                <text:p>0.122355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131025">
                <text:p>0.13102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1204285">
                <text:p>0.120428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1158554">
                <text:p>0.115855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1136225">
                <text:p>0.113622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1251984">
                <text:p>0.125198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1179046">
                <text:p>0.1179046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1144117">
                <text:p>0.1144117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1129873">
                <text:p>0.1129873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1229516">
                <text:p>0.1229516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1243985">
                <text:p>0.124398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1167169">
                <text:p>0.116716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1220142">
                <text:p>0.122014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1105494">
                <text:p>0.110549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1061413">
                <text:p>0.106141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1086309">
                <text:p>0.1086309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1086948">
                <text:p>0.108694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1104217">
                <text:p>0.110421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1136604">
                <text:p>0.113660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1089707">
                <text:p>0.108970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110739">
                <text:p>0.11073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1052404">
                <text:p>0.105240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1027225">
                <text:p>0.102722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1101947">
                <text:p>0.110194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0997664">
                <text:p>0.099766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1031467">
                <text:p>0.103146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1304137">
                <text:p>0.1304137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1051534">
                <text:p>0.105153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09880935">
                <text:p>0.0988093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1052166">
                <text:p>0.105216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09903546">
                <text:p>0.09903546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09704093">
                <text:p>0.0970409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1095101">
                <text:p>0.109510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09376539">
                <text:p>0.0937653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1092212">
                <text:p>0.109221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1039354">
                <text:p>0.103935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09968026">
                <text:p>0.09968026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107107">
                <text:p>0.10710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1066231">
                <text:p>0.106623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1006172">
                <text:p>0.100617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09957521">
                <text:p>0.0995752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09910932">
                <text:p>0.0991093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8948401">
                <text:p>0.0894840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1029384">
                <text:p>0.102938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1027062">
                <text:p>0.102706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09468574">
                <text:p>0.0946857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1170487">
                <text:p>0.1170487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8836354">
                <text:p>0.08836354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09751739">
                <text:p>0.09751739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1004712">
                <text:p>0.100471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8783498">
                <text:p>0.0878349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9026447">
                <text:p>0.0902644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09695411">
                <text:p>0.0969541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0982901">
                <text:p>0.0982901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09689891">
                <text:p>0.0968989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1053675">
                <text:p>0.105367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09936775">
                <text:p>0.0993677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1002711">
                <text:p>0.100271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8792791">
                <text:p>0.0879279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8991537">
                <text:p>0.0899153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1006298">
                <text:p>0.100629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9454372">
                <text:p>0.0945437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09930078">
                <text:p>0.0993007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829781">
                <text:p>0.082978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9294306">
                <text:p>0.0929430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09748609">
                <text:p>0.0974860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1000381">
                <text:p>0.100038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9231683">
                <text:p>0.09231683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9250965">
                <text:p>0.0925096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9362724">
                <text:p>0.09362724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1011707">
                <text:p>0.1011707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9097209">
                <text:p>0.0909720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8554243">
                <text:p>0.0855424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848095">
                <text:p>0.084809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8819189">
                <text:p>0.0881918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8324673">
                <text:p>0.08324673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9433514">
                <text:p>0.0943351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8114114">
                <text:p>0.0811411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8474758">
                <text:p>0.0847475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8353877">
                <text:p>0.08353877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7870431">
                <text:p>0.0787043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9084936">
                <text:p>0.09084936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7864312">
                <text:p>0.0786431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8586337">
                <text:p>0.08586337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8012931">
                <text:p>0.08012931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8381689">
                <text:p>0.08381689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07461746">
                <text:p>0.0746174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1189388">
                <text:p>0.118938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9032818">
                <text:p>0.0903281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7882225">
                <text:p>0.0788222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7918363">
                <text:p>0.0791836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8913182">
                <text:p>0.08913182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9093175">
                <text:p>0.0909317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7801902">
                <text:p>0.0780190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7630218">
                <text:p>0.07630218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8630213">
                <text:p>0.0863021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7876391">
                <text:p>0.07876391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9307657">
                <text:p>0.093076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7890908">
                <text:p>0.0789090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9029706">
                <text:p>0.0902970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800147">
                <text:p>0.080014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8289154">
                <text:p>0.0828915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7194843">
                <text:p>0.07194843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7397735">
                <text:p>0.0739773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9524921">
                <text:p>0.09524921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737218">
                <text:p>0.073721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7092277">
                <text:p>0.0709227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709985">
                <text:p>0.070998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7570239">
                <text:p>0.07570239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7023679">
                <text:p>0.07023679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06901395">
                <text:p>0.0690139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0674756">
                <text:p>0.0674756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06402307">
                <text:p>0.0640230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8086056">
                <text:p>0.08086056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6960654">
                <text:p>0.06960654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7167576">
                <text:p>0.07167576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7385429">
                <text:p>0.0738542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7037497">
                <text:p>0.0703749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6930604">
                <text:p>0.0693060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717804">
                <text:p>0.0717804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7660492">
                <text:p>0.0766049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06634843">
                <text:p>0.0663484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6930249">
                <text:p>0.06930249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7482056">
                <text:p>0.0748205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7111243">
                <text:p>0.0711124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679494">
                <text:p>0.067949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7300583">
                <text:p>0.0730058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8224547">
                <text:p>0.08224547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939851">
                <text:p>0.093985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7220324">
                <text:p>0.0722032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8031346">
                <text:p>0.0803134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640127">
                <text:p>0.0640127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6909203">
                <text:p>0.06909203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6902912">
                <text:p>0.06902912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7738388">
                <text:p>0.07738388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701035">
                <text:p>0.070103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7366056">
                <text:p>0.0736605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6697418">
                <text:p>0.0669741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8184291">
                <text:p>0.0818429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6775196">
                <text:p>0.06775196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7086899">
                <text:p>0.0708689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6726252">
                <text:p>0.0672625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650337">
                <text:p>0.0650337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6814466">
                <text:p>0.0681446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6539516">
                <text:p>0.06539516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7992511">
                <text:p>0.07992511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6692919">
                <text:p>0.0669291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06237648">
                <text:p>0.0623764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8609223">
                <text:p>0.0860922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7064256">
                <text:p>0.0706425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7233027">
                <text:p>0.07233027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6638704">
                <text:p>0.0663870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619501">
                <text:p>0.0619501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7381586">
                <text:p>0.07381586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6994239">
                <text:p>0.0699423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6426531">
                <text:p>0.0642653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7279167">
                <text:p>0.07279167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6110399">
                <text:p>0.0611039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6361511">
                <text:p>0.0636151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7563568">
                <text:p>0.07563568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7527053">
                <text:p>0.0752705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6761362">
                <text:p>0.0676136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05305253">
                <text:p>0.05305253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7087394">
                <text:p>0.0708739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05676504">
                <text:p>0.05676504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6153125">
                <text:p>0.0615312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6785896">
                <text:p>0.06785896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6957165">
                <text:p>0.0695716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6198021">
                <text:p>0.0619802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6827676">
                <text:p>0.0682767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5982289">
                <text:p>0.0598228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05581232">
                <text:p>0.05581232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8375442">
                <text:p>0.0837544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055074">
                <text:p>0.055074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6001387">
                <text:p>0.0600138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520796">
                <text:p>0.052079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6272752">
                <text:p>0.0627275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52205">
                <text:p>0.05220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6314315">
                <text:p>0.0631431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6243095">
                <text:p>0.0624309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6017169">
                <text:p>0.0601716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5652013">
                <text:p>0.0565201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6065787">
                <text:p>0.0606578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6017919">
                <text:p>0.0601791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5554826">
                <text:p>0.0555482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6320795">
                <text:p>0.0632079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6703224">
                <text:p>0.06703224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4980525">
                <text:p>0.0498052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6173855">
                <text:p>0.06173855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6378387">
                <text:p>0.0637838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499333">
                <text:p>0.04993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5306137">
                <text:p>0.05306137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04361748">
                <text:p>0.0436174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556495">
                <text:p>0.055649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5866212">
                <text:p>0.0586621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6389598">
                <text:p>0.0638959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634857">
                <text:p>0.0634857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5684565">
                <text:p>0.0568456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55773">
                <text:p>0.05577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5364022">
                <text:p>0.0536402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4733079">
                <text:p>0.0473307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5001354">
                <text:p>0.0500135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5072061">
                <text:p>0.0507206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4766462">
                <text:p>0.0476646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6861741">
                <text:p>0.0686174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5355383">
                <text:p>0.05355383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494585">
                <text:p>0.049458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5324067">
                <text:p>0.0532406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6440704">
                <text:p>0.0644070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6178478">
                <text:p>0.06178478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5089206">
                <text:p>0.0508920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4716359">
                <text:p>0.04716359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4655514">
                <text:p>0.04655514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5344607">
                <text:p>0.0534460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4929804">
                <text:p>0.0492980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5283756">
                <text:p>0.0528375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475102">
                <text:p>0.047510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6071922">
                <text:p>0.0607192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6049975">
                <text:p>0.0604997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5476118">
                <text:p>0.0547611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6231107">
                <text:p>0.06231107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4587641">
                <text:p>0.0458764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587045">
                <text:p>0.058704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4677213">
                <text:p>0.0467721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5282496">
                <text:p>0.05282496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4597659">
                <text:p>0.04597659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4497555">
                <text:p>0.0449755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4325849">
                <text:p>0.0432584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6677939">
                <text:p>0.0667793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5890713">
                <text:p>0.05890713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5315363">
                <text:p>0.0531536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51904">
                <text:p>0.051904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5460532">
                <text:p>0.0546053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6819525">
                <text:p>0.06819525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5762708">
                <text:p>0.05762708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4278135">
                <text:p>0.0427813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4839052">
                <text:p>0.0483905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4718199">
                <text:p>0.0471819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4549323">
                <text:p>0.04549323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522036">
                <text:p>0.052203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6232102">
                <text:p>0.0623210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5027888">
                <text:p>0.0502788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4973583">
                <text:p>0.0497358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03902533">
                <text:p>0.03902533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4202617">
                <text:p>0.04202617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4062119">
                <text:p>0.0406211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5980409">
                <text:p>0.0598040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5059858">
                <text:p>0.05059858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4847765">
                <text:p>0.0484776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4563719">
                <text:p>0.0456371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4468689">
                <text:p>0.04468689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4778611">
                <text:p>0.04778611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4295883">
                <text:p>0.0429588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429997">
                <text:p>0.0429997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6105791">
                <text:p>0.06105791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4853435">
                <text:p>0.0485343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4471496">
                <text:p>0.04471496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4017137">
                <text:p>0.0401713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4728928">
                <text:p>0.04728928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4100973">
                <text:p>0.04100973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5035573">
                <text:p>0.0503557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4699567">
                <text:p>0.04699567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4349504">
                <text:p>0.04349504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4086788">
                <text:p>0.0408678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3428912">
                <text:p>0.03428912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4649007">
                <text:p>0.0464900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4704386">
                <text:p>0.04704386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4473423">
                <text:p>0.0447342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440683">
                <text:p>0.0440683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459867">
                <text:p>0.045986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3805642">
                <text:p>0.0380564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5071859">
                <text:p>0.0507185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5154344">
                <text:p>0.0515434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4017373">
                <text:p>0.04017373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349567">
                <text:p>0.034956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5221133">
                <text:p>0.05221133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3618286">
                <text:p>0.0361828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4366748">
                <text:p>0.0436674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386195">
                <text:p>0.038619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4327784">
                <text:p>0.04327784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460716">
                <text:p>0.0460716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366835">
                <text:p>0.0366835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3098736">
                <text:p>0.03098736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3548227">
                <text:p>0.03548227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3335154">
                <text:p>0.03335154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2982737">
                <text:p>0.0298273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3626115">
                <text:p>0.0362611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549002">
                <text:p>0.054900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3350903">
                <text:p>0.0335090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3362392">
                <text:p>0.0336239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3300036">
                <text:p>0.03300036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4492904">
                <text:p>0.0449290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3465829">
                <text:p>0.0346582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4047067">
                <text:p>0.04047067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3949375">
                <text:p>0.0394937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6300487">
                <text:p>0.06300487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418415">
                <text:p>0.0418415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4219815">
                <text:p>0.0421981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3419284">
                <text:p>0.03419284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465313">
                <text:p>0.0465313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3436817">
                <text:p>0.03436817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3853372">
                <text:p>0.03853372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3339205">
                <text:p>0.0333920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3610093">
                <text:p>0.03610093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4228832">
                <text:p>0.0422883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3191167">
                <text:p>0.03191167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4835785">
                <text:p>0.04835785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3178344">
                <text:p>0.0317834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2715429">
                <text:p>0.0271542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3132874">
                <text:p>0.03132874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3756316">
                <text:p>0.03756316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3359882">
                <text:p>0.03359882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4353084">
                <text:p>0.0435308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2984311">
                <text:p>0.0298431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3677968">
                <text:p>0.0367796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4252472">
                <text:p>0.0425247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3401723">
                <text:p>0.0340172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5581997">
                <text:p>0.0558199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4119878">
                <text:p>0.04119878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330708">
                <text:p>0.033070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3810376">
                <text:p>0.03810376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4190409">
                <text:p>0.04190409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4153692">
                <text:p>0.04153692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3202487">
                <text:p>0.03202487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3583372">
                <text:p>0.03583372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4923795">
                <text:p>0.04923795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2814976">
                <text:p>0.02814976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4036849">
                <text:p>0.0403684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2494442">
                <text:p>0.02494442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4604001">
                <text:p>0.0460400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3051209">
                <text:p>0.0305120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3981408">
                <text:p>0.03981408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3449396">
                <text:p>0.03449396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2913216">
                <text:p>0.02913216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3515858">
                <text:p>0.0351585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2453109">
                <text:p>0.02453109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5032855">
                <text:p>0.05032855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3769542">
                <text:p>0.0376954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3529869">
                <text:p>0.0352986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2543151">
                <text:p>0.02543151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2897096">
                <text:p>0.02897096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2851037">
                <text:p>0.0285103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2217986">
                <text:p>0.02217986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5524103">
                <text:p>0.0552410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2669281">
                <text:p>0.0266928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2646042">
                <text:p>0.0264604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3150074">
                <text:p>0.03150074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2372294">
                <text:p>0.0237229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2508051">
                <text:p>0.02508051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5050337">
                <text:p>0.05050337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3158344">
                <text:p>0.0315834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5449438">
                <text:p>0.0544943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2098161">
                <text:p>0.0209816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3858434">
                <text:p>0.03858434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4152214">
                <text:p>0.0415221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2696183">
                <text:p>0.02696183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2850723">
                <text:p>0.02850723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284869">
                <text:p>0.028486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2425853">
                <text:p>0.0242585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3109468">
                <text:p>0.03109468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3169665">
                <text:p>0.0316966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2908733">
                <text:p>0.0290873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2019278">
                <text:p>0.02019278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2313061">
                <text:p>0.02313061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3297935">
                <text:p>0.0329793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2800862">
                <text:p>0.0280086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2256204">
                <text:p>0.02256204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291712">
                <text:p>0.0291712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2757698">
                <text:p>0.0275769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2654809">
                <text:p>0.02654809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0.01772812">
                <text:p>0.0177281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1865141">
                <text:p>0.01865141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2689573">
                <text:p>0.02689573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4087376">
                <text:p>0.04087376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3236973">
                <text:p>0.0323697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2865331">
                <text:p>0.02865331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2646092">
                <text:p>0.02646092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3062168">
                <text:p>0.0306216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1824857">
                <text:p>0.01824857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2387664">
                <text:p>0.0238766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2988757">
                <text:p>0.0298875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2447505">
                <text:p>0.0244750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2252174">
                <text:p>0.0225217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2900901">
                <text:p>0.0290090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3021187">
                <text:p>0.03021187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2059257">
                <text:p>0.02059257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189999">
                <text:p>0.0189999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2818542">
                <text:p>0.02818542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3019077">
                <text:p>0.03019077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4248167">
                <text:p>0.0424816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0.01822517">
                <text:p>0.01822517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3819008">
                <text:p>0.03819008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2446435">
                <text:p>0.024464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3892613">
                <text:p>0.03892613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3075331">
                <text:p>0.03075331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3310134">
                <text:p>0.03310134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3654808">
                <text:p>0.03654808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2524783">
                <text:p>0.02524783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0.01749189">
                <text:p>0.01749189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1872306">
                <text:p>0.01872306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3208733">
                <text:p>0.03208733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2958014">
                <text:p>0.0295801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2204135">
                <text:p>0.0220413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1855759">
                <text:p>0.01855759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0.01685492">
                <text:p>0.0168549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2977682">
                <text:p>0.0297768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3502167">
                <text:p>0.0350216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0.01410514">
                <text:p>0.0141051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2731514">
                <text:p>0.02731514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0.01600922">
                <text:p>0.0160092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2005911">
                <text:p>0.0200591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1910821">
                <text:p>0.01910821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1627628">
                <text:p>0.01627628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4242421">
                <text:p>0.0424242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3251511">
                <text:p>0.0325151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3235091">
                <text:p>0.03235091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1551993">
                <text:p>0.0155199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2001949">
                <text:p>0.0200194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22729">
                <text:p>0.022729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4769991">
                <text:p>0.0476999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3185803">
                <text:p>0.0318580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318601">
                <text:p>0.031860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1658447">
                <text:p>0.01658447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2707481">
                <text:p>0.0270748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202301">
                <text:p>0.0202301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0.01549558">
                <text:p>0.0154955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2052168">
                <text:p>0.02052168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2431028">
                <text:p>0.02431028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3123216">
                <text:p>0.03123216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2250496">
                <text:p>0.02250496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2053778">
                <text:p>0.02053778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2824154">
                <text:p>0.0282415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3177149">
                <text:p>0.0317714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1669773">
                <text:p>0.01669773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2829935">
                <text:p>0.0282993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1838813">
                <text:p>0.0183881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3570068">
                <text:p>0.03570068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0.01230536">
                <text:p>0.01230536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2019664">
                <text:p>0.0201966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2004094">
                <text:p>0.02004094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2989994">
                <text:p>0.02989994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1944823">
                <text:p>0.0194482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2161653">
                <text:p>0.02161653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1785974">
                <text:p>0.01785974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0.0133479">
                <text:p>0.0133479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2714386">
                <text:p>0.02714386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4841376">
                <text:p>0.0484137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1337061">
                <text:p>0.0133706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1860416">
                <text:p>0.0186041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1576787">
                <text:p>0.01576787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3012493">
                <text:p>0.0301249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0.0112477">
                <text:p>0.0112477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1898769">
                <text:p>0.0189876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1738688">
                <text:p>0.0173868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1353582">
                <text:p>0.0135358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1283311">
                <text:p>0.01283311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189158">
                <text:p>0.018915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1534791">
                <text:p>0.01534791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3765865">
                <text:p>0.0376586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1382851">
                <text:p>0.01382851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0.01160635">
                <text:p>0.0116063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2291679">
                <text:p>0.02291679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2645076">
                <text:p>0.02645076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173084">
                <text:p>0.0173084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0.008029184">
                <text:p>0.00802918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3437066">
                <text:p>0.03437066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2523525">
                <text:p>0.02523525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0.01197792">
                <text:p>0.0119779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2006005">
                <text:p>0.0200600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1719479">
                <text:p>0.0171947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1325331">
                <text:p>0.01325331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1293971">
                <text:p>0.0129397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2591543">
                <text:p>0.02591543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2653013">
                <text:p>0.0265301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1911033">
                <text:p>0.01911033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2665758">
                <text:p>0.0266575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0.009598792">
                <text:p>0.00959879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1530205">
                <text:p>0.01530205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0.009627601">
                <text:p>0.00962760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0.01028554">
                <text:p>0.01028554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1988602">
                <text:p>0.01988602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2808261">
                <text:p>0.0280826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0.01084183">
                <text:p>0.0108418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3721894">
                <text:p>0.03721894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1756046">
                <text:p>0.01756046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1480039">
                <text:p>0.01480039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0.008804071">
                <text:p>0.00880407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0.007987637">
                <text:p>0.00798763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0.00976098">
                <text:p>0.00976098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2716861">
                <text:p>0.0271686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3115014">
                <text:p>0.03115014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1271055">
                <text:p>0.0127105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1300727">
                <text:p>0.01300727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0.01023602">
                <text:p>0.0102360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2781327">
                <text:p>0.02781327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1652689">
                <text:p>0.0165268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0.004926095">
                <text:p>0.004926095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0.01254035">
                <text:p>0.01254035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1760359">
                <text:p>0.01760359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1148679">
                <text:p>0.01148679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1371557">
                <text:p>0.01371557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2884907">
                <text:p>0.02884907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0.01066487">
                <text:p>0.0106648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2788774">
                <text:p>0.02788774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0.01005416">
                <text:p>0.0100541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2524089">
                <text:p>0.02524089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1536511">
                <text:p>0.0153651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0.008727828">
                <text:p>0.008727828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2197246">
                <text:p>0.02197246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2143819">
                <text:p>0.0214381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0.008907881">
                <text:p>0.00890788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0.004641379">
                <text:p>0.00464137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0.003608281">
                <text:p>0.00360828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0.009488057">
                <text:p>0.00948805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0.01067771">
                <text:p>0.01067771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1598564">
                <text:p>0.0159856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2221963">
                <text:p>0.0222196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1385524">
                <text:p>0.01385524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0.008237465">
                <text:p>0.008237465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1798681">
                <text:p>0.0179868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1259189">
                <text:p>0.0125918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1520088">
                <text:p>0.0152008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0.01003287">
                <text:p>0.0100328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0.007517826">
                <text:p>0.007517826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0.01052924">
                <text:p>0.0105292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2147156">
                <text:p>0.02147156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0.005486775">
                <text:p>0.00548677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0.009067379">
                <text:p>0.00906737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1188593">
                <text:p>0.0118859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2014478">
                <text:p>0.0201447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1464981">
                <text:p>0.01464981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1242658">
                <text:p>0.01242658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2309195">
                <text:p>0.02309195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2061898">
                <text:p>0.0206189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1728872">
                <text:p>0.0172887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1387698">
                <text:p>0.01387698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1222155">
                <text:p>0.0122215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2947335">
                <text:p>0.0294733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0.006907042">
                <text:p>0.00690704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0.007819407">
                <text:p>0.00781940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1130744">
                <text:p>0.0113074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1021186">
                <text:p>0.01021186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0.007848096">
                <text:p>0.007848096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0.00876512">
                <text:p>0.0087651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1895464">
                <text:p>0.01895464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1880857">
                <text:p>0.01880857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2184625">
                <text:p>0.0218462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1987243">
                <text:p>0.01987243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1161719">
                <text:p>0.01161719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0.007572351">
                <text:p>0.00757235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1171122">
                <text:p>0.0117112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0910586">
                <text:p>0.0091058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0.008287392">
                <text:p>0.008287392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1150751">
                <text:p>0.0115075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08658669">
                <text:p>0.00865866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0.005073052">
                <text:p>0.00507305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189831">
                <text:p>0.0189831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1447039">
                <text:p>0.0144703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221016">
                <text:p>0.0221016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0.009491306">
                <text:p>0.009491306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1672821">
                <text:p>0.0167282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3511344">
                <text:p>0.0351134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1563733">
                <text:p>0.01563733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09983267">
                <text:p>0.00998326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09779431">
                <text:p>0.00977943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1664685">
                <text:p>0.0166468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08337157">
                <text:p>0.00833715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1365171">
                <text:p>0.01365171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3482464">
                <text:p>0.03482464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0.005222529">
                <text:p>0.00522252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3184652">
                <text:p>0.0318465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0.004178899">
                <text:p>0.004178899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2894809">
                <text:p>0.02894809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1922088">
                <text:p>0.01922088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1091189">
                <text:p>0.0109118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1384175">
                <text:p>0.0138417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1214452">
                <text:p>0.0121445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0.00254574">
                <text:p>0.00254574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0.007821759">
                <text:p>0.007821759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1037369">
                <text:p>0.0103736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1227284">
                <text:p>0.0122728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1596112">
                <text:p>0.01596112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0.004177298">
                <text:p>0.004177298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0.008388183">
                <text:p>0.008388183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2627065">
                <text:p>0.0262706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1294582">
                <text:p>0.01294582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1490068">
                <text:p>0.01490068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0.006315496">
                <text:p>0.006315496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0.002741106">
                <text:p>0.00274110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0.004654044">
                <text:p>0.004654044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09731953">
                <text:p>0.00973195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0.00588926">
                <text:p>0.0058892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1570995">
                <text:p>0.0157099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0.009180898">
                <text:p>0.009180898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1596678">
                <text:p>0.0159667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1870555">
                <text:p>0.0187055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1106771">
                <text:p>0.0110677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1967635">
                <text:p>0.0196763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09435858">
                <text:p>0.009435858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0977228">
                <text:p>0.0097722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0.007412259">
                <text:p>0.00741225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1566047">
                <text:p>0.01566047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0832752">
                <text:p>0.0083275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0.00373366">
                <text:p>0.00373366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1126067">
                <text:p>0.01126067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0.006406576">
                <text:p>0.006406576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0.006498724">
                <text:p>0.006498724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1253424">
                <text:p>0.01253424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0.003040352">
                <text:p>0.003040352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09373498">
                <text:p>0.009373498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0.002916797">
                <text:p>0.002916797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1456616">
                <text:p>0.01456616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0.005335866">
                <text:p>0.005335866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1214016">
                <text:p>0.01214016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0.005051732">
                <text:p>0.005051732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1227523">
                <text:p>0.01227523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2650985">
                <text:p>0.0265098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1337247">
                <text:p>0.0133724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2867655">
                <text:p>0.0286765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1267675">
                <text:p>0.0126767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2387435">
                <text:p>0.0238743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0.002649264">
                <text:p>0.002649264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0.003728675">
                <text:p>0.00372867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-0.002261785">
                <text:p>-0.002261785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1548974">
                <text:p>0.01548974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0.004171308">
                <text:p>0.004171308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1264804">
                <text:p>0.01264804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08161253">
                <text:p>0.008161253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0.007577164">
                <text:p>0.00757716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2437565">
                <text:p>0.0243756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07718098">
                <text:p>0.00771809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677792">
                <text:p>0.0167779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0.001101891">
                <text:p>0.001101891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09166847">
                <text:p>0.009166847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0.0002224896">
                <text:p>0.0002224896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08817843">
                <text:p>0.008817843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0.002163906">
                <text:p>0.002163906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-0.0009411047">
                <text:p>-0.000941104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09691231">
                <text:p>0.009691231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0.005822762">
                <text:p>0.005822762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2266128">
                <text:p>0.0226612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0.006331685">
                <text:p>0.006331685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09504596">
                <text:p>0.009504596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426451">
                <text:p>0.02426451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09332678">
                <text:p>0.009332678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0.006770644">
                <text:p>0.00677064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1093323">
                <text:p>0.01093323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0.004859184">
                <text:p>0.004859184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2182504">
                <text:p>0.02182504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603355">
                <text:p>0.01603355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1236484">
                <text:p>0.01236484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2187855">
                <text:p>0.0218785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151328">
                <text:p>0.0151328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0.002997714">
                <text:p>0.00299771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0.003805564">
                <text:p>0.003805564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-0.0007520574">
                <text:p>-0.000752057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1931759">
                <text:p>0.01931759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441951">
                <text:p>0.03441951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0.004057831">
                <text:p>0.004057831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0.001244344">
                <text:p>0.001244344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0.006868576">
                <text:p>0.006868576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0.002241401">
                <text:p>0.002241401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0.003763724">
                <text:p>0.00376372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0.0008673702">
                <text:p>0.000867370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1193619">
                <text:p>0.01193619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1073568">
                <text:p>0.01073568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7831383">
                <text:p>0.007831383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07366961">
                <text:p>0.007366961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1082033">
                <text:p>0.0108203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0.0009416832">
                <text:p>0.000941683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0.005345299">
                <text:p>0.005345299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0.0001297265">
                <text:p>0.000129726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130207">
                <text:p>0.0130207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09855494">
                <text:p>0.00985549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1965182">
                <text:p>0.0196518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03323197">
                <text:p>-0.003323197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0.001479504">
                <text:p>0.001479504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05763318">
                <text:p>0.005763318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02158292">
                <text:p>-0.002158292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1020225">
                <text:p>0.0102022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1103622">
                <text:p>0.0110362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0.005569839">
                <text:p>0.00556983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6747">
                <text:p>0.006747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643802">
                <text:p>0.0164380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0.003629436">
                <text:p>0.003629436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1133657">
                <text:p>0.01133657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608082">
                <text:p>0.0160808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09095355">
                <text:p>0.009095355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0.004048576">
                <text:p>0.004048576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0.002227126">
                <text:p>0.002227126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0.001707397">
                <text:p>0.001707397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06234357">
                <text:p>0.00623435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8490021">
                <text:p>0.008490021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1219024">
                <text:p>0.01219024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1404926">
                <text:p>-0.001404926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0.002828765">
                <text:p>0.002828765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05008865">
                <text:p>0.00500886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05375399">
                <text:p>0.00537539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7660081">
                <text:p>0.00766008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05388156">
                <text:p>0.005388156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8245024">
                <text:p>0.008245024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05722713">
                <text:p>0.00572271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7226241">
                <text:p>0.007226241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0630647">
                <text:p>0.00630647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1029658">
                <text:p>0.0102965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0.006308306">
                <text:p>0.006308306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0.0004048213">
                <text:p>0.0004048213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0.005007896">
                <text:p>0.005007896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9772168">
                <text:p>0.009772168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0.00484734">
                <text:p>0.00484734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09618974">
                <text:p>-0.000961897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1137251">
                <text:p>0.0113725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1126379">
                <text:p>0.01126379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0.005449594">
                <text:p>0.005449594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1062828">
                <text:p>0.01062828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07969318">
                <text:p>-0.0007969318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692466">
                <text:p>0.01692466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388363">
                <text:p>0.0138836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4421476">
                <text:p>0.004421476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0.001475391">
                <text:p>0.001475391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1847048">
                <text:p>0.01847048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0.0009129389">
                <text:p>0.000912938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2138526">
                <text:p>0.02138526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0.002407931">
                <text:p>0.002407931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1384833">
                <text:p>0.01384833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1269347">
                <text:p>0.01269347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6666768">
                <text:p>0.006666768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05966516">
                <text:p>0.005966516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0.002366163">
                <text:p>0.002366163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7558977">
                <text:p>0.00755897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7760023">
                <text:p>0.007760023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6324524">
                <text:p>0.006324524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1433443">
                <text:p>0.01433443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0.001555254">
                <text:p>0.00155525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-0.0001919269">
                <text:p>-0.0001919269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06052447">
                <text:p>-0.00605244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1053318">
                <text:p>0.0105331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04877647">
                <text:p>-0.004877647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5532118">
                <text:p>0.00553211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09290642">
                <text:p>0.009290642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6339938">
                <text:p>0.006339938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0.003299655">
                <text:p>0.003299655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0.003660133">
                <text:p>0.00366013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0.004144083">
                <text:p>0.00414408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1188683">
                <text:p>0.01188683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7453547">
                <text:p>0.007453547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09029444">
                <text:p>-0.0009029444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672938">
                <text:p>0.0167293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8781122">
                <text:p>0.008781122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-0.0002599582">
                <text:p>-0.000259958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6405041">
                <text:p>0.006405041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04815818">
                <text:p>0.004815818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1587886">
                <text:p>-0.001587886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660503">
                <text:p>0.01660503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8723466">
                <text:p>0.008723466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60651">
                <text:p>0.0160651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8589937">
                <text:p>0.008589937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1058619">
                <text:p>0.0105861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0.005147304">
                <text:p>0.005147304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406342">
                <text:p>0.01406342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1248445">
                <text:p>0.01248445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06514317">
                <text:p>-0.000651431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6731288">
                <text:p>0.006731288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1163626">
                <text:p>0.01163626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2737613">
                <text:p>-0.002737613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0.0005099376">
                <text:p>0.0005099376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231629">
                <text:p>0.01231629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4054531">
                <text:p>0.004054531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0.004507335">
                <text:p>0.004507335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0.001432846">
                <text:p>0.00143284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0.002605322">
                <text:p>0.002605322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09790951">
                <text:p>-0.0009790951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04455272">
                <text:p>-0.00445527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09235971">
                <text:p>-0.000923597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8750076">
                <text:p>0.008750076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668039">
                <text:p>0.00668039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61208">
                <text:p>0.0161208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3649">
                <text:p>0.013649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6940716">
                <text:p>0.00694071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04890114">
                <text:p>-0.004890114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124808">
                <text:p>0.02124808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04755351">
                <text:p>-0.004755351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0.001713467">
                <text:p>0.001713467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0.00156878">
                <text:p>0.0015687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6451237">
                <text:p>0.006451237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0.002364024">
                <text:p>0.002364024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09699556">
                <text:p>0.00969955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2765334">
                <text:p>-0.002765334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5008793">
                <text:p>-0.005008793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5713328">
                <text:p>0.005713328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6393407">
                <text:p>0.006393407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102823">
                <text:p>0.0102823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456247">
                <text:p>0.01456247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1540584">
                <text:p>-0.001540584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0.0006501364">
                <text:p>0.0006501364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9011955">
                <text:p>0.009011955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542443">
                <text:p>0.01542443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395121">
                <text:p>0.0139512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9135786">
                <text:p>0.009135786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0999993">
                <text:p>0.0099999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3468817">
                <text:p>-0.003468817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1197123">
                <text:p>0.01197123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3007855">
                <text:p>0.003007855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333916">
                <text:p>-0.00333916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1154885">
                <text:p>0.01154885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4182322">
                <text:p>0.004182322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3610335">
                <text:p>-0.00361033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07186555">
                <text:p>-0.00718655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0.001759976">
                <text:p>0.001759976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5655521">
                <text:p>0.005655521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0.003205079">
                <text:p>0.00320507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08102104">
                <text:p>-0.0008102104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1174811">
                <text:p>0.0117481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0.001622343">
                <text:p>0.001622343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6901866">
                <text:p>0.00690186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0.0003755778">
                <text:p>0.0003755778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7532705">
                <text:p>0.007532705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3820946">
                <text:p>0.003820946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0.001190316">
                <text:p>0.001190316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0.0005667272">
                <text:p>0.0005667272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510939">
                <text:p>0.00510939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191408">
                <text:p>-0.00191408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716979">
                <text:p>0.01716979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0.001684842">
                <text:p>0.001684842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62646">
                <text:p>0.006264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785502">
                <text:p>0.00785502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6281056">
                <text:p>0.00628105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0.002655223">
                <text:p>0.002655223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09464878">
                <text:p>0.009464878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1015582">
                <text:p>0.0101558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06890096">
                <text:p>-0.0006890096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7887843">
                <text:p>0.007887843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0.004733682">
                <text:p>0.004733682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6296758">
                <text:p>0.006296758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0.002028034">
                <text:p>0.002028034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1822048">
                <text:p>-0.001822048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22061">
                <text:p>0.0122061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06749844">
                <text:p>-0.0006749844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08128593">
                <text:p>-0.0008128593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0.002149648">
                <text:p>0.002149648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5794195">
                <text:p>0.005794195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5937838">
                <text:p>0.005937838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0.002734503">
                <text:p>0.002734503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0.0007802355">
                <text:p>0.000780235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0.0009801351">
                <text:p>0.0009801351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5004149">
                <text:p>0.00500414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7198151">
                <text:p>0.00719815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06154125">
                <text:p>-0.006154125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4580399">
                <text:p>0.00458039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235919">
                <text:p>-0.00235919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5015625">
                <text:p>0.005015625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0.0004646043">
                <text:p>0.0004646043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03591685">
                <text:p>-0.000359168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05759991">
                <text:p>-0.0005759991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0.002476994">
                <text:p>0.002476994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5963306">
                <text:p>0.005963306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0.001418276">
                <text:p>0.001418276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04870714">
                <text:p>-0.000487071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0.002528736">
                <text:p>0.002528736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4709789">
                <text:p>0.004709789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395542">
                <text:p>-0.00395542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0.002487868">
                <text:p>0.002487868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05230725">
                <text:p>-0.005230725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3903104">
                <text:p>-0.003903104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1695503">
                <text:p>-0.001695503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0.0006360138">
                <text:p>0.000636013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222559">
                <text:p>-0.00222559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2632418">
                <text:p>-0.002632418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7283136">
                <text:p>0.007283136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06814319">
                <text:p>-0.006814319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1866585">
                <text:p>-0.001866585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4868863">
                <text:p>-0.004868863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7333856">
                <text:p>0.00733385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1837216">
                <text:p>-0.001837216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9440647">
                <text:p>0.009440647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1018791">
                <text:p>0.01018791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1152187">
                <text:p>-0.001152187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3857828">
                <text:p>0.003857828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186472">
                <text:p>0.0118647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4773031">
                <text:p>0.004773031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1121247">
                <text:p>-0.001121247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289941">
                <text:p>0.01289941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0.001686499">
                <text:p>0.00168649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0.00298578">
                <text:p>0.0029857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05409674">
                <text:p>-0.0005409674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4298246">
                <text:p>0.00429824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4236632">
                <text:p>-0.00423663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3187132">
                <text:p>-0.003187132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4267463">
                <text:p>0.00426746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0.001992234">
                <text:p>0.001992234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5076712">
                <text:p>0.005076712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0.00179159">
                <text:p>0.0017915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1063432">
                <text:p>0.01063432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464772">
                <text:p>0.00464772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06354868">
                <text:p>-0.00635486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3718901">
                <text:p>0.003718901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3396458">
                <text:p>-0.003396458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5463886">
                <text:p>-0.005463886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25816">
                <text:p>0.0125816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0.001078891">
                <text:p>0.00107889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0.008336294">
                <text:p>0.008336294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1027366">
                <text:p>0.01027366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606543">
                <text:p>0.00606543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1202597">
                <text:p>-0.00120259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02754786">
                <text:p>-0.0002754786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2133602">
                <text:p>-0.002133602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2720115">
                <text:p>-0.002720115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110736">
                <text:p>-0.00110736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1249692">
                <text:p>-0.001249692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3262365">
                <text:p>0.003262365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0.002071433">
                <text:p>0.002071433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702856">
                <text:p>0.01702856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5427342">
                <text:p>0.005427342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6201532">
                <text:p>0.006201532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6641956">
                <text:p>0.006641956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1389184">
                <text:p>-0.001389184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161396">
                <text:p>-0.0016139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554247">
                <text:p>0.00554247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3435829">
                <text:p>0.003435829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0.00111198">
                <text:p>0.00111198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4294569">
                <text:p>0.004294569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071452">
                <text:p>0.02071452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4351882">
                <text:p>-0.00435188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0.002312954">
                <text:p>0.002312954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3735761">
                <text:p>0.03735761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5275756">
                <text:p>0.00527575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5365275">
                <text:p>0.00536527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0.0004332071">
                <text:p>0.0004332071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315932">
                <text:p>0.01315932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9727483">
                <text:p>0.009727483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06736196">
                <text:p>-0.006736196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1073439">
                <text:p>0.01073439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4142822">
                <text:p>-0.004142822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2538093">
                <text:p>-0.002538093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9643198">
                <text:p>0.009643198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6217729">
                <text:p>0.006217729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303779">
                <text:p>0.0130377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5624052">
                <text:p>0.00562405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7312617">
                <text:p>0.007312617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0.001599862">
                <text:p>0.001599862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3072952">
                <text:p>0.003072952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0.002074681">
                <text:p>0.002074681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0.00207872">
                <text:p>0.0020787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5653127">
                <text:p>-0.005653127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2452993">
                <text:p>-0.002452993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07593106">
                <text:p>-0.007593106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0.001347797">
                <text:p>0.001347797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1623129">
                <text:p>-0.001623129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327864">
                <text:p>0.0132786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4399992">
                <text:p>-0.004399992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0.0004621559">
                <text:p>0.0004621559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0.001288152">
                <text:p>0.001288152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0.000419475">
                <text:p>0.000419475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0.001070026">
                <text:p>0.001070026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9218047">
                <text:p>0.009218047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0.0006172582">
                <text:p>0.0006172582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2057594">
                <text:p>-0.002057594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06841406">
                <text:p>-0.006841406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0.0003126875">
                <text:p>0.0003126875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2838754">
                <text:p>0.002838754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4603423">
                <text:p>0.004603423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3712727">
                <text:p>-0.003712727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5274772">
                <text:p>-0.00527477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1079754">
                <text:p>0.01079754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4603004">
                <text:p>0.004603004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03957523">
                <text:p>-0.0003957523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0.0004418347">
                <text:p>0.000441834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3736401">
                <text:p>-0.003736401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387512">
                <text:p>0.02387512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5733391">
                <text:p>-0.005733391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403941">
                <text:p>0.01403941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448386">
                <text:p>-0.0044838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4212857">
                <text:p>-0.004212857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5806649">
                <text:p>-0.005806649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4903113">
                <text:p>-0.004903113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09309511">
                <text:p>-0.009309511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8884302">
                <text:p>0.008884302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4658907">
                <text:p>0.004658907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4877115">
                <text:p>-0.004877115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2547902">
                <text:p>0.002547902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3576827">
                <text:p>-0.003576827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530428">
                <text:p>0.02530428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8049567">
                <text:p>0.008049567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44007">
                <text:p>0.0144007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5121243">
                <text:p>0.005121243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5434799">
                <text:p>-0.00543479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1533274">
                <text:p>-0.001533274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5156526">
                <text:p>0.00515652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3792356">
                <text:p>0.003792356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319586">
                <text:p>0.02319586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02460892">
                <text:p>-0.0002460892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0.002012064">
                <text:p>0.002012064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6120862">
                <text:p>0.006120862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0.0006208929">
                <text:p>0.000620892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3044261">
                <text:p>0.003044261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4956394">
                <text:p>0.004956394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061382">
                <text:p>0.01061382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0.0009157147">
                <text:p>0.0009157147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09992163">
                <text:p>-0.0009992163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41992">
                <text:p>0.0241992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129117">
                <text:p>0.0112911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3189631">
                <text:p>0.003189631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0.0004953386">
                <text:p>0.000495338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4236883">
                <text:p>0.004236883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10797">
                <text:p>0.0110797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3217711">
                <text:p>0.003217711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2751951">
                <text:p>0.002751951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4297622">
                <text:p>-0.004297622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1304112">
                <text:p>-0.001304112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3969695">
                <text:p>0.003969695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2163077">
                <text:p>-0.002163077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480309">
                <text:p>0.0148030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7321864">
                <text:p>0.007321864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2792401">
                <text:p>-0.002792401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6539536">
                <text:p>0.00653953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06907073">
                <text:p>-0.006907073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2903351">
                <text:p>-0.002903351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6074216">
                <text:p>0.006074216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082585">
                <text:p>0.01082585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3057725">
                <text:p>-0.003057725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2483958">
                <text:p>-0.002483958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987027">
                <text:p>0.00987027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663033">
                <text:p>0.01663033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-0.0001215973">
                <text:p>-0.000121597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3095478">
                <text:p>0.003095478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1766638">
                <text:p>-0.001766638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01053111">
                <text:p>-0.0001053111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08888397">
                <text:p>-0.0008888397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3334318">
                <text:p>-0.003334318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1220428">
                <text:p>0.00122042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241207">
                <text:p>0.01241207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07623859">
                <text:p>-0.00762385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7444063">
                <text:p>0.007444063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3420853">
                <text:p>-0.003420853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3988256">
                <text:p>-0.003988256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315853">
                <text:p>-0.00315853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15853">
                <text:p>0.0115853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2111894">
                <text:p>-0.002111894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4285404">
                <text:p>-0.004285404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06695722">
                <text:p>-0.006695722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6370353">
                <text:p>-0.006370353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3861353">
                <text:p>0.003861353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0.002172584">
                <text:p>0.002172584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1713081">
                <text:p>-0.001713081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084519">
                <text:p>0.01084519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09174442">
                <text:p>-0.0009174442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2316135">
                <text:p>0.00231613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241778">
                <text:p>0.01241778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1038272">
                <text:p>-0.00103827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0444461">
                <text:p>-0.000444461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188644">
                <text:p>0.0188644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0.0001218638">
                <text:p>0.000121863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4182146">
                <text:p>0.00418214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5490569">
                <text:p>0.005490569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1920041">
                <text:p>-0.00192004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9333369">
                <text:p>0.009333369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0.002603899">
                <text:p>0.002603899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6002517">
                <text:p>-0.006002517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06200753">
                <text:p>-0.006200753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3379822">
                <text:p>0.003379822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783617">
                <text:p>0.00478361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5106008">
                <text:p>0.005106008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523951">
                <text:p>-0.00523951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3499973">
                <text:p>0.003499973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523906">
                <text:p>0.00523906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9224001">
                <text:p>0.00922400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07903284">
                <text:p>-0.0007903284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3121953">
                <text:p>0.003121953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4684607">
                <text:p>0.00468460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1759885">
                <text:p>-0.001759885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1012679">
                <text:p>-0.00101267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2055431">
                <text:p>-0.002055431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288666">
                <text:p>0.01288666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06489237">
                <text:p>-0.006489237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04793892">
                <text:p>-0.0004793892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3501086">
                <text:p>0.003501086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3379075">
                <text:p>0.003379075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278152">
                <text:p>0.00278152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376107">
                <text:p>-0.00376107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44172">
                <text:p>-0.0044172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3609044">
                <text:p>0.003609044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07365241">
                <text:p>-0.0007365241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1536928">
                <text:p>-0.00153692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6620179">
                <text:p>0.006620179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2680996">
                <text:p>0.002680996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655953">
                <text:p>-0.00655953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1013401">
                <text:p>0.01013401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07459781">
                <text:p>-0.0007459781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5357978">
                <text:p>-0.005357978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3520555">
                <text:p>0.003520555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0.001673394">
                <text:p>0.001673394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0.001893338">
                <text:p>0.001893338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06925459">
                <text:p>-0.006925459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514201">
                <text:p>-0.00514201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4337381">
                <text:p>0.004337381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2274926">
                <text:p>-0.002274926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340624">
                <text:p>0.01340624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6225978">
                <text:p>-0.006225978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260923">
                <text:p>-0.00260923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8435811">
                <text:p>0.00843581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5005411">
                <text:p>0.005005411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4716549">
                <text:p>-0.004716549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7202739">
                <text:p>0.007202739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3406143">
                <text:p>-0.003406143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08543088">
                <text:p>-0.00854308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2540903">
                <text:p>-0.002540903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709747">
                <text:p>0.01709747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697226">
                <text:p>0.01697226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653481">
                <text:p>0.0165348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07247706">
                <text:p>-0.007247706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0.001157257">
                <text:p>0.001157257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4687222">
                <text:p>0.004687222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5540617">
                <text:p>0.00554061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4463431">
                <text:p>-0.00446343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0.0008072417">
                <text:p>0.0008072417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08573862">
                <text:p>-0.008573862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09422687">
                <text:p>0.009422687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5143236">
                <text:p>0.005143236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0.0008425412">
                <text:p>0.0008425412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5409201">
                <text:p>0.005409201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406368">
                <text:p>0.01406368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1720739">
                <text:p>-0.001720739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82625">
                <text:p>0.00482625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3277593">
                <text:p>0.003277593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5093219">
                <text:p>0.00509321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06918982">
                <text:p>-0.00691898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1615302">
                <text:p>-0.001615302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2390912">
                <text:p>0.002390912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5195273">
                <text:p>-0.005195273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3851505">
                <text:p>0.003851505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01364365">
                <text:p>-0.0001364365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4429165">
                <text:p>-0.004429165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0.0006196874">
                <text:p>0.0006196874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5956815">
                <text:p>-0.005956815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0876359">
                <text:p>-0.0087635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5744302">
                <text:p>0.005744302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1160548">
                <text:p>0.001160548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1124016">
                <text:p>0.001124016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0.0007233587">
                <text:p>0.0007233587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1375231">
                <text:p>0.001375231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6477518">
                <text:p>0.006477518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5376869">
                <text:p>-0.00537686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08517436">
                <text:p>-0.008517436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1861399">
                <text:p>0.00186139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0.0007768644">
                <text:p>0.000776864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0.00269816">
                <text:p>0.00269816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1656253">
                <text:p>0.001656253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05011607">
                <text:p>-0.0005011607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2150756">
                <text:p>0.002150756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3836567">
                <text:p>-0.003836567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338719">
                <text:p>0.005338719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02750298">
                <text:p>-0.0002750298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1940766">
                <text:p>-0.001940766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08498177">
                <text:p>0.0008498177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1568317">
                <text:p>-0.001568317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2089787">
                <text:p>0.002089787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4752961">
                <text:p>0.004752961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7949369">
                <text:p>0.007949369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2560739">
                <text:p>-0.002560739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08710131">
                <text:p>0.008710131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1866274">
                <text:p>-0.00186627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6950187">
                <text:p>-0.006950187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06920658">
                <text:p>-0.006920658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5926246">
                <text:p>0.005926246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3962384">
                <text:p>-0.003962384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1029766">
                <text:p>0.01029766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07738145">
                <text:p>-0.007738145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1771267">
                <text:p>0.001771267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189018">
                <text:p>0.02189018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2058504">
                <text:p>0.00205850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1389319">
                <text:p>0.001389319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57168">
                <text:p>0.0057168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078318">
                <text:p>0.005078318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2597813">
                <text:p>-0.002597813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1676549">
                <text:p>0.00167654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1849645">
                <text:p>0.001849645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779125">
                <text:p>0.01779125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07827448">
                <text:p>-0.007827448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660109">
                <text:p>0.01660109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1042126">
                <text:p>-0.001042126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4821458">
                <text:p>-0.004821458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41263">
                <text:p>0.0141263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1762165">
                <text:p>-0.001762165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5884092">
                <text:p>-0.005884092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07399872">
                <text:p>-0.00739987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4038858">
                <text:p>-0.004038858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379142">
                <text:p>0.00379142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6282531">
                <text:p>-0.006282531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1336753">
                <text:p>0.001336753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5196177">
                <text:p>0.005196177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55662">
                <text:p>0.0155662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178322">
                <text:p>0.00178322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4184726">
                <text:p>-0.004184726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1618149">
                <text:p>0.001618149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4202436">
                <text:p>-0.004202436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512296">
                <text:p>-0.00512296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3973798">
                <text:p>0.003973798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0.0004821126">
                <text:p>0.0004821126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038559">
                <text:p>-0.01038559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5712134">
                <text:p>-0.005712134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6149236">
                <text:p>-0.006149236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08684615">
                <text:p>-0.008684615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6151151">
                <text:p>0.006151151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06186649">
                <text:p>-0.006186649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7216695">
                <text:p>-0.007216695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2910198">
                <text:p>0.002910198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5498204">
                <text:p>-0.005498204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6656208">
                <text:p>-0.00665620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400568">
                <text:p>0.02400568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048841">
                <text:p>-0.00048841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02966779">
                <text:p>-0.0002966779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5421909">
                <text:p>-0.005421909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1850078">
                <text:p>0.001850078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1316561">
                <text:p>-0.00131656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0.001157446">
                <text:p>0.001157446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2128584">
                <text:p>-0.002128584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9081607">
                <text:p>0.009081607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0.0009400236">
                <text:p>0.0009400236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0.002182513">
                <text:p>0.002182513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2809669">
                <text:p>-0.00280966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3927309">
                <text:p>-0.00392730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08981861">
                <text:p>-0.008981861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6397119">
                <text:p>0.00639711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03533938">
                <text:p>-0.0003533938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222534">
                <text:p>0.01222534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-0.0001446424">
                <text:p>-0.000144642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139643">
                <text:p>-0.00139643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6860309">
                <text:p>-0.00686030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031738">
                <text:p>-0.01031738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306329">
                <text:p>0.00306329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09205405">
                <text:p>-0.009205405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4604083">
                <text:p>-0.004604083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7358198">
                <text:p>-0.007358198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5340281">
                <text:p>0.005340281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08232913">
                <text:p>-0.00823291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1039109">
                <text:p>0.001039109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4398006">
                <text:p>0.00439800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5799599">
                <text:p>-0.005799599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0.0009181485">
                <text:p>0.0009181485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9348657">
                <text:p>0.009348657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442044">
                <text:p>0.00442044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0.000108749">
                <text:p>0.00010874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6755755">
                <text:p>0.006755755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235078">
                <text:p>0.02235078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4967099">
                <text:p>-0.004967099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6917988">
                <text:p>-0.006917988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016876">
                <text:p>0.01016876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750372">
                <text:p>0.00475037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2063388">
                <text:p>-0.00206338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2823956">
                <text:p>0.002823956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78758">
                <text:p>0.0057875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05936763">
                <text:p>-0.0005936763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165291">
                <text:p>0.01165291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6526562">
                <text:p>0.00652656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335781">
                <text:p>0.01335781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3179379">
                <text:p>-0.003179379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1511539">
                <text:p>0.001511539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5697747">
                <text:p>-0.005697747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2039812">
                <text:p>-0.002039812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8579575">
                <text:p>0.008579575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8040213">
                <text:p>0.00804021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6469131">
                <text:p>0.00646913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2728073">
                <text:p>-0.002728073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766819">
                <text:p>0.0176681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3828365">
                <text:p>-0.003828365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3856947">
                <text:p>-0.003856947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5397101">
                <text:p>-0.005397101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1332407">
                <text:p>-0.001332407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386892">
                <text:p>0.00386892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3131219">
                <text:p>-0.003131219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1688217">
                <text:p>-0.001688217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4593754">
                <text:p>-0.004593754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6231756">
                <text:p>-0.006231756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2612591">
                <text:p>-0.002612591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0.0007218854">
                <text:p>0.000721885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3551686">
                <text:p>0.003551686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1190785">
                <text:p>-0.001190785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0.0005676413">
                <text:p>0.000567641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7502608">
                <text:p>0.00750260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0.002048824">
                <text:p>0.00204882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409009">
                <text:p>0.006409009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6375775">
                <text:p>-0.006375775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07927327">
                <text:p>-0.007927327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08845697">
                <text:p>-0.0008845697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6713213">
                <text:p>0.006713213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0.0004463354">
                <text:p>0.0004463354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5878849">
                <text:p>-0.005878849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4808436">
                <text:p>-0.00480843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1544581">
                <text:p>-0.001544581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630594">
                <text:p>0.0163059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838767">
                <text:p>0.003838767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04702849">
                <text:p>-0.0004702849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206935">
                <text:p>0.003206935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6357975">
                <text:p>0.006357975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900565">
                <text:p>0.0090056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3084622">
                <text:p>0.003084622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3437518">
                <text:p>0.003437518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4185537">
                <text:p>-0.004185537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1586031">
                <text:p>0.001586031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563438">
                <text:p>0.00563438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3783442">
                <text:p>0.003783442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104862">
                <text:p>0.01104862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6892968">
                <text:p>0.006892968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034283">
                <text:p>0.01034283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02510258">
                <text:p>-0.000251025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5454782">
                <text:p>0.005454782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5449283">
                <text:p>0.005449283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3350488">
                <text:p>0.003350488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4288752">
                <text:p>0.004288752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7045567">
                <text:p>-0.007045567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5617459">
                <text:p>0.005617459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682562">
                <text:p>0.002682562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4732394">
                <text:p>0.004732394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460708">
                <text:p>0.0046070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05489201">
                <text:p>-0.000548920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475819">
                <text:p>0.0147581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5108175">
                <text:p>0.005108175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3598433">
                <text:p>-0.00359843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02786231">
                <text:p>-0.0002786231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409734">
                <text:p>-0.00409734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257825">
                <text:p>0.01257825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2787679">
                <text:p>-0.002787679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7092534">
                <text:p>0.007092534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0.0008194618">
                <text:p>0.000819461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0.0007426669">
                <text:p>0.0007426669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3827641">
                <text:p>-0.003827641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08920091">
                <text:p>-0.008920091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216527">
                <text:p>-0.00216527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08498826">
                <text:p>-0.008498826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3986207">
                <text:p>-0.003986207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1681382">
                <text:p>-0.001681382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09756041">
                <text:p>0.009756041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333196">
                <text:p>0.01333196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619687">
                <text:p>-0.00619687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8763067">
                <text:p>0.008763067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1399925">
                <text:p>0.001399925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569514">
                <text:p>-0.00569514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4061643">
                <text:p>-0.004061643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181579">
                <text:p>0.02181579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5422493">
                <text:p>-0.005422493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0.0001308442">
                <text:p>0.0001308442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8392955">
                <text:p>0.008392955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0.0001454319">
                <text:p>0.0001454319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1713433">
                <text:p>0.01713433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1992188">
                <text:p>-0.00199218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6004767">
                <text:p>0.00600476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7733166">
                <text:p>0.007733166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2617881">
                <text:p>0.002617881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4168782">
                <text:p>-0.004168782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0.0009735927">
                <text:p>0.0009735927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1225068">
                <text:p>-0.001225068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1712368">
                <text:p>-0.001712368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5657527">
                <text:p>0.005657527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155939">
                <text:p>0.01155939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247823">
                <text:p>0.00247823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0841229">
                <text:p>-0.00841229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3593168">
                <text:p>0.003593168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7331706">
                <text:p>-0.007331706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605683">
                <text:p>-0.0060568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6169042">
                <text:p>-0.00616904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2918373">
                <text:p>0.02918373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6971113">
                <text:p>-0.006971113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5585399">
                <text:p>-0.0558539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5691338">
                <text:p>-0.0569133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5919703">
                <text:p>-0.05919703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5885117">
                <text:p>-0.05885117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5923674">
                <text:p>-0.05923674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5978185">
                <text:p>-0.05978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