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7500385">
            <text:p>0.007500385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47065">
            <text:p>0.00147065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2930157">
            <text:p>0.002930157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448905">
            <text:p>0.01448905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939628">
            <text:p>0.00939628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5475995">
            <text:p>0.005475995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92571">
            <text:p>0.0192571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2125334">
            <text:p>-0.002125334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float" office:value="0.0002791849">
            <text:p>0.0002791849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6793441">
            <text:p>0.006793441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1029904">
            <text:p>0.01029904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446674">
            <text:p>0.01446674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4005109">
            <text:p>-0.004005109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2196448">
            <text:p>0.002196448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-0.000247283">
            <text:p>-0.000247283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7485118">
            <text:p>0.007485118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287003">
            <text:p>-0.00287003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2821963">
            <text:p>0.002821963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4605673">
            <text:p>0.04605673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7859002">
            <text:p>-0.007859002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4641231">
            <text:p>-0.004641231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230507">
            <text:p>0.01230507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994258">
            <text:p>0.01994258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2176889">
            <text:p>-0.002176889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6751793">
            <text:p>-0.006751793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4378965">
            <text:p>0.004378965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5498521">
            <text:p>-0.005498521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3307047">
            <text:p>0.003307047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1023509">
            <text:p>0.01023509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4125313">
            <text:p>0.004125313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174995">
            <text:p>0.00174995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2078529">
            <text:p>0.02078529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1015324">
            <text:p>-0.01015324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1080851">
            <text:p>0.001080851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03691244">
            <text:p>0.0003691244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4994079">
            <text:p>-0.004994079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3282595">
            <text:p>0.003282595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5617154">
            <text:p>0.005617154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4376997">
            <text:p>0.004376997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6246657">
            <text:p>0.006246657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3581045">
            <text:p>0.003581045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05206635">
            <text:p>0.0005206635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8480799">
            <text:p>0.008480799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940785">
            <text:p>0.01940785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4584859">
            <text:p>-0.004584859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1100229">
            <text:p>0.01100229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801491">
            <text:p>0.02801491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884803">
            <text:p>0.01884803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475633">
            <text:p>0.005475633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1126468">
            <text:p>0.01126468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4615178">
            <text:p>0.004615178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375711">
            <text:p>0.007375711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2265259">
            <text:p>-0.002265259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53739">
            <text:p>0.0053739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2320688">
            <text:p>0.02320688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3086969">
            <text:p>-0.003086969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1052911">
            <text:p>0.01052911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3089811">
            <text:p>-0.003089811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9162042">
            <text:p>-0.009162042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130278">
            <text:p>-0.00130278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3801158">
            <text:p>0.003801158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733901">
            <text:p>0.00733901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4139811">
            <text:p>-0.004139811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2172717">
            <text:p>-0.002172717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9709581">
            <text:p>-0.009709581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2090011">
            <text:p>0.002090011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604766">
            <text:p>0.02604766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326895">
            <text:p>0.001326895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9613512">
            <text:p>0.009613512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8592098">
            <text:p>0.008592098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873417">
            <text:p>0.01873417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3168941">
            <text:p>-0.003168941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4333869">
            <text:p>-0.004333869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04643162">
            <text:p>0.0004643162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2482623">
            <text:p>0.002482623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4000633">
            <text:p>-0.004000633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8989732">
            <text:p>0.008989732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4905679">
            <text:p>0.04905679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1637543">
            <text:p>0.001637543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2250574">
            <text:p>0.002250574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9391679">
            <text:p>-0.009391679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91123">
            <text:p>0.0191123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1051582">
            <text:p>0.01051582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1104335">
            <text:p>0.01104335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4521986">
            <text:p>-0.004521986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148954">
            <text:p>0.005148954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816908">
            <text:p>0.01816908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298894">
            <text:p>0.01298894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3463766">
            <text:p>0.03463766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001361">
            <text:p>0.01001361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2355401">
            <text:p>0.02355401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4662903">
            <text:p>-0.004662903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4497323">
            <text:p>-0.004497323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17756">
            <text:p>0.0017756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9970054">
            <text:p>0.009970054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1063762">
            <text:p>-0.001063762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4998622">
            <text:p>-0.004998622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6194962">
            <text:p>0.006194962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-0.002158065">
            <text:p>-0.002158065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1116744">
            <text:p>-0.01116744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4127156">
            <text:p>-0.004127156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2241919">
            <text:p>0.02241919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463516">
            <text:p>0.01463516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4910008">
            <text:p>0.004910008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9675092">
            <text:p>-0.009675092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-0.0008162492">
            <text:p>-0.0008162492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-0.001420842">
            <text:p>-0.001420842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5941784">
            <text:p>0.005941784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5876299">
            <text:p>0.05876299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349539">
            <text:p>-0.00349539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05075051">
            <text:p>0.0005075051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1573367">
            <text:p>0.001573367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8431179">
            <text:p>-0.008431179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8785886">
            <text:p>0.008785886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1547683">
            <text:p>0.001547683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300148">
            <text:p>-0.01300148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-0.0003739049">
            <text:p>-0.0003739049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5877103">
            <text:p>0.005877103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157803">
            <text:p>-0.00157803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string">
            <text:p>6.713282E-05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7792428">
            <text:p>-0.007792428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711847">
            <text:p>0.01711847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1573262">
            <text:p>-0.001573262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9397044">
            <text:p>0.009397044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8941303">
            <text:p>0.008941303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104437">
            <text:p>0.009104437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-0.001345235">
            <text:p>-0.001345235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07934766">
            <text:p>0.007934766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8280934">
            <text:p>0.008280934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3559422">
            <text:p>0.03559422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737602">
            <text:p>0.009737602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7875605">
            <text:p>0.007875605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1025759">
            <text:p>-0.001025759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109217">
            <text:p>0.01109217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2401819">
            <text:p>0.02401819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6823449">
            <text:p>-0.006823449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2458554">
            <text:p>0.002458554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936074">
            <text:p>0.01936074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3349515">
            <text:p>0.003349515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6996596">
            <text:p>-0.006996596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273364">
            <text:p>-0.00273364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2511173">
            <text:p>-0.002511173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1582615">
            <text:p>0.001582615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8082162">
            <text:p>-0.008082162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1118254">
            <text:p>-0.01118254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881232">
            <text:p>0.02881232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08752478">
            <text:p>0.0008752478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3026939">
            <text:p>0.003026939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495925">
            <text:p>-0.00495925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3164472">
            <text:p>-0.003164472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5578716">
            <text:p>-0.005578716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93828">
            <text:p>-0.00393828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2915623">
            <text:p>-0.002915623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440261">
            <text:p>0.01440261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273635">
            <text:p>0.01273635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3342761">
            <text:p>-0.003342761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3005867">
            <text:p>0.03005867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5768187">
            <text:p>0.005768187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347453">
            <text:p>0.01347453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5730573">
            <text:p>-0.005730573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4690264">
            <text:p>-0.004690264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3444739">
            <text:p>0.003444739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1023026">
            <text:p>0.01023026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6382057">
            <text:p>-0.006382057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1072502">
            <text:p>0.01072502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2466478">
            <text:p>0.002466478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199328">
            <text:p>0.01199328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4052144">
            <text:p>0.004052144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4759358">
            <text:p>0.004759358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-0.0005245752">
            <text:p>-0.0005245752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927158">
            <text:p>0.01927158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2267685">
            <text:p>0.002267685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2082341">
            <text:p>0.02082341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7068393">
            <text:p>0.007068393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9910389">
            <text:p>0.009910389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9933515">
            <text:p>-0.009933515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2145403">
            <text:p>0.02145403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899894">
            <text:p>0.01899894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724237">
            <text:p>0.01724237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5750095">
            <text:p>-0.005750095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06508277">
            <text:p>-0.0006508277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3988998">
            <text:p>-0.003988998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4888016">
            <text:p>-0.004888016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723182">
            <text:p>0.01723182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5899278">
            <text:p>0.005899278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786398">
            <text:p>0.02786398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227738">
            <text:p>0.0227738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796899">
            <text:p>0.01796899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3030858">
            <text:p>-0.003030858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4271696">
            <text:p>-0.004271696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-0.0001018498">
            <text:p>-0.0001018498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221178">
            <text:p>0.01221178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565975">
            <text:p>0.00565975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-0.001627023">
            <text:p>-0.001627023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347378">
            <text:p>0.01347378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5135443">
            <text:p>-0.005135443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8400897">
            <text:p>0.008400897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788986">
            <text:p>0.01788986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335179">
            <text:p>0.01335179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3946328">
            <text:p>-0.003946328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9294792">
            <text:p>-0.009294792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9398627">
            <text:p>0.009398627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01316792">
            <text:p>0.0001316792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365031">
            <text:p>-0.00365031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5156946">
            <text:p>-0.005156946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02063073">
            <text:p>0.0002063073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65367">
            <text:p>0.00465367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1011483">
            <text:p>-0.01011483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1187499">
            <text:p>0.01187499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3820375">
            <text:p>-0.003820375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5533414">
            <text:p>0.005533414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5505307">
            <text:p>-0.005505307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-0.0003697961">
            <text:p>-0.0003697961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-0.000648929">
            <text:p>-0.000648929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-0.001111197">
            <text:p>-0.001111197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601453">
            <text:p>0.00601453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291787">
            <text:p>0.01291787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2882015">
            <text:p>-0.002882015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-0.0001460028">
            <text:p>-0.0001460028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685669">
            <text:p>0.02685669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8325179">
            <text:p>-0.008325179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7321566">
            <text:p>-0.007321566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2709296">
            <text:p>0.002709296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2461896">
            <text:p>-0.002461896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296201">
            <text:p>0.01296201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247027">
            <text:p>0.01247027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2850347">
            <text:p>-0.002850347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366938">
            <text:p>-0.00366938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5236921">
            <text:p>-0.005236921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250376">
            <text:p>0.00250376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2893784">
            <text:p>-0.002893784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4709487">
            <text:p>-0.004709487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85146">
            <text:p>0.00185146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282096">
            <text:p>0.01282096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3521172">
            <text:p>0.03521172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1114787">
            <text:p>-0.01114787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1066395">
            <text:p>-0.01066395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3031116">
            <text:p>0.003031116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4641005">
            <text:p>-0.004641005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5460602">
            <text:p>0.005460602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464767">
            <text:p>-0.01464767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3857214">
            <text:p>0.003857214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2680575">
            <text:p>-0.002680575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1877156">
            <text:p>0.001877156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8658964">
            <text:p>0.008658964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05972374">
            <text:p>0.0005972374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425167">
            <text:p>0.01425167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9740307">
            <text:p>-0.009740307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1574151">
            <text:p>-0.001574151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2808017">
            <text:p>-0.002808017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37536">
            <text:p>0.0237536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-0.0005069144">
            <text:p>-0.0005069144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5486201">
            <text:p>0.005486201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-0.0002212539">
            <text:p>-0.0002212539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182189">
            <text:p>0.01182189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1109204">
            <text:p>-0.01109204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1153258">
            <text:p>-0.01153258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9415953">
            <text:p>0.009415953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3412039">
            <text:p>0.003412039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842894">
            <text:p>-0.00842894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5573773">
            <text:p>-0.005573773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577844">
            <text:p>0.01577844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07077">
            <text:p>0.0107077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1154337">
            <text:p>0.01154337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8781074">
            <text:p>-0.008781074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2424462">
            <text:p>-0.002424462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466053">
            <text:p>0.00466053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471377">
            <text:p>0.003471377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6399574">
            <text:p>0.006399574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4976645">
            <text:p>0.004976645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680349">
            <text:p>0.01680349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235403">
            <text:p>-0.01235403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4237074">
            <text:p>0.004237074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168347">
            <text:p>0.00168347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31351">
            <text:p>0.0131351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1050164">
            <text:p>0.01050164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119969">
            <text:p>-0.0119969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181294">
            <text:p>0.01181294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09461866">
            <text:p>0.0009461866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1094129">
            <text:p>-0.01094129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1773234">
            <text:p>0.001773234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float" office:value="-0.001459906">
            <text:p>-0.001459906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1833176">
            <text:p>0.001833176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6103077">
            <text:p>0.006103077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078945">
            <text:p>-0.002078945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20659">
            <text:p>0.0020659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96649">
            <text:p>0.0196649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618725">
            <text:p>-0.00618725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8648465">
            <text:p>-0.008648465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863303">
            <text:p>0.01863303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248113">
            <text:p>0.01248113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2417869">
            <text:p>-0.002417869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3641148">
            <text:p>-0.003641148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4832906">
            <text:p>0.004832906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4231062">
            <text:p>0.004231062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1032567">
            <text:p>0.01032567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208489">
            <text:p>-0.00208489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6143182">
            <text:p>-0.006143182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821432">
            <text:p>0.01821432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5877647">
            <text:p>-0.005877647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5374346">
            <text:p>0.005374346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1857698">
            <text:p>0.001857698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5232175">
            <text:p>0.005232175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4591479">
            <text:p>0.004591479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4671119">
            <text:p>0.004671119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205055">
            <text:p>0.00205055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352984">
            <text:p>0.01352984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04669889">
            <text:p>0.0004669889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8420448">
            <text:p>0.008420448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3707285">
            <text:p>-0.003707285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3730033">
            <text:p>0.003730033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809684">
            <text:p>0.003809684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-0.001536244">
            <text:p>-0.001536244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1023535">
            <text:p>0.01023535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421012">
            <text:p>0.01421012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724925">
            <text:p>0.01724925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8218132">
            <text:p>-0.008218132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067323">
            <text:p>0.01067323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4626791">
            <text:p>-0.004626791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704466">
            <text:p>-0.00704466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4071306">
            <text:p>0.004071306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2992418">
            <text:p>0.002992418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-0.001046928">
            <text:p>-0.001046928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7816555">
            <text:p>-0.007816555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7085425">
            <text:p>-0.007085425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903565">
            <text:p>-0.00903565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1177574">
            <text:p>-0.01177574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-0.0001479219">
            <text:p>-0.0001479219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5905912">
            <text:p>0.005905912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3278316">
            <text:p>0.003278316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8108879">
            <text:p>0.008108879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5921518">
            <text:p>-0.005921518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2502153">
            <text:p>-0.002502153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651046">
            <text:p>0.01651046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string">
            <text:p>-1.043895E-05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2304338">
            <text:p>-0.002304338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1161661">
            <text:p>0.01161661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188735">
            <text:p>0.01188735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06725517">
            <text:p>0.0006725517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9632814">
            <text:p>0.009632814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709829">
            <text:p>-0.00709829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1661547">
            <text:p>0.001661547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1100452">
            <text:p>0.01100452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6352626">
            <text:p>-0.006352626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3175429">
            <text:p>0.003175429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74214">
            <text:p>0.0174214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440958">
            <text:p>0.005440958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207036">
            <text:p>0.00207036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1187415">
            <text:p>-0.01187415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352097">
            <text:p>0.01352097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1756106">
            <text:p>-0.001756106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2485167">
            <text:p>-0.002485167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-0.0008208989">
            <text:p>-0.0008208989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6894431">
            <text:p>0.006894431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8631399">
            <text:p>-0.008631399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488192">
            <text:p>0.01488192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355792">
            <text:p>0.01355792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1141437">
            <text:p>0.01141437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3125426">
            <text:p>0.003125426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394212">
            <text:p>0.00394212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406521">
            <text:p>-0.00406521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06469248">
            <text:p>0.0006469248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1117662">
            <text:p>-0.01117662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float" office:value="0.0003959956">
            <text:p>0.0003959956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-0.0001615313">
            <text:p>-0.0001615313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1068858">
            <text:p>0.001068858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1550114">
            <text:p>0.001550114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8736201">
            <text:p>-0.008736201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6710811">
            <text:p>-0.006710811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9137935">
            <text:p>0.009137935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1743752">
            <text:p>0.001743752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-0.001958341">
            <text:p>-0.001958341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2203315">
            <text:p>-0.002203315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3408981">
            <text:p>0.003408981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2109876">
            <text:p>0.02109876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149192">
            <text:p>0.01149192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2921708">
            <text:p>-0.002921708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2985698">
            <text:p>-0.002985698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9054423">
            <text:p>0.009054423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365696">
            <text:p>0.01365696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1577876">
            <text:p>0.001577876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-0.001006164">
            <text:p>-0.001006164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1704628">
            <text:p>-0.001704628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5853967">
            <text:p>0.005853967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42585">
            <text:p>0.00642585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7727443">
            <text:p>-0.007727443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586721">
            <text:p>0.01586721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8595134">
            <text:p>0.008595134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1342">
            <text:p>0.0051342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8280366">
            <text:p>-0.008280366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9394295">
            <text:p>-0.009394295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5920218">
            <text:p>-0.005920218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4794157">
            <text:p>-0.004794157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6696186">
            <text:p>-0.006696186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7635673">
            <text:p>0.007635673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1217222">
            <text:p>0.01217222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4099471">
            <text:p>0.004099471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05823692">
            <text:p>0.005823692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5023563">
            <text:p>-0.005023563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8061214">
            <text:p>-0.008061214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1006647">
            <text:p>-0.01006647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1059395">
            <text:p>0.01059395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3313739">
            <text:p>0.03313739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511873">
            <text:p>0.00511873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8513103">
            <text:p>0.008513103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8514906">
            <text:p>0.008514906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-0.002749385">
            <text:p>-0.002749385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1083909">
            <text:p>0.01083909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3910029">
            <text:p>0.003910029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3129759">
            <text:p>0.003129759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4181021">
            <text:p>-0.004181021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-0.001371303">
            <text:p>-0.001371303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1100818">
            <text:p>-0.001100818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1036252">
            <text:p>0.001036252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2534434">
            <text:p>-0.002534434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1144243">
            <text:p>0.01144243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3920457">
            <text:p>-0.003920457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string">
            <text:p>-4.078758E-05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515528">
            <text:p>0.01515528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777561">
            <text:p>0.01777561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2310246">
            <text:p>0.02310246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1098917">
            <text:p>0.01098917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825863">
            <text:p>-0.00825863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39932">
            <text:p>-0.0039932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1048211">
            <text:p>-0.01048211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1162365">
            <text:p>-0.01162365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-0.001362494">
            <text:p>-0.001362494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412104">
            <text:p>-0.00412104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-0.0002880362">
            <text:p>-0.0002880362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3112564">
            <text:p>-0.003112564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3338199">
            <text:p>0.003338199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9495489">
            <text:p>0.009495489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8420565">
            <text:p>-0.008420565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4126974">
            <text:p>-0.004126974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1198262">
            <text:p>-0.01198262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0.0006860188">
            <text:p>0.0006860188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1031199">
            <text:p>-0.01031199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960252">
            <text:p>-0.00960252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9411195">
            <text:p>-0.009411195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7626642">
            <text:p>-0.0007626642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4157775">
            <text:p>0.004157775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7782235">
            <text:p>0.007782235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631958">
            <text:p>-0.00631958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2452867">
            <text:p>0.002452867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7710602">
            <text:p>-0.007710602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09686223">
            <text:p>0.009686223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7562647">
            <text:p>0.007562647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2120222">
            <text:p>0.02120222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321843">
            <text:p>0.01321843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2212138">
            <text:p>0.002212138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5849297">
            <text:p>-0.005849297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1182331">
            <text:p>-0.01182331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8250053">
            <text:p>0.008250053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8220498">
            <text:p>-0.008220498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842689">
            <text:p>0.004842689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6416868">
            <text:p>-0.006416868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5586855">
            <text:p>-0.005586855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107179">
            <text:p>0.001107179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437931">
            <text:p>0.01437931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1021026">
            <text:p>-0.01021026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6969054">
            <text:p>-0.006969054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1041051">
            <text:p>-0.01041051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3163187">
            <text:p>0.003163187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7063554">
            <text:p>-0.007063554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8331719">
            <text:p>-0.008331719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8183929">
            <text:p>-0.008183929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1911066">
            <text:p>-0.001911066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1728009">
            <text:p>0.001728009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1208133">
            <text:p>-0.01208133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float" office:value="0.000617213">
            <text:p>0.000617213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6291889">
            <text:p>0.006291889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1201943">
            <text:p>-0.01201943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1165037">
            <text:p>-0.001165037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349643">
            <text:p>0.0349643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1693849">
            <text:p>-0.001693849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09698872">
            <text:p>0.0009698872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8189894">
            <text:p>-0.008189894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265527">
            <text:p>0.01265527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5972184">
            <text:p>0.005972184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6579608">
            <text:p>-0.006579608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float" office:value="-0.00110837">
            <text:p>-0.00110837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6193229">
            <text:p>-0.006193229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1104023">
            <text:p>-0.01104023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426279">
            <text:p>-0.00426279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7027004">
            <text:p>-0.007027004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5741917">
            <text:p>0.005741917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9852235">
            <text:p>0.009852235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626376">
            <text:p>-0.00626376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2427137">
            <text:p>-0.002427137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-0.002349277">
            <text:p>-0.002349277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-0.0009864552">
            <text:p>-0.0009864552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4361445">
            <text:p>-0.004361445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897487">
            <text:p>-0.00897487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3269068">
            <text:p>0.003269068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2207762">
            <text:p>-0.002207762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8603613">
            <text:p>0.008603613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1745055">
            <text:p>-0.001745055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5640575">
            <text:p>-0.005640575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3490838">
            <text:p>-0.003490838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857463">
            <text:p>-0.00857463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-0.0006102942">
            <text:p>-0.0006102942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4471326">
            <text:p>-0.004471326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317972">
            <text:p>-0.01317972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-0.001784241">
            <text:p>-0.001784241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3540939">
            <text:p>-0.003540939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07351916">
            <text:p>0.0007351916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434453">
            <text:p>0.01434453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730269">
            <text:p>0.01730269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618499">
            <text:p>-0.00618499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4008879">
            <text:p>0.004008879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8096087">
            <text:p>-0.008096087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7093709">
            <text:p>0.007093709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5290654">
            <text:p>-0.005290654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2794899">
            <text:p>0.002794899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7749863">
            <text:p>-0.007749863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7607724">
            <text:p>-0.007607724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497834">
            <text:p>-0.00497834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269028">
            <text:p>0.01269028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104909">
            <text:p>0.0104909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8714686">
            <text:p>-0.008714686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1642172">
            <text:p>-0.001642172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4140412">
            <text:p>0.004140412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-0.0002777443">
            <text:p>-0.0002777443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08983059">
            <text:p>0.0008983059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1814297">
            <text:p>0.001814297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4858457">
            <text:p>0.004858457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1113557">
            <text:p>0.01113557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8326109">
            <text:p>-0.008326109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6820973">
            <text:p>0.006820973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1238493">
            <text:p>-0.01238493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900928">
            <text:p>-0.00900928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37341">
            <text:p>-0.0037341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320785">
            <text:p>0.01320785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6898011">
            <text:p>-0.006898011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454623">
            <text:p>-0.00454623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7538426">
            <text:p>-0.007538426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203212">
            <text:p>0.01203212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7229817">
            <text:p>0.007229817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389099">
            <text:p>-0.01389099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1068825">
            <text:p>-0.01068825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222055">
            <text:p>-0.00222055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1279704">
            <text:p>-0.01279704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671384">
            <text:p>0.01671384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1973547">
            <text:p>-0.001973547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70146">
            <text:p>-0.0070146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-0.008304184">
            <text:p>-0.008304184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5539796">
            <text:p>-0.005539796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300321">
            <text:p>0.01300321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237962">
            <text:p>0.01237962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424625">
            <text:p>0.01424625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1124742">
            <text:p>0.01124742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7775582">
            <text:p>-0.007775582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9731591">
            <text:p>0.009731591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02105255">
            <text:p>0.0002105255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76838">
            <text:p>0.00476838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7198747">
            <text:p>-0.007198747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3690616">
            <text:p>0.003690616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790931">
            <text:p>0.01790931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4331378">
            <text:p>-0.004331378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717773">
            <text:p>0.00717773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4234801">
            <text:p>0.004234801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1023878">
            <text:p>0.01023878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782905">
            <text:p>0.003782905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449993">
            <text:p>0.01449993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413901">
            <text:p>0.003413901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2295971">
            <text:p>-0.002295971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1184728">
            <text:p>-0.001184728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395392">
            <text:p>0.01395392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548148">
            <text:p>0.01548148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-0.000993488">
            <text:p>-0.000993488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1597024">
            <text:p>-0.001597024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112557">
            <text:p>-0.0112557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218656">
            <text:p>0.01218656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9722653">
            <text:p>-0.009722653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214139">
            <text:p>0.01214139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233992">
            <text:p>0.01233992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1162515">
            <text:p>-0.01162515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5490213">
            <text:p>-0.005490213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832833">
            <text:p>0.01832833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81173">
            <text:p>0.01381173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7715095">
            <text:p>-0.007715095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655167">
            <text:p>0.01655167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8920964">
            <text:p>0.008920964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4164376">
            <text:p>-0.004164376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3781055">
            <text:p>0.003781055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5006772">
            <text:p>-0.005006772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1029663">
            <text:p>-0.01029663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294789">
            <text:p>0.01294789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381121">
            <text:p>-0.00381121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508907">
            <text:p>0.01508907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-0.0005972912">
            <text:p>-0.0005972912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7620996">
            <text:p>0.007620996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438194">
            <text:p>0.002438194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2007817">
            <text:p>0.002007817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2468645">
            <text:p>0.002468645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-0.000493622">
            <text:p>-0.000493622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4337719">
            <text:p>-0.004337719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6558551">
            <text:p>-0.006558551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168497">
            <text:p>0.008168497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6937063">
            <text:p>-0.006937063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612671">
            <text:p>0.01612671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251904">
            <text:p>0.004251904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1311732">
            <text:p>-0.001311732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1074606">
            <text:p>0.001074606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530538">
            <text:p>0.01530538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313312">
            <text:p>0.002313312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5064387">
            <text:p>0.005064387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1610387">
            <text:p>0.001610387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0847217">
            <text:p>0.000847217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5756339">
            <text:p>-0.005756339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9217747">
            <text:p>-0.009217747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5535816">
            <text:p>0.005535816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4274171">
            <text:p>0.004274171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float" office:value="-0.001249084">
            <text:p>-0.001249084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1061549">
            <text:p>-0.01061549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2711031">
            <text:p>0.002711031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2113088">
            <text:p>-0.002113088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-0.0002707875">
            <text:p>-0.0002707875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3205385">
            <text:p>-0.003205385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3155493">
            <text:p>0.003155493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3568625">
            <text:p>-0.003568625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462679">
            <text:p>0.01462679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3861102">
            <text:p>-0.003861102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4881529">
            <text:p>-0.004881529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2113156">
            <text:p>-0.002113156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3286633">
            <text:p>-0.003286633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571846">
            <text:p>0.01571846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-0.001125836">
            <text:p>-0.001125836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-0.0003095029">
            <text:p>-0.0003095029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31129">
            <text:p>0.00131129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3354903">
            <text:p>-0.003354903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605395">
            <text:p>0.01605395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-0.0002403234">
            <text:p>-0.0002403234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-0.00123129">
            <text:p>-0.00123129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890253">
            <text:p>-0.00890253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764948">
            <text:p>0.01764948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2839778">
            <text:p>-0.002839778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327595">
            <text:p>0.01327595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1130266">
            <text:p>-0.01130266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3860702">
            <text:p>0.003860702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1165169">
            <text:p>-0.01165169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336927">
            <text:p>0.01336927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734396">
            <text:p>0.002734396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9271507">
            <text:p>-0.009271507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-0.001195157">
            <text:p>-0.001195157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834352">
            <text:p>0.01834352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280397">
            <text:p>0.01280397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4595798">
            <text:p>-0.004595798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9675122">
            <text:p>-0.009675122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1487197">
            <text:p>-0.001487197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-0.0008056483">
            <text:p>-0.0008056483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3785683">
            <text:p>0.003785683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54494">
            <text:p>0.0154494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5347685">
            <text:p>-0.005347685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357739">
            <text:p>-0.00357739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7926042">
            <text:p>-0.007926042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1156511">
            <text:p>-0.01156511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05801253">
            <text:p>0.0005801253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7999382">
            <text:p>-0.007999382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44733">
            <text:p>0.0144733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497912">
            <text:p>0.02497912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8299942">
            <text:p>-0.008299942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708933">
            <text:p>0.001708933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5767931">
            <text:p>0.005767931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1831097">
            <text:p>-0.001831097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9391665">
            <text:p>-0.009391665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784241">
            <text:p>0.003784241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4376467">
            <text:p>-0.004376467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8392399">
            <text:p>0.008392399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4406821">
            <text:p>-0.004406821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1034014">
            <text:p>0.01034014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4359629">
            <text:p>-0.004359629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1005199">
            <text:p>-0.01005199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4176605">
            <text:p>-0.004176605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801869">
            <text:p>-0.00801869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5039214">
            <text:p>0.05039214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481311">
            <text:p>-0.00481311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2403384">
            <text:p>0.002403384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407379">
            <text:p>0.002407379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5474536">
            <text:p>0.05474536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-0.002153605">
            <text:p>-0.002153605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2119303">
            <text:p>-0.002119303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6913032">
            <text:p>-0.006913032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9290792">
            <text:p>-0.009290792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4326944">
            <text:p>-0.004326944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402653">
            <text:p>0.01402653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5106987">
            <text:p>-0.005106987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01576274">
            <text:p>0.0001576274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5604137">
            <text:p>-0.005604137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6492498">
            <text:p>0.006492498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2397049">
            <text:p>0.002397049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3701833">
            <text:p>-0.003701833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5889824">
            <text:p>0.005889824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4804804">
            <text:p>-0.004804804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1745786">
            <text:p>0.001745786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01181045">
            <text:p>0.0001181045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5530802">
            <text:p>0.005530802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4657859">
            <text:p>-0.004657859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128611">
            <text:p>-0.00128611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4369793">
            <text:p>-0.004369793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2435617">
            <text:p>-0.002435617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3010794">
            <text:p>-0.003010794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7931816">
            <text:p>-0.007931816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7556119">
            <text:p>-0.007556119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4438522">
            <text:p>-0.004438522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2388974">
            <text:p>0.02388974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4370061">
            <text:p>-0.004370061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807239">
            <text:p>0.01807239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5479289">
            <text:p>-0.005479289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9722802">
            <text:p>0.009722802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-0.001120107">
            <text:p>-0.001120107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423668">
            <text:p>-0.00423668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8677883">
            <text:p>-0.008677883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4039499">
            <text:p>-0.004039499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772204">
            <text:p>-0.00772204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float" office:value="-0.0009629845">
            <text:p>-0.0009629845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3491312">
            <text:p>-0.003491312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2334655">
            <text:p>0.002334655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3618058">
            <text:p>-0.003618058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6107875">
            <text:p>0.006107875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5279263">
            <text:p>-0.005279263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6273029">
            <text:p>0.006273029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7500196">
            <text:p>0.007500196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2095734">
            <text:p>-0.002095734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4107778">
            <text:p>0.004107778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4596227">
            <text:p>0.004596227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0541646">
            <text:p>0.000541646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3273653">
            <text:p>-0.003273653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-0.001371222">
            <text:p>-0.001371222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4436833">
            <text:p>-0.004436833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06535036">
            <text:p>0.0006535036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1014826">
            <text:p>0.001014826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7558619">
            <text:p>-0.007558619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1154595">
            <text:p>0.01154595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2718871">
            <text:p>-0.002718871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2762283">
            <text:p>-0.002762283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string">
            <text:p>6.023634E-05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6827587">
            <text:p>0.006827587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337853">
            <text:p>0.005337853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3931866">
            <text:p>0.003931866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506342">
            <text:p>0.01506342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2029308">
            <text:p>0.002029308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321209">
            <text:p>0.01321209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1977238">
            <text:p>-0.001977238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8112847">
            <text:p>-0.008112847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1898752">
            <text:p>0.001898752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9475729">
            <text:p>-0.009475729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2050927">
            <text:p>0.002050927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3839394">
            <text:p>-0.003839394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1545455">
            <text:p>-0.001545455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2706568">
            <text:p>-0.002706568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1089034">
            <text:p>-0.01089034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1009925">
            <text:p>0.01009925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1172637">
            <text:p>-0.01172637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5566118">
            <text:p>0.005566118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5361071">
            <text:p>0.005361071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38122">
            <text:p>0.0038122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1053276">
            <text:p>-0.01053276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24426">
            <text:p>0.0024426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628582">
            <text:p>0.01628582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674506">
            <text:p>-0.00674506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-0.0004515002">
            <text:p>-0.0004515002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string">
            <text:p>9.060336E-05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09635079">
            <text:p>0.009635079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4260972">
            <text:p>-0.004260972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3321351">
            <text:p>-0.003321351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4342584">
            <text:p>-0.004342584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870856">
            <text:p>0.01870856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9381329">
            <text:p>-0.009381329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65374">
            <text:p>0.0065374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-0.0008228651">
            <text:p>-0.0008228651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8085223">
            <text:p>-0.008085223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01142891">
            <text:p>0.0001142891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8071845">
            <text:p>-0.008071845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9544265">
            <text:p>-0.009544265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6336983">
            <text:p>-0.006336983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07611946">
            <text:p>0.0007611946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5768984">
            <text:p>-0.005768984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923149">
            <text:p>0.01923149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3558286">
            <text:p>0.003558286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3104313">
            <text:p>-0.003104313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8786331">
            <text:p>0.008786331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4038947">
            <text:p>-0.004038947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461738">
            <text:p>0.01461738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5479193">
            <text:p>0.005479193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9407008">
            <text:p>0.009407008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2783618">
            <text:p>0.002783618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2272392">
            <text:p>0.02272392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1346367">
            <text:p>-0.01346367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2962487">
            <text:p>-0.002962487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6429426">
            <text:p>-0.006429426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1638129">
            <text:p>-0.001638129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5075425">
            <text:p>-0.005075425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3473338">
            <text:p>-0.003473338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7442028">
            <text:p>-0.007442028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1314019">
            <text:p>0.001314019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1621068">
            <text:p>0.001621068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1106238">
            <text:p>-0.01106238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36909">
            <text:p>-0.0036909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8446259">
            <text:p>-0.008446259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06789001">
            <text:p>0.0006789001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1111147">
            <text:p>-0.001111147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1139217">
            <text:p>0.001139217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3298009">
            <text:p>-0.003298009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555333">
            <text:p>0.003555333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2309475">
            <text:p>0.002309475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4260817">
            <text:p>-0.004260817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2193484">
            <text:p>0.02193484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8759661">
            <text:p>0.008759661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4978724">
            <text:p>-0.004978724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319641">
            <text:p>0.00319641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3169717">
            <text:p>0.03169717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818812">
            <text:p>0.006818812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577911">
            <text:p>0.01577911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7513186">
            <text:p>0.007513186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3551407">
            <text:p>0.003551407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907851">
            <text:p>0.02907851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234936">
            <text:p>0.00234936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569283">
            <text:p>0.02569283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-0.0003219753">
            <text:p>-0.0003219753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1393039">
            <text:p>0.001393039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1075293">
            <text:p>0.001075293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103745">
            <text:p>-0.0103745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8871983">
            <text:p>0.008871983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07052896">
            <text:p>0.0007052896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107572">
            <text:p>-0.0107572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3179241">
            <text:p>-0.003179241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-0.001709035">
            <text:p>-0.001709035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3120967">
            <text:p>-0.003120967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1139827">
            <text:p>-0.01139827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8308495">
            <text:p>-0.008308495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-0.001377916">
            <text:p>-0.001377916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-0.0008335671">
            <text:p>-0.0008335671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3830397">
            <text:p>-0.003830397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2714561">
            <text:p>-0.002714561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8984532">
            <text:p>-0.008984532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1498189">
            <text:p>0.001498189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2085429">
            <text:p>0.002085429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4239371">
            <text:p>-0.004239371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33294">
            <text:p>0.01233294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01309263">
            <text:p>0.0001309263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9778738">
            <text:p>0.009778738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1241257">
            <text:p>-0.01241257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6798932">
            <text:p>0.006798932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639709">
            <text:p>-0.00639709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32974">
            <text:p>-0.0032974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275297">
            <text:p>0.004275297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2700452">
            <text:p>0.002700452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-0.0007671553">
            <text:p>-0.0007671553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4709621">
            <text:p>-0.004709621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4112133">
            <text:p>-0.004112133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5270946">
            <text:p>-0.005270946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-0.0009555975">
            <text:p>-0.0009555975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797077">
            <text:p>-0.00797077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701851">
            <text:p>0.00701851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6064256">
            <text:p>-0.006064256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1224484">
            <text:p>-0.01224484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1135239">
            <text:p>-0.01135239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-0.001386583">
            <text:p>-0.001386583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5636605">
            <text:p>-0.005636605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1631851">
            <text:p>0.0001631851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5227968">
            <text:p>-0.005227968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6217308">
            <text:p>-0.006217308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05033825">
            <text:p>0.0005033825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5408737">
            <text:p>-0.005408737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7781866">
            <text:p>-0.007781866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37837">
            <text:p>0.0137837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2418892">
            <text:p>0.002418892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2297167">
            <text:p>0.02297167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1257765">
            <text:p>-0.01257765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7487015">
            <text:p>-0.007487015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02306854">
            <text:p>0.0002306854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1395632">
            <text:p>0.001395632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825547">
            <text:p>-0.01825547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1009504">
            <text:p>-0.01009504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3492481">
            <text:p>0.03492481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724234">
            <text:p>0.01724234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191409">
            <text:p>0.005191409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501509">
            <text:p>0.00501509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-0.0007949445">
            <text:p>-0.0007949445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-0.0004080309">
            <text:p>-0.0004080309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0376596">
            <text:p>0.000376596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4268644">
            <text:p>0.004268644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7229381">
            <text:p>-0.007229381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1056838">
            <text:p>-0.01056838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8461109">
            <text:p>-0.008461109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-0.001915608">
            <text:p>-0.001915608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1161749">
            <text:p>0.01161749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5784902">
            <text:p>0.005784902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9424749">
            <text:p>0.009424749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0617275">
            <text:p>0.000617275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41363">
            <text:p>0.0141363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4899048">
            <text:p>-0.004899048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-0.0002835937">
            <text:p>-0.0002835937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9649883">
            <text:p>-0.009649883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8366167">
            <text:p>-0.008366167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7049509">
            <text:p>-0.007049509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1634227">
            <text:p>0.001634227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4688033">
            <text:p>0.004688033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5599338">
            <text:p>0.005599338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465409">
            <text:p>0.01465409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4318449">
            <text:p>-0.004318449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590761">
            <text:p>-0.00590761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1367702">
            <text:p>0.001367702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245314">
            <text:p>0.01245314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1115652">
            <text:p>-0.01115652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4421642">
            <text:p>0.004421642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442814">
            <text:p>-0.00442814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9030796">
            <text:p>0.009030796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633919">
            <text:p>0.00633919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3116884">
            <text:p>-0.003116884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44305">
            <text:p>0.0244305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4933387">
            <text:p>-0.004933387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101788">
            <text:p>-0.0101788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1061338">
            <text:p>-0.01061338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9011372">
            <text:p>0.009011372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9138833">
            <text:p>-0.009138833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317353">
            <text:p>0.01317353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6820567">
            <text:p>0.006820567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3396327">
            <text:p>-0.003396327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6059585">
            <text:p>-0.006059585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843986">
            <text:p>0.002843986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114682">
            <text:p>-0.0114682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152886">
            <text:p>0.01152886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1229065">
            <text:p>-0.001229065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5017181">
            <text:p>-0.005017181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1242756">
            <text:p>-0.01242756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4482056">
            <text:p>0.004482056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1170949">
            <text:p>0.01170949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652243">
            <text:p>0.00652243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6434227">
            <text:p>-0.006434227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2541343">
            <text:p>0.002541343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-0.002388351">
            <text:p>-0.002388351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8650473">
            <text:p>-0.008650473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4285022">
            <text:p>-0.004285022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77822">
            <text:p>0.0177822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6535044">
            <text:p>-0.006535044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4076076">
            <text:p>-0.004076076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620879">
            <text:p>-0.01620879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2731938">
            <text:p>-0.002731938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699048">
            <text:p>0.005699048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692228">
            <text:p>0.005692228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5286063">
            <text:p>-0.005286063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8099354">
            <text:p>-0.008099354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3590048">
            <text:p>0.003590048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256415">
            <text:p>0.01256415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5967385">
            <text:p>-0.005967385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1120429">
            <text:p>0.01120429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-0.002016164">
            <text:p>-0.002016164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3445768">
            <text:p>-0.003445768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2508605">
            <text:p>0.002508605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8087314">
            <text:p>0.008087314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902028">
            <text:p>0.00902028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5019447">
            <text:p>-0.005019447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5710006">
            <text:p>-0.005710006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264417">
            <text:p>0.00264417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2207775">
            <text:p>0.002207775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06727348">
            <text:p>0.0006727348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1087551">
            <text:p>-0.01087551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2596875">
            <text:p>0.002596875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438581">
            <text:p>0.00438581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6383767">
            <text:p>-0.006383767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1126869">
            <text:p>-0.01126869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3587995">
            <text:p>-0.003587995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9613748">
            <text:p>0.009613748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3342326">
            <text:p>-0.003342326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7605737">
            <text:p>-0.007605737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5761296">
            <text:p>-0.005761296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3347648">
            <text:p>0.003347648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string">
            <text:p>5.798779E-05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8504068">
            <text:p>0.008504068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8672024">
            <text:p>-0.008672024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5996394">
            <text:p>-0.005996394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8323442">
            <text:p>-0.008323442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2014525">
            <text:p>0.02014525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948254">
            <text:p>0.02948254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0.0002902742">
            <text:p>0.0002902742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625549">
            <text:p>-0.00625549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847856">
            <text:p>0.00847856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-0.001809733">
            <text:p>-0.001809733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8805108">
            <text:p>0.008805108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1014899">
            <text:p>0.01014899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4873016">
            <text:p>-0.004873016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345529">
            <text:p>0.01345529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4443058">
            <text:p>-0.004443058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4705089">
            <text:p>0.0004705089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3565681">
            <text:p>-0.003565681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219239">
            <text:p>0.006219239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1384621">
            <text:p>-0.001384621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4507801">
            <text:p>-0.004507801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7523865">
            <text:p>-0.007523865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3959156">
            <text:p>0.003959156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5355181">
            <text:p>-0.005355181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2306267">
            <text:p>-0.002306267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5120081">
            <text:p>-0.005120081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9615773">
            <text:p>0.009615773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1226169">
            <text:p>0.01226169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7581584">
            <text:p>0.007581584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2248592">
            <text:p>0.02248592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7929637">
            <text:p>-0.007929637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3187449">
            <text:p>-0.003187449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06580092">
            <text:p>0.0006580092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3693266">
            <text:p>0.003693266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5348406">
            <text:p>-0.005348406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369397">
            <text:p>0.01369397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906902">
            <text:p>0.01906902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57516">
            <text:p>0.00857516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2368861">
            <text:p>0.002368861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4015439">
            <text:p>0.004015439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175877">
            <text:p>-0.001175877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50472">
            <text:p>0.0050472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3643631">
            <text:p>-0.003643631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4701229">
            <text:p>-0.004701229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6057412">
            <text:p>-0.006057412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756062">
            <text:p>0.01756062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0741444">
            <text:p>-0.000741444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3327521">
            <text:p>0.003327521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8256376">
            <text:p>-0.008256376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7325957">
            <text:p>-0.007325957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2537911">
            <text:p>0.02537911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554815">
            <text:p>-0.00554815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3746784">
            <text:p>-0.003746784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5672628">
            <text:p>-0.005672628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553647">
            <text:p>0.002553647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3864802">
            <text:p>-0.003864802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1963258">
            <text:p>-0.001963258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708903">
            <text:p>0.006708903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9647642">
            <text:p>-0.009647642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8645884">
            <text:p>-0.008645884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5559022">
            <text:p>-0.005559022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416429">
            <text:p>0.01416429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1990782">
            <text:p>0.001990782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1125333">
            <text:p>-0.01125333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4009437">
            <text:p>0.004009437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3082283">
            <text:p>-0.003082283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3027152">
            <text:p>0.03027152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07929914">
            <text:p>-0.0007929914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2031049">
            <text:p>-0.002031049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6195811">
            <text:p>0.006195811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2530687">
            <text:p>0.002530687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1071985">
            <text:p>-0.01071985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6191249">
            <text:p>0.006191249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3497348">
            <text:p>0.003497348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1178544">
            <text:p>-0.001178544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4155277">
            <text:p>0.004155277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4743768">
            <text:p>0.004743768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-0.0001506515">
            <text:p>-0.0001506515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1583962">
            <text:p>-0.001583962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6449097">
            <text:p>0.006449097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4056731">
            <text:p>-0.004056731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663188">
            <text:p>0.01663188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4717124">
            <text:p>0.004717124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6255256">
            <text:p>-0.006255256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1051847">
            <text:p>-0.01051847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09412958">
            <text:p>-0.0009412958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8456605">
            <text:p>0.008456605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9344324">
            <text:p>-0.009344324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292411">
            <text:p>-0.01292411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3041439">
            <text:p>-0.003041439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3078434">
            <text:p>0.003078434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100972">
            <text:p>-0.0100972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7577855">
            <text:p>-0.007577855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4946265">
            <text:p>0.004946265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2365497">
            <text:p>0.02365497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4707863">
            <text:p>-0.004707863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9489452">
            <text:p>-0.009489452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7786003">
            <text:p>-0.007786003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6932926">
            <text:p>0.06932926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string">
            <text:p>4.078116E-05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3258871">
            <text:p>-0.003258871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8466882">
            <text:p>0.008466882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376302">
            <text:p>0.0376302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0.0003441338">
            <text:p>0.0003441338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767221">
            <text:p>-0.01767221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2519017">
            <text:p>0.02519017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257405">
            <text:p>0.01257405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2030879">
            <text:p>-0.002030879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0511802">
            <text:p>-0.000511802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6558911">
            <text:p>0.006558911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float" office:value="-0.001061991">
            <text:p>-0.001061991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0.002452524">
            <text:p>0.002452524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2028243">
            <text:p>0.02028243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2117217">
            <text:p>0.002117217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7209777">
            <text:p>0.007209777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1099386">
            <text:p>-0.01099386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2854422">
            <text:p>0.002854422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1156363">
            <text:p>0.01156363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6187194">
            <text:p>-0.006187194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0.001103274">
            <text:p>0.001103274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2602807">
            <text:p>0.02602807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3293606">
            <text:p>0.003293606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2415338">
            <text:p>-0.002415338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0.001728748">
            <text:p>0.001728748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1308806">
            <text:p>-0.001308806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1018606">
            <text:p>0.01018606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5662189">
            <text:p>0.005662189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3925383">
            <text:p>-0.003925383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0.000120331">
            <text:p>0.000120331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5268628">
            <text:p>0.005268628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552701">
            <text:p>-0.00552701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952151">
            <text:p>-0.00952151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4627805">
            <text:p>0.004627805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365616">
            <text:p>-0.00365616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5812678">
            <text:p>0.005812678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3337331">
            <text:p>0.03337331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2938571">
            <text:p>-0.002938571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0.000948547">
            <text:p>0.000948547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3241707">
            <text:p>0.003241707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3804229">
            <text:p>-0.003804229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0.0001421327">
            <text:p>0.0001421327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7818644">
            <text:p>0.007818644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9932159">
            <text:p>0.009932159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125489">
            <text:p>-0.00125489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08612782">
            <text:p>-0.008612782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8403802">
            <text:p>0.008403802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0.001173918">
            <text:p>0.001173918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5215078">
            <text:p>-0.005215078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407189">
            <text:p>0.00407189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2517001">
            <text:p>0.002517001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6061744">
            <text:p>0.006061744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2310851">
            <text:p>-0.002310851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0.002758077">
            <text:p>0.002758077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7547359">
            <text:p>0.007547359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5984943">
            <text:p>0.005984943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2663147">
            <text:p>-0.002663147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4810835">
            <text:p>0.004810835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781644">
            <text:p>0.01781644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1220469">
            <text:p>-0.001220469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0.0008558834">
            <text:p>0.0008558834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05068053">
            <text:p>-0.0005068053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931334">
            <text:p>0.01931334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5189773">
            <text:p>0.005189773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7495677">
            <text:p>0.007495677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130209">
            <text:p>0.0130209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2689271">
            <text:p>0.002689271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6199787">
            <text:p>0.006199787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3432927">
            <text:p>-0.003432927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6415166">
            <text:p>-0.006415166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4583543">
            <text:p>-0.004583543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641086">
            <text:p>0.01641086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5241163">
            <text:p>-0.005241163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0.001634199">
            <text:p>0.001634199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9942002">
            <text:p>0.009942002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1452786">
            <text:p>0.01452786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1678666">
            <text:p>0.01678666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595434">
            <text:p>-0.00595434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0.0007375957">
            <text:p>0.0007375957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0.0001295199">
            <text:p>0.0001295199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09258143">
            <text:p>-0.009258143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0.003979602">
            <text:p>0.003979602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200419">
            <text:p>0.0200419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4134352">
            <text:p>0.004134352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1463506">
            <text:p>0.01463506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08957966">
            <text:p>-0.008957966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1088603">
            <text:p>0.01088603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1404188">
            <text:p>-0.001404188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0.001349769">
            <text:p>0.001349769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144494">
            <text:p>-0.01144494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1004087">
            <text:p>0.01004087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6337458">
            <text:p>0.006337458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0.004453762">
            <text:p>0.004453762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09871484">
            <text:p>-0.009871484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1270984">
            <text:p>0.01270984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4004137">
            <text:p>-0.004004137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0.002534822">
            <text:p>0.002534822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191157">
            <text:p>-0.01191157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0.003758044">
            <text:p>0.003758044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66583">
            <text:p>0.0166583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5972505">
            <text:p>0.005972505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02535">
            <text:p>-0.0102535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1193926">
            <text:p>0.01193926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1502639">
            <text:p>0.01502639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5258219">
            <text:p>-0.005258219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0.0005867301">
            <text:p>0.0005867301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6102557">
            <text:p>0.006102557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1181432">
            <text:p>0.01181432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08570795">
            <text:p>-0.008570795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8005119">
            <text:p>0.008005119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1343136">
            <text:p>0.01343136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1045181">
            <text:p>0.01045181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1476757">
            <text:p>0.01476757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3669773">
            <text:p>-0.003669773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0.0001852087">
            <text:p>0.0001852087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1056137">
            <text:p>0.01056137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08380747">
            <text:p>-0.008380747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0.0001789653">
            <text:p>0.0001789653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2139575">
            <text:p>0.02139575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459348">
            <text:p>-0.00459348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02727082">
            <text:p>-0.0002727082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02064175">
            <text:p>-0.0002064175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5699002">
            <text:p>0.005699002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string">
            <text:p>5.561884E-05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08981728">
            <text:p>-0.008981728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370882">
            <text:p>-0.01370882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1102583">
            <text:p>0.01102583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1308906">
            <text:p>0.01308906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277924">
            <text:p>-0.00277924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0.0005952321">
            <text:p>0.0005952321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1443327">
            <text:p>0.01443327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670306">
            <text:p>0.01670306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4911924">
            <text:p>-0.004911924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23169">
            <text:p>-0.0023169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1092288">
            <text:p>0.01092288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1225268">
            <text:p>0.01225268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07267691">
            <text:p>-0.007267691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08241418">
            <text:p>-0.008241418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43046">
            <text:p>0.0143046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0.001046862">
            <text:p>0.001046862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4716064">
            <text:p>-0.004716064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2158768">
            <text:p>-0.002158768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3048834">
            <text:p>-0.003048834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1195653">
            <text:p>0.01195653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03125524">
            <text:p>-0.003125524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31906">
            <text:p>-0.0131906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983276">
            <text:p>0.01983276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0.002534698">
            <text:p>0.002534698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09047973">
            <text:p>-0.009047973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131433">
            <text:p>0.0131433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602114">
            <text:p>0.00602114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5139763">
            <text:p>0.005139763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268306">
            <text:p>-0.01268306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2396702">
            <text:p>0.02396702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1277774">
            <text:p>0.01277774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530684">
            <text:p>0.01530684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0.00131188">
            <text:p>0.00131188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0.001878756">
            <text:p>0.001878756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1293802">
            <text:p>-0.001293802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1049272">
            <text:p>0.01049272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786007">
            <text:p>0.01786007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2966456">
            <text:p>0.002966456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1034635">
            <text:p>0.01034635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96108">
            <text:p>0.0196108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4651715">
            <text:p>-0.004651715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0.0008705051">
            <text:p>0.0008705051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39879">
            <text:p>0.0139879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4164926">
            <text:p>0.04164926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1600867">
            <text:p>0.01600867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5707261">
            <text:p>-0.005707261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5718462">
            <text:p>0.005718462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08077582">
            <text:p>-0.0008077582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9852146">
            <text:p>0.009852146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4232655">
            <text:p>-0.004232655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109168">
            <text:p>0.0109168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4361739">
            <text:p>0.04361739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890644">
            <text:p>0.01890644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085158">
            <text:p>-0.01085158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3570711">
            <text:p>-0.003570711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182482">
            <text:p>0.01182482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091145">
            <text:p>-0.00091145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1133914">
            <text:p>0.01133914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676524">
            <text:p>0.01676524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0.002188637">
            <text:p>0.002188637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111397">
            <text:p>-0.01111397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string">
            <text:p>-8.787396E-05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7380108">
            <text:p>0.007380108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0.0005035237">
            <text:p>0.0005035237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09410361">
            <text:p>-0.009410361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1024562">
            <text:p>0.01024562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3526342">
            <text:p>0.003526342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1043313">
            <text:p>0.01043313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1250721">
            <text:p>-0.001250721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7720036">
            <text:p>0.007720036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1461711">
            <text:p>0.001461711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1331761">
            <text:p>0.01331761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0.0003351945">
            <text:p>0.0003351945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3684234">
            <text:p>0.003684234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465852">
            <text:p>0.01465852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7298018">
            <text:p>-0.007298018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4379047">
            <text:p>-0.004379047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9073372">
            <text:p>0.009073372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6943345">
            <text:p>0.006943345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7332792">
            <text:p>-0.007332792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79566">
            <text:p>0.0179566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8972871">
            <text:p>0.008972871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6169721">
            <text:p>0.006169721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03690458">
            <text:p>-0.0003690458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150254">
            <text:p>-0.01150254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1791225">
            <text:p>0.001791225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4438431">
            <text:p>-0.004438431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5814323">
            <text:p>-0.005814323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09860236">
            <text:p>-0.009860236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7367008">
            <text:p>0.007367008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4503894">
            <text:p>-0.004503894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1599733">
            <text:p>-0.001599733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6708988">
            <text:p>-0.006708988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470781">
            <text:p>0.00470781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720611">
            <text:p>0.01720611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5978455">
            <text:p>-0.005978455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296069">
            <text:p>-0.01296069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8547469">
            <text:p>-0.008547469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2476476">
            <text:p>0.002476476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3185907">
            <text:p>-0.003185907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6463307">
            <text:p>-0.006463307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4671114">
            <text:p>0.004671114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5449779">
            <text:p>0.005449779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07759301">
            <text:p>-0.0007759301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09523686">
            <text:p>-0.009523686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955403">
            <text:p>0.01955403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3335933">
            <text:p>-0.003335933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291931">
            <text:p>-0.01291931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600674">
            <text:p>0.00600674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904402">
            <text:p>0.02904402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137179">
            <text:p>-0.00137179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5267142">
            <text:p>-0.005267142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1134553">
            <text:p>0.01134553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4759805">
            <text:p>-0.004759805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3033004">
            <text:p>0.003033004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5593379">
            <text:p>-0.005593379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8828848">
            <text:p>-0.008828848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1629479">
            <text:p>0.001629479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1130906">
            <text:p>-0.01130906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5879029">
            <text:p>-0.005879029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841764">
            <text:p>-0.00841764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1235589">
            <text:p>-0.001235589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1077433">
            <text:p>0.01077433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1534505">
            <text:p>-0.001534505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3353043">
            <text:p>-0.003353043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-0.00129141">
            <text:p>-0.00129141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8669866">
            <text:p>-0.008669866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7025256">
            <text:p>-0.007025256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5219723">
            <text:p>-0.005219723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959654">
            <text:p>0.02959654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06624231">
            <text:p>-0.0006624231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4993548">
            <text:p>0.004993548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1276245">
            <text:p>0.01276245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1020421">
            <text:p>0.01020421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1070071">
            <text:p>0.01070071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2497864">
            <text:p>0.002497864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5036637">
            <text:p>-0.005036637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4473454">
            <text:p>-0.004473454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5472971">
            <text:p>0.005472971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1159676">
            <text:p>-0.01159676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5935428">
            <text:p>0.005935428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6064645">
            <text:p>0.006064645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-0.001315774">
            <text:p>-0.001315774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101524">
            <text:p>-0.0101524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1346608">
            <text:p>0.01346608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5114473">
            <text:p>0.05114473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08422334">
            <text:p>0.0008422334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2086479">
            <text:p>0.02086479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293746">
            <text:p>-0.01293746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7977383">
            <text:p>0.007977383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3158037">
            <text:p>0.003158037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2127716">
            <text:p>0.02127716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0.0004039839">
            <text:p>0.0004039839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2231181">
            <text:p>0.02231181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649003">
            <text:p>0.01649003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7517871">
            <text:p>0.007517871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922608">
            <text:p>-0.00922608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3276077">
            <text:p>0.003276077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1615043">
            <text:p>0.001615043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45078">
            <text:p>-0.0145078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1152409">
            <text:p>-0.01152409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8817956">
            <text:p>0.008817956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-0.002502022">
            <text:p>-0.002502022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8245288">
            <text:p>-0.008245288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292572">
            <text:p>-0.01292572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521101">
            <text:p>0.01521101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5328868">
            <text:p>0.005328868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571879">
            <text:p>-0.00571879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2541239">
            <text:p>-0.002541239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908238">
            <text:p>0.01908238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3020479">
            <text:p>0.03020479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4995975">
            <text:p>-0.004995975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3880222">
            <text:p>0.003880222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2117569">
            <text:p>0.002117569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2172992">
            <text:p>0.02172992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673563">
            <text:p>0.02673563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433796">
            <text:p>-0.01433796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6113936">
            <text:p>0.006113936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588151">
            <text:p>-0.00588151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9585267">
            <text:p>-0.009585267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7974772">
            <text:p>-0.007974772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4394645">
            <text:p>0.004394645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8503928">
            <text:p>-0.008503928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624484">
            <text:p>-0.00624484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2202927">
            <text:p>0.002202927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8686786">
            <text:p>0.008686786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1094027">
            <text:p>0.001094027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1145163">
            <text:p>-0.01145163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251738">
            <text:p>-0.01251738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03717099">
            <text:p>0.0003717099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7495854">
            <text:p>0.007495854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80986">
            <text:p>0.0080986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386286">
            <text:p>-0.01386286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627549">
            <text:p>0.01627549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-0.001244066">
            <text:p>-0.001244066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9679438">
            <text:p>-0.009679438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7073879">
            <text:p>-0.007073879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681313">
            <text:p>0.01681313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02087171">
            <text:p>0.0002087171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457225">
            <text:p>-0.01457225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9028783">
            <text:p>-0.009028783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693298">
            <text:p>0.01693298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1032116">
            <text:p>-0.01032116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5043266">
            <text:p>-0.005043266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466153">
            <text:p>-0.01466153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8298318">
            <text:p>-0.008298318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161472">
            <text:p>0.01161472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505227">
            <text:p>-0.01505227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5783056">
            <text:p>-0.005783056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2839481">
            <text:p>0.002839481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-0.0004943295">
            <text:p>-0.0004943295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264183">
            <text:p>-0.01264183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7598502">
            <text:p>-0.007598502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255882">
            <text:p>0.01255882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4307501">
            <text:p>-0.004307501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6424795">
            <text:p>-0.006424795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426502">
            <text:p>-0.01426502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4874965">
            <text:p>-0.004874965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219397">
            <text:p>0.0219397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1095932">
            <text:p>-0.01095932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7792453">
            <text:p>-0.007792453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03200102">
            <text:p>0.0003200102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01630661">
            <text:p>0.0001630661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6874916">
            <text:p>-0.006874916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4194634">
            <text:p>-0.004194634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1865792">
            <text:p>0.001865792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508837">
            <text:p>0.01508837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5638804">
            <text:p>-0.005638804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5526795">
            <text:p>-0.005526795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6868662">
            <text:p>0.006868662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5881608">
            <text:p>-0.005881608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1157982">
            <text:p>-0.01157982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7270064">
            <text:p>-0.007270064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-0.000833374">
            <text:p>-0.000833374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224671">
            <text:p>0.00224671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4698126">
            <text:p>0.004698126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1336192">
            <text:p>-0.01336192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7410237">
            <text:p>-0.007410237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1575745">
            <text:p>0.001575745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1220376">
            <text:p>-0.01220376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5686215">
            <text:p>-0.005686215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-0.005060406">
            <text:p>-0.005060406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622719">
            <text:p>0.01622719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9555505">
            <text:p>-0.009555505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358346">
            <text:p>-0.00358346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297787">
            <text:p>0.01297787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837524">
            <text:p>0.01837524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7706329">
            <text:p>-0.007706329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3573116">
            <text:p>0.003573116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7020332">
            <text:p>-0.007020332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0864864">
            <text:p>0.00864864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177646">
            <text:p>-0.0177646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0.0003510527">
            <text:p>0.0003510527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2835827">
            <text:p>0.002835827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08872349">
            <text:p>0.008872349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-0.002547284">
            <text:p>-0.002547284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1076141">
            <text:p>-0.01076141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003373927">
            <text:p>0.0003373927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640799">
            <text:p>0.01640799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1346565">
            <text:p>-0.01346565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753316">
            <text:p>-0.01753316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07373384">
            <text:p>0.007373384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-0.002145508">
            <text:p>-0.002145508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-0.003375229">
            <text:p>-0.003375229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1297366">
            <text:p>-0.01297366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-0.003405025">
            <text:p>-0.003405025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3252732">
            <text:p>0.003252732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1605372">
            <text:p>-0.01605372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6055408">
            <text:p>-0.006055408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266022">
            <text:p>0.01266022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string">
            <text:p>4.116828E-05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08059708">
            <text:p>0.008059708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09832056">
            <text:p>-0.009832056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-0.00270813">
            <text:p>-0.00270813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467027">
            <text:p>0.02467027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140078">
            <text:p>-0.0140078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1113349">
            <text:p>-0.01113349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2307258">
            <text:p>0.02307258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-0.0007398811">
            <text:p>-0.0007398811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-0.003289954">
            <text:p>-0.003289954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-0.002010543">
            <text:p>-0.002010543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04368403">
            <text:p>0.004368403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-0.0001399742">
            <text:p>-0.0001399742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09521972">
            <text:p>0.0009521972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-0.005002119">
            <text:p>-0.005002119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09433023">
            <text:p>0.009433023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-0.005625119">
            <text:p>-0.005625119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1301049">
            <text:p>0.01301049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1309412">
            <text:p>0.001309412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04847642">
            <text:p>0.004847642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05610774">
            <text:p>0.005610774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08489558">
            <text:p>0.008489558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1154762">
            <text:p>-0.01154762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0258171">
            <text:p>0.00258171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1902896">
            <text:p>0.01902896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-0.006103133">
            <text:p>-0.006103133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1429575">
            <text:p>-0.01429575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06285088">
            <text:p>0.006285088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-0.00454291">
            <text:p>-0.00454291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1528863">
            <text:p>-0.01528863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1495539">
            <text:p>-0.01495539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06354702">
            <text:p>0.006354702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-0.005146954">
            <text:p>-0.005146954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-0.002018696">
            <text:p>-0.002018696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-0.01011405">
            <text:p>-0.01011405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03530073">
            <text:p>0.003530073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03149883">
            <text:p>0.003149883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1717307">
            <text:p>-0.01717307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-0.006865716">
            <text:p>-0.006865716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05668933">
            <text:p>0.005668933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-0.0021301">
            <text:p>-0.0021301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13865">
            <text:p>-0.013865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1285245">
            <text:p>0.01285245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05318547">
            <text:p>0.005318547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1501519">
            <text:p>-0.01501519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-0.001392927">
            <text:p>-0.001392927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-0.006627777">
            <text:p>-0.006627777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0939454">
            <text:p>0.00939454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0.000148094">
            <text:p>0.000148094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-0.004028793">
            <text:p>-0.004028793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-0.0002925921">
            <text:p>-0.0002925921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1031827">
            <text:p>0.01031827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-0.004307953">
            <text:p>-0.004307953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-0.01267432">
            <text:p>-0.01267432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08988249">
            <text:p>0.008988249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-0.001437254">
            <text:p>-0.001437254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-0.005633534">
            <text:p>-0.005633534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-0.01426701">
            <text:p>-0.01426701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02790897">
            <text:p>0.002790897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02552238">
            <text:p>0.002552238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-0.01382856">
            <text:p>-0.01382856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02113119">
            <text:p>0.002113119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string">
            <text:p>-1.171686E-05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004834103">
            <text:p>0.0004834103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-0.006688029">
            <text:p>-0.006688029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-0.01015909">
            <text:p>-0.01015909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1127291">
            <text:p>0.01127291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-0.006806538">
            <text:p>-0.006806538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-0.00903725">
            <text:p>-0.00903725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-0.0003654881">
            <text:p>-0.0003654881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11804">
            <text:p>0.011804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02773323">
            <text:p>0.002773323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002820802">
            <text:p>0.0002820802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-0.01348408">
            <text:p>-0.01348408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-0.006861627">
            <text:p>-0.006861627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04835055">
            <text:p>0.004835055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0120469">
            <text:p>0.00120469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-0.001317687">
            <text:p>-0.001317687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-0.006689651">
            <text:p>-0.006689651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0.01058672">
            <text:p>0.01058672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-0.008378605">
            <text:p>-0.008378605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-0.00666853">
            <text:p>-0.00666853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-0.004217634">
            <text:p>-0.004217634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06143443">
            <text:p>0.006143443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-0.01376035">
            <text:p>-0.01376035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-0.01229409">
            <text:p>-0.01229409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01900152">
            <text:p>0.001900152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0821378">
            <text:p>0.00821378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-0.01400331">
            <text:p>-0.01400331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05280335">
            <text:p>0.005280335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-0.004748864">
            <text:p>-0.004748864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2737207">
            <text:p>0.02737207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-0.001934203">
            <text:p>-0.001934203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1067351">
            <text:p>0.01067351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-0.005904525">
            <text:p>-0.005904525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-0.009546149">
            <text:p>-0.009546149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1497275">
            <text:p>0.01497275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-0.0125476">
            <text:p>-0.0125476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07192768">
            <text:p>0.007192768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03030968">
            <text:p>0.003030968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-0.005077865">
            <text:p>-0.005077865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0266143">
            <text:p>0.00266143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2366298">
            <text:p>0.02366298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02377123">
            <text:p>0.002377123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-0.002721844">
            <text:p>-0.002721844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-0.01081546">
            <text:p>-0.01081546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0452765">
            <text:p>0.00452765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06541652">
            <text:p>0.006541652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0.0001399379">
            <text:p>0.0001399379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-0.01231735">
            <text:p>-0.01231735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05363808">
            <text:p>0.005363808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1761027">
            <text:p>0.01761027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-0.005418999">
            <text:p>-0.005418999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-0.001818224">
            <text:p>-0.001818224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1552119">
            <text:p>0.01552119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-0.002048191">
            <text:p>-0.002048191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02974909">
            <text:p>0.002974909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-0.0151704">
            <text:p>-0.0151704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002181811">
            <text:p>0.002181811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3058801">
            <text:p>0.03058801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-0.008758231">
            <text:p>-0.008758231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-0.007661817">
            <text:p>-0.007661817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0767208">
            <text:p>0.00767208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-0.003650449">
            <text:p>-0.003650449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-0.009643831">
            <text:p>-0.009643831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-0.01604558">
            <text:p>-0.01604558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-0.001119681">
            <text:p>-0.001119681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3017306">
            <text:p>0.03017306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-0.003624301">
            <text:p>-0.003624301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02973305">
            <text:p>0.002973305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009615098">
            <text:p>0.0009615098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-0.001366814">
            <text:p>-0.001366814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-0.01070063">
            <text:p>-0.01070063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-0.01386501">
            <text:p>-0.01386501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-0.001757939">
            <text:p>-0.001757939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0004604841">
            <text:p>0.0004604841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-0.01556786">
            <text:p>-0.01556786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-0.005862882">
            <text:p>-0.005862882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006636294">
            <text:p>0.006636294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0001335008">
            <text:p>0.0001335008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-0.00356208">
            <text:p>-0.00356208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07834434">
            <text:p>0.07834434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-0.001597789">
            <text:p>-0.001597789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-0.003565108">
            <text:p>-0.003565108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004252106">
            <text:p>0.004252106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-0.01356273">
            <text:p>-0.01356273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001199415">
            <text:p>0.001199415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-0.00575473">
            <text:p>-0.00575473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-0.01041919">
            <text:p>-0.01041919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000662746">
            <text:p>0.000662746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004667439">
            <text:p>0.004667439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-0.002286769">
            <text:p>-0.002286769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-0.007293207">
            <text:p>-0.007293207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-0.01170267">
            <text:p>-0.01170267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-0.004295143">
            <text:p>-0.004295143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005232909">
            <text:p>0.005232909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-0.01189655">
            <text:p>-0.01189655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-0.008383662">
            <text:p>-0.008383662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-0.0007073081">
            <text:p>-0.0007073081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-0.005170047">
            <text:p>-0.005170047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-0.0009136355">
            <text:p>-0.0009136355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-0.0135024">
            <text:p>-0.0135024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-0.001846689">
            <text:p>-0.001846689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004733137">
            <text:p>0.004733137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006827314">
            <text:p>0.006827314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-0.008733341">
            <text:p>-0.008733341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-0.004204648">
            <text:p>-0.004204648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-0.001824989">
            <text:p>-0.001824989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-0.002473912">
            <text:p>-0.002473912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-0.002398462">
            <text:p>-0.002398462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007787231">
            <text:p>0.007787231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02516189">
            <text:p>0.02516189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-0.00151947">
            <text:p>-0.00151947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-0.006601536">
            <text:p>-0.006601536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0007477112">
            <text:p>0.0007477112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01094194">
            <text:p>0.01094194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-0.008396578">
            <text:p>-0.008396578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-0.007061573">
            <text:p>-0.007061573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00153249">
            <text:p>0.00153249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-0.0002991194">
            <text:p>-0.0002991194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002069995">
            <text:p>0.002069995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-0.00466684">
            <text:p>-0.00466684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009262926">
            <text:p>0.009262926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000279821">
            <text:p>0.000279821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002874117">
            <text:p>0.002874117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006256039">
            <text:p>0.006256039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009695625">
            <text:p>0.009695625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-0.003443478">
            <text:p>-0.003443478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-0.006700108">
            <text:p>-0.006700108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-0.01473345">
            <text:p>-0.01473345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-0.008170656">
            <text:p>-0.008170656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-0.002206953">
            <text:p>-0.002206953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-0.01478783">
            <text:p>-0.01478783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-0.01028393">
            <text:p>-0.01028393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-0.003843245">
            <text:p>-0.003843245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-0.003087252">
            <text:p>-0.003087252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-0.006150132">
            <text:p>-0.006150132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0.0001117152">
            <text:p>0.0001117152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000616817">
            <text:p>0.000616817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-0.0072168">
            <text:p>-0.0072168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-0.009427855">
            <text:p>-0.009427855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-0.01004549">
            <text:p>-0.01004549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02124522">
            <text:p>0.02124522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005219618">
            <text:p>0.005219618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-0.006863949">
            <text:p>-0.006863949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-0.001250855">
            <text:p>-0.001250855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01580546">
            <text:p>0.01580546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-0.005448955">
            <text:p>-0.005448955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-0.003125013">
            <text:p>-0.003125013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-0.007268177">
            <text:p>-0.007268177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007573359">
            <text:p>0.007573359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002672854">
            <text:p>0.002672854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-0.002450936">
            <text:p>-0.002450936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-0.0109012">
            <text:p>-0.0109012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-0.005015751">
            <text:p>-0.005015751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004464933">
            <text:p>0.004464933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-0.003333903">
            <text:p>-0.003333903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-0.01311131">
            <text:p>-0.01311131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00529701">
            <text:p>0.00529701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001688698">
            <text:p>0.001688698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-0.01381602">
            <text:p>-0.01381602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01147542">
            <text:p>0.01147542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-0.003794055">
            <text:p>-0.003794055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-0.006756306">
            <text:p>-0.006756306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-0.01254905">
            <text:p>-0.01254905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-0.01317101">
            <text:p>-0.01317101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-0.004804227">
            <text:p>-0.004804227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-0.007063949">
            <text:p>-0.007063949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-0.003226433">
            <text:p>-0.003226433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-0.00204039">
            <text:p>-0.00204039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-0.006156542">
            <text:p>-0.006156542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004939794">
            <text:p>0.004939794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06019255">
            <text:p>0.06019255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-0.0009372194">
            <text:p>-0.0009372194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01079835">
            <text:p>0.01079835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-0.002835542">
            <text:p>-0.002835542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02565226">
            <text:p>0.02565226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-0.01090317">
            <text:p>-0.01090317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006321692">
            <text:p>0.006321692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004936209">
            <text:p>0.004936209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-0.009205127">
            <text:p>-0.009205127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-0.01113076">
            <text:p>-0.01113076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01116124">
            <text:p>0.01116124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004332087">
            <text:p>0.004332087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-0.004578223">
            <text:p>-0.004578223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00803869">
            <text:p>0.00803869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005477735">
            <text:p>0.005477735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007405394">
            <text:p>0.007405394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01272871">
            <text:p>0.01272871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-0.003102006">
            <text:p>-0.003102006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0001626918">
            <text:p>0.0001626918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008261569">
            <text:p>0.008261569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-0.006717572">
            <text:p>-0.006717572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002994545">
            <text:p>0.002994545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0.0008875246">
            <text:p>0.0008875246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005469081">
            <text:p>0.005469081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-0.002943509">
            <text:p>-0.002943509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-0.01264209">
            <text:p>-0.01264209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-0.001661492">
            <text:p>-0.001661492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006236389">
            <text:p>0.006236389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0.001193408">
            <text:p>0.001193408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003813703">
            <text:p>0.003813703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-0.0021131">
            <text:p>-0.0021131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01550324">
            <text:p>0.01550324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0.002489418">
            <text:p>0.002489418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003415992">
            <text:p>0.003415992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-0.001315428">
            <text:p>-0.001315428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-0.004619846">
            <text:p>-0.004619846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-0.006722158">
            <text:p>-0.006722158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-0.0008943765">
            <text:p>-0.0008943765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-0.00191941">
            <text:p>-0.00191941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0160715">
            <text:p>0.0160715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03856105">
            <text:p>0.03856105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-0.004380652">
            <text:p>-0.004380652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001898234">
            <text:p>0.001898234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007614027">
            <text:p>0.007614027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-0.004327142">
            <text:p>-0.004327142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00493619">
            <text:p>0.00493619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01665164">
            <text:p>0.01665164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002405559">
            <text:p>0.002405559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007068283">
            <text:p>0.007068283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0.00337101">
            <text:p>0.00337101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-0.003082654">
            <text:p>-0.003082654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008048872">
            <text:p>0.008048872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01762725">
            <text:p>0.01762725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008631266">
            <text:p>0.008631266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0257594">
            <text:p>0.0257594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010937">
            <text:p>0.010937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-0.007306795">
            <text:p>-0.007306795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-0.008951104">
            <text:p>-0.008951104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004899452">
            <text:p>0.004899452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string">
            <text:p>-2.13982E-05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009449817">
            <text:p>0.009449817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0.0007588437">
            <text:p>0.0007588437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006418682">
            <text:p>0.006418682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004815356">
            <text:p>0.004815356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-0.0003005756">
            <text:p>-0.0003005756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-0.001892491">
            <text:p>-0.001892491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02050371">
            <text:p>0.02050371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-0.001339264">
            <text:p>-0.001339264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0.005084503">
            <text:p>0.005084503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-0.003486644">
            <text:p>-0.003486644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0.0006473052">
            <text:p>0.0006473052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-0.001622888">
            <text:p>-0.001622888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-0.004587457">
            <text:p>-0.004587457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0.001177954">
            <text:p>0.001177954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03026681">
            <text:p>0.03026681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00737814">
            <text:p>0.00737814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-0.004533724">
            <text:p>-0.004533724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006947601">
            <text:p>0.006947601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01210494">
            <text:p>0.01210494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-0.002150822">
            <text:p>-0.002150822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-0.001479362">
            <text:p>-0.001479362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0.001298729">
            <text:p>0.001298729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-0.00229797">
            <text:p>-0.00229797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01930474">
            <text:p>0.01930474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008652734">
            <text:p>0.008652734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05057298">
            <text:p>0.05057298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01616343">
            <text:p>0.01616343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006453508">
            <text:p>0.006453508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0.001108893">
            <text:p>0.001108893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007768822">
            <text:p>0.007768822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005857697">
            <text:p>0.005857697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02552949">
            <text:p>0.02552949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-0.004166169">
            <text:p>-0.004166169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02495742">
            <text:p>0.02495742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01376843">
            <text:p>0.01376843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01072665">
            <text:p>0.01072665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009692661">
            <text:p>0.009692661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008904047">
            <text:p>0.008904047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0.00387616">
            <text:p>0.00387616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0.001020825">
            <text:p>0.001020825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-0.002600984">
            <text:p>-0.002600984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01676334">
            <text:p>0.01676334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01057869">
            <text:p>0.01057869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01489568">
            <text:p>0.01489568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-0.003624305">
            <text:p>-0.003624305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03096431">
            <text:p>0.03096431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01534667">
            <text:p>0.01534667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-0.000971405">
            <text:p>-0.000971405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0.001532747">
            <text:p>0.001532747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01032418">
            <text:p>0.01032418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0322278">
            <text:p>0.0322278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0.001476505">
            <text:p>0.001476505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0.006487582">
            <text:p>0.006487582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01688316">
            <text:p>0.01688316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01517872">
            <text:p>0.01517872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0.005689758">
            <text:p>0.005689758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-0.004245412">
            <text:p>-0.004245412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0.008884511">
            <text:p>0.008884511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0.003489055">
            <text:p>0.003489055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0.006601756">
            <text:p>0.006601756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02779322">
            <text:p>0.02779322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0.003669549">
            <text:p>0.003669549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02489947">
            <text:p>0.02489947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0.004843254">
            <text:p>0.004843254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02053214">
            <text:p>0.02053214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02666062">
            <text:p>0.02666062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01320364">
            <text:p>0.01320364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03357317">
            <text:p>0.03357317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0.003873687">
            <text:p>0.003873687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01768726">
            <text:p>0.01768726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0.01071632">
            <text:p>0.01071632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0.005324237">
            <text:p>0.005324237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0.0005456773">
            <text:p>0.0005456773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02083189">
            <text:p>0.02083189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0192568">
            <text:p>0.0192568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0.006094244">
            <text:p>0.006094244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0.01389557">
            <text:p>0.01389557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02671383">
            <text:p>0.02671383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0.006389069">
            <text:p>0.006389069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03851559">
            <text:p>0.03851559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03071707">
            <text:p>0.03071707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02005048">
            <text:p>0.02005048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01758278">
            <text:p>0.01758278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0.01261824">
            <text:p>0.01261824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0.002336783">
            <text:p>0.002336783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02265596">
            <text:p>0.02265596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03249633">
            <text:p>0.03249633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0.01450151">
            <text:p>0.01450151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02221">
            <text:p>0.02221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01957958">
            <text:p>0.01957958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01977888">
            <text:p>0.01977888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0.02021738">
            <text:p>0.02021738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02059215">
            <text:p>0.02059215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02184065">
            <text:p>0.02184065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0.02100903">
            <text:p>0.02100903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0.01266">
            <text:p>0.01266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0.01077831">
            <text:p>0.01077831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02480126">
            <text:p>0.02480126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08147269">
            <text:p>0.08147269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03277181">
            <text:p>0.03277181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02578834">
            <text:p>0.02578834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02587167">
            <text:p>0.02587167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0.0222536">
            <text:p>0.0222536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02696309">
            <text:p>0.02696309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02858617">
            <text:p>0.02858617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0.02078941">
            <text:p>0.02078941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0.02487373">
            <text:p>0.02487373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0.02681878">
            <text:p>0.02681878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0.02201489">
            <text:p>0.02201489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0297882">
            <text:p>0.0297882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05697981">
            <text:p>0.05697981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03316271">
            <text:p>0.03316271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04927265">
            <text:p>0.04927265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0.02155057">
            <text:p>0.02155057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0.02701687">
            <text:p>0.02701687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03060252">
            <text:p>0.03060252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0.01919494">
            <text:p>0.01919494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03992422">
            <text:p>0.03992422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0.0263965">
            <text:p>0.0263965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0.02574003">
            <text:p>0.02574003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05969825">
            <text:p>0.05969825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0.02992131">
            <text:p>0.02992131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04019634">
            <text:p>0.04019634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04058371">
            <text:p>0.04058371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0.02404122">
            <text:p>0.02404122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05062516">
            <text:p>0.05062516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04460996">
            <text:p>0.04460996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0.03547395">
            <text:p>0.03547395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0434269">
            <text:p>0.0434269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0.03197799">
            <text:p>0.03197799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0.03390244">
            <text:p>0.03390244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04762573">
            <text:p>0.04762573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0.02951946">
            <text:p>0.02951946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0.03774867">
            <text:p>0.03774867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0.03281693">
            <text:p>0.03281693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0.0308414">
            <text:p>0.0308414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04746285">
            <text:p>0.04746285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04192084">
            <text:p>0.04192084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04386629">
            <text:p>0.04386629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0.03105885">
            <text:p>0.03105885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0.03784715">
            <text:p>0.03784715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0.03818873">
            <text:p>0.03818873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04980987">
            <text:p>0.04980987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05587146">
            <text:p>0.05587146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05449177">
            <text:p>0.05449177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0.04456424">
            <text:p>0.04456424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0.04168268">
            <text:p>0.04168268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0.03359346">
            <text:p>0.03359346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0.03756937">
            <text:p>0.03756937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0.04410431">
            <text:p>0.04410431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0.04888135">
            <text:p>0.04888135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07245924">
            <text:p>0.07245924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0.04905585">
            <text:p>0.04905585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05238972">
            <text:p>0.05238972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0.05101838">
            <text:p>0.05101838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05589358">
            <text:p>0.05589358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0.04795296">
            <text:p>0.04795296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0547798">
            <text:p>0.0547798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0.04989585">
            <text:p>0.04989585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05771165">
            <text:p>0.05771165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0.04041987">
            <text:p>0.04041987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09279687">
            <text:p>0.09279687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05716137">
            <text:p>0.05716137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08994981">
            <text:p>0.08994981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05886635">
            <text:p>0.05886635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09401761">
            <text:p>0.09401761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0.05601607">
            <text:p>0.05601607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06442549">
            <text:p>0.06442549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0.04818043">
            <text:p>0.04818043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06990533">
            <text:p>0.06990533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06355239">
            <text:p>0.06355239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0.05297222">
            <text:p>0.05297222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06320228">
            <text:p>0.06320228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0.06060129">
            <text:p>0.06060129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0.06165919">
            <text:p>0.06165919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0.05997406">
            <text:p>0.05997406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0.05342397">
            <text:p>0.05342397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07366281">
            <text:p>0.07366281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0.05559651">
            <text:p>0.05559651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0.05548305">
            <text:p>0.05548305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0.06595118">
            <text:p>0.06595118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0.06304291">
            <text:p>0.06304291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08309531">
            <text:p>0.08309531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0.0654513">
            <text:p>0.0654513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0.06583738">
            <text:p>0.06583738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0.06008745">
            <text:p>0.06008745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0.0699878">
            <text:p>0.0699878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07325982">
            <text:p>0.07325982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0.06774038">
            <text:p>0.06774038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08359481">
            <text:p>0.08359481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0.0704622">
            <text:p>0.0704622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07449861">
            <text:p>0.07449861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09150492">
            <text:p>0.09150492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0.0735056">
            <text:p>0.0735056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0.06393541">
            <text:p>0.06393541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0799484">
            <text:p>0.0799484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08020532">
            <text:p>0.08020532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0.06946918">
            <text:p>0.06946918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08836781">
            <text:p>0.08836781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0.07601392">
            <text:p>0.07601392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0.07116178">
            <text:p>0.07116178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09024522">
            <text:p>0.09024522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0.07708738">
            <text:p>0.07708738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0885794">
            <text:p>0.0885794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0.06959988">
            <text:p>0.06959988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08460248">
            <text:p>0.08460248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089867">
            <text:p>0.089867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0.07573497">
            <text:p>0.07573497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08734552">
            <text:p>0.08734552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0.07884528">
            <text:p>0.07884528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0.08041453">
            <text:p>0.08041453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089311">
            <text:p>0.089311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0.08453579">
            <text:p>0.08453579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0.08648971">
            <text:p>0.08648971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09525993">
            <text:p>0.09525993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0.07900851">
            <text:p>0.07900851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0930729">
            <text:p>0.0930729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09410786">
            <text:p>0.09410786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09358109">
            <text:p>0.09358109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0.08035397">
            <text:p>0.08035397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0.09126832">
            <text:p>0.09126832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09518952">
            <text:p>0.09518952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09399443">
            <text:p>0.09399443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0.07934654">
            <text:p>0.07934654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0.09380653">
            <text:p>0.09380653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09970804">
            <text:p>0.09970804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09975829">
            <text:p>0.09975829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09590987">
            <text:p>0.09590987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1076259">
            <text:p>0.1076259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1106821">
            <text:p>0.1106821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109179">
            <text:p>0.109179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0.09070542">
            <text:p>0.09070542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1030527">
            <text:p>0.1030527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1039925">
            <text:p>0.1039925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1002452">
            <text:p>0.1002452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100931">
            <text:p>0.100931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1065238">
            <text:p>0.1065238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0.0958536">
            <text:p>0.0958536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1055767">
            <text:p>0.1055767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107135">
            <text:p>0.107135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107999">
            <text:p>0.107999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0.09390848">
            <text:p>0.09390848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1044711">
            <text:p>0.1044711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1067691">
            <text:p>0.1067691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0.1009615">
            <text:p>0.1009615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0.09128111">
            <text:p>0.09128111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0.09650498">
            <text:p>0.09650498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1146977">
            <text:p>0.1146977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0.09503915">
            <text:p>0.09503915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1087286">
            <text:p>0.1087286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0.1024618">
            <text:p>0.1024618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1148627">
            <text:p>0.1148627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0.0987068">
            <text:p>0.0987068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0.09776241">
            <text:p>0.09776241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0.1028231">
            <text:p>0.1028231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0.1012039">
            <text:p>0.1012039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1132167">
            <text:p>0.1132167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0.1049894">
            <text:p>0.1049894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1112329">
            <text:p>0.1112329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1265339">
            <text:p>0.1265339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1178058">
            <text:p>0.1178058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1097284">
            <text:p>0.1097284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1178511">
            <text:p>0.1178511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0.09713817">
            <text:p>0.09713817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1124023">
            <text:p>0.1124023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0.1034569">
            <text:p>0.1034569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0.110972">
            <text:p>0.110972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1219636">
            <text:p>0.1219636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1162758">
            <text:p>0.1162758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1115846">
            <text:p>0.1115846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1159888">
            <text:p>0.1159888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0.1078591">
            <text:p>0.1078591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1145057">
            <text:p>0.1145057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0.1008469">
            <text:p>0.1008469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1176537">
            <text:p>0.1176537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0.1018161">
            <text:p>0.1018161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1301024">
            <text:p>0.1301024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0.1096026">
            <text:p>0.1096026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0.1053596">
            <text:p>0.1053596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1175616">
            <text:p>0.1175616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0.1069479">
            <text:p>0.1069479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1259747">
            <text:p>0.1259747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0.1121869">
            <text:p>0.1121869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114386">
            <text:p>0.114386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1296253">
            <text:p>0.1296253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0.1097963">
            <text:p>0.1097963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0.1114577">
            <text:p>0.1114577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0.1086127">
            <text:p>0.1086127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0.1103356">
            <text:p>0.1103356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116598">
            <text:p>0.116598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136186">
            <text:p>0.136186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0.1060425">
            <text:p>0.1060425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1265581">
            <text:p>0.1265581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1152693">
            <text:p>0.1152693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0.1094504">
            <text:p>0.1094504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0.1017141">
            <text:p>0.1017141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1144496">
            <text:p>0.1144496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0.1101206">
            <text:p>0.1101206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1360098">
            <text:p>0.1360098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1164127">
            <text:p>0.1164127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1128234">
            <text:p>0.1128234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1151796">
            <text:p>0.1151796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0.107485">
            <text:p>0.107485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0.1085432">
            <text:p>0.1085432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0.1051362">
            <text:p>0.1051362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0.1108959">
            <text:p>0.1108959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0.1127116">
            <text:p>0.1127116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113335">
            <text:p>0.113335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1141709">
            <text:p>0.1141709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1137217">
            <text:p>0.1137217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1225398">
            <text:p>0.1225398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1188335">
            <text:p>0.1188335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0.1043648">
            <text:p>0.1043648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1142733">
            <text:p>0.1142733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0.1078655">
            <text:p>0.1078655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1253427">
            <text:p>0.1253427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1248603">
            <text:p>0.1248603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1154859">
            <text:p>0.1154859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1156388">
            <text:p>0.1156388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1116192">
            <text:p>0.1116192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1107702">
            <text:p>0.1107702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1193868">
            <text:p>0.1193868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1124709">
            <text:p>0.1124709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0.1053725">
            <text:p>0.1053725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1296572">
            <text:p>0.1296572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1116693">
            <text:p>0.1116693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0.09979158">
            <text:p>0.09979158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1149557">
            <text:p>0.1149557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0.1071031">
            <text:p>0.1071031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1123649">
            <text:p>0.1123649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0.09773445">
            <text:p>0.09773445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0.1004817">
            <text:p>0.1004817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0.1047295">
            <text:p>0.1047295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1194157">
            <text:p>0.1194157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0.1052607">
            <text:p>0.1052607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1095904">
            <text:p>0.1095904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11266">
            <text:p>0.11266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1160944">
            <text:p>0.1160944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0.1035864">
            <text:p>0.1035864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1108674">
            <text:p>0.1108674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1105358">
            <text:p>0.1105358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1078665">
            <text:p>0.1078665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1155288">
            <text:p>0.1155288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0.09552541">
            <text:p>0.09552541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1095837">
            <text:p>0.1095837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1164194">
            <text:p>0.1164194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0.1039723">
            <text:p>0.1039723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109224">
            <text:p>0.109224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1104046">
            <text:p>0.1104046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1050108">
            <text:p>0.1050108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0.09785299">
            <text:p>0.09785299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1133652">
            <text:p>0.1133652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1351271">
            <text:p>0.1351271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0.0962067">
            <text:p>0.0962067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0.09897563">
            <text:p>0.09897563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1112942">
            <text:p>0.1112942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1040015">
            <text:p>0.1040015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0.09999869">
            <text:p>0.09999869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1116212">
            <text:p>0.1116212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0.09689441">
            <text:p>0.09689441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1172924">
            <text:p>0.1172924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0.09803575">
            <text:p>0.09803575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0.09219519">
            <text:p>0.09219519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1143472">
            <text:p>0.1143472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1211035">
            <text:p>0.1211035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0.09468617">
            <text:p>0.09468617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1116129">
            <text:p>0.1116129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106172">
            <text:p>0.106172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1052474">
            <text:p>0.1052474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1035942">
            <text:p>0.1035942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0.08901315">
            <text:p>0.08901315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0.09446003">
            <text:p>0.09446003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0.09358131">
            <text:p>0.09358131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1031055">
            <text:p>0.1031055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1170088">
            <text:p>0.1170088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0.092238">
            <text:p>0.092238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1038375">
            <text:p>0.1038375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1167829">
            <text:p>0.1167829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0.09144065">
            <text:p>0.09144065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0.09169265">
            <text:p>0.09169265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1000478">
            <text:p>0.1000478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0.09224819">
            <text:p>0.09224819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0.08512022">
            <text:p>0.08512022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1096994">
            <text:p>0.1096994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1051772">
            <text:p>0.1051772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09792511">
            <text:p>0.09792511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1060814">
            <text:p>0.1060814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1365635">
            <text:p>0.1365635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09640189">
            <text:p>0.09640189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09751902">
            <text:p>0.09751902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1062881">
            <text:p>0.1062881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1002125">
            <text:p>0.1002125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0.0861431">
            <text:p>0.0861431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09464547">
            <text:p>0.09464547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08741227">
            <text:p>0.08741227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1017344">
            <text:p>0.1017344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0968881">
            <text:p>0.0968881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1105508">
            <text:p>0.1105508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09698638">
            <text:p>0.09698638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09248116">
            <text:p>0.09248116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09667726">
            <text:p>0.09667726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09813849">
            <text:p>0.09813849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08391656">
            <text:p>0.08391656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1150027">
            <text:p>0.1150027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09877312">
            <text:p>0.09877312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08909669">
            <text:p>0.08909669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09894042">
            <text:p>0.09894042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1161404">
            <text:p>0.1161404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1037984">
            <text:p>0.1037984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0955057">
            <text:p>0.0955057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08935343">
            <text:p>0.08935343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1080245">
            <text:p>0.1080245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09480111">
            <text:p>0.09480111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09810745">
            <text:p>0.09810745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09023674">
            <text:p>0.09023674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1207297">
            <text:p>0.1207297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1226753">
            <text:p>0.1226753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0816746">
            <text:p>0.0816746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08810034">
            <text:p>0.08810034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1005355">
            <text:p>0.1005355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1020365">
            <text:p>0.1020365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07295771">
            <text:p>0.07295771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0940325">
            <text:p>0.0940325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0977155">
            <text:p>0.0977155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1128126">
            <text:p>0.1128126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07527517">
            <text:p>0.07527517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0912318">
            <text:p>0.0912318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09180881">
            <text:p>0.09180881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09846126">
            <text:p>0.09846126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09086996">
            <text:p>0.09086996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07631059">
            <text:p>0.07631059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07432707">
            <text:p>0.07432707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08327001">
            <text:p>0.08327001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08371365">
            <text:p>0.08371365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06735826">
            <text:p>0.06735826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08152439">
            <text:p>0.08152439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09779953">
            <text:p>0.09779953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0966595">
            <text:p>0.0966595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07995266">
            <text:p>0.07995266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0752155">
            <text:p>0.0752155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08447623">
            <text:p>0.08447623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07094524">
            <text:p>0.07094524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08055457">
            <text:p>0.08055457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08191307">
            <text:p>0.08191307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08070224">
            <text:p>0.08070224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06793547">
            <text:p>0.06793547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08594923">
            <text:p>0.08594923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07130616">
            <text:p>0.07130616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1000245">
            <text:p>0.1000245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0722251">
            <text:p>0.0722251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08737969">
            <text:p>0.08737969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07029358">
            <text:p>0.07029358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06826025">
            <text:p>0.06826025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06555487">
            <text:p>0.06555487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07219616">
            <text:p>0.07219616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07339003">
            <text:p>0.07339003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06461053">
            <text:p>0.06461053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06269346">
            <text:p>0.06269346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0790116">
            <text:p>0.0790116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0684067">
            <text:p>0.0684067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06962407">
            <text:p>0.06962407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08126139">
            <text:p>0.08126139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06714687">
            <text:p>0.06714687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07273156">
            <text:p>0.07273156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06357181">
            <text:p>0.06357181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0677334">
            <text:p>0.0677334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0641951">
            <text:p>0.0641951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06387752">
            <text:p>0.06387752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06086007">
            <text:p>0.06086007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07144568">
            <text:p>0.07144568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06960004">
            <text:p>0.06960004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06783303">
            <text:p>0.06783303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07081445">
            <text:p>0.07081445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07409312">
            <text:p>0.07409312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05968838">
            <text:p>0.05968838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08942044">
            <text:p>0.08942044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05929923">
            <text:p>0.05929923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0771408">
            <text:p>0.0771408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05614711">
            <text:p>0.05614711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05655937">
            <text:p>0.05655937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05742333">
            <text:p>0.05742333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05913683">
            <text:p>0.05913683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06868865">
            <text:p>0.06868865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06573002">
            <text:p>0.06573002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05456274">
            <text:p>0.05456274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06989408">
            <text:p>0.06989408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07230189">
            <text:p>0.07230189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05901686">
            <text:p>0.05901686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07743921">
            <text:p>0.07743921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05185862">
            <text:p>0.05185862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05751618">
            <text:p>0.05751618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06982144">
            <text:p>0.06982144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0612765">
            <text:p>0.0612765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06534389">
            <text:p>0.06534389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04917219">
            <text:p>0.04917219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06533068">
            <text:p>0.06533068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04889019">
            <text:p>0.04889019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05480322">
            <text:p>0.05480322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05738911">
            <text:p>0.05738911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05144856">
            <text:p>0.05144856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07518607">
            <text:p>0.07518607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05299196">
            <text:p>0.05299196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05092299">
            <text:p>0.05092299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05389422">
            <text:p>0.05389422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05472839">
            <text:p>0.05472839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06862132">
            <text:p>0.06862132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08860891">
            <text:p>0.08860891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0457623">
            <text:p>0.0457623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05348391">
            <text:p>0.05348391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0591757">
            <text:p>0.0591757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05071108">
            <text:p>0.05071108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05663544">
            <text:p>0.05663544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04885448">
            <text:p>0.04885448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05114404">
            <text:p>0.05114404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05083534">
            <text:p>0.05083534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04454339">
            <text:p>0.04454339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04501228">
            <text:p>0.04501228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05829693">
            <text:p>0.05829693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06998888">
            <text:p>0.06998888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05645592">
            <text:p>0.05645592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04987387">
            <text:p>0.04987387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04988072">
            <text:p>0.04988072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06329244">
            <text:p>0.06329244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05491767">
            <text:p>0.05491767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05241519">
            <text:p>0.05241519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05080677">
            <text:p>0.05080677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06141848">
            <text:p>0.06141848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06590056">
            <text:p>0.06590056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05437196">
            <text:p>0.05437196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06290839">
            <text:p>0.06290839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04789337">
            <text:p>0.04789337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04159671">
            <text:p>0.04159671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04680059">
            <text:p>0.04680059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04855069">
            <text:p>0.04855069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04955383">
            <text:p>0.04955383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0542809">
            <text:p>0.0542809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04779967">
            <text:p>0.04779967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05152968">
            <text:p>0.05152968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04484402">
            <text:p>0.04484402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04130618">
            <text:p>0.04130618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05157719">
            <text:p>0.05157719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04025485">
            <text:p>0.04025485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04406353">
            <text:p>0.04406353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08003661">
            <text:p>0.08003661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04795243">
            <text:p>0.04795243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04083494">
            <text:p>0.04083494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04807546">
            <text:p>0.04807546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04141986">
            <text:p>0.04141986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03887978">
            <text:p>0.03887978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05283972">
            <text:p>0.05283972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03479481">
            <text:p>0.03479481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05437851">
            <text:p>0.05437851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04750729">
            <text:p>0.04750729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04206653">
            <text:p>0.04206653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0521941">
            <text:p>0.0521941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05406012">
            <text:p>0.05406012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04626628">
            <text:p>0.04626628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04600866">
            <text:p>0.04600866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0428233">
            <text:p>0.0428233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3279772">
            <text:p>0.03279772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05003285">
            <text:p>0.05003285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05117479">
            <text:p>0.05117479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0414498">
            <text:p>0.0414498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06926892">
            <text:p>0.06926892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337266">
            <text:p>0.0337266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04353132">
            <text:p>0.04353132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04955184">
            <text:p>0.04955184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3312862">
            <text:p>0.03312862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3544801">
            <text:p>0.03544801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04471966">
            <text:p>0.04471966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04662629">
            <text:p>0.04662629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04481649">
            <text:p>0.04481649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05612154">
            <text:p>0.05612154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04815666">
            <text:p>0.04815666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05298958">
            <text:p>0.05298958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3669071">
            <text:p>0.03669071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3911754">
            <text:p>0.03911754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05288198">
            <text:p>0.05288198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4533453">
            <text:p>0.04533453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05306858">
            <text:p>0.05306858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3356486">
            <text:p>0.03356486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4399574">
            <text:p>0.04399574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04984628">
            <text:p>0.04984628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05355887">
            <text:p>0.05355887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4385841">
            <text:p>0.04385841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4483782">
            <text:p>0.04483782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4567622">
            <text:p>0.04567622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05686066">
            <text:p>0.05686066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4212731">
            <text:p>0.04212731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3605908">
            <text:p>0.03605908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3276264">
            <text:p>0.03276264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4013362">
            <text:p>0.04013362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3570337">
            <text:p>0.03570337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4893925">
            <text:p>0.04893925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3327627">
            <text:p>0.03327627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3803156">
            <text:p>0.03803156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3716774">
            <text:p>0.03716774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3058774">
            <text:p>0.03058774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4735918">
            <text:p>0.04735918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3159609">
            <text:p>0.03159609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3974561">
            <text:p>0.03974561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3416064">
            <text:p>0.03416064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3976681">
            <text:p>0.03976681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02912235">
            <text:p>0.02912235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08297966">
            <text:p>0.08297966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4625935">
            <text:p>0.04625935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3095759">
            <text:p>0.03095759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3365539">
            <text:p>0.03365539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4612374">
            <text:p>0.04612374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4727942">
            <text:p>0.04727942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3207658">
            <text:p>0.03207658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3121894">
            <text:p>0.03121894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4509797">
            <text:p>0.04509797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3412139">
            <text:p>0.03412139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5302433">
            <text:p>0.05302433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3672086">
            <text:p>0.03672086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5216328">
            <text:p>0.05216328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3783621">
            <text:p>0.03783621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4195346">
            <text:p>0.04195346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2825091">
            <text:p>0.02825091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3116878">
            <text:p>0.03116878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5818189">
            <text:p>0.05818189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3070446">
            <text:p>0.03070446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2784258">
            <text:p>0.02784258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2778033">
            <text:p>0.02778033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3349133">
            <text:p>0.03349133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2562941">
            <text:p>0.02562941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02566339">
            <text:p>0.02566339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0233172">
            <text:p>0.0233172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02213074">
            <text:p>0.02213074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4009546">
            <text:p>0.04009546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276731">
            <text:p>0.0276731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3094189">
            <text:p>0.03094189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3153351">
            <text:p>0.03153351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2853453">
            <text:p>0.02853453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2839313">
            <text:p>0.02839313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3293929">
            <text:p>0.03293929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3799122">
            <text:p>0.03799122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02489994">
            <text:p>0.02489994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300405">
            <text:p>0.0300405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3607839">
            <text:p>0.03607839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3056021">
            <text:p>0.03056021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2743876">
            <text:p>0.02743876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3365564">
            <text:p>0.03365564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4549125">
            <text:p>0.04549125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6069615">
            <text:p>0.06069615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3348793">
            <text:p>0.03348793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4402314">
            <text:p>0.04402314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2537676">
            <text:p>0.02537676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3174208">
            <text:p>0.03174208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3017213">
            <text:p>0.03017213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4057306">
            <text:p>0.04057306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3243228">
            <text:p>0.03243228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3658514">
            <text:p>0.03658514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2989229">
            <text:p>0.02989229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484053">
            <text:p>0.0484053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287152">
            <text:p>0.0287152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3579003">
            <text:p>0.03579003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3140305">
            <text:p>0.03140305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2681707">
            <text:p>0.02681707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3108045">
            <text:p>0.03108045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2885751">
            <text:p>0.02885751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4521857">
            <text:p>0.04521857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2864419">
            <text:p>0.02864419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02322294">
            <text:p>0.02322294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6035437">
            <text:p>0.06035437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3589988">
            <text:p>0.03589988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3890904">
            <text:p>0.03890904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3095022">
            <text:p>0.03095022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2518056">
            <text:p>0.02518056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4131874">
            <text:p>0.04131874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3446534">
            <text:p>0.03446534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3030323">
            <text:p>0.03030323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4012863">
            <text:p>0.04012863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2504331">
            <text:p>0.02504331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2949966">
            <text:p>0.02949966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4289969">
            <text:p>0.04289969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4357843">
            <text:p>0.04357843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3456449">
            <text:p>0.03456449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01635713">
            <text:p>0.01635713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3736345">
            <text:p>0.03736345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02155989">
            <text:p>0.02155989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2634609">
            <text:p>0.02634609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3411752">
            <text:p>0.03411752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3601512">
            <text:p>0.03601512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2662935">
            <text:p>0.02662935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3582838">
            <text:p>0.03582838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2507568">
            <text:p>0.02507568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02085358">
            <text:p>0.02085358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5553238">
            <text:p>0.05553238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02045391">
            <text:p>0.02045391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2725528">
            <text:p>0.02725528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1624504">
            <text:p>0.01624504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3015312">
            <text:p>0.03015312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171312">
            <text:p>0.0171312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3018821">
            <text:p>0.03018821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3039899">
            <text:p>0.03039899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2703632">
            <text:p>0.02703632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2324912">
            <text:p>0.02324912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2749221">
            <text:p>0.02749221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2882962">
            <text:p>0.02882962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2218062">
            <text:p>0.02218062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3242346">
            <text:p>0.03242346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362844">
            <text:p>0.0362844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1600644">
            <text:p>0.01600644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3109212">
            <text:p>0.03109212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3291774">
            <text:p>0.03291774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1701912">
            <text:p>0.01701912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1973781">
            <text:p>0.01973781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01025159">
            <text:p>0.01025159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237778">
            <text:p>0.0237778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2830239">
            <text:p>0.02830239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346334">
            <text:p>0.0346334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3293709">
            <text:p>0.03293709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2583301">
            <text:p>0.02583301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2445647">
            <text:p>0.02445647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2181716">
            <text:p>0.02181716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1378676">
            <text:p>0.01378676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162929">
            <text:p>0.0162929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188958">
            <text:p>0.0188958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1417699">
            <text:p>0.01417699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4145869">
            <text:p>0.04145869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2245167">
            <text:p>0.02245167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1942428">
            <text:p>0.01942428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2195025">
            <text:p>0.02195025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3736039">
            <text:p>0.03736039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3268084">
            <text:p>0.03268084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210943">
            <text:p>0.0210943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1576794">
            <text:p>0.01576794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1502613">
            <text:p>0.01502613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2535088">
            <text:p>0.02535088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1989539">
            <text:p>0.01989539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2289889">
            <text:p>0.02289889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1797738">
            <text:p>0.01797738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3424671">
            <text:p>0.03424671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3492625">
            <text:p>0.03492625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2552766">
            <text:p>0.02552766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3533246">
            <text:p>0.03533246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1558957">
            <text:p>0.01558957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3160638">
            <text:p>0.03160638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154111">
            <text:p>0.0154111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2407835">
            <text:p>0.02407835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1532059">
            <text:p>0.01532059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1656335">
            <text:p>0.01656335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1328231">
            <text:p>0.01328231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440573">
            <text:p>0.0440573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3308117">
            <text:p>0.03308117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2704049">
            <text:p>0.02704049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2347678">
            <text:p>0.02347678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2937356">
            <text:p>0.02937356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4500107">
            <text:p>0.04500107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3154662">
            <text:p>0.03154662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1338655">
            <text:p>0.01338655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2094091">
            <text:p>0.02094091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1853625">
            <text:p>0.01853625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1666893">
            <text:p>0.01666893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2513113">
            <text:p>0.02513113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3678284">
            <text:p>0.03678284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2388266">
            <text:p>0.02388266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2510976">
            <text:p>0.02510976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0104538">
            <text:p>0.0104538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1430783">
            <text:p>0.01430783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1195209">
            <text:p>0.01195209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3630925">
            <text:p>0.03630925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2400487">
            <text:p>0.02400487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2473772">
            <text:p>0.02473772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1969937">
            <text:p>0.01969937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1948258">
            <text:p>0.01948258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2264469">
            <text:p>0.02264469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1691816">
            <text:p>0.01691816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1728617">
            <text:p>0.01728617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3877632">
            <text:p>0.03877632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2394767">
            <text:p>0.02394767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1963386">
            <text:p>0.01963386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12967">
            <text:p>0.012967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2120224">
            <text:p>0.02120224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1431422">
            <text:p>0.01431422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2788937">
            <text:p>0.02788937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2208747">
            <text:p>0.02208747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1799924">
            <text:p>0.01799924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1555676">
            <text:p>0.01555676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08476412">
            <text:p>0.008476412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2259069">
            <text:p>0.02259069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2212719">
            <text:p>0.02212719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2112467">
            <text:p>0.02112467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2073126">
            <text:p>0.02073126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2322281">
            <text:p>0.02322281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1360148">
            <text:p>0.01360148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2821494">
            <text:p>0.02821494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3005719">
            <text:p>0.03005719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1658064">
            <text:p>0.01658064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08376807">
            <text:p>0.008376807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3072989">
            <text:p>0.03072989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1157392">
            <text:p>0.01157392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1950855">
            <text:p>0.01950855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1396434">
            <text:p>0.01396434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1873195">
            <text:p>0.01873195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2440688">
            <text:p>0.02440688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1130244">
            <text:p>0.01130244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07154185">
            <text:p>0.007154185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1266315">
            <text:p>0.01266315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1031806">
            <text:p>0.01031806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0465217">
            <text:p>0.00465217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1371907">
            <text:p>0.01371907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3520746">
            <text:p>0.03520746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09719169">
            <text:p>0.009719169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09690764">
            <text:p>0.009690764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09667449">
            <text:p>0.009667449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235071">
            <text:p>0.0235071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1099547">
            <text:p>0.01099547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1891565">
            <text:p>0.01891565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1607946">
            <text:p>0.01607946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4536462">
            <text:p>0.04536462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1899878">
            <text:p>0.01899878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1928265">
            <text:p>0.01928265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1135902">
            <text:p>0.01135902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2638927">
            <text:p>0.02638927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1272591">
            <text:p>0.01272591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1624269">
            <text:p>0.01624269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115026">
            <text:p>0.0115026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1549268">
            <text:p>0.01549268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2365679">
            <text:p>0.02365679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08798922">
            <text:p>0.008798922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3222632">
            <text:p>0.03222632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09463943">
            <text:p>0.009463943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04893346">
            <text:p>0.004893346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08940947">
            <text:p>0.008940947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1571005">
            <text:p>0.01571005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1320356">
            <text:p>0.01320356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2525072">
            <text:p>0.02525072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08463554">
            <text:p>0.008463554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1378787">
            <text:p>0.01378787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2347042">
            <text:p>0.02347042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1260615">
            <text:p>0.01260615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4127338">
            <text:p>0.04127338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2046285">
            <text:p>0.02046285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121455">
            <text:p>0.0121455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1881144">
            <text:p>0.01881144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2441376">
            <text:p>0.02441376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2317737">
            <text:p>0.02317737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1155277">
            <text:p>0.01155277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171057">
            <text:p>0.0171057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3273477">
            <text:p>0.03273477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08626725">
            <text:p>0.008626725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2203586">
            <text:p>0.02203586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03766691">
            <text:p>0.003766691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2968275">
            <text:p>0.02968275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08945257">
            <text:p>0.008945257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2266237">
            <text:p>0.02266237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1506112">
            <text:p>0.01506112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08872098">
            <text:p>0.008872098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1690122">
            <text:p>0.01690122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0345832">
            <text:p>0.00345832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3575723">
            <text:p>0.03575723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2000116">
            <text:p>0.02000116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1741412">
            <text:p>0.01741412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06339">
            <text:p>0.006339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1173947">
            <text:p>0.01173947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08299777">
            <text:p>0.008299777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02700311">
            <text:p>0.002700311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4208625">
            <text:p>0.04208625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08438079">
            <text:p>0.008438079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07575438">
            <text:p>0.007575438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1393667">
            <text:p>0.01393667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03272701">
            <text:p>0.003272701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06703477">
            <text:p>0.006703477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3685034">
            <text:p>0.03685034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1308514">
            <text:p>0.01308514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4242853">
            <text:p>0.04242853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01326482">
            <text:p>0.001326482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2370376">
            <text:p>0.02370376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2735447">
            <text:p>0.02735447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07867754">
            <text:p>0.007867754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1057861">
            <text:p>0.01057861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1050123">
            <text:p>0.01050123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06469829">
            <text:p>0.006469829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1393421">
            <text:p>0.01393421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1535965">
            <text:p>0.01535965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1191293">
            <text:p>0.01191293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01275173">
            <text:p>0.001275173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05151195">
            <text:p>0.005151195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1692707">
            <text:p>0.01692707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1164088">
            <text:p>0.01164088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03990395">
            <text:p>0.003990395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1273729">
            <text:p>0.01273729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09633637">
            <text:p>0.009633637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08947358">
            <text:p>0.008947358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-0.001272451">
            <text:p>-0.001272451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005877938">
            <text:p>0.0005877938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08211756">
            <text:p>0.008211756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268364">
            <text:p>0.0268364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1668597">
            <text:p>0.01668597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121516">
            <text:p>0.0121516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09733532">
            <text:p>0.009733532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1629918">
            <text:p>0.01629918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002556792">
            <text:p>0.0002556792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06722749">
            <text:p>0.006722749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1506044">
            <text:p>0.01506044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0826207">
            <text:p>0.00826207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06746473">
            <text:p>0.006746473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1310903">
            <text:p>0.01310903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1522887">
            <text:p>0.01522887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03046467">
            <text:p>0.003046467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01331298">
            <text:p>0.001331298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1262721">
            <text:p>0.01262721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1562469">
            <text:p>0.01562469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3106103">
            <text:p>0.03106103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-0.0004149194">
            <text:p>-0.0004149194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2570304">
            <text:p>0.02570304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08262905">
            <text:p>0.008262905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2667037">
            <text:p>0.02667037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1675191">
            <text:p>0.01675191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2020655">
            <text:p>0.02020655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2325454">
            <text:p>0.02325454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09660281">
            <text:p>0.009660281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-0.0004618658">
            <text:p>-0.0004618658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03261495">
            <text:p>0.003261495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2036001">
            <text:p>0.02036001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1437116">
            <text:p>0.01437116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04586183">
            <text:p>0.004586183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03469737">
            <text:p>0.003469737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-0.0007307472">
            <text:p>-0.0007307472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1763019">
            <text:p>0.01763019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2122801">
            <text:p>0.02122801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-0.002222783">
            <text:p>-0.002222783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1240135">
            <text:p>0.01240135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-0.0008233004">
            <text:p>-0.0008233004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03591845">
            <text:p>0.003591845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03611579">
            <text:p>0.003611579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02080819">
            <text:p>0.002080819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3163876">
            <text:p>0.03163876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2046494">
            <text:p>0.02046494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2021339">
            <text:p>0.02021339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006552186">
            <text:p>0.0006552186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05391536">
            <text:p>0.005391536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0918768">
            <text:p>0.00918768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4013924">
            <text:p>0.04013924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2220041">
            <text:p>0.02220041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2071071">
            <text:p>0.02071071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01182776">
            <text:p>0.001182776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1588816">
            <text:p>0.01588816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06348317">
            <text:p>0.006348317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string">
            <text:p>-4.321381E-05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0540848">
            <text:p>0.00540848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1133538">
            <text:p>0.01133538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194928">
            <text:p>0.0194928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07855015">
            <text:p>0.007855015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06351832">
            <text:p>0.006351832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1616518">
            <text:p>0.01616518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2126874">
            <text:p>0.02126874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02007835">
            <text:p>0.002007835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173734">
            <text:p>0.0173734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05221808">
            <text:p>0.005221808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2553583">
            <text:p>0.02553583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-0.001029777">
            <text:p>-0.001029777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06913339">
            <text:p>0.006913339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06974165">
            <text:p>0.006974165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1979749">
            <text:p>0.01979749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06202151">
            <text:p>0.006202151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0769796">
            <text:p>0.00769796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03786396">
            <text:p>0.003786396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-0.001533639">
            <text:p>-0.001533639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1531043">
            <text:p>0.01531043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4318034">
            <text:p>0.04318034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001848159">
            <text:p>0.0001848159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05517486">
            <text:p>0.005517486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02076355">
            <text:p>0.002076355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1925181">
            <text:p>0.01925181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-0.002143143">
            <text:p>-0.002143143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07360468">
            <text:p>0.007360468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0408014">
            <text:p>0.00408014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-0.0009392216">
            <text:p>-0.0009392216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-0.0003762484">
            <text:p>-0.0003762484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06614702">
            <text:p>0.006614702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0139273">
            <text:p>0.00139273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3041641">
            <text:p>0.03041641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005678816">
            <text:p>0.0005678816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-0.002005243">
            <text:p>-0.002005243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1291322">
            <text:p>0.01291322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1472958">
            <text:p>0.01472958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04942155">
            <text:p>0.004942155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-0.006375644">
            <text:p>-0.006375644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268796">
            <text:p>0.0268796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1325892">
            <text:p>0.01325892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-0.002399117">
            <text:p>-0.002399117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07947459">
            <text:p>0.007947459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0569438">
            <text:p>0.00569438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string">
            <text:p>-2.175681E-05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003206581">
            <text:p>0.0003206581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174276">
            <text:p>0.0174276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1771358">
            <text:p>0.01771358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06382425">
            <text:p>0.006382425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1729658">
            <text:p>0.01729658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-0.003529673">
            <text:p>-0.003529673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02371625">
            <text:p>0.002371625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-0.003144493">
            <text:p>-0.003144493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-0.00296159">
            <text:p>-0.00296159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08715253">
            <text:p>0.008715253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1942649">
            <text:p>0.01942649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-0.003697218">
            <text:p>-0.003697218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3051868">
            <text:p>0.03051868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06132902">
            <text:p>0.006132902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02930016">
            <text:p>0.002930016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-0.004688136">
            <text:p>-0.004688136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-0.005228196">
            <text:p>-0.005228196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-0.001399574">
            <text:p>-0.001399574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183132">
            <text:p>0.0183132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2280119">
            <text:p>0.02280119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0147046">
            <text:p>0.00147046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006771485">
            <text:p>0.0006771485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-0.003031049">
            <text:p>-0.003031049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1896643">
            <text:p>0.01896643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06842616">
            <text:p>0.006842616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-0.007415933">
            <text:p>-0.007415933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-0.0004141594">
            <text:p>-0.0004141594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07092408">
            <text:p>0.007092408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008298985">
            <text:p>0.0008298985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01511298">
            <text:p>0.001511298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2027757">
            <text:p>0.02027757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-0.002396486">
            <text:p>-0.002396486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1932915">
            <text:p>0.01932915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-0.001254758">
            <text:p>-0.001254758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1584542">
            <text:p>0.01584542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04374337">
            <text:p>0.004374337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-0.003252687">
            <text:p>-0.003252687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1314941">
            <text:p>0.01314941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1382908">
            <text:p>0.01382908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-0.00145181">
            <text:p>-0.00145181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-0.006530114">
            <text:p>-0.006530114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-0.007747329">
            <text:p>-0.007747329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-0.001925797">
            <text:p>-0.001925797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-0.0008682403">
            <text:p>-0.0008682403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06744353">
            <text:p>0.006744353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1294553">
            <text:p>0.01294553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02517498">
            <text:p>0.002517498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-0.003593539">
            <text:p>-0.003593539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09043631">
            <text:p>0.009043631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001697737">
            <text:p>0.0001697737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04283861">
            <text:p>0.004283861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-0.00156304">
            <text:p>-0.00156304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-0.00409554">
            <text:p>-0.00409554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-0.0005720203">
            <text:p>-0.0005720203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1220152">
            <text:p>0.01220152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-0.004996031">
            <text:p>-0.004996031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-0.001194918">
            <text:p>-0.001194918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02293708">
            <text:p>0.002293708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1141668">
            <text:p>0.01141668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06404021">
            <text:p>0.006404021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0299247">
            <text:p>0.00299247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1503992">
            <text:p>0.01503992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1241038">
            <text:p>0.01241038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09192459">
            <text:p>0.009192459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04791857">
            <text:p>0.004791857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02075318">
            <text:p>0.002075318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2248196">
            <text:p>0.02248196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-0.003088419">
            <text:p>-0.003088419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-0.004308126">
            <text:p>-0.004308126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002410269">
            <text:p>0.0002410269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-0.0002301498">
            <text:p>-0.0002301498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-0.00109639">
            <text:p>-0.00109639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-0.001952281">
            <text:p>-0.001952281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0983675">
            <text:p>0.00983675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1022593">
            <text:p>0.01022593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1399686">
            <text:p>0.01399686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1329106">
            <text:p>0.01329106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02650674">
            <text:p>0.002650674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-0.003173097">
            <text:p>-0.003173097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03202754">
            <text:p>0.003202754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-0.0002232679">
            <text:p>-0.0002232679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-0.00292548">
            <text:p>-0.00292548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0192202">
            <text:p>0.00192202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-0.0001779912">
            <text:p>-0.0001779912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-0.006214656">
            <text:p>-0.006214656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1209484">
            <text:p>0.01209484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05236765">
            <text:p>0.005236765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163331">
            <text:p>0.0163331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string">
            <text:p>-2.153002E-05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08224081">
            <text:p>0.008224081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3047794">
            <text:p>0.03047794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0754548">
            <text:p>0.00754548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01628962">
            <text:p>0.001628962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string">
            <text:p>-2.807511E-05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09256748">
            <text:p>0.009256748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-0.0006560801">
            <text:p>-0.0006560801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06067005">
            <text:p>0.006067005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3061532">
            <text:p>0.03061532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-0.004787388">
            <text:p>-0.004787388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2929581">
            <text:p>0.02929581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-0.00570071">
            <text:p>-0.00570071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2352612">
            <text:p>0.02352612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1098072">
            <text:p>0.01098072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01245191">
            <text:p>0.001245191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0654173">
            <text:p>0.00654173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02902277">
            <text:p>0.002902277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-0.008446382">
            <text:p>-0.008446382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-0.002097777">
            <text:p>-0.002097777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01741163">
            <text:p>0.001741163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03028934">
            <text:p>0.003028934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08525318">
            <text:p>0.008525318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-0.006861422">
            <text:p>-0.006861422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-0.001614266">
            <text:p>-0.001614266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224471">
            <text:p>0.0224471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0655172">
            <text:p>0.00655172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08024654">
            <text:p>0.008024654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-0.001676777">
            <text:p>-0.001676777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-0.00739266">
            <text:p>-0.00739266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-0.005644624">
            <text:p>-0.005644624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02343733">
            <text:p>0.002343733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-0.002143343">
            <text:p>-0.002143343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05284782">
            <text:p>0.005284782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string">
            <text:p>-7.939486E-05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1039592">
            <text:p>0.01039592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1240156">
            <text:p>0.01240156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03093611">
            <text:p>0.003093611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1406268">
            <text:p>0.01406268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01094699">
            <text:p>0.001094699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02564243">
            <text:p>0.002564243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-0.001601426">
            <text:p>-0.001601426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08407321">
            <text:p>0.008407321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-0.0003051513">
            <text:p>-0.0003051513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-0.005543641">
            <text:p>-0.005543641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04458862">
            <text:p>0.004458862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-0.002175354">
            <text:p>-0.002175354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-0.0006082565">
            <text:p>-0.0006082565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04703934">
            <text:p>0.004703934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-0.005881185">
            <text:p>-0.005881185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009247033">
            <text:p>0.0009247033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-0.007299702">
            <text:p>-0.007299702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07971393">
            <text:p>0.007971393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-0.004019448">
            <text:p>-0.004019448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05501279">
            <text:p>0.005501279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-0.004374447">
            <text:p>-0.004374447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04656684">
            <text:p>0.004656684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2164949">
            <text:p>0.02164949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06655138">
            <text:p>0.006655138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2694551">
            <text:p>0.02694551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04628403">
            <text:p>0.004628403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2008595">
            <text:p>0.02008595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-0.006296349">
            <text:p>-0.006296349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-0.003162027">
            <text:p>-0.003162027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-0.01155259">
            <text:p>-0.01155259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0893662">
            <text:p>0.00893662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-0.00326312">
            <text:p>-0.00326312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07526598">
            <text:p>0.007526598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004837749">
            <text:p>0.0004837749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-0.0005453075">
            <text:p>-0.0005453075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1979631">
            <text:p>0.01979631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002007478">
            <text:p>0.0002007478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065603">
            <text:p>0.01065603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-0.009368393">
            <text:p>-0.009368393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01954376">
            <text:p>0.001954376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-0.009473981">
            <text:p>-0.009473981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01384414">
            <text:p>0.001384414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-0.007552133">
            <text:p>-0.007552133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-0.01017665">
            <text:p>-0.01017665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02710703">
            <text:p>0.002710703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-0.001554071">
            <text:p>-0.001554071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1910636">
            <text:p>0.01910636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-0.001130883">
            <text:p>-0.001130883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03149675">
            <text:p>0.003149675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168625">
            <text:p>0.02168625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02232027">
            <text:p>0.002232027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-0.001435644">
            <text:p>-0.001435644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05191402">
            <text:p>0.005191402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-0.002798447">
            <text:p>-0.002798447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175719">
            <text:p>0.0175719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144746">
            <text:p>0.01144746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06259923">
            <text:p>0.006259923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187308">
            <text:p>0.0187308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09288693">
            <text:p>0.009288693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-0.005845046">
            <text:p>-0.005845046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-0.00425621">
            <text:p>-0.00425621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-0.008235238">
            <text:p>-0.008235238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1580828">
            <text:p>0.01580828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300826">
            <text:p>0.03300826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-0.003493521">
            <text:p>-0.003493521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-0.005457875">
            <text:p>-0.005457875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-0.0004710519">
            <text:p>-0.0004710519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-0.005673052">
            <text:p>-0.005673052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-0.002725558">
            <text:p>-0.002725558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-0.006691468">
            <text:p>-0.006691468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06350724">
            <text:p>0.006350724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05449343">
            <text:p>0.005449343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1449303">
            <text:p>0.001449303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03207859">
            <text:p>0.003207859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04074196">
            <text:p>0.004074196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-0.006351791">
            <text:p>-0.006351791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-0.002583703">
            <text:p>-0.002583703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-0.009237234">
            <text:p>-0.009237234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06902389">
            <text:p>0.006902389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03318789">
            <text:p>0.003318789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1647291">
            <text:p>0.01647291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1173311">
            <text:p>-0.01173311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-0.005812954">
            <text:p>-0.005812954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-0.0008643058">
            <text:p>-0.0008643058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09161849">
            <text:p>-0.009161849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05844822">
            <text:p>0.005844822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05780502">
            <text:p>0.005780502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-0.0002939257">
            <text:p>-0.0002939257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1737128">
            <text:p>0.001737128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300111">
            <text:p>0.01300111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-0.003582814">
            <text:p>-0.003582814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03663312">
            <text:p>0.003663312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203002">
            <text:p>0.01203002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03132256">
            <text:p>0.003132256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-0.002908209">
            <text:p>-0.002908209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-0.004629893">
            <text:p>-0.004629893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-0.004789527">
            <text:p>-0.004789527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-0.0003016522">
            <text:p>-0.0003016522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2938606">
            <text:p>0.002938606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07222922">
            <text:p>0.007222922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8951538">
            <text:p>-0.008951538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-0.003321192">
            <text:p>-0.003321192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-0.0002216366">
            <text:p>-0.0002216366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-0.0008705418">
            <text:p>-0.0008705418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2027185">
            <text:p>0.002027185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string">
            <text:p>1.051056E-07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2629211">
            <text:p>0.002629211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-0.0002382546">
            <text:p>-0.0002382546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3241764">
            <text:p>0.003241764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string">
            <text:p>8.164276E-05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05486328">
            <text:p>0.005486328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-0.0007409722">
            <text:p>-0.0007409722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-0.007595032">
            <text:p>-0.007595032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-0.001627184">
            <text:p>-0.001627184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4828138">
            <text:p>0.004828138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-0.0008902014">
            <text:p>-0.0008902014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7826961">
            <text:p>-0.007826961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06739047">
            <text:p>0.006739047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07497951">
            <text:p>0.007497951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-0.0002712408">
            <text:p>-0.0002712408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06977676">
            <text:p>0.006977676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8304484">
            <text:p>-0.008304484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340726">
            <text:p>0.01340726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09246015">
            <text:p>0.009246015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2177496">
            <text:p>0.002177496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-0.005322342">
            <text:p>-0.005322342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1636492">
            <text:p>0.01636492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-0.006919903">
            <text:p>-0.006919903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1966105">
            <text:p>0.01966105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-0.00302011">
            <text:p>-0.00302011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08755676">
            <text:p>0.008755676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07811821">
            <text:p>0.007811821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1079385">
            <text:p>0.001079385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-0.0002047252">
            <text:p>-0.0002047252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-0.004047781">
            <text:p>-0.004047781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2762083">
            <text:p>0.002762083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3073177">
            <text:p>0.003073177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1571762">
            <text:p>0.001571762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09592029">
            <text:p>0.009592029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-0.003585345">
            <text:p>-0.003585345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-0.006870242">
            <text:p>-0.006870242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-0.006775658">
            <text:p>-0.006775658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1401127">
            <text:p>-0.01401127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06359126">
            <text:p>0.006359126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1204257">
            <text:p>-0.01204257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1046866">
            <text:p>0.001046866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06648549">
            <text:p>0.006648549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01894344">
            <text:p>0.0001894344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-0.002297885">
            <text:p>-0.002297885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-0.002802626">
            <text:p>-0.002802626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-0.001803373">
            <text:p>-0.001803373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08076551">
            <text:p>0.008076551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2942472">
            <text:p>0.002942472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7218391">
            <text:p>-0.007218391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540879">
            <text:p>0.01540879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3649841">
            <text:p>0.003649841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-0.005849294">
            <text:p>-0.005849294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-0.006303384">
            <text:p>-0.006303384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02259232">
            <text:p>0.0002259232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-0.001472595">
            <text:p>-0.001472595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8235457">
            <text:p>-0.008235457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570609">
            <text:p>0.01570609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2880375">
            <text:p>0.002880375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371331">
            <text:p>0.01371331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4305968">
            <text:p>0.004305968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08290949">
            <text:p>0.008290949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-0.0001692883">
            <text:p>-0.0001692883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069029">
            <text:p>0.01069029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08003592">
            <text:p>0.008003592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6846705">
            <text:p>-0.006846705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1620694">
            <text:p>0.001620694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08153855">
            <text:p>0.008153855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9465106">
            <text:p>-0.009465106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-0.003935634">
            <text:p>-0.003935634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019815">
            <text:p>0.01019815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string">
            <text:p>6.288573E-05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-0.001279517">
            <text:p>-0.001279517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-0.004241044">
            <text:p>-0.004241044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-0.002874179">
            <text:p>-0.002874179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6373371">
            <text:p>-0.006373371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1055018">
            <text:p>-0.01055018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7366693">
            <text:p>-0.007366693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3278884">
            <text:p>0.003278884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2020767">
            <text:p>0.002020767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58133">
            <text:p>0.0158133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081127">
            <text:p>0.01081127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2777356">
            <text:p>0.002777356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1215658">
            <text:p>-0.01215658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169846">
            <text:p>0.02169846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1171848">
            <text:p>-0.01171848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-0.004413477">
            <text:p>-0.004413477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-0.003026251">
            <text:p>-0.003026251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2760718">
            <text:p>0.002760718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-0.002886879">
            <text:p>-0.002886879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07576952">
            <text:p>0.007576952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8770533">
            <text:p>-0.008770533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1016768">
            <text:p>-0.01016768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1885379">
            <text:p>0.001885379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2498177">
            <text:p>0.002498177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07188619">
            <text:p>0.007188619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-0.004137916">
            <text:p>-0.004137916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246138">
            <text:p>0.01246138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6767126">
            <text:p>-0.006767126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-0.004900186">
            <text:p>-0.004900186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4110455">
            <text:p>0.004110455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349959">
            <text:p>0.01349959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056974">
            <text:p>0.01056974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599109">
            <text:p>0.00599109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07096358">
            <text:p>0.007096358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9510407">
            <text:p>-0.009510407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08603198">
            <text:p>0.008603198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-0.0005956554">
            <text:p>-0.0005956554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8317268">
            <text:p>-0.008317268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09349003">
            <text:p>0.009349003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01331844">
            <text:p>0.0001331844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8672026">
            <text:p>-0.008672026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1312141">
            <text:p>-0.01312141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-0.003335871">
            <text:p>-0.003335871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2311129">
            <text:p>0.002311129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-0.0008355269">
            <text:p>-0.0008355269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5782841">
            <text:p>-0.005782841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08852526">
            <text:p>0.008852526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-0.004023835">
            <text:p>-0.004023835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4275459">
            <text:p>0.004275459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-0.004045581">
            <text:p>-0.004045581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4159679">
            <text:p>0.004159679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string">
            <text:p>-8.80416E-05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-0.003052381">
            <text:p>-0.003052381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-0.003332217">
            <text:p>-0.003332217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1137303">
            <text:p>0.001137303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7369116">
            <text:p>-0.007369116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828312">
            <text:p>0.01828312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-0.002453287">
            <text:p>-0.002453287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2330017">
            <text:p>0.002330017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5769456">
            <text:p>0.005769456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3252808">
            <text:p>0.003252808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-0.0006041774">
            <text:p>-0.0006041774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07420964">
            <text:p>0.007420964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08605682">
            <text:p>0.008605682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5333091">
            <text:p>-0.005333091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5490573">
            <text:p>0.005490573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-0.0001826873">
            <text:p>-0.0001826873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3074468">
            <text:p>0.003074468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-0.002005243">
            <text:p>-0.002005243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7278719">
            <text:p>-0.007278719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004087">
            <text:p>0.01004087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6109553">
            <text:p>-0.006109553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4103509">
            <text:p>-0.004103509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-0.001225518">
            <text:p>-0.001225518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2360368">
            <text:p>0.002360368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2108294">
            <text:p>0.002108294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-0.001218741">
            <text:p>-0.001218741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-0.003212033">
            <text:p>-0.003212033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-0.004731107">
            <text:p>-0.004731107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1692527">
            <text:p>0.001692527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5249906">
            <text:p>0.005249906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1232557">
            <text:p>-0.01232557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05116938">
            <text:p>0.0005116938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7577311">
            <text:p>-0.007577311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2304441">
            <text:p>0.002304441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-0.003779106">
            <text:p>-0.003779106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6231551">
            <text:p>-0.006231551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6577619">
            <text:p>-0.006577619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-0.001762637">
            <text:p>-0.001762637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2280507">
            <text:p>0.002280507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-0.002797049">
            <text:p>-0.002797049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5726659">
            <text:p>-0.005726659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-0.001632282">
            <text:p>-0.001632282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03287481">
            <text:p>0.0003287481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9037341">
            <text:p>-0.009037341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-0.00200809">
            <text:p>-0.00200809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1113515">
            <text:p>-0.01113515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9430282">
            <text:p>-0.009430282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6294011">
            <text:p>-0.006294011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-0.004062686">
            <text:p>-0.004062686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6889343">
            <text:p>-0.006889343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8103736">
            <text:p>-0.008103736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3719348">
            <text:p>0.003719348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1274561">
            <text:p>-0.01274561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5444896">
            <text:p>-0.005444896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9876032">
            <text:p>-0.009876032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4664361">
            <text:p>0.004664361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6881475">
            <text:p>-0.006881475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7902062">
            <text:p>0.007902062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08838723">
            <text:p>0.008838723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5997657">
            <text:p>-0.005997657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-0.000129227">
            <text:p>-0.000129227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092716">
            <text:p>0.01092716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2450363">
            <text:p>0.002450363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6055626">
            <text:p>-0.006055626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237388">
            <text:p>0.01237388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-0.001900131">
            <text:p>-0.001900131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-0.0006922075">
            <text:p>-0.0006922075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4352442">
            <text:p>-0.004352442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1633886">
            <text:p>0.001633886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9750837">
            <text:p>-0.009750837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8657107">
            <text:p>-0.008657107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05331716">
            <text:p>0.0005331716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-0.001977488">
            <text:p>-0.001977488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1764659">
            <text:p>0.001764659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-0.003298064">
            <text:p>-0.003298064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789741">
            <text:p>0.00789741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2998454">
            <text:p>0.002998454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1208155">
            <text:p>-0.01208155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02152142">
            <text:p>0.0002152142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8774718">
            <text:p>-0.008774718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1093558">
            <text:p>-0.01093558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155229">
            <text:p>0.01155229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-0.00247423">
            <text:p>-0.00247423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-0.006302855">
            <text:p>-0.006302855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08222416">
            <text:p>0.008222416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2932776">
            <text:p>0.002932776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6715141">
            <text:p>-0.006715141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4006593">
            <text:p>-0.004006593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7238013">
            <text:p>-0.007238013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8523281">
            <text:p>-0.008523281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5612988">
            <text:p>-0.005612988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4045809">
            <text:p>-0.004045809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5574229">
            <text:p>-0.005574229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-0.0005695468">
            <text:p>-0.0005695468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-0.001700444">
            <text:p>-0.001700444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721197">
            <text:p>0.01721197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3459499">
            <text:p>0.003459499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4785184">
            <text:p>0.004785184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4150899">
            <text:p>0.004150899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5890255">
            <text:p>-0.005890255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5425763">
            <text:p>-0.005425763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273876">
            <text:p>0.00273876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1204115">
            <text:p>0.001204115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-0.001644273">
            <text:p>-0.001644273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2497975">
            <text:p>0.002497975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340329">
            <text:p>0.02340329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9230153">
            <text:p>-0.009230153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-0.001130973">
            <text:p>-0.001130973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4351313">
            <text:p>0.04351313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2422548">
            <text:p>0.002422548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3557822">
            <text:p>0.003557822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-0.003039525">
            <text:p>-0.003039525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244236">
            <text:p>0.01244236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1326601">
            <text:p>0.001326601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1146197">
            <text:p>-0.01146197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09847787">
            <text:p>0.009847787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8661182">
            <text:p>-0.008661182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708485">
            <text:p>-0.00708485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7689682">
            <text:p>0.007689682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2824659">
            <text:p>0.002824659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324625">
            <text:p>0.01324625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2824879">
            <text:p>0.002824879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5155754">
            <text:p>0.005155754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-0.001147772">
            <text:p>-0.001147772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222984">
            <text:p>0.00222984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-0.001986115">
            <text:p>-0.001986115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-0.0008170953">
            <text:p>-0.0008170953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9671478">
            <text:p>-0.009671478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7010365">
            <text:p>-0.007010365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1348266">
            <text:p>-0.01348266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-0.002560258">
            <text:p>-0.002560258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5702807">
            <text:p>-0.005702807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346334">
            <text:p>0.01346334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8890848">
            <text:p>-0.008890848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-0.002641841">
            <text:p>-0.002641841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-0.0008257008">
            <text:p>-0.0008257008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-0.001891241">
            <text:p>-0.001891241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-0.002121909">
            <text:p>-0.002121909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9431001">
            <text:p>0.009431001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-0.002788413">
            <text:p>-0.002788413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4195862">
            <text:p>-0.004195862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122551">
            <text:p>-0.0122551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-0.001623093">
            <text:p>-0.001623093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07528448">
            <text:p>0.0007528448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2837387">
            <text:p>0.002837387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8353721">
            <text:p>-0.008353721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1040883">
            <text:p>-0.01040883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09701402">
            <text:p>0.009701402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1571057">
            <text:p>0.001571057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3940299">
            <text:p>-0.003940299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-0.003237355">
            <text:p>-0.003237355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8826716">
            <text:p>-0.008826716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755233">
            <text:p>0.02755233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9208731">
            <text:p>-0.009208731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353006">
            <text:p>0.01353006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889915">
            <text:p>-0.00889915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7231038">
            <text:p>-0.007231038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1088141">
            <text:p>-0.01088141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9406908">
            <text:p>-0.009406908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1381539">
            <text:p>-0.01381539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7423037">
            <text:p>0.007423037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3207772">
            <text:p>0.003207772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881922">
            <text:p>-0.00881922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-0.0003331862">
            <text:p>-0.0003331862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7753752">
            <text:p>-0.007753752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86531">
            <text:p>0.0286531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687033">
            <text:p>0.00687033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433206">
            <text:p>0.01433206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1878618">
            <text:p>0.001878618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9927544">
            <text:p>-0.009927544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4916209">
            <text:p>-0.004916209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2717129">
            <text:p>0.002717129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3232791">
            <text:p>0.003232791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764703">
            <text:p>0.02764703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2430583">
            <text:p>-0.002430583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-0.00140964">
            <text:p>-0.00140964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6687022">
            <text:p>0.006687022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-0.001384084">
            <text:p>-0.001384084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01443916">
            <text:p>0.0001443916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3471928">
            <text:p>0.003471928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151612">
            <text:p>0.01151612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-0.002861292">
            <text:p>-0.002861292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4210955">
            <text:p>-0.004210955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871748">
            <text:p>0.02871748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117168">
            <text:p>0.01117168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08165429">
            <text:p>0.0008165429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-0.00180801">
            <text:p>-0.00180801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1685402">
            <text:p>0.001685402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232827">
            <text:p>0.01232827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1853252">
            <text:p>0.001853252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04279384">
            <text:p>0.0004279384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80569">
            <text:p>-0.0080569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4851873">
            <text:p>-0.004851873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3289539">
            <text:p>0.003289539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6053201">
            <text:p>-0.006053201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599797">
            <text:p>0.01599797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6380448">
            <text:p>0.006380448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5853098">
            <text:p>-0.005853098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5745444">
            <text:p>0.005745444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1175008">
            <text:p>-0.01175008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625775">
            <text:p>-0.00625775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4636559">
            <text:p>0.004636559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058875">
            <text:p>0.01058875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6348869">
            <text:p>-0.006348869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5565627">
            <text:p>-0.005565627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8569019">
            <text:p>0.008569019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761408">
            <text:p>0.01761408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-0.002224945">
            <text:p>-0.002224945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-0.0001412734">
            <text:p>-0.0001412734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4230695">
            <text:p>-0.004230695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2506462">
            <text:p>-0.002506462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3334014">
            <text:p>-0.003334014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7151845">
            <text:p>-0.007151845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-0.0002401953">
            <text:p>-0.0002401953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373263">
            <text:p>0.01373263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1201879">
            <text:p>-0.01201879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6623372">
            <text:p>0.006623372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6711181">
            <text:p>-0.006711181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3755491">
            <text:p>-0.003755491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6116154">
            <text:p>-0.006116154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7227512">
            <text:p>-0.007227512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047732">
            <text:p>0.01047732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5658153">
            <text:p>-0.005658153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8059068">
            <text:p>-0.008059068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1130948">
            <text:p>-0.01130948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1052428">
            <text:p>-0.01052428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137802">
            <text:p>0.00137802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-0.0005825146">
            <text:p>-0.0005825146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5096423">
            <text:p>-0.005096423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156776">
            <text:p>0.01156776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3901946">
            <text:p>-0.003901946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08319785">
            <text:p>0.0008319785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419631">
            <text:p>0.01419631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3529488">
            <text:p>-0.003529488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3258772">
            <text:p>-0.003258772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2124763">
            <text:p>0.02124763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-0.002987482">
            <text:p>-0.002987482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305443">
            <text:p>0.00305443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5367696">
            <text:p>0.005367696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522184">
            <text:p>-0.00522184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950774">
            <text:p>0.00950774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-0.0001589917">
            <text:p>-0.0001589917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9576956">
            <text:p>-0.009576956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1083895">
            <text:p>-0.01083895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08335858">
            <text:p>0.0008335858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046677">
            <text:p>0.004046677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38158">
            <text:p>0.0038158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8817787">
            <text:p>-0.008817787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108815">
            <text:p>0.00108815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3813962">
            <text:p>0.003813962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7793029">
            <text:p>0.007793029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3740419">
            <text:p>-0.003740419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1883943">
            <text:p>0.001883943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3938412">
            <text:p>0.003938412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5651652">
            <text:p>-0.005651652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4052251">
            <text:p>-0.004052251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6096616">
            <text:p>-0.006096616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293846">
            <text:p>0.01293846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1124291">
            <text:p>-0.01124291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2497647">
            <text:p>-0.002497647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1042823">
            <text:p>0.001042823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1848426">
            <text:p>0.001848426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-0.000229481">
            <text:p>-0.000229481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7149657">
            <text:p>-0.007149657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7934473">
            <text:p>-0.007934473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1758392">
            <text:p>0.001758392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2912537">
            <text:p>-0.002912537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30525">
            <text:p>-0.0030525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6462428">
            <text:p>0.006462428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04662095">
            <text:p>0.0004662095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9421754">
            <text:p>-0.009421754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9727678">
            <text:p>0.009727678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3138418">
            <text:p>-0.003138418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8295706">
            <text:p>-0.008295706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1036661">
            <text:p>0.001036661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-0.0009220928">
            <text:p>-0.0009220928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-0.0001154999">
            <text:p>-0.0001154999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1107609">
            <text:p>-0.01107609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9046074">
            <text:p>-0.009046074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3617639">
            <text:p>0.003617639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5290586">
            <text:p>-0.005290586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380581">
            <text:p>0.01380581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1051634">
            <text:p>-0.01051634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5142562">
            <text:p>-0.005142562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-0.002319117">
            <text:p>-0.002319117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7610008">
            <text:p>0.007610008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3895823">
            <text:p>0.003895823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8451799">
            <text:p>-0.008451799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772597">
            <text:p>0.00772597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6685107">
            <text:p>-0.006685107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1164074">
            <text:p>-0.01164074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5756205">
            <text:p>-0.005756205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964188">
            <text:p>0.01964188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882663">
            <text:p>0.01882663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774523">
            <text:p>0.01774523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1170143">
            <text:p>-0.01170143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-0.001279629">
            <text:p>-0.001279629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4198271">
            <text:p>0.004198271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5636544">
            <text:p>0.005636544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90616">
            <text:p>-0.0090616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3031076">
            <text:p>-0.003031076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1312835">
            <text:p>-0.01312835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100647">
            <text:p>0.0100647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4320676">
            <text:p>0.004320676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-0.001274376">
            <text:p>-0.001274376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3544713">
            <text:p>0.003544713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53718">
            <text:p>0.0153718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4852044">
            <text:p>-0.004852044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280723">
            <text:p>0.004280723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2500352">
            <text:p>0.002500352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4087113">
            <text:p>0.004087113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1119782">
            <text:p>-0.01119782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5276876">
            <text:p>-0.005276876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05736666">
            <text:p>0.0005736666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9243809">
            <text:p>-0.009243809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2445497">
            <text:p>0.002445497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2532401">
            <text:p>-0.002532401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7392803">
            <text:p>-0.007392803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-0.000862665">
            <text:p>-0.000862665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9744376">
            <text:p>-0.009744376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1250471">
            <text:p>-0.01250471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4864678">
            <text:p>0.004864678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07806983">
            <text:p>0.0007806983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-0.0004832447">
            <text:p>-0.0004832447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-0.001160798">
            <text:p>-0.001160798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02385086">
            <text:p>0.0002385086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5515025">
            <text:p>0.005515025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7059294">
            <text:p>-0.007059294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1178154">
            <text:p>-0.01178154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09662243">
            <text:p>0.0009662243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1109113">
            <text:p>-0.001109113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-0.0009047968">
            <text:p>-0.0009047968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1008398">
            <text:p>0.001008398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4318351">
            <text:p>-0.004318351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084897">
            <text:p>0.00084897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8100118">
            <text:p>-0.008100118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206728">
            <text:p>0.005206728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2730188">
            <text:p>-0.002730188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7355857">
            <text:p>-0.007355857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07479642">
            <text:p>0.0007479642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4481895">
            <text:p>-0.004481895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01678257">
            <text:p>0.0001678257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3990173">
            <text:p>0.003990173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7719768">
            <text:p>0.007719768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-0.002153612">
            <text:p>-0.002153612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6582236">
            <text:p>-0.006582236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1050617">
            <text:p>0.01050617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4159674">
            <text:p>-0.004159674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1035273">
            <text:p>-0.01035273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1079143">
            <text:p>-0.01079143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4730097">
            <text:p>0.004730097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8983733">
            <text:p>-0.008983733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09931356">
            <text:p>0.009931356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1138277">
            <text:p>-0.01138277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0167706">
            <text:p>0.000167706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614444">
            <text:p>0.02614444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03657818">
            <text:p>0.0003657818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string">
            <text:p>4.523831E-06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5949883">
            <text:p>0.005949883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227874">
            <text:p>0.005227874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5090296">
            <text:p>-0.005090296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05422395">
            <text:p>0.0005422395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-0.0006337948">
            <text:p>-0.0006337948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973467">
            <text:p>0.01973467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1080601">
            <text:p>-0.01080601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841035">
            <text:p>0.01841035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2794474">
            <text:p>-0.002794474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8753048">
            <text:p>-0.008753048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638064">
            <text:p>0.01638064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4273173">
            <text:p>-0.004273173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9779319">
            <text:p>-0.009779319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1042365">
            <text:p>-0.01042365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7336717">
            <text:p>-0.007336717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2132216">
            <text:p>0.002132216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9843034">
            <text:p>-0.009843034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02194477">
            <text:p>0.0002194477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2884879">
            <text:p>0.002884879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819912">
            <text:p>0.01819912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05415719">
            <text:p>0.0005415719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6743561">
            <text:p>-0.006743561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-0.0002918574">
            <text:p>-0.0002918574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674545">
            <text:p>-0.00674545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6565175">
            <text:p>-0.006565175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203435">
            <text:p>0.00203435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-0.0003693592">
            <text:p>-0.0003693592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489478">
            <text:p>-0.01489478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9673228">
            <text:p>-0.009673228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8794645">
            <text:p>-0.008794645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1238641">
            <text:p>-0.01238641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5866039">
            <text:p>0.005866039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1126868">
            <text:p>-0.01126868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1066686">
            <text:p>-0.01066686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274732">
            <text:p>0.00274732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8884964">
            <text:p>-0.008884964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1014839">
            <text:p>-0.01014839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885125">
            <text:p>0.02885125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380099">
            <text:p>-0.00380099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221627">
            <text:p>-0.00221627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8342956">
            <text:p>-0.008342956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1838025">
            <text:p>0.001838025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1996459">
            <text:p>-0.001996459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-0.001199832">
            <text:p>-0.001199832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4926557">
            <text:p>-0.004926557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9342853">
            <text:p>0.009342853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-0.00121641">
            <text:p>-0.00121641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-0.0006550535">
            <text:p>-0.0006550535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4499562">
            <text:p>-0.004499562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6614485">
            <text:p>-0.006614485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1324027">
            <text:p>-0.01324027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5026196">
            <text:p>0.005026196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1350526">
            <text:p>-0.001350526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293451">
            <text:p>0.01293451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-0.003021979">
            <text:p>-0.003021979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-0.0005439005">
            <text:p>-0.0005439005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3441262">
            <text:p>-0.003441262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1076753">
            <text:p>-0.01076753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45631">
            <text:p>-0.0145631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2141661">
            <text:p>0.002141661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1248921">
            <text:p>-0.01248921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6016754">
            <text:p>-0.006016754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1127655">
            <text:p>-0.01127655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4850065">
            <text:p>0.004850065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1123596">
            <text:p>-0.01123596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02002777">
            <text:p>0.0002002777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2076738">
            <text:p>0.002076738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8702169">
            <text:p>-0.008702169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0.0003721193">
            <text:p>0.0003721193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8938722">
            <text:p>0.008938722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2941129">
            <text:p>0.002941129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-0.001283201">
            <text:p>-0.001283201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6088014">
            <text:p>0.006088014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670093">
            <text:p>0.02670093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9310225">
            <text:p>-0.009310225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1096738">
            <text:p>-0.01096738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255677">
            <text:p>0.01255677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3898007">
            <text:p>0.003898007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3322858">
            <text:p>-0.003322858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1520222">
            <text:p>0.001520222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088637">
            <text:p>0.005088637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2746556">
            <text:p>-0.002746556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31881">
            <text:p>0.0131881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5737563">
            <text:p>0.005737563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509296">
            <text:p>0.01509296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6790891">
            <text:p>-0.006790891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0307375">
            <text:p>0.000307375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9774525">
            <text:p>-0.009774525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4342602">
            <text:p>-0.004342602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8618087">
            <text:p>0.008618087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8673693">
            <text:p>0.008673693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4346257">
            <text:p>0.004346257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3663081">
            <text:p>-0.003663081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800168">
            <text:p>0.01800168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6192861">
            <text:p>-0.006192861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7031839">
            <text:p>-0.007031839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8377186">
            <text:p>-0.008377186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2546886">
            <text:p>-0.002546886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3317579">
            <text:p>0.003317579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434587">
            <text:p>-0.00434587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4555623">
            <text:p>-0.004555623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6588516">
            <text:p>-0.006588516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1043429">
            <text:p>-0.01043429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5686291">
            <text:p>-0.005686291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1784585">
            <text:p>-0.001784585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2163247">
            <text:p>0.002163247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3388103">
            <text:p>-0.003388103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-0.002405857">
            <text:p>-0.002405857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7831465">
            <text:p>0.007831465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-0.0001763651">
            <text:p>-0.0001763651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796937">
            <text:p>0.006796937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9788671">
            <text:p>-0.009788671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1078077">
            <text:p>-0.01078077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363689">
            <text:p>-0.00363689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5157239">
            <text:p>0.005157239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-0.001507011">
            <text:p>-0.001507011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9866549">
            <text:p>-0.009866549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9576545">
            <text:p>-0.009576545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03724957">
            <text:p>-0.0003724957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965689">
            <text:p>0.01965689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499286">
            <text:p>0.003499286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2214014">
            <text:p>-0.002214014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071213">
            <text:p>0.003071213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6083304">
            <text:p>0.006083304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9587483">
            <text:p>0.009587483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1947459">
            <text:p>0.001947459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1305374">
            <text:p>0.001305374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7593028">
            <text:p>-0.007593028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-0.0004472304">
            <text:p>-0.0004472304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4613379">
            <text:p>0.004613379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3164643">
            <text:p>0.003164643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250935">
            <text:p>0.01250935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8408051">
            <text:p>0.008408051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221258">
            <text:p>0.01221258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2514366">
            <text:p>-0.002514366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4447734">
            <text:p>0.004447734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6038884">
            <text:p>0.006038884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2085604">
            <text:p>0.002085604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3013696">
            <text:p>0.003013696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9834739">
            <text:p>-0.009834739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6457154">
            <text:p>0.006457154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683227">
            <text:p>0.002683227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5554843">
            <text:p>0.005554843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4975786">
            <text:p>0.004975786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2687183">
            <text:p>-0.002687183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710522">
            <text:p>0.01710522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5138423">
            <text:p>0.005138423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5356634">
            <text:p>-0.005356634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2697421">
            <text:p>-0.002697421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7581379">
            <text:p>-0.007581379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312152">
            <text:p>0.01312152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4271185">
            <text:p>-0.004271185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8401163">
            <text:p>0.008401163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-0.0008705864">
            <text:p>-0.0008705864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-0.001113425">
            <text:p>-0.001113425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583397">
            <text:p>-0.00583397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1258417">
            <text:p>-0.01258417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4794083">
            <text:p>-0.004794083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121182">
            <text:p>-0.0121182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5159447">
            <text:p>-0.005159447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4458428">
            <text:p>-0.004458428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1493732">
            <text:p>-0.001493732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1114425">
            <text:p>0.01114425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547559">
            <text:p>0.01547559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9645764">
            <text:p>-0.009645764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9198315">
            <text:p>0.009198315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-0.0007691895">
            <text:p>-0.0007691895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8222094">
            <text:p>-0.008222094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6410056">
            <text:p>-0.006410056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521362">
            <text:p>0.02521362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8121083">
            <text:p>-0.008121083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-0.0006709315">
            <text:p>-0.0006709315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1028039">
            <text:p>0.01028039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-0.001278795">
            <text:p>-0.001278795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2073206">
            <text:p>0.02073206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4060434">
            <text:p>-0.004060434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6393183">
            <text:p>0.006393183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7715032">
            <text:p>0.007715032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2639503">
            <text:p>0.002639503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7652821">
            <text:p>-0.007652821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-0.0008620681">
            <text:p>-0.0008620681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406647">
            <text:p>-0.00406647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5047211">
            <text:p>-0.005047211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401965">
            <text:p>0.00401965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416592">
            <text:p>0.01416592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-0.0001050159">
            <text:p>-0.0001050159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1242504">
            <text:p>-0.01242504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2032285">
            <text:p>0.002032285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1091992">
            <text:p>-0.01091992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8527528">
            <text:p>-0.008527528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102536">
            <text:p>-0.0102536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3492649">
            <text:p>0.03492649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9772341">
            <text:p>-0.009772341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6156247">
            <text:p>-0.06156247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630913">
            <text:p>-0.0630913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6482853">
            <text:p>-0.06482853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6438763">
            <text:p>-0.06438763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6562804">
            <text:p>-0.06562804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6547492">
            <text:p>-0.0654749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3:0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3:06:20.57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788cm" svg:y="1.067cm" svg:width="10.68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7500385">
                <text:p>0.007500385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47065">
                <text:p>0.00147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2930157">
                <text:p>0.002930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448905">
                <text:p>0.01448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939628">
                <text:p>0.00939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5475995">
                <text:p>0.005475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92571">
                <text:p>0.0192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2125334">
                <text:p>-0.002125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0.0002791849">
                <text:p>0.0002791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6793441">
                <text:p>0.006793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1029904">
                <text:p>0.01029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446674">
                <text:p>0.01446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4005109">
                <text:p>-0.004005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2196448">
                <text:p>0.002196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-0.000247283">
                <text:p>-0.000247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7485118">
                <text:p>0.007485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287003">
                <text:p>-0.00287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2821963">
                <text:p>0.002821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4605673">
                <text:p>0.04605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7859002">
                <text:p>-0.007859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4641231">
                <text:p>-0.004641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230507">
                <text:p>0.012305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994258">
                <text:p>0.01994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2176889">
                <text:p>-0.002176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6751793">
                <text:p>-0.0067517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4378965">
                <text:p>0.0043789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5498521">
                <text:p>-0.0054985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3307047">
                <text:p>0.003307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1023509">
                <text:p>0.01023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4125313">
                <text:p>0.004125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174995">
                <text:p>0.00174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2078529">
                <text:p>0.02078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1015324">
                <text:p>-0.010153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1080851">
                <text:p>0.001080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03691244">
                <text:p>0.00036912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4994079">
                <text:p>-0.004994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3282595">
                <text:p>0.003282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5617154">
                <text:p>0.005617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4376997">
                <text:p>0.004376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6246657">
                <text:p>0.006246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3581045">
                <text:p>0.003581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05206635">
                <text:p>0.0005206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8480799">
                <text:p>0.008480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940785">
                <text:p>0.019407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4584859">
                <text:p>-0.004584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1100229">
                <text:p>0.01100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801491">
                <text:p>0.028014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884803">
                <text:p>0.018848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475633">
                <text:p>0.0054756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1126468">
                <text:p>0.011264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4615178">
                <text:p>0.0046151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375711">
                <text:p>0.0073757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2265259">
                <text:p>-0.0022652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53739">
                <text:p>0.00537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2320688">
                <text:p>0.023206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3086969">
                <text:p>-0.003086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1052911">
                <text:p>0.01052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3089811">
                <text:p>-0.003089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9162042">
                <text:p>-0.0091620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130278">
                <text:p>-0.00130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3801158">
                <text:p>0.0038011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733901">
                <text:p>0.007339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4139811">
                <text:p>-0.0041398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2172717">
                <text:p>-0.0021727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9709581">
                <text:p>-0.0097095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2090011">
                <text:p>0.002090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604766">
                <text:p>0.0260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326895">
                <text:p>0.001326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9613512">
                <text:p>0.009613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8592098">
                <text:p>0.0085920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873417">
                <text:p>0.01873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3168941">
                <text:p>-0.003168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4333869">
                <text:p>-0.0043338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04643162">
                <text:p>0.0004643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2482623">
                <text:p>0.002482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4000633">
                <text:p>-0.004000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8989732">
                <text:p>0.0089897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4905679">
                <text:p>0.04905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1637543">
                <text:p>0.001637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2250574">
                <text:p>0.0022505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9391679">
                <text:p>-0.0093916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91123">
                <text:p>0.0191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1051582">
                <text:p>0.010515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1104335">
                <text:p>0.01104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4521986">
                <text:p>-0.004521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148954">
                <text:p>0.0051489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816908">
                <text:p>0.01816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298894">
                <text:p>0.012988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3463766">
                <text:p>0.034637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001361">
                <text:p>0.010013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2355401">
                <text:p>0.023554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4662903">
                <text:p>-0.0046629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4497323">
                <text:p>-0.004497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17756">
                <text:p>0.00177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9970054">
                <text:p>0.0099700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1063762">
                <text:p>-0.001063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4998622">
                <text:p>-0.0049986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6194962">
                <text:p>0.0061949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-0.002158065">
                <text:p>-0.0021580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1116744">
                <text:p>-0.011167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4127156">
                <text:p>-0.0041271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2241919">
                <text:p>0.022419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463516">
                <text:p>0.014635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4910008">
                <text:p>0.0049100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9675092">
                <text:p>-0.0096750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-0.0008162492">
                <text:p>-0.00081624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-0.001420842">
                <text:p>-0.0014208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5941784">
                <text:p>0.005941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5876299">
                <text:p>0.058762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349539">
                <text:p>-0.003495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05075051">
                <text:p>0.00050750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1573367">
                <text:p>0.0015733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8431179">
                <text:p>-0.0084311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8785886">
                <text:p>0.0087858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1547683">
                <text:p>0.001547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300148">
                <text:p>-0.013001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-0.0003739049">
                <text:p>-0.00037390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5877103">
                <text:p>0.0058771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157803">
                <text:p>-0.001578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7792428">
                <text:p>-0.007792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711847">
                <text:p>0.017118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1573262">
                <text:p>-0.0015732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9397044">
                <text:p>0.0093970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8941303">
                <text:p>0.0089413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104437">
                <text:p>0.009104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-0.001345235">
                <text:p>-0.0013452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07934766">
                <text:p>0.0079347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8280934">
                <text:p>0.0082809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3559422">
                <text:p>0.035594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737602">
                <text:p>0.0097376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7875605">
                <text:p>0.0078756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1025759">
                <text:p>-0.0010257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109217">
                <text:p>0.011092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2401819">
                <text:p>0.02401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6823449">
                <text:p>-0.0068234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2458554">
                <text:p>0.0024585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936074">
                <text:p>0.019360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3349515">
                <text:p>0.0033495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6996596">
                <text:p>-0.0069965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273364">
                <text:p>-0.002733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2511173">
                <text:p>-0.0025111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1582615">
                <text:p>0.0015826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8082162">
                <text:p>-0.0080821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1118254">
                <text:p>-0.011182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881232">
                <text:p>0.028812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08752478">
                <text:p>0.0008752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3026939">
                <text:p>0.0030269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495925">
                <text:p>-0.004959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3164472">
                <text:p>-0.0031644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5578716">
                <text:p>-0.0055787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93828">
                <text:p>-0.00393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2915623">
                <text:p>-0.0029156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440261">
                <text:p>0.014402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273635">
                <text:p>0.012736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3342761">
                <text:p>-0.0033427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3005867">
                <text:p>0.030058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5768187">
                <text:p>0.0057681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347453">
                <text:p>0.013474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5730573">
                <text:p>-0.0057305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4690264">
                <text:p>-0.004690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3444739">
                <text:p>0.0034447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1023026">
                <text:p>0.010230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6382057">
                <text:p>-0.0063820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1072502">
                <text:p>0.010725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2466478">
                <text:p>0.0024664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199328">
                <text:p>0.011993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4052144">
                <text:p>0.0040521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4759358">
                <text:p>0.0047593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-0.0005245752">
                <text:p>-0.00052457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927158">
                <text:p>0.01927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2267685">
                <text:p>0.0022676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2082341">
                <text:p>0.020823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7068393">
                <text:p>0.0070683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9910389">
                <text:p>0.0099103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9933515">
                <text:p>-0.0099335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2145403">
                <text:p>0.021454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899894">
                <text:p>0.018998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724237">
                <text:p>0.017242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5750095">
                <text:p>-0.0057500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06508277">
                <text:p>-0.00065082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3988998">
                <text:p>-0.0039889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4888016">
                <text:p>-0.0048880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723182">
                <text:p>0.01723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5899278">
                <text:p>0.0058992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786398">
                <text:p>0.027863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227738">
                <text:p>0.0227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796899">
                <text:p>0.017968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3030858">
                <text:p>-0.0030308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4271696">
                <text:p>-0.004271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-0.0001018498">
                <text:p>-0.00010184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221178">
                <text:p>0.012211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565975">
                <text:p>0.005659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-0.001627023">
                <text:p>-0.001627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347378">
                <text:p>0.013473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5135443">
                <text:p>-0.0051354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8400897">
                <text:p>0.0084008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788986">
                <text:p>0.017889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335179">
                <text:p>0.01335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3946328">
                <text:p>-0.0039463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9294792">
                <text:p>-0.0092947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9398627">
                <text:p>0.0093986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01316792">
                <text:p>0.00013167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365031">
                <text:p>-0.003650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5156946">
                <text:p>-0.0051569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02063073">
                <text:p>0.00020630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65367">
                <text:p>0.004653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1011483">
                <text:p>-0.010114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1187499">
                <text:p>0.011874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3820375">
                <text:p>-0.003820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5533414">
                <text:p>0.0055334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5505307">
                <text:p>-0.0055053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-0.0003697961">
                <text:p>-0.00036979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-0.000648929">
                <text:p>-0.0006489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-0.001111197">
                <text:p>-0.0011111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601453">
                <text:p>0.006014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291787">
                <text:p>0.012917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2882015">
                <text:p>-0.0028820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-0.0001460028">
                <text:p>-0.00014600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685669">
                <text:p>0.02685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8325179">
                <text:p>-0.0083251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7321566">
                <text:p>-0.0073215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2709296">
                <text:p>0.0027092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2461896">
                <text:p>-0.0024618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296201">
                <text:p>0.012962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247027">
                <text:p>0.012470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2850347">
                <text:p>-0.0028503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366938">
                <text:p>-0.003669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5236921">
                <text:p>-0.0052369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250376">
                <text:p>0.00250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2893784">
                <text:p>-0.0028937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4709487">
                <text:p>-0.0047094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85146">
                <text:p>0.001851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282096">
                <text:p>0.01282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3521172">
                <text:p>0.035211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1114787">
                <text:p>-0.011147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1066395">
                <text:p>-0.010663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3031116">
                <text:p>0.0030311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4641005">
                <text:p>-0.004641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5460602">
                <text:p>0.0054606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464767">
                <text:p>-0.014647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3857214">
                <text:p>0.0038572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2680575">
                <text:p>-0.0026805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1877156">
                <text:p>0.0018771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8658964">
                <text:p>0.0086589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05972374">
                <text:p>0.00059723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425167">
                <text:p>0.01425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9740307">
                <text:p>-0.0097403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1574151">
                <text:p>-0.0015741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2808017">
                <text:p>-0.0028080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37536">
                <text:p>0.02375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-0.0005069144">
                <text:p>-0.00050691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5486201">
                <text:p>0.0054862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-0.0002212539">
                <text:p>-0.00022125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182189">
                <text:p>0.011821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1109204">
                <text:p>-0.011092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1153258">
                <text:p>-0.011532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9415953">
                <text:p>0.0094159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3412039">
                <text:p>0.0034120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842894">
                <text:p>-0.008428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5573773">
                <text:p>-0.0055737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577844">
                <text:p>0.015778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07077">
                <text:p>0.01070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1154337">
                <text:p>0.011543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8781074">
                <text:p>-0.008781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2424462">
                <text:p>-0.0024244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466053">
                <text:p>0.004660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471377">
                <text:p>0.0034713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6399574">
                <text:p>0.0063995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4976645">
                <text:p>0.0049766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680349">
                <text:p>0.016803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235403">
                <text:p>-0.012354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4237074">
                <text:p>0.0042370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168347">
                <text:p>0.001683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31351">
                <text:p>0.01313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1050164">
                <text:p>0.010501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119969">
                <text:p>-0.01199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181294">
                <text:p>0.011812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09461866">
                <text:p>0.00094618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1094129">
                <text:p>-0.010941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1773234">
                <text:p>0.0017732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-0.001459906">
                <text:p>-0.0014599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1833176">
                <text:p>0.0018331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6103077">
                <text:p>0.0061030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078945">
                <text:p>-0.0020789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20659">
                <text:p>0.00206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96649">
                <text:p>0.01966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618725">
                <text:p>-0.006187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8648465">
                <text:p>-0.0086484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863303">
                <text:p>0.018633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248113">
                <text:p>0.012481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2417869">
                <text:p>-0.0024178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3641148">
                <text:p>-0.0036411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4832906">
                <text:p>0.0048329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4231062">
                <text:p>0.0042310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1032567">
                <text:p>0.010325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208489">
                <text:p>-0.002084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6143182">
                <text:p>-0.0061431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821432">
                <text:p>0.018214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5877647">
                <text:p>-0.0058776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5374346">
                <text:p>0.0053743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1857698">
                <text:p>0.0018576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5232175">
                <text:p>0.0052321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4591479">
                <text:p>0.0045914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4671119">
                <text:p>0.0046711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205055">
                <text:p>0.002050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352984">
                <text:p>0.013529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04669889">
                <text:p>0.00046698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8420448">
                <text:p>0.0084204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3707285">
                <text:p>-0.0037072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3730033">
                <text:p>0.0037300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809684">
                <text:p>0.0038096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-0.001536244">
                <text:p>-0.0015362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1023535">
                <text:p>0.010235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421012">
                <text:p>0.014210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724925">
                <text:p>0.017249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8218132">
                <text:p>-0.0082181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067323">
                <text:p>0.010673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4626791">
                <text:p>-0.0046267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704466">
                <text:p>-0.007044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4071306">
                <text:p>0.0040713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2992418">
                <text:p>0.0029924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-0.001046928">
                <text:p>-0.0010469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7816555">
                <text:p>-0.0078165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7085425">
                <text:p>-0.0070854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903565">
                <text:p>-0.009035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1177574">
                <text:p>-0.011775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-0.0001479219">
                <text:p>-0.00014792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5905912">
                <text:p>0.0059059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3278316">
                <text:p>0.0032783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8108879">
                <text:p>0.0081088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5921518">
                <text:p>-0.0059215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2502153">
                <text:p>-0.0025021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651046">
                <text:p>0.016510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2304338">
                <text:p>-0.0023043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1161661">
                <text:p>0.011616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188735">
                <text:p>0.011887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06725517">
                <text:p>0.00067255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9632814">
                <text:p>0.0096328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709829">
                <text:p>-0.007098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1661547">
                <text:p>0.0016615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1100452">
                <text:p>0.011004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6352626">
                <text:p>-0.0063526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3175429">
                <text:p>0.0031754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74214">
                <text:p>0.01742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440958">
                <text:p>0.0054409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207036">
                <text:p>0.002070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1187415">
                <text:p>-0.011874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352097">
                <text:p>0.013520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1756106">
                <text:p>-0.0017561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2485167">
                <text:p>-0.0024851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-0.0008208989">
                <text:p>-0.00082089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6894431">
                <text:p>0.0068944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8631399">
                <text:p>-0.0086313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488192">
                <text:p>0.014881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355792">
                <text:p>0.013557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1141437">
                <text:p>0.011414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3125426">
                <text:p>0.0031254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394212">
                <text:p>0.003942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406521">
                <text:p>-0.004065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06469248">
                <text:p>0.00064692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1117662">
                <text:p>-0.011176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0.0003959956">
                <text:p>0.00039599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-0.0001615313">
                <text:p>-0.00016153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1068858">
                <text:p>0.0010688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1550114">
                <text:p>0.0015501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8736201">
                <text:p>-0.0087362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6710811">
                <text:p>-0.0067108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9137935">
                <text:p>0.0091379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1743752">
                <text:p>0.0017437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-0.001958341">
                <text:p>-0.0019583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2203315">
                <text:p>-0.0022033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3408981">
                <text:p>0.0034089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2109876">
                <text:p>0.021098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149192">
                <text:p>0.011491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2921708">
                <text:p>-0.0029217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2985698">
                <text:p>-0.0029856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9054423">
                <text:p>0.0090544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365696">
                <text:p>0.013656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1577876">
                <text:p>0.0015778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-0.001006164">
                <text:p>-0.0010061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1704628">
                <text:p>-0.0017046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5853967">
                <text:p>0.0058539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42585">
                <text:p>0.006425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7727443">
                <text:p>-0.0077274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586721">
                <text:p>0.015867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8595134">
                <text:p>0.0085951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1342">
                <text:p>0.00513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8280366">
                <text:p>-0.0082803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9394295">
                <text:p>-0.0093942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5920218">
                <text:p>-0.0059202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4794157">
                <text:p>-0.0047941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6696186">
                <text:p>-0.0066961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7635673">
                <text:p>0.0076356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1217222">
                <text:p>0.012172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4099471">
                <text:p>0.0040994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05823692">
                <text:p>0.0058236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5023563">
                <text:p>-0.0050235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8061214">
                <text:p>-0.0080612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1006647">
                <text:p>-0.010066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1059395">
                <text:p>0.010593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3313739">
                <text:p>0.033137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511873">
                <text:p>0.005118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8513103">
                <text:p>0.0085131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8514906">
                <text:p>0.0085149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-0.002749385">
                <text:p>-0.0027493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1083909">
                <text:p>0.010839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3910029">
                <text:p>0.0039100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3129759">
                <text:p>0.0031297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4181021">
                <text:p>-0.0041810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-0.001371303">
                <text:p>-0.0013713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1100818">
                <text:p>-0.0011008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1036252">
                <text:p>0.0010362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2534434">
                <text:p>-0.0025344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1144243">
                <text:p>0.011442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3920457">
                <text:p>-0.0039204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515528">
                <text:p>0.015155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777561">
                <text:p>0.017775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2310246">
                <text:p>0.023102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1098917">
                <text:p>0.010989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825863">
                <text:p>-0.008258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39932">
                <text:p>-0.00399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1048211">
                <text:p>-0.010482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1162365">
                <text:p>-0.011623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-0.001362494">
                <text:p>-0.0013624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412104">
                <text:p>-0.004121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-0.0002880362">
                <text:p>-0.00028803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3112564">
                <text:p>-0.0031125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3338199">
                <text:p>0.0033381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9495489">
                <text:p>0.0094954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8420565">
                <text:p>-0.0084205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4126974">
                <text:p>-0.0041269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1198262">
                <text:p>-0.011982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0.0006860188">
                <text:p>0.00068601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1031199">
                <text:p>-0.010311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960252">
                <text:p>-0.009602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9411195">
                <text:p>-0.0094111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7626642">
                <text:p>-0.00076266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4157775">
                <text:p>0.0041577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7782235">
                <text:p>0.0077822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631958">
                <text:p>-0.006319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2452867">
                <text:p>0.0024528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7710602">
                <text:p>-0.0077106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09686223">
                <text:p>0.0096862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7562647">
                <text:p>0.0075626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2120222">
                <text:p>0.021202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321843">
                <text:p>0.013218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2212138">
                <text:p>0.0022121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5849297">
                <text:p>-0.0058492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1182331">
                <text:p>-0.011823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8250053">
                <text:p>0.0082500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8220498">
                <text:p>-0.0082204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842689">
                <text:p>0.0048426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6416868">
                <text:p>-0.0064168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5586855">
                <text:p>-0.0055868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107179">
                <text:p>0.0011071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437931">
                <text:p>0.014379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1021026">
                <text:p>-0.010210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6969054">
                <text:p>-0.0069690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1041051">
                <text:p>-0.010410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3163187">
                <text:p>0.0031631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7063554">
                <text:p>-0.0070635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8331719">
                <text:p>-0.0083317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8183929">
                <text:p>-0.0081839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1911066">
                <text:p>-0.0019110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1728009">
                <text:p>0.0017280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1208133">
                <text:p>-0.012081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0.000617213">
                <text:p>0.0006172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6291889">
                <text:p>0.0062918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1201943">
                <text:p>-0.012019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1165037">
                <text:p>-0.0011650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349643">
                <text:p>0.03496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1693849">
                <text:p>-0.0016938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09698872">
                <text:p>0.00096988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8189894">
                <text:p>-0.0081898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265527">
                <text:p>0.012655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5972184">
                <text:p>0.0059721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6579608">
                <text:p>-0.0065796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-0.00110837">
                <text:p>-0.001108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6193229">
                <text:p>-0.0061932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1104023">
                <text:p>-0.011040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426279">
                <text:p>-0.004262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7027004">
                <text:p>-0.0070270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5741917">
                <text:p>0.0057419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9852235">
                <text:p>0.0098522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626376">
                <text:p>-0.006263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2427137">
                <text:p>-0.0024271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-0.002349277">
                <text:p>-0.0023492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-0.0009864552">
                <text:p>-0.00098645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4361445">
                <text:p>-0.0043614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897487">
                <text:p>-0.008974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3269068">
                <text:p>0.0032690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2207762">
                <text:p>-0.0022077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8603613">
                <text:p>0.0086036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1745055">
                <text:p>-0.0017450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5640575">
                <text:p>-0.0056405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3490838">
                <text:p>-0.0034908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857463">
                <text:p>-0.008574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-0.0006102942">
                <text:p>-0.00061029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4471326">
                <text:p>-0.0044713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317972">
                <text:p>-0.013179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-0.001784241">
                <text:p>-0.0017842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3540939">
                <text:p>-0.0035409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07351916">
                <text:p>0.00073519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434453">
                <text:p>0.014344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730269">
                <text:p>0.017302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618499">
                <text:p>-0.006184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4008879">
                <text:p>0.0040088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8096087">
                <text:p>-0.0080960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7093709">
                <text:p>0.00709370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5290654">
                <text:p>-0.0052906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2794899">
                <text:p>0.0027948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7749863">
                <text:p>-0.0077498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7607724">
                <text:p>-0.0076077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497834">
                <text:p>-0.004978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269028">
                <text:p>0.012690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104909">
                <text:p>0.01049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8714686">
                <text:p>-0.0087146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1642172">
                <text:p>-0.00164217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4140412">
                <text:p>0.0041404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-0.0002777443">
                <text:p>-0.00027774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08983059">
                <text:p>0.00089830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1814297">
                <text:p>0.0018142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4858457">
                <text:p>0.0048584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1113557">
                <text:p>0.011135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8326109">
                <text:p>-0.0083261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6820973">
                <text:p>0.0068209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1238493">
                <text:p>-0.012384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900928">
                <text:p>-0.009009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37341">
                <text:p>-0.003734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320785">
                <text:p>0.013207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6898011">
                <text:p>-0.0068980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454623">
                <text:p>-0.004546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7538426">
                <text:p>-0.0075384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203212">
                <text:p>0.012032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7229817">
                <text:p>0.0072298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389099">
                <text:p>-0.013890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1068825">
                <text:p>-0.010688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222055">
                <text:p>-0.002220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1279704">
                <text:p>-0.012797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671384">
                <text:p>0.016713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1973547">
                <text:p>-0.0019735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70146">
                <text:p>-0.00701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-0.008304184">
                <text:p>-0.0083041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5539796">
                <text:p>-0.0055397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300321">
                <text:p>0.013003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237962">
                <text:p>0.012379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424625">
                <text:p>0.014246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1124742">
                <text:p>0.011247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7775582">
                <text:p>-0.0077755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9731591">
                <text:p>0.0097315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02105255">
                <text:p>0.00021052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76838">
                <text:p>0.004768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7198747">
                <text:p>-0.0071987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3690616">
                <text:p>0.0036906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790931">
                <text:p>0.017909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4331378">
                <text:p>-0.0043313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717773">
                <text:p>0.007177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4234801">
                <text:p>0.0042348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1023878">
                <text:p>0.0102387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782905">
                <text:p>0.0037829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449993">
                <text:p>0.014499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413901">
                <text:p>0.0034139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2295971">
                <text:p>-0.0022959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1184728">
                <text:p>-0.0011847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395392">
                <text:p>0.013953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548148">
                <text:p>0.015481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-0.000993488">
                <text:p>-0.0009934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1597024">
                <text:p>-0.0015970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112557">
                <text:p>-0.01125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218656">
                <text:p>0.012186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9722653">
                <text:p>-0.0097226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214139">
                <text:p>0.012141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233992">
                <text:p>0.012339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1162515">
                <text:p>-0.011625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5490213">
                <text:p>-0.0054902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832833">
                <text:p>0.018328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81173">
                <text:p>0.013811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7715095">
                <text:p>-0.0077150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655167">
                <text:p>0.016551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8920964">
                <text:p>0.0089209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4164376">
                <text:p>-0.0041643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3781055">
                <text:p>0.0037810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5006772">
                <text:p>-0.0050067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1029663">
                <text:p>-0.010296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294789">
                <text:p>0.012947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381121">
                <text:p>-0.003811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508907">
                <text:p>0.015089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-0.0005972912">
                <text:p>-0.00059729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7620996">
                <text:p>0.0076209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438194">
                <text:p>0.0024381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2007817">
                <text:p>0.0020078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2468645">
                <text:p>0.0024686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-0.000493622">
                <text:p>-0.00049362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4337719">
                <text:p>-0.0043377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6558551">
                <text:p>-0.0065585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168497">
                <text:p>0.0081684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6937063">
                <text:p>-0.0069370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612671">
                <text:p>0.016126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251904">
                <text:p>0.0042519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1311732">
                <text:p>-0.0013117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1074606">
                <text:p>0.0010746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530538">
                <text:p>0.015305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313312">
                <text:p>0.0023133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5064387">
                <text:p>0.00506438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1610387">
                <text:p>0.0016103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0847217">
                <text:p>0.0008472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5756339">
                <text:p>-0.0057563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9217747">
                <text:p>-0.0092177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5535816">
                <text:p>0.0055358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4274171">
                <text:p>0.00427417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-0.001249084">
                <text:p>-0.0012490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1061549">
                <text:p>-0.010615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2711031">
                <text:p>0.0027110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2113088">
                <text:p>-0.00211308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-0.0002707875">
                <text:p>-0.00027078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3205385">
                <text:p>-0.0032053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3155493">
                <text:p>0.00315549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3568625">
                <text:p>-0.0035686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462679">
                <text:p>0.014626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3861102">
                <text:p>-0.0038611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4881529">
                <text:p>-0.0048815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2113156">
                <text:p>-0.0021131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3286633">
                <text:p>-0.0032866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571846">
                <text:p>0.015718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-0.001125836">
                <text:p>-0.0011258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-0.0003095029">
                <text:p>-0.00030950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31129">
                <text:p>0.001311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3354903">
                <text:p>-0.0033549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605395">
                <text:p>0.016053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-0.0002403234">
                <text:p>-0.00024032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-0.00123129">
                <text:p>-0.001231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890253">
                <text:p>-0.0089025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764948">
                <text:p>0.017649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2839778">
                <text:p>-0.00283977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327595">
                <text:p>0.013275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1130266">
                <text:p>-0.011302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3860702">
                <text:p>0.0038607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1165169">
                <text:p>-0.011651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336927">
                <text:p>0.013369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734396">
                <text:p>0.0027343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9271507">
                <text:p>-0.0092715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-0.001195157">
                <text:p>-0.0011951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834352">
                <text:p>0.0183435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280397">
                <text:p>0.012803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4595798">
                <text:p>-0.0045957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9675122">
                <text:p>-0.0096751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1487197">
                <text:p>-0.0014871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-0.0008056483">
                <text:p>-0.000805648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3785683">
                <text:p>0.0037856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54494">
                <text:p>0.015449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5347685">
                <text:p>-0.0053476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357739">
                <text:p>-0.0035773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7926042">
                <text:p>-0.0079260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1156511">
                <text:p>-0.0115651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05801253">
                <text:p>0.00058012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7999382">
                <text:p>-0.00799938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44733">
                <text:p>0.014473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497912">
                <text:p>0.024979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8299942">
                <text:p>-0.0082999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708933">
                <text:p>0.0017089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5767931">
                <text:p>0.00576793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1831097">
                <text:p>-0.0018310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9391665">
                <text:p>-0.0093916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784241">
                <text:p>0.0037842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4376467">
                <text:p>-0.0043764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8392399">
                <text:p>0.0083923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4406821">
                <text:p>-0.0044068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1034014">
                <text:p>0.010340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4359629">
                <text:p>-0.0043596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1005199">
                <text:p>-0.0100519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4176605">
                <text:p>-0.0041766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801869">
                <text:p>-0.0080186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5039214">
                <text:p>0.050392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481311">
                <text:p>-0.004813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2403384">
                <text:p>0.00240338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407379">
                <text:p>0.0024073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5474536">
                <text:p>0.054745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-0.002153605">
                <text:p>-0.0021536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2119303">
                <text:p>-0.0021193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6913032">
                <text:p>-0.0069130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9290792">
                <text:p>-0.0092907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4326944">
                <text:p>-0.0043269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402653">
                <text:p>0.0140265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5106987">
                <text:p>-0.0051069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01576274">
                <text:p>0.00015762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5604137">
                <text:p>-0.0056041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6492498">
                <text:p>0.0064924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2397049">
                <text:p>0.0023970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3701833">
                <text:p>-0.0037018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5889824">
                <text:p>0.0058898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4804804">
                <text:p>-0.0048048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1745786">
                <text:p>0.0017457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01181045">
                <text:p>0.00011810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5530802">
                <text:p>0.0055308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4657859">
                <text:p>-0.0046578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128611">
                <text:p>-0.001286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4369793">
                <text:p>-0.0043697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2435617">
                <text:p>-0.0024356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3010794">
                <text:p>-0.00301079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7931816">
                <text:p>-0.0079318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7556119">
                <text:p>-0.0075561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4438522">
                <text:p>-0.0044385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2388974">
                <text:p>0.023889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4370061">
                <text:p>-0.0043700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807239">
                <text:p>0.018072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5479289">
                <text:p>-0.0054792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9722802">
                <text:p>0.00972280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-0.001120107">
                <text:p>-0.0011201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423668">
                <text:p>-0.004236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8677883">
                <text:p>-0.0086778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4039499">
                <text:p>-0.0040394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772204">
                <text:p>-0.007722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-0.0009629845">
                <text:p>-0.00096298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3491312">
                <text:p>-0.0034913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2334655">
                <text:p>0.0023346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3618058">
                <text:p>-0.0036180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6107875">
                <text:p>0.0061078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5279263">
                <text:p>-0.0052792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6273029">
                <text:p>0.0062730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7500196">
                <text:p>0.00750019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2095734">
                <text:p>-0.0020957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4107778">
                <text:p>0.00410777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4596227">
                <text:p>0.0045962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0541646">
                <text:p>0.0005416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3273653">
                <text:p>-0.0032736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-0.001371222">
                <text:p>-0.0013712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4436833">
                <text:p>-0.0044368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06535036">
                <text:p>0.00065350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1014826">
                <text:p>0.0010148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7558619">
                <text:p>-0.0075586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1154595">
                <text:p>0.011545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2718871">
                <text:p>-0.00271887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2762283">
                <text:p>-0.00276228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6827587">
                <text:p>0.00682758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337853">
                <text:p>0.00533785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3931866">
                <text:p>0.00393186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506342">
                <text:p>0.015063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2029308">
                <text:p>0.0020293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321209">
                <text:p>0.0132120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1977238">
                <text:p>-0.0019772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8112847">
                <text:p>-0.0081128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1898752">
                <text:p>0.0018987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9475729">
                <text:p>-0.0094757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2050927">
                <text:p>0.0020509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3839394">
                <text:p>-0.00383939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1545455">
                <text:p>-0.0015454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2706568">
                <text:p>-0.00270656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1089034">
                <text:p>-0.0108903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1009925">
                <text:p>0.010099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1172637">
                <text:p>-0.011726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5566118">
                <text:p>0.0055661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5361071">
                <text:p>0.0053610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38122">
                <text:p>0.00381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1053276">
                <text:p>-0.010532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24426">
                <text:p>0.00244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628582">
                <text:p>0.0162858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674506">
                <text:p>-0.006745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-0.0004515002">
                <text:p>-0.00045150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09635079">
                <text:p>0.0096350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4260972">
                <text:p>-0.00426097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3321351">
                <text:p>-0.0033213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4342584">
                <text:p>-0.00434258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870856">
                <text:p>0.018708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9381329">
                <text:p>-0.0093813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65374">
                <text:p>0.00653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-0.0008228651">
                <text:p>-0.00082286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8085223">
                <text:p>-0.0080852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01142891">
                <text:p>0.00011428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8071845">
                <text:p>-0.0080718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9544265">
                <text:p>-0.0095442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6336983">
                <text:p>-0.00633698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07611946">
                <text:p>0.000761194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5768984">
                <text:p>-0.00576898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923149">
                <text:p>0.019231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3558286">
                <text:p>0.0035582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3104313">
                <text:p>-0.0031043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8786331">
                <text:p>0.00878633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4038947">
                <text:p>-0.00403894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461738">
                <text:p>0.0146173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5479193">
                <text:p>0.0054791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9407008">
                <text:p>0.0094070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2783618">
                <text:p>0.0027836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2272392">
                <text:p>0.022723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1346367">
                <text:p>-0.013463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2962487">
                <text:p>-0.0029624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6429426">
                <text:p>-0.0064294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1638129">
                <text:p>-0.0016381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5075425">
                <text:p>-0.0050754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3473338">
                <text:p>-0.00347333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7442028">
                <text:p>-0.00744202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1314019">
                <text:p>0.00131401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1621068">
                <text:p>0.0016210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1106238">
                <text:p>-0.011062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36909">
                <text:p>-0.003690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8446259">
                <text:p>-0.00844625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06789001">
                <text:p>0.00067890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1111147">
                <text:p>-0.00111114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1139217">
                <text:p>0.00113921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3298009">
                <text:p>-0.0032980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555333">
                <text:p>0.0035553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2309475">
                <text:p>0.0023094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4260817">
                <text:p>-0.00426081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2193484">
                <text:p>0.021934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8759661">
                <text:p>0.0087596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4978724">
                <text:p>-0.0049787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319641">
                <text:p>0.003196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3169717">
                <text:p>0.0316971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818812">
                <text:p>0.0068188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577911">
                <text:p>0.015779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7513186">
                <text:p>0.0075131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3551407">
                <text:p>0.0035514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907851">
                <text:p>0.029078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234936">
                <text:p>0.002349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569283">
                <text:p>0.0256928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-0.0003219753">
                <text:p>-0.000321975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1393039">
                <text:p>0.00139303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1075293">
                <text:p>0.00107529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103745">
                <text:p>-0.01037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8871983">
                <text:p>0.00887198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07052896">
                <text:p>0.00070528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107572">
                <text:p>-0.010757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3179241">
                <text:p>-0.0031792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-0.001709035">
                <text:p>-0.00170903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3120967">
                <text:p>-0.0031209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1139827">
                <text:p>-0.0113982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8308495">
                <text:p>-0.0083084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-0.001377916">
                <text:p>-0.0013779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-0.0008335671">
                <text:p>-0.000833567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3830397">
                <text:p>-0.0038303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2714561">
                <text:p>-0.00271456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8984532">
                <text:p>-0.0089845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1498189">
                <text:p>0.0014981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2085429">
                <text:p>0.0020854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4239371">
                <text:p>-0.00423937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33294">
                <text:p>0.0123329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01309263">
                <text:p>0.00013092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9778738">
                <text:p>0.00977873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1241257">
                <text:p>-0.0124125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6798932">
                <text:p>0.0067989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639709">
                <text:p>-0.006397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32974">
                <text:p>-0.003297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275297">
                <text:p>0.0042752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2700452">
                <text:p>0.0027004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-0.0007671553">
                <text:p>-0.00076715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4709621">
                <text:p>-0.0047096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4112133">
                <text:p>-0.0041121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5270946">
                <text:p>-0.0052709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-0.0009555975">
                <text:p>-0.00095559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797077">
                <text:p>-0.007970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701851">
                <text:p>0.007018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6064256">
                <text:p>-0.00606425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1224484">
                <text:p>-0.0122448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1135239">
                <text:p>-0.0113523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-0.001386583">
                <text:p>-0.00138658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5636605">
                <text:p>-0.0056366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1631851">
                <text:p>0.00016318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5227968">
                <text:p>-0.0052279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6217308">
                <text:p>-0.0062173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05033825">
                <text:p>0.00050338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5408737">
                <text:p>-0.00540873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7781866">
                <text:p>-0.0077818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37837">
                <text:p>0.013783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2418892">
                <text:p>0.0024188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2297167">
                <text:p>0.0229716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1257765">
                <text:p>-0.0125776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7487015">
                <text:p>-0.0074870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02306854">
                <text:p>0.00023068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1395632">
                <text:p>0.0013956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825547">
                <text:p>-0.0182554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1009504">
                <text:p>-0.010095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3492481">
                <text:p>0.0349248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724234">
                <text:p>0.0172423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191409">
                <text:p>0.00519140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501509">
                <text:p>0.0050150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-0.0007949445">
                <text:p>-0.00079494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-0.0004080309">
                <text:p>-0.000408030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0376596">
                <text:p>0.00037659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4268644">
                <text:p>0.0042686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7229381">
                <text:p>-0.0072293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1056838">
                <text:p>-0.0105683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8461109">
                <text:p>-0.0084611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-0.001915608">
                <text:p>-0.0019156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1161749">
                <text:p>0.0116174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5784902">
                <text:p>0.00578490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9424749">
                <text:p>0.00942474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0617275">
                <text:p>0.0006172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41363">
                <text:p>0.01413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4899048">
                <text:p>-0.00489904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-0.0002835937">
                <text:p>-0.00028359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9649883">
                <text:p>-0.0096498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8366167">
                <text:p>-0.0083661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7049509">
                <text:p>-0.00704950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1634227">
                <text:p>0.0016342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4688033">
                <text:p>0.0046880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5599338">
                <text:p>0.0055993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465409">
                <text:p>0.014654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4318449">
                <text:p>-0.0043184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590761">
                <text:p>-0.005907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1367702">
                <text:p>0.00136770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245314">
                <text:p>0.012453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1115652">
                <text:p>-0.011156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4421642">
                <text:p>0.0044216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442814">
                <text:p>-0.004428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9030796">
                <text:p>0.00903079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633919">
                <text:p>0.006339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3116884">
                <text:p>-0.00311688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44305">
                <text:p>0.02443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4933387">
                <text:p>-0.0049333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101788">
                <text:p>-0.010178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1061338">
                <text:p>-0.010613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9011372">
                <text:p>0.00901137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9138833">
                <text:p>-0.0091388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317353">
                <text:p>0.013173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6820567">
                <text:p>0.0068205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3396327">
                <text:p>-0.0033963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6059585">
                <text:p>-0.00605958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843986">
                <text:p>0.0028439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114682">
                <text:p>-0.01146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152886">
                <text:p>0.0115288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1229065">
                <text:p>-0.0012290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5017181">
                <text:p>-0.00501718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1242756">
                <text:p>-0.012427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4482056">
                <text:p>0.0044820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1170949">
                <text:p>0.0117094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652243">
                <text:p>0.006522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6434227">
                <text:p>-0.00643422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2541343">
                <text:p>0.0025413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-0.002388351">
                <text:p>-0.00238835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8650473">
                <text:p>-0.00865047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4285022">
                <text:p>-0.00428502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77822">
                <text:p>0.01778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6535044">
                <text:p>-0.00653504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4076076">
                <text:p>-0.0040760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620879">
                <text:p>-0.0162087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2731938">
                <text:p>-0.0027319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699048">
                <text:p>0.00569904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692228">
                <text:p>0.0056922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5286063">
                <text:p>-0.00528606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8099354">
                <text:p>-0.0080993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3590048">
                <text:p>0.00359004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256415">
                <text:p>0.012564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5967385">
                <text:p>-0.00596738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1120429">
                <text:p>0.0112042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-0.002016164">
                <text:p>-0.0020161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3445768">
                <text:p>-0.00344576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2508605">
                <text:p>0.0025086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8087314">
                <text:p>0.0080873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902028">
                <text:p>0.009020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5019447">
                <text:p>-0.00501944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5710006">
                <text:p>-0.0057100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264417">
                <text:p>0.002644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2207775">
                <text:p>0.0022077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06727348">
                <text:p>0.000672734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1087551">
                <text:p>-0.0108755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2596875">
                <text:p>0.0025968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438581">
                <text:p>0.0043858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6383767">
                <text:p>-0.0063837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1126869">
                <text:p>-0.011268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3587995">
                <text:p>-0.0035879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9613748">
                <text:p>0.0096137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3342326">
                <text:p>-0.0033423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7605737">
                <text:p>-0.0076057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5761296">
                <text:p>-0.0057612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3347648">
                <text:p>0.0033476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8504068">
                <text:p>0.0085040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8672024">
                <text:p>-0.0086720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5996394">
                <text:p>-0.0059963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8323442">
                <text:p>-0.00832344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2014525">
                <text:p>0.020145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948254">
                <text:p>0.0294825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0.0002902742">
                <text:p>0.000290274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625549">
                <text:p>-0.006255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847856">
                <text:p>0.008478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-0.001809733">
                <text:p>-0.0018097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8805108">
                <text:p>0.0088051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1014899">
                <text:p>0.0101489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4873016">
                <text:p>-0.0048730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345529">
                <text:p>0.013455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4443058">
                <text:p>-0.0044430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4705089">
                <text:p>0.00047050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3565681">
                <text:p>-0.00356568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219239">
                <text:p>0.0062192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1384621">
                <text:p>-0.00138462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4507801">
                <text:p>-0.00450780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7523865">
                <text:p>-0.0075238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3959156">
                <text:p>0.0039591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5355181">
                <text:p>-0.00535518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2306267">
                <text:p>-0.0023062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5120081">
                <text:p>-0.00512008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9615773">
                <text:p>0.00961577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1226169">
                <text:p>0.0122616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7581584">
                <text:p>0.0075815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2248592">
                <text:p>0.0224859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7929637">
                <text:p>-0.00792963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3187449">
                <text:p>-0.00318744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06580092">
                <text:p>0.000658009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3693266">
                <text:p>0.00369326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5348406">
                <text:p>-0.0053484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369397">
                <text:p>0.013693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906902">
                <text:p>0.0190690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57516">
                <text:p>0.0085751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2368861">
                <text:p>0.0023688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4015439">
                <text:p>0.00401543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175877">
                <text:p>-0.00117587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50472">
                <text:p>0.005047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3643631">
                <text:p>-0.00364363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4701229">
                <text:p>-0.00470122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6057412">
                <text:p>-0.00605741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756062">
                <text:p>0.0175606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0741444">
                <text:p>-0.00074144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3327521">
                <text:p>0.00332752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8256376">
                <text:p>-0.00825637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7325957">
                <text:p>-0.00732595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2537911">
                <text:p>0.0253791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554815">
                <text:p>-0.0055481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3746784">
                <text:p>-0.00374678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5672628">
                <text:p>-0.0056726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553647">
                <text:p>0.00255364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3864802">
                <text:p>-0.00386480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1963258">
                <text:p>-0.00196325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708903">
                <text:p>0.00670890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9647642">
                <text:p>-0.00964764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8645884">
                <text:p>-0.00864588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5559022">
                <text:p>-0.00555902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416429">
                <text:p>0.0141642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1990782">
                <text:p>0.00199078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1125333">
                <text:p>-0.011253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4009437">
                <text:p>0.0040094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3082283">
                <text:p>-0.00308228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3027152">
                <text:p>0.0302715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07929914">
                <text:p>-0.000792991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2031049">
                <text:p>-0.00203104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6195811">
                <text:p>0.00619581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2530687">
                <text:p>0.00253068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1071985">
                <text:p>-0.0107198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6191249">
                <text:p>0.00619124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3497348">
                <text:p>0.0034973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1178544">
                <text:p>-0.00117854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4155277">
                <text:p>0.00415527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4743768">
                <text:p>0.00474376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-0.0001506515">
                <text:p>-0.000150651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1583962">
                <text:p>-0.00158396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6449097">
                <text:p>0.00644909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4056731">
                <text:p>-0.00405673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663188">
                <text:p>0.0166318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4717124">
                <text:p>0.00471712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6255256">
                <text:p>-0.00625525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1051847">
                <text:p>-0.0105184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09412958">
                <text:p>-0.000941295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8456605">
                <text:p>0.0084566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9344324">
                <text:p>-0.00934432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292411">
                <text:p>-0.0129241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3041439">
                <text:p>-0.00304143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3078434">
                <text:p>0.00307843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100972">
                <text:p>-0.010097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7577855">
                <text:p>-0.00757785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4946265">
                <text:p>0.00494626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2365497">
                <text:p>0.0236549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4707863">
                <text:p>-0.00470786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9489452">
                <text:p>-0.00948945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7786003">
                <text:p>-0.00778600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6932926">
                <text:p>0.0693292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3258871">
                <text:p>-0.00325887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8466882">
                <text:p>0.00846688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376302">
                <text:p>0.037630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0.0003441338">
                <text:p>0.000344133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767221">
                <text:p>-0.0176722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2519017">
                <text:p>0.0251901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257405">
                <text:p>0.0125740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2030879">
                <text:p>-0.00203087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0511802">
                <text:p>-0.00051180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6558911">
                <text:p>0.00655891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-0.001061991">
                <text:p>-0.00106199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0.002452524">
                <text:p>0.00245252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2028243">
                <text:p>0.0202824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2117217">
                <text:p>0.00211721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7209777">
                <text:p>0.00720977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1099386">
                <text:p>-0.0109938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2854422">
                <text:p>0.00285442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1156363">
                <text:p>0.0115636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6187194">
                <text:p>-0.00618719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0.001103274">
                <text:p>0.00110327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2602807">
                <text:p>0.0260280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3293606">
                <text:p>0.00329360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2415338">
                <text:p>-0.00241533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0.001728748">
                <text:p>0.00172874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1308806">
                <text:p>-0.00130880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1018606">
                <text:p>0.0101860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5662189">
                <text:p>0.00566218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3925383">
                <text:p>-0.00392538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0.000120331">
                <text:p>0.00012033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5268628">
                <text:p>0.00526862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552701">
                <text:p>-0.0055270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952151">
                <text:p>-0.0095215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4627805">
                <text:p>0.00462780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365616">
                <text:p>-0.0036561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5812678">
                <text:p>0.00581267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3337331">
                <text:p>0.0333733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2938571">
                <text:p>-0.00293857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0.000948547">
                <text:p>0.00094854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3241707">
                <text:p>0.00324170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3804229">
                <text:p>-0.00380422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0.0001421327">
                <text:p>0.000142132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7818644">
                <text:p>0.00781864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9932159">
                <text:p>0.00993215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125489">
                <text:p>-0.0012548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08612782">
                <text:p>-0.00861278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8403802">
                <text:p>0.00840380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0.001173918">
                <text:p>0.00117391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5215078">
                <text:p>-0.00521507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407189">
                <text:p>0.0040718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2517001">
                <text:p>0.00251700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6061744">
                <text:p>0.00606174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2310851">
                <text:p>-0.00231085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0.002758077">
                <text:p>0.00275807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7547359">
                <text:p>0.00754735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5984943">
                <text:p>0.00598494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2663147">
                <text:p>-0.00266314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4810835">
                <text:p>0.00481083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781644">
                <text:p>0.0178164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1220469">
                <text:p>-0.00122046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0.0008558834">
                <text:p>0.000855883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05068053">
                <text:p>-0.000506805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931334">
                <text:p>0.0193133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5189773">
                <text:p>0.00518977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7495677">
                <text:p>0.00749567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130209">
                <text:p>0.013020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2689271">
                <text:p>0.00268927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6199787">
                <text:p>0.00619978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3432927">
                <text:p>-0.00343292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6415166">
                <text:p>-0.00641516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4583543">
                <text:p>-0.00458354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641086">
                <text:p>0.0164108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5241163">
                <text:p>-0.00524116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0.001634199">
                <text:p>0.00163419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9942002">
                <text:p>0.00994200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1452786">
                <text:p>0.0145278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1678666">
                <text:p>0.0167866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595434">
                <text:p>-0.0059543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0.0007375957">
                <text:p>0.000737595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0.0001295199">
                <text:p>0.000129519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09258143">
                <text:p>-0.00925814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0.003979602">
                <text:p>0.00397960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200419">
                <text:p>0.020041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4134352">
                <text:p>0.00413435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1463506">
                <text:p>0.0146350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08957966">
                <text:p>-0.00895796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1088603">
                <text:p>0.0108860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1404188">
                <text:p>-0.00140418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0.001349769">
                <text:p>0.00134976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144494">
                <text:p>-0.0114449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1004087">
                <text:p>0.0100408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6337458">
                <text:p>0.00633745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0.004453762">
                <text:p>0.00445376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09871484">
                <text:p>-0.00987148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1270984">
                <text:p>0.0127098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4004137">
                <text:p>-0.00400413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0.002534822">
                <text:p>0.00253482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191157">
                <text:p>-0.0119115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0.003758044">
                <text:p>0.00375804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66583">
                <text:p>0.016658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5972505">
                <text:p>0.00597250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02535">
                <text:p>-0.010253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1193926">
                <text:p>0.0119392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1502639">
                <text:p>0.0150263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5258219">
                <text:p>-0.00525821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0.0005867301">
                <text:p>0.000586730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6102557">
                <text:p>0.00610255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1181432">
                <text:p>0.0118143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08570795">
                <text:p>-0.00857079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8005119">
                <text:p>0.00800511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1343136">
                <text:p>0.0134313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1045181">
                <text:p>0.0104518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1476757">
                <text:p>0.0147675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3669773">
                <text:p>-0.00366977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0.0001852087">
                <text:p>0.000185208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1056137">
                <text:p>0.0105613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08380747">
                <text:p>-0.00838074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0.0001789653">
                <text:p>0.000178965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2139575">
                <text:p>0.0213957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459348">
                <text:p>-0.0045934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02727082">
                <text:p>-0.00027270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02064175">
                <text:p>-0.000206417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5699002">
                <text:p>0.00569900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08981728">
                <text:p>-0.00898172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370882">
                <text:p>-0.013708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1102583">
                <text:p>0.0110258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1308906">
                <text:p>0.0130890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277924">
                <text:p>-0.0027792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0.0005952321">
                <text:p>0.000595232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1443327">
                <text:p>0.0144332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670306">
                <text:p>0.0167030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4911924">
                <text:p>-0.00491192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23169">
                <text:p>-0.002316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1092288">
                <text:p>0.0109228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1225268">
                <text:p>0.0122526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07267691">
                <text:p>-0.00726769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08241418">
                <text:p>-0.00824141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43046">
                <text:p>0.014304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0.001046862">
                <text:p>0.00104686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4716064">
                <text:p>-0.00471606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2158768">
                <text:p>-0.00215876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3048834">
                <text:p>-0.00304883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1195653">
                <text:p>0.0119565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03125524">
                <text:p>-0.00312552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31906">
                <text:p>-0.013190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983276">
                <text:p>0.0198327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0.002534698">
                <text:p>0.00253469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09047973">
                <text:p>-0.00904797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131433">
                <text:p>0.013143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602114">
                <text:p>0.0060211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5139763">
                <text:p>0.00513976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268306">
                <text:p>-0.0126830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2396702">
                <text:p>0.0239670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1277774">
                <text:p>0.0127777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530684">
                <text:p>0.0153068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0.00131188">
                <text:p>0.0013118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0.001878756">
                <text:p>0.00187875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1293802">
                <text:p>-0.00129380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1049272">
                <text:p>0.0104927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786007">
                <text:p>0.0178600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2966456">
                <text:p>0.00296645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1034635">
                <text:p>0.0103463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96108">
                <text:p>0.019610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4651715">
                <text:p>-0.00465171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0.0008705051">
                <text:p>0.00087050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39879">
                <text:p>0.013987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4164926">
                <text:p>0.0416492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1600867">
                <text:p>0.0160086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5707261">
                <text:p>-0.0057072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5718462">
                <text:p>0.00571846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08077582">
                <text:p>-0.000807758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9852146">
                <text:p>0.00985214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4232655">
                <text:p>-0.00423265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109168">
                <text:p>0.01091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4361739">
                <text:p>0.0436173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890644">
                <text:p>0.0189064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085158">
                <text:p>-0.0108515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3570711">
                <text:p>-0.00357071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182482">
                <text:p>0.0118248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091145">
                <text:p>-0.0009114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1133914">
                <text:p>0.0113391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676524">
                <text:p>0.0167652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0.002188637">
                <text:p>0.00218863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111397">
                <text:p>-0.0111139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7380108">
                <text:p>0.00738010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0.0005035237">
                <text:p>0.000503523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09410361">
                <text:p>-0.00941036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1024562">
                <text:p>0.0102456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3526342">
                <text:p>0.00352634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1043313">
                <text:p>0.0104331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1250721">
                <text:p>-0.00125072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7720036">
                <text:p>0.0077200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1461711">
                <text:p>0.00146171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1331761">
                <text:p>0.0133176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0.0003351945">
                <text:p>0.000335194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3684234">
                <text:p>0.00368423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465852">
                <text:p>0.0146585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7298018">
                <text:p>-0.00729801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4379047">
                <text:p>-0.00437904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9073372">
                <text:p>0.00907337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6943345">
                <text:p>0.00694334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7332792">
                <text:p>-0.00733279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79566">
                <text:p>0.017956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8972871">
                <text:p>0.00897287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6169721">
                <text:p>0.00616972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03690458">
                <text:p>-0.000369045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150254">
                <text:p>-0.0115025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1791225">
                <text:p>0.00179122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4438431">
                <text:p>-0.00443843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5814323">
                <text:p>-0.00581432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09860236">
                <text:p>-0.00986023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7367008">
                <text:p>0.00736700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4503894">
                <text:p>-0.00450389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1599733">
                <text:p>-0.00159973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6708988">
                <text:p>-0.00670898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470781">
                <text:p>0.0047078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720611">
                <text:p>0.0172061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5978455">
                <text:p>-0.00597845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296069">
                <text:p>-0.0129606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8547469">
                <text:p>-0.00854746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2476476">
                <text:p>0.00247647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3185907">
                <text:p>-0.00318590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6463307">
                <text:p>-0.00646330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4671114">
                <text:p>0.00467111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5449779">
                <text:p>0.00544977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07759301">
                <text:p>-0.000775930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09523686">
                <text:p>-0.00952368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955403">
                <text:p>0.0195540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3335933">
                <text:p>-0.00333593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291931">
                <text:p>-0.0129193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600674">
                <text:p>0.0060067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904402">
                <text:p>0.0290440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137179">
                <text:p>-0.0013717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5267142">
                <text:p>-0.00526714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1134553">
                <text:p>0.0113455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4759805">
                <text:p>-0.00475980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3033004">
                <text:p>0.00303300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5593379">
                <text:p>-0.00559337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8828848">
                <text:p>-0.00882884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1629479">
                <text:p>0.00162947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1130906">
                <text:p>-0.0113090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5879029">
                <text:p>-0.00587902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841764">
                <text:p>-0.0084176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1235589">
                <text:p>-0.00123558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1077433">
                <text:p>0.0107743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1534505">
                <text:p>-0.00153450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3353043">
                <text:p>-0.00335304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-0.00129141">
                <text:p>-0.0012914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8669866">
                <text:p>-0.00866986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7025256">
                <text:p>-0.00702525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5219723">
                <text:p>-0.00521972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959654">
                <text:p>0.0295965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06624231">
                <text:p>-0.000662423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4993548">
                <text:p>0.00499354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1276245">
                <text:p>0.0127624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1020421">
                <text:p>0.0102042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1070071">
                <text:p>0.0107007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2497864">
                <text:p>0.00249786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5036637">
                <text:p>-0.00503663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4473454">
                <text:p>-0.00447345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5472971">
                <text:p>0.00547297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1159676">
                <text:p>-0.0115967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5935428">
                <text:p>0.00593542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6064645">
                <text:p>0.00606464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-0.001315774">
                <text:p>-0.00131577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101524">
                <text:p>-0.010152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1346608">
                <text:p>0.0134660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5114473">
                <text:p>0.0511447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08422334">
                <text:p>0.000842233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2086479">
                <text:p>0.0208647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293746">
                <text:p>-0.0129374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7977383">
                <text:p>0.00797738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3158037">
                <text:p>0.00315803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2127716">
                <text:p>0.0212771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0.0004039839">
                <text:p>0.000403983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2231181">
                <text:p>0.0223118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649003">
                <text:p>0.0164900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7517871">
                <text:p>0.00751787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922608">
                <text:p>-0.0092260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3276077">
                <text:p>0.00327607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1615043">
                <text:p>0.00161504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45078">
                <text:p>-0.014507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1152409">
                <text:p>-0.0115240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8817956">
                <text:p>0.00881795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-0.002502022">
                <text:p>-0.00250202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8245288">
                <text:p>-0.00824528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292572">
                <text:p>-0.0129257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521101">
                <text:p>0.0152110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5328868">
                <text:p>0.0053288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571879">
                <text:p>-0.0057187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2541239">
                <text:p>-0.00254123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908238">
                <text:p>0.0190823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3020479">
                <text:p>0.0302047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4995975">
                <text:p>-0.00499597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3880222">
                <text:p>0.00388022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2117569">
                <text:p>0.00211756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2172992">
                <text:p>0.0217299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673563">
                <text:p>0.0267356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433796">
                <text:p>-0.0143379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6113936">
                <text:p>0.00611393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588151">
                <text:p>-0.0058815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9585267">
                <text:p>-0.00958526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7974772">
                <text:p>-0.00797477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4394645">
                <text:p>0.00439464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8503928">
                <text:p>-0.00850392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624484">
                <text:p>-0.0062448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2202927">
                <text:p>0.00220292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8686786">
                <text:p>0.00868678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1094027">
                <text:p>0.00109402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1145163">
                <text:p>-0.0114516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251738">
                <text:p>-0.0125173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03717099">
                <text:p>0.000371709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7495854">
                <text:p>0.00749585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80986">
                <text:p>0.008098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386286">
                <text:p>-0.0138628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627549">
                <text:p>0.0162754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-0.001244066">
                <text:p>-0.00124406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9679438">
                <text:p>-0.00967943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7073879">
                <text:p>-0.00707387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681313">
                <text:p>0.0168131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02087171">
                <text:p>0.000208717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457225">
                <text:p>-0.0145722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9028783">
                <text:p>-0.00902878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693298">
                <text:p>0.0169329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1032116">
                <text:p>-0.0103211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5043266">
                <text:p>-0.00504326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466153">
                <text:p>-0.0146615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8298318">
                <text:p>-0.00829831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161472">
                <text:p>0.0116147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505227">
                <text:p>-0.0150522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5783056">
                <text:p>-0.00578305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2839481">
                <text:p>0.00283948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-0.0004943295">
                <text:p>-0.000494329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264183">
                <text:p>-0.0126418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7598502">
                <text:p>-0.00759850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255882">
                <text:p>0.0125588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4307501">
                <text:p>-0.00430750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6424795">
                <text:p>-0.00642479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426502">
                <text:p>-0.0142650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4874965">
                <text:p>-0.00487496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219397">
                <text:p>0.021939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1095932">
                <text:p>-0.0109593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7792453">
                <text:p>-0.00779245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03200102">
                <text:p>0.000320010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01630661">
                <text:p>0.000163066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6874916">
                <text:p>-0.00687491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4194634">
                <text:p>-0.00419463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1865792">
                <text:p>0.00186579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508837">
                <text:p>0.0150883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5638804">
                <text:p>-0.00563880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5526795">
                <text:p>-0.00552679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6868662">
                <text:p>0.00686866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5881608">
                <text:p>-0.00588160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1157982">
                <text:p>-0.0115798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7270064">
                <text:p>-0.00727006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-0.000833374">
                <text:p>-0.00083337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224671">
                <text:p>0.0022467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4698126">
                <text:p>0.00469812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1336192">
                <text:p>-0.0133619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7410237">
                <text:p>-0.00741023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1575745">
                <text:p>0.00157574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1220376">
                <text:p>-0.0122037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5686215">
                <text:p>-0.00568621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-0.005060406">
                <text:p>-0.00506040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622719">
                <text:p>0.0162271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9555505">
                <text:p>-0.00955550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358346">
                <text:p>-0.0035834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297787">
                <text:p>0.0129778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837524">
                <text:p>0.0183752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7706329">
                <text:p>-0.00770632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3573116">
                <text:p>0.00357311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7020332">
                <text:p>-0.00702033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0864864">
                <text:p>0.0086486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177646">
                <text:p>-0.017764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0.0003510527">
                <text:p>0.000351052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2835827">
                <text:p>0.00283582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08872349">
                <text:p>0.00887234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-0.002547284">
                <text:p>-0.00254728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1076141">
                <text:p>-0.0107614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003373927">
                <text:p>0.000337392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640799">
                <text:p>0.0164079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1346565">
                <text:p>-0.0134656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753316">
                <text:p>-0.0175331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07373384">
                <text:p>0.00737338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-0.002145508">
                <text:p>-0.00214550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-0.003375229">
                <text:p>-0.00337522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1297366">
                <text:p>-0.0129736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-0.003405025">
                <text:p>-0.00340502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3252732">
                <text:p>0.0032527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1605372">
                <text:p>-0.0160537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6055408">
                <text:p>-0.00605540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266022">
                <text:p>0.0126602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08059708">
                <text:p>0.00805970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09832056">
                <text:p>-0.00983205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-0.00270813">
                <text:p>-0.0027081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467027">
                <text:p>0.0246702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140078">
                <text:p>-0.014007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1113349">
                <text:p>-0.0111334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2307258">
                <text:p>0.0230725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-0.0007398811">
                <text:p>-0.000739881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-0.003289954">
                <text:p>-0.00328995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-0.002010543">
                <text:p>-0.00201054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04368403">
                <text:p>0.00436840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-0.0001399742">
                <text:p>-0.000139974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09521972">
                <text:p>0.000952197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-0.005002119">
                <text:p>-0.00500211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09433023">
                <text:p>0.00943302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-0.005625119">
                <text:p>-0.00562511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1301049">
                <text:p>0.0130104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1309412">
                <text:p>0.00130941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04847642">
                <text:p>0.00484764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05610774">
                <text:p>0.00561077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08489558">
                <text:p>0.00848955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1154762">
                <text:p>-0.0115476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0258171">
                <text:p>0.0025817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1902896">
                <text:p>0.0190289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-0.006103133">
                <text:p>-0.00610313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1429575">
                <text:p>-0.0142957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06285088">
                <text:p>0.00628508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-0.00454291">
                <text:p>-0.0045429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1528863">
                <text:p>-0.0152886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1495539">
                <text:p>-0.0149553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06354702">
                <text:p>0.00635470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-0.005146954">
                <text:p>-0.00514695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-0.002018696">
                <text:p>-0.00201869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-0.01011405">
                <text:p>-0.0101140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03530073">
                <text:p>0.00353007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03149883">
                <text:p>0.00314988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1717307">
                <text:p>-0.0171730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-0.006865716">
                <text:p>-0.00686571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05668933">
                <text:p>0.00566893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-0.0021301">
                <text:p>-0.002130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13865">
                <text:p>-0.01386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1285245">
                <text:p>0.012852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05318547">
                <text:p>0.00531854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1501519">
                <text:p>-0.0150151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-0.001392927">
                <text:p>-0.00139292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-0.006627777">
                <text:p>-0.00662777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0939454">
                <text:p>0.0093945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0.000148094">
                <text:p>0.00014809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-0.004028793">
                <text:p>-0.00402879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-0.0002925921">
                <text:p>-0.000292592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1031827">
                <text:p>0.0103182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-0.004307953">
                <text:p>-0.00430795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-0.01267432">
                <text:p>-0.012674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08988249">
                <text:p>0.00898824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-0.001437254">
                <text:p>-0.00143725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-0.005633534">
                <text:p>-0.00563353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-0.01426701">
                <text:p>-0.0142670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02790897">
                <text:p>0.00279089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02552238">
                <text:p>0.00255223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-0.01382856">
                <text:p>-0.0138285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02113119">
                <text:p>0.00211311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004834103">
                <text:p>0.000483410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-0.006688029">
                <text:p>-0.00668802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-0.01015909">
                <text:p>-0.0101590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1127291">
                <text:p>0.0112729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-0.006806538">
                <text:p>-0.00680653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-0.00903725">
                <text:p>-0.0090372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-0.0003654881">
                <text:p>-0.000365488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11804">
                <text:p>0.01180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02773323">
                <text:p>0.00277332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002820802">
                <text:p>0.000282080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-0.01348408">
                <text:p>-0.0134840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-0.006861627">
                <text:p>-0.00686162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04835055">
                <text:p>0.00483505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0120469">
                <text:p>0.0012046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-0.001317687">
                <text:p>-0.00131768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-0.006689651">
                <text:p>-0.00668965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0.01058672">
                <text:p>0.0105867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-0.008378605">
                <text:p>-0.00837860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-0.00666853">
                <text:p>-0.0066685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-0.004217634">
                <text:p>-0.00421763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06143443">
                <text:p>0.00614344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-0.01376035">
                <text:p>-0.0137603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-0.01229409">
                <text:p>-0.0122940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01900152">
                <text:p>0.00190015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0821378">
                <text:p>0.0082137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-0.01400331">
                <text:p>-0.0140033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05280335">
                <text:p>0.00528033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-0.004748864">
                <text:p>-0.00474886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2737207">
                <text:p>0.0273720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-0.001934203">
                <text:p>-0.00193420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1067351">
                <text:p>0.0106735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-0.005904525">
                <text:p>-0.00590452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-0.009546149">
                <text:p>-0.00954614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1497275">
                <text:p>0.0149727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-0.0125476">
                <text:p>-0.012547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07192768">
                <text:p>0.00719276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03030968">
                <text:p>0.00303096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-0.005077865">
                <text:p>-0.00507786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0266143">
                <text:p>0.0026614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2366298">
                <text:p>0.0236629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02377123">
                <text:p>0.00237712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-0.002721844">
                <text:p>-0.00272184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-0.01081546">
                <text:p>-0.0108154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0452765">
                <text:p>0.0045276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06541652">
                <text:p>0.00654165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0.0001399379">
                <text:p>0.000139937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-0.01231735">
                <text:p>-0.0123173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05363808">
                <text:p>0.00536380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1761027">
                <text:p>0.0176102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-0.005418999">
                <text:p>-0.00541899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-0.001818224">
                <text:p>-0.00181822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1552119">
                <text:p>0.0155211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-0.002048191">
                <text:p>-0.00204819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02974909">
                <text:p>0.00297490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-0.0151704">
                <text:p>-0.01517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002181811">
                <text:p>0.00218181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3058801">
                <text:p>0.0305880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-0.008758231">
                <text:p>-0.00875823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-0.007661817">
                <text:p>-0.00766181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0767208">
                <text:p>0.0076720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-0.003650449">
                <text:p>-0.00365044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-0.009643831">
                <text:p>-0.00964383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-0.01604558">
                <text:p>-0.0160455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-0.001119681">
                <text:p>-0.00111968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3017306">
                <text:p>0.0301730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-0.003624301">
                <text:p>-0.00362430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02973305">
                <text:p>0.00297330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009615098">
                <text:p>0.000961509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-0.001366814">
                <text:p>-0.00136681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-0.01070063">
                <text:p>-0.0107006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-0.01386501">
                <text:p>-0.0138650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-0.001757939">
                <text:p>-0.00175793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0004604841">
                <text:p>0.000460484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-0.01556786">
                <text:p>-0.0155678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-0.005862882">
                <text:p>-0.00586288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006636294">
                <text:p>0.00663629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0001335008">
                <text:p>0.000133500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-0.00356208">
                <text:p>-0.0035620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07834434">
                <text:p>0.0783443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-0.001597789">
                <text:p>-0.00159778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-0.003565108">
                <text:p>-0.00356510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004252106">
                <text:p>0.00425210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-0.01356273">
                <text:p>-0.0135627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001199415">
                <text:p>0.00119941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-0.00575473">
                <text:p>-0.0057547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-0.01041919">
                <text:p>-0.0104191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000662746">
                <text:p>0.00066274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004667439">
                <text:p>0.00466743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-0.002286769">
                <text:p>-0.00228676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-0.007293207">
                <text:p>-0.00729320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-0.01170267">
                <text:p>-0.0117026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-0.004295143">
                <text:p>-0.00429514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005232909">
                <text:p>0.00523290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-0.01189655">
                <text:p>-0.0118965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-0.008383662">
                <text:p>-0.00838366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-0.0007073081">
                <text:p>-0.000707308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-0.005170047">
                <text:p>-0.00517004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-0.0009136355">
                <text:p>-0.000913635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-0.0135024">
                <text:p>-0.013502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-0.001846689">
                <text:p>-0.00184668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004733137">
                <text:p>0.00473313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006827314">
                <text:p>0.00682731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-0.008733341">
                <text:p>-0.00873334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-0.004204648">
                <text:p>-0.00420464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-0.001824989">
                <text:p>-0.00182498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-0.002473912">
                <text:p>-0.00247391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-0.002398462">
                <text:p>-0.00239846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007787231">
                <text:p>0.00778723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02516189">
                <text:p>0.0251618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-0.00151947">
                <text:p>-0.0015194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-0.006601536">
                <text:p>-0.00660153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0007477112">
                <text:p>0.000747711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01094194">
                <text:p>0.0109419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-0.008396578">
                <text:p>-0.00839657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-0.007061573">
                <text:p>-0.00706157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00153249">
                <text:p>0.0015324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-0.0002991194">
                <text:p>-0.000299119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002069995">
                <text:p>0.00206999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-0.00466684">
                <text:p>-0.0046668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009262926">
                <text:p>0.00926292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000279821">
                <text:p>0.00027982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002874117">
                <text:p>0.00287411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006256039">
                <text:p>0.00625603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009695625">
                <text:p>0.00969562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-0.003443478">
                <text:p>-0.00344347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-0.006700108">
                <text:p>-0.00670010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-0.01473345">
                <text:p>-0.0147334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-0.008170656">
                <text:p>-0.00817065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-0.002206953">
                <text:p>-0.00220695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-0.01478783">
                <text:p>-0.0147878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-0.01028393">
                <text:p>-0.0102839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-0.003843245">
                <text:p>-0.00384324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-0.003087252">
                <text:p>-0.00308725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-0.006150132">
                <text:p>-0.00615013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0.0001117152">
                <text:p>0.000111715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000616817">
                <text:p>0.00061681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-0.0072168">
                <text:p>-0.007216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-0.009427855">
                <text:p>-0.00942785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-0.01004549">
                <text:p>-0.0100454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02124522">
                <text:p>0.0212452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005219618">
                <text:p>0.00521961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-0.006863949">
                <text:p>-0.00686394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-0.001250855">
                <text:p>-0.00125085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01580546">
                <text:p>0.0158054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-0.005448955">
                <text:p>-0.00544895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-0.003125013">
                <text:p>-0.00312501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-0.007268177">
                <text:p>-0.00726817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007573359">
                <text:p>0.00757335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002672854">
                <text:p>0.00267285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-0.002450936">
                <text:p>-0.00245093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-0.0109012">
                <text:p>-0.010901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-0.005015751">
                <text:p>-0.00501575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004464933">
                <text:p>0.00446493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-0.003333903">
                <text:p>-0.00333390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-0.01311131">
                <text:p>-0.0131113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00529701">
                <text:p>0.0052970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001688698">
                <text:p>0.00168869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-0.01381602">
                <text:p>-0.0138160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01147542">
                <text:p>0.0114754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-0.003794055">
                <text:p>-0.00379405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-0.006756306">
                <text:p>-0.00675630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-0.01254905">
                <text:p>-0.0125490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-0.01317101">
                <text:p>-0.0131710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-0.004804227">
                <text:p>-0.00480422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-0.007063949">
                <text:p>-0.00706394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-0.003226433">
                <text:p>-0.00322643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-0.00204039">
                <text:p>-0.0020403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-0.006156542">
                <text:p>-0.00615654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004939794">
                <text:p>0.00493979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06019255">
                <text:p>0.0601925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-0.0009372194">
                <text:p>-0.000937219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01079835">
                <text:p>0.0107983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-0.002835542">
                <text:p>-0.00283554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02565226">
                <text:p>0.0256522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-0.01090317">
                <text:p>-0.0109031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006321692">
                <text:p>0.00632169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004936209">
                <text:p>0.00493620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-0.009205127">
                <text:p>-0.00920512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-0.01113076">
                <text:p>-0.0111307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01116124">
                <text:p>0.0111612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004332087">
                <text:p>0.00433208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-0.004578223">
                <text:p>-0.00457822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00803869">
                <text:p>0.0080386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005477735">
                <text:p>0.00547773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007405394">
                <text:p>0.00740539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01272871">
                <text:p>0.0127287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-0.003102006">
                <text:p>-0.00310200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0001626918">
                <text:p>0.000162691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008261569">
                <text:p>0.00826156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-0.006717572">
                <text:p>-0.00671757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002994545">
                <text:p>0.00299454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0.0008875246">
                <text:p>0.000887524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005469081">
                <text:p>0.00546908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-0.002943509">
                <text:p>-0.00294350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-0.01264209">
                <text:p>-0.0126420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-0.001661492">
                <text:p>-0.00166149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006236389">
                <text:p>0.00623638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0.001193408">
                <text:p>0.00119340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003813703">
                <text:p>0.00381370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-0.0021131">
                <text:p>-0.002113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01550324">
                <text:p>0.0155032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0.002489418">
                <text:p>0.00248941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003415992">
                <text:p>0.00341599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-0.001315428">
                <text:p>-0.00131542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-0.004619846">
                <text:p>-0.00461984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-0.006722158">
                <text:p>-0.00672215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-0.0008943765">
                <text:p>-0.000894376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-0.00191941">
                <text:p>-0.0019194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0160715">
                <text:p>0.016071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03856105">
                <text:p>0.0385610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-0.004380652">
                <text:p>-0.00438065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001898234">
                <text:p>0.00189823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007614027">
                <text:p>0.00761402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-0.004327142">
                <text:p>-0.00432714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00493619">
                <text:p>0.0049361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01665164">
                <text:p>0.0166516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002405559">
                <text:p>0.00240555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007068283">
                <text:p>0.00706828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0.00337101">
                <text:p>0.0033710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-0.003082654">
                <text:p>-0.00308265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008048872">
                <text:p>0.00804887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01762725">
                <text:p>0.0176272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008631266">
                <text:p>0.00863126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0257594">
                <text:p>0.025759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010937">
                <text:p>0.01093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-0.007306795">
                <text:p>-0.00730679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-0.008951104">
                <text:p>-0.00895110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004899452">
                <text:p>0.00489945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009449817">
                <text:p>0.00944981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0.0007588437">
                <text:p>0.000758843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006418682">
                <text:p>0.00641868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004815356">
                <text:p>0.00481535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-0.0003005756">
                <text:p>-0.000300575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-0.001892491">
                <text:p>-0.00189249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02050371">
                <text:p>0.0205037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-0.001339264">
                <text:p>-0.00133926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0.005084503">
                <text:p>0.00508450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-0.003486644">
                <text:p>-0.00348664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0.0006473052">
                <text:p>0.000647305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-0.001622888">
                <text:p>-0.00162288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-0.004587457">
                <text:p>-0.00458745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0.001177954">
                <text:p>0.00117795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03026681">
                <text:p>0.0302668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00737814">
                <text:p>0.0073781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-0.004533724">
                <text:p>-0.00453372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006947601">
                <text:p>0.00694760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01210494">
                <text:p>0.0121049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-0.002150822">
                <text:p>-0.00215082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-0.001479362">
                <text:p>-0.00147936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0.001298729">
                <text:p>0.00129872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-0.00229797">
                <text:p>-0.0022979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01930474">
                <text:p>0.0193047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008652734">
                <text:p>0.00865273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05057298">
                <text:p>0.0505729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01616343">
                <text:p>0.0161634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006453508">
                <text:p>0.00645350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0.001108893">
                <text:p>0.00110889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007768822">
                <text:p>0.00776882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005857697">
                <text:p>0.00585769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02552949">
                <text:p>0.0255294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-0.004166169">
                <text:p>-0.00416616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02495742">
                <text:p>0.0249574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01376843">
                <text:p>0.0137684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01072665">
                <text:p>0.0107266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009692661">
                <text:p>0.00969266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008904047">
                <text:p>0.00890404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0.00387616">
                <text:p>0.0038761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0.001020825">
                <text:p>0.00102082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-0.002600984">
                <text:p>-0.00260098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01676334">
                <text:p>0.0167633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01057869">
                <text:p>0.0105786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01489568">
                <text:p>0.0148956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-0.003624305">
                <text:p>-0.00362430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03096431">
                <text:p>0.0309643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01534667">
                <text:p>0.0153466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-0.000971405">
                <text:p>-0.00097140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0.001532747">
                <text:p>0.00153274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01032418">
                <text:p>0.0103241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0322278">
                <text:p>0.032227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0.001476505">
                <text:p>0.00147650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0.006487582">
                <text:p>0.00648758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01688316">
                <text:p>0.0168831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01517872">
                <text:p>0.0151787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0.005689758">
                <text:p>0.00568975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-0.004245412">
                <text:p>-0.00424541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0.008884511">
                <text:p>0.0088845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0.003489055">
                <text:p>0.0034890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0.006601756">
                <text:p>0.00660175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02779322">
                <text:p>0.0277932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0.003669549">
                <text:p>0.00366954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02489947">
                <text:p>0.0248994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0.004843254">
                <text:p>0.00484325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02053214">
                <text:p>0.0205321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02666062">
                <text:p>0.0266606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01320364">
                <text:p>0.0132036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03357317">
                <text:p>0.0335731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0.003873687">
                <text:p>0.00387368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01768726">
                <text:p>0.0176872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0.01071632">
                <text:p>0.0107163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0.005324237">
                <text:p>0.00532423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0.0005456773">
                <text:p>0.000545677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02083189">
                <text:p>0.0208318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0192568">
                <text:p>0.019256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0.006094244">
                <text:p>0.00609424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0.01389557">
                <text:p>0.0138955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02671383">
                <text:p>0.0267138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0.006389069">
                <text:p>0.00638906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03851559">
                <text:p>0.0385155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03071707">
                <text:p>0.0307170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02005048">
                <text:p>0.0200504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01758278">
                <text:p>0.0175827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0.01261824">
                <text:p>0.0126182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0.002336783">
                <text:p>0.00233678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02265596">
                <text:p>0.0226559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03249633">
                <text:p>0.0324963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0.01450151">
                <text:p>0.0145015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02221">
                <text:p>0.0222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01957958">
                <text:p>0.0195795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01977888">
                <text:p>0.0197788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0.02021738">
                <text:p>0.0202173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02059215">
                <text:p>0.0205921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02184065">
                <text:p>0.0218406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0.02100903">
                <text:p>0.0210090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0.01266">
                <text:p>0.0126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0.01077831">
                <text:p>0.0107783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02480126">
                <text:p>0.0248012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08147269">
                <text:p>0.0814726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03277181">
                <text:p>0.032771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02578834">
                <text:p>0.0257883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02587167">
                <text:p>0.0258716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0.0222536">
                <text:p>0.022253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02696309">
                <text:p>0.0269630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02858617">
                <text:p>0.0285861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0.02078941">
                <text:p>0.0207894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0.02487373">
                <text:p>0.0248737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0.02681878">
                <text:p>0.0268187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0.02201489">
                <text:p>0.0220148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0297882">
                <text:p>0.029788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05697981">
                <text:p>0.0569798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03316271">
                <text:p>0.0331627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04927265">
                <text:p>0.0492726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0.02155057">
                <text:p>0.0215505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0.02701687">
                <text:p>0.0270168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03060252">
                <text:p>0.0306025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0.01919494">
                <text:p>0.0191949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03992422">
                <text:p>0.0399242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0.0263965">
                <text:p>0.026396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0.02574003">
                <text:p>0.0257400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05969825">
                <text:p>0.0596982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0.02992131">
                <text:p>0.0299213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04019634">
                <text:p>0.0401963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04058371">
                <text:p>0.0405837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0.02404122">
                <text:p>0.0240412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05062516">
                <text:p>0.0506251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04460996">
                <text:p>0.0446099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0.03547395">
                <text:p>0.0354739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0434269">
                <text:p>0.043426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0.03197799">
                <text:p>0.0319779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0.03390244">
                <text:p>0.0339024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04762573">
                <text:p>0.0476257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0.02951946">
                <text:p>0.0295194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0.03774867">
                <text:p>0.0377486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0.03281693">
                <text:p>0.0328169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0.0308414">
                <text:p>0.030841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04746285">
                <text:p>0.0474628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04192084">
                <text:p>0.0419208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04386629">
                <text:p>0.0438662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0.03105885">
                <text:p>0.0310588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0.03784715">
                <text:p>0.0378471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0.03818873">
                <text:p>0.0381887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04980987">
                <text:p>0.0498098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05587146">
                <text:p>0.0558714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05449177">
                <text:p>0.0544917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0.04456424">
                <text:p>0.0445642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0.04168268">
                <text:p>0.0416826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0.03359346">
                <text:p>0.0335934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0.03756937">
                <text:p>0.0375693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0.04410431">
                <text:p>0.0441043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0.04888135">
                <text:p>0.0488813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07245924">
                <text:p>0.0724592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0.04905585">
                <text:p>0.0490558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05238972">
                <text:p>0.0523897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0.05101838">
                <text:p>0.0510183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05589358">
                <text:p>0.0558935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0.04795296">
                <text:p>0.0479529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0547798">
                <text:p>0.054779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0.04989585">
                <text:p>0.0498958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05771165">
                <text:p>0.0577116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0.04041987">
                <text:p>0.0404198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09279687">
                <text:p>0.0927968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05716137">
                <text:p>0.0571613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08994981">
                <text:p>0.0899498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05886635">
                <text:p>0.0588663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09401761">
                <text:p>0.0940176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0.05601607">
                <text:p>0.0560160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06442549">
                <text:p>0.0644254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0.04818043">
                <text:p>0.0481804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06990533">
                <text:p>0.0699053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06355239">
                <text:p>0.0635523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0.05297222">
                <text:p>0.0529722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06320228">
                <text:p>0.0632022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0.06060129">
                <text:p>0.0606012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0.06165919">
                <text:p>0.0616591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0.05997406">
                <text:p>0.0599740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0.05342397">
                <text:p>0.0534239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07366281">
                <text:p>0.0736628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0.05559651">
                <text:p>0.0555965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0.05548305">
                <text:p>0.0554830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0.06595118">
                <text:p>0.0659511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0.06304291">
                <text:p>0.0630429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08309531">
                <text:p>0.0830953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0.0654513">
                <text:p>0.065451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0.06583738">
                <text:p>0.0658373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0.06008745">
                <text:p>0.0600874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0.0699878">
                <text:p>0.069987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07325982">
                <text:p>0.0732598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0.06774038">
                <text:p>0.0677403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08359481">
                <text:p>0.0835948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0.0704622">
                <text:p>0.070462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07449861">
                <text:p>0.0744986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09150492">
                <text:p>0.0915049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0.0735056">
                <text:p>0.073505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0.06393541">
                <text:p>0.0639354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0799484">
                <text:p>0.079948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08020532">
                <text:p>0.0802053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0.06946918">
                <text:p>0.0694691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08836781">
                <text:p>0.0883678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0.07601392">
                <text:p>0.0760139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0.07116178">
                <text:p>0.0711617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09024522">
                <text:p>0.0902452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0.07708738">
                <text:p>0.0770873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0885794">
                <text:p>0.088579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0.06959988">
                <text:p>0.0695998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08460248">
                <text:p>0.0846024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089867">
                <text:p>0.08986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0.07573497">
                <text:p>0.0757349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08734552">
                <text:p>0.0873455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0.07884528">
                <text:p>0.0788452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0.08041453">
                <text:p>0.0804145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089311">
                <text:p>0.08931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0.08453579">
                <text:p>0.0845357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0.08648971">
                <text:p>0.0864897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09525993">
                <text:p>0.0952599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0.07900851">
                <text:p>0.0790085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0930729">
                <text:p>0.093072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09410786">
                <text:p>0.0941078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09358109">
                <text:p>0.0935810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0.08035397">
                <text:p>0.0803539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0.09126832">
                <text:p>0.0912683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09518952">
                <text:p>0.0951895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09399443">
                <text:p>0.0939944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0.07934654">
                <text:p>0.0793465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0.09380653">
                <text:p>0.0938065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09970804">
                <text:p>0.0997080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09975829">
                <text:p>0.0997582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09590987">
                <text:p>0.0959098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1076259">
                <text:p>0.107625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1106821">
                <text:p>0.110682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109179">
                <text:p>0.10917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0.09070542">
                <text:p>0.0907054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1030527">
                <text:p>0.103052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1039925">
                <text:p>0.103992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1002452">
                <text:p>0.100245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100931">
                <text:p>0.10093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1065238">
                <text:p>0.106523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0.0958536">
                <text:p>0.095853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1055767">
                <text:p>0.105576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107135">
                <text:p>0.10713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107999">
                <text:p>0.10799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0.09390848">
                <text:p>0.0939084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1044711">
                <text:p>0.104471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1067691">
                <text:p>0.106769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0.1009615">
                <text:p>0.100961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0.09128111">
                <text:p>0.0912811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0.09650498">
                <text:p>0.0965049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1146977">
                <text:p>0.114697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0.09503915">
                <text:p>0.0950391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1087286">
                <text:p>0.108728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0.1024618">
                <text:p>0.102461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1148627">
                <text:p>0.114862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0.0987068">
                <text:p>0.098706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0.09776241">
                <text:p>0.0977624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0.1028231">
                <text:p>0.102823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0.1012039">
                <text:p>0.101203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1132167">
                <text:p>0.113216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0.1049894">
                <text:p>0.104989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1112329">
                <text:p>0.111232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1265339">
                <text:p>0.126533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1178058">
                <text:p>0.117805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1097284">
                <text:p>0.109728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1178511">
                <text:p>0.117851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0.09713817">
                <text:p>0.0971381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1124023">
                <text:p>0.112402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0.1034569">
                <text:p>0.103456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0.110972">
                <text:p>0.11097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1219636">
                <text:p>0.121963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1162758">
                <text:p>0.116275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1115846">
                <text:p>0.111584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1159888">
                <text:p>0.115988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0.1078591">
                <text:p>0.107859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1145057">
                <text:p>0.114505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0.1008469">
                <text:p>0.100846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1176537">
                <text:p>0.117653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0.1018161">
                <text:p>0.101816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1301024">
                <text:p>0.130102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0.1096026">
                <text:p>0.109602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0.1053596">
                <text:p>0.105359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1175616">
                <text:p>0.117561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0.1069479">
                <text:p>0.106947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1259747">
                <text:p>0.125974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0.1121869">
                <text:p>0.112186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114386">
                <text:p>0.11438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1296253">
                <text:p>0.129625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0.1097963">
                <text:p>0.109796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0.1114577">
                <text:p>0.111457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0.1086127">
                <text:p>0.108612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0.1103356">
                <text:p>0.110335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116598">
                <text:p>0.11659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136186">
                <text:p>0.13618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0.1060425">
                <text:p>0.106042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1265581">
                <text:p>0.126558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1152693">
                <text:p>0.115269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0.1094504">
                <text:p>0.109450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0.1017141">
                <text:p>0.101714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1144496">
                <text:p>0.114449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0.1101206">
                <text:p>0.110120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1360098">
                <text:p>0.136009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1164127">
                <text:p>0.116412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1128234">
                <text:p>0.112823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1151796">
                <text:p>0.115179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0.107485">
                <text:p>0.10748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0.1085432">
                <text:p>0.108543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0.1051362">
                <text:p>0.105136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0.1108959">
                <text:p>0.110895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0.1127116">
                <text:p>0.112711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113335">
                <text:p>0.11333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1141709">
                <text:p>0.114170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1137217">
                <text:p>0.113721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1225398">
                <text:p>0.1225398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1188335">
                <text:p>0.118833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0.1043648">
                <text:p>0.104364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1142733">
                <text:p>0.114273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0.1078655">
                <text:p>0.107865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1253427">
                <text:p>0.125342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1248603">
                <text:p>0.124860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1154859">
                <text:p>0.115485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1156388">
                <text:p>0.115638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1116192">
                <text:p>0.111619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1107702">
                <text:p>0.110770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1193868">
                <text:p>0.119386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1124709">
                <text:p>0.112470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0.1053725">
                <text:p>0.105372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1296572">
                <text:p>0.129657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1116693">
                <text:p>0.111669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0.09979158">
                <text:p>0.0997915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1149557">
                <text:p>0.114955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0.1071031">
                <text:p>0.107103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1123649">
                <text:p>0.112364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0.09773445">
                <text:p>0.0977344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0.1004817">
                <text:p>0.100481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0.1047295">
                <text:p>0.104729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1194157">
                <text:p>0.11941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0.1052607">
                <text:p>0.105260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1095904">
                <text:p>0.109590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11266">
                <text:p>0.1126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1160944">
                <text:p>0.116094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0.1035864">
                <text:p>0.103586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1108674">
                <text:p>0.110867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1105358">
                <text:p>0.110535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1078665">
                <text:p>0.107866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1155288">
                <text:p>0.115528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0.09552541">
                <text:p>0.0955254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1095837">
                <text:p>0.109583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1164194">
                <text:p>0.116419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0.1039723">
                <text:p>0.1039723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109224">
                <text:p>0.10922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1104046">
                <text:p>0.110404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1050108">
                <text:p>0.105010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0.09785299">
                <text:p>0.0978529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1133652">
                <text:p>0.113365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1351271">
                <text:p>0.135127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0.0962067">
                <text:p>0.096206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0.09897563">
                <text:p>0.0989756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1112942">
                <text:p>0.111294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1040015">
                <text:p>0.104001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0.09999869">
                <text:p>0.0999986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1116212">
                <text:p>0.111621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0.09689441">
                <text:p>0.0968944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1172924">
                <text:p>0.117292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0.09803575">
                <text:p>0.0980357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0.09219519">
                <text:p>0.0921951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1143472">
                <text:p>0.114347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1211035">
                <text:p>0.121103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0.09468617">
                <text:p>0.0946861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1116129">
                <text:p>0.111612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106172">
                <text:p>0.10617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1052474">
                <text:p>0.1052474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1035942">
                <text:p>0.103594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0.08901315">
                <text:p>0.0890131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0.09446003">
                <text:p>0.0944600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0.09358131">
                <text:p>0.0935813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1031055">
                <text:p>0.103105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1170088">
                <text:p>0.117008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0.092238">
                <text:p>0.09223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1038375">
                <text:p>0.103837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1167829">
                <text:p>0.116782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0.09144065">
                <text:p>0.0914406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0.09169265">
                <text:p>0.0916926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1000478">
                <text:p>0.100047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0.09224819">
                <text:p>0.0922481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0.08512022">
                <text:p>0.0851202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1096994">
                <text:p>0.109699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1051772">
                <text:p>0.105177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09792511">
                <text:p>0.0979251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1060814">
                <text:p>0.1060814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1365635">
                <text:p>0.136563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09640189">
                <text:p>0.0964018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09751902">
                <text:p>0.0975190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1062881">
                <text:p>0.106288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1002125">
                <text:p>0.100212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0.0861431">
                <text:p>0.086143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09464547">
                <text:p>0.0946454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08741227">
                <text:p>0.08741227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1017344">
                <text:p>0.101734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0968881">
                <text:p>0.096888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1105508">
                <text:p>0.110550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09698638">
                <text:p>0.09698638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09248116">
                <text:p>0.0924811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09667726">
                <text:p>0.0966772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09813849">
                <text:p>0.0981384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08391656">
                <text:p>0.0839165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1150027">
                <text:p>0.115002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09877312">
                <text:p>0.0987731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08909669">
                <text:p>0.08909669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09894042">
                <text:p>0.0989404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1161404">
                <text:p>0.116140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1037984">
                <text:p>0.103798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0955057">
                <text:p>0.095505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08935343">
                <text:p>0.0893534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1080245">
                <text:p>0.108024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09480111">
                <text:p>0.0948011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09810745">
                <text:p>0.0981074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09023674">
                <text:p>0.0902367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1207297">
                <text:p>0.120729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1226753">
                <text:p>0.122675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0816746">
                <text:p>0.081674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08810034">
                <text:p>0.0881003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1005355">
                <text:p>0.100535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1020365">
                <text:p>0.102036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07295771">
                <text:p>0.0729577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0940325">
                <text:p>0.094032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0977155">
                <text:p>0.097715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1128126">
                <text:p>0.1128126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07527517">
                <text:p>0.0752751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0912318">
                <text:p>0.091231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09180881">
                <text:p>0.0918088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09846126">
                <text:p>0.09846126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09086996">
                <text:p>0.09086996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07631059">
                <text:p>0.0763105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07432707">
                <text:p>0.0743270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08327001">
                <text:p>0.0832700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08371365">
                <text:p>0.0837136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06735826">
                <text:p>0.0673582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08152439">
                <text:p>0.0815243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09779953">
                <text:p>0.0977995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0966595">
                <text:p>0.096659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07995266">
                <text:p>0.0799526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0752155">
                <text:p>0.075215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08447623">
                <text:p>0.0844762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07094524">
                <text:p>0.0709452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08055457">
                <text:p>0.0805545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08191307">
                <text:p>0.0819130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08070224">
                <text:p>0.0807022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06793547">
                <text:p>0.0679354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08594923">
                <text:p>0.0859492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07130616">
                <text:p>0.0713061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1000245">
                <text:p>0.100024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0722251">
                <text:p>0.072225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08737969">
                <text:p>0.0873796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07029358">
                <text:p>0.07029358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06826025">
                <text:p>0.0682602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06555487">
                <text:p>0.0655548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07219616">
                <text:p>0.0721961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07339003">
                <text:p>0.0733900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06461053">
                <text:p>0.0646105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06269346">
                <text:p>0.0626934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0790116">
                <text:p>0.079011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0684067">
                <text:p>0.068406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06962407">
                <text:p>0.0696240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08126139">
                <text:p>0.0812613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06714687">
                <text:p>0.0671468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07273156">
                <text:p>0.0727315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06357181">
                <text:p>0.06357181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0677334">
                <text:p>0.067733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0641951">
                <text:p>0.0641951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06387752">
                <text:p>0.0638775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06086007">
                <text:p>0.0608600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07144568">
                <text:p>0.0714456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06960004">
                <text:p>0.0696000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06783303">
                <text:p>0.06783303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07081445">
                <text:p>0.0708144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07409312">
                <text:p>0.0740931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05968838">
                <text:p>0.0596883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08942044">
                <text:p>0.0894204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05929923">
                <text:p>0.0592992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0771408">
                <text:p>0.077140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05614711">
                <text:p>0.0561471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05655937">
                <text:p>0.0565593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05742333">
                <text:p>0.0574233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05913683">
                <text:p>0.0591368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06868865">
                <text:p>0.068688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06573002">
                <text:p>0.0657300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05456274">
                <text:p>0.0545627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06989408">
                <text:p>0.06989408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07230189">
                <text:p>0.07230189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05901686">
                <text:p>0.0590168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07743921">
                <text:p>0.07743921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05185862">
                <text:p>0.0518586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05751618">
                <text:p>0.0575161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06982144">
                <text:p>0.0698214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0612765">
                <text:p>0.061276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06534389">
                <text:p>0.0653438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04917219">
                <text:p>0.0491721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06533068">
                <text:p>0.0653306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04889019">
                <text:p>0.0488901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05480322">
                <text:p>0.0548032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05738911">
                <text:p>0.0573891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05144856">
                <text:p>0.0514485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07518607">
                <text:p>0.07518607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05299196">
                <text:p>0.0529919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05092299">
                <text:p>0.0509229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05389422">
                <text:p>0.0538942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05472839">
                <text:p>0.05472839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06862132">
                <text:p>0.0686213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08860891">
                <text:p>0.0886089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0457623">
                <text:p>0.045762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05348391">
                <text:p>0.0534839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0591757">
                <text:p>0.0591757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05071108">
                <text:p>0.0507110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05663544">
                <text:p>0.0566354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04885448">
                <text:p>0.0488544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05114404">
                <text:p>0.0511440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05083534">
                <text:p>0.0508353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04454339">
                <text:p>0.0445433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04501228">
                <text:p>0.0450122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05829693">
                <text:p>0.0582969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06998888">
                <text:p>0.0699888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05645592">
                <text:p>0.0564559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04987387">
                <text:p>0.0498738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04988072">
                <text:p>0.0498807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06329244">
                <text:p>0.0632924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05491767">
                <text:p>0.05491767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05241519">
                <text:p>0.05241519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05080677">
                <text:p>0.05080677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06141848">
                <text:p>0.0614184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06590056">
                <text:p>0.0659005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05437196">
                <text:p>0.0543719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06290839">
                <text:p>0.0629083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04789337">
                <text:p>0.0478933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04159671">
                <text:p>0.0415967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04680059">
                <text:p>0.04680059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04855069">
                <text:p>0.0485506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04955383">
                <text:p>0.0495538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0542809">
                <text:p>0.054280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04779967">
                <text:p>0.0477996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05152968">
                <text:p>0.0515296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04484402">
                <text:p>0.0448440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04130618">
                <text:p>0.0413061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05157719">
                <text:p>0.0515771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04025485">
                <text:p>0.0402548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04406353">
                <text:p>0.0440635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08003661">
                <text:p>0.0800366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04795243">
                <text:p>0.0479524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04083494">
                <text:p>0.0408349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04807546">
                <text:p>0.0480754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04141986">
                <text:p>0.04141986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03887978">
                <text:p>0.0388797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05283972">
                <text:p>0.0528397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03479481">
                <text:p>0.0347948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05437851">
                <text:p>0.0543785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04750729">
                <text:p>0.0475072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04206653">
                <text:p>0.0420665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0521941">
                <text:p>0.0521941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05406012">
                <text:p>0.0540601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04626628">
                <text:p>0.0462662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04600866">
                <text:p>0.04600866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0428233">
                <text:p>0.0428233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3279772">
                <text:p>0.0327977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05003285">
                <text:p>0.0500328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05117479">
                <text:p>0.0511747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0414498">
                <text:p>0.041449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06926892">
                <text:p>0.0692689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337266">
                <text:p>0.033726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04353132">
                <text:p>0.0435313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04955184">
                <text:p>0.0495518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3312862">
                <text:p>0.0331286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3544801">
                <text:p>0.0354480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04471966">
                <text:p>0.0447196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04662629">
                <text:p>0.0466262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04481649">
                <text:p>0.0448164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05612154">
                <text:p>0.0561215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04815666">
                <text:p>0.0481566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05298958">
                <text:p>0.0529895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3669071">
                <text:p>0.0366907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3911754">
                <text:p>0.0391175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05288198">
                <text:p>0.0528819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4533453">
                <text:p>0.04533453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05306858">
                <text:p>0.0530685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3356486">
                <text:p>0.0335648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4399574">
                <text:p>0.0439957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04984628">
                <text:p>0.0498462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05355887">
                <text:p>0.05355887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4385841">
                <text:p>0.04385841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4483782">
                <text:p>0.0448378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4567622">
                <text:p>0.0456762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05686066">
                <text:p>0.05686066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4212731">
                <text:p>0.0421273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3605908">
                <text:p>0.03605908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3276264">
                <text:p>0.0327626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4013362">
                <text:p>0.0401336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3570337">
                <text:p>0.0357033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4893925">
                <text:p>0.0489392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3327627">
                <text:p>0.0332762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3803156">
                <text:p>0.0380315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3716774">
                <text:p>0.0371677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3058774">
                <text:p>0.0305877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4735918">
                <text:p>0.0473591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3159609">
                <text:p>0.0315960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3974561">
                <text:p>0.0397456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3416064">
                <text:p>0.0341606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3976681">
                <text:p>0.0397668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02912235">
                <text:p>0.0291223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08297966">
                <text:p>0.0829796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4625935">
                <text:p>0.0462593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3095759">
                <text:p>0.0309575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3365539">
                <text:p>0.03365539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4612374">
                <text:p>0.0461237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4727942">
                <text:p>0.0472794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3207658">
                <text:p>0.03207658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3121894">
                <text:p>0.0312189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4509797">
                <text:p>0.0450979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3412139">
                <text:p>0.0341213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5302433">
                <text:p>0.0530243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3672086">
                <text:p>0.0367208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5216328">
                <text:p>0.05216328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3783621">
                <text:p>0.0378362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4195346">
                <text:p>0.04195346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2825091">
                <text:p>0.0282509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3116878">
                <text:p>0.0311687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5818189">
                <text:p>0.0581818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3070446">
                <text:p>0.0307044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2784258">
                <text:p>0.02784258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2778033">
                <text:p>0.0277803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3349133">
                <text:p>0.03349133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2562941">
                <text:p>0.02562941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02566339">
                <text:p>0.0256633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0233172">
                <text:p>0.023317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02213074">
                <text:p>0.0221307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4009546">
                <text:p>0.04009546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276731">
                <text:p>0.027673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3094189">
                <text:p>0.0309418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3153351">
                <text:p>0.0315335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2853453">
                <text:p>0.0285345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2839313">
                <text:p>0.02839313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3293929">
                <text:p>0.0329392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3799122">
                <text:p>0.0379912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02489994">
                <text:p>0.02489994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300405">
                <text:p>0.030040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3607839">
                <text:p>0.0360783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3056021">
                <text:p>0.03056021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2743876">
                <text:p>0.02743876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3365564">
                <text:p>0.03365564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4549125">
                <text:p>0.0454912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6069615">
                <text:p>0.0606961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3348793">
                <text:p>0.03348793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4402314">
                <text:p>0.0440231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2537676">
                <text:p>0.02537676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3174208">
                <text:p>0.03174208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3017213">
                <text:p>0.03017213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4057306">
                <text:p>0.0405730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3243228">
                <text:p>0.03243228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3658514">
                <text:p>0.0365851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2989229">
                <text:p>0.02989229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484053">
                <text:p>0.048405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287152">
                <text:p>0.028715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3579003">
                <text:p>0.03579003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3140305">
                <text:p>0.0314030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2681707">
                <text:p>0.02681707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3108045">
                <text:p>0.0310804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2885751">
                <text:p>0.02885751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4521857">
                <text:p>0.0452185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2864419">
                <text:p>0.0286441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02322294">
                <text:p>0.02322294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6035437">
                <text:p>0.06035437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3589988">
                <text:p>0.0358998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3890904">
                <text:p>0.0389090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3095022">
                <text:p>0.0309502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2518056">
                <text:p>0.0251805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4131874">
                <text:p>0.04131874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3446534">
                <text:p>0.0344653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3030323">
                <text:p>0.0303032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4012863">
                <text:p>0.04012863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2504331">
                <text:p>0.0250433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2949966">
                <text:p>0.0294996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4289969">
                <text:p>0.0428996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4357843">
                <text:p>0.0435784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3456449">
                <text:p>0.0345644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01635713">
                <text:p>0.01635713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3736345">
                <text:p>0.0373634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02155989">
                <text:p>0.0215598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2634609">
                <text:p>0.0263460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3411752">
                <text:p>0.0341175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3601512">
                <text:p>0.03601512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2662935">
                <text:p>0.0266293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3582838">
                <text:p>0.0358283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2507568">
                <text:p>0.0250756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02085358">
                <text:p>0.0208535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5553238">
                <text:p>0.05553238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02045391">
                <text:p>0.02045391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2725528">
                <text:p>0.02725528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1624504">
                <text:p>0.01624504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3015312">
                <text:p>0.0301531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171312">
                <text:p>0.017131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3018821">
                <text:p>0.0301882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3039899">
                <text:p>0.0303989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2703632">
                <text:p>0.0270363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2324912">
                <text:p>0.0232491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2749221">
                <text:p>0.0274922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2882962">
                <text:p>0.02882962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2218062">
                <text:p>0.0221806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3242346">
                <text:p>0.0324234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362844">
                <text:p>0.0362844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1600644">
                <text:p>0.01600644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3109212">
                <text:p>0.0310921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3291774">
                <text:p>0.03291774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1701912">
                <text:p>0.0170191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1973781">
                <text:p>0.0197378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01025159">
                <text:p>0.01025159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237778">
                <text:p>0.023777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2830239">
                <text:p>0.0283023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346334">
                <text:p>0.0346334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3293709">
                <text:p>0.0329370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2583301">
                <text:p>0.0258330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2445647">
                <text:p>0.02445647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2181716">
                <text:p>0.02181716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1378676">
                <text:p>0.01378676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162929">
                <text:p>0.016292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188958">
                <text:p>0.0188958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1417699">
                <text:p>0.01417699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4145869">
                <text:p>0.0414586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2245167">
                <text:p>0.0224516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1942428">
                <text:p>0.01942428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2195025">
                <text:p>0.0219502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3736039">
                <text:p>0.03736039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3268084">
                <text:p>0.0326808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210943">
                <text:p>0.021094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1576794">
                <text:p>0.0157679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1502613">
                <text:p>0.0150261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2535088">
                <text:p>0.02535088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1989539">
                <text:p>0.0198953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2289889">
                <text:p>0.0228988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1797738">
                <text:p>0.0179773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3424671">
                <text:p>0.0342467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3492625">
                <text:p>0.0349262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2552766">
                <text:p>0.0255276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3533246">
                <text:p>0.0353324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1558957">
                <text:p>0.0155895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3160638">
                <text:p>0.0316063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154111">
                <text:p>0.015411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2407835">
                <text:p>0.0240783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1532059">
                <text:p>0.01532059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1656335">
                <text:p>0.0165633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1328231">
                <text:p>0.01328231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440573">
                <text:p>0.044057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3308117">
                <text:p>0.0330811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2704049">
                <text:p>0.0270404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2347678">
                <text:p>0.02347678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2937356">
                <text:p>0.02937356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4500107">
                <text:p>0.04500107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3154662">
                <text:p>0.0315466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1338655">
                <text:p>0.0133865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2094091">
                <text:p>0.0209409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1853625">
                <text:p>0.0185362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1666893">
                <text:p>0.01666893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2513113">
                <text:p>0.02513113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3678284">
                <text:p>0.03678284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2388266">
                <text:p>0.02388266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2510976">
                <text:p>0.0251097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0104538">
                <text:p>0.0104538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1430783">
                <text:p>0.01430783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1195209">
                <text:p>0.0119520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3630925">
                <text:p>0.0363092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2400487">
                <text:p>0.0240048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2473772">
                <text:p>0.0247377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1969937">
                <text:p>0.01969937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1948258">
                <text:p>0.0194825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2264469">
                <text:p>0.02264469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1691816">
                <text:p>0.0169181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1728617">
                <text:p>0.01728617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3877632">
                <text:p>0.03877632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2394767">
                <text:p>0.0239476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1963386">
                <text:p>0.01963386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12967">
                <text:p>0.01296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2120224">
                <text:p>0.0212022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1431422">
                <text:p>0.0143142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2788937">
                <text:p>0.02788937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2208747">
                <text:p>0.02208747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1799924">
                <text:p>0.01799924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1555676">
                <text:p>0.01555676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08476412">
                <text:p>0.008476412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2259069">
                <text:p>0.02259069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2212719">
                <text:p>0.0221271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2112467">
                <text:p>0.0211246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2073126">
                <text:p>0.02073126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2322281">
                <text:p>0.0232228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1360148">
                <text:p>0.01360148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2821494">
                <text:p>0.0282149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3005719">
                <text:p>0.03005719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1658064">
                <text:p>0.0165806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08376807">
                <text:p>0.00837680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3072989">
                <text:p>0.0307298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1157392">
                <text:p>0.0115739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1950855">
                <text:p>0.0195085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1396434">
                <text:p>0.0139643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1873195">
                <text:p>0.01873195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2440688">
                <text:p>0.02440688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1130244">
                <text:p>0.01130244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07154185">
                <text:p>0.00715418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1266315">
                <text:p>0.0126631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1031806">
                <text:p>0.01031806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0465217">
                <text:p>0.0046521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1371907">
                <text:p>0.01371907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3520746">
                <text:p>0.0352074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09719169">
                <text:p>0.009719169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09690764">
                <text:p>0.00969076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09667449">
                <text:p>0.009667449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235071">
                <text:p>0.023507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1099547">
                <text:p>0.01099547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1891565">
                <text:p>0.01891565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1607946">
                <text:p>0.01607946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4536462">
                <text:p>0.0453646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1899878">
                <text:p>0.0189987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1928265">
                <text:p>0.0192826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1135902">
                <text:p>0.0113590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2638927">
                <text:p>0.02638927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1272591">
                <text:p>0.01272591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1624269">
                <text:p>0.0162426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115026">
                <text:p>0.011502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1549268">
                <text:p>0.01549268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2365679">
                <text:p>0.02365679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08798922">
                <text:p>0.00879892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3222632">
                <text:p>0.0322263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09463943">
                <text:p>0.009463943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04893346">
                <text:p>0.00489334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08940947">
                <text:p>0.008940947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1571005">
                <text:p>0.01571005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1320356">
                <text:p>0.0132035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2525072">
                <text:p>0.0252507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08463554">
                <text:p>0.00846355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1378787">
                <text:p>0.01378787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2347042">
                <text:p>0.0234704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1260615">
                <text:p>0.0126061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4127338">
                <text:p>0.04127338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2046285">
                <text:p>0.0204628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121455">
                <text:p>0.012145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1881144">
                <text:p>0.01881144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2441376">
                <text:p>0.02441376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2317737">
                <text:p>0.02317737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1155277">
                <text:p>0.01155277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171057">
                <text:p>0.0171057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3273477">
                <text:p>0.03273477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08626725">
                <text:p>0.00862672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2203586">
                <text:p>0.0220358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03766691">
                <text:p>0.003766691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2968275">
                <text:p>0.0296827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08945257">
                <text:p>0.008945257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2266237">
                <text:p>0.02266237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1506112">
                <text:p>0.0150611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08872098">
                <text:p>0.008872098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1690122">
                <text:p>0.0169012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0345832">
                <text:p>0.00345832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3575723">
                <text:p>0.0357572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2000116">
                <text:p>0.0200011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1741412">
                <text:p>0.0174141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06339">
                <text:p>0.006339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1173947">
                <text:p>0.01173947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08299777">
                <text:p>0.00829977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02700311">
                <text:p>0.002700311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4208625">
                <text:p>0.04208625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08438079">
                <text:p>0.00843807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07575438">
                <text:p>0.00757543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1393667">
                <text:p>0.01393667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03272701">
                <text:p>0.003272701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06703477">
                <text:p>0.006703477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3685034">
                <text:p>0.0368503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1308514">
                <text:p>0.0130851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4242853">
                <text:p>0.0424285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01326482">
                <text:p>0.00132648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2370376">
                <text:p>0.02370376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2735447">
                <text:p>0.0273544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07867754">
                <text:p>0.00786775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1057861">
                <text:p>0.0105786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1050123">
                <text:p>0.01050123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06469829">
                <text:p>0.006469829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1393421">
                <text:p>0.01393421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1535965">
                <text:p>0.0153596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1191293">
                <text:p>0.0119129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01275173">
                <text:p>0.00127517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05151195">
                <text:p>0.00515119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1692707">
                <text:p>0.01692707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1164088">
                <text:p>0.0116408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03990395">
                <text:p>0.003990395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1273729">
                <text:p>0.0127372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09633637">
                <text:p>0.009633637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08947358">
                <text:p>0.00894735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-0.001272451">
                <text:p>-0.00127245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005877938">
                <text:p>0.0005877938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08211756">
                <text:p>0.008211756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268364">
                <text:p>0.026836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1668597">
                <text:p>0.0166859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121516">
                <text:p>0.0121516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09733532">
                <text:p>0.009733532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1629918">
                <text:p>0.0162991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002556792">
                <text:p>0.000255679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06722749">
                <text:p>0.006722749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1506044">
                <text:p>0.01506044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0826207">
                <text:p>0.0082620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06746473">
                <text:p>0.00674647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1310903">
                <text:p>0.0131090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1522887">
                <text:p>0.01522887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03046467">
                <text:p>0.003046467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01331298">
                <text:p>0.00133129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1262721">
                <text:p>0.01262721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1562469">
                <text:p>0.0156246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3106103">
                <text:p>0.0310610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-0.0004149194">
                <text:p>-0.0004149194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2570304">
                <text:p>0.0257030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08262905">
                <text:p>0.00826290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2667037">
                <text:p>0.0266703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1675191">
                <text:p>0.01675191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2020655">
                <text:p>0.02020655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2325454">
                <text:p>0.02325454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09660281">
                <text:p>0.009660281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-0.0004618658">
                <text:p>-0.0004618658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03261495">
                <text:p>0.003261495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2036001">
                <text:p>0.0203600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1437116">
                <text:p>0.01437116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04586183">
                <text:p>0.004586183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03469737">
                <text:p>0.003469737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-0.0007307472">
                <text:p>-0.000730747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1763019">
                <text:p>0.01763019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2122801">
                <text:p>0.0212280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-0.002222783">
                <text:p>-0.00222278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1240135">
                <text:p>0.01240135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-0.0008233004">
                <text:p>-0.000823300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03591845">
                <text:p>0.003591845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03611579">
                <text:p>0.003611579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02080819">
                <text:p>0.002080819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3163876">
                <text:p>0.03163876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2046494">
                <text:p>0.0204649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2021339">
                <text:p>0.02021339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006552186">
                <text:p>0.000655218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05391536">
                <text:p>0.005391536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0918768">
                <text:p>0.0091876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4013924">
                <text:p>0.04013924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2220041">
                <text:p>0.02220041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2071071">
                <text:p>0.0207107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01182776">
                <text:p>0.00118277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1588816">
                <text:p>0.01588816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06348317">
                <text:p>0.00634831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0540848">
                <text:p>0.00540848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1133538">
                <text:p>0.01133538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194928">
                <text:p>0.0194928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07855015">
                <text:p>0.00785501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06351832">
                <text:p>0.006351832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1616518">
                <text:p>0.0161651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2126874">
                <text:p>0.02126874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02007835">
                <text:p>0.002007835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173734">
                <text:p>0.0173734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05221808">
                <text:p>0.005221808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2553583">
                <text:p>0.02553583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-0.001029777">
                <text:p>-0.001029777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06913339">
                <text:p>0.006913339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06974165">
                <text:p>0.006974165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1979749">
                <text:p>0.01979749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06202151">
                <text:p>0.00620215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0769796">
                <text:p>0.00769796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03786396">
                <text:p>0.003786396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-0.001533639">
                <text:p>-0.001533639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1531043">
                <text:p>0.01531043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4318034">
                <text:p>0.04318034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001848159">
                <text:p>0.0001848159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05517486">
                <text:p>0.00551748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02076355">
                <text:p>0.00207635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1925181">
                <text:p>0.01925181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-0.002143143">
                <text:p>-0.00214314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07360468">
                <text:p>0.007360468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0408014">
                <text:p>0.0040801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-0.0009392216">
                <text:p>-0.0009392216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-0.0003762484">
                <text:p>-0.000376248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06614702">
                <text:p>0.006614702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0139273">
                <text:p>0.00139273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3041641">
                <text:p>0.03041641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005678816">
                <text:p>0.0005678816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-0.002005243">
                <text:p>-0.00200524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1291322">
                <text:p>0.0129132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1472958">
                <text:p>0.01472958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04942155">
                <text:p>0.004942155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-0.006375644">
                <text:p>-0.00637564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268796">
                <text:p>0.0268796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1325892">
                <text:p>0.0132589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-0.002399117">
                <text:p>-0.00239911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07947459">
                <text:p>0.007947459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0569438">
                <text:p>0.0056943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003206581">
                <text:p>0.000320658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174276">
                <text:p>0.0174276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1771358">
                <text:p>0.01771358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06382425">
                <text:p>0.006382425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1729658">
                <text:p>0.0172965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-0.003529673">
                <text:p>-0.003529673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02371625">
                <text:p>0.002371625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-0.003144493">
                <text:p>-0.003144493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-0.00296159">
                <text:p>-0.0029615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08715253">
                <text:p>0.008715253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1942649">
                <text:p>0.01942649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-0.003697218">
                <text:p>-0.003697218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3051868">
                <text:p>0.03051868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06132902">
                <text:p>0.006132902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02930016">
                <text:p>0.002930016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-0.004688136">
                <text:p>-0.004688136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-0.005228196">
                <text:p>-0.005228196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-0.001399574">
                <text:p>-0.00139957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183132">
                <text:p>0.018313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2280119">
                <text:p>0.02280119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0147046">
                <text:p>0.00147046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006771485">
                <text:p>0.0006771485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-0.003031049">
                <text:p>-0.00303104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1896643">
                <text:p>0.0189664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06842616">
                <text:p>0.006842616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-0.007415933">
                <text:p>-0.007415933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-0.0004141594">
                <text:p>-0.0004141594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07092408">
                <text:p>0.00709240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008298985">
                <text:p>0.0008298985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01511298">
                <text:p>0.00151129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2027757">
                <text:p>0.02027757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-0.002396486">
                <text:p>-0.002396486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1932915">
                <text:p>0.01932915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-0.001254758">
                <text:p>-0.00125475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1584542">
                <text:p>0.0158454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04374337">
                <text:p>0.004374337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-0.003252687">
                <text:p>-0.003252687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1314941">
                <text:p>0.0131494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1382908">
                <text:p>0.01382908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-0.00145181">
                <text:p>-0.0014518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-0.006530114">
                <text:p>-0.006530114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-0.007747329">
                <text:p>-0.00774732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-0.001925797">
                <text:p>-0.00192579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-0.0008682403">
                <text:p>-0.000868240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06744353">
                <text:p>0.006744353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1294553">
                <text:p>0.0129455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02517498">
                <text:p>0.002517498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-0.003593539">
                <text:p>-0.00359353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09043631">
                <text:p>0.00904363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001697737">
                <text:p>0.000169773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04283861">
                <text:p>0.004283861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-0.00156304">
                <text:p>-0.00156304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-0.00409554">
                <text:p>-0.0040955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-0.0005720203">
                <text:p>-0.000572020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1220152">
                <text:p>0.0122015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-0.004996031">
                <text:p>-0.00499603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-0.001194918">
                <text:p>-0.00119491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02293708">
                <text:p>0.00229370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1141668">
                <text:p>0.0114166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06404021">
                <text:p>0.006404021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0299247">
                <text:p>0.0029924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1503992">
                <text:p>0.0150399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1241038">
                <text:p>0.0124103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09192459">
                <text:p>0.009192459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04791857">
                <text:p>0.004791857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02075318">
                <text:p>0.00207531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2248196">
                <text:p>0.02248196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-0.003088419">
                <text:p>-0.003088419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-0.004308126">
                <text:p>-0.004308126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002410269">
                <text:p>0.000241026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-0.0002301498">
                <text:p>-0.000230149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-0.00109639">
                <text:p>-0.0010963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-0.001952281">
                <text:p>-0.001952281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0983675">
                <text:p>0.0098367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1022593">
                <text:p>0.01022593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1399686">
                <text:p>0.01399686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1329106">
                <text:p>0.01329106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02650674">
                <text:p>0.002650674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-0.003173097">
                <text:p>-0.00317309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03202754">
                <text:p>0.003202754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-0.0002232679">
                <text:p>-0.000223267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-0.00292548">
                <text:p>-0.00292548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0192202">
                <text:p>0.0019220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-0.0001779912">
                <text:p>-0.0001779912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-0.006214656">
                <text:p>-0.00621465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1209484">
                <text:p>0.01209484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05236765">
                <text:p>0.005236765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163331">
                <text:p>0.0163331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08224081">
                <text:p>0.00822408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3047794">
                <text:p>0.0304779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0754548">
                <text:p>0.00754548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01628962">
                <text:p>0.001628962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09256748">
                <text:p>0.009256748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-0.0006560801">
                <text:p>-0.000656080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06067005">
                <text:p>0.006067005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3061532">
                <text:p>0.03061532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-0.004787388">
                <text:p>-0.004787388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2929581">
                <text:p>0.02929581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-0.00570071">
                <text:p>-0.00570071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2352612">
                <text:p>0.0235261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1098072">
                <text:p>0.01098072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01245191">
                <text:p>0.001245191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0654173">
                <text:p>0.00654173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02902277">
                <text:p>0.00290227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-0.008446382">
                <text:p>-0.00844638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-0.002097777">
                <text:p>-0.002097777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01741163">
                <text:p>0.001741163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03028934">
                <text:p>0.00302893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08525318">
                <text:p>0.00852531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-0.006861422">
                <text:p>-0.00686142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-0.001614266">
                <text:p>-0.001614266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224471">
                <text:p>0.022447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0655172">
                <text:p>0.00655172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08024654">
                <text:p>0.00802465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-0.001676777">
                <text:p>-0.00167677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-0.00739266">
                <text:p>-0.0073926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-0.005644624">
                <text:p>-0.005644624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02343733">
                <text:p>0.00234373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-0.002143343">
                <text:p>-0.002143343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05284782">
                <text:p>0.00528478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1039592">
                <text:p>0.01039592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1240156">
                <text:p>0.01240156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03093611">
                <text:p>0.00309361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1406268">
                <text:p>0.0140626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01094699">
                <text:p>0.001094699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02564243">
                <text:p>0.002564243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-0.001601426">
                <text:p>-0.001601426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08407321">
                <text:p>0.008407321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-0.0003051513">
                <text:p>-0.0003051513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-0.005543641">
                <text:p>-0.00554364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04458862">
                <text:p>0.004458862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-0.002175354">
                <text:p>-0.002175354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-0.0006082565">
                <text:p>-0.0006082565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04703934">
                <text:p>0.004703934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-0.005881185">
                <text:p>-0.00588118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009247033">
                <text:p>0.0009247033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-0.007299702">
                <text:p>-0.00729970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07971393">
                <text:p>0.007971393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-0.004019448">
                <text:p>-0.004019448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05501279">
                <text:p>0.00550127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-0.004374447">
                <text:p>-0.004374447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04656684">
                <text:p>0.004656684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2164949">
                <text:p>0.02164949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06655138">
                <text:p>0.00665513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2694551">
                <text:p>0.02694551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04628403">
                <text:p>0.00462840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2008595">
                <text:p>0.0200859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-0.006296349">
                <text:p>-0.00629634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-0.003162027">
                <text:p>-0.003162027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-0.01155259">
                <text:p>-0.01155259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0893662">
                <text:p>0.00893662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-0.00326312">
                <text:p>-0.00326312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07526598">
                <text:p>0.00752659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004837749">
                <text:p>0.0004837749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-0.0005453075">
                <text:p>-0.0005453075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1979631">
                <text:p>0.01979631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002007478">
                <text:p>0.000200747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065603">
                <text:p>0.01065603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-0.009368393">
                <text:p>-0.009368393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01954376">
                <text:p>0.001954376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-0.009473981">
                <text:p>-0.00947398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01384414">
                <text:p>0.001384414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-0.007552133">
                <text:p>-0.007552133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-0.01017665">
                <text:p>-0.01017665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02710703">
                <text:p>0.00271070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-0.001554071">
                <text:p>-0.00155407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1910636">
                <text:p>0.0191063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-0.001130883">
                <text:p>-0.001130883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03149675">
                <text:p>0.00314967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168625">
                <text:p>0.02168625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02232027">
                <text:p>0.0022320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-0.001435644">
                <text:p>-0.00143564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05191402">
                <text:p>0.005191402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-0.002798447">
                <text:p>-0.00279844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175719">
                <text:p>0.0175719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144746">
                <text:p>0.01144746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06259923">
                <text:p>0.006259923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187308">
                <text:p>0.018730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09288693">
                <text:p>0.009288693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-0.005845046">
                <text:p>-0.00584504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-0.00425621">
                <text:p>-0.00425621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-0.008235238">
                <text:p>-0.008235238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1580828">
                <text:p>0.01580828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300826">
                <text:p>0.03300826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-0.003493521">
                <text:p>-0.003493521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-0.005457875">
                <text:p>-0.00545787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-0.0004710519">
                <text:p>-0.0004710519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-0.005673052">
                <text:p>-0.005673052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-0.002725558">
                <text:p>-0.002725558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-0.006691468">
                <text:p>-0.006691468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06350724">
                <text:p>0.006350724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05449343">
                <text:p>0.00544934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1449303">
                <text:p>0.001449303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03207859">
                <text:p>0.003207859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04074196">
                <text:p>0.004074196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-0.006351791">
                <text:p>-0.006351791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-0.002583703">
                <text:p>-0.002583703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-0.009237234">
                <text:p>-0.00923723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06902389">
                <text:p>0.00690238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03318789">
                <text:p>0.00331878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1647291">
                <text:p>0.01647291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1173311">
                <text:p>-0.0117331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-0.005812954">
                <text:p>-0.005812954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-0.0008643058">
                <text:p>-0.0008643058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09161849">
                <text:p>-0.00916184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05844822">
                <text:p>0.005844822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05780502">
                <text:p>0.00578050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-0.0002939257">
                <text:p>-0.0002939257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1737128">
                <text:p>0.00173712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300111">
                <text:p>0.01300111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-0.003582814">
                <text:p>-0.003582814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03663312">
                <text:p>0.003663312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203002">
                <text:p>0.0120300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03132256">
                <text:p>0.003132256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-0.002908209">
                <text:p>-0.002908209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-0.004629893">
                <text:p>-0.004629893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-0.004789527">
                <text:p>-0.004789527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-0.0003016522">
                <text:p>-0.000301652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2938606">
                <text:p>0.002938606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07222922">
                <text:p>0.00722292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8951538">
                <text:p>-0.008951538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-0.003321192">
                <text:p>-0.00332119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-0.0002216366">
                <text:p>-0.0002216366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-0.0008705418">
                <text:p>-0.000870541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2027185">
                <text:p>0.00202718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2629211">
                <text:p>0.002629211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-0.0002382546">
                <text:p>-0.0002382546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3241764">
                <text:p>0.003241764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05486328">
                <text:p>0.00548632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-0.0007409722">
                <text:p>-0.000740972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-0.007595032">
                <text:p>-0.007595032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-0.001627184">
                <text:p>-0.001627184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4828138">
                <text:p>0.004828138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-0.0008902014">
                <text:p>-0.0008902014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7826961">
                <text:p>-0.007826961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06739047">
                <text:p>0.006739047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07497951">
                <text:p>0.007497951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-0.0002712408">
                <text:p>-0.0002712408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06977676">
                <text:p>0.006977676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8304484">
                <text:p>-0.008304484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340726">
                <text:p>0.01340726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09246015">
                <text:p>0.009246015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2177496">
                <text:p>0.002177496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-0.005322342">
                <text:p>-0.00532234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1636492">
                <text:p>0.0163649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-0.006919903">
                <text:p>-0.006919903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1966105">
                <text:p>0.01966105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-0.00302011">
                <text:p>-0.00302011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08755676">
                <text:p>0.008755676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07811821">
                <text:p>0.007811821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1079385">
                <text:p>0.001079385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-0.0002047252">
                <text:p>-0.000204725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-0.004047781">
                <text:p>-0.004047781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2762083">
                <text:p>0.00276208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3073177">
                <text:p>0.00307317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1571762">
                <text:p>0.001571762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09592029">
                <text:p>0.009592029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-0.003585345">
                <text:p>-0.003585345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-0.006870242">
                <text:p>-0.00687024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-0.006775658">
                <text:p>-0.006775658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1401127">
                <text:p>-0.0140112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06359126">
                <text:p>0.006359126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1204257">
                <text:p>-0.01204257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1046866">
                <text:p>0.001046866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06648549">
                <text:p>0.006648549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01894344">
                <text:p>0.0001894344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-0.002297885">
                <text:p>-0.002297885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-0.002802626">
                <text:p>-0.00280262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-0.001803373">
                <text:p>-0.00180337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08076551">
                <text:p>0.00807655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2942472">
                <text:p>0.002942472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7218391">
                <text:p>-0.007218391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540879">
                <text:p>0.01540879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3649841">
                <text:p>0.003649841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-0.005849294">
                <text:p>-0.005849294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-0.006303384">
                <text:p>-0.00630338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02259232">
                <text:p>0.000225923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-0.001472595">
                <text:p>-0.001472595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8235457">
                <text:p>-0.008235457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570609">
                <text:p>0.01570609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2880375">
                <text:p>0.002880375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371331">
                <text:p>0.01371331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4305968">
                <text:p>0.004305968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08290949">
                <text:p>0.00829094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-0.0001692883">
                <text:p>-0.0001692883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069029">
                <text:p>0.01069029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08003592">
                <text:p>0.00800359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6846705">
                <text:p>-0.00684670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1620694">
                <text:p>0.00162069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08153855">
                <text:p>0.00815385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9465106">
                <text:p>-0.009465106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-0.003935634">
                <text:p>-0.003935634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019815">
                <text:p>0.0101981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-0.001279517">
                <text:p>-0.001279517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-0.004241044">
                <text:p>-0.00424104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-0.002874179">
                <text:p>-0.002874179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6373371">
                <text:p>-0.006373371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1055018">
                <text:p>-0.01055018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7366693">
                <text:p>-0.007366693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3278884">
                <text:p>0.00327888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2020767">
                <text:p>0.002020767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58133">
                <text:p>0.0158133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081127">
                <text:p>0.01081127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2777356">
                <text:p>0.00277735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1215658">
                <text:p>-0.0121565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169846">
                <text:p>0.02169846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1171848">
                <text:p>-0.01171848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-0.004413477">
                <text:p>-0.004413477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-0.003026251">
                <text:p>-0.003026251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2760718">
                <text:p>0.002760718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-0.002886879">
                <text:p>-0.002886879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07576952">
                <text:p>0.007576952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8770533">
                <text:p>-0.00877053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1016768">
                <text:p>-0.01016768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1885379">
                <text:p>0.001885379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2498177">
                <text:p>0.002498177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07188619">
                <text:p>0.00718861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-0.004137916">
                <text:p>-0.00413791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246138">
                <text:p>0.01246138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6767126">
                <text:p>-0.006767126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-0.004900186">
                <text:p>-0.004900186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4110455">
                <text:p>0.004110455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349959">
                <text:p>0.01349959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056974">
                <text:p>0.0105697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599109">
                <text:p>0.00599109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07096358">
                <text:p>0.007096358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9510407">
                <text:p>-0.009510407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08603198">
                <text:p>0.008603198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-0.0005956554">
                <text:p>-0.0005956554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8317268">
                <text:p>-0.008317268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09349003">
                <text:p>0.009349003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01331844">
                <text:p>0.0001331844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8672026">
                <text:p>-0.00867202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1312141">
                <text:p>-0.01312141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-0.003335871">
                <text:p>-0.003335871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2311129">
                <text:p>0.002311129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-0.0008355269">
                <text:p>-0.000835526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5782841">
                <text:p>-0.005782841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08852526">
                <text:p>0.008852526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-0.004023835">
                <text:p>-0.004023835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4275459">
                <text:p>0.004275459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-0.004045581">
                <text:p>-0.00404558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4159679">
                <text:p>0.004159679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-0.003052381">
                <text:p>-0.003052381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-0.003332217">
                <text:p>-0.003332217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1137303">
                <text:p>0.001137303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7369116">
                <text:p>-0.007369116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828312">
                <text:p>0.0182831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-0.002453287">
                <text:p>-0.002453287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2330017">
                <text:p>0.002330017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5769456">
                <text:p>0.00576945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3252808">
                <text:p>0.003252808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-0.0006041774">
                <text:p>-0.000604177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07420964">
                <text:p>0.007420964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08605682">
                <text:p>0.00860568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5333091">
                <text:p>-0.005333091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5490573">
                <text:p>0.005490573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-0.0001826873">
                <text:p>-0.000182687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3074468">
                <text:p>0.003074468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-0.002005243">
                <text:p>-0.002005243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7278719">
                <text:p>-0.007278719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004087">
                <text:p>0.01004087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6109553">
                <text:p>-0.00610955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4103509">
                <text:p>-0.004103509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-0.001225518">
                <text:p>-0.001225518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2360368">
                <text:p>0.00236036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2108294">
                <text:p>0.002108294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-0.001218741">
                <text:p>-0.001218741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-0.003212033">
                <text:p>-0.003212033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-0.004731107">
                <text:p>-0.004731107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1692527">
                <text:p>0.001692527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5249906">
                <text:p>0.005249906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1232557">
                <text:p>-0.01232557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05116938">
                <text:p>0.0005116938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7577311">
                <text:p>-0.007577311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2304441">
                <text:p>0.00230444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-0.003779106">
                <text:p>-0.003779106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6231551">
                <text:p>-0.006231551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6577619">
                <text:p>-0.006577619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-0.001762637">
                <text:p>-0.001762637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2280507">
                <text:p>0.002280507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-0.002797049">
                <text:p>-0.00279704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5726659">
                <text:p>-0.005726659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-0.001632282">
                <text:p>-0.00163228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03287481">
                <text:p>0.0003287481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9037341">
                <text:p>-0.009037341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-0.00200809">
                <text:p>-0.00200809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1113515">
                <text:p>-0.01113515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9430282">
                <text:p>-0.009430282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6294011">
                <text:p>-0.006294011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-0.004062686">
                <text:p>-0.004062686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6889343">
                <text:p>-0.006889343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8103736">
                <text:p>-0.008103736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3719348">
                <text:p>0.00371934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1274561">
                <text:p>-0.01274561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5444896">
                <text:p>-0.005444896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9876032">
                <text:p>-0.009876032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4664361">
                <text:p>0.004664361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6881475">
                <text:p>-0.006881475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7902062">
                <text:p>0.007902062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08838723">
                <text:p>0.008838723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5997657">
                <text:p>-0.005997657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-0.000129227">
                <text:p>-0.000129227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092716">
                <text:p>0.01092716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2450363">
                <text:p>0.002450363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6055626">
                <text:p>-0.00605562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237388">
                <text:p>0.01237388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-0.001900131">
                <text:p>-0.001900131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-0.0006922075">
                <text:p>-0.0006922075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4352442">
                <text:p>-0.004352442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1633886">
                <text:p>0.00163388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9750837">
                <text:p>-0.009750837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8657107">
                <text:p>-0.008657107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05331716">
                <text:p>0.0005331716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-0.001977488">
                <text:p>-0.001977488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1764659">
                <text:p>0.001764659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-0.003298064">
                <text:p>-0.003298064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789741">
                <text:p>0.00789741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2998454">
                <text:p>0.002998454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1208155">
                <text:p>-0.01208155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02152142">
                <text:p>0.0002152142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8774718">
                <text:p>-0.008774718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1093558">
                <text:p>-0.01093558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155229">
                <text:p>0.0115522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-0.00247423">
                <text:p>-0.00247423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-0.006302855">
                <text:p>-0.006302855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08222416">
                <text:p>0.008222416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2932776">
                <text:p>0.002932776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6715141">
                <text:p>-0.006715141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4006593">
                <text:p>-0.004006593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7238013">
                <text:p>-0.007238013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8523281">
                <text:p>-0.00852328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5612988">
                <text:p>-0.00561298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4045809">
                <text:p>-0.00404580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5574229">
                <text:p>-0.005574229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-0.0005695468">
                <text:p>-0.0005695468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-0.001700444">
                <text:p>-0.001700444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721197">
                <text:p>0.01721197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3459499">
                <text:p>0.003459499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4785184">
                <text:p>0.004785184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4150899">
                <text:p>0.00415089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5890255">
                <text:p>-0.005890255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5425763">
                <text:p>-0.005425763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273876">
                <text:p>0.00273876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1204115">
                <text:p>0.00120411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-0.001644273">
                <text:p>-0.001644273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2497975">
                <text:p>0.002497975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340329">
                <text:p>0.02340329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9230153">
                <text:p>-0.009230153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-0.001130973">
                <text:p>-0.00113097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4351313">
                <text:p>0.04351313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2422548">
                <text:p>0.002422548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3557822">
                <text:p>0.003557822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-0.003039525">
                <text:p>-0.003039525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244236">
                <text:p>0.01244236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1326601">
                <text:p>0.001326601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1146197">
                <text:p>-0.01146197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09847787">
                <text:p>0.009847787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8661182">
                <text:p>-0.008661182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708485">
                <text:p>-0.00708485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7689682">
                <text:p>0.007689682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2824659">
                <text:p>0.002824659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324625">
                <text:p>0.01324625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2824879">
                <text:p>0.002824879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5155754">
                <text:p>0.005155754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-0.001147772">
                <text:p>-0.001147772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222984">
                <text:p>0.00222984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-0.001986115">
                <text:p>-0.001986115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-0.0008170953">
                <text:p>-0.0008170953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9671478">
                <text:p>-0.009671478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7010365">
                <text:p>-0.00701036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1348266">
                <text:p>-0.01348266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-0.002560258">
                <text:p>-0.002560258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5702807">
                <text:p>-0.005702807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346334">
                <text:p>0.0134633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8890848">
                <text:p>-0.008890848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-0.002641841">
                <text:p>-0.002641841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-0.0008257008">
                <text:p>-0.0008257008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-0.001891241">
                <text:p>-0.001891241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-0.002121909">
                <text:p>-0.00212190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9431001">
                <text:p>0.00943100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-0.002788413">
                <text:p>-0.002788413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4195862">
                <text:p>-0.004195862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122551">
                <text:p>-0.0122551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-0.001623093">
                <text:p>-0.001623093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07528448">
                <text:p>0.0007528448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2837387">
                <text:p>0.002837387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8353721">
                <text:p>-0.008353721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1040883">
                <text:p>-0.01040883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09701402">
                <text:p>0.009701402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1571057">
                <text:p>0.001571057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3940299">
                <text:p>-0.00394029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-0.003237355">
                <text:p>-0.003237355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8826716">
                <text:p>-0.00882671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755233">
                <text:p>0.0275523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9208731">
                <text:p>-0.009208731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353006">
                <text:p>0.01353006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889915">
                <text:p>-0.0088991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7231038">
                <text:p>-0.007231038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1088141">
                <text:p>-0.01088141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9406908">
                <text:p>-0.009406908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1381539">
                <text:p>-0.01381539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7423037">
                <text:p>0.007423037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3207772">
                <text:p>0.003207772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881922">
                <text:p>-0.0088192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-0.0003331862">
                <text:p>-0.0003331862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7753752">
                <text:p>-0.00775375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86531">
                <text:p>0.0286531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687033">
                <text:p>0.00687033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433206">
                <text:p>0.01433206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1878618">
                <text:p>0.001878618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9927544">
                <text:p>-0.009927544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4916209">
                <text:p>-0.004916209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2717129">
                <text:p>0.002717129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3232791">
                <text:p>0.003232791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764703">
                <text:p>0.02764703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2430583">
                <text:p>-0.00243058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-0.00140964">
                <text:p>-0.00140964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6687022">
                <text:p>0.006687022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-0.001384084">
                <text:p>-0.001384084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01443916">
                <text:p>0.0001443916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3471928">
                <text:p>0.00347192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151612">
                <text:p>0.01151612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-0.002861292">
                <text:p>-0.002861292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4210955">
                <text:p>-0.00421095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871748">
                <text:p>0.02871748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117168">
                <text:p>0.01117168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08165429">
                <text:p>0.0008165429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-0.00180801">
                <text:p>-0.00180801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1685402">
                <text:p>0.001685402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232827">
                <text:p>0.01232827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1853252">
                <text:p>0.00185325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04279384">
                <text:p>0.0004279384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80569">
                <text:p>-0.0080569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4851873">
                <text:p>-0.00485187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3289539">
                <text:p>0.003289539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6053201">
                <text:p>-0.00605320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599797">
                <text:p>0.01599797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6380448">
                <text:p>0.00638044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5853098">
                <text:p>-0.005853098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5745444">
                <text:p>0.005745444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1175008">
                <text:p>-0.01175008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625775">
                <text:p>-0.00625775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4636559">
                <text:p>0.004636559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058875">
                <text:p>0.01058875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6348869">
                <text:p>-0.006348869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5565627">
                <text:p>-0.005565627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8569019">
                <text:p>0.00856901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761408">
                <text:p>0.0176140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-0.002224945">
                <text:p>-0.002224945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-0.0001412734">
                <text:p>-0.0001412734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4230695">
                <text:p>-0.004230695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2506462">
                <text:p>-0.002506462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3334014">
                <text:p>-0.003334014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7151845">
                <text:p>-0.007151845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-0.0002401953">
                <text:p>-0.0002401953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373263">
                <text:p>0.0137326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1201879">
                <text:p>-0.0120187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6623372">
                <text:p>0.006623372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6711181">
                <text:p>-0.006711181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3755491">
                <text:p>-0.003755491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6116154">
                <text:p>-0.006116154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7227512">
                <text:p>-0.007227512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047732">
                <text:p>0.01047732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5658153">
                <text:p>-0.005658153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8059068">
                <text:p>-0.008059068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1130948">
                <text:p>-0.01130948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1052428">
                <text:p>-0.01052428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137802">
                <text:p>0.0013780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-0.0005825146">
                <text:p>-0.0005825146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5096423">
                <text:p>-0.005096423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156776">
                <text:p>0.01156776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3901946">
                <text:p>-0.003901946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08319785">
                <text:p>0.000831978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419631">
                <text:p>0.0141963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3529488">
                <text:p>-0.003529488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3258772">
                <text:p>-0.003258772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2124763">
                <text:p>0.02124763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-0.002987482">
                <text:p>-0.002987482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305443">
                <text:p>0.00305443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5367696">
                <text:p>0.005367696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522184">
                <text:p>-0.00522184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950774">
                <text:p>0.00950774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-0.0001589917">
                <text:p>-0.0001589917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9576956">
                <text:p>-0.009576956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1083895">
                <text:p>-0.01083895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08335858">
                <text:p>0.000833585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046677">
                <text:p>0.00404667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38158">
                <text:p>0.0038158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8817787">
                <text:p>-0.008817787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108815">
                <text:p>0.00108815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3813962">
                <text:p>0.003813962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7793029">
                <text:p>0.007793029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3740419">
                <text:p>-0.00374041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1883943">
                <text:p>0.001883943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3938412">
                <text:p>0.003938412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5651652">
                <text:p>-0.005651652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4052251">
                <text:p>-0.004052251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6096616">
                <text:p>-0.006096616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293846">
                <text:p>0.01293846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1124291">
                <text:p>-0.01124291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2497647">
                <text:p>-0.002497647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1042823">
                <text:p>0.001042823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1848426">
                <text:p>0.001848426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-0.000229481">
                <text:p>-0.000229481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7149657">
                <text:p>-0.007149657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7934473">
                <text:p>-0.007934473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1758392">
                <text:p>0.001758392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2912537">
                <text:p>-0.002912537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30525">
                <text:p>-0.0030525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6462428">
                <text:p>0.006462428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04662095">
                <text:p>0.000466209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9421754">
                <text:p>-0.00942175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9727678">
                <text:p>0.009727678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3138418">
                <text:p>-0.003138418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8295706">
                <text:p>-0.008295706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1036661">
                <text:p>0.001036661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-0.0009220928">
                <text:p>-0.000922092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-0.0001154999">
                <text:p>-0.0001154999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1107609">
                <text:p>-0.01107609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9046074">
                <text:p>-0.009046074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3617639">
                <text:p>0.003617639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5290586">
                <text:p>-0.005290586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380581">
                <text:p>0.01380581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1051634">
                <text:p>-0.0105163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5142562">
                <text:p>-0.005142562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-0.002319117">
                <text:p>-0.002319117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7610008">
                <text:p>0.007610008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3895823">
                <text:p>0.003895823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8451799">
                <text:p>-0.008451799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772597">
                <text:p>0.0077259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6685107">
                <text:p>-0.006685107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1164074">
                <text:p>-0.01164074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5756205">
                <text:p>-0.00575620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964188">
                <text:p>0.01964188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882663">
                <text:p>0.01882663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774523">
                <text:p>0.01774523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1170143">
                <text:p>-0.01170143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-0.001279629">
                <text:p>-0.00127962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4198271">
                <text:p>0.004198271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5636544">
                <text:p>0.00563654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90616">
                <text:p>-0.009061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3031076">
                <text:p>-0.003031076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1312835">
                <text:p>-0.01312835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100647">
                <text:p>0.0100647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4320676">
                <text:p>0.004320676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-0.001274376">
                <text:p>-0.001274376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3544713">
                <text:p>0.003544713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53718">
                <text:p>0.0153718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4852044">
                <text:p>-0.004852044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280723">
                <text:p>0.004280723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2500352">
                <text:p>0.002500352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4087113">
                <text:p>0.004087113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1119782">
                <text:p>-0.0111978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5276876">
                <text:p>-0.005276876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05736666">
                <text:p>0.0005736666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9243809">
                <text:p>-0.009243809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2445497">
                <text:p>0.002445497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2532401">
                <text:p>-0.002532401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7392803">
                <text:p>-0.007392803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-0.000862665">
                <text:p>-0.000862665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9744376">
                <text:p>-0.009744376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1250471">
                <text:p>-0.01250471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4864678">
                <text:p>0.004864678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07806983">
                <text:p>0.0007806983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-0.0004832447">
                <text:p>-0.0004832447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-0.001160798">
                <text:p>-0.001160798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02385086">
                <text:p>0.0002385086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5515025">
                <text:p>0.005515025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7059294">
                <text:p>-0.007059294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1178154">
                <text:p>-0.01178154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09662243">
                <text:p>0.0009662243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1109113">
                <text:p>-0.001109113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-0.0009047968">
                <text:p>-0.000904796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1008398">
                <text:p>0.001008398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4318351">
                <text:p>-0.004318351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084897">
                <text:p>0.00084897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8100118">
                <text:p>-0.008100118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206728">
                <text:p>0.005206728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2730188">
                <text:p>-0.002730188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7355857">
                <text:p>-0.00735585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07479642">
                <text:p>0.0007479642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4481895">
                <text:p>-0.004481895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01678257">
                <text:p>0.0001678257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3990173">
                <text:p>0.003990173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7719768">
                <text:p>0.007719768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-0.002153612">
                <text:p>-0.002153612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6582236">
                <text:p>-0.006582236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1050617">
                <text:p>0.01050617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4159674">
                <text:p>-0.00415967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1035273">
                <text:p>-0.01035273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1079143">
                <text:p>-0.0107914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4730097">
                <text:p>0.004730097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8983733">
                <text:p>-0.008983733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09931356">
                <text:p>0.009931356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1138277">
                <text:p>-0.0113827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0167706">
                <text:p>0.00016770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614444">
                <text:p>0.0261444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03657818">
                <text:p>0.0003657818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5949883">
                <text:p>0.005949883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227874">
                <text:p>0.005227874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5090296">
                <text:p>-0.005090296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05422395">
                <text:p>0.0005422395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-0.0006337948">
                <text:p>-0.000633794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973467">
                <text:p>0.0197346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1080601">
                <text:p>-0.01080601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841035">
                <text:p>0.0184103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2794474">
                <text:p>-0.00279447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8753048">
                <text:p>-0.008753048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638064">
                <text:p>0.01638064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4273173">
                <text:p>-0.004273173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9779319">
                <text:p>-0.00977931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1042365">
                <text:p>-0.01042365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7336717">
                <text:p>-0.00733671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2132216">
                <text:p>0.002132216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9843034">
                <text:p>-0.009843034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02194477">
                <text:p>0.0002194477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2884879">
                <text:p>0.00288487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819912">
                <text:p>0.01819912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05415719">
                <text:p>0.0005415719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6743561">
                <text:p>-0.006743561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-0.0002918574">
                <text:p>-0.0002918574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674545">
                <text:p>-0.00674545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6565175">
                <text:p>-0.006565175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203435">
                <text:p>0.00203435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-0.0003693592">
                <text:p>-0.000369359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489478">
                <text:p>-0.01489478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9673228">
                <text:p>-0.00967322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8794645">
                <text:p>-0.008794645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1238641">
                <text:p>-0.01238641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5866039">
                <text:p>0.005866039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1126868">
                <text:p>-0.01126868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1066686">
                <text:p>-0.01066686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274732">
                <text:p>0.00274732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8884964">
                <text:p>-0.008884964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1014839">
                <text:p>-0.0101483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885125">
                <text:p>0.02885125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380099">
                <text:p>-0.00380099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221627">
                <text:p>-0.00221627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8342956">
                <text:p>-0.008342956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1838025">
                <text:p>0.001838025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1996459">
                <text:p>-0.001996459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-0.001199832">
                <text:p>-0.001199832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4926557">
                <text:p>-0.004926557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9342853">
                <text:p>0.009342853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-0.00121641">
                <text:p>-0.00121641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-0.0006550535">
                <text:p>-0.0006550535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4499562">
                <text:p>-0.004499562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6614485">
                <text:p>-0.00661448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1324027">
                <text:p>-0.01324027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5026196">
                <text:p>0.005026196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1350526">
                <text:p>-0.001350526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293451">
                <text:p>0.01293451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-0.003021979">
                <text:p>-0.003021979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-0.0005439005">
                <text:p>-0.0005439005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3441262">
                <text:p>-0.003441262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1076753">
                <text:p>-0.01076753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45631">
                <text:p>-0.0145631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2141661">
                <text:p>0.00214166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1248921">
                <text:p>-0.01248921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6016754">
                <text:p>-0.006016754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1127655">
                <text:p>-0.0112765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4850065">
                <text:p>0.004850065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1123596">
                <text:p>-0.01123596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02002777">
                <text:p>0.0002002777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2076738">
                <text:p>0.002076738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8702169">
                <text:p>-0.008702169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0.0003721193">
                <text:p>0.000372119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8938722">
                <text:p>0.00893872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2941129">
                <text:p>0.002941129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-0.001283201">
                <text:p>-0.001283201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6088014">
                <text:p>0.006088014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670093">
                <text:p>0.02670093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9310225">
                <text:p>-0.00931022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1096738">
                <text:p>-0.01096738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255677">
                <text:p>0.01255677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3898007">
                <text:p>0.003898007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3322858">
                <text:p>-0.00332285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1520222">
                <text:p>0.001520222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088637">
                <text:p>0.005088637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2746556">
                <text:p>-0.002746556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31881">
                <text:p>0.0131881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5737563">
                <text:p>0.005737563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509296">
                <text:p>0.01509296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6790891">
                <text:p>-0.00679089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0307375">
                <text:p>0.000307375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9774525">
                <text:p>-0.00977452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4342602">
                <text:p>-0.004342602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8618087">
                <text:p>0.008618087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8673693">
                <text:p>0.00867369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4346257">
                <text:p>0.004346257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3663081">
                <text:p>-0.003663081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800168">
                <text:p>0.01800168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6192861">
                <text:p>-0.006192861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7031839">
                <text:p>-0.007031839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8377186">
                <text:p>-0.00837718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2546886">
                <text:p>-0.002546886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3317579">
                <text:p>0.003317579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434587">
                <text:p>-0.0043458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4555623">
                <text:p>-0.004555623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6588516">
                <text:p>-0.006588516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1043429">
                <text:p>-0.01043429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5686291">
                <text:p>-0.005686291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1784585">
                <text:p>-0.001784585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2163247">
                <text:p>0.002163247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3388103">
                <text:p>-0.003388103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-0.002405857">
                <text:p>-0.002405857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7831465">
                <text:p>0.007831465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-0.0001763651">
                <text:p>-0.0001763651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796937">
                <text:p>0.006796937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9788671">
                <text:p>-0.009788671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1078077">
                <text:p>-0.01078077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363689">
                <text:p>-0.00363689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5157239">
                <text:p>0.00515723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-0.001507011">
                <text:p>-0.001507011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9866549">
                <text:p>-0.009866549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9576545">
                <text:p>-0.009576545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03724957">
                <text:p>-0.0003724957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965689">
                <text:p>0.01965689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499286">
                <text:p>0.003499286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2214014">
                <text:p>-0.002214014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071213">
                <text:p>0.00307121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6083304">
                <text:p>0.006083304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9587483">
                <text:p>0.009587483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1947459">
                <text:p>0.001947459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1305374">
                <text:p>0.001305374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7593028">
                <text:p>-0.007593028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-0.0004472304">
                <text:p>-0.0004472304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4613379">
                <text:p>0.00461337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3164643">
                <text:p>0.003164643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250935">
                <text:p>0.0125093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8408051">
                <text:p>0.00840805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221258">
                <text:p>0.01221258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2514366">
                <text:p>-0.002514366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4447734">
                <text:p>0.004447734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6038884">
                <text:p>0.006038884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2085604">
                <text:p>0.00208560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3013696">
                <text:p>0.003013696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9834739">
                <text:p>-0.009834739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6457154">
                <text:p>0.006457154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683227">
                <text:p>0.00268322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5554843">
                <text:p>0.005554843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4975786">
                <text:p>0.004975786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2687183">
                <text:p>-0.002687183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710522">
                <text:p>0.01710522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5138423">
                <text:p>0.005138423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5356634">
                <text:p>-0.005356634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2697421">
                <text:p>-0.002697421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7581379">
                <text:p>-0.007581379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312152">
                <text:p>0.0131215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4271185">
                <text:p>-0.004271185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8401163">
                <text:p>0.008401163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-0.0008705864">
                <text:p>-0.0008705864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-0.001113425">
                <text:p>-0.001113425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583397">
                <text:p>-0.00583397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1258417">
                <text:p>-0.01258417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4794083">
                <text:p>-0.004794083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121182">
                <text:p>-0.012118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5159447">
                <text:p>-0.005159447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4458428">
                <text:p>-0.004458428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1493732">
                <text:p>-0.001493732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1114425">
                <text:p>0.01114425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547559">
                <text:p>0.01547559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9645764">
                <text:p>-0.009645764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9198315">
                <text:p>0.009198315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-0.0007691895">
                <text:p>-0.0007691895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8222094">
                <text:p>-0.008222094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6410056">
                <text:p>-0.006410056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521362">
                <text:p>0.02521362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8121083">
                <text:p>-0.008121083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-0.0006709315">
                <text:p>-0.0006709315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1028039">
                <text:p>0.0102803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-0.001278795">
                <text:p>-0.00127879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2073206">
                <text:p>0.02073206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4060434">
                <text:p>-0.004060434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6393183">
                <text:p>0.006393183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7715032">
                <text:p>0.007715032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2639503">
                <text:p>0.002639503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7652821">
                <text:p>-0.007652821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-0.0008620681">
                <text:p>-0.0008620681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406647">
                <text:p>-0.00406647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5047211">
                <text:p>-0.005047211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401965">
                <text:p>0.00401965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416592">
                <text:p>0.01416592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-0.0001050159">
                <text:p>-0.000105015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1242504">
                <text:p>-0.01242504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2032285">
                <text:p>0.00203228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1091992">
                <text:p>-0.01091992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8527528">
                <text:p>-0.00852752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102536">
                <text:p>-0.0102536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3492649">
                <text:p>0.03492649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9772341">
                <text:p>-0.009772341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6156247">
                <text:p>-0.06156247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630913">
                <text:p>-0.0630913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6482853">
                <text:p>-0.06482853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6438763">
                <text:p>-0.06438763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6562804">
                <text:p>-0.06562804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6547492">
                <text:p>-0.06547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