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7961304">
            <text:p>0.007961304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2351432">
            <text:p>0.002351432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4004548">
            <text:p>0.004004548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465096">
            <text:p>0.01465096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9213739">
            <text:p>0.009213739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4909663">
            <text:p>0.004909663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823324">
            <text:p>0.01823324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857318">
            <text:p>-0.001857318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-0.0003975707">
            <text:p>-0.0003975707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6831572">
            <text:p>0.006831572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1017575">
            <text:p>0.01017575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249107">
            <text:p>0.01249107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2639114">
            <text:p>-0.002639114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2602212">
            <text:p>0.002602212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08277742">
            <text:p>0.0008277742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7583473">
            <text:p>0.007583473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2522843">
            <text:p>-0.002522843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3396172">
            <text:p>0.003396172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4487324">
            <text:p>0.04487324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6914287">
            <text:p>-0.006914287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2789589">
            <text:p>-0.002789589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31735">
            <text:p>0.0131735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982671">
            <text:p>0.01982671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08970973">
            <text:p>-0.0008970973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5997171">
            <text:p>-0.005997171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4571663">
            <text:p>0.004571663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408508">
            <text:p>-0.00408508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754071">
            <text:p>0.002754071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960644">
            <text:p>0.00960644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3989587">
            <text:p>0.003989587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2505007">
            <text:p>0.002505007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955074">
            <text:p>0.01955074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8621491">
            <text:p>-0.008621491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114099">
            <text:p>0.00114099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7682538">
            <text:p>0.0007682538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3382364">
            <text:p>-0.003382364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3472845">
            <text:p>0.003472845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6244551">
            <text:p>0.006244551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4452888">
            <text:p>0.004452888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6328912">
            <text:p>0.006328912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5005975">
            <text:p>0.005005975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2314469">
            <text:p>0.002314469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8389189">
            <text:p>0.008389189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94558">
            <text:p>0.0194558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4259388">
            <text:p>-0.004259388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1046356">
            <text:p>0.01046356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609669">
            <text:p>0.02609669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951993">
            <text:p>0.01951993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608491">
            <text:p>0.005608491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1041602">
            <text:p>0.01041602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4145715">
            <text:p>0.004145715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229413">
            <text:p>0.007229413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2302306">
            <text:p>-0.002302306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705209">
            <text:p>0.005705209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2118541">
            <text:p>0.02118541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2173993">
            <text:p>-0.002173993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1031999">
            <text:p>0.01031999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3041616">
            <text:p>-0.003041616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7978292">
            <text:p>-0.007978292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05341283">
            <text:p>-0.0005341283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4841901">
            <text:p>0.004841901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6774573">
            <text:p>0.006774573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3391721">
            <text:p>-0.003391721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09205662">
            <text:p>-0.0009205662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9163883">
            <text:p>-0.009163883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428185">
            <text:p>0.002428185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452338">
            <text:p>0.02452338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538637">
            <text:p>0.001538637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9730487">
            <text:p>0.009730487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9137735">
            <text:p>0.009137735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818304">
            <text:p>0.01818304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249821">
            <text:p>-0.002249821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3787706">
            <text:p>-0.003787706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109558">
            <text:p>0.00109558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2983475">
            <text:p>0.002983475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324222">
            <text:p>-0.00324222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8442491">
            <text:p>0.008442491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4569576">
            <text:p>0.04569576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2449479">
            <text:p>0.002449479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2504342">
            <text:p>0.002504342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7585635">
            <text:p>-0.007585635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894444">
            <text:p>0.01894444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1042336">
            <text:p>0.01042336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1046734">
            <text:p>0.01046734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4039365">
            <text:p>-0.004039365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996584">
            <text:p>0.005996584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802479">
            <text:p>0.01802479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191366">
            <text:p>0.01191366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329401">
            <text:p>0.0329401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13998">
            <text:p>0.0113998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2252729">
            <text:p>0.02252729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4378158">
            <text:p>-0.004378158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4226056">
            <text:p>-0.004226056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2909182">
            <text:p>0.002909182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102297">
            <text:p>0.0102297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03273524">
            <text:p>-0.0003273524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4007164">
            <text:p>-0.004007164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7585804">
            <text:p>0.007585804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-0.0008514673">
            <text:p>-0.0008514673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09716664">
            <text:p>-0.009716664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2321423">
            <text:p>-0.002321423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2251334">
            <text:p>0.02251334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467018">
            <text:p>0.01467018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4907919">
            <text:p>0.004907919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88046">
            <text:p>-0.0088046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string">
            <text:p>-2.383685E-06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-0.0007570774">
            <text:p>-0.0007570774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5709508">
            <text:p>0.005709508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5495996">
            <text:p>0.05495996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2656368">
            <text:p>-0.002656368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1478428">
            <text:p>0.001478428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1878046">
            <text:p>0.001878046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7412678">
            <text:p>-0.007412678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8286218">
            <text:p>0.008286218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3728886">
            <text:p>0.003728886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202689">
            <text:p>-0.01202689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0.0005886718">
            <text:p>0.0005886718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5271803">
            <text:p>0.005271803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08681334">
            <text:p>-0.0008681334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2132586">
            <text:p>0.002132586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5697286">
            <text:p>-0.005697286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846151">
            <text:p>0.01846151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07099927">
            <text:p>-0.0007099927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9643856">
            <text:p>0.009643856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8151536">
            <text:p>0.008151536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136738">
            <text:p>0.009136738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string">
            <text:p>9.660169E-05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186764">
            <text:p>0.0186764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7464818">
            <text:p>0.007464818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3364964">
            <text:p>0.03364964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346403">
            <text:p>0.009346403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7589162">
            <text:p>0.007589162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03176849">
            <text:p>-0.0003176849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55573">
            <text:p>0.01055573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306341">
            <text:p>0.02306341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6025038">
            <text:p>-0.006025038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3845308">
            <text:p>0.003845308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936019">
            <text:p>0.01936019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5113804">
            <text:p>0.005113804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5267843">
            <text:p>-0.005267843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299465">
            <text:p>-0.002299465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1185387">
            <text:p>-0.001185387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2124612">
            <text:p>0.002124612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7336902">
            <text:p>-0.007336902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9882021">
            <text:p>-0.009882021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72387">
            <text:p>0.0272387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1144268">
            <text:p>0.001144268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4121104">
            <text:p>0.004121104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3913879">
            <text:p>-0.003913879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2165848">
            <text:p>-0.002165848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4260003">
            <text:p>-0.004260003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713435">
            <text:p>-0.003713435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471413">
            <text:p>-0.002471413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383694">
            <text:p>0.01383694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235669">
            <text:p>0.01235669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2256355">
            <text:p>-0.002256355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889982">
            <text:p>0.02889982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7319761">
            <text:p>0.007319761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371562">
            <text:p>0.01371562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4351677">
            <text:p>-0.004351677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3098799">
            <text:p>-0.003098799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410995">
            <text:p>0.00410995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1018238">
            <text:p>0.01018238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5517808">
            <text:p>-0.005517808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09559733">
            <text:p>0.009559733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2282022">
            <text:p>0.002282022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172954">
            <text:p>0.01172954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301012">
            <text:p>0.003301012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408917">
            <text:p>0.00408917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05203053">
            <text:p>0.0005203053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828972">
            <text:p>0.01828972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2479659">
            <text:p>0.002479659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978077">
            <text:p>0.01978077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6768598">
            <text:p>0.006768598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1024885">
            <text:p>0.01024885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9206224">
            <text:p>-0.009206224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2115824">
            <text:p>0.02115824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914936">
            <text:p>0.01914936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682042">
            <text:p>0.01682042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248091">
            <text:p>-0.004248091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03380635">
            <text:p>-0.0003380635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2981271">
            <text:p>-0.002981271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4054119">
            <text:p>-0.004054119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723555">
            <text:p>0.01723555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4952601">
            <text:p>0.004952601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609458">
            <text:p>0.02609458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2249368">
            <text:p>0.02249368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641998">
            <text:p>0.01641998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2566171">
            <text:p>-0.002566171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3246744">
            <text:p>-0.003246744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0.0002042106">
            <text:p>0.0002042106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16175">
            <text:p>0.0116175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5435308">
            <text:p>0.005435308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string">
            <text:p>1.036666E-05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351279">
            <text:p>0.01351279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3654962">
            <text:p>-0.003654962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8000932">
            <text:p>0.008000932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78975">
            <text:p>0.0178975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382072">
            <text:p>0.01382072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264739">
            <text:p>-0.00264739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7702205">
            <text:p>-0.007702205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880376">
            <text:p>0.009880376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07170305">
            <text:p>0.0007170305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292554">
            <text:p>-0.00292554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3750081">
            <text:p>-0.003750081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1011655">
            <text:p>0.001011655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590455">
            <text:p>0.004590455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9561585">
            <text:p>-0.009561585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1217595">
            <text:p>0.01217595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3026057">
            <text:p>-0.003026057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6399306">
            <text:p>0.006399306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4315322">
            <text:p>-0.004315322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0.0004949305">
            <text:p>0.0004949305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-0.0007487864">
            <text:p>-0.0007487864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08066907">
            <text:p>0.0008066907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7439693">
            <text:p>0.007439693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280611">
            <text:p>0.01280611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2561873">
            <text:p>-0.002561873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149352">
            <text:p>0.00149352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55367">
            <text:p>0.0255367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7808461">
            <text:p>-0.007808461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6356194">
            <text:p>-0.006356194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089624">
            <text:p>0.003089624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999766">
            <text:p>-0.001999766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225775">
            <text:p>0.01225775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271531">
            <text:p>0.01271531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151496">
            <text:p>-0.00151496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3507453">
            <text:p>-0.003507453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4587218">
            <text:p>-0.004587218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2602612">
            <text:p>0.002602612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2458094">
            <text:p>-0.002458094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4232894">
            <text:p>-0.004232894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2015082">
            <text:p>0.002015082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340271">
            <text:p>0.01340271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3387927">
            <text:p>0.03387927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1024535">
            <text:p>-0.01024535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8342336">
            <text:p>-0.008342336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3426201">
            <text:p>0.003426201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2472659">
            <text:p>-0.002472659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5673944">
            <text:p>0.005673944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358553">
            <text:p>-0.01358553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3905243">
            <text:p>0.003905243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205734">
            <text:p>-0.00205734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311047">
            <text:p>0.002311047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8136175">
            <text:p>0.008136175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09363602">
            <text:p>0.0009363602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427448">
            <text:p>0.01427448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9215639">
            <text:p>-0.009215639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1206456">
            <text:p>-0.001206456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2929984">
            <text:p>-0.002929984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366638">
            <text:p>0.02366638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0.000351731">
            <text:p>0.000351731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6309364">
            <text:p>0.006309364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1719244">
            <text:p>0.001719244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156897">
            <text:p>0.01156897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9046599">
            <text:p>-0.009046599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1048625">
            <text:p>-0.01048625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1006018">
            <text:p>0.01006018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505114">
            <text:p>0.003505114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7183305">
            <text:p>-0.007183305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4756045">
            <text:p>-0.004756045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517132">
            <text:p>0.01517132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130657">
            <text:p>0.01130657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1090719">
            <text:p>0.01090719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816299">
            <text:p>-0.00816299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1494889">
            <text:p>-0.001494889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4793">
            <text:p>0.0054793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538241">
            <text:p>0.003538241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445372">
            <text:p>0.005445372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5559735">
            <text:p>0.005559735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589436">
            <text:p>0.01589436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178843">
            <text:p>-0.01178843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4564566">
            <text:p>0.004564566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1963297">
            <text:p>0.001963297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259126">
            <text:p>0.01259126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1032309">
            <text:p>0.01032309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9616557">
            <text:p>-0.009616557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179562">
            <text:p>0.01179562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1729139">
            <text:p>0.001729139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9459587">
            <text:p>-0.009459587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660961">
            <text:p>0.001660961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-0.0009419933">
            <text:p>-0.0009419933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2470463">
            <text:p>0.002470463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6080246">
            <text:p>0.006080246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300046">
            <text:p>-0.002300046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2777702">
            <text:p>0.002777702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878184">
            <text:p>0.01878184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5259957">
            <text:p>-0.005259957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7804729">
            <text:p>-0.007804729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814556">
            <text:p>0.01814556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270223">
            <text:p>0.01270223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05395491">
            <text:p>-0.0005395491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316964">
            <text:p>-0.00316964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5585369">
            <text:p>0.005585369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5709003">
            <text:p>0.005709003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1042669">
            <text:p>0.01042669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2194079">
            <text:p>-0.002194079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5077695">
            <text:p>-0.005077695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72856">
            <text:p>0.0172856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5006164">
            <text:p>-0.005006164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6239516">
            <text:p>0.006239516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2573022">
            <text:p>0.002573022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4913395">
            <text:p>0.004913395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4638867">
            <text:p>0.004638867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5313725">
            <text:p>0.005313725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2308593">
            <text:p>0.002308593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344028">
            <text:p>0.01344028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251055">
            <text:p>0.001251055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8253856">
            <text:p>0.008253856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2381061">
            <text:p>-0.002381061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393112">
            <text:p>0.00393112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818647">
            <text:p>0.003818647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01304724">
            <text:p>0.0001304724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9884961">
            <text:p>0.009884961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419341">
            <text:p>0.01419341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623727">
            <text:p>0.01623727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7021394">
            <text:p>-0.007021394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80919">
            <text:p>0.01080919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3198713">
            <text:p>-0.003198713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6004053">
            <text:p>-0.006004053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995587">
            <text:p>0.003995587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3015726">
            <text:p>0.003015726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-0.0002017147">
            <text:p>-0.0002017147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6831455">
            <text:p>-0.006831455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5870947">
            <text:p>-0.005870947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7556334">
            <text:p>-0.007556334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9991359">
            <text:p>-0.009991359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0.0001350604">
            <text:p>0.0001350604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5153092">
            <text:p>0.005153092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4143863">
            <text:p>0.004143863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9135936">
            <text:p>0.009135936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4952391">
            <text:p>-0.004952391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1428965">
            <text:p>-0.001428965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632944">
            <text:p>0.01632944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290623">
            <text:p>0.001290623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161481">
            <text:p>-0.00161481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1159546">
            <text:p>0.01159546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178656">
            <text:p>0.01178656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1437515">
            <text:p>0.001437515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8482877">
            <text:p>0.008482877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6185744">
            <text:p>-0.006185744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2223815">
            <text:p>0.002223815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1076">
            <text:p>0.011076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6142348">
            <text:p>-0.006142348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3187398">
            <text:p>0.003187398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668657">
            <text:p>0.01668657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662685">
            <text:p>0.005662685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695381">
            <text:p>0.001695381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1009212">
            <text:p>-0.01009212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274347">
            <text:p>0.01274347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0104869">
            <text:p>-0.000104869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1470706">
            <text:p>-0.001470706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string">
            <text:p>-1.462323E-05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7482585">
            <text:p>0.007482585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7530476">
            <text:p>-0.007530476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540571">
            <text:p>0.01540571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354827">
            <text:p>0.01354827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1154358">
            <text:p>0.01154358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3158977">
            <text:p>0.003158977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3455758">
            <text:p>0.003455758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615269">
            <text:p>-0.003615269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7190657">
            <text:p>0.007190657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9051489">
            <text:p>-0.009051489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float" office:value="0.0008260417">
            <text:p>0.0008260417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0.0005617584">
            <text:p>0.0005617584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1782362">
            <text:p>0.001782362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3120975">
            <text:p>0.003120975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7463074">
            <text:p>-0.007463074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6186651">
            <text:p>-0.006186651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900644">
            <text:p>0.00900644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2379705">
            <text:p>0.002379705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-0.0009091588">
            <text:p>-0.0009091588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09051569">
            <text:p>-0.0009051569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642977">
            <text:p>0.003642977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2028126">
            <text:p>0.02028126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154319">
            <text:p>0.01154319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1828715">
            <text:p>-0.001828715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1751392">
            <text:p>-0.001751392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913895">
            <text:p>0.00913895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353172">
            <text:p>0.01353172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1593771">
            <text:p>0.001593771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1046342">
            <text:p>-0.001046342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1401148">
            <text:p>-0.001401148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6529062">
            <text:p>0.006529062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252924">
            <text:p>0.006252924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5897301">
            <text:p>-0.005897301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562799">
            <text:p>0.01562799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9233287">
            <text:p>0.009233287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475848">
            <text:p>0.005475848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6575512">
            <text:p>-0.006575512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793565">
            <text:p>-0.00793565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4541819">
            <text:p>-0.004541819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2580304">
            <text:p>-0.002580304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5067499">
            <text:p>-0.005067499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596575">
            <text:p>0.007596575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1114758">
            <text:p>0.01114758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974044">
            <text:p>0.003974044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1468449">
            <text:p>0.01468449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3999001">
            <text:p>-0.003999001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6771388">
            <text:p>-0.006771388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9189925">
            <text:p>-0.009189925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104369">
            <text:p>0.0104369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3144685">
            <text:p>0.03144685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4917951">
            <text:p>0.004917951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753474">
            <text:p>0.007753474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9721575">
            <text:p>0.009721575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1520146">
            <text:p>-0.001520146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1065486">
            <text:p>0.01065486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3606397">
            <text:p>0.003606397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6092367">
            <text:p>0.006092367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2530992">
            <text:p>-0.002530992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-0.0001173799">
            <text:p>-0.0001173799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02346518">
            <text:p>-0.0002346518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1851915">
            <text:p>0.001851915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1271704">
            <text:p>-0.001271704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1123877">
            <text:p>0.01123877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2980921">
            <text:p>-0.002980921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08194004">
            <text:p>0.0008194004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476816">
            <text:p>0.01476816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690107">
            <text:p>0.01690107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2189046">
            <text:p>0.02189046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1059193">
            <text:p>0.01059193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6679961">
            <text:p>-0.006679961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3467074">
            <text:p>-0.003467074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9510503">
            <text:p>-0.009510503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926988">
            <text:p>-0.00926988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0.0002378347">
            <text:p>0.0002378347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4001375">
            <text:p>-0.004001375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3041126">
            <text:p>0.0003041126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1872754">
            <text:p>-0.001872754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185126">
            <text:p>0.003185126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877997">
            <text:p>0.00877997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6936823">
            <text:p>-0.006936823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2847789">
            <text:p>-0.002847789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1072269">
            <text:p>-0.01072269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0.0007862595">
            <text:p>0.0007862595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8492358">
            <text:p>-0.008492358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9004913">
            <text:p>-0.009004913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8541652">
            <text:p>-0.008541652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9495329">
            <text:p>-0.0009495329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326294">
            <text:p>0.003326294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7508199">
            <text:p>0.007508199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4899118">
            <text:p>-0.004899118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2594274">
            <text:p>0.002594274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611858">
            <text:p>-0.00611858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1031469">
            <text:p>0.01031469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8603764">
            <text:p>0.008603764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2148869">
            <text:p>0.02148869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247828">
            <text:p>0.01247828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291782">
            <text:p>0.00291782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4427073">
            <text:p>-0.004427073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1073271">
            <text:p>-0.01073271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7462273">
            <text:p>0.007462273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7161637">
            <text:p>-0.007161637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869637">
            <text:p>0.004869637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6212557">
            <text:p>-0.006212557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5169414">
            <text:p>-0.005169414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183579">
            <text:p>0.001183579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396114">
            <text:p>0.01396114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9304451">
            <text:p>-0.009304451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570658">
            <text:p>-0.00570658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8919228">
            <text:p>-0.008919228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4055601">
            <text:p>0.004055601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5888137">
            <text:p>-0.005888137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7038411">
            <text:p>-0.007038411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6512188">
            <text:p>-0.006512188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07510385">
            <text:p>-0.0007510385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3068703">
            <text:p>0.003068703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1087058">
            <text:p>-0.01087058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0.0005939027">
            <text:p>0.0005939027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68738">
            <text:p>0.0068738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112556">
            <text:p>-0.0112556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06701996">
            <text:p>-0.0006701996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3395779">
            <text:p>0.03395779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1003158">
            <text:p>-0.001003158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1028773">
            <text:p>0.001028773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7269533">
            <text:p>-0.007269533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16195">
            <text:p>0.0116195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5924627">
            <text:p>0.005924627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5386885">
            <text:p>-0.005386885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-0.0002561709">
            <text:p>-0.0002561709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5435552">
            <text:p>-0.005435552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9776635">
            <text:p>-0.009776635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3674858">
            <text:p>-0.003674858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6094738">
            <text:p>-0.006094738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464154">
            <text:p>0.006464154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9511112">
            <text:p>0.009511112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5181886">
            <text:p>-0.005181886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1566156">
            <text:p>-0.001566156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-0.0006789937">
            <text:p>-0.0006789937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-0.000591878">
            <text:p>-0.000591878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3388836">
            <text:p>-0.003388836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7964498">
            <text:p>-0.007964498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851636">
            <text:p>0.003851636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1430387">
            <text:p>-0.001430387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8096729">
            <text:p>0.008096729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04282249">
            <text:p>-0.0004282249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4782102">
            <text:p>-0.004782102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2743013">
            <text:p>-0.002743013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7295876">
            <text:p>-0.007295876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08786597">
            <text:p>0.0008786597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2302251">
            <text:p>-0.002302251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173932">
            <text:p>-0.01173932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-0.001256642">
            <text:p>-0.001256642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2551679">
            <text:p>-0.002551679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13643">
            <text:p>0.0013643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422216">
            <text:p>0.01422216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705953">
            <text:p>0.01705953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5039632">
            <text:p>-0.005039632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4307256">
            <text:p>0.004307256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8099195">
            <text:p>-0.008099195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7705458">
            <text:p>0.007705458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4655878">
            <text:p>-0.004655878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3088189">
            <text:p>0.003088189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5982312">
            <text:p>-0.005982312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7453127">
            <text:p>-0.007453127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4012248">
            <text:p>-0.004012248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26352">
            <text:p>0.0126352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09923933">
            <text:p>0.009923933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7428349">
            <text:p>-0.007428349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07120545">
            <text:p>-0.0007120545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5556056">
            <text:p>0.005556056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01825292">
            <text:p>0.0001825292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472183">
            <text:p>0.001472183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2248958">
            <text:p>0.002248958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5516416">
            <text:p>0.005516416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1037193">
            <text:p>0.01037193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6842524">
            <text:p>-0.006842524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7107279">
            <text:p>0.007107279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11273">
            <text:p>-0.011273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7291136">
            <text:p>-0.007291136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2286612">
            <text:p>-0.002286612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287224">
            <text:p>0.01287224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5672864">
            <text:p>-0.005672864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2473252">
            <text:p>-0.002473252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6262077">
            <text:p>-0.006262077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176986">
            <text:p>0.01176986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7448615">
            <text:p>0.007448615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273208">
            <text:p>-0.01273208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9821855">
            <text:p>-0.009821855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1550297">
            <text:p>-0.001550297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1105614">
            <text:p>-0.01105614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58757">
            <text:p>0.0158757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1606127">
            <text:p>-0.001606127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6160875">
            <text:p>-0.006160875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-0.00353635">
            <text:p>-0.00353635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5051949">
            <text:p>-0.005051949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324734">
            <text:p>0.01324734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180712">
            <text:p>0.01180712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347323">
            <text:p>0.01347323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1018913">
            <text:p>0.01018913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6668023">
            <text:p>-0.006668023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9208527">
            <text:p>0.009208527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1708055">
            <text:p>0.001708055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836053">
            <text:p>0.004836053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5771391">
            <text:p>-0.005771391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4928164">
            <text:p>0.004928164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696346">
            <text:p>0.01696346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3317091">
            <text:p>-0.003317091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7990352">
            <text:p>0.007990352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3803503">
            <text:p>0.003803503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926278">
            <text:p>0.00926278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978619">
            <text:p>0.003978619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47725">
            <text:p>0.0147725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656941">
            <text:p>0.003656941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134301">
            <text:p>-0.00134301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1369326">
            <text:p>-0.001369326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357448">
            <text:p>0.01357448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469493">
            <text:p>0.01469493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-0.0002720311">
            <text:p>-0.0002720311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0377762">
            <text:p>-0.000377762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9890187">
            <text:p>-0.009890187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217184">
            <text:p>0.01217184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8447779">
            <text:p>-0.008447779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187023">
            <text:p>0.01187023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262842">
            <text:p>0.01262842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1026497">
            <text:p>-0.01026497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4007371">
            <text:p>-0.004007371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770825">
            <text:p>0.01770825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451536">
            <text:p>0.01451536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5674847">
            <text:p>-0.005674847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612802">
            <text:p>0.01612802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9288674">
            <text:p>0.009288674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4089647">
            <text:p>-0.004089647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4582951">
            <text:p>0.004582951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3979252">
            <text:p>-0.003979252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914229">
            <text:p>-0.00914229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36368">
            <text:p>0.0136368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4070825">
            <text:p>-0.004070825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420805">
            <text:p>0.01420805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01863564">
            <text:p>0.0001863564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8355538">
            <text:p>0.008355538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950787">
            <text:p>0.002950787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2984289">
            <text:p>0.002984289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349851">
            <text:p>0.00349851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09563765">
            <text:p>0.0009563765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3644621">
            <text:p>-0.003644621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5255377">
            <text:p>-0.005255377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746671">
            <text:p>0.008746671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5900674">
            <text:p>-0.005900674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542396">
            <text:p>0.01542396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888327">
            <text:p>0.004888327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06964297">
            <text:p>-0.0006964297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07053726">
            <text:p>0.0007053726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466504">
            <text:p>0.01466504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167856">
            <text:p>0.002167856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81881">
            <text:p>0.00481881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2037682">
            <text:p>0.002037682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1131548">
            <text:p>0.001131548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5391055">
            <text:p>-0.005391055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8438597">
            <text:p>-0.008438597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6512247">
            <text:p>0.006512247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792558">
            <text:p>0.004792558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float" office:value="-0.000314002">
            <text:p>-0.000314002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8820242">
            <text:p>-0.008820242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583258">
            <text:p>0.002583258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1400637">
            <text:p>-0.001400637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1118337">
            <text:p>0.001118337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192664">
            <text:p>-0.00192664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4553385">
            <text:p>0.004553385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3510189">
            <text:p>-0.003510189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444635">
            <text:p>0.01444635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2768983">
            <text:p>-0.002768983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4760026">
            <text:p>-0.004760026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1693181">
            <text:p>-0.001693181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3038657">
            <text:p>-0.003038657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518345">
            <text:p>0.01518345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0.000323494">
            <text:p>0.000323494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0.0009095013">
            <text:p>0.0009095013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2198381">
            <text:p>0.002198381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3195387">
            <text:p>-0.003195387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618788">
            <text:p>0.01618788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07083074">
            <text:p>0.0007083074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02171212">
            <text:p>0.0002171212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7575215">
            <text:p>-0.007575215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794767">
            <text:p>0.01794767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1526005">
            <text:p>-0.001526005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318876">
            <text:p>0.01318876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9995211">
            <text:p>-0.009995211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4264888">
            <text:p>0.004264888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1078846">
            <text:p>-0.01078846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351148">
            <text:p>0.01351148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216247">
            <text:p>0.002216247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9101419">
            <text:p>-0.009101419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string">
            <text:p>-9.995775E-06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826132">
            <text:p>0.01826132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234002">
            <text:p>0.01234002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4782369">
            <text:p>-0.004782369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7994937">
            <text:p>-0.007994937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0.0001293754">
            <text:p>0.0001293754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-0.000186371">
            <text:p>-0.000186371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396917">
            <text:p>0.00396917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590079">
            <text:p>0.01590079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3804264">
            <text:p>-0.003804264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2276254">
            <text:p>-0.002276254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594642">
            <text:p>-0.00594642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1062574">
            <text:p>-0.01062574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string">
            <text:p>3.856776E-05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6971348">
            <text:p>-0.006971348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27829">
            <text:p>0.0127829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326208">
            <text:p>0.02326208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7249557">
            <text:p>-0.007249557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534354">
            <text:p>0.001534354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644613">
            <text:p>0.00644613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302015">
            <text:p>-0.001302015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8625004">
            <text:p>-0.008625004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4165333">
            <text:p>0.004165333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3543214">
            <text:p>-0.003543214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8313762">
            <text:p>0.008313762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3839055">
            <text:p>-0.003839055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1077047">
            <text:p>0.01077047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3276263">
            <text:p>-0.003276263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9072728">
            <text:p>-0.009072728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2451152">
            <text:p>-0.002451152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7411302">
            <text:p>-0.007411302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803928">
            <text:p>0.04803928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3809245">
            <text:p>-0.003809245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773536">
            <text:p>0.003773536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456065">
            <text:p>0.002456065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5170238">
            <text:p>0.05170238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-0.001473555">
            <text:p>-0.001473555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789482">
            <text:p>-0.001789482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5369675">
            <text:p>-0.005369675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7691955">
            <text:p>-0.007691955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3122789">
            <text:p>-0.003122789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349745">
            <text:p>0.01349745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4991355">
            <text:p>-0.004991355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1793261">
            <text:p>0.001793261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4519396">
            <text:p>-0.004519396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6614859">
            <text:p>0.006614859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3136718">
            <text:p>0.003136718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2346837">
            <text:p>-0.002346837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5803427">
            <text:p>0.005803427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3752858">
            <text:p>-0.003752858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210254">
            <text:p>0.00210254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06558233">
            <text:p>0.0006558233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631739">
            <text:p>0.00631739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3432063">
            <text:p>-0.003432063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4144231">
            <text:p>-0.004144231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2439821">
            <text:p>-0.002439821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818043">
            <text:p>-0.001818043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2015347">
            <text:p>-0.002015347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70842">
            <text:p>-0.0070842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6362646">
            <text:p>-0.006362646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415675">
            <text:p>-0.003415675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30719">
            <text:p>0.0230719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2997498">
            <text:p>-0.002997498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802385">
            <text:p>0.01802385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4453588">
            <text:p>-0.004453588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9194941">
            <text:p>0.009194941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-0.0001590056">
            <text:p>-0.0001590056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2853496">
            <text:p>-0.002853496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709181">
            <text:p>-0.00709181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3570126">
            <text:p>-0.003570126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7895694">
            <text:p>-0.007895694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-0.0002568329">
            <text:p>-0.0002568329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3129194">
            <text:p>-0.003129194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3188429">
            <text:p>0.003188429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1837551">
            <text:p>-0.001837551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6082562">
            <text:p>0.006082562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4649189">
            <text:p>-0.004649189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962262">
            <text:p>0.006962262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7620604">
            <text:p>0.007620604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0999814">
            <text:p>-0.000999814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016665">
            <text:p>0.005016665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5429243">
            <text:p>0.005429243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08972451">
            <text:p>0.0008972451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2245076">
            <text:p>-0.002245076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-0.0006234354">
            <text:p>-0.0006234354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4189509">
            <text:p>-0.004189509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313518">
            <text:p>0.001313518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1633344">
            <text:p>0.001633344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5929034">
            <text:p>-0.005929034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147701">
            <text:p>0.01147701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221419">
            <text:p>-0.00221419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2140786">
            <text:p>-0.002140786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0599754">
            <text:p>0.000599754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691539">
            <text:p>0.00691539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6058413">
            <text:p>0.006058413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4213268">
            <text:p>0.004213268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37839">
            <text:p>0.0137839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3051295">
            <text:p>0.003051295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360439">
            <text:p>0.01360439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1209837">
            <text:p>-0.001209837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637428">
            <text:p>-0.00637428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1895176">
            <text:p>0.001895176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8443471">
            <text:p>-0.008443471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2568419">
            <text:p>0.002568419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2695774">
            <text:p>-0.002695774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1430511">
            <text:p>-0.001430511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1593022">
            <text:p>-0.001593022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9793185">
            <text:p>-0.009793185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1049354">
            <text:p>0.01049354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9731794">
            <text:p>-0.009731794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6037472">
            <text:p>0.006037472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360914">
            <text:p>0.005360914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5162455">
            <text:p>0.005162455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9046354">
            <text:p>-0.009046354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326126">
            <text:p>0.00326126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546497">
            <text:p>0.01546497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5777014">
            <text:p>-0.005777014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0.000673375">
            <text:p>0.000673375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0.0002440931">
            <text:p>0.0002440931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1050701">
            <text:p>0.01050701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3115868">
            <text:p>-0.003115868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2352711">
            <text:p>-0.002352711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3473268">
            <text:p>-0.003473268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862898">
            <text:p>0.01862898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8189147">
            <text:p>-0.008189147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6571775">
            <text:p>0.006571775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0.0001919528">
            <text:p>0.0001919528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6980486">
            <text:p>-0.006980486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06602519">
            <text:p>0.0006602519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6930481">
            <text:p>-0.006930481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7776788">
            <text:p>-0.007776788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5064461">
            <text:p>-0.005064461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141023">
            <text:p>0.00141023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4626544">
            <text:p>-0.004626544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849808">
            <text:p>0.01849808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4512432">
            <text:p>0.004512432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2442293">
            <text:p>-0.002442293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8839807">
            <text:p>0.008839807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3443838">
            <text:p>-0.003443838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371219">
            <text:p>0.01371219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5881393">
            <text:p>0.005881393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9312167">
            <text:p>0.009312167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398523">
            <text:p>0.003398523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2178866">
            <text:p>0.02178866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231233">
            <text:p>-0.01231233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581186">
            <text:p>-0.002581186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5485719">
            <text:p>-0.005485719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1788493">
            <text:p>-0.001788493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4225745">
            <text:p>-0.004225745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2883845">
            <text:p>-0.002883845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6455497">
            <text:p>-0.006455497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2354241">
            <text:p>0.002354241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2342999">
            <text:p>0.002342999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8963536">
            <text:p>-0.008963536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2854256">
            <text:p>-0.002854256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7489646">
            <text:p>-0.007489646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1509203">
            <text:p>0.001509203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01875007">
            <text:p>-0.0001875007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118478">
            <text:p>0.00118478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2547354">
            <text:p>-0.002547354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226459">
            <text:p>0.003226459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2377188">
            <text:p>0.002377188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3396769">
            <text:p>-0.003396769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810921">
            <text:p>0.01810921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8804725">
            <text:p>0.008804725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4551649">
            <text:p>-0.004551649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3532581">
            <text:p>0.003532581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976606">
            <text:p>0.02976606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7474141">
            <text:p>0.007474141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60917">
            <text:p>0.0160917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8003588">
            <text:p>0.008003588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3756216">
            <text:p>0.003756216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839927">
            <text:p>0.02839927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3393314">
            <text:p>0.003393314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541904">
            <text:p>0.02541904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05523653">
            <text:p>0.0005523653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1673583">
            <text:p>0.001673583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03118852">
            <text:p>0.0003118852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8457303">
            <text:p>-0.008457303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9461041">
            <text:p>0.009461041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1921533">
            <text:p>0.001921533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1012085">
            <text:p>-0.01012085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2470289">
            <text:p>-0.002470289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-0.0008021852">
            <text:p>-0.0008021852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1928779">
            <text:p>-0.001928779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1021414">
            <text:p>-0.01021414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7230594">
            <text:p>-0.007230594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09581939">
            <text:p>-0.0009581939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string">
            <text:p>2.22198E-05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3506881">
            <text:p>-0.003506881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1606727">
            <text:p>-0.001606727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7602135">
            <text:p>-0.007602135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1734822">
            <text:p>0.001734822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2790979">
            <text:p>0.002790979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34019">
            <text:p>-0.0034019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95931">
            <text:p>0.01295931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114418">
            <text:p>0.00114418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99337">
            <text:p>0.0099337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1075559">
            <text:p>-0.01075559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7299022">
            <text:p>0.007299022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5162827">
            <text:p>-0.005162827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2970454">
            <text:p>-0.002970454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974221">
            <text:p>0.004974221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3180434">
            <text:p>0.003180434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string">
            <text:p>6.102084E-06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4116968">
            <text:p>-0.004116968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3168118">
            <text:p>-0.003168118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4143808">
            <text:p>-0.004143808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03968968">
            <text:p>0.0003968968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7709699">
            <text:p>-0.007709699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6820444">
            <text:p>0.006820444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4939854">
            <text:p>-0.004939854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1022399">
            <text:p>-0.01022399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966244">
            <text:p>-0.00966244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0.0001160928">
            <text:p>0.0001160928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3748198">
            <text:p>-0.003748198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9225974">
            <text:p>0.0009225974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4911924">
            <text:p>-0.004911924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4860503">
            <text:p>-0.004860503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03938112">
            <text:p>0.0003938112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375983">
            <text:p>-0.00375983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6159113">
            <text:p>-0.006159113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325379">
            <text:p>0.01325379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2947934">
            <text:p>0.002947934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2311574">
            <text:p>0.02311574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1137539">
            <text:p>-0.01137539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6472447">
            <text:p>-0.006472447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1056712">
            <text:p>0.001056712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2020284">
            <text:p>0.002020284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612533">
            <text:p>-0.01612533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8862365">
            <text:p>-0.008862365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3207348">
            <text:p>0.03207348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689271">
            <text:p>0.01689271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988456">
            <text:p>0.005988456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5317827">
            <text:p>0.005317827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-0.0004412937">
            <text:p>-0.0004412937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03620182">
            <text:p>0.0003620182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420575">
            <text:p>0.001420575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4587072">
            <text:p>0.004587072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5474984">
            <text:p>-0.005474984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9738212">
            <text:p>-0.009738212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6828036">
            <text:p>-0.006828036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09768651">
            <text:p>-0.0009768651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1156652">
            <text:p>0.01156652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6524478">
            <text:p>0.006524478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979352">
            <text:p>0.00979352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1256964">
            <text:p>0.001256964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466526">
            <text:p>0.01466526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3659266">
            <text:p>-0.003659266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-0.004813555">
            <text:p>-0.004813555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8936098">
            <text:p>-0.008936098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7189374">
            <text:p>-0.007189374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4690207">
            <text:p>-0.004690207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526584">
            <text:p>0.002526584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4671005">
            <text:p>0.004671005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5410864">
            <text:p>0.005410864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532748">
            <text:p>0.01532748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3834351">
            <text:p>-0.003834351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5006605">
            <text:p>-0.005006605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215532">
            <text:p>0.00215532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181388">
            <text:p>0.01181388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941579">
            <text:p>-0.00941579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4842777">
            <text:p>0.004842777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2958861">
            <text:p>-0.002958861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8569682">
            <text:p>0.008569682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6887529">
            <text:p>0.006887529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2074139">
            <text:p>-0.002074139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369943">
            <text:p>0.02369943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3868167">
            <text:p>-0.003868167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8740536">
            <text:p>-0.008740536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9596959">
            <text:p>-0.009596959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9539925">
            <text:p>0.009539925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7841875">
            <text:p>-0.007841875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246921">
            <text:p>0.01246921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7179576">
            <text:p>0.007179576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2279392">
            <text:p>-0.002279392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4971044">
            <text:p>-0.004971044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495417">
            <text:p>0.002495417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103554">
            <text:p>-0.0103554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1219">
            <text:p>0.011219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05976098">
            <text:p>-0.0005976098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4302674">
            <text:p>-0.004302674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1098581">
            <text:p>-0.01098581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420341">
            <text:p>0.004420341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100934">
            <text:p>0.01100934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6729487">
            <text:p>0.006729487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5103191">
            <text:p>-0.005103191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3003963">
            <text:p>0.003003963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1290821">
            <text:p>-0.001290821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6949687">
            <text:p>-0.006949687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3045733">
            <text:p>-0.003045733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684981">
            <text:p>0.01684981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5596799">
            <text:p>-0.005596799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3223385">
            <text:p>-0.003223385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44229">
            <text:p>-0.0144229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1560249">
            <text:p>-0.001560249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725541">
            <text:p>0.005725541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230037">
            <text:p>0.005230037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4714451">
            <text:p>-0.004714451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7281782">
            <text:p>-0.007281782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41451">
            <text:p>0.0041451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26282">
            <text:p>0.0126282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5149379">
            <text:p>-0.005149379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1103308">
            <text:p>0.01103308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-0.001681477">
            <text:p>-0.001681477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2847075">
            <text:p>-0.002847075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315133">
            <text:p>0.00315133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8990999">
            <text:p>0.008990999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9000449">
            <text:p>0.009000449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4632155">
            <text:p>-0.004632155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436475">
            <text:p>-0.00436475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84476">
            <text:p>0.00384476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2772155">
            <text:p>0.002772155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1334397">
            <text:p>0.001334397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1013864">
            <text:p>-0.01013864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2500061">
            <text:p>0.002500061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5002459">
            <text:p>0.005002459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6084909">
            <text:p>-0.006084909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1058455">
            <text:p>-0.01058455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2003462">
            <text:p>-0.002003462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9529164">
            <text:p>0.009529164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291699">
            <text:p>-0.00291699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7532185">
            <text:p>-0.007532185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470945">
            <text:p>-0.00470945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66315">
            <text:p>0.00366315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0.0003879117">
            <text:p>0.0003879117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8590219">
            <text:p>0.008590219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7851155">
            <text:p>-0.007851155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4901413">
            <text:p>-0.004901413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7318669">
            <text:p>-0.007318669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929615">
            <text:p>0.01929615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799608">
            <text:p>0.02799608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0.0001790891">
            <text:p>0.0001790891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5292236">
            <text:p>-0.005292236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8444204">
            <text:p>0.008444204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-0.0007392114">
            <text:p>-0.0007392114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8867226">
            <text:p>0.008867226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9366366">
            <text:p>0.009366366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3929165">
            <text:p>-0.003929165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260939">
            <text:p>0.01260939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3618658">
            <text:p>-0.003618658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2387018">
            <text:p>0.0002387018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2578484">
            <text:p>-0.002578484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0858">
            <text:p>0.0060858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1157979">
            <text:p>-0.001157979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402105">
            <text:p>-0.00402105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6491624">
            <text:p>-0.006491624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4340813">
            <text:p>0.004340813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4774874">
            <text:p>-0.004774874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1788308">
            <text:p>-0.001788308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3593825">
            <text:p>-0.003593825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9456691">
            <text:p>0.009456691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12325">
            <text:p>0.012325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7282365">
            <text:p>0.007282365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2170886">
            <text:p>0.02170886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6722146">
            <text:p>-0.006722146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2107328">
            <text:p>-0.002107328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1478096">
            <text:p>0.001478096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4343993">
            <text:p>0.004343993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4486396">
            <text:p>-0.004486396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316673">
            <text:p>0.01316673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83886">
            <text:p>0.0183886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603028">
            <text:p>0.008603028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3152263">
            <text:p>0.003152263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743508">
            <text:p>0.003743508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264398">
            <text:p>-0.001264398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456204">
            <text:p>0.00456204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2428752">
            <text:p>-0.002428752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4548708">
            <text:p>-0.004548708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5259308">
            <text:p>-0.005259308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644987">
            <text:p>0.01644987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06451964">
            <text:p>-0.0006451964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4153723">
            <text:p>0.004153723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8370153">
            <text:p>-0.008370153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6696399">
            <text:p>-0.006696399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2339761">
            <text:p>0.02339761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4369066">
            <text:p>-0.004369066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26373">
            <text:p>-0.0026373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4543595">
            <text:p>-0.004543595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768145">
            <text:p>0.002768145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2809776">
            <text:p>-0.002809776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51406">
            <text:p>-0.00151406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618123">
            <text:p>0.006618123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8222482">
            <text:p>-0.008222482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7784066">
            <text:p>-0.007784066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4503012">
            <text:p>-0.004503012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36127">
            <text:p>0.0136127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2736039">
            <text:p>0.002736039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1091253">
            <text:p>-0.01091253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3877645">
            <text:p>0.003877645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2178492">
            <text:p>-0.002178492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877815">
            <text:p>0.02877815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04135589">
            <text:p>-0.0004135589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1383291">
            <text:p>-0.001383291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5632721">
            <text:p>0.005632721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2816481">
            <text:p>0.002816481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9940867">
            <text:p>-0.009940867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6274791">
            <text:p>0.006274791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3438026">
            <text:p>0.003438026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1319077">
            <text:p>-0.001319077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4411103">
            <text:p>0.004411103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4274715">
            <text:p>0.004274715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-0.0002126499">
            <text:p>-0.0002126499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0276165">
            <text:p>-0.000276165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5082925">
            <text:p>0.005082925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3798687">
            <text:p>-0.003798687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533996">
            <text:p>0.01533996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4823029">
            <text:p>0.004823029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680956">
            <text:p>-0.00680956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09980314">
            <text:p>-0.009980314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1034443">
            <text:p>-0.001034443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7866255">
            <text:p>0.007866255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8830278">
            <text:p>-0.008830278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255185">
            <text:p>-0.01255185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2695173">
            <text:p>-0.002695173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2309568">
            <text:p>0.002309568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8831837">
            <text:p>-0.008831837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6982365">
            <text:p>-0.006982365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4748955">
            <text:p>0.004748955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22906">
            <text:p>0.022906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4482678">
            <text:p>-0.004482678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9399201">
            <text:p>-0.009399201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7474501">
            <text:p>-0.007474501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6478429">
            <text:p>0.06478429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0.0002626426">
            <text:p>0.0002626426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3007671">
            <text:p>-0.003007671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7445075">
            <text:p>0.007445075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3496184">
            <text:p>0.03496184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0.0004857725">
            <text:p>0.0004857725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730273">
            <text:p>-0.01730273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23087">
            <text:p>0.023087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200921">
            <text:p>0.01200921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3159826">
            <text:p>-0.003159826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1365495">
            <text:p>-0.001365495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5117087">
            <text:p>0.005117087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float" office:value="-0.0009084285">
            <text:p>-0.0009084285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0981236">
            <text:p>0.000981236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834373">
            <text:p>0.01834373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1680461">
            <text:p>0.001680461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6177725">
            <text:p>0.006177725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115861">
            <text:p>-0.01115861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1516136">
            <text:p>0.001516136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9989043">
            <text:p>0.009989043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6097668">
            <text:p>-0.006097668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0.000778451">
            <text:p>0.000778451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2495906">
            <text:p>0.02495906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2626858">
            <text:p>0.002626858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270978">
            <text:p>-0.00270978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0.0006424785">
            <text:p>0.0006424785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2139116">
            <text:p>-0.002139116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9027173">
            <text:p>0.009027173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4579536">
            <text:p>0.004579536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4561988">
            <text:p>-0.004561988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0.0001943705">
            <text:p>0.0001943705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4459871">
            <text:p>0.004459871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5685845">
            <text:p>-0.005685845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9751337">
            <text:p>-0.009751337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38061">
            <text:p>0.0038061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4013503">
            <text:p>-0.004013503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4858195">
            <text:p>0.004858195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904862">
            <text:p>0.02904862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3519382">
            <text:p>-0.003519382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string">
            <text:p>-1.719298E-05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1950945">
            <text:p>0.001950945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4491337">
            <text:p>-0.004491337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2037376">
            <text:p>-0.002037376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5145165">
            <text:p>0.005145165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8174438">
            <text:p>0.008174438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3085018">
            <text:p>-0.003085018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09568713">
            <text:p>-0.009568713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681051">
            <text:p>0.00681051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0.0001560785">
            <text:p>0.0001560785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6150527">
            <text:p>-0.006150527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2667378">
            <text:p>0.002667378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1620616">
            <text:p>0.001620616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5528647">
            <text:p>0.005528647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3580776">
            <text:p>-0.003580776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0.0006953733">
            <text:p>0.0006953733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6074301">
            <text:p>0.006074301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4931713">
            <text:p>0.004931713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4001331">
            <text:p>-0.004001331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2909261">
            <text:p>0.002909261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486097">
            <text:p>0.01486097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3147369">
            <text:p>-0.003147369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06692414">
            <text:p>-0.0006692414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2214092">
            <text:p>-0.002214092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617464">
            <text:p>0.01617464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3087183">
            <text:p>0.003087183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4921793">
            <text:p>0.004921793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1044551">
            <text:p>0.01044551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1761496">
            <text:p>0.001761496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4367584">
            <text:p>0.004367584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5429347">
            <text:p>-0.005429347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8024498">
            <text:p>-0.008024498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5860595">
            <text:p>-0.005860595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415882">
            <text:p>0.01415882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7255181">
            <text:p>-0.007255181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07591805">
            <text:p>-0.0007591805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740466">
            <text:p>0.00740466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1236381">
            <text:p>0.01236381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1227089">
            <text:p>0.01227089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7889478">
            <text:p>-0.007889478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1053478">
            <text:p>-0.001053478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1169297">
            <text:p>-0.001169297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111056">
            <text:p>-0.01111056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0.001640892">
            <text:p>0.001640892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675487">
            <text:p>0.01675487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2482431">
            <text:p>0.002482431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1167992">
            <text:p>0.01167992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017919">
            <text:p>-0.01017919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7956258">
            <text:p>0.007956258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3272636">
            <text:p>-0.003272636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1247425">
            <text:p>-0.001247425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309499">
            <text:p>-0.01309499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7024756">
            <text:p>0.007024756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4482392">
            <text:p>0.004482392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0.001614397">
            <text:p>0.001614397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168096">
            <text:p>-0.01168096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1018297">
            <text:p>0.01018297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5865435">
            <text:p>-0.005865435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0.0002753199">
            <text:p>0.0002753199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37867">
            <text:p>-0.0137867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0.001177888">
            <text:p>0.001177888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374073">
            <text:p>0.01374073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3464723">
            <text:p>0.003464723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251446">
            <text:p>-0.01251446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8919661">
            <text:p>0.008919661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119448">
            <text:p>0.0119448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6332876">
            <text:p>-0.006332876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1413651">
            <text:p>-0.001413651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3504294">
            <text:p>0.003504294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9523062">
            <text:p>0.009523062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103679">
            <text:p>-0.0103679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4422859">
            <text:p>0.004422859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1047507">
            <text:p>0.01047507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7306028">
            <text:p>0.007306028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1168591">
            <text:p>0.01168591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6010914">
            <text:p>-0.006010914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193989">
            <text:p>-0.00193989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7758139">
            <text:p>0.007758139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09994039">
            <text:p>-0.009994039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2584289">
            <text:p>-0.002584289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829175">
            <text:p>0.01829175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6458031">
            <text:p>-0.006458031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2630082">
            <text:p>-0.002630082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2020084">
            <text:p>-0.002020084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2923202">
            <text:p>0.002923202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1514141">
            <text:p>-0.001514141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060621">
            <text:p>-0.01060621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542016">
            <text:p>-0.01542016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8605748">
            <text:p>0.008605748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1049097">
            <text:p>0.01049097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5466034">
            <text:p>-0.005466034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1628097">
            <text:p>-0.001628097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1134593">
            <text:p>0.01134593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329283">
            <text:p>0.01329283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6626157">
            <text:p>-0.006626157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4933544">
            <text:p>-0.004933544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9404111">
            <text:p>0.009404111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9914572">
            <text:p>0.009914572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9564474">
            <text:p>-0.009564474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019221">
            <text:p>-0.01019221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107925">
            <text:p>0.01107925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6236308">
            <text:p>-0.0006236308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5881806">
            <text:p>-0.005881806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4115277">
            <text:p>-0.004115277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5196246">
            <text:p>-0.005196246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9686385">
            <text:p>0.009686385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5081215">
            <text:p>-0.005081215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456707">
            <text:p>-0.01456707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749787">
            <text:p>0.01749787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0.0008680273">
            <text:p>0.0008680273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080134">
            <text:p>-0.01080134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1089906">
            <text:p>0.01089906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4627322">
            <text:p>0.004627322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3435747">
            <text:p>0.003435747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331454">
            <text:p>-0.01331454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2003654">
            <text:p>0.02003654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1058417">
            <text:p>0.01058417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378927">
            <text:p>0.01378927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01300127">
            <text:p>-0.0001300127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string">
            <text:p>-5.604946E-05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2743254">
            <text:p>-0.002743254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8562189">
            <text:p>0.008562189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517137">
            <text:p>0.01517137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1318582">
            <text:p>0.001318582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8797515">
            <text:p>0.008797515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801253">
            <text:p>0.01801253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6350829">
            <text:p>-0.006350829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04709222">
            <text:p>-0.0004709222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18185">
            <text:p>0.0118185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802987">
            <text:p>0.03802987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1320811">
            <text:p>0.01320811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7199321">
            <text:p>-0.007199321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418081">
            <text:p>0.00418081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1282765">
            <text:p>-0.001282765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7885979">
            <text:p>0.007885979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5390568">
            <text:p>-0.005390568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9044006">
            <text:p>0.009044006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4023711">
            <text:p>0.04023711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66474">
            <text:p>0.0166474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127167">
            <text:p>-0.01127167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3362261">
            <text:p>-0.003362261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95173">
            <text:p>0.01095173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1837424">
            <text:p>-0.001837424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9393147">
            <text:p>0.009393147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465532">
            <text:p>0.01465532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0.0005556766">
            <text:p>0.0005556766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102753">
            <text:p>-0.01102753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07305147">
            <text:p>-0.0007305147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7332125">
            <text:p>0.007332125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06465406">
            <text:p>-0.0006465406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09378465">
            <text:p>-0.009378465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9056478">
            <text:p>0.009056478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2981206">
            <text:p>0.002981206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8345309">
            <text:p>0.008345309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2463266">
            <text:p>-0.002463266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960665">
            <text:p>0.005960665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08607772">
            <text:p>0.0008607772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1148298">
            <text:p>0.01148298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03273914">
            <text:p>-0.0003273914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2680885">
            <text:p>0.002680885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330966">
            <text:p>0.01330966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7787104">
            <text:p>-0.007787104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5416005">
            <text:p>-0.005416005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7315495">
            <text:p>0.007315495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5804015">
            <text:p>0.005804015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7914617">
            <text:p>-0.007914617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612463">
            <text:p>0.01612463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8041278">
            <text:p>0.008041278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5684868">
            <text:p>0.005684868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06500385">
            <text:p>-0.0006500385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143471">
            <text:p>-0.01143471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1757558">
            <text:p>0.001757558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452245">
            <text:p>-0.00452245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5987402">
            <text:p>-0.005987402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1004842">
            <text:p>-0.01004842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6673004">
            <text:p>0.006673004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4806084">
            <text:p>-0.004806084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2222259">
            <text:p>-0.002222259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7581925">
            <text:p>-0.007581925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3360444">
            <text:p>0.003360444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55217">
            <text:p>0.0155217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6785748">
            <text:p>-0.006785748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405844">
            <text:p>-0.01405844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868077">
            <text:p>-0.00868077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181263">
            <text:p>0.00181263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3445346">
            <text:p>-0.003445346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7218873">
            <text:p>-0.007218873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411685">
            <text:p>0.00411685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5159718">
            <text:p>0.005159718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1416913">
            <text:p>-0.001416913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1202353">
            <text:p>-0.01202353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775654">
            <text:p>0.01775654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2802034">
            <text:p>-0.002802034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305587">
            <text:p>-0.01305587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5494202">
            <text:p>0.005494202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696781">
            <text:p>0.02696781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1555943">
            <text:p>-0.001555943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5629478">
            <text:p>-0.005629478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1015737">
            <text:p>0.01015737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5162888">
            <text:p>-0.005162888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2205254">
            <text:p>0.002205254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6129017">
            <text:p>-0.006129017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9007064">
            <text:p>-0.009007064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2692715">
            <text:p>0.002692715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1127087">
            <text:p>-0.01127087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6034648">
            <text:p>-0.006034648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8593899">
            <text:p>-0.008593899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1249611">
            <text:p>-0.001249611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1072848">
            <text:p>0.01072848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1903573">
            <text:p>-0.001903573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3533121">
            <text:p>-0.003533121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-0.00160096">
            <text:p>-0.00160096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7860114">
            <text:p>-0.007860114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7268132">
            <text:p>-0.007268132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5081656">
            <text:p>-0.005081656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727837">
            <text:p>0.02727837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1722104">
            <text:p>-0.001722104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4389519">
            <text:p>0.004389519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1161363">
            <text:p>0.01161363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9913273">
            <text:p>0.009913273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1012829">
            <text:p>0.01012829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166695">
            <text:p>0.00166695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5095757">
            <text:p>-0.005095757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3531478">
            <text:p>-0.003531478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5376643">
            <text:p>0.005376643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1120844">
            <text:p>-0.01120844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5447721">
            <text:p>0.005447721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5302103">
            <text:p>0.005302103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-0.0008070478">
            <text:p>-0.0008070478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103173">
            <text:p>-0.0103173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124555">
            <text:p>0.0124555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727992">
            <text:p>0.04727992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05105903">
            <text:p>0.0005105903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998499">
            <text:p>0.01998499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217079">
            <text:p>-0.01217079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7118985">
            <text:p>0.007118985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4654763">
            <text:p>0.004654763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896883">
            <text:p>0.01896883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0692629">
            <text:p>-0.000692629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166412">
            <text:p>0.02166412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584775">
            <text:p>0.01584775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6461668">
            <text:p>0.006461668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9410075">
            <text:p>-0.009410075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295366">
            <text:p>0.00295366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1165644">
            <text:p>0.001165644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418184">
            <text:p>-0.01418184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1020125">
            <text:p>-0.01020125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8559383">
            <text:p>0.008559383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225068">
            <text:p>-0.00225068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7745925">
            <text:p>-0.007745925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202261">
            <text:p>-0.01202261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417759">
            <text:p>0.01417759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5272791">
            <text:p>0.005272791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603144">
            <text:p>-0.00603144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2376282">
            <text:p>-0.002376282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695675">
            <text:p>0.01695675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863798">
            <text:p>0.02863798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432351">
            <text:p>-0.00432351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3405517">
            <text:p>0.003405517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2572019">
            <text:p>0.002572019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1999593">
            <text:p>0.01999593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439672">
            <text:p>0.02439672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307476">
            <text:p>-0.01307476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59931">
            <text:p>0.0059931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5763001">
            <text:p>-0.005763001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8816184">
            <text:p>-0.008816184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690746">
            <text:p>-0.00690746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4070004">
            <text:p>0.004070004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7933234">
            <text:p>-0.007933234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5568914">
            <text:p>-0.005568914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2386596">
            <text:p>0.002386596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821295">
            <text:p>0.00821295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1285373">
            <text:p>0.001285373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1120369">
            <text:p>-0.01120369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212582">
            <text:p>-0.01212582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06637002">
            <text:p>0.0006637002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7690353">
            <text:p>0.007690353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827155">
            <text:p>0.00827155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370124">
            <text:p>-0.01370124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594366">
            <text:p>0.01594366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-0.0004299917">
            <text:p>-0.0004299917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8953276">
            <text:p>-0.008953276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6185401">
            <text:p>-0.006185401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702487">
            <text:p>0.01702487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1296054">
            <text:p>0.001296054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447626">
            <text:p>-0.01447626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8087171">
            <text:p>-0.008087171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631128">
            <text:p>0.01631128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9352352">
            <text:p>-0.009352352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5168575">
            <text:p>-0.005168575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387424">
            <text:p>-0.01387424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7234693">
            <text:p>-0.007234693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120097">
            <text:p>0.01120097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448973">
            <text:p>-0.01448973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5777829">
            <text:p>-0.005777829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2502803">
            <text:p>0.002502803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string">
            <text:p>-8.179829E-05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295575">
            <text:p>-0.01295575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6256049">
            <text:p>-0.006256049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213079">
            <text:p>0.01213079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2879365">
            <text:p>-0.002879365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4445949">
            <text:p>-0.004445949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295692">
            <text:p>-0.01295692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2776669">
            <text:p>-0.002776669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2158478">
            <text:p>0.02158478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9522028">
            <text:p>-0.009522028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7037151">
            <text:p>-0.007037151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1393197">
            <text:p>0.001393197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04632969">
            <text:p>0.0004632969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666703">
            <text:p>-0.00666703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4433153">
            <text:p>-0.004433153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2244215">
            <text:p>0.002244215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440515">
            <text:p>0.01440515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5669332">
            <text:p>-0.005669332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5779873">
            <text:p>-0.005779873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7200792">
            <text:p>0.007200792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4507844">
            <text:p>-0.004507844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112115">
            <text:p>-0.0112115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6271908">
            <text:p>-0.006271908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0249928">
            <text:p>0.000249928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3138674">
            <text:p>0.003138674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4228453">
            <text:p>0.004228453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1200536">
            <text:p>-0.01200536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6744131">
            <text:p>-0.006744131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2633101">
            <text:p>0.002633101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1111473">
            <text:p>-0.01111473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536892">
            <text:p>-0.00536892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4063418">
            <text:p>-0.004063418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592656">
            <text:p>0.01592656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9294566">
            <text:p>-0.009294566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3728526">
            <text:p>-0.003728526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254109">
            <text:p>0.01254109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774836">
            <text:p>0.01774836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7688276">
            <text:p>-0.007688276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3172314">
            <text:p>0.003172314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6559718">
            <text:p>-0.006559718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8014635">
            <text:p>0.008014635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632139">
            <text:p>-0.01632139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-0.0002600965">
            <text:p>-0.0002600965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4032435">
            <text:p>0.004032435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09739584">
            <text:p>0.009739584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1985613">
            <text:p>-0.001985613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09480893">
            <text:p>-0.009480893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1413526">
            <text:p>0.001413526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719656">
            <text:p>0.01719656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1242852">
            <text:p>-0.01242852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641219">
            <text:p>-0.01641219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08102003">
            <text:p>0.008102003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-0.001340005">
            <text:p>-0.001340005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3452265">
            <text:p>-0.003452265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112483">
            <text:p>-0.0112483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-0.002951089">
            <text:p>-0.002951089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2886655">
            <text:p>0.002886655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1481183">
            <text:p>-0.01481183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5686595">
            <text:p>-0.005686595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249069">
            <text:p>0.01249069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005904955">
            <text:p>0.0005904955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8092466">
            <text:p>0.008092466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8384626">
            <text:p>-0.008384626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-0.00118805">
            <text:p>-0.00118805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50369">
            <text:p>0.0250369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1231829">
            <text:p>-0.01231829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09502748">
            <text:p>-0.009502748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2233918">
            <text:p>0.02233918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-0.00016399">
            <text:p>-0.00016399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-0.002572274">
            <text:p>-0.002572274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-0.002121227">
            <text:p>-0.002121227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4566262">
            <text:p>0.004566262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01290703">
            <text:p>0.001290703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1878592">
            <text:p>0.001878592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4705566">
            <text:p>-0.004705566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0989021">
            <text:p>0.00989021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4693314">
            <text:p>-0.004693314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1194415">
            <text:p>0.01194415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2054184">
            <text:p>0.002054184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07006934">
            <text:p>0.007006934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6033739">
            <text:p>0.006033739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8335578">
            <text:p>0.008335578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1039769">
            <text:p>-0.01039769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3718671">
            <text:p>0.003718671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18495">
            <text:p>0.018495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549768">
            <text:p>-0.00549768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1276676">
            <text:p>-0.01276676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05992028">
            <text:p>0.005992028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-0.003142333">
            <text:p>-0.003142333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139539">
            <text:p>-0.0139539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1385711">
            <text:p>-0.01385711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07049534">
            <text:p>0.007049534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-0.004071051">
            <text:p>-0.004071051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-0.001982274">
            <text:p>-0.001982274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08822861">
            <text:p>-0.008822861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3786579">
            <text:p>0.003786579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3336995">
            <text:p>0.003336995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152899">
            <text:p>-0.0152899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6936734">
            <text:p>-0.006936734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06741686">
            <text:p>0.006741686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-0.0007337802">
            <text:p>-0.0007337802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1161561">
            <text:p>-0.01161561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266882">
            <text:p>0.01266882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05240425">
            <text:p>0.005240425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1428747">
            <text:p>-0.01428747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-0.00176983">
            <text:p>-0.00176983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-0.005640293">
            <text:p>-0.005640293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09221093">
            <text:p>0.009221093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0.0002413121">
            <text:p>0.0002413121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-0.004298794">
            <text:p>-0.004298794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004705387">
            <text:p>0.0004705387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1064023">
            <text:p>0.01064023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-0.004523508">
            <text:p>-0.004523508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1111327">
            <text:p>-0.01111327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09895104">
            <text:p>0.009895104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-0.0007644228">
            <text:p>-0.0007644228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-0.004754398">
            <text:p>-0.004754398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1327563">
            <text:p>-0.01327563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03882231">
            <text:p>0.003882231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03605256">
            <text:p>0.003605256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1248209">
            <text:p>-0.01248209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2456932">
            <text:p>0.002456932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0105258">
            <text:p>0.00105258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01340793">
            <text:p>0.001340793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-0.005382867">
            <text:p>-0.005382867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09566407">
            <text:p>-0.009566407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1128169">
            <text:p>0.01128169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-0.005565188">
            <text:p>-0.005565188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-0.008201917">
            <text:p>-0.008201917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string">
            <text:p>-8.641461E-05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138256">
            <text:p>0.01138256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03420405">
            <text:p>0.003420405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01002757">
            <text:p>0.001002757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1202038">
            <text:p>-0.01202038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-0.005708778">
            <text:p>-0.005708778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05475484">
            <text:p>0.005475484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01481891">
            <text:p>0.001481891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-0.001029852">
            <text:p>-0.001029852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-0.005094218">
            <text:p>-0.005094218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-0.00320209">
            <text:p>-0.00320209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-0.006758494">
            <text:p>-0.006758494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-0.005676284">
            <text:p>-0.005676284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-0.003802985">
            <text:p>-0.003802985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06035342">
            <text:p>0.006035342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-0.01247932">
            <text:p>-0.01247932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-0.0117364">
            <text:p>-0.0117364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03169661">
            <text:p>0.003169661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07822414">
            <text:p>0.007822414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-0.01384042">
            <text:p>-0.01384042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05443337">
            <text:p>0.005443337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-0.005487492">
            <text:p>-0.005487492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268475">
            <text:p>0.0268475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-0.001618534">
            <text:p>-0.001618534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1047812">
            <text:p>0.01047812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-0.005618518">
            <text:p>-0.005618518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-0.007724022">
            <text:p>-0.007724022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1403358">
            <text:p>0.01403358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-0.01059566">
            <text:p>-0.01059566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0839426">
            <text:p>0.00839426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04758117">
            <text:p>0.004758117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-0.004270576">
            <text:p>-0.004270576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02974911">
            <text:p>0.002974911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2303898">
            <text:p>0.02303898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0334882">
            <text:p>0.00334882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-0.003207507">
            <text:p>-0.003207507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-0.01022456">
            <text:p>-0.01022456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04509707">
            <text:p>0.004509707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06568792">
            <text:p>0.006568792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-0.0001189829">
            <text:p>-0.0001189829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-0.01142767">
            <text:p>-0.01142767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06375355">
            <text:p>0.006375355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1715178">
            <text:p>0.01715178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-0.003853926">
            <text:p>-0.003853926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-0.001769415">
            <text:p>-0.001769415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1569459">
            <text:p>0.01569459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-0.001085129">
            <text:p>-0.001085129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03768545">
            <text:p>0.003768545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-0.01329718">
            <text:p>-0.01329718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02956322">
            <text:p>0.002956322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3039987">
            <text:p>0.03039987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-0.007534608">
            <text:p>-0.007534608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-0.006465846">
            <text:p>-0.006465846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08018639">
            <text:p>0.008018639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-0.002232938">
            <text:p>-0.002232938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-0.008558507">
            <text:p>-0.008558507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-0.01545801">
            <text:p>-0.01545801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0.0002051565">
            <text:p>0.0002051565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28137">
            <text:p>0.028137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-0.003686848">
            <text:p>-0.003686848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02544442">
            <text:p>0.002544442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02096447">
            <text:p>0.002096447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0001699427">
            <text:p>0.0001699427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-0.01042648">
            <text:p>-0.01042648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-0.01148718">
            <text:p>-0.01148718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0.0002398591">
            <text:p>0.0002398591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02211851">
            <text:p>0.002211851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-0.01386375">
            <text:p>-0.01386375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-0.004202218">
            <text:p>-0.004202218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07808692">
            <text:p>0.007808692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007393339">
            <text:p>0.0007393339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-0.002133653">
            <text:p>-0.002133653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07248203">
            <text:p>0.07248203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-0.001130421">
            <text:p>-0.001130421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-0.002333323">
            <text:p>-0.002333323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03503681">
            <text:p>0.003503681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-0.01290723">
            <text:p>-0.01290723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001745893">
            <text:p>0.001745893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-0.004587064">
            <text:p>-0.004587064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-0.009796116">
            <text:p>-0.009796116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001043997">
            <text:p>0.001043997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0470047">
            <text:p>0.00470047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-0.001110711">
            <text:p>-0.001110711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-0.006354652">
            <text:p>-0.006354652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-0.009809467">
            <text:p>-0.009809467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-0.003753035">
            <text:p>-0.003753035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06823296">
            <text:p>0.006823296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-0.01073166">
            <text:p>-0.01073166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-0.007308828">
            <text:p>-0.007308828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-0.0002432817">
            <text:p>-0.0002432817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-0.00394796">
            <text:p>-0.00394796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-0.0002729393">
            <text:p>-0.0002729393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-0.01309469">
            <text:p>-0.01309469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-0.001544889">
            <text:p>-0.001544889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05366613">
            <text:p>0.005366613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06045231">
            <text:p>0.006045231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-0.008628792">
            <text:p>-0.008628792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-0.003435952">
            <text:p>-0.003435952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-0.0002261848">
            <text:p>-0.0002261848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-0.001948172">
            <text:p>-0.001948172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-0.001695826">
            <text:p>-0.001695826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008988235">
            <text:p>0.008988235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02515992">
            <text:p>0.02515992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0.0001432066">
            <text:p>0.0001432066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-0.005362106">
            <text:p>-0.005362106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002529088">
            <text:p>0.002529088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01155986">
            <text:p>0.01155986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-0.007836813">
            <text:p>-0.007836813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-0.006175447">
            <text:p>-0.006175447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001856226">
            <text:p>0.001856226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0004978046">
            <text:p>0.0004978046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002336105">
            <text:p>0.002336105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-0.004215667">
            <text:p>-0.004215667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009131982">
            <text:p>0.009131982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001302842">
            <text:p>0.001302842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001959745">
            <text:p>0.001959745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005890943">
            <text:p>0.005890943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01043061">
            <text:p>0.01043061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-0.001674288">
            <text:p>-0.001674288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-0.005256494">
            <text:p>-0.005256494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-0.01343445">
            <text:p>-0.01343445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-0.006094592">
            <text:p>-0.006094592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-0.0004295733">
            <text:p>-0.0004295733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-0.01289291">
            <text:p>-0.01289291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-0.008949789">
            <text:p>-0.008949789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-0.001562181">
            <text:p>-0.001562181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-0.001971894">
            <text:p>-0.001971894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-0.005483071">
            <text:p>-0.005483071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0.0008154187">
            <text:p>0.0008154187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00138406">
            <text:p>0.00138406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-0.006007744">
            <text:p>-0.006007744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-0.007636512">
            <text:p>-0.007636512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-0.008816594">
            <text:p>-0.008816594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01973894">
            <text:p>0.01973894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005184308">
            <text:p>0.005184308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-0.005648738">
            <text:p>-0.005648738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-0.00117163">
            <text:p>-0.00117163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0154848">
            <text:p>0.0154848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-0.003498762">
            <text:p>-0.003498762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-0.002751131">
            <text:p>-0.002751131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-0.005767151">
            <text:p>-0.005767151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008420788">
            <text:p>0.008420788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004104016">
            <text:p>0.004104016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-0.001335578">
            <text:p>-0.001335578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-0.009495073">
            <text:p>-0.009495073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-0.003512301">
            <text:p>-0.003512301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005319875">
            <text:p>0.005319875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-0.003278455">
            <text:p>-0.003278455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-0.01155267">
            <text:p>-0.01155267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00562798">
            <text:p>0.00562798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002856316">
            <text:p>0.002856316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-0.01165142">
            <text:p>-0.01165142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01170868">
            <text:p>0.01170868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-0.002451939">
            <text:p>-0.002451939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-0.005437325">
            <text:p>-0.005437325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-0.01101993">
            <text:p>-0.01101993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-0.0120312">
            <text:p>-0.0120312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-0.003553326">
            <text:p>-0.003553326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-0.005704073">
            <text:p>-0.005704073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-0.001512957">
            <text:p>-0.001512957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-0.002101989">
            <text:p>-0.002101989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-0.004265097">
            <text:p>-0.004265097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005838192">
            <text:p>0.005838192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05707457">
            <text:p>0.05707457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0.0001502091">
            <text:p>0.0001502091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01184404">
            <text:p>0.01184404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-0.001454211">
            <text:p>-0.001454211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02367168">
            <text:p>0.02367168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-0.009678368">
            <text:p>-0.009678368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007350139">
            <text:p>0.007350139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006267709">
            <text:p>0.006267709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-0.00870189">
            <text:p>-0.00870189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-0.009933077">
            <text:p>-0.009933077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01149742">
            <text:p>0.01149742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006252453">
            <text:p>0.006252453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-0.003758583">
            <text:p>-0.003758583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00827163">
            <text:p>0.00827163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006331507">
            <text:p>0.006331507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008910669">
            <text:p>0.008910669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01257429">
            <text:p>0.01257429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-0.00187903">
            <text:p>-0.00187903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001772011">
            <text:p>0.001772011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009304986">
            <text:p>0.009304986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-0.006008759">
            <text:p>-0.006008759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003789159">
            <text:p>0.003789159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001217028">
            <text:p>0.001217028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006645841">
            <text:p>0.006645841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-0.002705616">
            <text:p>-0.002705616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-0.01118211">
            <text:p>-0.01118211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-0.0001526149">
            <text:p>-0.0001526149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007380252">
            <text:p>0.007380252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0.002239502">
            <text:p>0.002239502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00477806">
            <text:p>0.00477806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-0.0002205909">
            <text:p>-0.0002205909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01644821">
            <text:p>0.01644821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0.004143928">
            <text:p>0.004143928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004983602">
            <text:p>0.004983602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string">
            <text:p>-7.789013E-05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-0.002567333">
            <text:p>-0.002567333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-0.005054974">
            <text:p>-0.005054974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0.0003661001">
            <text:p>0.0003661001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-0.0006920744">
            <text:p>-0.0006920744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01601892">
            <text:p>0.01601892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03686165">
            <text:p>0.03686165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-0.003753579">
            <text:p>-0.003753579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003034852">
            <text:p>0.003034852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008418848">
            <text:p>0.008418848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-0.003685276">
            <text:p>-0.003685276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005116888">
            <text:p>0.005116888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01714326">
            <text:p>0.01714326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003656891">
            <text:p>0.003656891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007396037">
            <text:p>0.007396037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004691509">
            <text:p>0.004691509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-0.001229297">
            <text:p>-0.001229297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009092778">
            <text:p>0.009092778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01783656">
            <text:p>0.01783656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009293669">
            <text:p>0.009293669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02534714">
            <text:p>0.02534714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01137444">
            <text:p>0.01137444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-0.005233513">
            <text:p>-0.005233513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-0.007160991">
            <text:p>-0.007160991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006163449">
            <text:p>0.006163449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0.002113598">
            <text:p>0.002113598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009353141">
            <text:p>0.009353141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0.001403076">
            <text:p>0.001403076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00781153">
            <text:p>0.00781153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006300692">
            <text:p>0.006300692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0.0008318542">
            <text:p>0.0008318542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-0.0021664">
            <text:p>-0.0021664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02113676">
            <text:p>0.02113676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0.0004414074">
            <text:p>0.0004414074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0.0057001">
            <text:p>0.0057001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-0.00195797">
            <text:p>-0.00195797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0.002003299">
            <text:p>0.002003299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-0.0006587965">
            <text:p>-0.0006587965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-0.002807438">
            <text:p>-0.002807438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0.002205692">
            <text:p>0.002205692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02969019">
            <text:p>0.02969019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008534438">
            <text:p>0.008534438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-0.003845926">
            <text:p>-0.003845926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008013161">
            <text:p>0.008013161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01348215">
            <text:p>0.01348215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-0.0004816984">
            <text:p>-0.0004816984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-0.0002500833">
            <text:p>-0.0002500833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0.003828171">
            <text:p>0.003828171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-0.0003427877">
            <text:p>-0.0003427877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01912981">
            <text:p>0.01912981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009127853">
            <text:p>0.009127853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04990631">
            <text:p>0.04990631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01732375">
            <text:p>0.01732375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007620248">
            <text:p>0.007620248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0.002191138">
            <text:p>0.002191138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009367174">
            <text:p>0.009367174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007101455">
            <text:p>0.007101455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02568568">
            <text:p>0.02568568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-0.002614335">
            <text:p>-0.002614335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0254284">
            <text:p>0.0254284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01510106">
            <text:p>0.01510106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01219823">
            <text:p>0.01219823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01086597">
            <text:p>0.01086597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01016253">
            <text:p>0.01016253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0.005492626">
            <text:p>0.005492626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0.001496401">
            <text:p>0.001496401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-0.001624229">
            <text:p>-0.001624229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01732896">
            <text:p>0.01732896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01246503">
            <text:p>0.01246503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01556308">
            <text:p>0.01556308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-0.001168943">
            <text:p>-0.001168943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03135891">
            <text:p>0.03135891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01674072">
            <text:p>0.01674072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0.00118162">
            <text:p>0.00118162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0.003293816">
            <text:p>0.003293816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01198738">
            <text:p>0.01198738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03243257">
            <text:p>0.03243257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0.005528191">
            <text:p>0.005528191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0.007784511">
            <text:p>0.007784511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01803487">
            <text:p>0.01803487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0175898">
            <text:p>0.0175898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0.007511289">
            <text:p>0.007511289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-0.001601264">
            <text:p>-0.001601264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0.010559">
            <text:p>0.010559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0.005757814">
            <text:p>0.005757814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0.008035905">
            <text:p>0.008035905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02804368">
            <text:p>0.02804368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0.006324335">
            <text:p>0.006324335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02674546">
            <text:p>0.02674546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0.007367063">
            <text:p>0.007367063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02256046">
            <text:p>0.02256046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02735878">
            <text:p>0.02735878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01593241">
            <text:p>0.01593241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0343044">
            <text:p>0.0343044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0.006308877">
            <text:p>0.006308877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01874691">
            <text:p>0.01874691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0.01450803">
            <text:p>0.01450803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0.00779257">
            <text:p>0.00779257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0.002724735">
            <text:p>0.002724735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02335756">
            <text:p>0.02335756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02113174">
            <text:p>0.02113174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0.008753904">
            <text:p>0.008753904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0.01568612">
            <text:p>0.01568612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02853003">
            <text:p>0.02853003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0.01014435">
            <text:p>0.01014435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03918866">
            <text:p>0.03918866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0327541">
            <text:p>0.0327541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02323453">
            <text:p>0.02323453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02018334">
            <text:p>0.02018334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0.01574542">
            <text:p>0.01574542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0.006313147">
            <text:p>0.006313147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02602178">
            <text:p>0.02602178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03472807">
            <text:p>0.03472807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0.01768803">
            <text:p>0.01768803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02541195">
            <text:p>0.02541195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02275656">
            <text:p>0.02275656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02246586">
            <text:p>0.02246586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0.02425533">
            <text:p>0.02425533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02485487">
            <text:p>0.02485487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02561773">
            <text:p>0.02561773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0.02420881">
            <text:p>0.02420881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0.01669144">
            <text:p>0.01669144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0.01453295">
            <text:p>0.01453295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02858102">
            <text:p>0.02858102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08234939">
            <text:p>0.08234939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03595969">
            <text:p>0.03595969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02975152">
            <text:p>0.02975152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03096557">
            <text:p>0.03096557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0.02661133">
            <text:p>0.02661133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03192821">
            <text:p>0.03192821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03363354">
            <text:p>0.03363354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0.0261422">
            <text:p>0.0261422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0.02948733">
            <text:p>0.02948733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0.03182244">
            <text:p>0.03182244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0.02735992">
            <text:p>0.02735992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03578607">
            <text:p>0.03578607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06190015">
            <text:p>0.06190015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03901554">
            <text:p>0.03901554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05522048">
            <text:p>0.05522048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0.02726011">
            <text:p>0.02726011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0.03277037">
            <text:p>0.03277037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03669378">
            <text:p>0.03669378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0.02630247">
            <text:p>0.02630247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04591373">
            <text:p>0.04591373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0.03285076">
            <text:p>0.03285076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0.03329666">
            <text:p>0.03329666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06612547">
            <text:p>0.06612547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0.03859709">
            <text:p>0.03859709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04738176">
            <text:p>0.04738176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04818615">
            <text:p>0.04818615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0.03194343">
            <text:p>0.03194343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05768825">
            <text:p>0.05768825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0528946">
            <text:p>0.0528946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0.04396499">
            <text:p>0.04396499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05129983">
            <text:p>0.05129983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0.04155514">
            <text:p>0.04155514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0.04280908">
            <text:p>0.04280908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05598491">
            <text:p>0.05598491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0.03836733">
            <text:p>0.03836733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0.04718386">
            <text:p>0.04718386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0.04415603">
            <text:p>0.04415603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0.04208326">
            <text:p>0.04208326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05692784">
            <text:p>0.05692784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05112929">
            <text:p>0.05112929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05464878">
            <text:p>0.05464878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0.04319411">
            <text:p>0.04319411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0.05005794">
            <text:p>0.05005794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0.05128166">
            <text:p>0.05128166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06273256">
            <text:p>0.06273256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0682509">
            <text:p>0.0682509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06704109">
            <text:p>0.06704109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0.05747237">
            <text:p>0.05747237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0.05561208">
            <text:p>0.05561208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0.047332">
            <text:p>0.047332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0.05057722">
            <text:p>0.05057722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0.05946518">
            <text:p>0.05946518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06355347">
            <text:p>0.06355347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0859303">
            <text:p>0.0859303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0.06354854">
            <text:p>0.06354854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0675839">
            <text:p>0.0675839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0.06728339">
            <text:p>0.06728339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07114371">
            <text:p>0.07114371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0.06499747">
            <text:p>0.06499747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07199244">
            <text:p>0.07199244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0.06794258">
            <text:p>0.06794258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0742823">
            <text:p>0.0742823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0.05950525">
            <text:p>0.05950525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1104319">
            <text:p>0.1104319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07633834">
            <text:p>0.07633834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1081859">
            <text:p>0.1081859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07838279">
            <text:p>0.07838279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1130301">
            <text:p>0.1130301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0.07831655">
            <text:p>0.07831655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08572719">
            <text:p>0.08572719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0.07095353">
            <text:p>0.07095353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09095997">
            <text:p>0.09095997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08542531">
            <text:p>0.08542531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0.07632828">
            <text:p>0.07632828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0852238">
            <text:p>0.0852238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0.08552046">
            <text:p>0.08552046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0.08613383">
            <text:p>0.08613383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0.0851592">
            <text:p>0.0851592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0.07964536">
            <text:p>0.07964536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09868093">
            <text:p>0.09868093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0.08343426">
            <text:p>0.08343426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0.08381562">
            <text:p>0.08381562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0.09372796">
            <text:p>0.09372796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0.09135192">
            <text:p>0.09135192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1114995">
            <text:p>0.1114995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0.09437902">
            <text:p>0.09437902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0.09483626">
            <text:p>0.09483626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0.09080368">
            <text:p>0.09080368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0.101514">
            <text:p>0.101514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1044713">
            <text:p>0.1044713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0.1004485">
            <text:p>0.1004485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1160041">
            <text:p>0.1160041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0.1029383">
            <text:p>0.1029383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1091636">
            <text:p>0.1091636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1251461">
            <text:p>0.1251461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0.108037">
            <text:p>0.108037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0.1003185">
            <text:p>0.1003185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115662">
            <text:p>0.115662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1175061">
            <text:p>0.1175061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0.1080264">
            <text:p>0.1080264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1262037">
            <text:p>0.1262037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0.1157652">
            <text:p>0.1157652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0.1100434">
            <text:p>0.1100434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1286162">
            <text:p>0.1286162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0.1182098">
            <text:p>0.1182098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1285524">
            <text:p>0.1285524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0.1119414">
            <text:p>0.1119414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1269075">
            <text:p>0.1269075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1319205">
            <text:p>0.1319205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0.1191143">
            <text:p>0.1191143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1303237">
            <text:p>0.1303237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0.1233749">
            <text:p>0.1233749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0.1252469">
            <text:p>0.1252469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1343121">
            <text:p>0.1343121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0.1307886">
            <text:p>0.1307886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1357499">
            <text:p>0.1357499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143492">
            <text:p>0.143492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0.1285064">
            <text:p>0.1285064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1418357">
            <text:p>0.1418357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1440031">
            <text:p>0.1440031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144861">
            <text:p>0.144861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0.1323145">
            <text:p>0.1323145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142777">
            <text:p>0.142777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1483313">
            <text:p>0.1483313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1481524">
            <text:p>0.1481524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0.131918">
            <text:p>0.131918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0.1479972">
            <text:p>0.1479972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1549299">
            <text:p>0.1549299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1550905">
            <text:p>0.1550905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1528573">
            <text:p>0.1528573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1642237">
            <text:p>0.1642237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1670818">
            <text:p>0.1670818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168786">
            <text:p>0.168786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0.1505555">
            <text:p>0.1505555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1619181">
            <text:p>0.1619181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1638347">
            <text:p>0.1638347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1608249">
            <text:p>0.1608249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1625665">
            <text:p>0.1625665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1696313">
            <text:p>0.1696313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0.1600692">
            <text:p>0.1600692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1692462">
            <text:p>0.1692462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1711951">
            <text:p>0.1711951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1710278">
            <text:p>0.1710278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0.1596419">
            <text:p>0.1596419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17005">
            <text:p>0.17005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1723327">
            <text:p>0.1723327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0.1681991">
            <text:p>0.1681991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0.1574775">
            <text:p>0.1574775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0.1640026">
            <text:p>0.1640026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1811399">
            <text:p>0.1811399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0.1647248">
            <text:p>0.1647248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1799355">
            <text:p>0.1799355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0.1734004">
            <text:p>0.1734004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1852111">
            <text:p>0.1852111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0.1719266">
            <text:p>0.1719266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0.1706844">
            <text:p>0.1706844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0.1766878">
            <text:p>0.1766878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0.1743507">
            <text:p>0.1743507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1875409">
            <text:p>0.1875409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0.1794674">
            <text:p>0.1794674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185345">
            <text:p>0.185345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2001367">
            <text:p>0.2001367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192248">
            <text:p>0.192248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1863303">
            <text:p>0.1863303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1939863">
            <text:p>0.1939863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0.1756279">
            <text:p>0.1756279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190146">
            <text:p>0.190146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0.1829165">
            <text:p>0.1829165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0.1894145">
            <text:p>0.1894145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2016253">
            <text:p>0.2016253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1958716">
            <text:p>0.1958716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1922781">
            <text:p>0.1922781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1945779">
            <text:p>0.1945779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0.1880005">
            <text:p>0.1880005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1947089">
            <text:p>0.1947089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0.184085">
            <text:p>0.184085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1996209">
            <text:p>0.1996209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0.1852346">
            <text:p>0.1852346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2114093">
            <text:p>0.2114093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0.193326">
            <text:p>0.193326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0.1888947">
            <text:p>0.1888947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2018046">
            <text:p>0.2018046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0.1914013">
            <text:p>0.1914013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2114694">
            <text:p>0.2114694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0.1956882">
            <text:p>0.1956882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1993907">
            <text:p>0.1993907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2144811">
            <text:p>0.2144811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0.1955119">
            <text:p>0.1955119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0.1978449">
            <text:p>0.1978449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0.1958449">
            <text:p>0.1958449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0.1974569">
            <text:p>0.1974569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2040734">
            <text:p>0.2040734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2216353">
            <text:p>0.2216353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0.1945421">
            <text:p>0.1945421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2143919">
            <text:p>0.2143919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2038603">
            <text:p>0.2038603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0.1983472">
            <text:p>0.1983472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0.1911169">
            <text:p>0.1911169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2036608">
            <text:p>0.2036608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0.2004449">
            <text:p>0.2004449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223975">
            <text:p>0.223975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2065479">
            <text:p>0.2065479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2026988">
            <text:p>0.2026988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204663">
            <text:p>0.204663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0.1979932">
            <text:p>0.1979932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0.1985714">
            <text:p>0.1985714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0.1957706">
            <text:p>0.1957706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0.2022732">
            <text:p>0.2022732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0.2020824">
            <text:p>0.2020824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2052452">
            <text:p>0.2052452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2060335">
            <text:p>0.2060335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2060251">
            <text:p>0.2060251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212365">
            <text:p>0.212365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2095213">
            <text:p>0.2095213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0.1972544">
            <text:p>0.1972544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2047385">
            <text:p>0.2047385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0.1987825">
            <text:p>0.1987825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2173899">
            <text:p>0.2173899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2182637">
            <text:p>0.2182637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2083508">
            <text:p>0.2083508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2078362">
            <text:p>0.2078362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2027592">
            <text:p>0.2027592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2034136">
            <text:p>0.2034136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2120033">
            <text:p>0.2120033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2046901">
            <text:p>0.2046901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0.1990275">
            <text:p>0.1990275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2203261">
            <text:p>0.2203261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2064151">
            <text:p>0.2064151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0.1928314">
            <text:p>0.1928314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2054515">
            <text:p>0.2054515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0.2014197">
            <text:p>0.2014197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2043522">
            <text:p>0.2043522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0.1913476">
            <text:p>0.1913476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0.1933856">
            <text:p>0.1933856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0.1987677">
            <text:p>0.1987677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2122436">
            <text:p>0.2122436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0.1982549">
            <text:p>0.1982549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2034139">
            <text:p>0.2034139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2048696">
            <text:p>0.2048696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2088783">
            <text:p>0.2088783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0.1970634">
            <text:p>0.1970634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2033639">
            <text:p>0.2033639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2025569">
            <text:p>0.2025569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1995887">
            <text:p>0.1995887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2065336">
            <text:p>0.2065336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0.1895684">
            <text:p>0.1895684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2013364">
            <text:p>0.2013364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2083593">
            <text:p>0.2083593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1970483">
            <text:p>0.1970483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2022964">
            <text:p>0.2022964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2022893">
            <text:p>0.2022893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1962223">
            <text:p>0.1962223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0.1897884">
            <text:p>0.1897884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2047009">
            <text:p>0.2047009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2252304">
            <text:p>0.2252304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0.1898334">
            <text:p>0.1898334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0.1900406">
            <text:p>0.1900406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2023565">
            <text:p>0.2023565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1945265">
            <text:p>0.1945265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0.1914572">
            <text:p>0.1914572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2010221">
            <text:p>0.2010221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1907859">
            <text:p>0.1907859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2066956">
            <text:p>0.2066956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0.1905452">
            <text:p>0.1905452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0.1826394">
            <text:p>0.1826394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2047598">
            <text:p>0.2047598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2097377">
            <text:p>0.2097377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0.1869445">
            <text:p>0.1869445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201019">
            <text:p>0.201019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1948531">
            <text:p>0.1948531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1942512">
            <text:p>0.1942512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193075">
            <text:p>0.193075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0.1793585">
            <text:p>0.1793585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0.1843999">
            <text:p>0.1843999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0.1830928">
            <text:p>0.1830928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1909017">
            <text:p>0.1909017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2040169">
            <text:p>0.2040169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0.1818733">
            <text:p>0.1818733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1911373">
            <text:p>0.1911373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2029886">
            <text:p>0.2029886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0.1789282">
            <text:p>0.1789282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0.1786189">
            <text:p>0.1786189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1866274">
            <text:p>0.1866274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1804134">
            <text:p>0.1804134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0.1725968">
            <text:p>0.1725968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195783">
            <text:p>0.195783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19145">
            <text:p>0.19145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1835729">
            <text:p>0.1835729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1911086">
            <text:p>0.1911086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2193043">
            <text:p>0.2193043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1827191">
            <text:p>0.1827191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1829547">
            <text:p>0.1829547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1909337">
            <text:p>0.1909337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1852234">
            <text:p>0.1852234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0.1708466">
            <text:p>0.1708466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1780641">
            <text:p>0.1780641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172316">
            <text:p>0.172316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1847899">
            <text:p>0.1847899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1783232">
            <text:p>0.1783232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1937764">
            <text:p>0.1937764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180181">
            <text:p>0.180181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1765148">
            <text:p>0.1765148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1795463">
            <text:p>0.1795463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1804709">
            <text:p>0.1804709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1657679">
            <text:p>0.1657679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1954576">
            <text:p>0.1954576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1813142">
            <text:p>0.1813142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1709688">
            <text:p>0.1709688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1797183">
            <text:p>0.1797183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1967691">
            <text:p>0.1967691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1833201">
            <text:p>0.1833201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1758959">
            <text:p>0.1758959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1686518">
            <text:p>0.1686518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1861897">
            <text:p>0.1861897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1748898">
            <text:p>0.1748898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1776739">
            <text:p>0.1776739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1687867">
            <text:p>0.1687867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1970166">
            <text:p>0.1970166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1999181">
            <text:p>0.1999181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160623">
            <text:p>0.160623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1654537">
            <text:p>0.1654537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1780224">
            <text:p>0.1780224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1785413">
            <text:p>0.1785413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151677">
            <text:p>0.151677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1718373">
            <text:p>0.1718373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1745779">
            <text:p>0.1745779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1873713">
            <text:p>0.1873713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1517309">
            <text:p>0.1517309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1658658">
            <text:p>0.1658658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1667742">
            <text:p>0.1667742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1733108">
            <text:p>0.1733108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1663121">
            <text:p>0.1663121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1513406">
            <text:p>0.1513406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148182">
            <text:p>0.148182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1567595">
            <text:p>0.1567595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1583664">
            <text:p>0.1583664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1422016">
            <text:p>0.1422016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1540888">
            <text:p>0.1540888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1701784">
            <text:p>0.1701784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1691464">
            <text:p>0.1691464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1522747">
            <text:p>0.1522747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1475938">
            <text:p>0.1475938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1561823">
            <text:p>0.1561823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1436488">
            <text:p>0.1436488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1535642">
            <text:p>0.1535642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1517629">
            <text:p>0.1517629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1510224">
            <text:p>0.1510224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1383089">
            <text:p>0.1383089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1557103">
            <text:p>0.1557103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1416951">
            <text:p>0.1416951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1675593">
            <text:p>0.1675593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1421929">
            <text:p>0.1421929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1536189">
            <text:p>0.1536189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1385912">
            <text:p>0.1385912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1356836">
            <text:p>0.1356836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1344181">
            <text:p>0.1344181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1388908">
            <text:p>0.1388908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1488426">
            <text:p>0.1488426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1328096">
            <text:p>0.1328096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1312439">
            <text:p>0.1312439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1446585">
            <text:p>0.1446585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1369553">
            <text:p>0.1369553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1367695">
            <text:p>0.1367695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1466717">
            <text:p>0.1466717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1323401">
            <text:p>0.1323401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1377202">
            <text:p>0.1377202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1296339">
            <text:p>0.1296339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1330781">
            <text:p>0.1330781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1280484">
            <text:p>0.1280484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1286595">
            <text:p>0.1286595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1244687">
            <text:p>0.1244687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1349228">
            <text:p>0.1349228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1325065">
            <text:p>0.1325065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1314742">
            <text:p>0.1314742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1337163">
            <text:p>0.1337163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1347795">
            <text:p>0.1347795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1226631">
            <text:p>0.1226631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149392">
            <text:p>0.149392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1210323">
            <text:p>0.1210323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1379067">
            <text:p>0.1379067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1178982">
            <text:p>0.1178982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118893">
            <text:p>0.118893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1183477">
            <text:p>0.1183477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1199048">
            <text:p>0.1199048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1276398">
            <text:p>0.1276398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1248497">
            <text:p>0.1248497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1142319">
            <text:p>0.1142319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1284855">
            <text:p>0.1284855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1312389">
            <text:p>0.1312389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1174466">
            <text:p>0.1174466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1339642">
            <text:p>0.1339642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1103324">
            <text:p>0.1103324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114528">
            <text:p>0.114528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1261951">
            <text:p>0.1261951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1181003">
            <text:p>0.1181003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1237095">
            <text:p>0.1237095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1065137">
            <text:p>0.1065137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1225453">
            <text:p>0.1225453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1062902">
            <text:p>0.1062902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1107714">
            <text:p>0.1107714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1130497">
            <text:p>0.1130497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1083029">
            <text:p>0.1083029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1290461">
            <text:p>0.1290461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1079493">
            <text:p>0.1079493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1064258">
            <text:p>0.1064258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1079613">
            <text:p>0.1079613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1100583">
            <text:p>0.1100583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1201184">
            <text:p>0.1201184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1396507">
            <text:p>0.1396507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09957992">
            <text:p>0.09957992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106464">
            <text:p>0.106464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1124266">
            <text:p>0.1124266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1036554">
            <text:p>0.1036554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1100591">
            <text:p>0.1100591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1022623">
            <text:p>0.1022623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1017426">
            <text:p>0.1017426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1036575">
            <text:p>0.1036575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09672682">
            <text:p>0.09672682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09831578">
            <text:p>0.09831578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1071132">
            <text:p>0.1071132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1195644">
            <text:p>0.1195644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1073863">
            <text:p>0.1073863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1011705">
            <text:p>0.1011705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09986122">
            <text:p>0.09986122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1119275">
            <text:p>0.1119275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1040801">
            <text:p>0.1040801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09963832">
            <text:p>0.09963832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09841052">
            <text:p>0.09841052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1107348">
            <text:p>0.1107348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1136135">
            <text:p>0.1136135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1041586">
            <text:p>0.1041586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1101162">
            <text:p>0.1101162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09620705">
            <text:p>0.09620705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09098822">
            <text:p>0.09098822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09528416">
            <text:p>0.09528416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09682548">
            <text:p>0.09682548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0976711">
            <text:p>0.0976711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1022135">
            <text:p>0.1022135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09510875">
            <text:p>0.09510875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09799985">
            <text:p>0.09799985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09205103">
            <text:p>0.09205103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08888487">
            <text:p>0.08888487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09776282">
            <text:p>0.09776282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08611815">
            <text:p>0.08611815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08994105">
            <text:p>0.08994105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1230208">
            <text:p>0.1230208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09317406">
            <text:p>0.09317406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08749839">
            <text:p>0.08749839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09303237">
            <text:p>0.09303237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08604827">
            <text:p>0.08604827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08381873">
            <text:p>0.08381873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09836252">
            <text:p>0.09836252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7996675">
            <text:p>0.07996675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0993351">
            <text:p>0.0993351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09166729">
            <text:p>0.09166729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08856984">
            <text:p>0.08856984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09569427">
            <text:p>0.09569427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09829883">
            <text:p>0.09829883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08978004">
            <text:p>0.08978004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08912056">
            <text:p>0.08912056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08653184">
            <text:p>0.08653184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7761031">
            <text:p>0.07761031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09207277">
            <text:p>0.09207277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09339591">
            <text:p>0.09339591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8354587">
            <text:p>0.08354587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1098434">
            <text:p>0.1098434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7732598">
            <text:p>0.07732598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08621623">
            <text:p>0.08621623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0905351">
            <text:p>0.0905351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7640134">
            <text:p>0.07640134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7896247">
            <text:p>0.07896247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08491874">
            <text:p>0.08491874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08758108">
            <text:p>0.08758108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08684424">
            <text:p>0.08684424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09708487">
            <text:p>0.09708487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09046546">
            <text:p>0.09046546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0926274">
            <text:p>0.0926274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7859553">
            <text:p>0.07859553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8002891">
            <text:p>0.08002891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09263775">
            <text:p>0.09263775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8519078">
            <text:p>0.08519078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09186113">
            <text:p>0.09186113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7263932">
            <text:p>0.07263932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8389083">
            <text:p>0.08389083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08855331">
            <text:p>0.08855331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09214886">
            <text:p>0.09214886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830396">
            <text:p>0.0830396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8386366">
            <text:p>0.08386366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8510318">
            <text:p>0.08510318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09427694">
            <text:p>0.09427694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8170487">
            <text:p>0.08170487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7539508">
            <text:p>0.07539508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7288805">
            <text:p>0.07288805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7965019">
            <text:p>0.07965019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7425059">
            <text:p>0.07425059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8634873">
            <text:p>0.08634873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7142952">
            <text:p>0.07142952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7600465">
            <text:p>0.07600465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7377326">
            <text:p>0.07377326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6899015">
            <text:p>0.06899015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8393689">
            <text:p>0.08393689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6958704">
            <text:p>0.06958704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7712945">
            <text:p>0.07712945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7184514">
            <text:p>0.07184514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7740066">
            <text:p>0.07740066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6592629">
            <text:p>0.06592629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1177627">
            <text:p>0.1177627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8300795">
            <text:p>0.08300795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6890934">
            <text:p>0.06890934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7085185">
            <text:p>0.07085185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822331">
            <text:p>0.0822331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8344256">
            <text:p>0.08344256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6817611">
            <text:p>0.06817611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6791815">
            <text:p>0.06791815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798936">
            <text:p>0.0798936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7075932">
            <text:p>0.07075932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8775923">
            <text:p>0.08775923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7148833">
            <text:p>0.07148833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8734044">
            <text:p>0.08734044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7193267">
            <text:p>0.07193267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7664803">
            <text:p>0.07664803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6405117">
            <text:p>0.06405117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665407">
            <text:p>0.0665407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908783">
            <text:p>0.0908783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6653879">
            <text:p>0.06653879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6210477">
            <text:p>0.06210477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6281842">
            <text:p>0.06281842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6883331">
            <text:p>0.06883331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6306178">
            <text:p>0.06306178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6033052">
            <text:p>0.06033052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5861847">
            <text:p>0.05861847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562502">
            <text:p>0.0562502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7534938">
            <text:p>0.07534938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6276548">
            <text:p>0.06276548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6535891">
            <text:p>0.06535891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6640667">
            <text:p>0.06640667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6370573">
            <text:p>0.06370573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6220672">
            <text:p>0.06220672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6615704">
            <text:p>0.06615704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709796">
            <text:p>0.0709796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5756428">
            <text:p>0.05756428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6284332">
            <text:p>0.06284332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6911201">
            <text:p>0.06911201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6365784">
            <text:p>0.06365784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6076328">
            <text:p>0.06076328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669902">
            <text:p>0.0669902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7823765">
            <text:p>0.07823765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9193936">
            <text:p>0.09193936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6665166">
            <text:p>0.06665166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7639255">
            <text:p>0.07639255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575699">
            <text:p>0.0575699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6361549">
            <text:p>0.06361549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6191162">
            <text:p>0.06191162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7270774">
            <text:p>0.07270774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6434041">
            <text:p>0.06434041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6845336">
            <text:p>0.06845336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609167">
            <text:p>0.0609167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7791112">
            <text:p>0.07791112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6073325">
            <text:p>0.06073325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6631377">
            <text:p>0.06631377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6215885">
            <text:p>0.06215885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5925668">
            <text:p>0.05925668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6262981">
            <text:p>0.06262981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5967864">
            <text:p>0.05967864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7570961">
            <text:p>0.07570961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6104807">
            <text:p>0.06104807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5397099">
            <text:p>0.05397099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8797067">
            <text:p>0.08797067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6679036">
            <text:p>0.06679036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6931336">
            <text:p>0.06931336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6076559">
            <text:p>0.06076559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5606887">
            <text:p>0.05606887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6961216">
            <text:p>0.06961216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6361845">
            <text:p>0.06361845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6005409">
            <text:p>0.06005409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6763076">
            <text:p>0.06763076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5485675">
            <text:p>0.05485675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5893283">
            <text:p>0.05893283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7184127">
            <text:p>0.07184127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7151294">
            <text:p>0.07151294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633307">
            <text:p>0.0633307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4693565">
            <text:p>0.04693565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6650198">
            <text:p>0.06650198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5073372">
            <text:p>0.05073372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5527942">
            <text:p>0.05527942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6245586">
            <text:p>0.06245586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6508307">
            <text:p>0.06508307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5497884">
            <text:p>0.05497884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6440907">
            <text:p>0.06440907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5309325">
            <text:p>0.05309325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5011189">
            <text:p>0.05011189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8177989">
            <text:p>0.08177989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4965337">
            <text:p>0.04965337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5532723">
            <text:p>0.05532723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4468049">
            <text:p>0.04468049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5793472">
            <text:p>0.05793472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4497486">
            <text:p>0.04497486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5718075">
            <text:p>0.05718075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58483">
            <text:p>0.058483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55314">
            <text:p>0.055314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5031099">
            <text:p>0.05031099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5487347">
            <text:p>0.05487347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5642575">
            <text:p>0.05642575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4979237">
            <text:p>0.04979237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6002891">
            <text:p>0.06002891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6269827">
            <text:p>0.06269827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4266003">
            <text:p>0.04266003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5832412">
            <text:p>0.05832412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590312">
            <text:p>0.0590312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4379912">
            <text:p>0.04379912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4781649">
            <text:p>0.04781649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3687552">
            <text:p>0.03687552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4973542">
            <text:p>0.04973542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5368032">
            <text:p>0.05368032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598831">
            <text:p>0.0598831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5887704">
            <text:p>0.05887704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5114854">
            <text:p>0.05114854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5012535">
            <text:p>0.05012535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4767122">
            <text:p>0.04767122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409071">
            <text:p>0.0409071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4323377">
            <text:p>0.04323377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4522924">
            <text:p>0.04522924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4125419">
            <text:p>0.04125419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657269">
            <text:p>0.0657269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4838222">
            <text:p>0.04838222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442982">
            <text:p>0.0442982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4681246">
            <text:p>0.04681246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6142774">
            <text:p>0.06142774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5745248">
            <text:p>0.05745248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4548488">
            <text:p>0.04548488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4080495">
            <text:p>0.04080495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3998209">
            <text:p>0.03998209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4962096">
            <text:p>0.04962096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4465697">
            <text:p>0.04465697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4739056">
            <text:p>0.04739056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4189345">
            <text:p>0.04189345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5813954">
            <text:p>0.05813954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5907431">
            <text:p>0.05907431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4962384">
            <text:p>0.04962384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5950106">
            <text:p>0.05950106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4095864">
            <text:p>0.04095864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5409403">
            <text:p>0.05409403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397517">
            <text:p>0.0397517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4762456">
            <text:p>0.04762456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390947">
            <text:p>0.0390947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39654">
            <text:p>0.039654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3747844">
            <text:p>0.03747844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6540429">
            <text:p>0.06540429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5566079">
            <text:p>0.05566079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4922178">
            <text:p>0.04922178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4586033">
            <text:p>0.04586033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5111909">
            <text:p>0.05111909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6634244">
            <text:p>0.06634244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5440793">
            <text:p>0.05440793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3689083">
            <text:p>0.03689083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4378554">
            <text:p>0.04378554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419119">
            <text:p>0.0419119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3904182">
            <text:p>0.03904182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4788579">
            <text:p>0.04788579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593113">
            <text:p>0.0593113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4614418">
            <text:p>0.04614418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4658377">
            <text:p>0.04658377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3239759">
            <text:p>0.03239759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3591031">
            <text:p>0.03591031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3483626">
            <text:p>0.03483626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5755166">
            <text:p>0.05755166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4650937">
            <text:p>0.04650937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4548544">
            <text:p>0.04548544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4146733">
            <text:p>0.04146733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3923441">
            <text:p>0.03923441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4395294">
            <text:p>0.04395294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3766773">
            <text:p>0.03766773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3798867">
            <text:p>0.03798867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5881104">
            <text:p>0.05881104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4388112">
            <text:p>0.04388112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40052">
            <text:p>0.040052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3359722">
            <text:p>0.03359722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4195414">
            <text:p>0.04195414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3500524">
            <text:p>0.03500524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4619958">
            <text:p>0.04619958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4190812">
            <text:p>0.04190812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3783811">
            <text:p>0.03783811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3488868">
            <text:p>0.03488868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2776456">
            <text:p>0.02776456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4157766">
            <text:p>0.04157766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4184694">
            <text:p>0.04184694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4071797">
            <text:p>0.04071797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3972789">
            <text:p>0.03972789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4221047">
            <text:p>0.04221047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3239271">
            <text:p>0.03239271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4760481">
            <text:p>0.04760481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4775083">
            <text:p>0.04775083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3485056">
            <text:p>0.03485056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284832">
            <text:p>0.0284832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4871137">
            <text:p>0.04871137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3217817">
            <text:p>0.03217817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3864498">
            <text:p>0.03864498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3345674">
            <text:p>0.03345674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3839561">
            <text:p>0.03839561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4083301">
            <text:p>0.04083301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31277">
            <text:p>0.031277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2631533">
            <text:p>0.02631533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2985315">
            <text:p>0.02985315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2867695">
            <text:p>0.02867695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229589">
            <text:p>0.0229589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3139374">
            <text:p>0.03139374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5243688">
            <text:p>0.05243688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273946">
            <text:p>0.0273946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2693124">
            <text:p>0.02693124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2793048">
            <text:p>0.02793048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4051525">
            <text:p>0.04051525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2940161">
            <text:p>0.02940161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3575332">
            <text:p>0.03575332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332494">
            <text:p>0.0332494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616868">
            <text:p>0.0616868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3664808">
            <text:p>0.03664808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3590888">
            <text:p>0.03590888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2855189">
            <text:p>0.02855189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4152776">
            <text:p>0.04152776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2966142">
            <text:p>0.02966142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3263627">
            <text:p>0.03263627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2894681">
            <text:p>0.02894681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3283437">
            <text:p>0.03283437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390066">
            <text:p>0.0390066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2602927">
            <text:p>0.02602927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4720671">
            <text:p>0.04720671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2586268">
            <text:p>0.02586268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2102904">
            <text:p>0.02102904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2548876">
            <text:p>0.02548876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3151694">
            <text:p>0.03151694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2866323">
            <text:p>0.02866323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4056243">
            <text:p>0.04056243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2398956">
            <text:p>0.02398956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3009483">
            <text:p>0.03009483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378396">
            <text:p>0.0378396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2874282">
            <text:p>0.02874282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5509574">
            <text:p>0.05509574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3626304">
            <text:p>0.03626304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2754595">
            <text:p>0.02754595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3372376">
            <text:p>0.03372376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3799588">
            <text:p>0.03799588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3803351">
            <text:p>0.03803351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2654158">
            <text:p>0.02654158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315007">
            <text:p>0.0315007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4631301">
            <text:p>0.04631301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2328375">
            <text:p>0.02328375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368464">
            <text:p>0.0368464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1936984">
            <text:p>0.01936984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439604">
            <text:p>0.0439604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2426239">
            <text:p>0.02426239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3597148">
            <text:p>0.03597148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2962032">
            <text:p>0.02962032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2293904">
            <text:p>0.02293904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3120432">
            <text:p>0.03120432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1831028">
            <text:p>0.01831028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4900526">
            <text:p>0.04900526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3329914">
            <text:p>0.03329914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3119488">
            <text:p>0.03119488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1925116">
            <text:p>0.01925116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244786">
            <text:p>0.0244786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2270455">
            <text:p>0.02270455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1589798">
            <text:p>0.01589798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5485751">
            <text:p>0.05485751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2230555">
            <text:p>0.02230555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2158581">
            <text:p>0.02158581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2663695">
            <text:p>0.02663695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175855">
            <text:p>0.0175855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2035856">
            <text:p>0.02035856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4872536">
            <text:p>0.04872536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2614152">
            <text:p>0.02614152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5430778">
            <text:p>0.05430778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1441723">
            <text:p>0.01441723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3452904">
            <text:p>0.03452904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3886694">
            <text:p>0.03886694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2069464">
            <text:p>0.02069464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2328567">
            <text:p>0.02328567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2290219">
            <text:p>0.02290219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1849845">
            <text:p>0.01849845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2559888">
            <text:p>0.02559888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2761222">
            <text:p>0.02761222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2431295">
            <text:p>0.02431295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1443091">
            <text:p>0.01443091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1740779">
            <text:p>0.01740779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2970164">
            <text:p>0.02970164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2359753">
            <text:p>0.02359753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1621515">
            <text:p>0.01621515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2443632">
            <text:p>0.02443632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2225623">
            <text:p>0.02225623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2020353">
            <text:p>0.02020353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1170491">
            <text:p>0.01170491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1286484">
            <text:p>0.01286484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2060228">
            <text:p>0.02060228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3784817">
            <text:p>0.03784817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2811401">
            <text:p>0.02811401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2455509">
            <text:p>0.02455509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2083603">
            <text:p>0.02083603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2682037">
            <text:p>0.02682037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1239679">
            <text:p>0.01239679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1845208">
            <text:p>0.01845208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2631588">
            <text:p>0.02631588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1981773">
            <text:p>0.01981773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1712124">
            <text:p>0.01712124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2434225">
            <text:p>0.02434225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264759">
            <text:p>0.0264759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1433645">
            <text:p>0.01433645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1264193">
            <text:p>0.01264193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2286657">
            <text:p>0.02286657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2619952">
            <text:p>0.02619952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3960372">
            <text:p>0.03960372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1108723">
            <text:p>0.01108723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3493794">
            <text:p>0.03493794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198179">
            <text:p>0.0198179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3626917">
            <text:p>0.03626917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263439">
            <text:p>0.0263439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2947978">
            <text:p>0.02947978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3249955">
            <text:p>0.03249955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2009275">
            <text:p>0.02009275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1054491">
            <text:p>0.01054491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1353307">
            <text:p>0.01353307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2939356">
            <text:p>0.02939356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2549291">
            <text:p>0.02549291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1579509">
            <text:p>0.01579509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1326507">
            <text:p>0.01326507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1054101">
            <text:p>0.01054101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2696742">
            <text:p>0.02696742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3024397">
            <text:p>0.03024397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07484393">
            <text:p>0.007484393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2154238">
            <text:p>0.02154238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09470126">
            <text:p>0.009470126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136883">
            <text:p>0.0136883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1342593">
            <text:p>0.01342593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1160924">
            <text:p>0.01160924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3974855">
            <text:p>0.03974855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2871818">
            <text:p>0.02871818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2800307">
            <text:p>0.02800307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1097609">
            <text:p>0.01097609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1410387">
            <text:p>0.01410387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1756432">
            <text:p>0.01756432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4700826">
            <text:p>0.04700826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3013599">
            <text:p>0.03013599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283647">
            <text:p>0.0283647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1051748">
            <text:p>0.01051748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2444492">
            <text:p>0.02444492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1575334">
            <text:p>0.01575334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09103435">
            <text:p>0.009103435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144088">
            <text:p>0.0144088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2076169">
            <text:p>0.02076169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2772982">
            <text:p>0.02772982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1731213">
            <text:p>0.01731213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1517138">
            <text:p>0.01517138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2396034">
            <text:p>0.02396034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289677">
            <text:p>0.0289677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1001098">
            <text:p>0.01001098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2499103">
            <text:p>0.02499103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134602">
            <text:p>0.0134602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3295558">
            <text:p>0.03295558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07137388">
            <text:p>0.007137388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1528567">
            <text:p>0.01528567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1562761">
            <text:p>0.01562761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2692304">
            <text:p>0.02692304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1423018">
            <text:p>0.01423018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1679782">
            <text:p>0.01679782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1190004">
            <text:p>0.01190004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06516501">
            <text:p>0.006516501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2290404">
            <text:p>0.02290404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4905264">
            <text:p>0.04905264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0858534">
            <text:p>0.00858534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1351243">
            <text:p>0.01351243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103636">
            <text:p>0.0103636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2581413">
            <text:p>0.02581413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05902132">
            <text:p>0.005902132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145362">
            <text:p>0.0145362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1248838">
            <text:p>0.01248838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07800418">
            <text:p>0.007800418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07137242">
            <text:p>0.007137242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1443903">
            <text:p>0.01443903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08603532">
            <text:p>0.008603532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3632458">
            <text:p>0.03632458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08784216">
            <text:p>0.008784216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04967352">
            <text:p>0.004967352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1955978">
            <text:p>0.01955978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2260483">
            <text:p>0.02260483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116705">
            <text:p>0.0116705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0.001228971">
            <text:p>0.001228971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3294097">
            <text:p>0.03294097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1998482">
            <text:p>0.01998482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05262198">
            <text:p>0.005262198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153075">
            <text:p>0.0153075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1296612">
            <text:p>0.01296612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07409412">
            <text:p>0.007409412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08187774">
            <text:p>0.008187774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230836">
            <text:p>0.0230836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2371782">
            <text:p>0.02371782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1395732">
            <text:p>0.01395732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2289749">
            <text:p>0.02289749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04453597">
            <text:p>0.004453597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09716491">
            <text:p>0.009716491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03535822">
            <text:p>0.003535822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03697899">
            <text:p>0.003697899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1519954">
            <text:p>0.01519954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2516403">
            <text:p>0.02516403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03750534">
            <text:p>0.003750534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3598454">
            <text:p>0.03598454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1386231">
            <text:p>0.01386231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09855671">
            <text:p>0.009855671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02419784">
            <text:p>0.002419784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0.001458299">
            <text:p>0.001458299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05674684">
            <text:p>0.005674684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2344763">
            <text:p>0.02344763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2844922">
            <text:p>0.02844922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07250641">
            <text:p>0.007250641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0817437">
            <text:p>0.00817437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04134666">
            <text:p>0.004134666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248184">
            <text:p>0.0248184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1340155">
            <text:p>0.01340155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-0.001148876">
            <text:p>-0.001148876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06827118">
            <text:p>0.006827118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1320462">
            <text:p>0.01320462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06956028">
            <text:p>0.006956028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08331261">
            <text:p>0.008331261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2564038">
            <text:p>0.02564038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04094103">
            <text:p>0.004094103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2434514">
            <text:p>0.02434514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04353668">
            <text:p>0.004353668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2235684">
            <text:p>0.02235684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1038117">
            <text:p>0.01038117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0266272">
            <text:p>0.00266272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1955014">
            <text:p>0.01955014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1861303">
            <text:p>0.01861303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04238688">
            <text:p>0.004238688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-0.0009869073">
            <text:p>-0.0009869073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-0.001740368">
            <text:p>-0.001740368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04324537">
            <text:p>0.004324537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04998614">
            <text:p>0.004998614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1174808">
            <text:p>0.01174808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1849525">
            <text:p>0.01849525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08313122">
            <text:p>0.008313122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02686296">
            <text:p>0.002686296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1433976">
            <text:p>0.01433976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07072312">
            <text:p>0.007072312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1048675">
            <text:p>0.01048675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04628701">
            <text:p>0.004628701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02416468">
            <text:p>0.002416468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05866354">
            <text:p>0.005866354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1730363">
            <text:p>0.01730363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0.001553771">
            <text:p>0.001553771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04717596">
            <text:p>0.004717596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07941389">
            <text:p>0.007941389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1648002">
            <text:p>0.01648002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1172506">
            <text:p>0.01172506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07892764">
            <text:p>0.007892764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2012404">
            <text:p>0.02012404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1784665">
            <text:p>0.01784665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1376487">
            <text:p>0.01376487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09017731">
            <text:p>0.009017731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0696397">
            <text:p>0.00696397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713281">
            <text:p>0.02713281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02720216">
            <text:p>0.002720216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01784329">
            <text:p>0.001784329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06194035">
            <text:p>0.006194035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05391413">
            <text:p>0.005391413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03926096">
            <text:p>0.003926096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03962682">
            <text:p>0.003962682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1460185">
            <text:p>0.01460185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1518495">
            <text:p>0.01518495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1889182">
            <text:p>0.01889182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1762742">
            <text:p>0.01762742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08025764">
            <text:p>0.008025764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01842581">
            <text:p>0.001842581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08037843">
            <text:p>0.008037843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0489843">
            <text:p>0.00489843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02114247">
            <text:p>0.002114247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07562191">
            <text:p>0.007562191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05400061">
            <text:p>0.005400061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-0.0006048185">
            <text:p>-0.0006048185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1719814">
            <text:p>0.01719814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09551322">
            <text:p>0.009551322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2107359">
            <text:p>0.02107359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04911789">
            <text:p>0.004911789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1313207">
            <text:p>0.01313207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3503606">
            <text:p>0.03503606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1287993">
            <text:p>0.01287993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06239479">
            <text:p>0.006239479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05824226">
            <text:p>0.005824226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1342651">
            <text:p>0.01342651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04170001">
            <text:p>0.004170001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1020355">
            <text:p>0.01020355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439862">
            <text:p>0.03439862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0.0002276744">
            <text:p>0.0002276744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3242071">
            <text:p>0.03242071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-0.001008556">
            <text:p>-0.001008556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727009">
            <text:p>0.02727009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1571047">
            <text:p>0.01571047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06307268">
            <text:p>0.006307268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1071536">
            <text:p>0.01071536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07830802">
            <text:p>0.007830802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-0.003961817">
            <text:p>-0.003961817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0347368">
            <text:p>0.00347368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06511016">
            <text:p>0.006511016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07490021">
            <text:p>0.007490021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1338351">
            <text:p>0.01338351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-0.001141715">
            <text:p>-0.001141715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02963998">
            <text:p>0.002963998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2516243">
            <text:p>0.02516243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1075327">
            <text:p>0.01075327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1189483">
            <text:p>0.01189483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02022674">
            <text:p>0.002022674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-0.003080807">
            <text:p>-0.003080807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-0.0006157499">
            <text:p>-0.0006157499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06670298">
            <text:p>0.006670298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02441065">
            <text:p>0.002441065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09586073">
            <text:p>0.009586073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03813679">
            <text:p>0.003813679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1327803">
            <text:p>0.01327803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605304">
            <text:p>0.01605304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07400955">
            <text:p>0.007400955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787809">
            <text:p>0.01787809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06074383">
            <text:p>0.006074383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06481979">
            <text:p>0.006481979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03332643">
            <text:p>0.003332643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1288076">
            <text:p>0.01288076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04669353">
            <text:p>0.004669353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-0.000827375">
            <text:p>-0.000827375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08902923">
            <text:p>0.008902923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02986798">
            <text:p>0.002986798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03219561">
            <text:p>0.003219561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09355132">
            <text:p>0.009355132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-0.001661348">
            <text:p>-0.001661348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05160017">
            <text:p>0.005160017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-0.002582262">
            <text:p>-0.002582262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106525">
            <text:p>0.0106525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0.000548943">
            <text:p>0.000548943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09205225">
            <text:p>0.009205225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0.0002748893">
            <text:p>0.0002748893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08696956">
            <text:p>0.008696956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502363">
            <text:p>0.02502363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101179">
            <text:p>0.0101179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919315">
            <text:p>0.02919315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09113717">
            <text:p>0.009113717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29111">
            <text:p>0.0229111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-0.00231649">
            <text:p>-0.00231649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0.0005107903">
            <text:p>0.0005107903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06871274">
            <text:p>-0.006871274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1238527">
            <text:p>0.01238527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0.0003119282">
            <text:p>0.0003119282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1036521">
            <text:p>0.01036521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0414008">
            <text:p>0.00414008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03633079">
            <text:p>0.003633079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221246">
            <text:p>0.0221246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03161603">
            <text:p>0.003161603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416585">
            <text:p>0.01416585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-0.004950851">
            <text:p>-0.004950851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05035748">
            <text:p>0.005035748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-0.005040769">
            <text:p>-0.005040769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06712973">
            <text:p>0.006712973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-0.003204814">
            <text:p>-0.003204814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05979249">
            <text:p>-0.005979249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5929565">
            <text:p>0.005929565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02686005">
            <text:p>0.002686005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2207219">
            <text:p>0.02207219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02708907">
            <text:p>0.002708907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06475397">
            <text:p>0.006475397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326751">
            <text:p>0.02326751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05374176">
            <text:p>0.005374176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01954091">
            <text:p>0.001954091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08155888">
            <text:p>0.008155888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0.00088196">
            <text:p>0.00088196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2003742">
            <text:p>0.02003742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379661">
            <text:p>0.01379661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08715335">
            <text:p>0.008715335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2057586">
            <text:p>0.02057586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1204935">
            <text:p>0.01204935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-0.001919606">
            <text:p>-0.001919606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-0.0002171265">
            <text:p>-0.0002171265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03932053">
            <text:p>-0.003932053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869687">
            <text:p>0.01869687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620657">
            <text:p>0.03620657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string">
            <text:p>-5.586067E-05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-0.001867675">
            <text:p>-0.001867675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02563463">
            <text:p>0.002563463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-0.002464487">
            <text:p>-0.002464487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0.0003448296">
            <text:p>0.0003448296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-0.004182544">
            <text:p>-0.004182544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0867947">
            <text:p>0.00867947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07255191">
            <text:p>0.007255191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5340716">
            <text:p>0.005340716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5137528">
            <text:p>0.005137528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07517628">
            <text:p>0.007517628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-0.003338873">
            <text:p>-0.003338873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01409722">
            <text:p>0.001409722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-0.004089711">
            <text:p>-0.004089711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09958199">
            <text:p>0.009958199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699062">
            <text:p>0.00699062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849915">
            <text:p>0.01849915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07355267">
            <text:p>-0.007355267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-0.003071102">
            <text:p>-0.003071102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02142938">
            <text:p>0.002142938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5303937">
            <text:p>-0.005303937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08172689">
            <text:p>0.008172689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08427198">
            <text:p>0.008427198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01707136">
            <text:p>0.001707136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3752704">
            <text:p>0.003752704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477726">
            <text:p>0.01477726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-0.001158218">
            <text:p>-0.001158218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0764822">
            <text:p>0.00764822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462135">
            <text:p>0.01462135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5696513">
            <text:p>0.005696513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0.0009784318">
            <text:p>0.0009784318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-0.001981312">
            <text:p>-0.001981312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-0.002253854">
            <text:p>-0.002253854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02945323">
            <text:p>0.002945323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6007384">
            <text:p>0.006007384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1064399">
            <text:p>0.01064399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5254084">
            <text:p>-0.005254084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string">
            <text:p>-1.229189E-05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02394921">
            <text:p>0.002394921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02490448">
            <text:p>0.002490448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5311296">
            <text:p>0.005311296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0329821">
            <text:p>0.00329821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5078773">
            <text:p>0.005078773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03255581">
            <text:p>0.003255581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4354958">
            <text:p>0.004354958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02084928">
            <text:p>0.002084928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07542225">
            <text:p>0.007542225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02638221">
            <text:p>0.002638221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-0.003723282">
            <text:p>-0.003723282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02275368">
            <text:p>0.002275368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7858529">
            <text:p>0.007858529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0172757">
            <text:p>0.00172757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4956634">
            <text:p>-0.004956634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09851283">
            <text:p>0.009851283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09915918">
            <text:p>0.009915918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02050062">
            <text:p>0.002050062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09187187">
            <text:p>0.009187187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5772606">
            <text:p>-0.005772606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625928">
            <text:p>0.01625928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158192">
            <text:p>0.01158192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3018139">
            <text:p>0.003018139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-0.002640641">
            <text:p>-0.002640641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785321">
            <text:p>0.01785321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-0.003559913">
            <text:p>-0.003559913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102048">
            <text:p>0.02102048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-0.000284845">
            <text:p>-0.000284845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078665">
            <text:p>0.01078665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110775">
            <text:p>0.0110775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3951556">
            <text:p>0.003951556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3066715">
            <text:p>0.003066715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-0.001075029">
            <text:p>-0.001075029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5554806">
            <text:p>0.005554806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6180417">
            <text:p>0.006180417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431755">
            <text:p>0.00431755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129856">
            <text:p>0.01129856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-0.001188512">
            <text:p>-0.001188512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4063662">
            <text:p>-0.004063662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4703493">
            <text:p>-0.004703493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1074661">
            <text:p>-0.01074661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08380442">
            <text:p>0.008380442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9601573">
            <text:p>-0.009601573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2855332">
            <text:p>0.002855332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7319689">
            <text:p>0.007319689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3008821">
            <text:p>0.003008821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-0.0003999444">
            <text:p>-0.0003999444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string">
            <text:p>7.494254E-05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0.0005249967">
            <text:p>0.0005249967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09924645">
            <text:p>0.009924645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5073403">
            <text:p>0.005073403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4439047">
            <text:p>-0.004439047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6062">
            <text:p>0.016062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6287184">
            <text:p>0.006287184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-0.002946694">
            <text:p>-0.002946694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-0.003467801">
            <text:p>-0.003467801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317651">
            <text:p>0.00317651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1142721">
            <text:p>0.001142721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6103894">
            <text:p>-0.006103894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644674">
            <text:p>0.01644674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6084248">
            <text:p>0.006084248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493519">
            <text:p>0.01493519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5757018">
            <text:p>0.005757018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09474346">
            <text:p>0.009474346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138372">
            <text:p>0.00138372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276538">
            <text:p>0.01276538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1080952">
            <text:p>0.01080952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4491181">
            <text:p>-0.004491181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575463">
            <text:p>0.00575463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09999881">
            <text:p>0.009999881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632991">
            <text:p>-0.00632991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-0.001390134">
            <text:p>-0.001390134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170991">
            <text:p>0.01170991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2273985">
            <text:p>0.002273985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07135677">
            <text:p>0.0007135677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-0.001610518">
            <text:p>-0.001610518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-0.0009524717">
            <text:p>-0.0009524717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4271801">
            <text:p>-0.004271801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0839845">
            <text:p>-0.00839845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487658">
            <text:p>-0.00487658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6122378">
            <text:p>0.006122378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4089527">
            <text:p>0.004089527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668883">
            <text:p>0.01668883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165546">
            <text:p>0.01165546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4528494">
            <text:p>0.004528494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8828606">
            <text:p>-0.008828606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264267">
            <text:p>0.02264267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8817996">
            <text:p>-0.008817996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-0.001618829">
            <text:p>-0.001618829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-0.0002395129">
            <text:p>-0.0002395129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3961036">
            <text:p>0.003961036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-0.0005989022">
            <text:p>-0.0005989022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08150512">
            <text:p>0.008150512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6591355">
            <text:p>-0.006591355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8093443">
            <text:p>-0.008093443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319114">
            <text:p>0.00319114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4441461">
            <text:p>0.004441461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08196749">
            <text:p>0.008196749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-0.002845647">
            <text:p>-0.002845647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320586">
            <text:p>0.01320586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5337173">
            <text:p>-0.005337173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-0.003640411">
            <text:p>-0.003640411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6508305">
            <text:p>0.006508305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463178">
            <text:p>0.01463178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264577">
            <text:p>0.01264577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7959702">
            <text:p>0.007959702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9212776">
            <text:p>0.009212776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6781867">
            <text:p>-0.006781867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1028636">
            <text:p>0.01028636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1912528">
            <text:p>0.001912528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6194224">
            <text:p>-0.006194224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1050083">
            <text:p>0.01050083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2340246">
            <text:p>0.002340246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6885575">
            <text:p>-0.006885575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1095063">
            <text:p>-0.01095063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-0.0006993697">
            <text:p>-0.0006993697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3820643">
            <text:p>0.003820643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1631329">
            <text:p>0.001631329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3727061">
            <text:p>-0.003727061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09337166">
            <text:p>0.009337166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-0.002267965">
            <text:p>-0.002267965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5268786">
            <text:p>0.005268786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-0.001511432">
            <text:p>-0.001511432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5707061">
            <text:p>0.005707061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1992814">
            <text:p>0.001992814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-0.0008680221">
            <text:p>-0.0008680221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-0.001177575">
            <text:p>-0.001177575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278786">
            <text:p>0.00278786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4671905">
            <text:p>-0.004671905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811156">
            <text:p>0.01811156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-0.0003248591">
            <text:p>-0.0003248591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4115825">
            <text:p>0.004115825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6498748">
            <text:p>0.006498748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4222257">
            <text:p>0.004222257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07671252">
            <text:p>0.0007671252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8584111">
            <text:p>0.008584111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09592058">
            <text:p>0.009592058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3741793">
            <text:p>-0.003741793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6786573">
            <text:p>0.006786573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1598262">
            <text:p>0.001598262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5370747">
            <text:p>0.005370747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0.0002002837">
            <text:p>0.0002002837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4168433">
            <text:p>-0.004168433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090781">
            <text:p>0.01090781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2610705">
            <text:p>-0.002610705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2783044">
            <text:p>-0.002783044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0.000335993">
            <text:p>0.000335993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3576892">
            <text:p>0.003576892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3862519">
            <text:p>0.003862519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0.0005120146">
            <text:p>0.0005120146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-0.001448058">
            <text:p>-0.001448058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-0.002687375">
            <text:p>-0.002687375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2772045">
            <text:p>0.002772045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5904868">
            <text:p>0.005904868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1028426">
            <text:p>-0.01028426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1743359">
            <text:p>0.001743359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6267596">
            <text:p>-0.006267596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3714102">
            <text:p>0.003714102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-0.001877095">
            <text:p>-0.001877095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4459916">
            <text:p>-0.004459916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3689005">
            <text:p>-0.003689005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0.0005970838">
            <text:p>0.0005970838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443878">
            <text:p>0.00443878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-0.001044577">
            <text:p>-0.001044577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3097289">
            <text:p>-0.003097289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0.0009054231">
            <text:p>0.0009054231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2453761">
            <text:p>0.002453761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7109021">
            <text:p>-0.007109021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-0.0004753064">
            <text:p>-0.0004753064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9245202">
            <text:p>-0.009245202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7424342">
            <text:p>-0.007424342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4640358">
            <text:p>-0.004640358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-0.002710219">
            <text:p>-0.002710219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512794">
            <text:p>-0.00512794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5824463">
            <text:p>-0.005824463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5169598">
            <text:p>0.005169598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1068946">
            <text:p>-0.01068946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3910293">
            <text:p>-0.003910293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7485749">
            <text:p>-0.007485749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6204938">
            <text:p>0.006204938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3876983">
            <text:p>-0.003876983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8282229">
            <text:p>0.008282229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101674">
            <text:p>0.0101674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3854909">
            <text:p>-0.003854909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1544878">
            <text:p>0.001544878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090916">
            <text:p>0.01090916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3438598">
            <text:p>0.003438598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3402038">
            <text:p>-0.003402038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293132">
            <text:p>0.01293132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-0.0004145372">
            <text:p>-0.0004145372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03809086">
            <text:p>0.0003809086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2981622">
            <text:p>-0.002981622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2400433">
            <text:p>0.002400433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7818879">
            <text:p>-0.007818879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7114902">
            <text:p>-0.007114902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2070244">
            <text:p>0.002070244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-0.0005533335">
            <text:p>-0.0005533335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3398957">
            <text:p>0.003398957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-0.001473437">
            <text:p>-0.001473437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9030125">
            <text:p>0.009030125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3421642">
            <text:p>0.003421642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9352671">
            <text:p>-0.009352671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1955045">
            <text:p>0.001955045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6051287">
            <text:p>-0.006051287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8608554">
            <text:p>-0.008608554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191219">
            <text:p>0.01191219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-0.00069806">
            <text:p>-0.00069806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-0.00452651">
            <text:p>-0.00452651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08852863">
            <text:p>0.008852863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4204832">
            <text:p>0.004204832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4852297">
            <text:p>-0.004852297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1990287">
            <text:p>-0.001990287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5092447">
            <text:p>-0.005092447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6380831">
            <text:p>-0.006380831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3926411">
            <text:p>-0.003926411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2665137">
            <text:p>-0.002665137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3323602">
            <text:p>-0.003323602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1153977">
            <text:p>0.001153977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0.0005794537">
            <text:p>0.0005794537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787024">
            <text:p>0.01787024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5676263">
            <text:p>0.005676263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5837042">
            <text:p>0.005837042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5084826">
            <text:p>0.005084826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3956462">
            <text:p>-0.003956462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3799913">
            <text:p>-0.003799913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3639106">
            <text:p>0.003639106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2194828">
            <text:p>0.002194828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string">
            <text:p>-9.205674E-05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2796365">
            <text:p>0.002796365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247456">
            <text:p>0.02247456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7991368">
            <text:p>-0.007991368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-0.0005107024">
            <text:p>-0.0005107024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4283077">
            <text:p>0.04283077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3697803">
            <text:p>0.003697803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4661255">
            <text:p>0.004661255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-0.001728009">
            <text:p>-0.001728009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335899">
            <text:p>0.01335899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3171468">
            <text:p>0.003171468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9482476">
            <text:p>-0.009482476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114585">
            <text:p>0.01114585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6866951">
            <text:p>-0.006866951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5594156">
            <text:p>-0.005594156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9134515">
            <text:p>0.009134515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3487479">
            <text:p>0.003487479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342901">
            <text:p>0.01342901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4170107">
            <text:p>0.004170107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5808492">
            <text:p>0.005808492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-0.0004387399">
            <text:p>-0.0004387399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2029233">
            <text:p>0.002029233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-0.0001917196">
            <text:p>-0.0001917196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01214056">
            <text:p>0.0001214056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8149365">
            <text:p>-0.008149365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5115234">
            <text:p>-0.005115234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1126461">
            <text:p>-0.01126461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-0.0001384157">
            <text:p>-0.0001384157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4173049">
            <text:p>-0.004173049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309891">
            <text:p>0.01309891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6851472">
            <text:p>-0.006851472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-0.001270858">
            <text:p>-0.001270858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0.0001595862">
            <text:p>0.0001595862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-0.0006275434">
            <text:p>-0.0006275434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-0.001140806">
            <text:p>-0.001140806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9553839">
            <text:p>0.009553839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-0.001770058">
            <text:p>-0.001770058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2875147">
            <text:p>-0.002875147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1056724">
            <text:p>-0.01056724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-0.0008997601">
            <text:p>-0.0008997601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2004569">
            <text:p>0.002004569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4002865">
            <text:p>0.004002865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6499617">
            <text:p>-0.006499617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8481406">
            <text:p>-0.008481406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09627207">
            <text:p>0.009627207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2592126">
            <text:p>0.002592126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3025556">
            <text:p>-0.003025556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08891765">
            <text:p>-0.0008891765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7276199">
            <text:p>-0.007276199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735152">
            <text:p>0.02735152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7281732">
            <text:p>-0.007281732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347971">
            <text:p>0.01347971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7196214">
            <text:p>-0.007196214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6064349">
            <text:p>-0.006064349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9392516">
            <text:p>-0.009392516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804067">
            <text:p>-0.00804067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1213839">
            <text:p>-0.01213839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847043">
            <text:p>0.00847043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4073401">
            <text:p>0.004073401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8514012">
            <text:p>-0.008514012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08540908">
            <text:p>0.0008540908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6051698">
            <text:p>-0.006051698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713029">
            <text:p>0.02713029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7905018">
            <text:p>0.007905018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493754">
            <text:p>0.01493754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3192154">
            <text:p>0.003192154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8655769">
            <text:p>-0.008655769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3537834">
            <text:p>-0.003537834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4038177">
            <text:p>0.004038177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2746712">
            <text:p>0.002746712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644794">
            <text:p>0.02644794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1371907">
            <text:p>-0.001371907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string">
            <text:p>-6.823544E-05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6284744">
            <text:p>0.006284744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-0.000613576">
            <text:p>-0.000613576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1853502">
            <text:p>0.001853502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4941783">
            <text:p>0.004941783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206135">
            <text:p>0.01206135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-0.00187196">
            <text:p>-0.00187196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2750684">
            <text:p>-0.002750684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743605">
            <text:p>0.02743605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159482">
            <text:p>0.01159482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2072064">
            <text:p>0.002072064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-0.001362137">
            <text:p>-0.001362137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3755451">
            <text:p>0.003755451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212912">
            <text:p>0.01212912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2412189">
            <text:p>0.002412189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1621995">
            <text:p>0.001621995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7031485">
            <text:p>-0.007031485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3167943">
            <text:p>-0.003167943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3403072">
            <text:p>0.003403072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4233938">
            <text:p>-0.004233938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578959">
            <text:p>0.01578959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7383035">
            <text:p>0.007383035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5200697">
            <text:p>-0.005200697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5996535">
            <text:p>0.005996535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9681835">
            <text:p>-0.009681835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5344935">
            <text:p>-0.005344935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5883705">
            <text:p>0.005883705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173629">
            <text:p>0.01173629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501591">
            <text:p>-0.00501591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4254191">
            <text:p>-0.004254191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148668">
            <text:p>0.009148668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771799">
            <text:p>0.01771799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07805229">
            <text:p>-0.0007805229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2048511">
            <text:p>0.002048511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3304512">
            <text:p>-0.003304512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1934767">
            <text:p>-0.001934767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2483699">
            <text:p>-0.002483699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5521112">
            <text:p>-0.005521112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string">
            <text:p>4.920308E-05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365433">
            <text:p>0.01365433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1005889">
            <text:p>-0.01005889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7101383">
            <text:p>0.007101383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5415664">
            <text:p>-0.005415664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2278679">
            <text:p>-0.002278679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5526462">
            <text:p>-0.005526462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5380395">
            <text:p>-0.005380395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08442">
            <text:p>0.0108442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4763249">
            <text:p>-0.004763249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6967613">
            <text:p>-0.006967613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8900463">
            <text:p>-0.008900463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861502">
            <text:p>-0.00861502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2115688">
            <text:p>0.002115688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05335592">
            <text:p>0.0005335592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4038232">
            <text:p>-0.004038232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163996">
            <text:p>0.01163996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2120384">
            <text:p>-0.002120384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1213004">
            <text:p>0.001213004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344907">
            <text:p>0.01344907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2914193">
            <text:p>-0.002914193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2058357">
            <text:p>-0.002058357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2008688">
            <text:p>0.02008688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-0.001568055">
            <text:p>-0.001568055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3623514">
            <text:p>0.003623514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987901">
            <text:p>0.005987901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455922">
            <text:p>-0.00455922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929366">
            <text:p>0.00929366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09079172">
            <text:p>0.0009079172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8975431">
            <text:p>-0.008975431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9812714">
            <text:p>-0.009812714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2444403">
            <text:p>0.002444403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171425">
            <text:p>0.004171425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4909356">
            <text:p>0.004909356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6183439">
            <text:p>-0.006183439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2647587">
            <text:p>0.002647587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4984463">
            <text:p>0.004984463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8682917">
            <text:p>0.008682917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2577955">
            <text:p>-0.002577955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2400869">
            <text:p>0.002400869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4180077">
            <text:p>0.004180077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44898">
            <text:p>-0.0044898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3332437">
            <text:p>-0.003332437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5100469">
            <text:p>-0.005100469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343081">
            <text:p>0.01343081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1002594">
            <text:p>-0.01002594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1735958">
            <text:p>-0.001735958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2452279">
            <text:p>0.002452279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2722392">
            <text:p>0.002722392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1028655">
            <text:p>0.001028655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5479636">
            <text:p>-0.005479636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6260841">
            <text:p>-0.006260841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2282086">
            <text:p>0.002282086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219736">
            <text:p>-0.00219736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2242883">
            <text:p>-0.002242883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7496105">
            <text:p>0.007496105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1393797">
            <text:p>0.001393797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8404854">
            <text:p>-0.008404854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931724">
            <text:p>0.00931724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2027021">
            <text:p>-0.002027021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753568">
            <text:p>-0.00753568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2140842">
            <text:p>0.002140842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0.0003783613">
            <text:p>0.0003783613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03319585">
            <text:p>0.0003319585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1000775">
            <text:p>-0.01000775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8008003">
            <text:p>-0.008008003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3625754">
            <text:p>0.003625754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3996528">
            <text:p>-0.003996528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42195">
            <text:p>0.0142195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9163911">
            <text:p>-0.009163911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4600165">
            <text:p>-0.004600165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-0.0008410072">
            <text:p>-0.0008410072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8099875">
            <text:p>0.008099875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4041738">
            <text:p>0.004041738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6807863">
            <text:p>-0.006807863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975583">
            <text:p>0.007975583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5290117">
            <text:p>-0.005290117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1030003">
            <text:p>-0.01030003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4671164">
            <text:p>-0.004671164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891913">
            <text:p>0.01891913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797224">
            <text:p>0.01797224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765667">
            <text:p>0.01765667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1016429">
            <text:p>-0.01016429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-0.001056481">
            <text:p>-0.001056481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5301153">
            <text:p>0.005301153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630274">
            <text:p>0.005630274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7273819">
            <text:p>-0.007273819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string">
            <text:p>7.377949E-05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1195575">
            <text:p>-0.01195575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1047295">
            <text:p>0.01047295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5049895">
            <text:p>0.005049895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-0.0004797132">
            <text:p>-0.0004797132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4283498">
            <text:p>0.004283498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495907">
            <text:p>0.01495907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3742503">
            <text:p>-0.003742503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165901">
            <text:p>0.004165901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762255">
            <text:p>0.002762255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4646764">
            <text:p>0.004646764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9848438">
            <text:p>-0.009848438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3816688">
            <text:p>-0.003816688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1231495">
            <text:p>0.001231495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7303291">
            <text:p>-0.007303291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2342299">
            <text:p>0.002342299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2089021">
            <text:p>-0.002089021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6046798">
            <text:p>-0.006046798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-0.0004700835">
            <text:p>-0.0004700835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9321437">
            <text:p>-0.009321437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1128689">
            <text:p>-0.01128689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5388682">
            <text:p>0.005388682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1292425">
            <text:p>0.001292425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09449894">
            <text:p>0.0009449894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-0.0002443999">
            <text:p>-0.0002443999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1407988">
            <text:p>0.001407988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5987654">
            <text:p>0.005987654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6054059">
            <text:p>-0.006054059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1021438">
            <text:p>-0.01021438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1420596">
            <text:p>0.001420596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09440472">
            <text:p>-0.0009440472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1099419">
            <text:p>0.001099419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03274354">
            <text:p>0.0003274354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3057496">
            <text:p>-0.003057496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1685516">
            <text:p>0.001685516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6236335">
            <text:p>-0.006236335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070731">
            <text:p>0.005070731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2499446">
            <text:p>-0.002499446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3172005">
            <text:p>-0.003172005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09044409">
            <text:p>0.0009044409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2351709">
            <text:p>-0.002351709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1007158">
            <text:p>0.001007158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3972733">
            <text:p>0.003972733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7880924">
            <text:p>0.007880924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-0.0008442129">
            <text:p>-0.0008442129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4739601">
            <text:p>-0.004739601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1057308">
            <text:p>0.01057308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3684731">
            <text:p>-0.003684731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8681627">
            <text:p>-0.008681627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9565873">
            <text:p>-0.009565873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4499664">
            <text:p>0.004499664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6578621">
            <text:p>-0.006578621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105338">
            <text:p>0.0105338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9315345">
            <text:p>-0.009315345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1299998">
            <text:p>0.001299998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514287">
            <text:p>0.02514287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1059214">
            <text:p>0.001059214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04380443">
            <text:p>0.0004380443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594373">
            <text:p>0.00594373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32962">
            <text:p>0.00532962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3327447">
            <text:p>-0.003327447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2023689">
            <text:p>0.002023689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05137518">
            <text:p>0.0005137518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888843">
            <text:p>0.01888843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9865838">
            <text:p>-0.009865838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809078">
            <text:p>0.01809078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2232025">
            <text:p>-0.002232025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7464912">
            <text:p>-0.007464912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534006">
            <text:p>0.01534006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3116389">
            <text:p>-0.003116389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7955506">
            <text:p>-0.007955506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972164">
            <text:p>-0.00972164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6434311">
            <text:p>-0.006434311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3214797">
            <text:p>0.003214797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7940172">
            <text:p>-0.007940172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1261848">
            <text:p>0.001261848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3608124">
            <text:p>0.003608124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78922">
            <text:p>0.0178922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1311686">
            <text:p>0.001311686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5134426">
            <text:p>-0.005134426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1401233">
            <text:p>0.001401233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5930578">
            <text:p>-0.005930578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6564128">
            <text:p>-0.006564128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3609809">
            <text:p>0.003609809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-0.0003383015">
            <text:p>-0.0003383015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344133">
            <text:p>-0.01344133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8152894">
            <text:p>-0.008152894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8723713">
            <text:p>-0.008723713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1126137">
            <text:p>-0.01126137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6778263">
            <text:p>0.006778263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9100198">
            <text:p>-0.009100198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9310427">
            <text:p>-0.009310427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3152363">
            <text:p>0.003152363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7146655">
            <text:p>-0.007146655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9081583">
            <text:p>-0.009081583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721768">
            <text:p>0.02721768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2612097">
            <text:p>-0.002612097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1399683">
            <text:p>-0.001399683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6422629">
            <text:p>-0.006422629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1992869">
            <text:p>0.001992869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2529092">
            <text:p>-0.002529092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string">
            <text:p>-3.355855E-05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3563397">
            <text:p>-0.003563397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8827982">
            <text:p>0.008827982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string">
            <text:p>9.797034E-05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09592526">
            <text:p>0.0009592526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3847785">
            <text:p>-0.003847785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5092009">
            <text:p>-0.005092009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1187883">
            <text:p>-0.01187883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6110216">
            <text:p>0.006110216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1636711">
            <text:p>-0.001636711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202986">
            <text:p>0.01202986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2201674">
            <text:p>-0.002201674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-0.0004235033">
            <text:p>-0.0004235033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2577884">
            <text:p>-0.002577884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91251">
            <text:p>-0.0091251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257621">
            <text:p>-0.01257621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2511388">
            <text:p>0.002511388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1049816">
            <text:p>-0.01049816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5474142">
            <text:p>-0.005474142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9601996">
            <text:p>-0.009601996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503084">
            <text:p>0.00503084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1030084">
            <text:p>-0.01030084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06933284">
            <text:p>0.0006933284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2774956">
            <text:p>0.002774956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7642152">
            <text:p>-0.007642152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01600938">
            <text:p>0.0001600938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9415797">
            <text:p>0.009415797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3575456">
            <text:p>0.003575456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-0.0002423782">
            <text:p>-0.0002423782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6169158">
            <text:p>0.006169158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516936">
            <text:p>0.02516936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7629063">
            <text:p>-0.007629063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910376">
            <text:p>-0.00910376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214598">
            <text:p>0.01214598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576365">
            <text:p>0.004576365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2867432">
            <text:p>-0.002867432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29912">
            <text:p>0.0029912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835692">
            <text:p>0.005835692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2416841">
            <text:p>-0.002416841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319872">
            <text:p>0.01319872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6929021">
            <text:p>0.006929021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49793">
            <text:p>0.0149793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5280652">
            <text:p>-0.005280652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138465">
            <text:p>0.00138465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7682513">
            <text:p>-0.007682513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2984377">
            <text:p>-0.002984377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8236655">
            <text:p>0.008236655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865709">
            <text:p>0.008865709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5153147">
            <text:p>0.005153147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3548165">
            <text:p>-0.003548165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849352">
            <text:p>0.01849352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5544453">
            <text:p>-0.005544453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5818116">
            <text:p>-0.005818116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6665558">
            <text:p>-0.006665558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1605932">
            <text:p>-0.001605932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3663003">
            <text:p>0.003663003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4170424">
            <text:p>-0.004170424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3317882">
            <text:p>-0.003317882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5995217">
            <text:p>-0.005995217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8858141">
            <text:p>-0.008858141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3970848">
            <text:p>-0.003970848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04381544">
            <text:p>-0.0004381544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2349408">
            <text:p>0.002349408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3256405">
            <text:p>-0.003256405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-0.0008396403">
            <text:p>-0.0008396403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7641095">
            <text:p>0.007641095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1130115">
            <text:p>0.001130115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669631">
            <text:p>0.006669631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8230546">
            <text:p>-0.008230546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1007433">
            <text:p>-0.01007433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2766062">
            <text:p>-0.002766062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6342047">
            <text:p>0.006342047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-0.0003762287">
            <text:p>-0.0003762287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797493">
            <text:p>-0.00797493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7256975">
            <text:p>-0.007256975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2707726">
            <text:p>-0.002707726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902359">
            <text:p>0.01902359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641032">
            <text:p>0.003641032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1396562">
            <text:p>-0.001396562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2954426">
            <text:p>0.002954426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6415266">
            <text:p>0.006415266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9596448">
            <text:p>0.009596448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2451585">
            <text:p>0.002451585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281291">
            <text:p>0.00281291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607704">
            <text:p>-0.00607704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1004447">
            <text:p>0.001004447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5194503">
            <text:p>0.005194503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240864">
            <text:p>0.003240864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309637">
            <text:p>0.01309637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8313246">
            <text:p>0.008313246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199213">
            <text:p>0.01199213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1278491">
            <text:p>-0.001278491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54231">
            <text:p>0.0054231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655868">
            <text:p>0.00655868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4026999">
            <text:p>0.004026999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3057014">
            <text:p>0.003057014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8683586">
            <text:p>-0.008683586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6268407">
            <text:p>0.006268407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849527">
            <text:p>0.002849527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5656693">
            <text:p>0.005656693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838937">
            <text:p>0.004838937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2350939">
            <text:p>-0.002350939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657259">
            <text:p>0.01657259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5007044">
            <text:p>0.005007044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5432315">
            <text:p>-0.005432315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1338108">
            <text:p>-0.001338108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6605244">
            <text:p>-0.006605244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328518">
            <text:p>0.01328518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3762006">
            <text:p>-0.003762006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7816886">
            <text:p>0.007816886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0.0008528034">
            <text:p>0.0008528034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-0.0004927479">
            <text:p>-0.0004927479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4489316">
            <text:p>-0.004489316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1109196">
            <text:p>-0.01109196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3247235">
            <text:p>-0.003247235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1061012">
            <text:p>-0.01061012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4609893">
            <text:p>-0.004609893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3231303">
            <text:p>-0.003231303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1184219">
            <text:p>-0.001184219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1046962">
            <text:p>0.01046962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449758">
            <text:p>0.01449758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8244566">
            <text:p>-0.008244566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9182453">
            <text:p>0.009182453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03777672">
            <text:p>0.0003777672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7523544">
            <text:p>-0.007523544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6059035">
            <text:p>-0.006059035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411424">
            <text:p>0.02411424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6695008">
            <text:p>-0.006695008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-0.0004822711">
            <text:p>-0.0004822711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9705927">
            <text:p>0.009705927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05939376">
            <text:p>-0.0005939376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2006577">
            <text:p>0.02006577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2994651">
            <text:p>-0.002994651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6772464">
            <text:p>0.006772464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8304427">
            <text:p>0.008304427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2576261">
            <text:p>0.002576261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6146224">
            <text:p>-0.006146224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-0.0002022733">
            <text:p>-0.0002022733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1907797">
            <text:p>-0.001907797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3670295">
            <text:p>-0.003670295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4900984">
            <text:p>0.004900984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350632">
            <text:p>0.01350632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06305109">
            <text:p>0.0006305109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1073204">
            <text:p>-0.01073204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3151089">
            <text:p>0.003151089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9611327">
            <text:p>-0.009611327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7072457">
            <text:p>-0.007072457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802093">
            <text:p>-0.00802093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3364981">
            <text:p>0.03364981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832417">
            <text:p>-0.00832417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900335">
            <text:p>-0.05900335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6072099">
            <text:p>-0.06072099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6219112">
            <text:p>-0.06219112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6245123">
            <text:p>-0.06245123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319389">
            <text:p>-0.06319389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6340259">
            <text:p>-0.0634025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56:26.41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788cm" svg:y="1.067cm" svg:width="10.68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7961304">
                <text:p>0.007961304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2351432">
                <text:p>0.002351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4004548">
                <text:p>0.004004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465096">
                <text:p>0.01465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9213739">
                <text:p>0.009213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4909663">
                <text:p>0.004909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823324">
                <text:p>0.01823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857318">
                <text:p>-0.001857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-0.0003975707">
                <text:p>-0.0003975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6831572">
                <text:p>0.006831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1017575">
                <text:p>0.01017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249107">
                <text:p>0.01249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2639114">
                <text:p>-0.002639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2602212">
                <text:p>0.002602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08277742">
                <text:p>0.0008277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7583473">
                <text:p>0.007583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2522843">
                <text:p>-0.0025228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3396172">
                <text:p>0.003396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4487324">
                <text:p>0.04487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6914287">
                <text:p>-0.006914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2789589">
                <text:p>-0.002789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31735">
                <text:p>0.01317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982671">
                <text:p>0.01982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08970973">
                <text:p>-0.0008970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5997171">
                <text:p>-0.005997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4571663">
                <text:p>0.004571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408508">
                <text:p>-0.004085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754071">
                <text:p>0.002754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960644">
                <text:p>0.00960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3989587">
                <text:p>0.003989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2505007">
                <text:p>0.002505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955074">
                <text:p>0.01955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8621491">
                <text:p>-0.008621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114099">
                <text:p>0.00114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7682538">
                <text:p>0.0007682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3382364">
                <text:p>-0.003382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3472845">
                <text:p>0.0034728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6244551">
                <text:p>0.006244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4452888">
                <text:p>0.0044528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6328912">
                <text:p>0.0063289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5005975">
                <text:p>0.005005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2314469">
                <text:p>0.002314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8389189">
                <text:p>0.008389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94558">
                <text:p>0.01945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4259388">
                <text:p>-0.004259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1046356">
                <text:p>0.01046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609669">
                <text:p>0.026096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951993">
                <text:p>0.019519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608491">
                <text:p>0.005608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1041602">
                <text:p>0.01041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4145715">
                <text:p>0.004145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229413">
                <text:p>0.007229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2302306">
                <text:p>-0.002302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705209">
                <text:p>0.005705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2118541">
                <text:p>0.02118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2173993">
                <text:p>-0.002173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1031999">
                <text:p>0.01031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3041616">
                <text:p>-0.003041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7978292">
                <text:p>-0.007978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05341283">
                <text:p>-0.00053412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4841901">
                <text:p>0.004841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6774573">
                <text:p>0.006774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3391721">
                <text:p>-0.003391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09205662">
                <text:p>-0.00092056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9163883">
                <text:p>-0.0091638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428185">
                <text:p>0.0024281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452338">
                <text:p>0.02452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538637">
                <text:p>0.0015386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9730487">
                <text:p>0.0097304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9137735">
                <text:p>0.0091377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818304">
                <text:p>0.01818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249821">
                <text:p>-0.0022498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3787706">
                <text:p>-0.003787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109558">
                <text:p>0.001095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2983475">
                <text:p>0.002983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324222">
                <text:p>-0.00324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8442491">
                <text:p>0.008442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4569576">
                <text:p>0.045695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2449479">
                <text:p>0.0024494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2504342">
                <text:p>0.002504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7585635">
                <text:p>-0.0075856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894444">
                <text:p>0.01894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1042336">
                <text:p>0.01042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1046734">
                <text:p>0.010467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4039365">
                <text:p>-0.004039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996584">
                <text:p>0.005996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802479">
                <text:p>0.018024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191366">
                <text:p>0.011913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329401">
                <text:p>0.03294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13998">
                <text:p>0.0113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2252729">
                <text:p>0.02252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4378158">
                <text:p>-0.004378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4226056">
                <text:p>-0.004226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2909182">
                <text:p>0.0029091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102297">
                <text:p>0.01022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03273524">
                <text:p>-0.00032735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4007164">
                <text:p>-0.0040071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7585804">
                <text:p>0.0075858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-0.0008514673">
                <text:p>-0.00085146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09716664">
                <text:p>-0.0097166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2321423">
                <text:p>-0.0023214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2251334">
                <text:p>0.02251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467018">
                <text:p>0.014670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4907919">
                <text:p>0.0049079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88046">
                <text:p>-0.00880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-0.0007570774">
                <text:p>-0.00075707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5709508">
                <text:p>0.0057095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5495996">
                <text:p>0.05495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2656368">
                <text:p>-0.0026563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1478428">
                <text:p>0.0014784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1878046">
                <text:p>0.001878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7412678">
                <text:p>-0.007412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8286218">
                <text:p>0.0082862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3728886">
                <text:p>0.0037288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202689">
                <text:p>-0.012026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0.0005886718">
                <text:p>0.00058867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5271803">
                <text:p>0.0052718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08681334">
                <text:p>-0.00086813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2132586">
                <text:p>0.0021325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5697286">
                <text:p>-0.005697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846151">
                <text:p>0.018461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07099927">
                <text:p>-0.00070999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9643856">
                <text:p>0.0096438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8151536">
                <text:p>0.008151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136738">
                <text:p>0.0091367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186764">
                <text:p>0.01867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7464818">
                <text:p>0.0074648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3364964">
                <text:p>0.033649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346403">
                <text:p>0.0093464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7589162">
                <text:p>0.007589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03176849">
                <text:p>-0.00031768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55573">
                <text:p>0.01055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306341">
                <text:p>0.023063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6025038">
                <text:p>-0.0060250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3845308">
                <text:p>0.0038453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936019">
                <text:p>0.019360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5113804">
                <text:p>0.0051138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5267843">
                <text:p>-0.0052678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299465">
                <text:p>-0.0022994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1185387">
                <text:p>-0.0011853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2124612">
                <text:p>0.0021246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7336902">
                <text:p>-0.0073369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9882021">
                <text:p>-0.0098820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72387">
                <text:p>0.02723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1144268">
                <text:p>0.0011442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4121104">
                <text:p>0.0041211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3913879">
                <text:p>-0.0039138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2165848">
                <text:p>-0.0021658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4260003">
                <text:p>-0.0042600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713435">
                <text:p>-0.0037134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471413">
                <text:p>-0.002471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383694">
                <text:p>0.013836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235669">
                <text:p>0.012356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2256355">
                <text:p>-0.0022563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889982">
                <text:p>0.028899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7319761">
                <text:p>0.0073197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371562">
                <text:p>0.013715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4351677">
                <text:p>-0.0043516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3098799">
                <text:p>-0.0030987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410995">
                <text:p>0.004109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1018238">
                <text:p>0.0101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5517808">
                <text:p>-0.0055178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09559733">
                <text:p>0.0095597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2282022">
                <text:p>0.0022820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172954">
                <text:p>0.011729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301012">
                <text:p>0.003301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408917">
                <text:p>0.004089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05203053">
                <text:p>0.0005203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828972">
                <text:p>0.018289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2479659">
                <text:p>0.0024796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978077">
                <text:p>0.019780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6768598">
                <text:p>0.0067685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1024885">
                <text:p>0.010248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9206224">
                <text:p>-0.0092062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2115824">
                <text:p>0.021158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914936">
                <text:p>0.019149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682042">
                <text:p>0.01682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248091">
                <text:p>-0.0042480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03380635">
                <text:p>-0.00033806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2981271">
                <text:p>-0.0029812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4054119">
                <text:p>-0.0040541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723555">
                <text:p>0.017235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4952601">
                <text:p>0.0049526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609458">
                <text:p>0.026094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2249368">
                <text:p>0.022493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641998">
                <text:p>0.016419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2566171">
                <text:p>-0.0025661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3246744">
                <text:p>-0.0032467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0.0002042106">
                <text:p>0.0002042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16175">
                <text:p>0.01161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5435308">
                <text:p>0.0054353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351279">
                <text:p>0.013512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3654962">
                <text:p>-0.0036549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8000932">
                <text:p>0.0080009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78975">
                <text:p>0.01789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382072">
                <text:p>0.013820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264739">
                <text:p>-0.002647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7702205">
                <text:p>-0.0077022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880376">
                <text:p>0.0098803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07170305">
                <text:p>0.00071703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292554">
                <text:p>-0.00292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3750081">
                <text:p>-0.0037500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1011655">
                <text:p>0.0010116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590455">
                <text:p>0.0045904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9561585">
                <text:p>-0.0095615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1217595">
                <text:p>0.012175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3026057">
                <text:p>-0.0030260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6399306">
                <text:p>0.0063993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4315322">
                <text:p>-0.004315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0.0004949305">
                <text:p>0.00049493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-0.0007487864">
                <text:p>-0.00074878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08066907">
                <text:p>0.00080669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7439693">
                <text:p>0.0074396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280611">
                <text:p>0.012806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2561873">
                <text:p>-0.0025618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149352">
                <text:p>0.001493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55367">
                <text:p>0.02553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7808461">
                <text:p>-0.0078084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6356194">
                <text:p>-0.0063561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089624">
                <text:p>0.0030896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999766">
                <text:p>-0.0019997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225775">
                <text:p>0.012257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271531">
                <text:p>0.012715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151496">
                <text:p>-0.001514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3507453">
                <text:p>-0.0035074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4587218">
                <text:p>-0.0045872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2602612">
                <text:p>0.0026026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2458094">
                <text:p>-0.0024580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4232894">
                <text:p>-0.0042328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2015082">
                <text:p>0.0020150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340271">
                <text:p>0.013402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3387927">
                <text:p>0.033879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1024535">
                <text:p>-0.010245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8342336">
                <text:p>-0.0083423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3426201">
                <text:p>0.0034262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2472659">
                <text:p>-0.0024726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5673944">
                <text:p>0.0056739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358553">
                <text:p>-0.013585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3905243">
                <text:p>0.0039052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205734">
                <text:p>-0.002057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311047">
                <text:p>0.0023110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8136175">
                <text:p>0.0081361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09363602">
                <text:p>0.00093636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427448">
                <text:p>0.01427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9215639">
                <text:p>-0.0092156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1206456">
                <text:p>-0.0012064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2929984">
                <text:p>-0.0029299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366638">
                <text:p>0.023666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0.000351731">
                <text:p>0.0003517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6309364">
                <text:p>0.0063093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1719244">
                <text:p>0.0017192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156897">
                <text:p>0.011568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9046599">
                <text:p>-0.0090465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1048625">
                <text:p>-0.01048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1006018">
                <text:p>0.010060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505114">
                <text:p>0.0035051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7183305">
                <text:p>-0.0071833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4756045">
                <text:p>-0.0047560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517132">
                <text:p>0.015171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130657">
                <text:p>0.011306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1090719">
                <text:p>0.010907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816299">
                <text:p>-0.008162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1494889">
                <text:p>-0.0014948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4793">
                <text:p>0.00547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538241">
                <text:p>0.0035382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445372">
                <text:p>0.0054453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5559735">
                <text:p>0.0055597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589436">
                <text:p>0.015894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178843">
                <text:p>-0.011788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4564566">
                <text:p>0.0045645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1963297">
                <text:p>0.0019632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259126">
                <text:p>0.012591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1032309">
                <text:p>0.010323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9616557">
                <text:p>-0.0096165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179562">
                <text:p>0.011795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1729139">
                <text:p>0.0017291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9459587">
                <text:p>-0.0094595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660961">
                <text:p>0.0016609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-0.0009419933">
                <text:p>-0.00094199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2470463">
                <text:p>0.0024704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6080246">
                <text:p>0.0060802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300046">
                <text:p>-0.0023000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2777702">
                <text:p>0.002777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878184">
                <text:p>0.018781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5259957">
                <text:p>-0.0052599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7804729">
                <text:p>-0.0078047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814556">
                <text:p>0.018145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270223">
                <text:p>0.012702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05395491">
                <text:p>-0.00053954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316964">
                <text:p>-0.003169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5585369">
                <text:p>0.0055853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5709003">
                <text:p>0.0057090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1042669">
                <text:p>0.010426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2194079">
                <text:p>-0.0021940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5077695">
                <text:p>-0.0050776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72856">
                <text:p>0.01728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5006164">
                <text:p>-0.0050061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6239516">
                <text:p>0.0062395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2573022">
                <text:p>0.0025730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4913395">
                <text:p>0.0049133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4638867">
                <text:p>0.0046388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5313725">
                <text:p>0.0053137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2308593">
                <text:p>0.0023085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344028">
                <text:p>0.013440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251055">
                <text:p>0.0012510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8253856">
                <text:p>0.0082538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2381061">
                <text:p>-0.0023810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393112">
                <text:p>0.00393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818647">
                <text:p>0.0038186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01304724">
                <text:p>0.00013047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9884961">
                <text:p>0.0098849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419341">
                <text:p>0.014193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623727">
                <text:p>0.016237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7021394">
                <text:p>-0.0070213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80919">
                <text:p>0.010809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3198713">
                <text:p>-0.0031987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6004053">
                <text:p>-0.0060040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995587">
                <text:p>0.0039955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3015726">
                <text:p>0.0030157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-0.0002017147">
                <text:p>-0.00020171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6831455">
                <text:p>-0.0068314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5870947">
                <text:p>-0.0058709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7556334">
                <text:p>-0.0075563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9991359">
                <text:p>-0.0099913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0.0001350604">
                <text:p>0.00013506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5153092">
                <text:p>0.0051530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4143863">
                <text:p>0.0041438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9135936">
                <text:p>0.0091359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4952391">
                <text:p>-0.0049523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1428965">
                <text:p>-0.0014289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632944">
                <text:p>0.016329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290623">
                <text:p>0.0012906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161481">
                <text:p>-0.001614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1159546">
                <text:p>0.011595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178656">
                <text:p>0.011786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1437515">
                <text:p>0.0014375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8482877">
                <text:p>0.0084828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6185744">
                <text:p>-0.0061857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2223815">
                <text:p>0.0022238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1076">
                <text:p>0.0110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6142348">
                <text:p>-0.0061423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3187398">
                <text:p>0.0031873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668657">
                <text:p>0.016686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662685">
                <text:p>0.0056626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695381">
                <text:p>0.0016953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1009212">
                <text:p>-0.010092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274347">
                <text:p>0.012743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0104869">
                <text:p>-0.0001048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1470706">
                <text:p>-0.0014707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7482585">
                <text:p>0.0074825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7530476">
                <text:p>-0.0075304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540571">
                <text:p>0.015405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354827">
                <text:p>0.013548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1154358">
                <text:p>0.011543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3158977">
                <text:p>0.0031589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3455758">
                <text:p>0.0034557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615269">
                <text:p>-0.0036152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7190657">
                <text:p>0.0071906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9051489">
                <text:p>-0.0090514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0.0008260417">
                <text:p>0.00082604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0.0005617584">
                <text:p>0.00056175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1782362">
                <text:p>0.001782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3120975">
                <text:p>0.0031209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7463074">
                <text:p>-0.0074630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6186651">
                <text:p>-0.0061866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900644">
                <text:p>0.009006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2379705">
                <text:p>0.0023797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-0.0009091588">
                <text:p>-0.00090915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09051569">
                <text:p>-0.00090515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642977">
                <text:p>0.0036429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2028126">
                <text:p>0.020281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154319">
                <text:p>0.011543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1828715">
                <text:p>-0.0018287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1751392">
                <text:p>-0.0017513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913895">
                <text:p>0.009138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353172">
                <text:p>0.013531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1593771">
                <text:p>0.0015937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1046342">
                <text:p>-0.0010463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1401148">
                <text:p>-0.0014011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6529062">
                <text:p>0.0065290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252924">
                <text:p>0.0062529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5897301">
                <text:p>-0.0058973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562799">
                <text:p>0.015627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9233287">
                <text:p>0.0092332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475848">
                <text:p>0.0054758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6575512">
                <text:p>-0.0065755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793565">
                <text:p>-0.007935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4541819">
                <text:p>-0.0045418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2580304">
                <text:p>-0.0025803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5067499">
                <text:p>-0.0050674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596575">
                <text:p>0.0075965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1114758">
                <text:p>0.011147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974044">
                <text:p>0.0039740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1468449">
                <text:p>0.014684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3999001">
                <text:p>-0.0039990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6771388">
                <text:p>-0.0067713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9189925">
                <text:p>-0.0091899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104369">
                <text:p>0.01043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3144685">
                <text:p>0.031446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4917951">
                <text:p>0.0049179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753474">
                <text:p>0.0077534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9721575">
                <text:p>0.0097215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1520146">
                <text:p>-0.0015201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1065486">
                <text:p>0.010654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3606397">
                <text:p>0.0036063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6092367">
                <text:p>0.0060923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2530992">
                <text:p>-0.0025309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-0.0001173799">
                <text:p>-0.00011737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02346518">
                <text:p>-0.00023465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1851915">
                <text:p>0.0018519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1271704">
                <text:p>-0.0012717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1123877">
                <text:p>0.011238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2980921">
                <text:p>-0.0029809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08194004">
                <text:p>0.00081940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476816">
                <text:p>0.014768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690107">
                <text:p>0.016901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2189046">
                <text:p>0.021890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1059193">
                <text:p>0.010591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6679961">
                <text:p>-0.0066799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3467074">
                <text:p>-0.0034670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9510503">
                <text:p>-0.0095105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926988">
                <text:p>-0.009269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0.0002378347">
                <text:p>0.000237834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4001375">
                <text:p>-0.0040013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3041126">
                <text:p>0.00030411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1872754">
                <text:p>-0.0018727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185126">
                <text:p>0.0031851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877997">
                <text:p>0.008779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6936823">
                <text:p>-0.0069368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2847789">
                <text:p>-0.0028477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1072269">
                <text:p>-0.010722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0.0007862595">
                <text:p>0.00078625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8492358">
                <text:p>-0.0084923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9004913">
                <text:p>-0.0090049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8541652">
                <text:p>-0.0085416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9495329">
                <text:p>-0.00094953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326294">
                <text:p>0.0033262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7508199">
                <text:p>0.007508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4899118">
                <text:p>-0.0048991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2594274">
                <text:p>0.0025942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611858">
                <text:p>-0.006118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1031469">
                <text:p>0.010314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8603764">
                <text:p>0.0086037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2148869">
                <text:p>0.021488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247828">
                <text:p>0.012478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291782">
                <text:p>0.002917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4427073">
                <text:p>-0.0044270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1073271">
                <text:p>-0.010732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7462273">
                <text:p>0.0074622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7161637">
                <text:p>-0.0071616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869637">
                <text:p>0.0048696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6212557">
                <text:p>-0.0062125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5169414">
                <text:p>-0.0051694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183579">
                <text:p>0.0011835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396114">
                <text:p>0.013961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9304451">
                <text:p>-0.0093044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570658">
                <text:p>-0.005706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8919228">
                <text:p>-0.0089192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4055601">
                <text:p>0.0040556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5888137">
                <text:p>-0.0058881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7038411">
                <text:p>-0.0070384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6512188">
                <text:p>-0.0065121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07510385">
                <text:p>-0.00075103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3068703">
                <text:p>0.0030687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1087058">
                <text:p>-0.010870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0.0005939027">
                <text:p>0.00059390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68738">
                <text:p>0.00687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112556">
                <text:p>-0.01125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06701996">
                <text:p>-0.00067019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3395779">
                <text:p>0.033957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1003158">
                <text:p>-0.0010031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1028773">
                <text:p>0.0010287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7269533">
                <text:p>-0.0072695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16195">
                <text:p>0.01161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5924627">
                <text:p>0.0059246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5386885">
                <text:p>-0.0053868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-0.0002561709">
                <text:p>-0.00025617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5435552">
                <text:p>-0.0054355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9776635">
                <text:p>-0.0097766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3674858">
                <text:p>-0.0036748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6094738">
                <text:p>-0.0060947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464154">
                <text:p>0.0064641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9511112">
                <text:p>0.0095111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5181886">
                <text:p>-0.0051818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1566156">
                <text:p>-0.0015661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-0.0006789937">
                <text:p>-0.00067899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-0.000591878">
                <text:p>-0.0005918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3388836">
                <text:p>-0.0033888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7964498">
                <text:p>-0.0079644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851636">
                <text:p>0.0038516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1430387">
                <text:p>-0.0014303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8096729">
                <text:p>0.0080967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04282249">
                <text:p>-0.00042822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4782102">
                <text:p>-0.0047821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2743013">
                <text:p>-0.0027430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7295876">
                <text:p>-0.0072958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08786597">
                <text:p>0.00087865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2302251">
                <text:p>-0.0023022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173932">
                <text:p>-0.011739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-0.001256642">
                <text:p>-0.0012566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2551679">
                <text:p>-0.0025516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13643">
                <text:p>0.00136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422216">
                <text:p>0.014222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705953">
                <text:p>0.017059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5039632">
                <text:p>-0.0050396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4307256">
                <text:p>0.0043072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8099195">
                <text:p>-0.0080991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7705458">
                <text:p>0.0077054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4655878">
                <text:p>-0.0046558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3088189">
                <text:p>0.0030881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5982312">
                <text:p>-0.0059823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7453127">
                <text:p>-0.0074531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4012248">
                <text:p>-0.0040122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26352">
                <text:p>0.01263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09923933">
                <text:p>0.0099239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7428349">
                <text:p>-0.0074283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07120545">
                <text:p>-0.00071205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5556056">
                <text:p>0.0055560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01825292">
                <text:p>0.00018252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472183">
                <text:p>0.00147218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2248958">
                <text:p>0.0022489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5516416">
                <text:p>0.0055164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1037193">
                <text:p>0.010371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6842524">
                <text:p>-0.0068425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7107279">
                <text:p>0.0071072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11273">
                <text:p>-0.0112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7291136">
                <text:p>-0.0072911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2286612">
                <text:p>-0.0022866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287224">
                <text:p>0.012872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5672864">
                <text:p>-0.0056728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2473252">
                <text:p>-0.0024732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6262077">
                <text:p>-0.0062620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176986">
                <text:p>0.011769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7448615">
                <text:p>0.0074486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273208">
                <text:p>-0.012732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9821855">
                <text:p>-0.0098218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1550297">
                <text:p>-0.00155029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1105614">
                <text:p>-0.011056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58757">
                <text:p>0.01587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1606127">
                <text:p>-0.0016061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6160875">
                <text:p>-0.0061608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-0.00353635">
                <text:p>-0.003536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5051949">
                <text:p>-0.0050519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324734">
                <text:p>0.013247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180712">
                <text:p>0.011807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347323">
                <text:p>0.0134732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1018913">
                <text:p>0.010189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6668023">
                <text:p>-0.0066680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9208527">
                <text:p>0.0092085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1708055">
                <text:p>0.0017080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836053">
                <text:p>0.0048360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5771391">
                <text:p>-0.0057713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4928164">
                <text:p>0.0049281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696346">
                <text:p>0.016963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3317091">
                <text:p>-0.0033170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7990352">
                <text:p>0.0079903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3803503">
                <text:p>0.0038035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926278">
                <text:p>0.009262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978619">
                <text:p>0.0039786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47725">
                <text:p>0.01477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656941">
                <text:p>0.0036569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134301">
                <text:p>-0.001343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1369326">
                <text:p>-0.0013693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357448">
                <text:p>0.013574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469493">
                <text:p>0.014694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-0.0002720311">
                <text:p>-0.00027203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0377762">
                <text:p>-0.0003777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9890187">
                <text:p>-0.0098901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217184">
                <text:p>0.012171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8447779">
                <text:p>-0.0084477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187023">
                <text:p>0.011870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262842">
                <text:p>0.012628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1026497">
                <text:p>-0.010264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4007371">
                <text:p>-0.0040073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770825">
                <text:p>0.017708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451536">
                <text:p>0.014515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5674847">
                <text:p>-0.00567484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612802">
                <text:p>0.016128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9288674">
                <text:p>0.0092886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4089647">
                <text:p>-0.0040896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4582951">
                <text:p>0.0045829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3979252">
                <text:p>-0.0039792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914229">
                <text:p>-0.009142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36368">
                <text:p>0.01363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4070825">
                <text:p>-0.0040708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420805">
                <text:p>0.014208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01863564">
                <text:p>0.00018635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8355538">
                <text:p>0.0083555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950787">
                <text:p>0.0029507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2984289">
                <text:p>0.0029842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349851">
                <text:p>0.003498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09563765">
                <text:p>0.00095637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3644621">
                <text:p>-0.0036446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5255377">
                <text:p>-0.0052553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746671">
                <text:p>0.0087466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5900674">
                <text:p>-0.0059006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542396">
                <text:p>0.015423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888327">
                <text:p>0.0048883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06964297">
                <text:p>-0.00069642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07053726">
                <text:p>0.00070537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466504">
                <text:p>0.014665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167856">
                <text:p>0.0021678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81881">
                <text:p>0.004818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2037682">
                <text:p>0.0020376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1131548">
                <text:p>0.0011315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5391055">
                <text:p>-0.0053910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8438597">
                <text:p>-0.0084385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6512247">
                <text:p>0.0065122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792558">
                <text:p>0.0047925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-0.000314002">
                <text:p>-0.0003140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8820242">
                <text:p>-0.0088202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583258">
                <text:p>0.0025832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1400637">
                <text:p>-0.0014006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1118337">
                <text:p>0.0011183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192664">
                <text:p>-0.001926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4553385">
                <text:p>0.00455338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3510189">
                <text:p>-0.0035101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444635">
                <text:p>0.014446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2768983">
                <text:p>-0.00276898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4760026">
                <text:p>-0.0047600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1693181">
                <text:p>-0.0016931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3038657">
                <text:p>-0.0030386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518345">
                <text:p>0.015183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0.000323494">
                <text:p>0.0003234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0.0009095013">
                <text:p>0.00090950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2198381">
                <text:p>0.00219838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3195387">
                <text:p>-0.00319538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618788">
                <text:p>0.016187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07083074">
                <text:p>0.00070830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02171212">
                <text:p>0.00021712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7575215">
                <text:p>-0.0075752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794767">
                <text:p>0.017947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1526005">
                <text:p>-0.0015260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318876">
                <text:p>0.013188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9995211">
                <text:p>-0.0099952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4264888">
                <text:p>0.0042648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1078846">
                <text:p>-0.010788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351148">
                <text:p>0.013511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216247">
                <text:p>0.0022162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9101419">
                <text:p>-0.0091014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826132">
                <text:p>0.018261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234002">
                <text:p>0.012340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4782369">
                <text:p>-0.0047823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7994937">
                <text:p>-0.0079949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0.0001293754">
                <text:p>0.00012937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-0.000186371">
                <text:p>-0.0001863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396917">
                <text:p>0.003969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590079">
                <text:p>0.015900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3804264">
                <text:p>-0.0038042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2276254">
                <text:p>-0.0022762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594642">
                <text:p>-0.005946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1062574">
                <text:p>-0.010625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6971348">
                <text:p>-0.0069713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27829">
                <text:p>0.01278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326208">
                <text:p>0.023262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7249557">
                <text:p>-0.0072495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534354">
                <text:p>0.0015343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644613">
                <text:p>0.006446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302015">
                <text:p>-0.0013020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8625004">
                <text:p>-0.0086250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4165333">
                <text:p>0.0041653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3543214">
                <text:p>-0.0035432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8313762">
                <text:p>0.0083137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3839055">
                <text:p>-0.0038390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1077047">
                <text:p>0.010770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3276263">
                <text:p>-0.0032762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9072728">
                <text:p>-0.0090727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2451152">
                <text:p>-0.0024511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7411302">
                <text:p>-0.0074113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803928">
                <text:p>0.048039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3809245">
                <text:p>-0.0038092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773536">
                <text:p>0.0037735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456065">
                <text:p>0.0024560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5170238">
                <text:p>0.051702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-0.001473555">
                <text:p>-0.0014735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789482">
                <text:p>-0.0017894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5369675">
                <text:p>-0.0053696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7691955">
                <text:p>-0.0076919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3122789">
                <text:p>-0.0031227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349745">
                <text:p>0.013497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4991355">
                <text:p>-0.0049913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1793261">
                <text:p>0.0017932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4519396">
                <text:p>-0.0045193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6614859">
                <text:p>0.0066148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3136718">
                <text:p>0.0031367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2346837">
                <text:p>-0.0023468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5803427">
                <text:p>0.0058034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3752858">
                <text:p>-0.0037528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210254">
                <text:p>0.002102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06558233">
                <text:p>0.00065582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631739">
                <text:p>0.0063173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3432063">
                <text:p>-0.0034320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4144231">
                <text:p>-0.0041442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2439821">
                <text:p>-0.0024398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818043">
                <text:p>-0.0018180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2015347">
                <text:p>-0.0020153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70842">
                <text:p>-0.00708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6362646">
                <text:p>-0.0063626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415675">
                <text:p>-0.0034156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30719">
                <text:p>0.02307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2997498">
                <text:p>-0.0029974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802385">
                <text:p>0.018023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4453588">
                <text:p>-0.0044535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9194941">
                <text:p>0.0091949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-0.0001590056">
                <text:p>-0.00015900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2853496">
                <text:p>-0.0028534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709181">
                <text:p>-0.0070918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3570126">
                <text:p>-0.00357012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7895694">
                <text:p>-0.0078956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-0.0002568329">
                <text:p>-0.00025683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3129194">
                <text:p>-0.0031291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3188429">
                <text:p>0.0031884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1837551">
                <text:p>-0.0018375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6082562">
                <text:p>0.0060825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4649189">
                <text:p>-0.00464918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962262">
                <text:p>0.0069622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7620604">
                <text:p>0.0076206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0999814">
                <text:p>-0.0009998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016665">
                <text:p>0.0050166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5429243">
                <text:p>0.0054292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08972451">
                <text:p>0.00089724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2245076">
                <text:p>-0.00224507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-0.0006234354">
                <text:p>-0.00062343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4189509">
                <text:p>-0.0041895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313518">
                <text:p>0.0013135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1633344">
                <text:p>0.0016333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5929034">
                <text:p>-0.0059290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147701">
                <text:p>0.011477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221419">
                <text:p>-0.002214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2140786">
                <text:p>-0.0021407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0599754">
                <text:p>0.00059975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691539">
                <text:p>0.006915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6058413">
                <text:p>0.0060584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4213268">
                <text:p>0.0042132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37839">
                <text:p>0.013783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3051295">
                <text:p>0.0030512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360439">
                <text:p>0.0136043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1209837">
                <text:p>-0.0012098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637428">
                <text:p>-0.006374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1895176">
                <text:p>0.0018951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8443471">
                <text:p>-0.00844347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2568419">
                <text:p>0.0025684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2695774">
                <text:p>-0.0026957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1430511">
                <text:p>-0.0014305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1593022">
                <text:p>-0.0015930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9793185">
                <text:p>-0.0097931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1049354">
                <text:p>0.010493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9731794">
                <text:p>-0.0097317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6037472">
                <text:p>0.0060374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360914">
                <text:p>0.0053609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5162455">
                <text:p>0.0051624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9046354">
                <text:p>-0.0090463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326126">
                <text:p>0.003261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546497">
                <text:p>0.015464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5777014">
                <text:p>-0.0057770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0.000673375">
                <text:p>0.0006733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0.0002440931">
                <text:p>0.00024409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1050701">
                <text:p>0.010507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3115868">
                <text:p>-0.0031158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2352711">
                <text:p>-0.0023527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3473268">
                <text:p>-0.0034732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862898">
                <text:p>0.018628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8189147">
                <text:p>-0.0081891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6571775">
                <text:p>0.0065717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0.0001919528">
                <text:p>0.00019195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6980486">
                <text:p>-0.0069804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06602519">
                <text:p>0.00066025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6930481">
                <text:p>-0.0069304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7776788">
                <text:p>-0.0077767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5064461">
                <text:p>-0.0050644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141023">
                <text:p>0.001410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4626544">
                <text:p>-0.0046265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849808">
                <text:p>0.018498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4512432">
                <text:p>0.0045124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2442293">
                <text:p>-0.0024422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8839807">
                <text:p>0.0088398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3443838">
                <text:p>-0.0034438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371219">
                <text:p>0.013712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5881393">
                <text:p>0.0058813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9312167">
                <text:p>0.0093121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398523">
                <text:p>0.0033985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2178866">
                <text:p>0.021788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231233">
                <text:p>-0.012312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581186">
                <text:p>-0.0025811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5485719">
                <text:p>-0.0054857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1788493">
                <text:p>-0.00178849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4225745">
                <text:p>-0.0042257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2883845">
                <text:p>-0.00288384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6455497">
                <text:p>-0.0064554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2354241">
                <text:p>0.0023542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2342999">
                <text:p>0.00234299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8963536">
                <text:p>-0.0089635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2854256">
                <text:p>-0.0028542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7489646">
                <text:p>-0.00748964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1509203">
                <text:p>0.0015092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01875007">
                <text:p>-0.00018750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118478">
                <text:p>0.001184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2547354">
                <text:p>-0.00254735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226459">
                <text:p>0.0032264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2377188">
                <text:p>0.00237718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3396769">
                <text:p>-0.0033967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810921">
                <text:p>0.018109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8804725">
                <text:p>0.0088047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4551649">
                <text:p>-0.0045516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3532581">
                <text:p>0.0035325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976606">
                <text:p>0.0297660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7474141">
                <text:p>0.0074741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60917">
                <text:p>0.01609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8003588">
                <text:p>0.0080035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3756216">
                <text:p>0.0037562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839927">
                <text:p>0.028399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3393314">
                <text:p>0.0033933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541904">
                <text:p>0.025419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05523653">
                <text:p>0.000552365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1673583">
                <text:p>0.0016735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03118852">
                <text:p>0.00031188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8457303">
                <text:p>-0.0084573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9461041">
                <text:p>0.0094610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1921533">
                <text:p>0.0019215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1012085">
                <text:p>-0.0101208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2470289">
                <text:p>-0.0024702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-0.0008021852">
                <text:p>-0.00080218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1928779">
                <text:p>-0.00192877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1021414">
                <text:p>-0.010214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7230594">
                <text:p>-0.00723059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09581939">
                <text:p>-0.000958193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3506881">
                <text:p>-0.0035068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1606727">
                <text:p>-0.00160672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7602135">
                <text:p>-0.00760213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1734822">
                <text:p>0.0017348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2790979">
                <text:p>0.0027909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34019">
                <text:p>-0.00340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95931">
                <text:p>0.0129593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114418">
                <text:p>0.001144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99337">
                <text:p>0.009933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1075559">
                <text:p>-0.010755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7299022">
                <text:p>0.0072990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5162827">
                <text:p>-0.0051628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2970454">
                <text:p>-0.0029704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974221">
                <text:p>0.0049742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3180434">
                <text:p>0.0031804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4116968">
                <text:p>-0.0041169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3168118">
                <text:p>-0.0031681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4143808">
                <text:p>-0.0041438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03968968">
                <text:p>0.00039689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7709699">
                <text:p>-0.0077096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6820444">
                <text:p>0.00682044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4939854">
                <text:p>-0.0049398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1022399">
                <text:p>-0.0102239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966244">
                <text:p>-0.009662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0.0001160928">
                <text:p>0.00011609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3748198">
                <text:p>-0.00374819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9225974">
                <text:p>0.00092259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4911924">
                <text:p>-0.0049119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4860503">
                <text:p>-0.0048605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03938112">
                <text:p>0.00039381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375983">
                <text:p>-0.003759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6159113">
                <text:p>-0.0061591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325379">
                <text:p>0.013253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2947934">
                <text:p>0.00294793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2311574">
                <text:p>0.023115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1137539">
                <text:p>-0.0113753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6472447">
                <text:p>-0.0064724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1056712">
                <text:p>0.0010567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2020284">
                <text:p>0.0020202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612533">
                <text:p>-0.016125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8862365">
                <text:p>-0.0088623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3207348">
                <text:p>0.032073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689271">
                <text:p>0.0168927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988456">
                <text:p>0.0059884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5317827">
                <text:p>0.00531782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-0.0004412937">
                <text:p>-0.00044129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03620182">
                <text:p>0.000362018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420575">
                <text:p>0.0014205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4587072">
                <text:p>0.0045870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5474984">
                <text:p>-0.0054749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9738212">
                <text:p>-0.0097382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6828036">
                <text:p>-0.0068280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09768651">
                <text:p>-0.00097686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1156652">
                <text:p>0.011566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6524478">
                <text:p>0.0065244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979352">
                <text:p>0.009793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1256964">
                <text:p>0.0012569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466526">
                <text:p>0.014665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3659266">
                <text:p>-0.0036592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-0.004813555">
                <text:p>-0.0048135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8936098">
                <text:p>-0.0089360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7189374">
                <text:p>-0.00718937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4690207">
                <text:p>-0.0046902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526584">
                <text:p>0.00252658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4671005">
                <text:p>0.0046710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5410864">
                <text:p>0.0054108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532748">
                <text:p>0.015327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3834351">
                <text:p>-0.00383435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5006605">
                <text:p>-0.0050066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215532">
                <text:p>0.002155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181388">
                <text:p>0.011813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941579">
                <text:p>-0.0094157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4842777">
                <text:p>0.00484277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2958861">
                <text:p>-0.00295886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8569682">
                <text:p>0.00856968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6887529">
                <text:p>0.0068875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2074139">
                <text:p>-0.0020741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369943">
                <text:p>0.0236994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3868167">
                <text:p>-0.0038681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8740536">
                <text:p>-0.0087405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9596959">
                <text:p>-0.00959695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9539925">
                <text:p>0.0095399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7841875">
                <text:p>-0.0078418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246921">
                <text:p>0.012469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7179576">
                <text:p>0.0071795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2279392">
                <text:p>-0.00227939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4971044">
                <text:p>-0.00497104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495417">
                <text:p>0.0024954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103554">
                <text:p>-0.01035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1219">
                <text:p>0.0112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05976098">
                <text:p>-0.00059760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4302674">
                <text:p>-0.0043026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1098581">
                <text:p>-0.010985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420341">
                <text:p>0.0044203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100934">
                <text:p>0.011009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6729487">
                <text:p>0.00672948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5103191">
                <text:p>-0.0051031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3003963">
                <text:p>0.00300396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1290821">
                <text:p>-0.0012908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6949687">
                <text:p>-0.00694968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3045733">
                <text:p>-0.0030457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684981">
                <text:p>0.0168498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5596799">
                <text:p>-0.0055967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3223385">
                <text:p>-0.00322338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44229">
                <text:p>-0.01442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1560249">
                <text:p>-0.00156024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725541">
                <text:p>0.0057255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230037">
                <text:p>0.0052300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4714451">
                <text:p>-0.00471445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7281782">
                <text:p>-0.0072817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41451">
                <text:p>0.00414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26282">
                <text:p>0.012628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5149379">
                <text:p>-0.00514937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1103308">
                <text:p>0.011033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-0.001681477">
                <text:p>-0.00168147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2847075">
                <text:p>-0.0028470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315133">
                <text:p>0.003151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8990999">
                <text:p>0.00899099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9000449">
                <text:p>0.00900044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4632155">
                <text:p>-0.0046321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436475">
                <text:p>-0.004364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84476">
                <text:p>0.003844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2772155">
                <text:p>0.0027721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1334397">
                <text:p>0.00133439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1013864">
                <text:p>-0.0101386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2500061">
                <text:p>0.00250006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5002459">
                <text:p>0.00500245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6084909">
                <text:p>-0.0060849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1058455">
                <text:p>-0.010584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2003462">
                <text:p>-0.0020034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9529164">
                <text:p>0.0095291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291699">
                <text:p>-0.002916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7532185">
                <text:p>-0.0075321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470945">
                <text:p>-0.0047094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66315">
                <text:p>0.003663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0.0003879117">
                <text:p>0.00038791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8590219">
                <text:p>0.0085902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7851155">
                <text:p>-0.0078511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4901413">
                <text:p>-0.0049014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7318669">
                <text:p>-0.0073186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929615">
                <text:p>0.019296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799608">
                <text:p>0.027996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0.0001790891">
                <text:p>0.00017908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5292236">
                <text:p>-0.0052922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8444204">
                <text:p>0.0084442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-0.0007392114">
                <text:p>-0.00073921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8867226">
                <text:p>0.00886722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9366366">
                <text:p>0.00936636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3929165">
                <text:p>-0.00392916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260939">
                <text:p>0.012609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3618658">
                <text:p>-0.0036186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2387018">
                <text:p>0.00023870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2578484">
                <text:p>-0.0025784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0858">
                <text:p>0.006085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1157979">
                <text:p>-0.0011579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402105">
                <text:p>-0.004021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6491624">
                <text:p>-0.0064916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4340813">
                <text:p>0.0043408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4774874">
                <text:p>-0.00477487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1788308">
                <text:p>-0.00178830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3593825">
                <text:p>-0.0035938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9456691">
                <text:p>0.0094566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12325">
                <text:p>0.0123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7282365">
                <text:p>0.00728236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2170886">
                <text:p>0.0217088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6722146">
                <text:p>-0.0067221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2107328">
                <text:p>-0.00210732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1478096">
                <text:p>0.00147809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4343993">
                <text:p>0.00434399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4486396">
                <text:p>-0.0044863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316673">
                <text:p>0.0131667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83886">
                <text:p>0.018388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603028">
                <text:p>0.00860302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3152263">
                <text:p>0.00315226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743508">
                <text:p>0.00374350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264398">
                <text:p>-0.00126439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456204">
                <text:p>0.0045620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2428752">
                <text:p>-0.00242875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4548708">
                <text:p>-0.00454870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5259308">
                <text:p>-0.00525930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644987">
                <text:p>0.0164498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06451964">
                <text:p>-0.000645196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4153723">
                <text:p>0.00415372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8370153">
                <text:p>-0.00837015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6696399">
                <text:p>-0.00669639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2339761">
                <text:p>0.0233976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4369066">
                <text:p>-0.00436906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26373">
                <text:p>-0.002637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4543595">
                <text:p>-0.00454359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768145">
                <text:p>0.00276814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2809776">
                <text:p>-0.0028097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51406">
                <text:p>-0.0015140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618123">
                <text:p>0.00661812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8222482">
                <text:p>-0.00822248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7784066">
                <text:p>-0.00778406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4503012">
                <text:p>-0.00450301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36127">
                <text:p>0.013612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2736039">
                <text:p>0.00273603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1091253">
                <text:p>-0.0109125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3877645">
                <text:p>0.00387764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2178492">
                <text:p>-0.00217849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877815">
                <text:p>0.0287781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04135589">
                <text:p>-0.000413558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1383291">
                <text:p>-0.0013832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5632721">
                <text:p>0.00563272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2816481">
                <text:p>0.00281648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9940867">
                <text:p>-0.0099408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6274791">
                <text:p>0.0062747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3438026">
                <text:p>0.0034380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1319077">
                <text:p>-0.00131907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4411103">
                <text:p>0.00441110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4274715">
                <text:p>0.00427471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-0.0002126499">
                <text:p>-0.000212649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0276165">
                <text:p>-0.00027616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5082925">
                <text:p>0.0050829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3798687">
                <text:p>-0.00379868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533996">
                <text:p>0.0153399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4823029">
                <text:p>0.00482302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680956">
                <text:p>-0.006809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09980314">
                <text:p>-0.00998031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1034443">
                <text:p>-0.00103444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7866255">
                <text:p>0.00786625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8830278">
                <text:p>-0.00883027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255185">
                <text:p>-0.0125518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2695173">
                <text:p>-0.00269517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2309568">
                <text:p>0.00230956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8831837">
                <text:p>-0.00883183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6982365">
                <text:p>-0.00698236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4748955">
                <text:p>0.00474895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22906">
                <text:p>0.0229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4482678">
                <text:p>-0.00448267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9399201">
                <text:p>-0.00939920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7474501">
                <text:p>-0.00747450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6478429">
                <text:p>0.0647842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0.0002626426">
                <text:p>0.000262642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3007671">
                <text:p>-0.00300767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7445075">
                <text:p>0.00744507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3496184">
                <text:p>0.0349618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0.0004857725">
                <text:p>0.00048577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730273">
                <text:p>-0.0173027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23087">
                <text:p>0.02308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200921">
                <text:p>0.0120092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3159826">
                <text:p>-0.00315982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1365495">
                <text:p>-0.00136549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5117087">
                <text:p>0.00511708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-0.0009084285">
                <text:p>-0.000908428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0981236">
                <text:p>0.00098123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834373">
                <text:p>0.0183437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1680461">
                <text:p>0.00168046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6177725">
                <text:p>0.0061777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115861">
                <text:p>-0.0111586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1516136">
                <text:p>0.00151613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9989043">
                <text:p>0.00998904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6097668">
                <text:p>-0.00609766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0.000778451">
                <text:p>0.0007784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2495906">
                <text:p>0.0249590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2626858">
                <text:p>0.00262685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270978">
                <text:p>-0.0027097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0.0006424785">
                <text:p>0.000642478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2139116">
                <text:p>-0.00213911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9027173">
                <text:p>0.00902717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4579536">
                <text:p>0.00457953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4561988">
                <text:p>-0.00456198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0.0001943705">
                <text:p>0.00019437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4459871">
                <text:p>0.00445987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5685845">
                <text:p>-0.00568584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9751337">
                <text:p>-0.00975133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38061">
                <text:p>0.003806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4013503">
                <text:p>-0.00401350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4858195">
                <text:p>0.00485819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904862">
                <text:p>0.0290486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3519382">
                <text:p>-0.00351938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1950945">
                <text:p>0.00195094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4491337">
                <text:p>-0.00449133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2037376">
                <text:p>-0.00203737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5145165">
                <text:p>0.00514516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8174438">
                <text:p>0.00817443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3085018">
                <text:p>-0.00308501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09568713">
                <text:p>-0.00956871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681051">
                <text:p>0.006810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0.0001560785">
                <text:p>0.000156078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6150527">
                <text:p>-0.00615052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2667378">
                <text:p>0.00266737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1620616">
                <text:p>0.0016206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5528647">
                <text:p>0.00552864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3580776">
                <text:p>-0.00358077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0.0006953733">
                <text:p>0.00069537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6074301">
                <text:p>0.00607430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4931713">
                <text:p>0.00493171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4001331">
                <text:p>-0.00400133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2909261">
                <text:p>0.00290926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486097">
                <text:p>0.0148609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3147369">
                <text:p>-0.00314736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06692414">
                <text:p>-0.000669241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2214092">
                <text:p>-0.00221409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617464">
                <text:p>0.016174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3087183">
                <text:p>0.00308718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4921793">
                <text:p>0.00492179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1044551">
                <text:p>0.0104455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1761496">
                <text:p>0.00176149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4367584">
                <text:p>0.00436758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5429347">
                <text:p>-0.00542934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8024498">
                <text:p>-0.00802449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5860595">
                <text:p>-0.0058605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415882">
                <text:p>0.0141588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7255181">
                <text:p>-0.00725518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07591805">
                <text:p>-0.000759180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740466">
                <text:p>0.0074046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1236381">
                <text:p>0.0123638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1227089">
                <text:p>0.0122708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7889478">
                <text:p>-0.00788947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1053478">
                <text:p>-0.00105347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1169297">
                <text:p>-0.00116929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111056">
                <text:p>-0.0111105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0.001640892">
                <text:p>0.00164089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675487">
                <text:p>0.0167548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2482431">
                <text:p>0.00248243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1167992">
                <text:p>0.0116799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017919">
                <text:p>-0.0101791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7956258">
                <text:p>0.00795625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3272636">
                <text:p>-0.00327263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1247425">
                <text:p>-0.0012474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309499">
                <text:p>-0.0130949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7024756">
                <text:p>0.00702475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4482392">
                <text:p>0.00448239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0.001614397">
                <text:p>0.00161439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168096">
                <text:p>-0.0116809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1018297">
                <text:p>0.0101829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5865435">
                <text:p>-0.00586543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0.0002753199">
                <text:p>0.000275319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37867">
                <text:p>-0.01378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0.001177888">
                <text:p>0.00117788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374073">
                <text:p>0.0137407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3464723">
                <text:p>0.00346472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251446">
                <text:p>-0.012514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8919661">
                <text:p>0.00891966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119448">
                <text:p>0.011944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6332876">
                <text:p>-0.00633287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1413651">
                <text:p>-0.00141365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3504294">
                <text:p>0.00350429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9523062">
                <text:p>0.00952306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103679">
                <text:p>-0.010367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4422859">
                <text:p>0.00442285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1047507">
                <text:p>0.0104750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7306028">
                <text:p>0.00730602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1168591">
                <text:p>0.011685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6010914">
                <text:p>-0.00601091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193989">
                <text:p>-0.0019398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7758139">
                <text:p>0.00775813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09994039">
                <text:p>-0.00999403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2584289">
                <text:p>-0.00258428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829175">
                <text:p>0.0182917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6458031">
                <text:p>-0.00645803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2630082">
                <text:p>-0.0026300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2020084">
                <text:p>-0.00202008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2923202">
                <text:p>0.00292320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1514141">
                <text:p>-0.00151414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060621">
                <text:p>-0.0106062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542016">
                <text:p>-0.0154201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8605748">
                <text:p>0.0086057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1049097">
                <text:p>0.0104909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5466034">
                <text:p>-0.00546603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1628097">
                <text:p>-0.00162809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1134593">
                <text:p>0.0113459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329283">
                <text:p>0.0132928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6626157">
                <text:p>-0.00662615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4933544">
                <text:p>-0.00493354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9404111">
                <text:p>0.00940411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9914572">
                <text:p>0.00991457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9564474">
                <text:p>-0.00956447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019221">
                <text:p>-0.0101922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107925">
                <text:p>0.0110792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6236308">
                <text:p>-0.000623630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5881806">
                <text:p>-0.00588180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4115277">
                <text:p>-0.00411527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5196246">
                <text:p>-0.0051962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9686385">
                <text:p>0.00968638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5081215">
                <text:p>-0.00508121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456707">
                <text:p>-0.0145670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749787">
                <text:p>0.0174978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0.0008680273">
                <text:p>0.000868027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080134">
                <text:p>-0.0108013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1089906">
                <text:p>0.0108990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4627322">
                <text:p>0.0046273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3435747">
                <text:p>0.00343574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331454">
                <text:p>-0.0133145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2003654">
                <text:p>0.0200365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1058417">
                <text:p>0.0105841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378927">
                <text:p>0.0137892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01300127">
                <text:p>-0.000130012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2743254">
                <text:p>-0.00274325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8562189">
                <text:p>0.00856218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517137">
                <text:p>0.0151713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1318582">
                <text:p>0.00131858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8797515">
                <text:p>0.00879751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801253">
                <text:p>0.0180125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6350829">
                <text:p>-0.00635082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04709222">
                <text:p>-0.000470922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18185">
                <text:p>0.011818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802987">
                <text:p>0.0380298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1320811">
                <text:p>0.0132081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7199321">
                <text:p>-0.00719932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418081">
                <text:p>0.0041808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1282765">
                <text:p>-0.00128276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7885979">
                <text:p>0.0078859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5390568">
                <text:p>-0.00539056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9044006">
                <text:p>0.00904400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4023711">
                <text:p>0.0402371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66474">
                <text:p>0.016647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127167">
                <text:p>-0.0112716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3362261">
                <text:p>-0.00336226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95173">
                <text:p>0.0109517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1837424">
                <text:p>-0.00183742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9393147">
                <text:p>0.00939314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465532">
                <text:p>0.014655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0.0005556766">
                <text:p>0.000555676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102753">
                <text:p>-0.0110275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07305147">
                <text:p>-0.000730514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7332125">
                <text:p>0.00733212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06465406">
                <text:p>-0.000646540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09378465">
                <text:p>-0.00937846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9056478">
                <text:p>0.00905647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2981206">
                <text:p>0.00298120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8345309">
                <text:p>0.00834530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2463266">
                <text:p>-0.00246326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960665">
                <text:p>0.0059606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08607772">
                <text:p>0.000860777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1148298">
                <text:p>0.0114829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03273914">
                <text:p>-0.000327391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2680885">
                <text:p>0.00268088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330966">
                <text:p>0.0133096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7787104">
                <text:p>-0.00778710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5416005">
                <text:p>-0.00541600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7315495">
                <text:p>0.00731549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5804015">
                <text:p>0.00580401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7914617">
                <text:p>-0.00791461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612463">
                <text:p>0.0161246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8041278">
                <text:p>0.00804127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5684868">
                <text:p>0.00568486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06500385">
                <text:p>-0.000650038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143471">
                <text:p>-0.0114347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1757558">
                <text:p>0.00175755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452245">
                <text:p>-0.0045224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5987402">
                <text:p>-0.00598740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1004842">
                <text:p>-0.0100484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6673004">
                <text:p>0.00667300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4806084">
                <text:p>-0.0048060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2222259">
                <text:p>-0.00222225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7581925">
                <text:p>-0.00758192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3360444">
                <text:p>0.00336044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55217">
                <text:p>0.015521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6785748">
                <text:p>-0.00678574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405844">
                <text:p>-0.0140584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868077">
                <text:p>-0.0086807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181263">
                <text:p>0.0018126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3445346">
                <text:p>-0.00344534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7218873">
                <text:p>-0.00721887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411685">
                <text:p>0.0041168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5159718">
                <text:p>0.00515971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1416913">
                <text:p>-0.00141691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1202353">
                <text:p>-0.0120235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775654">
                <text:p>0.0177565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2802034">
                <text:p>-0.00280203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305587">
                <text:p>-0.0130558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5494202">
                <text:p>0.00549420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696781">
                <text:p>0.0269678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1555943">
                <text:p>-0.00155594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5629478">
                <text:p>-0.00562947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1015737">
                <text:p>0.0101573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5162888">
                <text:p>-0.00516288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2205254">
                <text:p>0.00220525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6129017">
                <text:p>-0.00612901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9007064">
                <text:p>-0.00900706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2692715">
                <text:p>0.00269271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1127087">
                <text:p>-0.0112708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6034648">
                <text:p>-0.00603464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8593899">
                <text:p>-0.00859389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1249611">
                <text:p>-0.00124961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1072848">
                <text:p>0.0107284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1903573">
                <text:p>-0.00190357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3533121">
                <text:p>-0.00353312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-0.00160096">
                <text:p>-0.0016009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7860114">
                <text:p>-0.00786011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7268132">
                <text:p>-0.0072681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5081656">
                <text:p>-0.00508165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727837">
                <text:p>0.0272783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1722104">
                <text:p>-0.00172210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4389519">
                <text:p>0.00438951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1161363">
                <text:p>0.0116136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9913273">
                <text:p>0.00991327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1012829">
                <text:p>0.0101282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166695">
                <text:p>0.0016669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5095757">
                <text:p>-0.00509575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3531478">
                <text:p>-0.00353147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5376643">
                <text:p>0.00537664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1120844">
                <text:p>-0.0112084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5447721">
                <text:p>0.00544772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5302103">
                <text:p>0.00530210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-0.0008070478">
                <text:p>-0.000807047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103173">
                <text:p>-0.010317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124555">
                <text:p>0.012455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727992">
                <text:p>0.0472799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05105903">
                <text:p>0.000510590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998499">
                <text:p>0.019984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217079">
                <text:p>-0.0121707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7118985">
                <text:p>0.00711898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4654763">
                <text:p>0.00465476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896883">
                <text:p>0.0189688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0692629">
                <text:p>-0.00069262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166412">
                <text:p>0.0216641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584775">
                <text:p>0.0158477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6461668">
                <text:p>0.00646166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9410075">
                <text:p>-0.00941007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295366">
                <text:p>0.0029536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1165644">
                <text:p>0.00116564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418184">
                <text:p>-0.0141818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1020125">
                <text:p>-0.0102012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8559383">
                <text:p>0.00855938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225068">
                <text:p>-0.0022506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7745925">
                <text:p>-0.00774592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202261">
                <text:p>-0.0120226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417759">
                <text:p>0.0141775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5272791">
                <text:p>0.0052727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603144">
                <text:p>-0.0060314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2376282">
                <text:p>-0.00237628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695675">
                <text:p>0.0169567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863798">
                <text:p>0.0286379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432351">
                <text:p>-0.0043235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3405517">
                <text:p>0.00340551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2572019">
                <text:p>0.00257201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1999593">
                <text:p>0.0199959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439672">
                <text:p>0.0243967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307476">
                <text:p>-0.0130747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59931">
                <text:p>0.005993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5763001">
                <text:p>-0.00576300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8816184">
                <text:p>-0.00881618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690746">
                <text:p>-0.0069074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4070004">
                <text:p>0.00407000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7933234">
                <text:p>-0.00793323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5568914">
                <text:p>-0.00556891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2386596">
                <text:p>0.00238659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821295">
                <text:p>0.0082129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1285373">
                <text:p>0.00128537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1120369">
                <text:p>-0.0112036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212582">
                <text:p>-0.0121258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06637002">
                <text:p>0.000663700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7690353">
                <text:p>0.00769035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827155">
                <text:p>0.0082715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370124">
                <text:p>-0.0137012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594366">
                <text:p>0.0159436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-0.0004299917">
                <text:p>-0.000429991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8953276">
                <text:p>-0.00895327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6185401">
                <text:p>-0.00618540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702487">
                <text:p>0.0170248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1296054">
                <text:p>0.00129605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447626">
                <text:p>-0.0144762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8087171">
                <text:p>-0.00808717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631128">
                <text:p>0.0163112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9352352">
                <text:p>-0.00935235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5168575">
                <text:p>-0.00516857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387424">
                <text:p>-0.0138742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7234693">
                <text:p>-0.00723469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120097">
                <text:p>0.0112009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448973">
                <text:p>-0.0144897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5777829">
                <text:p>-0.00577782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2502803">
                <text:p>0.00250280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295575">
                <text:p>-0.0129557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6256049">
                <text:p>-0.00625604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213079">
                <text:p>0.0121307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2879365">
                <text:p>-0.00287936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4445949">
                <text:p>-0.00444594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295692">
                <text:p>-0.0129569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2776669">
                <text:p>-0.00277666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2158478">
                <text:p>0.0215847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9522028">
                <text:p>-0.00952202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7037151">
                <text:p>-0.00703715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1393197">
                <text:p>0.00139319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04632969">
                <text:p>0.000463296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666703">
                <text:p>-0.0066670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4433153">
                <text:p>-0.00443315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2244215">
                <text:p>0.00224421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440515">
                <text:p>0.0144051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5669332">
                <text:p>-0.00566933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5779873">
                <text:p>-0.00577987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7200792">
                <text:p>0.00720079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4507844">
                <text:p>-0.00450784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112115">
                <text:p>-0.011211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6271908">
                <text:p>-0.00627190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0249928">
                <text:p>0.00024992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3138674">
                <text:p>0.00313867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4228453">
                <text:p>0.00422845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1200536">
                <text:p>-0.0120053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6744131">
                <text:p>-0.00674413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2633101">
                <text:p>0.00263310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1111473">
                <text:p>-0.0111147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536892">
                <text:p>-0.0053689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4063418">
                <text:p>-0.00406341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592656">
                <text:p>0.0159265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9294566">
                <text:p>-0.00929456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3728526">
                <text:p>-0.00372852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254109">
                <text:p>0.0125410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774836">
                <text:p>0.0177483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7688276">
                <text:p>-0.00768827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3172314">
                <text:p>0.00317231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6559718">
                <text:p>-0.00655971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8014635">
                <text:p>0.00801463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632139">
                <text:p>-0.0163213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-0.0002600965">
                <text:p>-0.000260096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4032435">
                <text:p>0.00403243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09739584">
                <text:p>0.00973958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1985613">
                <text:p>-0.00198561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09480893">
                <text:p>-0.00948089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1413526">
                <text:p>0.00141352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719656">
                <text:p>0.0171965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1242852">
                <text:p>-0.0124285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641219">
                <text:p>-0.0164121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08102003">
                <text:p>0.00810200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-0.001340005">
                <text:p>-0.00134000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3452265">
                <text:p>-0.00345226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112483">
                <text:p>-0.011248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-0.002951089">
                <text:p>-0.00295108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2886655">
                <text:p>0.00288665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1481183">
                <text:p>-0.0148118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5686595">
                <text:p>-0.00568659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249069">
                <text:p>0.0124906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005904955">
                <text:p>0.000590495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8092466">
                <text:p>0.00809246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8384626">
                <text:p>-0.00838462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-0.00118805">
                <text:p>-0.0011880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50369">
                <text:p>0.025036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1231829">
                <text:p>-0.012318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09502748">
                <text:p>-0.00950274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2233918">
                <text:p>0.0223391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-0.00016399">
                <text:p>-0.0001639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-0.002572274">
                <text:p>-0.00257227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-0.002121227">
                <text:p>-0.00212122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4566262">
                <text:p>0.00456626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01290703">
                <text:p>0.00129070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1878592">
                <text:p>0.00187859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4705566">
                <text:p>-0.00470556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0989021">
                <text:p>0.0098902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4693314">
                <text:p>-0.00469331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1194415">
                <text:p>0.0119441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2054184">
                <text:p>0.0020541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07006934">
                <text:p>0.00700693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6033739">
                <text:p>0.00603373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8335578">
                <text:p>0.00833557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1039769">
                <text:p>-0.0103976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3718671">
                <text:p>0.00371867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18495">
                <text:p>0.01849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549768">
                <text:p>-0.0054976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1276676">
                <text:p>-0.0127667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05992028">
                <text:p>0.00599202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-0.003142333">
                <text:p>-0.00314233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139539">
                <text:p>-0.013953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1385711">
                <text:p>-0.0138571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07049534">
                <text:p>0.00704953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-0.004071051">
                <text:p>-0.00407105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-0.001982274">
                <text:p>-0.00198227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08822861">
                <text:p>-0.00882286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3786579">
                <text:p>0.00378657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3336995">
                <text:p>0.00333699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152899">
                <text:p>-0.015289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6936734">
                <text:p>-0.00693673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06741686">
                <text:p>0.00674168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-0.0007337802">
                <text:p>-0.000733780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1161561">
                <text:p>-0.0116156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266882">
                <text:p>0.0126688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05240425">
                <text:p>0.00524042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1428747">
                <text:p>-0.0142874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-0.00176983">
                <text:p>-0.0017698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-0.005640293">
                <text:p>-0.00564029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09221093">
                <text:p>0.00922109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0.0002413121">
                <text:p>0.000241312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-0.004298794">
                <text:p>-0.00429879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004705387">
                <text:p>0.000470538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1064023">
                <text:p>0.0106402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-0.004523508">
                <text:p>-0.00452350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1111327">
                <text:p>-0.0111132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09895104">
                <text:p>0.00989510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-0.0007644228">
                <text:p>-0.000764422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-0.004754398">
                <text:p>-0.00475439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1327563">
                <text:p>-0.0132756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03882231">
                <text:p>0.00388223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03605256">
                <text:p>0.00360525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1248209">
                <text:p>-0.0124820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2456932">
                <text:p>0.00245693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0105258">
                <text:p>0.0010525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01340793">
                <text:p>0.00134079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-0.005382867">
                <text:p>-0.00538286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09566407">
                <text:p>-0.00956640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1128169">
                <text:p>0.0112816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-0.005565188">
                <text:p>-0.00556518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-0.008201917">
                <text:p>-0.00820191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138256">
                <text:p>0.0113825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03420405">
                <text:p>0.00342040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01002757">
                <text:p>0.00100275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1202038">
                <text:p>-0.0120203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-0.005708778">
                <text:p>-0.00570877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05475484">
                <text:p>0.00547548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01481891">
                <text:p>0.00148189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-0.001029852">
                <text:p>-0.00102985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-0.005094218">
                <text:p>-0.00509421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-0.00320209">
                <text:p>-0.0032020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-0.006758494">
                <text:p>-0.00675849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-0.005676284">
                <text:p>-0.00567628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-0.003802985">
                <text:p>-0.00380298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06035342">
                <text:p>0.00603534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-0.01247932">
                <text:p>-0.0124793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-0.0117364">
                <text:p>-0.011736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03169661">
                <text:p>0.00316966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07822414">
                <text:p>0.00782241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-0.01384042">
                <text:p>-0.0138404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05443337">
                <text:p>0.0054433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-0.005487492">
                <text:p>-0.00548749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268475">
                <text:p>0.026847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-0.001618534">
                <text:p>-0.00161853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1047812">
                <text:p>0.0104781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-0.005618518">
                <text:p>-0.00561851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-0.007724022">
                <text:p>-0.00772402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1403358">
                <text:p>0.0140335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-0.01059566">
                <text:p>-0.0105956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0839426">
                <text:p>0.0083942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04758117">
                <text:p>0.00475811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-0.004270576">
                <text:p>-0.00427057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02974911">
                <text:p>0.00297491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2303898">
                <text:p>0.0230389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0334882">
                <text:p>0.0033488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-0.003207507">
                <text:p>-0.00320750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-0.01022456">
                <text:p>-0.0102245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04509707">
                <text:p>0.00450970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06568792">
                <text:p>0.00656879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-0.0001189829">
                <text:p>-0.000118982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-0.01142767">
                <text:p>-0.0114276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06375355">
                <text:p>0.00637535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1715178">
                <text:p>0.0171517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-0.003853926">
                <text:p>-0.00385392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-0.001769415">
                <text:p>-0.00176941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1569459">
                <text:p>0.0156945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-0.001085129">
                <text:p>-0.00108512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03768545">
                <text:p>0.00376854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-0.01329718">
                <text:p>-0.0132971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02956322">
                <text:p>0.00295632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3039987">
                <text:p>0.0303998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-0.007534608">
                <text:p>-0.00753460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-0.006465846">
                <text:p>-0.00646584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08018639">
                <text:p>0.00801863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-0.002232938">
                <text:p>-0.00223293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-0.008558507">
                <text:p>-0.00855850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-0.01545801">
                <text:p>-0.0154580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0.0002051565">
                <text:p>0.000205156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28137">
                <text:p>0.02813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-0.003686848">
                <text:p>-0.00368684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02544442">
                <text:p>0.00254444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02096447">
                <text:p>0.00209644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0001699427">
                <text:p>0.000169942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-0.01042648">
                <text:p>-0.0104264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-0.01148718">
                <text:p>-0.0114871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0.0002398591">
                <text:p>0.000239859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02211851">
                <text:p>0.00221185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-0.01386375">
                <text:p>-0.0138637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-0.004202218">
                <text:p>-0.00420221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07808692">
                <text:p>0.00780869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007393339">
                <text:p>0.000739333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-0.002133653">
                <text:p>-0.00213365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07248203">
                <text:p>0.0724820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-0.001130421">
                <text:p>-0.00113042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-0.002333323">
                <text:p>-0.00233332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03503681">
                <text:p>0.00350368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-0.01290723">
                <text:p>-0.0129072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001745893">
                <text:p>0.00174589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-0.004587064">
                <text:p>-0.00458706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-0.009796116">
                <text:p>-0.0097961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001043997">
                <text:p>0.00104399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0470047">
                <text:p>0.0047004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-0.001110711">
                <text:p>-0.00111071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-0.006354652">
                <text:p>-0.00635465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-0.009809467">
                <text:p>-0.00980946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-0.003753035">
                <text:p>-0.00375303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06823296">
                <text:p>0.00682329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-0.01073166">
                <text:p>-0.0107316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-0.007308828">
                <text:p>-0.00730882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-0.0002432817">
                <text:p>-0.000243281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-0.00394796">
                <text:p>-0.0039479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-0.0002729393">
                <text:p>-0.000272939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-0.01309469">
                <text:p>-0.0130946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-0.001544889">
                <text:p>-0.00154488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05366613">
                <text:p>0.00536661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06045231">
                <text:p>0.00604523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-0.008628792">
                <text:p>-0.00862879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-0.003435952">
                <text:p>-0.00343595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-0.0002261848">
                <text:p>-0.000226184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-0.001948172">
                <text:p>-0.00194817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-0.001695826">
                <text:p>-0.00169582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008988235">
                <text:p>0.00898823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02515992">
                <text:p>0.0251599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0.0001432066">
                <text:p>0.000143206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-0.005362106">
                <text:p>-0.00536210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002529088">
                <text:p>0.00252908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01155986">
                <text:p>0.0115598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-0.007836813">
                <text:p>-0.00783681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-0.006175447">
                <text:p>-0.00617544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001856226">
                <text:p>0.00185622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0004978046">
                <text:p>0.000497804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002336105">
                <text:p>0.00233610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-0.004215667">
                <text:p>-0.00421566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009131982">
                <text:p>0.00913198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001302842">
                <text:p>0.00130284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001959745">
                <text:p>0.00195974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005890943">
                <text:p>0.00589094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01043061">
                <text:p>0.0104306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-0.001674288">
                <text:p>-0.00167428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-0.005256494">
                <text:p>-0.00525649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-0.01343445">
                <text:p>-0.0134344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-0.006094592">
                <text:p>-0.00609459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-0.0004295733">
                <text:p>-0.000429573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-0.01289291">
                <text:p>-0.0128929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-0.008949789">
                <text:p>-0.00894978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-0.001562181">
                <text:p>-0.00156218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-0.001971894">
                <text:p>-0.00197189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-0.005483071">
                <text:p>-0.00548307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0.0008154187">
                <text:p>0.000815418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00138406">
                <text:p>0.0013840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-0.006007744">
                <text:p>-0.00600774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-0.007636512">
                <text:p>-0.00763651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-0.008816594">
                <text:p>-0.00881659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01973894">
                <text:p>0.0197389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005184308">
                <text:p>0.00518430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-0.005648738">
                <text:p>-0.00564873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-0.00117163">
                <text:p>-0.0011716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0154848">
                <text:p>0.015484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-0.003498762">
                <text:p>-0.00349876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-0.002751131">
                <text:p>-0.00275113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-0.005767151">
                <text:p>-0.00576715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008420788">
                <text:p>0.00842078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004104016">
                <text:p>0.00410401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-0.001335578">
                <text:p>-0.00133557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-0.009495073">
                <text:p>-0.00949507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-0.003512301">
                <text:p>-0.00351230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005319875">
                <text:p>0.00531987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-0.003278455">
                <text:p>-0.00327845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-0.01155267">
                <text:p>-0.0115526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00562798">
                <text:p>0.0056279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002856316">
                <text:p>0.00285631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-0.01165142">
                <text:p>-0.0116514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01170868">
                <text:p>0.0117086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-0.002451939">
                <text:p>-0.00245193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-0.005437325">
                <text:p>-0.00543732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-0.01101993">
                <text:p>-0.0110199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-0.0120312">
                <text:p>-0.012031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-0.003553326">
                <text:p>-0.00355332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-0.005704073">
                <text:p>-0.00570407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-0.001512957">
                <text:p>-0.00151295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-0.002101989">
                <text:p>-0.00210198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-0.004265097">
                <text:p>-0.00426509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005838192">
                <text:p>0.00583819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05707457">
                <text:p>0.0570745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0.0001502091">
                <text:p>0.000150209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01184404">
                <text:p>0.0118440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-0.001454211">
                <text:p>-0.00145421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02367168">
                <text:p>0.0236716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-0.009678368">
                <text:p>-0.00967836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007350139">
                <text:p>0.00735013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006267709">
                <text:p>0.00626770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-0.00870189">
                <text:p>-0.0087018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-0.009933077">
                <text:p>-0.00993307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01149742">
                <text:p>0.0114974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006252453">
                <text:p>0.00625245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-0.003758583">
                <text:p>-0.00375858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00827163">
                <text:p>0.008271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006331507">
                <text:p>0.00633150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008910669">
                <text:p>0.00891066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01257429">
                <text:p>0.0125742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-0.00187903">
                <text:p>-0.0018790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001772011">
                <text:p>0.00177201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009304986">
                <text:p>0.00930498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-0.006008759">
                <text:p>-0.00600875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003789159">
                <text:p>0.00378915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001217028">
                <text:p>0.00121702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006645841">
                <text:p>0.00664584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-0.002705616">
                <text:p>-0.00270561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-0.01118211">
                <text:p>-0.0111821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-0.0001526149">
                <text:p>-0.000152614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007380252">
                <text:p>0.00738025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0.002239502">
                <text:p>0.00223950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00477806">
                <text:p>0.0047780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-0.0002205909">
                <text:p>-0.000220590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01644821">
                <text:p>0.0164482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0.004143928">
                <text:p>0.00414392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004983602">
                <text:p>0.00498360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-0.002567333">
                <text:p>-0.00256733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-0.005054974">
                <text:p>-0.00505497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0.0003661001">
                <text:p>0.000366100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-0.0006920744">
                <text:p>-0.000692074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01601892">
                <text:p>0.0160189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03686165">
                <text:p>0.0368616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-0.003753579">
                <text:p>-0.00375357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003034852">
                <text:p>0.00303485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008418848">
                <text:p>0.00841884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-0.003685276">
                <text:p>-0.00368527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005116888">
                <text:p>0.00511688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01714326">
                <text:p>0.0171432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003656891">
                <text:p>0.00365689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007396037">
                <text:p>0.00739603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004691509">
                <text:p>0.00469150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-0.001229297">
                <text:p>-0.00122929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009092778">
                <text:p>0.00909277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01783656">
                <text:p>0.0178365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009293669">
                <text:p>0.00929366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02534714">
                <text:p>0.0253471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01137444">
                <text:p>0.0113744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-0.005233513">
                <text:p>-0.00523351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-0.007160991">
                <text:p>-0.00716099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006163449">
                <text:p>0.00616344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0.002113598">
                <text:p>0.00211359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009353141">
                <text:p>0.00935314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0.001403076">
                <text:p>0.00140307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00781153">
                <text:p>0.0078115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006300692">
                <text:p>0.00630069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0.0008318542">
                <text:p>0.000831854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-0.0021664">
                <text:p>-0.002166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02113676">
                <text:p>0.0211367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0.0004414074">
                <text:p>0.000441407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0.0057001">
                <text:p>0.005700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-0.00195797">
                <text:p>-0.0019579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0.002003299">
                <text:p>0.00200329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-0.0006587965">
                <text:p>-0.000658796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-0.002807438">
                <text:p>-0.00280743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0.002205692">
                <text:p>0.00220569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02969019">
                <text:p>0.0296901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008534438">
                <text:p>0.00853443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-0.003845926">
                <text:p>-0.00384592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008013161">
                <text:p>0.00801316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01348215">
                <text:p>0.0134821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-0.0004816984">
                <text:p>-0.000481698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-0.0002500833">
                <text:p>-0.000250083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0.003828171">
                <text:p>0.00382817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-0.0003427877">
                <text:p>-0.000342787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01912981">
                <text:p>0.0191298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009127853">
                <text:p>0.00912785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04990631">
                <text:p>0.0499063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01732375">
                <text:p>0.0173237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007620248">
                <text:p>0.00762024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0.002191138">
                <text:p>0.00219113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009367174">
                <text:p>0.00936717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007101455">
                <text:p>0.00710145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02568568">
                <text:p>0.0256856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-0.002614335">
                <text:p>-0.00261433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0254284">
                <text:p>0.025428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01510106">
                <text:p>0.0151010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01219823">
                <text:p>0.0121982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01086597">
                <text:p>0.0108659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01016253">
                <text:p>0.0101625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0.005492626">
                <text:p>0.00549262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0.001496401">
                <text:p>0.00149640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-0.001624229">
                <text:p>-0.00162422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01732896">
                <text:p>0.0173289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01246503">
                <text:p>0.0124650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01556308">
                <text:p>0.0155630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-0.001168943">
                <text:p>-0.00116894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03135891">
                <text:p>0.0313589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01674072">
                <text:p>0.0167407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0.00118162">
                <text:p>0.0011816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0.003293816">
                <text:p>0.00329381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01198738">
                <text:p>0.0119873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03243257">
                <text:p>0.0324325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0.005528191">
                <text:p>0.00552819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0.007784511">
                <text:p>0.00778451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01803487">
                <text:p>0.0180348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0175898">
                <text:p>0.017589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0.007511289">
                <text:p>0.00751128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-0.001601264">
                <text:p>-0.00160126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0.010559">
                <text:p>0.01055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0.005757814">
                <text:p>0.00575781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0.008035905">
                <text:p>0.00803590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02804368">
                <text:p>0.0280436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0.006324335">
                <text:p>0.00632433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02674546">
                <text:p>0.0267454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0.007367063">
                <text:p>0.00736706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02256046">
                <text:p>0.0225604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02735878">
                <text:p>0.0273587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01593241">
                <text:p>0.0159324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0343044">
                <text:p>0.034304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0.006308877">
                <text:p>0.00630887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01874691">
                <text:p>0.0187469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0.01450803">
                <text:p>0.0145080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0.00779257">
                <text:p>0.0077925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0.002724735">
                <text:p>0.00272473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02335756">
                <text:p>0.0233575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02113174">
                <text:p>0.0211317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0.008753904">
                <text:p>0.00875390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0.01568612">
                <text:p>0.0156861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02853003">
                <text:p>0.0285300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0.01014435">
                <text:p>0.0101443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03918866">
                <text:p>0.0391886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0327541">
                <text:p>0.032754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02323453">
                <text:p>0.0232345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02018334">
                <text:p>0.0201833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0.01574542">
                <text:p>0.0157454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0.006313147">
                <text:p>0.00631314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02602178">
                <text:p>0.0260217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03472807">
                <text:p>0.0347280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0.01768803">
                <text:p>0.0176880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02541195">
                <text:p>0.0254119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02275656">
                <text:p>0.0227565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02246586">
                <text:p>0.0224658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0.02425533">
                <text:p>0.0242553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02485487">
                <text:p>0.0248548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02561773">
                <text:p>0.0256177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0.02420881">
                <text:p>0.0242088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0.01669144">
                <text:p>0.0166914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0.01453295">
                <text:p>0.0145329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02858102">
                <text:p>0.0285810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08234939">
                <text:p>0.0823493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03595969">
                <text:p>0.0359596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02975152">
                <text:p>0.0297515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03096557">
                <text:p>0.0309655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0.02661133">
                <text:p>0.0266113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03192821">
                <text:p>0.0319282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03363354">
                <text:p>0.0336335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0.0261422">
                <text:p>0.026142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0.02948733">
                <text:p>0.0294873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0.03182244">
                <text:p>0.0318224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0.02735992">
                <text:p>0.0273599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03578607">
                <text:p>0.0357860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06190015">
                <text:p>0.0619001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03901554">
                <text:p>0.0390155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05522048">
                <text:p>0.0552204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0.02726011">
                <text:p>0.0272601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0.03277037">
                <text:p>0.0327703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03669378">
                <text:p>0.0366937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0.02630247">
                <text:p>0.0263024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04591373">
                <text:p>0.0459137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0.03285076">
                <text:p>0.0328507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0.03329666">
                <text:p>0.0332966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06612547">
                <text:p>0.0661254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0.03859709">
                <text:p>0.0385970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04738176">
                <text:p>0.0473817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04818615">
                <text:p>0.0481861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0.03194343">
                <text:p>0.0319434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05768825">
                <text:p>0.0576882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0528946">
                <text:p>0.052894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0.04396499">
                <text:p>0.0439649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05129983">
                <text:p>0.0512998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0.04155514">
                <text:p>0.0415551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0.04280908">
                <text:p>0.0428090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05598491">
                <text:p>0.0559849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0.03836733">
                <text:p>0.0383673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0.04718386">
                <text:p>0.0471838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0.04415603">
                <text:p>0.0441560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0.04208326">
                <text:p>0.0420832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05692784">
                <text:p>0.0569278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05112929">
                <text:p>0.0511292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05464878">
                <text:p>0.0546487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0.04319411">
                <text:p>0.0431941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0.05005794">
                <text:p>0.0500579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0.05128166">
                <text:p>0.051281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06273256">
                <text:p>0.0627325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0682509">
                <text:p>0.068250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06704109">
                <text:p>0.0670410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0.05747237">
                <text:p>0.0574723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0.05561208">
                <text:p>0.0556120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0.047332">
                <text:p>0.04733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0.05057722">
                <text:p>0.0505772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0.05946518">
                <text:p>0.0594651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06355347">
                <text:p>0.0635534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0859303">
                <text:p>0.085930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0.06354854">
                <text:p>0.0635485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0675839">
                <text:p>0.06758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0.06728339">
                <text:p>0.0672833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07114371">
                <text:p>0.0711437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0.06499747">
                <text:p>0.0649974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07199244">
                <text:p>0.0719924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0.06794258">
                <text:p>0.0679425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0742823">
                <text:p>0.074282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0.05950525">
                <text:p>0.0595052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1104319">
                <text:p>0.110431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07633834">
                <text:p>0.0763383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1081859">
                <text:p>0.108185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07838279">
                <text:p>0.0783827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1130301">
                <text:p>0.113030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0.07831655">
                <text:p>0.0783165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08572719">
                <text:p>0.0857271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0.07095353">
                <text:p>0.0709535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09095997">
                <text:p>0.0909599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08542531">
                <text:p>0.0854253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0.07632828">
                <text:p>0.0763282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0852238">
                <text:p>0.085223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0.08552046">
                <text:p>0.0855204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0.08613383">
                <text:p>0.0861338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0.0851592">
                <text:p>0.085159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0.07964536">
                <text:p>0.0796453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09868093">
                <text:p>0.0986809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0.08343426">
                <text:p>0.0834342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0.08381562">
                <text:p>0.0838156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0.09372796">
                <text:p>0.0937279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0.09135192">
                <text:p>0.0913519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1114995">
                <text:p>0.111499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0.09437902">
                <text:p>0.0943790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0.09483626">
                <text:p>0.0948362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0.09080368">
                <text:p>0.0908036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0.101514">
                <text:p>0.10151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1044713">
                <text:p>0.104471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0.1004485">
                <text:p>0.100448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1160041">
                <text:p>0.116004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0.1029383">
                <text:p>0.102938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1091636">
                <text:p>0.109163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1251461">
                <text:p>0.125146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0.108037">
                <text:p>0.10803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0.1003185">
                <text:p>0.100318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115662">
                <text:p>0.11566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1175061">
                <text:p>0.117506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0.1080264">
                <text:p>0.108026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1262037">
                <text:p>0.126203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0.1157652">
                <text:p>0.115765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0.1100434">
                <text:p>0.110043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1286162">
                <text:p>0.128616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0.1182098">
                <text:p>0.118209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1285524">
                <text:p>0.128552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0.1119414">
                <text:p>0.111941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1269075">
                <text:p>0.126907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1319205">
                <text:p>0.131920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0.1191143">
                <text:p>0.119114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1303237">
                <text:p>0.130323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0.1233749">
                <text:p>0.123374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0.1252469">
                <text:p>0.125246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1343121">
                <text:p>0.13431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0.1307886">
                <text:p>0.130788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1357499">
                <text:p>0.135749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143492">
                <text:p>0.14349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0.1285064">
                <text:p>0.128506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1418357">
                <text:p>0.141835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1440031">
                <text:p>0.144003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144861">
                <text:p>0.14486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0.1323145">
                <text:p>0.132314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142777">
                <text:p>0.14277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1483313">
                <text:p>0.148331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1481524">
                <text:p>0.148152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0.131918">
                <text:p>0.13191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0.1479972">
                <text:p>0.147997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1549299">
                <text:p>0.154929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1550905">
                <text:p>0.155090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1528573">
                <text:p>0.152857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1642237">
                <text:p>0.164223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1670818">
                <text:p>0.167081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168786">
                <text:p>0.16878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0.1505555">
                <text:p>0.150555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1619181">
                <text:p>0.161918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1638347">
                <text:p>0.163834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1608249">
                <text:p>0.160824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1625665">
                <text:p>0.162566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1696313">
                <text:p>0.169631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0.1600692">
                <text:p>0.160069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1692462">
                <text:p>0.169246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1711951">
                <text:p>0.171195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1710278">
                <text:p>0.171027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0.1596419">
                <text:p>0.159641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17005">
                <text:p>0.1700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1723327">
                <text:p>0.172332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0.1681991">
                <text:p>0.168199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0.1574775">
                <text:p>0.157477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0.1640026">
                <text:p>0.164002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1811399">
                <text:p>0.181139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0.1647248">
                <text:p>0.164724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1799355">
                <text:p>0.179935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0.1734004">
                <text:p>0.173400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1852111">
                <text:p>0.185211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0.1719266">
                <text:p>0.171926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0.1706844">
                <text:p>0.170684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0.1766878">
                <text:p>0.17668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0.1743507">
                <text:p>0.174350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1875409">
                <text:p>0.187540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0.1794674">
                <text:p>0.179467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185345">
                <text:p>0.18534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2001367">
                <text:p>0.200136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192248">
                <text:p>0.1922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1863303">
                <text:p>0.186330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1939863">
                <text:p>0.193986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0.1756279">
                <text:p>0.175627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190146">
                <text:p>0.19014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0.1829165">
                <text:p>0.182916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0.1894145">
                <text:p>0.189414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2016253">
                <text:p>0.201625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1958716">
                <text:p>0.195871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1922781">
                <text:p>0.192278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1945779">
                <text:p>0.194577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0.1880005">
                <text:p>0.188000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1947089">
                <text:p>0.194708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0.184085">
                <text:p>0.18408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1996209">
                <text:p>0.199620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0.1852346">
                <text:p>0.185234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2114093">
                <text:p>0.211409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0.193326">
                <text:p>0.19332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0.1888947">
                <text:p>0.188894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2018046">
                <text:p>0.201804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0.1914013">
                <text:p>0.1914013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2114694">
                <text:p>0.211469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0.1956882">
                <text:p>0.195688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1993907">
                <text:p>0.199390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2144811">
                <text:p>0.214481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0.1955119">
                <text:p>0.195511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0.1978449">
                <text:p>0.197844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0.1958449">
                <text:p>0.195844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0.1974569">
                <text:p>0.197456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2040734">
                <text:p>0.204073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2216353">
                <text:p>0.221635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0.1945421">
                <text:p>0.194542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2143919">
                <text:p>0.214391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2038603">
                <text:p>0.203860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0.1983472">
                <text:p>0.198347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0.1911169">
                <text:p>0.191116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2036608">
                <text:p>0.203660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0.2004449">
                <text:p>0.200444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223975">
                <text:p>0.22397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2065479">
                <text:p>0.206547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2026988">
                <text:p>0.202698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204663">
                <text:p>0.20466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0.1979932">
                <text:p>0.197993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0.1985714">
                <text:p>0.198571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0.1957706">
                <text:p>0.195770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0.2022732">
                <text:p>0.202273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0.2020824">
                <text:p>0.202082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2052452">
                <text:p>0.205245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2060335">
                <text:p>0.206033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2060251">
                <text:p>0.206025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212365">
                <text:p>0.21236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2095213">
                <text:p>0.209521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0.1972544">
                <text:p>0.197254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2047385">
                <text:p>0.204738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0.1987825">
                <text:p>0.198782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2173899">
                <text:p>0.217389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2182637">
                <text:p>0.218263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2083508">
                <text:p>0.208350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2078362">
                <text:p>0.207836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2027592">
                <text:p>0.202759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2034136">
                <text:p>0.203413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2120033">
                <text:p>0.212003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2046901">
                <text:p>0.204690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0.1990275">
                <text:p>0.199027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2203261">
                <text:p>0.220326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2064151">
                <text:p>0.206415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0.1928314">
                <text:p>0.192831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2054515">
                <text:p>0.205451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0.2014197">
                <text:p>0.201419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2043522">
                <text:p>0.204352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0.1913476">
                <text:p>0.191347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0.1933856">
                <text:p>0.193385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0.1987677">
                <text:p>0.198767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2122436">
                <text:p>0.212243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0.1982549">
                <text:p>0.198254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2034139">
                <text:p>0.203413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2048696">
                <text:p>0.204869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2088783">
                <text:p>0.208878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0.1970634">
                <text:p>0.197063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2033639">
                <text:p>0.203363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2025569">
                <text:p>0.202556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1995887">
                <text:p>0.199588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2065336">
                <text:p>0.206533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0.1895684">
                <text:p>0.189568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2013364">
                <text:p>0.201336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2083593">
                <text:p>0.208359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1970483">
                <text:p>0.197048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2022964">
                <text:p>0.202296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2022893">
                <text:p>0.202289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1962223">
                <text:p>0.196222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0.1897884">
                <text:p>0.189788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2047009">
                <text:p>0.204700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2252304">
                <text:p>0.225230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0.1898334">
                <text:p>0.189833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0.1900406">
                <text:p>0.190040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2023565">
                <text:p>0.202356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1945265">
                <text:p>0.194526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0.1914572">
                <text:p>0.191457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2010221">
                <text:p>0.201022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1907859">
                <text:p>0.190785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2066956">
                <text:p>0.206695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0.1905452">
                <text:p>0.190545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0.1826394">
                <text:p>0.182639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2047598">
                <text:p>0.204759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2097377">
                <text:p>0.209737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0.1869445">
                <text:p>0.186944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201019">
                <text:p>0.20101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1948531">
                <text:p>0.194853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1942512">
                <text:p>0.194251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193075">
                <text:p>0.19307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0.1793585">
                <text:p>0.179358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0.1843999">
                <text:p>0.184399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0.1830928">
                <text:p>0.183092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1909017">
                <text:p>0.190901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2040169">
                <text:p>0.204016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0.1818733">
                <text:p>0.181873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1911373">
                <text:p>0.191137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2029886">
                <text:p>0.202988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0.1789282">
                <text:p>0.178928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0.1786189">
                <text:p>0.178618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1866274">
                <text:p>0.186627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1804134">
                <text:p>0.180413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0.1725968">
                <text:p>0.172596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195783">
                <text:p>0.19578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19145">
                <text:p>0.1914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1835729">
                <text:p>0.183572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1911086">
                <text:p>0.191108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2193043">
                <text:p>0.219304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1827191">
                <text:p>0.182719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1829547">
                <text:p>0.182954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1909337">
                <text:p>0.190933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1852234">
                <text:p>0.185223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0.1708466">
                <text:p>0.170846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1780641">
                <text:p>0.178064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172316">
                <text:p>0.17231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1847899">
                <text:p>0.184789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1783232">
                <text:p>0.178323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1937764">
                <text:p>0.193776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180181">
                <text:p>0.18018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1765148">
                <text:p>0.176514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1795463">
                <text:p>0.179546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1804709">
                <text:p>0.180470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1657679">
                <text:p>0.165767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1954576">
                <text:p>0.195457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1813142">
                <text:p>0.181314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1709688">
                <text:p>0.170968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1797183">
                <text:p>0.179718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1967691">
                <text:p>0.196769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1833201">
                <text:p>0.183320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1758959">
                <text:p>0.1758959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1686518">
                <text:p>0.168651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1861897">
                <text:p>0.186189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1748898">
                <text:p>0.174889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1776739">
                <text:p>0.177673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1687867">
                <text:p>0.168786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1970166">
                <text:p>0.197016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1999181">
                <text:p>0.199918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160623">
                <text:p>0.160623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1654537">
                <text:p>0.165453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1780224">
                <text:p>0.178022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1785413">
                <text:p>0.17854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151677">
                <text:p>0.15167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1718373">
                <text:p>0.171837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1745779">
                <text:p>0.174577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1873713">
                <text:p>0.187371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1517309">
                <text:p>0.151730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1658658">
                <text:p>0.165865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1667742">
                <text:p>0.166774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1733108">
                <text:p>0.173310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1663121">
                <text:p>0.166312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1513406">
                <text:p>0.151340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148182">
                <text:p>0.14818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1567595">
                <text:p>0.156759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1583664">
                <text:p>0.158366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1422016">
                <text:p>0.142201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1540888">
                <text:p>0.154088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1701784">
                <text:p>0.170178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1691464">
                <text:p>0.169146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1522747">
                <text:p>0.152274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1475938">
                <text:p>0.147593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1561823">
                <text:p>0.156182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1436488">
                <text:p>0.143648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1535642">
                <text:p>0.153564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1517629">
                <text:p>0.151762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1510224">
                <text:p>0.151022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1383089">
                <text:p>0.138308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1557103">
                <text:p>0.155710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1416951">
                <text:p>0.141695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1675593">
                <text:p>0.167559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1421929">
                <text:p>0.142192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1536189">
                <text:p>0.153618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1385912">
                <text:p>0.138591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1356836">
                <text:p>0.135683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1344181">
                <text:p>0.134418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1388908">
                <text:p>0.138890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1488426">
                <text:p>0.148842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1328096">
                <text:p>0.132809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1312439">
                <text:p>0.131243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1446585">
                <text:p>0.144658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1369553">
                <text:p>0.136955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1367695">
                <text:p>0.136769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1466717">
                <text:p>0.146671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1323401">
                <text:p>0.132340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1377202">
                <text:p>0.137720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1296339">
                <text:p>0.129633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1330781">
                <text:p>0.133078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1280484">
                <text:p>0.128048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1286595">
                <text:p>0.128659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1244687">
                <text:p>0.124468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1349228">
                <text:p>0.134922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1325065">
                <text:p>0.132506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1314742">
                <text:p>0.131474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1337163">
                <text:p>0.133716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1347795">
                <text:p>0.134779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1226631">
                <text:p>0.122663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149392">
                <text:p>0.14939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1210323">
                <text:p>0.121032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1379067">
                <text:p>0.137906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1178982">
                <text:p>0.117898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118893">
                <text:p>0.11889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1183477">
                <text:p>0.118347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1199048">
                <text:p>0.119904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1276398">
                <text:p>0.127639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1248497">
                <text:p>0.124849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1142319">
                <text:p>0.114231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1284855">
                <text:p>0.128485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1312389">
                <text:p>0.1312389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1174466">
                <text:p>0.117446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1339642">
                <text:p>0.133964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1103324">
                <text:p>0.110332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114528">
                <text:p>0.11452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1261951">
                <text:p>0.126195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1181003">
                <text:p>0.118100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1237095">
                <text:p>0.123709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1065137">
                <text:p>0.106513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1225453">
                <text:p>0.122545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1062902">
                <text:p>0.106290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1107714">
                <text:p>0.110771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1130497">
                <text:p>0.113049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1083029">
                <text:p>0.108302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1290461">
                <text:p>0.129046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1079493">
                <text:p>0.107949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1064258">
                <text:p>0.106425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1079613">
                <text:p>0.107961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1100583">
                <text:p>0.110058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1201184">
                <text:p>0.120118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1396507">
                <text:p>0.1396507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09957992">
                <text:p>0.0995799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106464">
                <text:p>0.10646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1124266">
                <text:p>0.112426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1036554">
                <text:p>0.103655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1100591">
                <text:p>0.110059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1022623">
                <text:p>0.102262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1017426">
                <text:p>0.101742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1036575">
                <text:p>0.103657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09672682">
                <text:p>0.0967268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09831578">
                <text:p>0.0983157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1071132">
                <text:p>0.107113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1195644">
                <text:p>0.119564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1073863">
                <text:p>0.1073863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1011705">
                <text:p>0.101170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09986122">
                <text:p>0.0998612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1119275">
                <text:p>0.111927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1040801">
                <text:p>0.104080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09963832">
                <text:p>0.0996383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09841052">
                <text:p>0.0984105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1107348">
                <text:p>0.110734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1136135">
                <text:p>0.113613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1041586">
                <text:p>0.104158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1101162">
                <text:p>0.110116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09620705">
                <text:p>0.0962070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09098822">
                <text:p>0.0909882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09528416">
                <text:p>0.0952841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09682548">
                <text:p>0.0968254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0976711">
                <text:p>0.097671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1022135">
                <text:p>0.102213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09510875">
                <text:p>0.0951087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09799985">
                <text:p>0.0979998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09205103">
                <text:p>0.0920510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08888487">
                <text:p>0.0888848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09776282">
                <text:p>0.0977628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08611815">
                <text:p>0.0861181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08994105">
                <text:p>0.0899410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1230208">
                <text:p>0.123020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09317406">
                <text:p>0.0931740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08749839">
                <text:p>0.0874983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09303237">
                <text:p>0.0930323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08604827">
                <text:p>0.086048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08381873">
                <text:p>0.0838187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09836252">
                <text:p>0.0983625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7996675">
                <text:p>0.0799667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0993351">
                <text:p>0.099335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09166729">
                <text:p>0.0916672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08856984">
                <text:p>0.08856984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09569427">
                <text:p>0.0956942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09829883">
                <text:p>0.0982988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08978004">
                <text:p>0.0897800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08912056">
                <text:p>0.08912056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08653184">
                <text:p>0.08653184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7761031">
                <text:p>0.0776103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09207277">
                <text:p>0.09207277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09339591">
                <text:p>0.0933959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8354587">
                <text:p>0.08354587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1098434">
                <text:p>0.109843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7732598">
                <text:p>0.0773259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08621623">
                <text:p>0.0862162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0905351">
                <text:p>0.090535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7640134">
                <text:p>0.07640134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7896247">
                <text:p>0.0789624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08491874">
                <text:p>0.0849187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08758108">
                <text:p>0.0875810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08684424">
                <text:p>0.0868442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09708487">
                <text:p>0.0970848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09046546">
                <text:p>0.0904654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0926274">
                <text:p>0.092627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7859553">
                <text:p>0.0785955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8002891">
                <text:p>0.0800289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09263775">
                <text:p>0.0926377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8519078">
                <text:p>0.0851907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09186113">
                <text:p>0.0918611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7263932">
                <text:p>0.0726393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8389083">
                <text:p>0.08389083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08855331">
                <text:p>0.0885533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09214886">
                <text:p>0.0921488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830396">
                <text:p>0.083039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8386366">
                <text:p>0.0838636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8510318">
                <text:p>0.0851031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09427694">
                <text:p>0.0942769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8170487">
                <text:p>0.0817048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7539508">
                <text:p>0.07539508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7288805">
                <text:p>0.0728880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7965019">
                <text:p>0.0796501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7425059">
                <text:p>0.0742505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8634873">
                <text:p>0.0863487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7142952">
                <text:p>0.0714295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7600465">
                <text:p>0.0760046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7377326">
                <text:p>0.0737732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6899015">
                <text:p>0.0689901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8393689">
                <text:p>0.0839368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6958704">
                <text:p>0.0695870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7712945">
                <text:p>0.0771294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7184514">
                <text:p>0.0718451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7740066">
                <text:p>0.07740066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6592629">
                <text:p>0.06592629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1177627">
                <text:p>0.1177627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8300795">
                <text:p>0.0830079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6890934">
                <text:p>0.0689093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7085185">
                <text:p>0.0708518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822331">
                <text:p>0.082233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8344256">
                <text:p>0.0834425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6817611">
                <text:p>0.0681761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6791815">
                <text:p>0.0679181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798936">
                <text:p>0.079893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7075932">
                <text:p>0.0707593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8775923">
                <text:p>0.0877592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7148833">
                <text:p>0.0714883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8734044">
                <text:p>0.0873404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7193267">
                <text:p>0.0719326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7664803">
                <text:p>0.07664803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6405117">
                <text:p>0.06405117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665407">
                <text:p>0.066540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908783">
                <text:p>0.090878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6653879">
                <text:p>0.0665387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6210477">
                <text:p>0.0621047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6281842">
                <text:p>0.0628184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6883331">
                <text:p>0.0688333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6306178">
                <text:p>0.06306178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6033052">
                <text:p>0.0603305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5861847">
                <text:p>0.0586184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562502">
                <text:p>0.056250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7534938">
                <text:p>0.0753493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6276548">
                <text:p>0.06276548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6535891">
                <text:p>0.0653589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6640667">
                <text:p>0.0664066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6370573">
                <text:p>0.0637057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6220672">
                <text:p>0.0622067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6615704">
                <text:p>0.0661570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709796">
                <text:p>0.070979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5756428">
                <text:p>0.0575642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6284332">
                <text:p>0.0628433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6911201">
                <text:p>0.0691120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6365784">
                <text:p>0.06365784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6076328">
                <text:p>0.0607632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669902">
                <text:p>0.066990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7823765">
                <text:p>0.0782376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9193936">
                <text:p>0.0919393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6665166">
                <text:p>0.06665166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7639255">
                <text:p>0.0763925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575699">
                <text:p>0.0575699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6361549">
                <text:p>0.0636154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6191162">
                <text:p>0.0619116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7270774">
                <text:p>0.0727077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6434041">
                <text:p>0.0643404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6845336">
                <text:p>0.0684533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609167">
                <text:p>0.060916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7791112">
                <text:p>0.0779111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6073325">
                <text:p>0.0607332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6631377">
                <text:p>0.0663137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6215885">
                <text:p>0.0621588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5925668">
                <text:p>0.0592566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6262981">
                <text:p>0.0626298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5967864">
                <text:p>0.0596786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7570961">
                <text:p>0.0757096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6104807">
                <text:p>0.0610480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5397099">
                <text:p>0.05397099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8797067">
                <text:p>0.08797067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6679036">
                <text:p>0.0667903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6931336">
                <text:p>0.0693133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6076559">
                <text:p>0.06076559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5606887">
                <text:p>0.05606887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6961216">
                <text:p>0.06961216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6361845">
                <text:p>0.0636184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6005409">
                <text:p>0.0600540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6763076">
                <text:p>0.0676307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5485675">
                <text:p>0.0548567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5893283">
                <text:p>0.0589328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7184127">
                <text:p>0.0718412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7151294">
                <text:p>0.0715129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633307">
                <text:p>0.063330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4693565">
                <text:p>0.0469356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6650198">
                <text:p>0.06650198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5073372">
                <text:p>0.0507337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5527942">
                <text:p>0.0552794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6245586">
                <text:p>0.0624558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6508307">
                <text:p>0.0650830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5497884">
                <text:p>0.05497884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6440907">
                <text:p>0.06440907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5309325">
                <text:p>0.0530932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5011189">
                <text:p>0.0501118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8177989">
                <text:p>0.0817798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4965337">
                <text:p>0.0496533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5532723">
                <text:p>0.05532723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4468049">
                <text:p>0.04468049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5793472">
                <text:p>0.0579347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4497486">
                <text:p>0.04497486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5718075">
                <text:p>0.0571807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58483">
                <text:p>0.05848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55314">
                <text:p>0.05531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5031099">
                <text:p>0.0503109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5487347">
                <text:p>0.0548734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5642575">
                <text:p>0.0564257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4979237">
                <text:p>0.04979237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6002891">
                <text:p>0.0600289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6269827">
                <text:p>0.0626982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4266003">
                <text:p>0.0426600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5832412">
                <text:p>0.0583241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590312">
                <text:p>0.059031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4379912">
                <text:p>0.0437991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4781649">
                <text:p>0.0478164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3687552">
                <text:p>0.03687552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4973542">
                <text:p>0.0497354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5368032">
                <text:p>0.0536803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598831">
                <text:p>0.059883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5887704">
                <text:p>0.0588770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5114854">
                <text:p>0.0511485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5012535">
                <text:p>0.0501253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4767122">
                <text:p>0.0476712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409071">
                <text:p>0.0409071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4323377">
                <text:p>0.04323377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4522924">
                <text:p>0.0452292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4125419">
                <text:p>0.04125419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657269">
                <text:p>0.065726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4838222">
                <text:p>0.0483822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442982">
                <text:p>0.044298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4681246">
                <text:p>0.0468124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6142774">
                <text:p>0.0614277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5745248">
                <text:p>0.05745248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4548488">
                <text:p>0.0454848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4080495">
                <text:p>0.0408049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3998209">
                <text:p>0.0399820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4962096">
                <text:p>0.04962096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4465697">
                <text:p>0.04465697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4739056">
                <text:p>0.0473905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4189345">
                <text:p>0.0418934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5813954">
                <text:p>0.0581395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5907431">
                <text:p>0.0590743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4962384">
                <text:p>0.04962384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5950106">
                <text:p>0.0595010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4095864">
                <text:p>0.0409586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5409403">
                <text:p>0.0540940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397517">
                <text:p>0.0397517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4762456">
                <text:p>0.04762456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390947">
                <text:p>0.0390947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39654">
                <text:p>0.039654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3747844">
                <text:p>0.03747844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6540429">
                <text:p>0.0654042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5566079">
                <text:p>0.05566079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4922178">
                <text:p>0.0492217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4586033">
                <text:p>0.04586033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5111909">
                <text:p>0.0511190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6634244">
                <text:p>0.0663424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5440793">
                <text:p>0.05440793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3689083">
                <text:p>0.0368908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4378554">
                <text:p>0.04378554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419119">
                <text:p>0.041911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3904182">
                <text:p>0.0390418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4788579">
                <text:p>0.0478857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593113">
                <text:p>0.0593113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4614418">
                <text:p>0.0461441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4658377">
                <text:p>0.04658377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3239759">
                <text:p>0.03239759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3591031">
                <text:p>0.0359103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3483626">
                <text:p>0.03483626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5755166">
                <text:p>0.05755166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4650937">
                <text:p>0.0465093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4548544">
                <text:p>0.04548544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4146733">
                <text:p>0.0414673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3923441">
                <text:p>0.0392344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4395294">
                <text:p>0.0439529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3766773">
                <text:p>0.0376677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3798867">
                <text:p>0.0379886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5881104">
                <text:p>0.05881104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4388112">
                <text:p>0.0438811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40052">
                <text:p>0.04005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3359722">
                <text:p>0.03359722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4195414">
                <text:p>0.0419541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3500524">
                <text:p>0.0350052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4619958">
                <text:p>0.0461995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4190812">
                <text:p>0.0419081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3783811">
                <text:p>0.0378381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3488868">
                <text:p>0.0348886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2776456">
                <text:p>0.02776456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4157766">
                <text:p>0.04157766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4184694">
                <text:p>0.0418469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4071797">
                <text:p>0.0407179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3972789">
                <text:p>0.0397278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4221047">
                <text:p>0.0422104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3239271">
                <text:p>0.0323927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4760481">
                <text:p>0.0476048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4775083">
                <text:p>0.04775083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3485056">
                <text:p>0.0348505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284832">
                <text:p>0.028483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4871137">
                <text:p>0.0487113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3217817">
                <text:p>0.03217817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3864498">
                <text:p>0.0386449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3345674">
                <text:p>0.0334567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3839561">
                <text:p>0.0383956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4083301">
                <text:p>0.0408330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31277">
                <text:p>0.03127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2631533">
                <text:p>0.0263153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2985315">
                <text:p>0.0298531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2867695">
                <text:p>0.0286769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229589">
                <text:p>0.022958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3139374">
                <text:p>0.0313937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5243688">
                <text:p>0.0524368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273946">
                <text:p>0.0273946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2693124">
                <text:p>0.0269312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2793048">
                <text:p>0.0279304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4051525">
                <text:p>0.0405152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2940161">
                <text:p>0.02940161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3575332">
                <text:p>0.0357533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332494">
                <text:p>0.0332494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616868">
                <text:p>0.061686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3664808">
                <text:p>0.0366480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3590888">
                <text:p>0.0359088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2855189">
                <text:p>0.0285518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4152776">
                <text:p>0.04152776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2966142">
                <text:p>0.0296614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3263627">
                <text:p>0.0326362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2894681">
                <text:p>0.0289468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3283437">
                <text:p>0.03283437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390066">
                <text:p>0.0390066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2602927">
                <text:p>0.02602927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4720671">
                <text:p>0.0472067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2586268">
                <text:p>0.0258626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2102904">
                <text:p>0.02102904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2548876">
                <text:p>0.02548876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3151694">
                <text:p>0.0315169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2866323">
                <text:p>0.02866323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4056243">
                <text:p>0.04056243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2398956">
                <text:p>0.02398956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3009483">
                <text:p>0.0300948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378396">
                <text:p>0.037839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2874282">
                <text:p>0.02874282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5509574">
                <text:p>0.05509574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3626304">
                <text:p>0.03626304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2754595">
                <text:p>0.0275459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3372376">
                <text:p>0.03372376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3799588">
                <text:p>0.03799588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3803351">
                <text:p>0.03803351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2654158">
                <text:p>0.02654158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315007">
                <text:p>0.0315007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4631301">
                <text:p>0.0463130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2328375">
                <text:p>0.0232837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368464">
                <text:p>0.036846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1936984">
                <text:p>0.0193698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439604">
                <text:p>0.043960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2426239">
                <text:p>0.0242623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3597148">
                <text:p>0.03597148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2962032">
                <text:p>0.0296203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2293904">
                <text:p>0.02293904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3120432">
                <text:p>0.0312043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1831028">
                <text:p>0.0183102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4900526">
                <text:p>0.0490052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3329914">
                <text:p>0.0332991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3119488">
                <text:p>0.0311948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1925116">
                <text:p>0.0192511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244786">
                <text:p>0.0244786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2270455">
                <text:p>0.02270455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1589798">
                <text:p>0.01589798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5485751">
                <text:p>0.05485751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2230555">
                <text:p>0.02230555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2158581">
                <text:p>0.02158581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2663695">
                <text:p>0.0266369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175855">
                <text:p>0.0175855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2035856">
                <text:p>0.0203585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4872536">
                <text:p>0.04872536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2614152">
                <text:p>0.0261415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5430778">
                <text:p>0.0543077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1441723">
                <text:p>0.0144172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3452904">
                <text:p>0.03452904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3886694">
                <text:p>0.0388669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2069464">
                <text:p>0.0206946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2328567">
                <text:p>0.0232856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2290219">
                <text:p>0.0229021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1849845">
                <text:p>0.0184984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2559888">
                <text:p>0.0255988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2761222">
                <text:p>0.0276122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2431295">
                <text:p>0.02431295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1443091">
                <text:p>0.01443091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1740779">
                <text:p>0.0174077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2970164">
                <text:p>0.02970164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2359753">
                <text:p>0.0235975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1621515">
                <text:p>0.01621515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2443632">
                <text:p>0.0244363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2225623">
                <text:p>0.0222562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2020353">
                <text:p>0.0202035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1170491">
                <text:p>0.0117049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1286484">
                <text:p>0.01286484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2060228">
                <text:p>0.02060228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3784817">
                <text:p>0.03784817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2811401">
                <text:p>0.02811401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2455509">
                <text:p>0.02455509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2083603">
                <text:p>0.02083603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2682037">
                <text:p>0.02682037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1239679">
                <text:p>0.0123967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1845208">
                <text:p>0.0184520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2631588">
                <text:p>0.02631588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1981773">
                <text:p>0.0198177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1712124">
                <text:p>0.0171212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2434225">
                <text:p>0.0243422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264759">
                <text:p>0.026475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1433645">
                <text:p>0.0143364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1264193">
                <text:p>0.01264193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2286657">
                <text:p>0.02286657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2619952">
                <text:p>0.02619952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3960372">
                <text:p>0.03960372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1108723">
                <text:p>0.0110872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3493794">
                <text:p>0.0349379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198179">
                <text:p>0.019817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3626917">
                <text:p>0.0362691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263439">
                <text:p>0.0263439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2947978">
                <text:p>0.02947978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3249955">
                <text:p>0.0324995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2009275">
                <text:p>0.0200927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1054491">
                <text:p>0.0105449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1353307">
                <text:p>0.01353307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2939356">
                <text:p>0.02939356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2549291">
                <text:p>0.0254929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1579509">
                <text:p>0.0157950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1326507">
                <text:p>0.0132650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1054101">
                <text:p>0.0105410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2696742">
                <text:p>0.0269674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3024397">
                <text:p>0.0302439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07484393">
                <text:p>0.00748439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2154238">
                <text:p>0.0215423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09470126">
                <text:p>0.009470126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136883">
                <text:p>0.013688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1342593">
                <text:p>0.0134259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1160924">
                <text:p>0.0116092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3974855">
                <text:p>0.0397485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2871818">
                <text:p>0.0287181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2800307">
                <text:p>0.02800307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1097609">
                <text:p>0.0109760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1410387">
                <text:p>0.01410387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1756432">
                <text:p>0.0175643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4700826">
                <text:p>0.04700826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3013599">
                <text:p>0.0301359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283647">
                <text:p>0.0283647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1051748">
                <text:p>0.01051748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2444492">
                <text:p>0.0244449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1575334">
                <text:p>0.0157533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09103435">
                <text:p>0.009103435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144088">
                <text:p>0.0144088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2076169">
                <text:p>0.0207616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2772982">
                <text:p>0.0277298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1731213">
                <text:p>0.01731213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1517138">
                <text:p>0.0151713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2396034">
                <text:p>0.0239603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289677">
                <text:p>0.0289677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1001098">
                <text:p>0.0100109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2499103">
                <text:p>0.0249910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134602">
                <text:p>0.013460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3295558">
                <text:p>0.0329555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07137388">
                <text:p>0.007137388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1528567">
                <text:p>0.0152856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1562761">
                <text:p>0.01562761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2692304">
                <text:p>0.02692304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1423018">
                <text:p>0.01423018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1679782">
                <text:p>0.0167978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1190004">
                <text:p>0.01190004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06516501">
                <text:p>0.00651650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2290404">
                <text:p>0.0229040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4905264">
                <text:p>0.04905264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0858534">
                <text:p>0.0085853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1351243">
                <text:p>0.01351243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103636">
                <text:p>0.010363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2581413">
                <text:p>0.0258141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05902132">
                <text:p>0.00590213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145362">
                <text:p>0.014536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1248838">
                <text:p>0.0124883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07800418">
                <text:p>0.00780041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07137242">
                <text:p>0.00713724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1443903">
                <text:p>0.01443903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08603532">
                <text:p>0.00860353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3632458">
                <text:p>0.03632458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08784216">
                <text:p>0.008784216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04967352">
                <text:p>0.00496735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1955978">
                <text:p>0.01955978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2260483">
                <text:p>0.02260483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116705">
                <text:p>0.0116705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0.001228971">
                <text:p>0.00122897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3294097">
                <text:p>0.03294097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1998482">
                <text:p>0.0199848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05262198">
                <text:p>0.005262198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153075">
                <text:p>0.015307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1296612">
                <text:p>0.0129661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07409412">
                <text:p>0.00740941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08187774">
                <text:p>0.008187774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230836">
                <text:p>0.0230836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2371782">
                <text:p>0.0237178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1395732">
                <text:p>0.01395732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2289749">
                <text:p>0.0228974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04453597">
                <text:p>0.004453597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09716491">
                <text:p>0.009716491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03535822">
                <text:p>0.00353582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03697899">
                <text:p>0.00369789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1519954">
                <text:p>0.01519954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2516403">
                <text:p>0.02516403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03750534">
                <text:p>0.003750534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3598454">
                <text:p>0.03598454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1386231">
                <text:p>0.0138623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09855671">
                <text:p>0.009855671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02419784">
                <text:p>0.002419784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0.001458299">
                <text:p>0.001458299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05674684">
                <text:p>0.00567468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2344763">
                <text:p>0.02344763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2844922">
                <text:p>0.0284492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07250641">
                <text:p>0.00725064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0817437">
                <text:p>0.00817437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04134666">
                <text:p>0.00413466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248184">
                <text:p>0.0248184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1340155">
                <text:p>0.0134015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-0.001148876">
                <text:p>-0.00114887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06827118">
                <text:p>0.00682711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1320462">
                <text:p>0.0132046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06956028">
                <text:p>0.00695602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08331261">
                <text:p>0.008331261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2564038">
                <text:p>0.02564038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04094103">
                <text:p>0.004094103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2434514">
                <text:p>0.02434514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04353668">
                <text:p>0.00435366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2235684">
                <text:p>0.0223568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1038117">
                <text:p>0.01038117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0266272">
                <text:p>0.0026627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1955014">
                <text:p>0.0195501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1861303">
                <text:p>0.0186130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04238688">
                <text:p>0.00423868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-0.0009869073">
                <text:p>-0.0009869073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-0.001740368">
                <text:p>-0.001740368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04324537">
                <text:p>0.00432453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04998614">
                <text:p>0.00499861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1174808">
                <text:p>0.0117480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1849525">
                <text:p>0.0184952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08313122">
                <text:p>0.00831312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02686296">
                <text:p>0.002686296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1433976">
                <text:p>0.01433976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07072312">
                <text:p>0.00707231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1048675">
                <text:p>0.01048675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04628701">
                <text:p>0.004628701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02416468">
                <text:p>0.00241646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05866354">
                <text:p>0.00586635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1730363">
                <text:p>0.0173036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0.001553771">
                <text:p>0.00155377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04717596">
                <text:p>0.004717596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07941389">
                <text:p>0.00794138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1648002">
                <text:p>0.01648002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1172506">
                <text:p>0.01172506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07892764">
                <text:p>0.00789276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2012404">
                <text:p>0.02012404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1784665">
                <text:p>0.0178466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1376487">
                <text:p>0.01376487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09017731">
                <text:p>0.00901773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0696397">
                <text:p>0.0069639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713281">
                <text:p>0.02713281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02720216">
                <text:p>0.002720216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01784329">
                <text:p>0.00178432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06194035">
                <text:p>0.00619403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05391413">
                <text:p>0.005391413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03926096">
                <text:p>0.00392609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03962682">
                <text:p>0.00396268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1460185">
                <text:p>0.0146018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1518495">
                <text:p>0.0151849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1889182">
                <text:p>0.0188918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1762742">
                <text:p>0.0176274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08025764">
                <text:p>0.008025764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01842581">
                <text:p>0.00184258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08037843">
                <text:p>0.008037843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0489843">
                <text:p>0.00489843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02114247">
                <text:p>0.00211424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07562191">
                <text:p>0.00756219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05400061">
                <text:p>0.00540006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-0.0006048185">
                <text:p>-0.0006048185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1719814">
                <text:p>0.01719814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09551322">
                <text:p>0.00955132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2107359">
                <text:p>0.02107359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04911789">
                <text:p>0.004911789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1313207">
                <text:p>0.01313207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3503606">
                <text:p>0.03503606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1287993">
                <text:p>0.01287993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06239479">
                <text:p>0.006239479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05824226">
                <text:p>0.005824226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1342651">
                <text:p>0.01342651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04170001">
                <text:p>0.00417000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1020355">
                <text:p>0.01020355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439862">
                <text:p>0.0343986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0.0002276744">
                <text:p>0.0002276744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3242071">
                <text:p>0.03242071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-0.001008556">
                <text:p>-0.001008556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727009">
                <text:p>0.0272700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1571047">
                <text:p>0.0157104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06307268">
                <text:p>0.006307268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1071536">
                <text:p>0.01071536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07830802">
                <text:p>0.00783080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-0.003961817">
                <text:p>-0.00396181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0347368">
                <text:p>0.00347368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06511016">
                <text:p>0.00651101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07490021">
                <text:p>0.00749002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1338351">
                <text:p>0.01338351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-0.001141715">
                <text:p>-0.001141715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02963998">
                <text:p>0.00296399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2516243">
                <text:p>0.0251624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1075327">
                <text:p>0.01075327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1189483">
                <text:p>0.01189483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02022674">
                <text:p>0.002022674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-0.003080807">
                <text:p>-0.003080807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-0.0006157499">
                <text:p>-0.000615749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06670298">
                <text:p>0.00667029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02441065">
                <text:p>0.002441065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09586073">
                <text:p>0.00958607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03813679">
                <text:p>0.003813679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1327803">
                <text:p>0.01327803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605304">
                <text:p>0.0160530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07400955">
                <text:p>0.00740095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787809">
                <text:p>0.01787809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06074383">
                <text:p>0.006074383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06481979">
                <text:p>0.00648197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03332643">
                <text:p>0.003332643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1288076">
                <text:p>0.0128807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04669353">
                <text:p>0.004669353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-0.000827375">
                <text:p>-0.00082737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08902923">
                <text:p>0.00890292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02986798">
                <text:p>0.002986798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03219561">
                <text:p>0.003219561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09355132">
                <text:p>0.009355132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-0.001661348">
                <text:p>-0.00166134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05160017">
                <text:p>0.00516001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-0.002582262">
                <text:p>-0.00258226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106525">
                <text:p>0.010652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0.000548943">
                <text:p>0.000548943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09205225">
                <text:p>0.00920522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0.0002748893">
                <text:p>0.0002748893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08696956">
                <text:p>0.008696956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502363">
                <text:p>0.02502363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101179">
                <text:p>0.0101179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919315">
                <text:p>0.0291931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09113717">
                <text:p>0.009113717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29111">
                <text:p>0.02291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-0.00231649">
                <text:p>-0.0023164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0.0005107903">
                <text:p>0.0005107903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06871274">
                <text:p>-0.006871274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1238527">
                <text:p>0.0123852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0.0003119282">
                <text:p>0.000311928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1036521">
                <text:p>0.0103652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0414008">
                <text:p>0.00414008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03633079">
                <text:p>0.003633079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221246">
                <text:p>0.022124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03161603">
                <text:p>0.00316160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416585">
                <text:p>0.01416585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-0.004950851">
                <text:p>-0.004950851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05035748">
                <text:p>0.00503574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-0.005040769">
                <text:p>-0.00504076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06712973">
                <text:p>0.006712973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-0.003204814">
                <text:p>-0.00320481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05979249">
                <text:p>-0.00597924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5929565">
                <text:p>0.00592956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02686005">
                <text:p>0.002686005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2207219">
                <text:p>0.02207219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02708907">
                <text:p>0.002708907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06475397">
                <text:p>0.006475397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326751">
                <text:p>0.02326751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05374176">
                <text:p>0.005374176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01954091">
                <text:p>0.00195409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08155888">
                <text:p>0.00815588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0.00088196">
                <text:p>0.0008819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2003742">
                <text:p>0.0200374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379661">
                <text:p>0.0137966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08715335">
                <text:p>0.00871533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2057586">
                <text:p>0.02057586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1204935">
                <text:p>0.0120493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-0.001919606">
                <text:p>-0.00191960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-0.0002171265">
                <text:p>-0.000217126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03932053">
                <text:p>-0.003932053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869687">
                <text:p>0.01869687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620657">
                <text:p>0.03620657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-0.001867675">
                <text:p>-0.00186767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02563463">
                <text:p>0.00256346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-0.002464487">
                <text:p>-0.002464487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0.0003448296">
                <text:p>0.0003448296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-0.004182544">
                <text:p>-0.004182544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0867947">
                <text:p>0.0086794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07255191">
                <text:p>0.007255191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5340716">
                <text:p>0.005340716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5137528">
                <text:p>0.00513752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07517628">
                <text:p>0.00751762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-0.003338873">
                <text:p>-0.003338873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01409722">
                <text:p>0.00140972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-0.004089711">
                <text:p>-0.00408971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09958199">
                <text:p>0.00995819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699062">
                <text:p>0.00699062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849915">
                <text:p>0.01849915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07355267">
                <text:p>-0.007355267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-0.003071102">
                <text:p>-0.00307110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02142938">
                <text:p>0.002142938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5303937">
                <text:p>-0.00530393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08172689">
                <text:p>0.008172689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08427198">
                <text:p>0.008427198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01707136">
                <text:p>0.001707136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3752704">
                <text:p>0.003752704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477726">
                <text:p>0.01477726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-0.001158218">
                <text:p>-0.001158218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0764822">
                <text:p>0.00764822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462135">
                <text:p>0.0146213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5696513">
                <text:p>0.00569651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0.0009784318">
                <text:p>0.0009784318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-0.001981312">
                <text:p>-0.00198131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-0.002253854">
                <text:p>-0.00225385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02945323">
                <text:p>0.002945323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6007384">
                <text:p>0.006007384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1064399">
                <text:p>0.0106439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5254084">
                <text:p>-0.005254084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02394921">
                <text:p>0.00239492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02490448">
                <text:p>0.00249044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5311296">
                <text:p>0.00531129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0329821">
                <text:p>0.0032982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5078773">
                <text:p>0.00507877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03255581">
                <text:p>0.00325558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4354958">
                <text:p>0.004354958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02084928">
                <text:p>0.00208492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07542225">
                <text:p>0.007542225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02638221">
                <text:p>0.00263822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-0.003723282">
                <text:p>-0.003723282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02275368">
                <text:p>0.00227536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7858529">
                <text:p>0.007858529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0172757">
                <text:p>0.0017275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4956634">
                <text:p>-0.00495663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09851283">
                <text:p>0.00985128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09915918">
                <text:p>0.00991591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02050062">
                <text:p>0.00205006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09187187">
                <text:p>0.009187187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5772606">
                <text:p>-0.00577260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625928">
                <text:p>0.01625928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158192">
                <text:p>0.0115819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3018139">
                <text:p>0.003018139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-0.002640641">
                <text:p>-0.002640641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785321">
                <text:p>0.0178532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-0.003559913">
                <text:p>-0.003559913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102048">
                <text:p>0.0210204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-0.000284845">
                <text:p>-0.000284845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078665">
                <text:p>0.0107866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110775">
                <text:p>0.011077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3951556">
                <text:p>0.003951556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3066715">
                <text:p>0.00306671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-0.001075029">
                <text:p>-0.001075029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5554806">
                <text:p>0.005554806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6180417">
                <text:p>0.00618041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431755">
                <text:p>0.00431755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129856">
                <text:p>0.01129856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-0.001188512">
                <text:p>-0.001188512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4063662">
                <text:p>-0.00406366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4703493">
                <text:p>-0.00470349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1074661">
                <text:p>-0.0107466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08380442">
                <text:p>0.008380442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9601573">
                <text:p>-0.009601573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2855332">
                <text:p>0.00285533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7319689">
                <text:p>0.007319689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3008821">
                <text:p>0.003008821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-0.0003999444">
                <text:p>-0.000399944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0.0005249967">
                <text:p>0.0005249967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09924645">
                <text:p>0.009924645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5073403">
                <text:p>0.005073403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4439047">
                <text:p>-0.00443904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6062">
                <text:p>0.016062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6287184">
                <text:p>0.006287184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-0.002946694">
                <text:p>-0.00294669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-0.003467801">
                <text:p>-0.00346780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317651">
                <text:p>0.00317651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1142721">
                <text:p>0.001142721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6103894">
                <text:p>-0.006103894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644674">
                <text:p>0.0164467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6084248">
                <text:p>0.006084248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493519">
                <text:p>0.01493519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5757018">
                <text:p>0.005757018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09474346">
                <text:p>0.009474346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138372">
                <text:p>0.0013837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276538">
                <text:p>0.01276538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1080952">
                <text:p>0.0108095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4491181">
                <text:p>-0.004491181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575463">
                <text:p>0.00575463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09999881">
                <text:p>0.009999881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632991">
                <text:p>-0.0063299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-0.001390134">
                <text:p>-0.001390134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170991">
                <text:p>0.01170991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2273985">
                <text:p>0.002273985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07135677">
                <text:p>0.0007135677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-0.001610518">
                <text:p>-0.00161051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-0.0009524717">
                <text:p>-0.000952471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4271801">
                <text:p>-0.004271801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0839845">
                <text:p>-0.00839845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487658">
                <text:p>-0.0048765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6122378">
                <text:p>0.006122378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4089527">
                <text:p>0.004089527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668883">
                <text:p>0.01668883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165546">
                <text:p>0.0116554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4528494">
                <text:p>0.004528494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8828606">
                <text:p>-0.008828606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264267">
                <text:p>0.02264267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8817996">
                <text:p>-0.008817996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-0.001618829">
                <text:p>-0.001618829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-0.0002395129">
                <text:p>-0.0002395129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3961036">
                <text:p>0.003961036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-0.0005989022">
                <text:p>-0.000598902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08150512">
                <text:p>0.00815051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6591355">
                <text:p>-0.006591355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8093443">
                <text:p>-0.008093443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319114">
                <text:p>0.00319114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4441461">
                <text:p>0.00444146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08196749">
                <text:p>0.0081967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-0.002845647">
                <text:p>-0.002845647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320586">
                <text:p>0.01320586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5337173">
                <text:p>-0.005337173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-0.003640411">
                <text:p>-0.00364041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6508305">
                <text:p>0.006508305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463178">
                <text:p>0.0146317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264577">
                <text:p>0.01264577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7959702">
                <text:p>0.00795970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9212776">
                <text:p>0.009212776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6781867">
                <text:p>-0.006781867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1028636">
                <text:p>0.01028636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1912528">
                <text:p>0.00191252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6194224">
                <text:p>-0.006194224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1050083">
                <text:p>0.01050083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2340246">
                <text:p>0.002340246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6885575">
                <text:p>-0.00688557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1095063">
                <text:p>-0.01095063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-0.0006993697">
                <text:p>-0.0006993697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3820643">
                <text:p>0.003820643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1631329">
                <text:p>0.00163132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3727061">
                <text:p>-0.003727061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09337166">
                <text:p>0.009337166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-0.002267965">
                <text:p>-0.002267965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5268786">
                <text:p>0.00526878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-0.001511432">
                <text:p>-0.001511432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5707061">
                <text:p>0.005707061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1992814">
                <text:p>0.001992814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-0.0008680221">
                <text:p>-0.0008680221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-0.001177575">
                <text:p>-0.00117757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278786">
                <text:p>0.0027878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4671905">
                <text:p>-0.004671905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811156">
                <text:p>0.01811156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-0.0003248591">
                <text:p>-0.0003248591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4115825">
                <text:p>0.00411582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6498748">
                <text:p>0.006498748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4222257">
                <text:p>0.004222257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07671252">
                <text:p>0.0007671252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8584111">
                <text:p>0.008584111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09592058">
                <text:p>0.009592058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3741793">
                <text:p>-0.00374179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6786573">
                <text:p>0.006786573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1598262">
                <text:p>0.001598262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5370747">
                <text:p>0.00537074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0.0002002837">
                <text:p>0.000200283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4168433">
                <text:p>-0.004168433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090781">
                <text:p>0.01090781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2610705">
                <text:p>-0.002610705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2783044">
                <text:p>-0.002783044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0.000335993">
                <text:p>0.000335993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3576892">
                <text:p>0.003576892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3862519">
                <text:p>0.00386251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0.0005120146">
                <text:p>0.000512014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-0.001448058">
                <text:p>-0.001448058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-0.002687375">
                <text:p>-0.002687375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2772045">
                <text:p>0.002772045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5904868">
                <text:p>0.005904868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1028426">
                <text:p>-0.01028426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1743359">
                <text:p>0.00174335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6267596">
                <text:p>-0.006267596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3714102">
                <text:p>0.003714102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-0.001877095">
                <text:p>-0.001877095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4459916">
                <text:p>-0.004459916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3689005">
                <text:p>-0.003689005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0.0005970838">
                <text:p>0.0005970838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443878">
                <text:p>0.00443878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-0.001044577">
                <text:p>-0.00104457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3097289">
                <text:p>-0.003097289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0.0009054231">
                <text:p>0.0009054231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2453761">
                <text:p>0.002453761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7109021">
                <text:p>-0.007109021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-0.0004753064">
                <text:p>-0.0004753064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9245202">
                <text:p>-0.00924520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7424342">
                <text:p>-0.007424342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4640358">
                <text:p>-0.004640358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-0.002710219">
                <text:p>-0.002710219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512794">
                <text:p>-0.0051279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5824463">
                <text:p>-0.005824463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5169598">
                <text:p>0.00516959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1068946">
                <text:p>-0.0106894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3910293">
                <text:p>-0.00391029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7485749">
                <text:p>-0.007485749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6204938">
                <text:p>0.006204938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3876983">
                <text:p>-0.00387698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8282229">
                <text:p>0.008282229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101674">
                <text:p>0.0101674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3854909">
                <text:p>-0.00385490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1544878">
                <text:p>0.001544878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090916">
                <text:p>0.01090916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3438598">
                <text:p>0.003438598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3402038">
                <text:p>-0.003402038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293132">
                <text:p>0.01293132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-0.0004145372">
                <text:p>-0.0004145372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03809086">
                <text:p>0.0003809086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2981622">
                <text:p>-0.002981622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2400433">
                <text:p>0.002400433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7818879">
                <text:p>-0.007818879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7114902">
                <text:p>-0.007114902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2070244">
                <text:p>0.002070244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-0.0005533335">
                <text:p>-0.000553333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3398957">
                <text:p>0.003398957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-0.001473437">
                <text:p>-0.001473437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9030125">
                <text:p>0.009030125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3421642">
                <text:p>0.003421642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9352671">
                <text:p>-0.009352671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1955045">
                <text:p>0.001955045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6051287">
                <text:p>-0.006051287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8608554">
                <text:p>-0.00860855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191219">
                <text:p>0.0119121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-0.00069806">
                <text:p>-0.0006980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-0.00452651">
                <text:p>-0.00452651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08852863">
                <text:p>0.008852863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4204832">
                <text:p>0.004204832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4852297">
                <text:p>-0.00485229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1990287">
                <text:p>-0.00199028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5092447">
                <text:p>-0.005092447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6380831">
                <text:p>-0.00638083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3926411">
                <text:p>-0.003926411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2665137">
                <text:p>-0.002665137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3323602">
                <text:p>-0.00332360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1153977">
                <text:p>0.001153977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0.0005794537">
                <text:p>0.000579453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787024">
                <text:p>0.01787024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5676263">
                <text:p>0.00567626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5837042">
                <text:p>0.005837042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5084826">
                <text:p>0.005084826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3956462">
                <text:p>-0.003956462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3799913">
                <text:p>-0.00379991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3639106">
                <text:p>0.003639106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2194828">
                <text:p>0.002194828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2796365">
                <text:p>0.002796365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247456">
                <text:p>0.02247456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7991368">
                <text:p>-0.00799136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-0.0005107024">
                <text:p>-0.0005107024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4283077">
                <text:p>0.0428307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3697803">
                <text:p>0.003697803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4661255">
                <text:p>0.00466125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-0.001728009">
                <text:p>-0.001728009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335899">
                <text:p>0.01335899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3171468">
                <text:p>0.003171468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9482476">
                <text:p>-0.009482476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114585">
                <text:p>0.01114585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6866951">
                <text:p>-0.006866951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5594156">
                <text:p>-0.00559415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9134515">
                <text:p>0.00913451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3487479">
                <text:p>0.003487479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342901">
                <text:p>0.01342901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4170107">
                <text:p>0.004170107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5808492">
                <text:p>0.005808492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-0.0004387399">
                <text:p>-0.0004387399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2029233">
                <text:p>0.002029233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-0.0001917196">
                <text:p>-0.000191719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01214056">
                <text:p>0.0001214056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8149365">
                <text:p>-0.008149365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5115234">
                <text:p>-0.005115234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1126461">
                <text:p>-0.01126461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-0.0001384157">
                <text:p>-0.0001384157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4173049">
                <text:p>-0.004173049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309891">
                <text:p>0.01309891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6851472">
                <text:p>-0.006851472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-0.001270858">
                <text:p>-0.00127085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0.0001595862">
                <text:p>0.000159586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-0.0006275434">
                <text:p>-0.000627543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-0.001140806">
                <text:p>-0.001140806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9553839">
                <text:p>0.009553839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-0.001770058">
                <text:p>-0.001770058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2875147">
                <text:p>-0.00287514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1056724">
                <text:p>-0.01056724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-0.0008997601">
                <text:p>-0.0008997601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2004569">
                <text:p>0.002004569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4002865">
                <text:p>0.004002865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6499617">
                <text:p>-0.006499617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8481406">
                <text:p>-0.008481406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09627207">
                <text:p>0.009627207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2592126">
                <text:p>0.002592126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3025556">
                <text:p>-0.003025556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08891765">
                <text:p>-0.0008891765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7276199">
                <text:p>-0.00727619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735152">
                <text:p>0.02735152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7281732">
                <text:p>-0.007281732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347971">
                <text:p>0.01347971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7196214">
                <text:p>-0.007196214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6064349">
                <text:p>-0.00606434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9392516">
                <text:p>-0.009392516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804067">
                <text:p>-0.00804067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1213839">
                <text:p>-0.01213839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847043">
                <text:p>0.00847043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4073401">
                <text:p>0.004073401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8514012">
                <text:p>-0.00851401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08540908">
                <text:p>0.0008540908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6051698">
                <text:p>-0.006051698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713029">
                <text:p>0.02713029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7905018">
                <text:p>0.007905018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493754">
                <text:p>0.01493754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3192154">
                <text:p>0.003192154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8655769">
                <text:p>-0.00865576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3537834">
                <text:p>-0.003537834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4038177">
                <text:p>0.004038177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2746712">
                <text:p>0.00274671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644794">
                <text:p>0.0264479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1371907">
                <text:p>-0.001371907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6284744">
                <text:p>0.006284744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-0.000613576">
                <text:p>-0.000613576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1853502">
                <text:p>0.00185350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4941783">
                <text:p>0.004941783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206135">
                <text:p>0.01206135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-0.00187196">
                <text:p>-0.0018719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2750684">
                <text:p>-0.002750684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743605">
                <text:p>0.02743605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159482">
                <text:p>0.01159482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2072064">
                <text:p>0.002072064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-0.001362137">
                <text:p>-0.001362137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3755451">
                <text:p>0.00375545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212912">
                <text:p>0.01212912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2412189">
                <text:p>0.002412189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1621995">
                <text:p>0.00162199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7031485">
                <text:p>-0.007031485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3167943">
                <text:p>-0.00316794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3403072">
                <text:p>0.00340307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4233938">
                <text:p>-0.004233938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578959">
                <text:p>0.0157895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7383035">
                <text:p>0.007383035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5200697">
                <text:p>-0.00520069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5996535">
                <text:p>0.005996535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9681835">
                <text:p>-0.00968183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5344935">
                <text:p>-0.005344935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5883705">
                <text:p>0.00588370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173629">
                <text:p>0.01173629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501591">
                <text:p>-0.0050159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4254191">
                <text:p>-0.004254191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148668">
                <text:p>0.009148668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771799">
                <text:p>0.01771799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07805229">
                <text:p>-0.000780522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2048511">
                <text:p>0.00204851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3304512">
                <text:p>-0.003304512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1934767">
                <text:p>-0.001934767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2483699">
                <text:p>-0.002483699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5521112">
                <text:p>-0.005521112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365433">
                <text:p>0.0136543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1005889">
                <text:p>-0.0100588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7101383">
                <text:p>0.007101383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5415664">
                <text:p>-0.00541566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2278679">
                <text:p>-0.00227867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5526462">
                <text:p>-0.005526462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5380395">
                <text:p>-0.005380395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08442">
                <text:p>0.010844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4763249">
                <text:p>-0.004763249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6967613">
                <text:p>-0.006967613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8900463">
                <text:p>-0.008900463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861502">
                <text:p>-0.00861502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2115688">
                <text:p>0.002115688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05335592">
                <text:p>0.0005335592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4038232">
                <text:p>-0.004038232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163996">
                <text:p>0.01163996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2120384">
                <text:p>-0.002120384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1213004">
                <text:p>0.001213004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344907">
                <text:p>0.0134490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2914193">
                <text:p>-0.002914193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2058357">
                <text:p>-0.002058357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2008688">
                <text:p>0.02008688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-0.001568055">
                <text:p>-0.001568055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3623514">
                <text:p>0.003623514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987901">
                <text:p>0.005987901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455922">
                <text:p>-0.00455922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929366">
                <text:p>0.00929366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09079172">
                <text:p>0.0009079172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8975431">
                <text:p>-0.008975431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9812714">
                <text:p>-0.009812714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2444403">
                <text:p>0.002444403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171425">
                <text:p>0.004171425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4909356">
                <text:p>0.004909356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6183439">
                <text:p>-0.006183439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2647587">
                <text:p>0.002647587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4984463">
                <text:p>0.00498446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8682917">
                <text:p>0.008682917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2577955">
                <text:p>-0.002577955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2400869">
                <text:p>0.002400869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4180077">
                <text:p>0.00418007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44898">
                <text:p>-0.0044898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3332437">
                <text:p>-0.003332437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5100469">
                <text:p>-0.005100469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343081">
                <text:p>0.0134308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1002594">
                <text:p>-0.01002594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1735958">
                <text:p>-0.00173595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2452279">
                <text:p>0.002452279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2722392">
                <text:p>0.002722392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1028655">
                <text:p>0.001028655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5479636">
                <text:p>-0.005479636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6260841">
                <text:p>-0.00626084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2282086">
                <text:p>0.00228208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219736">
                <text:p>-0.00219736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2242883">
                <text:p>-0.002242883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7496105">
                <text:p>0.00749610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1393797">
                <text:p>0.001393797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8404854">
                <text:p>-0.00840485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931724">
                <text:p>0.00931724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2027021">
                <text:p>-0.002027021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753568">
                <text:p>-0.00753568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2140842">
                <text:p>0.00214084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0.0003783613">
                <text:p>0.0003783613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03319585">
                <text:p>0.0003319585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1000775">
                <text:p>-0.01000775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8008003">
                <text:p>-0.008008003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3625754">
                <text:p>0.003625754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3996528">
                <text:p>-0.00399652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42195">
                <text:p>0.0142195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9163911">
                <text:p>-0.009163911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4600165">
                <text:p>-0.004600165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-0.0008410072">
                <text:p>-0.000841007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8099875">
                <text:p>0.008099875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4041738">
                <text:p>0.004041738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6807863">
                <text:p>-0.006807863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975583">
                <text:p>0.007975583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5290117">
                <text:p>-0.005290117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1030003">
                <text:p>-0.01030003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4671164">
                <text:p>-0.00467116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891913">
                <text:p>0.0189191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797224">
                <text:p>0.01797224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765667">
                <text:p>0.01765667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1016429">
                <text:p>-0.01016429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-0.001056481">
                <text:p>-0.001056481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5301153">
                <text:p>0.005301153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630274">
                <text:p>0.00563027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7273819">
                <text:p>-0.007273819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1195575">
                <text:p>-0.01195575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1047295">
                <text:p>0.01047295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5049895">
                <text:p>0.005049895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-0.0004797132">
                <text:p>-0.0004797132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4283498">
                <text:p>0.004283498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495907">
                <text:p>0.01495907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3742503">
                <text:p>-0.003742503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165901">
                <text:p>0.00416590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762255">
                <text:p>0.002762255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4646764">
                <text:p>0.004646764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9848438">
                <text:p>-0.00984843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3816688">
                <text:p>-0.00381668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1231495">
                <text:p>0.00123149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7303291">
                <text:p>-0.00730329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2342299">
                <text:p>0.00234229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2089021">
                <text:p>-0.002089021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6046798">
                <text:p>-0.006046798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-0.0004700835">
                <text:p>-0.0004700835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9321437">
                <text:p>-0.009321437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1128689">
                <text:p>-0.0112868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5388682">
                <text:p>0.005388682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1292425">
                <text:p>0.001292425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09449894">
                <text:p>0.0009449894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-0.0002443999">
                <text:p>-0.000244399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1407988">
                <text:p>0.001407988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5987654">
                <text:p>0.005987654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6054059">
                <text:p>-0.00605405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1021438">
                <text:p>-0.01021438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1420596">
                <text:p>0.001420596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09440472">
                <text:p>-0.0009440472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1099419">
                <text:p>0.001099419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03274354">
                <text:p>0.0003274354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3057496">
                <text:p>-0.003057496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1685516">
                <text:p>0.001685516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6236335">
                <text:p>-0.006236335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070731">
                <text:p>0.005070731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2499446">
                <text:p>-0.002499446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3172005">
                <text:p>-0.003172005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09044409">
                <text:p>0.0009044409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2351709">
                <text:p>-0.002351709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1007158">
                <text:p>0.001007158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3972733">
                <text:p>0.003972733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7880924">
                <text:p>0.007880924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-0.0008442129">
                <text:p>-0.0008442129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4739601">
                <text:p>-0.00473960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1057308">
                <text:p>0.01057308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3684731">
                <text:p>-0.003684731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8681627">
                <text:p>-0.008681627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9565873">
                <text:p>-0.00956587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4499664">
                <text:p>0.004499664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6578621">
                <text:p>-0.006578621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105338">
                <text:p>0.010533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9315345">
                <text:p>-0.009315345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1299998">
                <text:p>0.001299998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514287">
                <text:p>0.02514287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1059214">
                <text:p>0.00105921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04380443">
                <text:p>0.000438044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594373">
                <text:p>0.00594373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32962">
                <text:p>0.00532962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3327447">
                <text:p>-0.003327447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2023689">
                <text:p>0.00202368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05137518">
                <text:p>0.000513751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888843">
                <text:p>0.01888843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9865838">
                <text:p>-0.009865838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809078">
                <text:p>0.01809078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2232025">
                <text:p>-0.002232025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7464912">
                <text:p>-0.00746491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534006">
                <text:p>0.01534006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3116389">
                <text:p>-0.00311638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7955506">
                <text:p>-0.007955506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972164">
                <text:p>-0.00972164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6434311">
                <text:p>-0.006434311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3214797">
                <text:p>0.003214797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7940172">
                <text:p>-0.007940172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1261848">
                <text:p>0.001261848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3608124">
                <text:p>0.003608124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78922">
                <text:p>0.0178922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1311686">
                <text:p>0.00131168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5134426">
                <text:p>-0.005134426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1401233">
                <text:p>0.00140123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5930578">
                <text:p>-0.005930578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6564128">
                <text:p>-0.006564128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3609809">
                <text:p>0.003609809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-0.0003383015">
                <text:p>-0.0003383015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344133">
                <text:p>-0.01344133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8152894">
                <text:p>-0.008152894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8723713">
                <text:p>-0.008723713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1126137">
                <text:p>-0.01126137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6778263">
                <text:p>0.006778263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9100198">
                <text:p>-0.009100198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9310427">
                <text:p>-0.009310427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3152363">
                <text:p>0.003152363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7146655">
                <text:p>-0.007146655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9081583">
                <text:p>-0.009081583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721768">
                <text:p>0.02721768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2612097">
                <text:p>-0.002612097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1399683">
                <text:p>-0.001399683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6422629">
                <text:p>-0.006422629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1992869">
                <text:p>0.001992869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2529092">
                <text:p>-0.00252909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3563397">
                <text:p>-0.003563397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8827982">
                <text:p>0.008827982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09592526">
                <text:p>0.000959252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3847785">
                <text:p>-0.003847785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5092009">
                <text:p>-0.00509200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1187883">
                <text:p>-0.01187883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6110216">
                <text:p>0.006110216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1636711">
                <text:p>-0.001636711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202986">
                <text:p>0.01202986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2201674">
                <text:p>-0.00220167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-0.0004235033">
                <text:p>-0.0004235033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2577884">
                <text:p>-0.00257788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91251">
                <text:p>-0.0091251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257621">
                <text:p>-0.01257621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2511388">
                <text:p>0.002511388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1049816">
                <text:p>-0.01049816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5474142">
                <text:p>-0.005474142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9601996">
                <text:p>-0.009601996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503084">
                <text:p>0.00503084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1030084">
                <text:p>-0.01030084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06933284">
                <text:p>0.0006933284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2774956">
                <text:p>0.00277495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7642152">
                <text:p>-0.007642152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01600938">
                <text:p>0.0001600938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9415797">
                <text:p>0.009415797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3575456">
                <text:p>0.003575456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-0.0002423782">
                <text:p>-0.000242378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6169158">
                <text:p>0.006169158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516936">
                <text:p>0.02516936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7629063">
                <text:p>-0.007629063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910376">
                <text:p>-0.00910376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214598">
                <text:p>0.01214598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576365">
                <text:p>0.004576365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2867432">
                <text:p>-0.002867432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29912">
                <text:p>0.0029912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835692">
                <text:p>0.005835692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2416841">
                <text:p>-0.002416841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319872">
                <text:p>0.0131987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6929021">
                <text:p>0.006929021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49793">
                <text:p>0.0149793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5280652">
                <text:p>-0.005280652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138465">
                <text:p>0.00138465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7682513">
                <text:p>-0.007682513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2984377">
                <text:p>-0.002984377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8236655">
                <text:p>0.008236655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865709">
                <text:p>0.008865709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5153147">
                <text:p>0.005153147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3548165">
                <text:p>-0.003548165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849352">
                <text:p>0.0184935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5544453">
                <text:p>-0.005544453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5818116">
                <text:p>-0.005818116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6665558">
                <text:p>-0.006665558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1605932">
                <text:p>-0.001605932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3663003">
                <text:p>0.003663003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4170424">
                <text:p>-0.004170424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3317882">
                <text:p>-0.00331788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5995217">
                <text:p>-0.005995217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8858141">
                <text:p>-0.008858141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3970848">
                <text:p>-0.003970848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04381544">
                <text:p>-0.000438154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2349408">
                <text:p>0.002349408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3256405">
                <text:p>-0.003256405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-0.0008396403">
                <text:p>-0.000839640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7641095">
                <text:p>0.007641095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1130115">
                <text:p>0.00113011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669631">
                <text:p>0.006669631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8230546">
                <text:p>-0.008230546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1007433">
                <text:p>-0.01007433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2766062">
                <text:p>-0.00276606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6342047">
                <text:p>0.006342047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-0.0003762287">
                <text:p>-0.0003762287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797493">
                <text:p>-0.00797493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7256975">
                <text:p>-0.007256975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2707726">
                <text:p>-0.002707726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902359">
                <text:p>0.01902359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641032">
                <text:p>0.00364103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1396562">
                <text:p>-0.00139656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2954426">
                <text:p>0.002954426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6415266">
                <text:p>0.006415266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9596448">
                <text:p>0.009596448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2451585">
                <text:p>0.002451585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281291">
                <text:p>0.00281291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607704">
                <text:p>-0.00607704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1004447">
                <text:p>0.001004447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5194503">
                <text:p>0.005194503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240864">
                <text:p>0.00324086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309637">
                <text:p>0.01309637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8313246">
                <text:p>0.008313246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199213">
                <text:p>0.01199213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1278491">
                <text:p>-0.001278491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54231">
                <text:p>0.0054231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655868">
                <text:p>0.00655868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4026999">
                <text:p>0.00402699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3057014">
                <text:p>0.003057014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8683586">
                <text:p>-0.008683586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6268407">
                <text:p>0.006268407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849527">
                <text:p>0.00284952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5656693">
                <text:p>0.005656693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838937">
                <text:p>0.004838937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2350939">
                <text:p>-0.002350939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657259">
                <text:p>0.0165725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5007044">
                <text:p>0.005007044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5432315">
                <text:p>-0.005432315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1338108">
                <text:p>-0.00133810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6605244">
                <text:p>-0.006605244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328518">
                <text:p>0.0132851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3762006">
                <text:p>-0.003762006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7816886">
                <text:p>0.007816886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0.0008528034">
                <text:p>0.0008528034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-0.0004927479">
                <text:p>-0.000492747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4489316">
                <text:p>-0.0044893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1109196">
                <text:p>-0.01109196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3247235">
                <text:p>-0.003247235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1061012">
                <text:p>-0.0106101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4609893">
                <text:p>-0.004609893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3231303">
                <text:p>-0.00323130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1184219">
                <text:p>-0.00118421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1046962">
                <text:p>0.01046962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449758">
                <text:p>0.01449758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8244566">
                <text:p>-0.008244566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9182453">
                <text:p>0.00918245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03777672">
                <text:p>0.0003777672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7523544">
                <text:p>-0.007523544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6059035">
                <text:p>-0.00605903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411424">
                <text:p>0.02411424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6695008">
                <text:p>-0.006695008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-0.0004822711">
                <text:p>-0.0004822711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9705927">
                <text:p>0.009705927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05939376">
                <text:p>-0.0005939376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2006577">
                <text:p>0.02006577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2994651">
                <text:p>-0.002994651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6772464">
                <text:p>0.00677246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8304427">
                <text:p>0.008304427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2576261">
                <text:p>0.002576261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6146224">
                <text:p>-0.006146224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-0.0002022733">
                <text:p>-0.0002022733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1907797">
                <text:p>-0.001907797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3670295">
                <text:p>-0.003670295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4900984">
                <text:p>0.004900984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350632">
                <text:p>0.0135063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06305109">
                <text:p>0.000630510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1073204">
                <text:p>-0.01073204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3151089">
                <text:p>0.003151089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9611327">
                <text:p>-0.009611327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7072457">
                <text:p>-0.007072457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802093">
                <text:p>-0.00802093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3364981">
                <text:p>0.0336498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832417">
                <text:p>-0.00832417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900335">
                <text:p>-0.05900335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6072099">
                <text:p>-0.06072099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6219112">
                <text:p>-0.06219112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6245123">
                <text:p>-0.06245123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319389">
                <text:p>-0.0631938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6340259">
                <text:p>-0.06340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