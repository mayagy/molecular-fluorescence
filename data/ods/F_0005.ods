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939624">
            <text:p>0.006939624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242109">
            <text:p>0.001242109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398135">
            <text:p>0.003398135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481453">
            <text:p>0.01481453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9535124">
            <text:p>0.009535124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275101">
            <text:p>0.005275101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872682">
            <text:p>0.01872682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945492">
            <text:p>-0.001945492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1053009">
            <text:p>0.001053009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728858">
            <text:p>0.006728858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1097509">
            <text:p>0.01097509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369084">
            <text:p>0.01369084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3378506">
            <text:p>-0.003378506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100545">
            <text:p>0.002100545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-0.000237412">
            <text:p>-0.000237412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37732">
            <text:p>0.00737732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535989">
            <text:p>-0.002535989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2642848">
            <text:p>0.002642848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4581587">
            <text:p>0.04581587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8040567">
            <text:p>-0.008040567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4217674">
            <text:p>-0.004217674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22323">
            <text:p>0.0122323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990967">
            <text:p>0.01990967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2010483">
            <text:p>-0.002010483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6704777">
            <text:p>-0.006704777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448208">
            <text:p>0.004448208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5690821">
            <text:p>-0.005690821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852119">
            <text:p>0.002852119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1095736">
            <text:p>0.01095736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96368">
            <text:p>0.00396368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1246325">
            <text:p>0.001246325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2142344">
            <text:p>0.02142344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934974">
            <text:p>-0.00934974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173448">
            <text:p>0.001173448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5783855">
            <text:p>0.0005783855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4269317">
            <text:p>-0.004269317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410451">
            <text:p>0.003410451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121804">
            <text:p>0.005121804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824531">
            <text:p>0.003824531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6414162">
            <text:p>0.006414162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933256">
            <text:p>0.003933256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07126539">
            <text:p>0.0007126539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247809">
            <text:p>0.008247809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930915">
            <text:p>0.01930915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538699">
            <text:p>-0.00538699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103089">
            <text:p>0.0103089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764467">
            <text:p>0.02764467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2032218">
            <text:p>0.02032218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716317">
            <text:p>0.005716317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1090381">
            <text:p>0.01090381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325555">
            <text:p>0.004325555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874615">
            <text:p>0.007874615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2331277">
            <text:p>-0.002331277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290203">
            <text:p>0.005290203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2316949">
            <text:p>0.02316949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1902672">
            <text:p>-0.001902672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1098616">
            <text:p>0.01098616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3985611">
            <text:p>-0.003985611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8829585">
            <text:p>-0.008829585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1116774">
            <text:p>-0.001116774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762119">
            <text:p>0.003762119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7075827">
            <text:p>0.007075827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3677618">
            <text:p>-0.003677618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926712">
            <text:p>-0.001926712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9545877">
            <text:p>-0.009545877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181072">
            <text:p>0.002181072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630545">
            <text:p>0.02630545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488527">
            <text:p>0.001488527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1066483">
            <text:p>0.01066483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367574">
            <text:p>0.009367574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881455">
            <text:p>0.01881455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907251">
            <text:p>-0.002907251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4710789">
            <text:p>-0.004710789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string">
            <text:p>5.71552E-05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2652646">
            <text:p>0.002652646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3723433">
            <text:p>-0.003723433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9751642">
            <text:p>0.009751642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882079">
            <text:p>0.04882079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1278959">
            <text:p>0.001278959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57316">
            <text:p>0.00157316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1002566">
            <text:p>-0.01002566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909708">
            <text:p>0.01909708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516991">
            <text:p>0.009516991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1133818">
            <text:p>0.01133818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4509485">
            <text:p>-0.004509485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688049">
            <text:p>0.005688049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834333">
            <text:p>0.01834333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333291">
            <text:p>0.01333291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509362">
            <text:p>0.03509362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11403">
            <text:p>0.0111403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403047">
            <text:p>0.02403047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5281389">
            <text:p>-0.005281389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5114641">
            <text:p>-0.005114641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2639378">
            <text:p>0.002639378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712239">
            <text:p>0.009712239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8388762">
            <text:p>-0.0008388762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4665161">
            <text:p>-0.004665161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677216">
            <text:p>0.006677216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1370342">
            <text:p>-0.001370342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1141458">
            <text:p>-0.01141458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4396603">
            <text:p>-0.004396603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285246">
            <text:p>0.02285246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465832">
            <text:p>0.01465832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5171554">
            <text:p>0.005171554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9392167">
            <text:p>-0.009392167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string">
            <text:p>9.025302E-05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03009486">
            <text:p>-0.0003009486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395257">
            <text:p>0.005395257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991388">
            <text:p>0.05991388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3694835">
            <text:p>-0.003694835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1098535">
            <text:p>0.001098535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815918">
            <text:p>0.001815918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8026891">
            <text:p>-0.008026891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071384">
            <text:p>0.008071384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2592406">
            <text:p>0.002592406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318276">
            <text:p>-0.01318276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-0.0005980033">
            <text:p>-0.0005980033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325224">
            <text:p>0.005325224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1890102">
            <text:p>-0.001890102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4323519">
            <text:p>0.0004323519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7548638">
            <text:p>-0.007548638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831663">
            <text:p>0.01831663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1605339">
            <text:p>-0.001605339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247896">
            <text:p>0.009247896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9287293">
            <text:p>0.009287293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8632403">
            <text:p>0.008632403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2454167">
            <text:p>0.0002454167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7568528">
            <text:p>0.007568528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883554">
            <text:p>0.00883554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568447">
            <text:p>0.03568447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136959">
            <text:p>0.009136959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8133514">
            <text:p>0.008133514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287156">
            <text:p>-0.001287156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52125">
            <text:p>0.01052125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419282">
            <text:p>0.02419282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6886915">
            <text:p>-0.006886915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3433207">
            <text:p>0.003433207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978305">
            <text:p>0.01978305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3552757">
            <text:p>0.003552757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6447115">
            <text:p>-0.006447115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3283652">
            <text:p>-0.003283652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306321">
            <text:p>-0.00306321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210452">
            <text:p>0.002210452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8288323">
            <text:p>-0.008288323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1071381">
            <text:p>-0.01071381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857081">
            <text:p>0.02857081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03245562">
            <text:p>0.0003245562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520543">
            <text:p>0.003520543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4582907">
            <text:p>-0.004582907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254535">
            <text:p>-0.00254535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4826713">
            <text:p>-0.004826713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995162">
            <text:p>-0.003995162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324014">
            <text:p>-0.00324014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464321">
            <text:p>0.01464321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203097">
            <text:p>0.01203097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3209349">
            <text:p>-0.003209349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971359">
            <text:p>0.02971359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782216">
            <text:p>0.005782216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397871">
            <text:p>0.01397871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5698102">
            <text:p>-0.005698102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5240686">
            <text:p>-0.005240686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718626">
            <text:p>0.003718626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711943">
            <text:p>0.009711943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6935261">
            <text:p>-0.006935261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1067837">
            <text:p>0.01067837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01976">
            <text:p>0.00201976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205135">
            <text:p>0.01205135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967533">
            <text:p>0.003967533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3795559">
            <text:p>0.003795559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-0.0005651404">
            <text:p>-0.0005651404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934694">
            <text:p>0.01934694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67142">
            <text:p>0.00267142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2072307">
            <text:p>0.02072307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70952">
            <text:p>0.0070952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9776081">
            <text:p>0.009776081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9729155">
            <text:p>-0.009729155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209858">
            <text:p>0.0209858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990634">
            <text:p>0.01990634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744366">
            <text:p>0.01744366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5533959">
            <text:p>-0.005533959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string">
            <text:p>-8.060127E-05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3233601">
            <text:p>-0.003233601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452026">
            <text:p>-0.00452026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788752">
            <text:p>0.01788752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6120363">
            <text:p>0.006120363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729468">
            <text:p>0.02729468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31311">
            <text:p>0.0231311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822986">
            <text:p>0.01822986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2538542">
            <text:p>-0.002538542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3872776">
            <text:p>-0.003872776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-0.0001980829">
            <text:p>-0.0001980829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205473">
            <text:p>0.01205473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691645">
            <text:p>0.004691645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1382102">
            <text:p>-0.001382102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307569">
            <text:p>0.01307569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5243786">
            <text:p>-0.005243786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8248767">
            <text:p>0.008248767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843752">
            <text:p>0.01843752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86747">
            <text:p>0.01386747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3648303">
            <text:p>-0.003648303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8765342">
            <text:p>-0.008765342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327346">
            <text:p>0.009327346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06664375">
            <text:p>0.0006664375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4062502">
            <text:p>-0.004062502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4948634">
            <text:p>-0.004948634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04568634">
            <text:p>0.0004568634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624286">
            <text:p>0.004624286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1122966">
            <text:p>-0.01122966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256533">
            <text:p>0.01256533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3759532">
            <text:p>-0.003759532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5778498">
            <text:p>0.005778498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5781875">
            <text:p>-0.005781875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3395114">
            <text:p>-0.0003395114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9081583">
            <text:p>-0.0009081583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-0.001426995">
            <text:p>-0.001426995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7010199">
            <text:p>0.007010199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298843">
            <text:p>0.01298843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3091537">
            <text:p>-0.003091537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09401579">
            <text:p>0.0009401579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722358">
            <text:p>0.02722358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8286404">
            <text:p>-0.008286404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6320244">
            <text:p>-0.006320244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728911">
            <text:p>0.003728911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2596779">
            <text:p>-0.002596779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266218">
            <text:p>0.01266218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323866">
            <text:p>0.01323866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726464">
            <text:p>-0.001726464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660304">
            <text:p>-0.003660304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5890235">
            <text:p>-0.005890235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420797">
            <text:p>0.002420797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3795591">
            <text:p>-0.003795591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5309419">
            <text:p>-0.005309419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223832">
            <text:p>0.001223832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265278">
            <text:p>0.01265278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570254">
            <text:p>0.03570254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1083032">
            <text:p>-0.01083032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1041136">
            <text:p>-0.01041136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2782234">
            <text:p>0.002782234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358449">
            <text:p>-0.00358449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6278614">
            <text:p>0.006278614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487313">
            <text:p>-0.01487313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396415">
            <text:p>0.003396415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3010566">
            <text:p>-0.003010566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177106">
            <text:p>0.002177106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8784933">
            <text:p>0.008784933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-0.0002732229">
            <text:p>-0.0002732229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497389">
            <text:p>0.01497389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1018288">
            <text:p>-0.01018288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7133963">
            <text:p>-0.0007133963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3025479">
            <text:p>-0.003025479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429457">
            <text:p>0.02429457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1330625">
            <text:p>-0.0001330625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4994282">
            <text:p>0.004994282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-0.0002132727">
            <text:p>-0.0002132727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291957">
            <text:p>0.01291957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1004938">
            <text:p>-0.01004938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1170072">
            <text:p>-0.01170072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789698">
            <text:p>0.009789698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48011">
            <text:p>0.00348011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8405532">
            <text:p>-0.008405532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5163863">
            <text:p>-0.005163863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638584">
            <text:p>0.01638584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15222">
            <text:p>0.0115222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174783">
            <text:p>0.01174783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8957076">
            <text:p>-0.008957076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2268103">
            <text:p>-0.002268103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4314236">
            <text:p>0.004314236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444023">
            <text:p>0.003444023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594543">
            <text:p>0.005594543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884595">
            <text:p>0.004884595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627807">
            <text:p>0.01627807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222089">
            <text:p>-0.01222089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4324867">
            <text:p>0.004324867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512252">
            <text:p>0.002512252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392431">
            <text:p>0.01392431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1030147">
            <text:p>0.01030147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1151425">
            <text:p>-0.01151425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81627">
            <text:p>0.01181627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03080507">
            <text:p>0.0003080507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109818">
            <text:p>-0.0109818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375071">
            <text:p>0.001375071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1539148">
            <text:p>-0.001539148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139691">
            <text:p>0.002139691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6294512">
            <text:p>0.006294512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09946">
            <text:p>-0.00209946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1769458">
            <text:p>0.001769458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939467">
            <text:p>0.01939467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6907296">
            <text:p>-0.006907296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8502726">
            <text:p>-0.008502726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824053">
            <text:p>0.01824053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2675">
            <text:p>0.012675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1482891">
            <text:p>-0.001482891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3310466">
            <text:p>-0.003310466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228378">
            <text:p>0.005228378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625922">
            <text:p>0.004625922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1143304">
            <text:p>0.01143304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601077">
            <text:p>-0.001601077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562145">
            <text:p>-0.00562145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811359">
            <text:p>0.01811359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6895495">
            <text:p>-0.006895495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6635228">
            <text:p>0.006635228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1785643">
            <text:p>0.001785643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4575761">
            <text:p>0.004575761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5379607">
            <text:p>0.005379607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976523">
            <text:p>0.004976523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07504257">
            <text:p>0.0007504257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342107">
            <text:p>0.01342107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06923343">
            <text:p>0.0006923343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9452537">
            <text:p>0.009452537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3421597">
            <text:p>-0.003421597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273067">
            <text:p>0.004273067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885901">
            <text:p>0.003885901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449176">
            <text:p>0.001449176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102653">
            <text:p>0.0102653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478727">
            <text:p>0.01478727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783339">
            <text:p>0.01783339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8126131">
            <text:p>-0.008126131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173437">
            <text:p>0.01173437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4051827">
            <text:p>-0.004051827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7339951">
            <text:p>-0.007339951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4008383">
            <text:p>0.004008383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2646193">
            <text:p>0.002646193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1365027">
            <text:p>-0.001365027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7888298">
            <text:p>-0.007888298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7196488">
            <text:p>-0.007196488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9643798">
            <text:p>-0.009643798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109417">
            <text:p>-0.0109417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1486754">
            <text:p>0.0001486754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397764">
            <text:p>0.005397764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486374">
            <text:p>0.003486374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781168">
            <text:p>0.008781168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5466547">
            <text:p>-0.005466547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1717312">
            <text:p>-0.001717312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766514">
            <text:p>0.01766514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03253805">
            <text:p>0.0003253805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1995193">
            <text:p>-0.001995193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315263">
            <text:p>0.01315263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243879">
            <text:p>0.01243879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1274081">
            <text:p>0.001274081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9019295">
            <text:p>0.009019295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665006">
            <text:p>-0.00665006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66516">
            <text:p>0.00166516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56064">
            <text:p>0.01056064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7155178">
            <text:p>-0.007155178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948249">
            <text:p>0.002948249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755918">
            <text:p>0.01755918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169886">
            <text:p>0.005169886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235581">
            <text:p>0.00235581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1193519">
            <text:p>-0.01193519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316144">
            <text:p>0.01316144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67177">
            <text:p>-0.00067177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2632146">
            <text:p>-0.002632146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string">
            <text:p>-4.453098E-05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222182">
            <text:p>0.007222182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721857">
            <text:p>-0.00721857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546571">
            <text:p>0.01546571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324124">
            <text:p>0.01324124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17149">
            <text:p>0.0117149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278439">
            <text:p>0.00278439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4121464">
            <text:p>0.004121464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831357">
            <text:p>-0.003831357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09401701">
            <text:p>0.0009401701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1013066">
            <text:p>-0.01013066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string">
            <text:p>4.966341E-05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-0.0003287641">
            <text:p>-0.0003287641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08219578">
            <text:p>0.0008219578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1501838">
            <text:p>0.001501838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8609494">
            <text:p>-0.008609494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6585588">
            <text:p>-0.006585588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9799233">
            <text:p>0.009799233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1754252">
            <text:p>0.001754252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1219776">
            <text:p>-0.001219776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1577661">
            <text:p>-0.001577661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59503">
            <text:p>0.00359503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2176797">
            <text:p>0.02176797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21195">
            <text:p>0.0121195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2834205">
            <text:p>-0.002834205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3508795">
            <text:p>-0.003508795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9491558">
            <text:p>0.009491558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354376">
            <text:p>0.01354376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280799">
            <text:p>0.001280799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09277092">
            <text:p>-0.0009277092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1952087">
            <text:p>-0.001952087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5941517">
            <text:p>0.005941517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363916">
            <text:p>0.006363916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7975442">
            <text:p>-0.007975442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608983">
            <text:p>0.01608983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729556">
            <text:p>0.008729556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79718">
            <text:p>0.00579718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6580099">
            <text:p>-0.006580099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899154">
            <text:p>-0.00899154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789428">
            <text:p>-0.004789428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3662914">
            <text:p>-0.003662914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6537191">
            <text:p>-0.006537191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125675">
            <text:p>0.007125675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213184">
            <text:p>0.01213184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4111758">
            <text:p>0.004111758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5530258">
            <text:p>0.005530258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5893494">
            <text:p>-0.005893494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762445">
            <text:p>-0.00762445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1050199">
            <text:p>-0.01050199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53493">
            <text:p>0.01053493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333752">
            <text:p>0.0333752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837302">
            <text:p>0.004837302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8419706">
            <text:p>0.008419706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537605">
            <text:p>0.009537605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2533723">
            <text:p>-0.002533723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137328">
            <text:p>0.01137328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785539">
            <text:p>0.003785539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602899">
            <text:p>0.004602899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3696031">
            <text:p>-0.003696031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09154743">
            <text:p>-0.0009154743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7873081">
            <text:p>-0.0007873081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942253">
            <text:p>0.001942253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2661803">
            <text:p>-0.002661803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176147">
            <text:p>0.01176147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997119">
            <text:p>-0.003997119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-0.0006118197">
            <text:p>-0.0006118197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43196">
            <text:p>0.0143196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752675">
            <text:p>0.01752675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360288">
            <text:p>0.02360288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32531">
            <text:p>0.01032531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8263499">
            <text:p>-0.008263499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4442518">
            <text:p>-0.004442518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1064107">
            <text:p>-0.01064107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1048712">
            <text:p>-0.01048712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-0.001610516">
            <text:p>-0.001610516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40917">
            <text:p>-0.00340917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-0.0001225305">
            <text:p>-0.0001225305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1883539">
            <text:p>-0.001883539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294371">
            <text:p>0.00294371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9665656">
            <text:p>0.009665656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8235889">
            <text:p>-0.008235889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4640736">
            <text:p>-0.004640736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223832">
            <text:p>-0.01223832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string">
            <text:p>3.284344E-05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1118586">
            <text:p>-0.01118586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1098908">
            <text:p>-0.01098908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9971204">
            <text:p>-0.009971204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1257458">
            <text:p>-0.001257458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395427">
            <text:p>0.003395427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731034">
            <text:p>0.00731034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5834616">
            <text:p>-0.005834616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236532">
            <text:p>0.002236532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7113348">
            <text:p>-0.007113348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1004376">
            <text:p>0.01004376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7796332">
            <text:p>0.007796332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185777">
            <text:p>0.02185777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362421">
            <text:p>0.01362421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798971">
            <text:p>0.002798971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5076318">
            <text:p>-0.005076318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1142649">
            <text:p>-0.01142649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639412">
            <text:p>0.007639412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8888061">
            <text:p>-0.008888061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431197">
            <text:p>0.004431197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7337645">
            <text:p>-0.007337645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5838104">
            <text:p>-0.005838104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01698123">
            <text:p>0.0001698123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421717">
            <text:p>0.01421717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9992328">
            <text:p>-0.009992328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6743249">
            <text:p>-0.006743249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1036353">
            <text:p>-0.01036353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238261">
            <text:p>0.003238261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6418326">
            <text:p>-0.006418326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798939">
            <text:p>-0.00798939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7199013">
            <text:p>-0.007199013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9058026">
            <text:p>-0.0009058026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502813">
            <text:p>0.002502813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175231">
            <text:p>-0.01175231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2917115">
            <text:p>0.0002917115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34896">
            <text:p>0.00634896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198453">
            <text:p>-0.01198453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869915">
            <text:p>-0.001869915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498743">
            <text:p>0.03498743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2569957">
            <text:p>-0.002569957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-0.0003038307">
            <text:p>-0.0003038307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8669825">
            <text:p>-0.008669825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271013">
            <text:p>0.01271013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5662004">
            <text:p>0.005662004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6259714">
            <text:p>-0.006259714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1150302">
            <text:p>-0.001150302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6632127">
            <text:p>-0.006632127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1014452">
            <text:p>-0.01014452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4579097">
            <text:p>-0.004579097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7002193">
            <text:p>-0.007002193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7259312">
            <text:p>0.007259312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1056561">
            <text:p>0.01056561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5323588">
            <text:p>-0.005323588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2032288">
            <text:p>-0.002032288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2150596">
            <text:p>-0.002150596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1614307">
            <text:p>-0.001614307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4557941">
            <text:p>-0.004557941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9720903">
            <text:p>-0.009720903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2448833">
            <text:p>0.002448833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929626">
            <text:p>-0.001929626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8648291">
            <text:p>0.008648291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2081583">
            <text:p>-0.002081583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5421733">
            <text:p>-0.005421733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3167745">
            <text:p>-0.003167745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8131403">
            <text:p>-0.008131403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string">
            <text:p>-3.487618E-05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3473659">
            <text:p>-0.003473659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268031">
            <text:p>-0.01268031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1089985">
            <text:p>-0.001089985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2520812">
            <text:p>-0.002520812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05278328">
            <text:p>0.0005278328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46999">
            <text:p>0.0146999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770181">
            <text:p>0.01770181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6145019">
            <text:p>-0.006145019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987744">
            <text:p>0.003987744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8376682">
            <text:p>-0.008376682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6713646">
            <text:p>0.006713646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5289314">
            <text:p>-0.005289314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434875">
            <text:p>0.002434875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7951343">
            <text:p>-0.007951343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8697477">
            <text:p>-0.008697477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4252092">
            <text:p>-0.004252092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375764">
            <text:p>0.01375764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3608">
            <text:p>0.0103608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8143541">
            <text:p>-0.008143541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4165143">
            <text:p>-0.0004165143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5637809">
            <text:p>0.005637809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string">
            <text:p>-5.50319E-05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2173121">
            <text:p>0.002173121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302947">
            <text:p>0.00302947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5087211">
            <text:p>0.005087211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155722">
            <text:p>0.01155722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8216034">
            <text:p>-0.008216034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719082">
            <text:p>0.00719082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268302">
            <text:p>-0.01268302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937591">
            <text:p>-0.00937591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3189551">
            <text:p>-0.003189551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200773">
            <text:p>0.01200773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735636">
            <text:p>-0.00735636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3528656">
            <text:p>-0.003528656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7043061">
            <text:p>-0.007043061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271708">
            <text:p>0.01271708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7317579">
            <text:p>0.007317579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395614">
            <text:p>-0.01395614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1021532">
            <text:p>-0.01021532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2236413">
            <text:p>-0.002236413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247585">
            <text:p>-0.01247585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635609">
            <text:p>0.01635609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27734">
            <text:p>-0.00127734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6914337">
            <text:p>-0.006914337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7449719">
            <text:p>-0.007449719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5910074">
            <text:p>-0.005910074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310197">
            <text:p>0.01310197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129846">
            <text:p>0.01129846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394381">
            <text:p>0.01394381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1117436">
            <text:p>0.01117436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7792758">
            <text:p>-0.007792758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1028331">
            <text:p>0.01028331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-0.0001089651">
            <text:p>-0.0001089651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762436">
            <text:p>0.004762436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6561293">
            <text:p>-0.006561293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093139">
            <text:p>0.004093139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860797">
            <text:p>0.01860797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3847951">
            <text:p>-0.003847951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8466146">
            <text:p>0.008466146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4558338">
            <text:p>0.004558338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1073838">
            <text:p>0.01073838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225055">
            <text:p>0.003225055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483516">
            <text:p>0.01483516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68675">
            <text:p>0.00368675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2941191">
            <text:p>-0.002941191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1585684">
            <text:p>-0.001585684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347851">
            <text:p>0.01347851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59698">
            <text:p>0.0159698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2811421">
            <text:p>-0.0002811421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2130225">
            <text:p>-0.002130225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1086179">
            <text:p>-0.01086179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265272">
            <text:p>0.01265272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9606155">
            <text:p>-0.009606155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263782">
            <text:p>0.01263782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321442">
            <text:p>0.01321442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1171221">
            <text:p>-0.01171221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4779937">
            <text:p>-0.004779937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823976">
            <text:p>0.01823976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78468">
            <text:p>0.01378468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7442238">
            <text:p>-0.007442238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677537">
            <text:p>0.01677537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9300943">
            <text:p>0.009300943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4670472">
            <text:p>-0.004670472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3688607">
            <text:p>0.003688607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5233727">
            <text:p>-0.005233727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9928769">
            <text:p>-0.009928769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87388">
            <text:p>0.01287388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4076043">
            <text:p>-0.004076043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47334">
            <text:p>0.0147334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-0.0008907777">
            <text:p>-0.0008907777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8104311">
            <text:p>0.008104311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121028">
            <text:p>0.002121028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765218">
            <text:p>0.002765218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190705">
            <text:p>0.003190705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4091666">
            <text:p>0.0004091666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3791024">
            <text:p>-0.003791024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5975476">
            <text:p>-0.005975476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9469537">
            <text:p>0.009469537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6927378">
            <text:p>-0.006927378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608979">
            <text:p>0.01608979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213393">
            <text:p>0.004213393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5108511">
            <text:p>-0.0005108511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string">
            <text:p>-6.698902E-05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569497">
            <text:p>0.01569497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094886">
            <text:p>0.002094886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698579">
            <text:p>0.004698579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339282">
            <text:p>0.001339282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06941595">
            <text:p>0.0006941595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548886">
            <text:p>-0.00548886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9699884">
            <text:p>-0.009699884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350062">
            <text:p>0.006350062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5041572">
            <text:p>0.005041572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09591073">
            <text:p>-0.0009591073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102147">
            <text:p>-0.0102147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722259">
            <text:p>0.002722259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2065985">
            <text:p>-0.002065985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05240124">
            <text:p>0.0005240124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3115084">
            <text:p>-0.003115084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043525">
            <text:p>0.004043525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769587">
            <text:p>-0.003769587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514432">
            <text:p>0.01514432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4260461">
            <text:p>-0.004260461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4244397">
            <text:p>-0.004244397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2865886">
            <text:p>-0.002865886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3293502">
            <text:p>-0.003293502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55267">
            <text:p>0.0155267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-0.0004757187">
            <text:p>-0.0004757187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-0.0001286981">
            <text:p>-0.0001286981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581099">
            <text:p>0.001581099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4098477">
            <text:p>-0.004098477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687495">
            <text:p>0.01687495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8390092">
            <text:p>0.0008390092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2000362">
            <text:p>0.000200036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8718797">
            <text:p>-0.008718797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862112">
            <text:p>0.01862112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2261208">
            <text:p>-0.002261208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408044">
            <text:p>0.01408044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1116009">
            <text:p>-0.01116009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3313003">
            <text:p>0.003313003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111434">
            <text:p>-0.0111434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358459">
            <text:p>0.01358459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075265">
            <text:p>0.002075265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9994452">
            <text:p>-0.009994452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-0.001065519">
            <text:p>-0.001065519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86775">
            <text:p>0.0186775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309932">
            <text:p>0.01309932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5493889">
            <text:p>-0.005493889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9812812">
            <text:p>-0.009812812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1180799">
            <text:p>-0.001180799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-0.001242838">
            <text:p>-0.001242838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1336">
            <text:p>0.0041336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654599">
            <text:p>0.01654599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5060034">
            <text:p>-0.005060034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3009716">
            <text:p>-0.003009716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7240362">
            <text:p>-0.007240362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168942">
            <text:p>-0.01168942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1882913">
            <text:p>0.0001882913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7895864">
            <text:p>-0.007895864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367723">
            <text:p>0.01367723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435038">
            <text:p>0.02435038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8377673">
            <text:p>-0.008377673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614512">
            <text:p>0.001614512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792564">
            <text:p>0.005792564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899389">
            <text:p>-0.001899389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9493926">
            <text:p>-0.009493926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753224">
            <text:p>0.003753224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4310469">
            <text:p>-0.004310469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334002">
            <text:p>0.008334002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4174459">
            <text:p>-0.004174459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1095059">
            <text:p>0.01095059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4129836">
            <text:p>-0.004129836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9808828">
            <text:p>-0.009808828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3623289">
            <text:p>-0.003623289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8660165">
            <text:p>-0.008660165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5104408">
            <text:p>0.05104408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4809495">
            <text:p>-0.004809495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154191">
            <text:p>0.003154191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334714">
            <text:p>0.002334714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5482582">
            <text:p>0.05482582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2471788">
            <text:p>-0.002471788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644868">
            <text:p>-0.001644868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7220677">
            <text:p>-0.007220677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990322">
            <text:p>-0.00990322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4468913">
            <text:p>-0.004468913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41671">
            <text:p>0.0141671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5013421">
            <text:p>-0.005013421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string">
            <text:p>9.149227E-05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5747033">
            <text:p>-0.005747033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7475771">
            <text:p>0.007475771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2616929">
            <text:p>0.002616929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4058308">
            <text:p>-0.004058308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6545547">
            <text:p>0.006545547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3983317">
            <text:p>-0.003983317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1796434">
            <text:p>0.001796434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2186064">
            <text:p>0.0002186064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5253996">
            <text:p>0.005253996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696264">
            <text:p>-0.003696264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5506837">
            <text:p>-0.005506837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3986319">
            <text:p>-0.003986319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2968933">
            <text:p>-0.002968933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2825547">
            <text:p>-0.002825547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9548609">
            <text:p>-0.009548609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7046747">
            <text:p>-0.007046747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5274927">
            <text:p>-0.005274927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432717">
            <text:p>0.02432717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3265754">
            <text:p>-0.003265754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82781">
            <text:p>0.0182781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5016489">
            <text:p>-0.005016489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9893802">
            <text:p>0.009893802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1007817">
            <text:p>-0.001007817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3328109">
            <text:p>-0.003328109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8731573">
            <text:p>-0.008731573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4853164">
            <text:p>-0.004853164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7714519">
            <text:p>-0.007714519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838839">
            <text:p>-0.000838839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3056433">
            <text:p>-0.003056433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420853">
            <text:p>0.002420853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3426776">
            <text:p>-0.003426776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5165025">
            <text:p>0.005165025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6050007">
            <text:p>-0.006050007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538101">
            <text:p>0.006538101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437806">
            <text:p>0.007437806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721706">
            <text:p>-0.001721706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220647">
            <text:p>0.005220647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5112307">
            <text:p>0.005112307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06133312">
            <text:p>0.0006133312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3091771">
            <text:p>-0.003091771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1103472">
            <text:p>-0.001103472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4382322">
            <text:p>-0.004382322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388544">
            <text:p>0.001388544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08538472">
            <text:p>0.0008538472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7285211">
            <text:p>-0.007285211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158021">
            <text:p>0.01158021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985395">
            <text:p>-0.002985395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2542618">
            <text:p>-0.002542618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-0.000374901">
            <text:p>-0.000374901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6834774">
            <text:p>0.006834774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415288">
            <text:p>0.005415288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21173">
            <text:p>0.00321173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515672">
            <text:p>0.01515672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572838">
            <text:p>0.002572838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369787">
            <text:p>0.01369787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1348509">
            <text:p>-0.001348509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7771578">
            <text:p>-0.007771578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467966">
            <text:p>0.002467966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951796">
            <text:p>-0.00951796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047274">
            <text:p>0.002047274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3532676">
            <text:p>-0.003532676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2225201">
            <text:p>-0.002225201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1634283">
            <text:p>-0.001634283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1120154">
            <text:p>-0.01120154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982127">
            <text:p>0.009982127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1119897">
            <text:p>-0.01119897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32437">
            <text:p>0.00532437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4751609">
            <text:p>0.004751609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3828714">
            <text:p>0.003828714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1082874">
            <text:p>-0.01082874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455498">
            <text:p>0.002455498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641043">
            <text:p>0.01641043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6332306">
            <text:p>-0.006332306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-0.0009072958">
            <text:p>-0.0009072958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3404754">
            <text:p>0.0003404754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438279">
            <text:p>0.009438279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371686">
            <text:p>-0.00371686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3705016">
            <text:p>-0.003705016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4557052">
            <text:p>-0.004557052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949079">
            <text:p>0.01949079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9141343">
            <text:p>-0.009141343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507196">
            <text:p>0.006507196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2845066">
            <text:p>-0.0002845066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7941647">
            <text:p>-0.007941647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-0.0006682367">
            <text:p>-0.0006682367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7912572">
            <text:p>-0.007912572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8754349">
            <text:p>-0.008754349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6380478">
            <text:p>-0.006380478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04163587">
            <text:p>0.0004163587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5511744">
            <text:p>-0.00551174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957303">
            <text:p>0.01957303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138875">
            <text:p>0.004138875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2989205">
            <text:p>-0.002989205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954816">
            <text:p>0.00954816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3893966">
            <text:p>-0.003893966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472718">
            <text:p>0.01472718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958477">
            <text:p>0.005958477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9983345">
            <text:p>0.009983345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056424">
            <text:p>0.003056424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307111">
            <text:p>0.02307111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391313">
            <text:p>-0.0139131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3178176">
            <text:p>-0.003178176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643819">
            <text:p>-0.00643819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2410399">
            <text:p>-0.002410399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4897169">
            <text:p>-0.004897169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3692085">
            <text:p>-0.003692085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8053081">
            <text:p>-0.008053081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827593">
            <text:p>0.001827593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587811">
            <text:p>0.002587811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1004295">
            <text:p>-0.01004295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371925">
            <text:p>-0.00371925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8078145">
            <text:p>-0.008078145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09250491">
            <text:p>0.0009250491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8786448">
            <text:p>-0.0008786448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335082">
            <text:p>0.001335082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3520321">
            <text:p>-0.003520321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612253">
            <text:p>0.003612253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830769">
            <text:p>0.002830769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48874">
            <text:p>-0.0048874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2183894">
            <text:p>0.02183894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8562482">
            <text:p>0.008562482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582663">
            <text:p>-0.00582663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3237957">
            <text:p>0.003237957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3109328">
            <text:p>0.03109328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663963">
            <text:p>0.006663963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634478">
            <text:p>0.01634478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8233932">
            <text:p>0.008233932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222883">
            <text:p>0.003222883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960357">
            <text:p>0.02960357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2787461">
            <text:p>0.002787461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682405">
            <text:p>0.02682405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0298638">
            <text:p>0.000298638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191994">
            <text:p>0.00191994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string">
            <text:p>-3.549031E-05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9778449">
            <text:p>-0.009778449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1025565">
            <text:p>0.01025565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1313502">
            <text:p>0.001313502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1081224">
            <text:p>-0.01081224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3501167">
            <text:p>-0.003501167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-0.0009871593">
            <text:p>-0.0009871593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2634845">
            <text:p>-0.002634845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1216946">
            <text:p>-0.01216946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8307613">
            <text:p>-0.008307613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2479104">
            <text:p>-0.002479104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111836">
            <text:p>0.000111836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4241629">
            <text:p>-0.004241629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2861818">
            <text:p>-0.002861818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8506828">
            <text:p>-0.008506828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1765246">
            <text:p>0.001765246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821887">
            <text:p>0.002821887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4178432">
            <text:p>-0.004178432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74982">
            <text:p>0.01274982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04833889">
            <text:p>0.0004833889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9623405">
            <text:p>0.009623405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255713">
            <text:p>-0.01255713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960947">
            <text:p>0.006960947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5590821">
            <text:p>-0.005590821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289668">
            <text:p>-0.003289668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484179">
            <text:p>0.004484179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032425">
            <text:p>0.002032425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-0.0002830631">
            <text:p>-0.0002830631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5534096">
            <text:p>-0.005534096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3693542">
            <text:p>-0.003693542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5635893">
            <text:p>-0.005635893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-0.0005739765">
            <text:p>-0.0005739765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8139345">
            <text:p>-0.008139345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7192906">
            <text:p>0.007192906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6117437">
            <text:p>-0.006117437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1168527">
            <text:p>-0.01168527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1112719">
            <text:p>-0.01112719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2518496">
            <text:p>-0.0002518496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4737636">
            <text:p>-0.004737636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4858126">
            <text:p>0.0004858126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5521418">
            <text:p>-0.005521418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5827258">
            <text:p>-0.005827258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string">
            <text:p>-1.919607E-05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4934363">
            <text:p>-0.004934363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7514954">
            <text:p>-0.007514954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386491">
            <text:p>0.01386491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2627259">
            <text:p>0.002627259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319099">
            <text:p>0.02319099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264232">
            <text:p>-0.01264232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7900662">
            <text:p>-0.007900662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02060713">
            <text:p>0.0002060713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1377433">
            <text:p>0.001377433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805994">
            <text:p>-0.01805994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9469611">
            <text:p>-0.009469611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569808">
            <text:p>0.03569808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691586">
            <text:p>0.01691586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066796">
            <text:p>0.005066796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6120757">
            <text:p>0.006120757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1711901">
            <text:p>0.0001711901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-0.0008735688">
            <text:p>-0.0008735688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116341">
            <text:p>0.001116341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977319">
            <text:p>0.003977319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7159933">
            <text:p>-0.007159933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1139939">
            <text:p>-0.01139939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8927755">
            <text:p>-0.008927755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1711594">
            <text:p>-0.001711594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174086">
            <text:p>0.01174086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141294">
            <text:p>0.006141294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1025125">
            <text:p>0.01025125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358013">
            <text:p>0.001358013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403427">
            <text:p>0.01403427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4963879">
            <text:p>-0.004963879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0.0004362002">
            <text:p>0.0004362002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9961461">
            <text:p>-0.009961461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7688363">
            <text:p>-0.007688363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6309405">
            <text:p>-0.006309405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701546">
            <text:p>0.002701546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5769015">
            <text:p>0.005769015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426993">
            <text:p>0.005426993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533353">
            <text:p>0.01533353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4753696">
            <text:p>-0.004753696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8089">
            <text:p>-0.0058089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149903">
            <text:p>0.001149903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277258">
            <text:p>0.01277258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1104375">
            <text:p>-0.01104375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4154689">
            <text:p>0.004154689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4463227">
            <text:p>-0.004463227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9485631">
            <text:p>0.009485631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7602493">
            <text:p>0.007602493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2356713">
            <text:p>-0.002356713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546914">
            <text:p>0.02546914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5108988">
            <text:p>-0.005108988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1022571">
            <text:p>-0.01022571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1081096">
            <text:p>-0.01081096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456734">
            <text:p>0.009456734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8950243">
            <text:p>-0.008950243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334528">
            <text:p>0.01334528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947408">
            <text:p>0.006947408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3695225">
            <text:p>-0.003695225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653801">
            <text:p>-0.00653801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330688">
            <text:p>0.002330688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1162959">
            <text:p>-0.01162959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54155">
            <text:p>0.01054155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8777673">
            <text:p>-0.0008777673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5383099">
            <text:p>-0.005383099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224725">
            <text:p>-0.01224725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399201">
            <text:p>0.004399201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200145">
            <text:p>0.01200145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7299482">
            <text:p>0.007299482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56746">
            <text:p>-0.0056746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240283">
            <text:p>0.00240283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17099">
            <text:p>-0.0017099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8437594">
            <text:p>-0.008437594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374778">
            <text:p>-0.00374778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77624">
            <text:p>0.0177624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6214264">
            <text:p>-0.006214264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839277">
            <text:p>-0.003839277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628792">
            <text:p>-0.01628792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2816611">
            <text:p>-0.002816611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279663">
            <text:p>0.005279663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094366">
            <text:p>0.005094366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6090216">
            <text:p>-0.006090216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8983198">
            <text:p>-0.008983198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625026">
            <text:p>0.003625026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294842">
            <text:p>0.01294842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502903">
            <text:p>-0.005502903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116187">
            <text:p>0.01116187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1225931">
            <text:p>-0.001225931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770533">
            <text:p>-0.002770533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217932">
            <text:p>0.00217932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401187">
            <text:p>0.008401187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36184">
            <text:p>0.00936184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5271426">
            <text:p>-0.005271426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5267912">
            <text:p>-0.005267912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505455">
            <text:p>0.003505455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714256">
            <text:p>0.002714256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6827298">
            <text:p>0.0006827298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1159909">
            <text:p>-0.01159909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222061">
            <text:p>0.002222061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4054231">
            <text:p>0.004054231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7106335">
            <text:p>-0.007106335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166816">
            <text:p>-0.01166816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3509327">
            <text:p>-0.003509327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863521">
            <text:p>0.008863521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3043633">
            <text:p>-0.003043633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8423189">
            <text:p>-0.008423189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4985659">
            <text:p>-0.004985659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19707">
            <text:p>0.00319707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9719796">
            <text:p>-0.0009719796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8456894">
            <text:p>0.008456894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8612786">
            <text:p>-0.008612786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539934">
            <text:p>-0.00539934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7832206">
            <text:p>-0.007832206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2090215">
            <text:p>0.02090215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977971">
            <text:p>0.02977971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-0.0003944444">
            <text:p>-0.0003944444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6548911">
            <text:p>-0.006548911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605058">
            <text:p>0.007605058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2526269">
            <text:p>-0.002526269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9009846">
            <text:p>0.009009846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934795">
            <text:p>0.00934795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5582962">
            <text:p>-0.005582962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318035">
            <text:p>0.01318035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4549553">
            <text:p>-0.004549553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6354432">
            <text:p>0.0006354432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3384026">
            <text:p>-0.003384026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331693">
            <text:p>0.006331693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2481195">
            <text:p>-0.002481195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447685">
            <text:p>-0.00447685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8154817">
            <text:p>-0.008154817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992129">
            <text:p>0.003992129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5581977">
            <text:p>-0.005581977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2903901">
            <text:p>-0.002903901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4840422">
            <text:p>-0.004840422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9850415">
            <text:p>0.009850415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220344">
            <text:p>0.01220344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929386">
            <text:p>0.006929386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222842">
            <text:p>0.02222842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8063688">
            <text:p>-0.008063688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3427947">
            <text:p>-0.003427947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1401226">
            <text:p>0.001401226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3707678">
            <text:p>0.003707678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5592066">
            <text:p>-0.005592066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407434">
            <text:p>0.01407434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958494">
            <text:p>0.01958494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702305">
            <text:p>0.008702305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2188832">
            <text:p>0.002188832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642739">
            <text:p>0.003642739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716092">
            <text:p>-0.001716092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250237">
            <text:p>0.004250237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4168011">
            <text:p>-0.004168011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844507">
            <text:p>-0.004844507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646974">
            <text:p>-0.00646974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672576">
            <text:p>0.01672576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168589">
            <text:p>-0.001168589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982016">
            <text:p>0.002982016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906969">
            <text:p>-0.00906969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7479792">
            <text:p>-0.007479792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479965">
            <text:p>0.02479965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5995388">
            <text:p>-0.005995388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3837325">
            <text:p>-0.003837325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6048379">
            <text:p>-0.006048379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122023">
            <text:p>0.002122023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3433848">
            <text:p>-0.003433848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2280318">
            <text:p>-0.002280318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5787244">
            <text:p>0.005787244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1009617">
            <text:p>-0.01009617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883764">
            <text:p>-0.00883764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6098555">
            <text:p>-0.006098555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36237">
            <text:p>0.0136237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2069457">
            <text:p>0.002069457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240413">
            <text:p>-0.01240413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2956303">
            <text:p>0.002956303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3342174">
            <text:p>-0.003342174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983333">
            <text:p>0.02983333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1765201">
            <text:p>-0.001765201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2261197">
            <text:p>-0.002261197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5644106">
            <text:p>0.005644106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1903072">
            <text:p>0.001903072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1176311">
            <text:p>-0.01176311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6097954">
            <text:p>0.006097954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269219">
            <text:p>0.00269219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1954746">
            <text:p>-0.001954746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2614797">
            <text:p>0.002614797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4014397">
            <text:p>0.004014397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-0.001328823">
            <text:p>-0.001328823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2538732">
            <text:p>-0.002538732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5034267">
            <text:p>0.005034267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5026894">
            <text:p>-0.005026894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95566">
            <text:p>0.01495566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3950994">
            <text:p>0.003950994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747554">
            <text:p>-0.00747554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217687">
            <text:p>-0.01217687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2549542">
            <text:p>-0.002549542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6985902">
            <text:p>0.006985902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1025938">
            <text:p>-0.01025938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391666">
            <text:p>-0.01391666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4451286">
            <text:p>-0.004451286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1662696">
            <text:p>0.001662696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1161034">
            <text:p>-0.01161034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8610939">
            <text:p>-0.008610939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025053">
            <text:p>0.003025053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267805">
            <text:p>0.02267805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6052193">
            <text:p>-0.006052193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1103263">
            <text:p>-0.01103263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9782228">
            <text:p>-0.009782228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6836136">
            <text:p>0.06836136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1591668">
            <text:p>-0.001591668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4642267">
            <text:p>-0.004642267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222415">
            <text:p>0.007222415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587863">
            <text:p>0.03587863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5847313">
            <text:p>-0.0005847313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986669">
            <text:p>-0.01986669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387999">
            <text:p>0.02387999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94299">
            <text:p>0.01094299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4378412">
            <text:p>-0.004378412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018184">
            <text:p>-0.002018184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4428146">
            <text:p>0.004428146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3056203">
            <text:p>-0.003056203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1080049">
            <text:p>0.0001080049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824322">
            <text:p>0.01824322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-0.0001804529">
            <text:p>-0.0001804529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5153273">
            <text:p>0.005153273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323964">
            <text:p>-0.01323964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039651">
            <text:p>0.001039651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958585">
            <text:p>0.00958585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8012022">
            <text:p>-0.008012022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3032499">
            <text:p>-0.0003032499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466378">
            <text:p>0.02466378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07426537">
            <text:p>0.0007426537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3824834">
            <text:p>-0.003824834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7796613">
            <text:p>-0.0007796613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3944706">
            <text:p>-0.003944706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8079316">
            <text:p>0.008079316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2984694">
            <text:p>0.002984694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584963">
            <text:p>-0.005584963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1977606">
            <text:p>-0.001977606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2314431">
            <text:p>0.002314431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8521215">
            <text:p>-0.008521215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1192734">
            <text:p>-0.01192734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189814">
            <text:p>0.00189814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65693">
            <text:p>-0.0065693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3038006">
            <text:p>0.003038006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971297">
            <text:p>0.02971297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507151">
            <text:p>-0.00507151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1634523">
            <text:p>-0.001634523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02755525">
            <text:p>0.0002755525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6021908">
            <text:p>-0.006021908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3748886">
            <text:p>-0.003748886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3921397">
            <text:p>0.003921397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686321">
            <text:p>0.006686321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429127">
            <text:p>-0.00429127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181259">
            <text:p>-0.01181259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511412">
            <text:p>0.005511412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1675913">
            <text:p>-0.001675913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81617">
            <text:p>-0.0081617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1450968">
            <text:p>0.001450968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-0.0008486697">
            <text:p>-0.0008486697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2960414">
            <text:p>0.002960414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5572234">
            <text:p>-0.005572234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1259213">
            <text:p>-0.001259213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4376543">
            <text:p>0.004376543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2170378">
            <text:p>0.002170378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5897315">
            <text:p>-0.005897315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1172514">
            <text:p>0.001172514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388042">
            <text:p>0.01388042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5441281">
            <text:p>-0.005441281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889492">
            <text:p>-0.002889492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4476591">
            <text:p>-0.004476591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497018">
            <text:p>0.01497018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642395">
            <text:p>0.001642395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985454">
            <text:p>0.003985454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9341761">
            <text:p>0.009341761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-0.0003314314">
            <text:p>-0.0003314314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091299">
            <text:p>0.003091299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7742981">
            <text:p>-0.007742981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1049285">
            <text:p>-0.01049285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9201865">
            <text:p>-0.009201865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214924">
            <text:p>0.01214924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9727873">
            <text:p>-0.009727873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379712">
            <text:p>-0.002379712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084423">
            <text:p>0.006084423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9638097">
            <text:p>0.009638097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269712">
            <text:p>0.01269712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1000551">
            <text:p>-0.01000551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3393616">
            <text:p>-0.003393616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3795321">
            <text:p>-0.003795321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356844">
            <text:p>-0.01356844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-0.0002439472">
            <text:p>-0.0002439472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559366">
            <text:p>0.01559366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5393919">
            <text:p>0.0005393919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090721">
            <text:p>0.01090721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289743">
            <text:p>-0.01289743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862315">
            <text:p>0.006862315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5131492">
            <text:p>-0.005131492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552829">
            <text:p>-0.002552829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540459">
            <text:p>-0.01540459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5101014">
            <text:p>0.005101014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1440745">
            <text:p>0.001440745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-0.0003759031">
            <text:p>-0.0003759031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441872">
            <text:p>-0.01441872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093328">
            <text:p>0.008093328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844776">
            <text:p>-0.00844776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211656">
            <text:p>-0.00211656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604479">
            <text:p>-0.01604479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-0.0009594791">
            <text:p>-0.0009594791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254322">
            <text:p>0.01254322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219876">
            <text:p>0.001219876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490177">
            <text:p>-0.01490177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799843">
            <text:p>0.007799843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051408">
            <text:p>0.01051408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8797068">
            <text:p>-0.008797068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2842106">
            <text:p>-0.002842106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1889641">
            <text:p>0.001889641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7605847">
            <text:p>0.007605847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304079">
            <text:p>-0.01304079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343271">
            <text:p>0.00343271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8857512">
            <text:p>0.008857512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4827816">
            <text:p>0.004827816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104891">
            <text:p>0.0104891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809027">
            <text:p>-0.00809027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4481493">
            <text:p>-0.004481493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633461">
            <text:p>0.005633461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214818">
            <text:p>-0.01214818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5026114">
            <text:p>-0.005026114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724875">
            <text:p>0.01724875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9000652">
            <text:p>-0.009000652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4846233">
            <text:p>-0.004846233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818069">
            <text:p>-0.003818069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08217299">
            <text:p>0.0008217299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4358098">
            <text:p>-0.004358098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318637">
            <text:p>-0.01318637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777411">
            <text:p>-0.01777411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130661">
            <text:p>0.006130661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192441">
            <text:p>0.008192441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7585242">
            <text:p>-0.007585242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386046">
            <text:p>-0.00386046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009048">
            <text:p>0.01009048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213535">
            <text:p>0.01213535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8643117">
            <text:p>-0.008643117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6925111">
            <text:p>-0.006925111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23389">
            <text:p>0.00723389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7919624">
            <text:p>0.007919624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1217313">
            <text:p>-0.01217313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225123">
            <text:p>-0.01225123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108959">
            <text:p>0.01108959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2372758">
            <text:p>-0.002372758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755588">
            <text:p>-0.00755588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5852896">
            <text:p>-0.005852896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7541002">
            <text:p>-0.007541002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990379">
            <text:p>0.008990379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1208635">
            <text:p>-0.01208635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72285">
            <text:p>-0.0172285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57014">
            <text:p>0.0157014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-0.001533894">
            <text:p>-0.001533894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359529">
            <text:p>-0.01359529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1060492">
            <text:p>0.01060492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448503">
            <text:p>0.002448503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41074">
            <text:p>0.00241074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587632">
            <text:p>-0.01587632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2120422">
            <text:p>0.02120422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9154961">
            <text:p>0.009154961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232255">
            <text:p>0.01232255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603332">
            <text:p>-0.001603332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07036689">
            <text:p>-0.0007036689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4428601">
            <text:p>-0.004428601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426987">
            <text:p>0.00426987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510952">
            <text:p>0.01510952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4872121">
            <text:p>0.0004872121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234012">
            <text:p>0.007234012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749296">
            <text:p>0.01749296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826463">
            <text:p>-0.00826463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2080577">
            <text:p>-0.002080577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58264">
            <text:p>0.01058264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871199">
            <text:p>0.03871199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311609">
            <text:p>0.01311609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8767967">
            <text:p>-0.008767967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3437605">
            <text:p>0.003437605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2829363">
            <text:p>-0.002829363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7570644">
            <text:p>0.007570644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6170385">
            <text:p>-0.006170385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8518543">
            <text:p>0.008518543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413117">
            <text:p>0.0413117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662898">
            <text:p>0.01662898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280898">
            <text:p>-0.01280898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5735565">
            <text:p>-0.005735565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14417">
            <text:p>0.01014417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3675525">
            <text:p>-0.003675525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283309">
            <text:p>0.008283309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446435">
            <text:p>0.01446435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07207598">
            <text:p>-0.0007207598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315895">
            <text:p>-0.01315895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2269421">
            <text:p>-0.002269421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6014474">
            <text:p>0.006014474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207775">
            <text:p>-0.001207775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1167405">
            <text:p>-0.01167405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8647295">
            <text:p>0.008647295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382398">
            <text:p>0.002382398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8760939">
            <text:p>0.008760939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2764692">
            <text:p>-0.002764692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672349">
            <text:p>0.005672349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-0.0002228797">
            <text:p>-0.0002228797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135032">
            <text:p>0.01135032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115892">
            <text:p>-0.00115892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1842991">
            <text:p>0.001842991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93345">
            <text:p>0.01293345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964117">
            <text:p>-0.00964117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6151911">
            <text:p>-0.006151911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613723">
            <text:p>0.006613723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4470273">
            <text:p>0.004470273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9711603">
            <text:p>-0.009711603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641495">
            <text:p>0.01641495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7650821">
            <text:p>0.007650821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4659267">
            <text:p>0.004659267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06039761">
            <text:p>-0.0006039761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323126">
            <text:p>-0.01323126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0848">
            <text:p>0.0010848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632558">
            <text:p>-0.00632558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731803">
            <text:p>-0.00731803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11039">
            <text:p>-0.011039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576219">
            <text:p>0.00576219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5816252">
            <text:p>-0.005816252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688901">
            <text:p>-0.003688901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8968434">
            <text:p>-0.008968434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2869248">
            <text:p>0.002869248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544755">
            <text:p>0.01544755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7792331">
            <text:p>-0.007792331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568547">
            <text:p>-0.01568547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1065312">
            <text:p>-0.01065312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08329867">
            <text:p>0.0008329867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936177">
            <text:p>-0.004936177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8075903">
            <text:p>-0.008075903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169203">
            <text:p>0.003169203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913657">
            <text:p>0.004913657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1546342">
            <text:p>-0.001546342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032974">
            <text:p>-0.01032974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817522">
            <text:p>0.01817522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3870976">
            <text:p>-0.003870976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472976">
            <text:p>-0.01472976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5524235">
            <text:p>0.005524235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865428">
            <text:p>0.02865428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2230995">
            <text:p>-0.002230995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6597576">
            <text:p>-0.006597576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1062296">
            <text:p>0.01062296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5837838">
            <text:p>-0.005837838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07246954">
            <text:p>0.0007246954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7103875">
            <text:p>-0.007103875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1045718">
            <text:p>-0.01045718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07381492">
            <text:p>0.0007381492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294686">
            <text:p>-0.01294686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784198">
            <text:p>-0.006784198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9058888">
            <text:p>-0.009058888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224522">
            <text:p>-0.00224522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1065227">
            <text:p>0.01065227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2558631">
            <text:p>-0.002558631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4166871">
            <text:p>-0.004166871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1981418">
            <text:p>-0.001981418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9048036">
            <text:p>-0.009048036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706581">
            <text:p>-0.00706581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496705">
            <text:p>-0.00496705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940995">
            <text:p>0.02940995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1995645">
            <text:p>-0.001995645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572998">
            <text:p>0.004572998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132965">
            <text:p>0.01132965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9471367">
            <text:p>0.009471367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37165">
            <text:p>0.01037165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2237242">
            <text:p>0.002237242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864259">
            <text:p>-0.005864259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4487732">
            <text:p>-0.004487732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252891">
            <text:p>0.005252891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152353">
            <text:p>-0.01152353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6120688">
            <text:p>0.006120688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66013">
            <text:p>0.00566013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09752921">
            <text:p>-0.0009752921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1097581">
            <text:p>-0.01097581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286408">
            <text:p>0.01286408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5217281">
            <text:p>0.05217281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1357765">
            <text:p>0.001357765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2133134">
            <text:p>0.02133134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319054">
            <text:p>-0.01319054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424083">
            <text:p>0.007424083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349426">
            <text:p>0.00349426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2098819">
            <text:p>0.02098819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03082042">
            <text:p>-0.0003082042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210058">
            <text:p>0.02210058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655888">
            <text:p>0.01655888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7673272">
            <text:p>0.007673272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485924">
            <text:p>-0.008485924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3124545">
            <text:p>0.003124545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2328689">
            <text:p>0.002328689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482932">
            <text:p>-0.01482932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1022109">
            <text:p>-0.01022109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9752764">
            <text:p>0.009752764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2653357">
            <text:p>-0.002653357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746516">
            <text:p>-0.007746516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200304">
            <text:p>-0.01200304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570329">
            <text:p>0.01570329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5419313">
            <text:p>0.005419313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5562851">
            <text:p>-0.005562851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1367308">
            <text:p>-0.001367308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863345">
            <text:p>0.01863345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3134437">
            <text:p>0.03134437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387647">
            <text:p>-0.004387647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5414094">
            <text:p>0.005414094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232602">
            <text:p>0.002232602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2182607">
            <text:p>0.02182607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728506">
            <text:p>0.02728506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284735">
            <text:p>-0.01284735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8866367">
            <text:p>0.008866367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4193579">
            <text:p>-0.004193579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7888571">
            <text:p>-0.007888571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6576048">
            <text:p>-0.006576048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5768423">
            <text:p>0.005768423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7236972">
            <text:p>-0.007236972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4360508">
            <text:p>-0.004360508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5282828">
            <text:p>0.005282828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1018382">
            <text:p>0.01018382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2427572">
            <text:p>0.002427572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09992626">
            <text:p>-0.009992626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072594">
            <text:p>-0.01072594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2477698">
            <text:p>0.002477698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904931">
            <text:p>0.00904931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1069731">
            <text:p>0.01069731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222998">
            <text:p>-0.01222998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813058">
            <text:p>0.01813058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1176773">
            <text:p>0.001176773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7240932">
            <text:p>-0.007240932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4628946">
            <text:p>-0.004628946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2027056">
            <text:p>0.02027056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3043705">
            <text:p>0.003043705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175715">
            <text:p>-0.01175715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6844405">
            <text:p>-0.006844405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977772">
            <text:p>0.01977772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7851413">
            <text:p>-0.007851413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1235662">
            <text:p>-0.001235662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184333">
            <text:p>-0.01184333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5859779">
            <text:p>-0.005859779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488169">
            <text:p>0.01488169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280899">
            <text:p>-0.01280899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3363116">
            <text:p>-0.003363116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6354985">
            <text:p>0.006354985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2714998">
            <text:p>0.002714998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039261">
            <text:p>-0.01039261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3615931">
            <text:p>-0.003615931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551533">
            <text:p>0.01551533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0.0001023296">
            <text:p>0.0001023296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09377614">
            <text:p>-0.0009377614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013636">
            <text:p>-0.01013636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05391731">
            <text:p>-0.0005391731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671889">
            <text:p>0.02671889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5857007">
            <text:p>-0.005857007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3033836">
            <text:p>-0.003033836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5280639">
            <text:p>0.005280639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4649422">
            <text:p>0.004649422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2784192">
            <text:p>-0.002784192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04125906">
            <text:p>-0.0004125906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7329905">
            <text:p>0.007329905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95776">
            <text:p>0.0195776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07456284">
            <text:p>-0.0007456284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122984">
            <text:p>-0.00122984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1286063">
            <text:p>0.01286063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01452772">
            <text:p>-0.0001452772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5827227">
            <text:p>-0.005827227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09335467">
            <text:p>-0.0009335467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5543421">
            <text:p>0.005543421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8884738">
            <text:p>0.008884738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1129279">
            <text:p>0.01129279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0558135">
            <text:p>-0.00558135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05495092">
            <text:p>-0.0005495092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9616578">
            <text:p>0.009616578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04723535">
            <text:p>-0.004723535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0.001504667">
            <text:p>0.001504667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0.002507418">
            <text:p>0.002507418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2415986">
            <text:p>0.02415986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2188115">
            <text:p>-0.002188115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0.004074482">
            <text:p>0.004074482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2093369">
            <text:p>0.02093369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2623697">
            <text:p>0.02623697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03307601">
            <text:p>-0.0003307601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1170159">
            <text:p>0.01170159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0.001667258">
            <text:p>0.001667258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1817392">
            <text:p>0.01817392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08944074">
            <text:p>-0.008944074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9828217">
            <text:p>0.009828217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125619">
            <text:p>0.0125619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1976305">
            <text:p>0.01976305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0.008269275">
            <text:p>0.008269275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0.0003286695">
            <text:p>0.0003286695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1074389">
            <text:p>0.01074389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2897719">
            <text:p>0.02897719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02337646">
            <text:p>-0.002337646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05491323">
            <text:p>-0.005491323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1884643">
            <text:p>0.01884643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0.009973635">
            <text:p>0.009973635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0.008540148">
            <text:p>0.008540148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004330087">
            <text:p>-0.0004330087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0.008244126">
            <text:p>0.008244126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1539511">
            <text:p>0.01539511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02862224">
            <text:p>-0.002862224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0.006511734">
            <text:p>0.006511734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2707487">
            <text:p>0.02707487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1419773">
            <text:p>0.01419773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2303847">
            <text:p>0.02303847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0.005710473">
            <text:p>0.005710473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0.01225929">
            <text:p>0.01225929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414821">
            <text:p>0.0414821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0.002512555">
            <text:p>0.002512555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0.005532186">
            <text:p>0.005532186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3992021">
            <text:p>0.03992021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1642033">
            <text:p>0.01642033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0.01498498">
            <text:p>0.01498498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0.01542911">
            <text:p>0.01542911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2247926">
            <text:p>0.02247926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1922716">
            <text:p>0.01922716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195054">
            <text:p>0.0195054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0.01327933">
            <text:p>0.01327933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2783944">
            <text:p>0.02783944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0.01472397">
            <text:p>0.01472397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3282708">
            <text:p>0.03282708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2243639">
            <text:p>0.02243639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2779985">
            <text:p>0.02779985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2862042">
            <text:p>0.02862042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3098493">
            <text:p>0.03098493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0.0113654">
            <text:p>0.0113654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2704695">
            <text:p>0.02704695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4246577">
            <text:p>0.04246577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0.01789823">
            <text:p>0.01789823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0.01138958">
            <text:p>0.01138958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3192795">
            <text:p>0.03192795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0.02148052">
            <text:p>0.02148052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0.01125786">
            <text:p>0.01125786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0.01174033">
            <text:p>0.01174033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3411153">
            <text:p>0.03411153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0.02236636">
            <text:p>0.02236636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0.02635416">
            <text:p>0.02635416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0.01921344">
            <text:p>0.01921344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3363879">
            <text:p>0.03363879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3281031">
            <text:p>0.03281031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0.01397219">
            <text:p>0.01397219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0.0253346">
            <text:p>0.0253346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389118">
            <text:p>0.0389118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3170726">
            <text:p>0.03170726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0.01940816">
            <text:p>0.01940816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4932579">
            <text:p>0.04932579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4135178">
            <text:p>0.04135178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0.02092559">
            <text:p>0.02092559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0.03628228">
            <text:p>0.03628228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0.03212481">
            <text:p>0.03212481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4880293">
            <text:p>0.04880293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408066">
            <text:p>0.0408066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0.0358305">
            <text:p>0.0358305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40372">
            <text:p>0.040372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5231494">
            <text:p>0.05231494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0.03820146">
            <text:p>0.03820146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0.03200669">
            <text:p>0.03200669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5428689">
            <text:p>0.05428689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4382863">
            <text:p>0.04382863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0.04054461">
            <text:p>0.04054461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0.03274676">
            <text:p>0.03274676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5275374">
            <text:p>0.05275374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5223754">
            <text:p>0.05223754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0.03675261">
            <text:p>0.03675261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5380058">
            <text:p>0.05380058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5289756">
            <text:p>0.05289756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5387616">
            <text:p>0.05387616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0.04757386">
            <text:p>0.04757386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0.04481064">
            <text:p>0.04481064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6863598">
            <text:p>0.06863598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0.05087887">
            <text:p>0.05087887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0.04945667">
            <text:p>0.04945667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0.05974365">
            <text:p>0.05974365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7319834">
            <text:p>0.07319834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6460079">
            <text:p>0.06460079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6369697">
            <text:p>0.06369697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0.05138129">
            <text:p>0.05138129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0.05853214">
            <text:p>0.05853214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7164585">
            <text:p>0.07164585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697664">
            <text:p>0.0697664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0.06774127">
            <text:p>0.06774127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0.06382658">
            <text:p>0.06382658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0.06786932">
            <text:p>0.06786932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0.06533922">
            <text:p>0.06533922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0.06808882">
            <text:p>0.06808882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0.07179033">
            <text:p>0.07179033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8380231">
            <text:p>0.08380231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0.06297278">
            <text:p>0.06297278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0.06661554">
            <text:p>0.06661554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8311723">
            <text:p>0.08311723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9127687">
            <text:p>0.09127687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0.06784854">
            <text:p>0.06784854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9118777">
            <text:p>0.09118777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0.0811153">
            <text:p>0.0811153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1148373">
            <text:p>0.1148373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0.08769573">
            <text:p>0.08769573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1000387">
            <text:p>0.1000387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0.08637481">
            <text:p>0.08637481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0.08472176">
            <text:p>0.08472176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1109921">
            <text:p>0.1109921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0.08501234">
            <text:p>0.08501234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107039">
            <text:p>0.107039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1046265">
            <text:p>0.1046265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0.09782558">
            <text:p>0.09782558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1065748">
            <text:p>0.1065748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130279">
            <text:p>0.130279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1097056">
            <text:p>0.1097056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0.1039119">
            <text:p>0.1039119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0.1003638">
            <text:p>0.1003638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1156901">
            <text:p>0.1156901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1199742">
            <text:p>0.1199742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1142844">
            <text:p>0.1142844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0.1022775">
            <text:p>0.1022775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1249792">
            <text:p>0.1249792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1390305">
            <text:p>0.1390305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0.1171653">
            <text:p>0.1171653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0.1229686">
            <text:p>0.1229686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1408492">
            <text:p>0.1408492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0.1251053">
            <text:p>0.1251053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1331464">
            <text:p>0.1331464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0.1151824">
            <text:p>0.1151824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1349748">
            <text:p>0.1349748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1676637">
            <text:p>0.1676637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0.1270078">
            <text:p>0.1270078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0.1315264">
            <text:p>0.1315264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1479921">
            <text:p>0.1479921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0.1388842">
            <text:p>0.1388842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0.1339635">
            <text:p>0.1339635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0.1306732">
            <text:p>0.1306732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1475636">
            <text:p>0.1475636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1791985">
            <text:p>0.1791985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0.1466314">
            <text:p>0.1466314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1563513">
            <text:p>0.1563513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1567959">
            <text:p>0.1567959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1571153">
            <text:p>0.1571153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0.1482015">
            <text:p>0.1482015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0.1479258">
            <text:p>0.1479258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1622563">
            <text:p>0.1622563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16751">
            <text:p>0.16751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0.1516709">
            <text:p>0.1516709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0.1646383">
            <text:p>0.1646383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1792917">
            <text:p>0.1792917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1708399">
            <text:p>0.1708399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0.1715802">
            <text:p>0.1715802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2581387">
            <text:p>0.2581387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1781201">
            <text:p>0.1781201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0.1778148">
            <text:p>0.1778148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1876912">
            <text:p>0.1876912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0.1709635">
            <text:p>0.1709635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1884771">
            <text:p>0.1884771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0.1817005">
            <text:p>0.1817005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0.1799943">
            <text:p>0.1799943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1922844">
            <text:p>0.1922844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197997">
            <text:p>0.197997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0.1956144">
            <text:p>0.1956144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0.1906914">
            <text:p>0.1906914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0.1905523">
            <text:p>0.1905523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0.1991064">
            <text:p>0.1991064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2109328">
            <text:p>0.2109328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0.193943">
            <text:p>0.193943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0.2001282">
            <text:p>0.2001282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2102186">
            <text:p>0.2102186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0.2073197">
            <text:p>0.2073197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0.2110604">
            <text:p>0.2110604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0.2017408">
            <text:p>0.2017408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0.2157148">
            <text:p>0.2157148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2259713">
            <text:p>0.2259713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2287066">
            <text:p>0.2287066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0.2148526">
            <text:p>0.2148526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0.2206182">
            <text:p>0.2206182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2247843">
            <text:p>0.2247843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0.2254674">
            <text:p>0.2254674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0.2284316">
            <text:p>0.2284316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2400229">
            <text:p>0.2400229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2621297">
            <text:p>0.2621297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0.2338053">
            <text:p>0.2338053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0.2318208">
            <text:p>0.2318208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2417037">
            <text:p>0.2417037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2518261">
            <text:p>0.2518261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0.2320231">
            <text:p>0.2320231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0.2390424">
            <text:p>0.2390424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2485072">
            <text:p>0.2485072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2482388">
            <text:p>0.2482388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247718">
            <text:p>0.247718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0.246923">
            <text:p>0.246923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2618144">
            <text:p>0.2618144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255089">
            <text:p>0.255089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2570756">
            <text:p>0.2570756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2641917">
            <text:p>0.2641917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2686002">
            <text:p>0.2686002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0.2571784">
            <text:p>0.2571784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0.2559943">
            <text:p>0.2559943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0.2483745">
            <text:p>0.2483745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0.2577137">
            <text:p>0.2577137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0.2641747">
            <text:p>0.2641747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0.2530377">
            <text:p>0.2530377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0.2600662">
            <text:p>0.2600662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0.2678172">
            <text:p>0.2678172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0.2665381">
            <text:p>0.2665381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0.2670384">
            <text:p>0.2670384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2736923">
            <text:p>0.2736923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2770914">
            <text:p>0.2770914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0.2696577">
            <text:p>0.2696577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0.2672549">
            <text:p>0.2672549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0.269085">
            <text:p>0.269085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298586">
            <text:p>0.298586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2881795">
            <text:p>0.2881795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0.2762917">
            <text:p>0.2762917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0.2835129">
            <text:p>0.2835129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3027858">
            <text:p>0.3027858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0.2813724">
            <text:p>0.2813724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0.2844414">
            <text:p>0.2844414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0.2778148">
            <text:p>0.2778148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2974577">
            <text:p>0.2974577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29435">
            <text:p>0.29435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0.2888368">
            <text:p>0.2888368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0.2815488">
            <text:p>0.2815488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0.287272">
            <text:p>0.287272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2966985">
            <text:p>0.2966985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0.2901662">
            <text:p>0.2901662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0.2818884">
            <text:p>0.2818884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3028456">
            <text:p>0.3028456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2977672">
            <text:p>0.2977672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0.2811387">
            <text:p>0.2811387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3091353">
            <text:p>0.3091353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0.2943531">
            <text:p>0.2943531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0.2924666">
            <text:p>0.2924666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0.2864287">
            <text:p>0.2864287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0.2872024">
            <text:p>0.2872024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0.2956008">
            <text:p>0.2956008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0.2952498">
            <text:p>0.2952498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0.2986232">
            <text:p>0.2986232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0.2995145">
            <text:p>0.2995145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0.2958698">
            <text:p>0.2958698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3093885">
            <text:p>0.3093885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3230922">
            <text:p>0.3230922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0.3039828">
            <text:p>0.3039828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3138475">
            <text:p>0.3138475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0.3038469">
            <text:p>0.3038469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3302811">
            <text:p>0.3302811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0.2935203">
            <text:p>0.2935203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3087717">
            <text:p>0.3087717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310502">
            <text:p>0.310502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0.2945571">
            <text:p>0.2945571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0.2952539">
            <text:p>0.2952539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3183001">
            <text:p>0.3183001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3114649">
            <text:p>0.3114649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0.2988307">
            <text:p>0.2988307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3166267">
            <text:p>0.3166267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312036">
            <text:p>0.312036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3143341">
            <text:p>0.3143341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3199894">
            <text:p>0.3199894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0.2999991">
            <text:p>0.2999991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3087282">
            <text:p>0.3087282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3125462">
            <text:p>0.3125462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0.2967047">
            <text:p>0.2967047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3041585">
            <text:p>0.3041585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3075337">
            <text:p>0.3075337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3127075">
            <text:p>0.3127075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0.3037427">
            <text:p>0.3037427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0.2924215">
            <text:p>0.2924215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0.3036959">
            <text:p>0.3036959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311581">
            <text:p>0.311581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3064955">
            <text:p>0.3064955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3107055">
            <text:p>0.3107055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0.3033944">
            <text:p>0.3033944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3210322">
            <text:p>0.3210322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3066902">
            <text:p>0.3066902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3081254">
            <text:p>0.3081254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0.3015351">
            <text:p>0.3015351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0.2968956">
            <text:p>0.2968956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0.2955495">
            <text:p>0.2955495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0.3024533">
            <text:p>0.3024533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0.3017729">
            <text:p>0.3017729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3179578">
            <text:p>0.3179578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3358544">
            <text:p>0.3358544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0.2962033">
            <text:p>0.2962033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3029522">
            <text:p>0.3029522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3083095">
            <text:p>0.3083095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0.2944975">
            <text:p>0.2944975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3038492">
            <text:p>0.3038492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3113335">
            <text:p>0.3113335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2995279">
            <text:p>0.2995279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3026022">
            <text:p>0.3026022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2998488">
            <text:p>0.2998488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0.2910918">
            <text:p>0.2910918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3043108">
            <text:p>0.3043108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3104968">
            <text:p>0.3104968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3025306">
            <text:p>0.3025306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3196897">
            <text:p>0.3196897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304634">
            <text:p>0.304634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0.2834973">
            <text:p>0.2834973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0.2835042">
            <text:p>0.2835042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2965272">
            <text:p>0.2965272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2921844">
            <text:p>0.2921844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2991806">
            <text:p>0.2991806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2898944">
            <text:p>0.2898944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2938834">
            <text:p>0.2938834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29318">
            <text:p>0.29318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0.2863856">
            <text:p>0.2863856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0.2845618">
            <text:p>0.2845618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3044442">
            <text:p>0.3044442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0.2818145">
            <text:p>0.2818145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2895734">
            <text:p>0.2895734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0.2772315">
            <text:p>0.2772315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2824253">
            <text:p>0.2824253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0.2759551">
            <text:p>0.2759551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0.2770661">
            <text:p>0.2770661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2796608">
            <text:p>0.2796608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3096196">
            <text:p>0.3096196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2847446">
            <text:p>0.2847446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0.2730926">
            <text:p>0.2730926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2826656">
            <text:p>0.2826656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2886594">
            <text:p>0.2886594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0.2701807">
            <text:p>0.2701807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0.2697046">
            <text:p>0.2697046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2746272">
            <text:p>0.2746272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0.269539">
            <text:p>0.269539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2912802">
            <text:p>0.2912802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2759386">
            <text:p>0.2759386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3209331">
            <text:p>0.3209331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2844705">
            <text:p>0.2844705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2726302">
            <text:p>0.2726302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2676994">
            <text:p>0.2676994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2738585">
            <text:p>0.2738585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2722915">
            <text:p>0.2722915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2885452">
            <text:p>0.2885452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0.2605309">
            <text:p>0.2605309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2880228">
            <text:p>0.2880228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2767146">
            <text:p>0.2767146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2669661">
            <text:p>0.2669661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2700019">
            <text:p>0.2700019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2674977">
            <text:p>0.2674977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2619368">
            <text:p>0.2619368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2572432">
            <text:p>0.2572432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0.2531477">
            <text:p>0.2531477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2730821">
            <text:p>0.2730821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2663975">
            <text:p>0.2663975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2680719">
            <text:p>0.2680719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0.2489004">
            <text:p>0.2489004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2832917">
            <text:p>0.2832917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2656008">
            <text:p>0.2656008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0.2484984">
            <text:p>0.2484984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2495719">
            <text:p>0.2495719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2586739">
            <text:p>0.2586739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2793877">
            <text:p>0.2793877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2492279">
            <text:p>0.2492279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2517262">
            <text:p>0.2517262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2607455">
            <text:p>0.2607455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2593047">
            <text:p>0.2593047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2478595">
            <text:p>0.2478595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0.2367284">
            <text:p>0.2367284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2496225">
            <text:p>0.2496225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2429385">
            <text:p>0.2429385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2442893">
            <text:p>0.2442893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2660128">
            <text:p>0.2660128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2396101">
            <text:p>0.2396101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260596">
            <text:p>0.260596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2382399">
            <text:p>0.2382399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2486594">
            <text:p>0.2486594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2578358">
            <text:p>0.2578358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2430998">
            <text:p>0.2430998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2655849">
            <text:p>0.2655849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2305732">
            <text:p>0.2305732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2452917">
            <text:p>0.2452917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2381385">
            <text:p>0.2381385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2298531">
            <text:p>0.2298531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2248788">
            <text:p>0.2248788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2440193">
            <text:p>0.2440193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2423328">
            <text:p>0.2423328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2269834">
            <text:p>0.2269834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2336666">
            <text:p>0.2336666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2419073">
            <text:p>0.2419073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226079">
            <text:p>0.226079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2559642">
            <text:p>0.2559642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2486496">
            <text:p>0.2486496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2357458">
            <text:p>0.2357458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2323332">
            <text:p>0.2323332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2253107">
            <text:p>0.2253107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2154458">
            <text:p>0.2154458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2337501">
            <text:p>0.2337501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243145">
            <text:p>0.243145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2221031">
            <text:p>0.2221031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2298452">
            <text:p>0.2298452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2265433">
            <text:p>0.2265433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2240475">
            <text:p>0.2240475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2247152">
            <text:p>0.2247152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2234018">
            <text:p>0.2234018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2245397">
            <text:p>0.2245397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2215868">
            <text:p>0.2215868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2125423">
            <text:p>0.2125423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2078502">
            <text:p>0.2078502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2216888">
            <text:p>0.2216888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2818816">
            <text:p>0.2818816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2284112">
            <text:p>0.2284112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2208859">
            <text:p>0.2208859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2202006">
            <text:p>0.2202006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2150406">
            <text:p>0.2150406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2179516">
            <text:p>0.2179516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2200722">
            <text:p>0.2200722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2102015">
            <text:p>0.2102015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2099622">
            <text:p>0.2099622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2130611">
            <text:p>0.2130611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2072895">
            <text:p>0.2072895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2128162">
            <text:p>0.2128162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2420112">
            <text:p>0.2420112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2149182">
            <text:p>0.2149182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2281414">
            <text:p>0.2281414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1974946">
            <text:p>0.1974946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2043957">
            <text:p>0.2043957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2067908">
            <text:p>0.2067908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1939306">
            <text:p>0.1939306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2149497">
            <text:p>0.2149497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1976688">
            <text:p>0.1976688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1969603">
            <text:p>0.1969603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2320303">
            <text:p>0.2320303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1988069">
            <text:p>0.1988069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2090573">
            <text:p>0.2090573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2074986">
            <text:p>0.2074986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1880907">
            <text:p>0.1880907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2141273">
            <text:p>0.2141273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2061245">
            <text:p>0.2061245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197785">
            <text:p>0.197785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2051736">
            <text:p>0.2051736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1901">
            <text:p>0.1901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1909284">
            <text:p>0.1909284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2035936">
            <text:p>0.2035936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1832691">
            <text:p>0.1832691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1912911">
            <text:p>0.1912911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1853159">
            <text:p>0.1853159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1818119">
            <text:p>0.1818119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1972239">
            <text:p>0.1972239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1900877">
            <text:p>0.1900877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1911357">
            <text:p>0.1911357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1777105">
            <text:p>0.1777105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1820193">
            <text:p>0.1820193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1828888">
            <text:p>0.1828888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1936103">
            <text:p>0.1936103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1991129">
            <text:p>0.1991129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1954875">
            <text:p>0.1954875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1845215">
            <text:p>0.1845215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1790221">
            <text:p>0.1790221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1706625">
            <text:p>0.1706625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1737851">
            <text:p>0.1737851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1785681">
            <text:p>0.1785681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1816948">
            <text:p>0.1816948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202643">
            <text:p>0.202643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1782923">
            <text:p>0.1782923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1815256">
            <text:p>0.1815256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1788352">
            <text:p>0.1788352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1811132">
            <text:p>0.1811132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1729253">
            <text:p>0.1729253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1786986">
            <text:p>0.1786986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1752245">
            <text:p>0.1752245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1788301">
            <text:p>0.1788301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1616673">
            <text:p>0.1616673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2141828">
            <text:p>0.2141828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1752862">
            <text:p>0.1752862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2071168">
            <text:p>0.2071168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174236">
            <text:p>0.174236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2096344">
            <text:p>0.209634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1695971">
            <text:p>0.1695971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1767098">
            <text:p>0.1767098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1588995">
            <text:p>0.1588995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1793111">
            <text:p>0.1793111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1722429">
            <text:p>0.1722429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1596129">
            <text:p>0.1596129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1677254">
            <text:p>0.1677254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1661178">
            <text:p>0.1661178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1661872">
            <text:p>0.1661872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1621947">
            <text:p>0.1621947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1541551">
            <text:p>0.1541551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1714814">
            <text:p>0.1714814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1551457">
            <text:p>0.1551457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1544999">
            <text:p>0.1544999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1622543">
            <text:p>0.1622543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1588082">
            <text:p>0.1588082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1790023">
            <text:p>0.1790023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1586945">
            <text:p>0.1586945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158911">
            <text:p>0.158911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1503805">
            <text:p>0.1503805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1598875">
            <text:p>0.1598875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1605775">
            <text:p>0.1605775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156092">
            <text:p>0.156092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170088">
            <text:p>0.170088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1552413">
            <text:p>0.1552413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1597628">
            <text:p>0.1597628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1737607">
            <text:p>0.1737607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1549885">
            <text:p>0.1549885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1444042">
            <text:p>0.1444042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1590606">
            <text:p>0.1590606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1586953">
            <text:p>0.1586953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1466611">
            <text:p>0.1466611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1640729">
            <text:p>0.1640729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1524337">
            <text:p>0.1524337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1455213">
            <text:p>0.1455213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1633057">
            <text:p>0.1633057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1486236">
            <text:p>0.1486236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1601587">
            <text:p>0.1601587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1400274">
            <text:p>0.1400274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1534931">
            <text:p>0.1534931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1585735">
            <text:p>0.1585735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1398546">
            <text:p>0.1398546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1526117">
            <text:p>0.1526117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1423323">
            <text:p>0.1423323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1434723">
            <text:p>0.1434723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1505604">
            <text:p>0.1505604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1468055">
            <text:p>0.1468055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1479415">
            <text:p>0.1479415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15466">
            <text:p>0.15466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138227">
            <text:p>0.138227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15123">
            <text:p>0.15123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1511494">
            <text:p>0.1511494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149728">
            <text:p>0.149728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1352666">
            <text:p>0.1352666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144507">
            <text:p>0.144507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1477961">
            <text:p>0.1477961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1447931">
            <text:p>0.1447931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1295124">
            <text:p>0.1295124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1435857">
            <text:p>0.1435857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1487676">
            <text:p>0.1487676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1477145">
            <text:p>0.1477145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1438375">
            <text:p>0.1438375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1544403">
            <text:p>0.1544403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1554002">
            <text:p>0.1554002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1554915">
            <text:p>0.1554915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135007">
            <text:p>0.135007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1461011">
            <text:p>0.1461011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1457917">
            <text:p>0.1457917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1426266">
            <text:p>0.1426266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1417457">
            <text:p>0.1417457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1477384">
            <text:p>0.1477384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1338479">
            <text:p>0.1338479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1435503">
            <text:p>0.1435503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1454959">
            <text:p>0.1454959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1426372">
            <text:p>0.1426372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1284673">
            <text:p>0.1284673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1389602">
            <text:p>0.1389602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141372">
            <text:p>0.141372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1339703">
            <text:p>0.1339703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1228169">
            <text:p>0.1228169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1273026">
            <text:p>0.1273026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1443065">
            <text:p>0.1443065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1254191">
            <text:p>0.1254191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1476895">
            <text:p>0.1476895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1315735">
            <text:p>0.1315735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1429982">
            <text:p>0.1429982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127042">
            <text:p>0.127042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1249688">
            <text:p>0.1249688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1304235">
            <text:p>0.1304235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1259112">
            <text:p>0.1259112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138952">
            <text:p>0.138952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1302255">
            <text:p>0.1302255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1355898">
            <text:p>0.1355898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1493538">
            <text:p>0.1493538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1402164">
            <text:p>0.1402164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1327627">
            <text:p>0.1327627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1387421">
            <text:p>0.1387421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1169891">
            <text:p>0.1169891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1314075">
            <text:p>0.1314075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1224743">
            <text:p>0.1224743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1283662">
            <text:p>0.1283662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1391308">
            <text:p>0.1391308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1330099">
            <text:p>0.1330099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1287274">
            <text:p>0.1287274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1306145">
            <text:p>0.1306145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1217219">
            <text:p>0.1217219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1280612">
            <text:p>0.1280612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1156501">
            <text:p>0.1156501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1311659">
            <text:p>0.1311659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1150018">
            <text:p>0.1150018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1416729">
            <text:p>0.1416729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1220499">
            <text:p>0.1220499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1160361">
            <text:p>0.1160361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1282554">
            <text:p>0.1282554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1176843">
            <text:p>0.1176843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1359096">
            <text:p>0.1359096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1208815">
            <text:p>0.1208815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12347">
            <text:p>0.12347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1395879">
            <text:p>0.1395879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1183624">
            <text:p>0.1183624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1192349">
            <text:p>0.119234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1162771">
            <text:p>0.1162771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1171722">
            <text:p>0.1171722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1231613">
            <text:p>0.1231613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1423666">
            <text:p>0.1423666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1107335">
            <text:p>0.1107335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1324729">
            <text:p>0.1324729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1198198">
            <text:p>0.1198198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1151377">
            <text:p>0.1151377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1065535">
            <text:p>0.1065535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1190471">
            <text:p>0.1190471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1128774">
            <text:p>0.1128774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1398887">
            <text:p>0.1398887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1183281">
            <text:p>0.1183281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1157832">
            <text:p>0.1157832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1170341">
            <text:p>0.1170341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1092733">
            <text:p>0.1092733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1094715">
            <text:p>0.1094715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1060804">
            <text:p>0.1060804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1115311">
            <text:p>0.1115311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1125589">
            <text:p>0.1125589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1149032">
            <text:p>0.1149032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114918">
            <text:p>0.114918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1136254">
            <text:p>0.1136254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1224219">
            <text:p>0.1224219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1184475">
            <text:p>0.1184475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1036912">
            <text:p>0.1036912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1126017">
            <text:p>0.1126017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1061309">
            <text:p>0.1061309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123382">
            <text:p>0.123382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1242345">
            <text:p>0.1242345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1135729">
            <text:p>0.1135729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1132291">
            <text:p>0.1132291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1086393">
            <text:p>0.1086393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1070749">
            <text:p>0.1070749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1154129">
            <text:p>0.1154129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1093747">
            <text:p>0.1093747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1028809">
            <text:p>0.1028809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125875">
            <text:p>0.125875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1068807">
            <text:p>0.1068807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09580789">
            <text:p>0.09580789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1102747">
            <text:p>0.1102747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1042295">
            <text:p>0.1042295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1071338">
            <text:p>0.1071338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09256873">
            <text:p>0.09256873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09512361">
            <text:p>0.09512361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1006759">
            <text:p>0.1006759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1141822">
            <text:p>0.1141822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0994608">
            <text:p>0.0994608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1048971">
            <text:p>0.1048971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1071394">
            <text:p>0.1071394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1104622">
            <text:p>0.1104622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09716719">
            <text:p>0.09716719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104962">
            <text:p>0.104962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1036045">
            <text:p>0.1036045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100857">
            <text:p>0.100857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1086447">
            <text:p>0.1086447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08958655">
            <text:p>0.08958655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1032566">
            <text:p>0.1032566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1102456">
            <text:p>0.1102456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09794385">
            <text:p>0.09794385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1016533">
            <text:p>0.1016533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1031123">
            <text:p>0.1031123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09607502">
            <text:p>0.09607502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09066379">
            <text:p>0.09066379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1045141">
            <text:p>0.1045141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1276684">
            <text:p>0.1276684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08973145">
            <text:p>0.08973145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09089698">
            <text:p>0.09089698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1034267">
            <text:p>0.1034267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09549817">
            <text:p>0.09549817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09137239">
            <text:p>0.09137239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1030651">
            <text:p>0.1030651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09255496">
            <text:p>0.09255496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1094673">
            <text:p>0.1094673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08948623">
            <text:p>0.0894862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08407923">
            <text:p>0.08407923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1060621">
            <text:p>0.1060621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1130827">
            <text:p>0.1130827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08881862">
            <text:p>0.08881862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1022833">
            <text:p>0.1022833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09851401">
            <text:p>0.09851401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09644746">
            <text:p>0.09644746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09347778">
            <text:p>0.09347778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08044268">
            <text:p>0.08044268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08550049">
            <text:p>0.08550049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08469815">
            <text:p>0.08469815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09412442">
            <text:p>0.09412442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1090442">
            <text:p>0.1090442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08292746">
            <text:p>0.08292746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09408133">
            <text:p>0.09408133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1083716">
            <text:p>0.1083716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08193392">
            <text:p>0.08193392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0820647">
            <text:p>0.0820647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08974975">
            <text:p>0.08974975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08290636">
            <text:p>0.08290636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07593206">
            <text:p>0.07593206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1007837">
            <text:p>0.1007837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0969268">
            <text:p>0.0969268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8904806">
            <text:p>0.08904806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09684973">
            <text:p>0.09684973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1267261">
            <text:p>0.1267261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8863553">
            <text:p>0.08863553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8824165">
            <text:p>0.08824165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09729324">
            <text:p>0.09729324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09211195">
            <text:p>0.09211195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07571889">
            <text:p>0.07571889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8465534">
            <text:p>0.08465534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07873164">
            <text:p>0.07873164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09205381">
            <text:p>0.09205381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8651583">
            <text:p>0.08651583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1010022">
            <text:p>0.1010022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8669372">
            <text:p>0.08669372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8353098">
            <text:p>0.08353098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8733487">
            <text:p>0.08733487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8997643">
            <text:p>0.08997643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07467705">
            <text:p>0.07467705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1054577">
            <text:p>0.1054577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8986024">
            <text:p>0.08986024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8027947">
            <text:p>0.08027947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9067906">
            <text:p>0.09067906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1075596">
            <text:p>0.1075596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09485425">
            <text:p>0.09485425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8618199">
            <text:p>0.08618199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8039338">
            <text:p>0.08039338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09862831">
            <text:p>0.09862831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8674648">
            <text:p>0.08674648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8992278">
            <text:p>0.08992278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8080157">
            <text:p>0.08080157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1102738">
            <text:p>0.1102738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1150972">
            <text:p>0.1150972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07183314">
            <text:p>0.07183314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7919769">
            <text:p>0.07919769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09197704">
            <text:p>0.09197704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09368362">
            <text:p>0.09368362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06385636">
            <text:p>0.06385636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8617772">
            <text:p>0.08617772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8949362">
            <text:p>0.08949362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1050911">
            <text:p>0.1050911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06599367">
            <text:p>0.06599367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8265346">
            <text:p>0.08265346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8311205">
            <text:p>0.08311205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9088831">
            <text:p>0.09088831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8218809">
            <text:p>0.08218809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06721824">
            <text:p>0.06721824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06532637">
            <text:p>0.06532637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7447974">
            <text:p>0.07447974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7514153">
            <text:p>0.07514153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05827027">
            <text:p>0.05827027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73158">
            <text:p>0.073158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8917385">
            <text:p>0.08917385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8943048">
            <text:p>0.08943048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7200058">
            <text:p>0.07200058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6758688">
            <text:p>0.06758688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7569429">
            <text:p>0.07569429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6320404">
            <text:p>0.06320404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7223091">
            <text:p>0.0722309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7394904">
            <text:p>0.07394904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7181793">
            <text:p>0.07181793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5917708">
            <text:p>0.05917708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7947143">
            <text:p>0.07947143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6410279">
            <text:p>0.06410279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09239331">
            <text:p>0.09239331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6458976">
            <text:p>0.06458976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7906806">
            <text:p>0.07906806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6202871">
            <text:p>0.06202871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6027101">
            <text:p>0.06027101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5691567">
            <text:p>0.05691567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6421098">
            <text:p>0.06421098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6908598">
            <text:p>0.06908598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566712">
            <text:p>0.0566712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5592731">
            <text:p>0.05592731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7156815">
            <text:p>0.07156815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627168">
            <text:p>0.0627168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6288967">
            <text:p>0.06288967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7448645">
            <text:p>0.07448645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5954188">
            <text:p>0.05954188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6540384">
            <text:p>0.06540384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5635435">
            <text:p>0.05635435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6047571">
            <text:p>0.06047571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5647335">
            <text:p>0.05647335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5744163">
            <text:p>0.05744163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5305193">
            <text:p>0.05305193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6438172">
            <text:p>0.06438172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6189072">
            <text:p>0.06189072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5954827">
            <text:p>0.05954827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631259">
            <text:p>0.0631259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6783813">
            <text:p>0.06783813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5342584">
            <text:p>0.05342584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826666">
            <text:p>0.0826666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5188688">
            <text:p>0.05188688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7063215">
            <text:p>0.07063215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5005185">
            <text:p>0.05005185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4960623">
            <text:p>0.04960623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4973294">
            <text:p>0.04973294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511759">
            <text:p>0.0511759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6139627">
            <text:p>0.06139627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5849704">
            <text:p>0.05849704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4811883">
            <text:p>0.04811883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6321149">
            <text:p>0.06321149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6623385">
            <text:p>0.06623385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5163703">
            <text:p>0.05163703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7064312">
            <text:p>0.07064312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4435217">
            <text:p>0.04435217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4982833">
            <text:p>0.04982833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6216766">
            <text:p>0.06216766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538027">
            <text:p>0.0538027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5933408">
            <text:p>0.05933408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4254418">
            <text:p>0.04254418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5906029">
            <text:p>0.05906029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4357883">
            <text:p>0.04357883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4728853">
            <text:p>0.04728853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5090137">
            <text:p>0.05090137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454026">
            <text:p>0.0454026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6831051">
            <text:p>0.06831051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4514221">
            <text:p>0.04514221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437766">
            <text:p>0.0437766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469046">
            <text:p>0.0469046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4751115">
            <text:p>0.04751115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6101663">
            <text:p>0.06101663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8241318">
            <text:p>0.08241318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3900363">
            <text:p>0.03900363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4596775">
            <text:p>0.04596775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5295071">
            <text:p>0.05295071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4394275">
            <text:p>0.04394275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4991582">
            <text:p>0.04991582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422137">
            <text:p>0.0422137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4398476">
            <text:p>0.04398476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4596793">
            <text:p>0.04596793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3814721">
            <text:p>0.03814721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3933189">
            <text:p>0.03933189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5154476">
            <text:p>0.05154476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6379229">
            <text:p>0.06379229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5121433">
            <text:p>0.05121433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441428">
            <text:p>0.0441428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4227818">
            <text:p>0.04227818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5648125">
            <text:p>0.05648125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4857696">
            <text:p>0.04857696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4629754">
            <text:p>0.04629754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4374106">
            <text:p>0.04374106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5678192">
            <text:p>0.05678192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6045252">
            <text:p>0.06045252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4895336">
            <text:p>0.04895336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56701">
            <text:p>0.056701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4058429">
            <text:p>0.04058429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3647801">
            <text:p>0.03647801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4173768">
            <text:p>0.04173768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4280007">
            <text:p>0.04280007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4438284">
            <text:p>0.04438284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4875409">
            <text:p>0.04875409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4146427">
            <text:p>0.04146427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4501728">
            <text:p>0.04501728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3915363">
            <text:p>0.03915363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3558514">
            <text:p>0.03558514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4539953">
            <text:p>0.04539953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3424051">
            <text:p>0.03424051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3763704">
            <text:p>0.03763704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7296952">
            <text:p>0.07296952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4183243">
            <text:p>0.04183243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3542024">
            <text:p>0.03542024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4211747">
            <text:p>0.04211747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3517842">
            <text:p>0.03517842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3186997">
            <text:p>0.03186997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4699619">
            <text:p>0.04699619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2991558">
            <text:p>0.02991558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4951375">
            <text:p>0.04951375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4234342">
            <text:p>0.04234342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3762097">
            <text:p>0.03762097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4505257">
            <text:p>0.04505257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4992312">
            <text:p>0.04992312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4034446">
            <text:p>0.04034446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4050448">
            <text:p>0.04050448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3770696">
            <text:p>0.03770696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2762591">
            <text:p>0.0276259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435894">
            <text:p>0.0435894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4529139">
            <text:p>0.04529139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3556617">
            <text:p>0.03556617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6347574">
            <text:p>0.06347574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2747707">
            <text:p>0.02747707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3844484">
            <text:p>0.03844484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4372754">
            <text:p>0.04372754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2734304">
            <text:p>0.02734304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3028938">
            <text:p>0.03028938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3942353">
            <text:p>0.03942353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4154219">
            <text:p>0.04154219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4012016">
            <text:p>0.04012016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5053883">
            <text:p>0.05053883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4373915">
            <text:p>0.04373915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4835434">
            <text:p>0.04835434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2996296">
            <text:p>0.02996296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3274213">
            <text:p>0.03274213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4688553">
            <text:p>0.04688553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3976833">
            <text:p>0.03976833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4726529">
            <text:p>0.04726529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2811551">
            <text:p>0.02811551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3797327">
            <text:p>0.03797327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446448">
            <text:p>0.0446448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4839034">
            <text:p>0.04839034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3895062">
            <text:p>0.03895062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3890231">
            <text:p>0.03890231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3997108">
            <text:p>0.03997108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5072814">
            <text:p>0.05072814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3678166">
            <text:p>0.03678166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3061416">
            <text:p>0.03061416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2802144">
            <text:p>0.02802144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3545634">
            <text:p>0.03545634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30733">
            <text:p>0.030733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4285334">
            <text:p>0.04285334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2637688">
            <text:p>0.02637688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323498">
            <text:p>0.0323498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3062108">
            <text:p>0.03062108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2471772">
            <text:p>0.02471772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4141863">
            <text:p>0.04141863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2594293">
            <text:p>0.02594293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3351248">
            <text:p>0.03351248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2817829">
            <text:p>0.02817829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3486082">
            <text:p>0.03486082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2402038">
            <text:p>0.02402038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7756502">
            <text:p>0.07756502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4065072">
            <text:p>0.04065072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2589904">
            <text:p>0.02589904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2907387">
            <text:p>0.02907387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4109969">
            <text:p>0.04109969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4132335">
            <text:p>0.04132335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2694618">
            <text:p>0.02694618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2518451">
            <text:p>0.02518451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3923866">
            <text:p>0.03923866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2899704">
            <text:p>0.02899704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4725514">
            <text:p>0.04725514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315594">
            <text:p>0.0315594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4688908">
            <text:p>0.04688908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3176288">
            <text:p>0.03176288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3684258">
            <text:p>0.03684258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2334663">
            <text:p>0.02334663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2504169">
            <text:p>0.02504169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5153642">
            <text:p>0.05153642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2589552">
            <text:p>0.02589552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2288975">
            <text:p>0.02288975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2320667">
            <text:p>0.02320667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2859337">
            <text:p>0.02859337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2229683">
            <text:p>0.02229683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2096331">
            <text:p>0.02096331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1808983">
            <text:p>0.01808983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1654925">
            <text:p>0.01654925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3556017">
            <text:p>0.03556017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2215983">
            <text:p>0.02215983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2548121">
            <text:p>0.02548121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2657772">
            <text:p>0.02657772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2386428">
            <text:p>0.02386428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2327264">
            <text:p>0.02327264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2632298">
            <text:p>0.02632298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3219707">
            <text:p>0.03219707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2021618">
            <text:p>0.02021618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2444885">
            <text:p>0.02444885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3007022">
            <text:p>0.03007022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2542803">
            <text:p>0.02542803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2185813">
            <text:p>0.02185813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285401">
            <text:p>0.0285401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4056085">
            <text:p>0.04056085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5615243">
            <text:p>0.05615243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2886156">
            <text:p>0.02886156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3892124">
            <text:p>0.03892124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1960305">
            <text:p>0.01960305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2568594">
            <text:p>0.02568594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2431595">
            <text:p>0.02431595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357101">
            <text:p>0.0357101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2718524">
            <text:p>0.02718524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3137918">
            <text:p>0.03137918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2461003">
            <text:p>0.02461003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4265999">
            <text:p>0.04265999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2411425">
            <text:p>0.02411425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2978529">
            <text:p>0.02978529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2674648">
            <text:p>0.02674648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2283051">
            <text:p>0.02283051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2610213">
            <text:p>0.02610213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2399306">
            <text:p>0.02399306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4062062">
            <text:p>0.04062062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2415425">
            <text:p>0.02415425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1785266">
            <text:p>0.01785266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4819779">
            <text:p>0.04819779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3034952">
            <text:p>0.03034952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3380986">
            <text:p>0.03380986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2512178">
            <text:p>0.02512178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2102553">
            <text:p>0.02102553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3564326">
            <text:p>0.03564326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2944259">
            <text:p>0.02944259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2449424">
            <text:p>0.02449424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3463073">
            <text:p>0.03463073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2034333">
            <text:p>0.02034333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2436149">
            <text:p>0.02436149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3785691">
            <text:p>0.03785691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3801196">
            <text:p>0.03801196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2896664">
            <text:p>0.02896664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1217426">
            <text:p>0.01217426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3306223">
            <text:p>0.03306223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1713701">
            <text:p>0.01713701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2217279">
            <text:p>0.02217279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291349">
            <text:p>0.0291349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3059466">
            <text:p>0.03059466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2189063">
            <text:p>0.02189063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3051643">
            <text:p>0.03051643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1984257">
            <text:p>0.01984257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1621605">
            <text:p>0.01621605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5090581">
            <text:p>0.05090581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1508638">
            <text:p>0.01508638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2252916">
            <text:p>0.02252916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117589">
            <text:p>0.0117589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2599415">
            <text:p>0.02599415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1192437">
            <text:p>0.01192437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2516687">
            <text:p>0.02516687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2578819">
            <text:p>0.02578819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2278255">
            <text:p>0.02278255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1958052">
            <text:p>0.0195805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2344578">
            <text:p>0.02344578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2508182">
            <text:p>0.02508182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1737536">
            <text:p>0.01737536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2794931">
            <text:p>0.02794931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3201563">
            <text:p>0.03201563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1082033">
            <text:p>0.01082033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2608305">
            <text:p>0.02608305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2814487">
            <text:p>0.02814487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1225026">
            <text:p>0.01225026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1546863">
            <text:p>0.01546863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05260213">
            <text:p>0.005260213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2074099">
            <text:p>0.02074099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2372497">
            <text:p>0.02372497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3078887">
            <text:p>0.03078887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2932831">
            <text:p>0.02932831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2136285">
            <text:p>0.02136285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2037665">
            <text:p>0.02037665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1831717">
            <text:p>0.01831717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09930855">
            <text:p>0.009930855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126658">
            <text:p>0.0126658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1458818">
            <text:p>0.01458818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1062289">
            <text:p>0.01062289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3695792">
            <text:p>0.03695792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185185">
            <text:p>0.0185185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1462692">
            <text:p>0.01462692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1761203">
            <text:p>0.01761203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3282365">
            <text:p>0.03282365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289276">
            <text:p>0.0289276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1697076">
            <text:p>0.01697076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1193675">
            <text:p>0.01193675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1075635">
            <text:p>0.01075635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2161559">
            <text:p>0.02161559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1612625">
            <text:p>0.01612625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1987759">
            <text:p>0.01987759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1377068">
            <text:p>0.01377068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3107879">
            <text:p>0.03107879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3067906">
            <text:p>0.03067906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2164418">
            <text:p>0.02164418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3281944">
            <text:p>0.03281944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1181378">
            <text:p>0.01181378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2726038">
            <text:p>0.02726038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1157827">
            <text:p>0.01157827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2028997">
            <text:p>0.02028997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1230498">
            <text:p>0.01230498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1281829">
            <text:p>0.01281829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09809407">
            <text:p>0.009809407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3968833">
            <text:p>0.03968833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2926229">
            <text:p>0.02926229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229056">
            <text:p>0.0229056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2013075">
            <text:p>0.02013075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2593907">
            <text:p>0.02593907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4191694">
            <text:p>0.04191694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2858908">
            <text:p>0.02858908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109978">
            <text:p>0.0109978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1743329">
            <text:p>0.01743329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1680003">
            <text:p>0.01680003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1329338">
            <text:p>0.01329338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2190919">
            <text:p>0.02190919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3353737">
            <text:p>0.03353737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1955822">
            <text:p>0.01955822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2150622">
            <text:p>0.02150622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06802631">
            <text:p>0.006802631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1029615">
            <text:p>0.01029615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08263422">
            <text:p>0.008263422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3265906">
            <text:p>0.03265906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2157312">
            <text:p>0.02157312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2089761">
            <text:p>0.02089761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1657772">
            <text:p>0.01657772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1553374">
            <text:p>0.01553374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1994894">
            <text:p>0.01994894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1498216">
            <text:p>0.01498216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1390689">
            <text:p>0.01390689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3696222">
            <text:p>0.03696222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2049117">
            <text:p>0.02049117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1646692">
            <text:p>0.01646692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1007918">
            <text:p>0.01007918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1896589">
            <text:p>0.01896589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1117025">
            <text:p>0.01117025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2421735">
            <text:p>0.02421735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1939621">
            <text:p>0.01939621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1528877">
            <text:p>0.01528877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1261675">
            <text:p>0.01261675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05162469">
            <text:p>0.005162469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1891151">
            <text:p>0.01891151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2040101">
            <text:p>0.02040101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1781025">
            <text:p>0.01781025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17934">
            <text:p>0.017934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2025221">
            <text:p>0.02025221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1183524">
            <text:p>0.01183524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2560543">
            <text:p>0.02560543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2727751">
            <text:p>0.02727751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1341211">
            <text:p>0.01341211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06406381">
            <text:p>0.006406381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2824407">
            <text:p>0.02824407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08404219">
            <text:p>0.008404219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1724408">
            <text:p>0.01724408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1104793">
            <text:p>0.01104793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1625">
            <text:p>0.01625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2108819">
            <text:p>0.02108819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08856836">
            <text:p>0.008856836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04524914">
            <text:p>0.004524914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09633637">
            <text:p>0.009633637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0845624">
            <text:p>0.00845624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02674381">
            <text:p>0.002674381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1096835">
            <text:p>0.01096835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3334872">
            <text:p>0.03334872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07319176">
            <text:p>0.007319176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07505241">
            <text:p>0.007505241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07839418">
            <text:p>0.007839418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220691">
            <text:p>0.0220691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1010709">
            <text:p>0.01010709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166413">
            <text:p>0.0166413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1422023">
            <text:p>0.01422023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4315902">
            <text:p>0.04315902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1692295">
            <text:p>0.01692295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1708473">
            <text:p>0.01708473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08815408">
            <text:p>0.008815408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2361687">
            <text:p>0.02361687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1044409">
            <text:p>0.01044409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1417364">
            <text:p>0.01417364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1004803">
            <text:p>0.01004803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1400013">
            <text:p>0.01400013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2115278">
            <text:p>0.02115278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08390999">
            <text:p>0.008390999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3085406">
            <text:p>0.03085406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08383083">
            <text:p>0.008383083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03129284">
            <text:p>0.003129284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07865228">
            <text:p>0.007865228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1524249">
            <text:p>0.01524249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1141212">
            <text:p>0.01141212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2304997">
            <text:p>0.02304997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06208143">
            <text:p>0.006208143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125204">
            <text:p>0.0125204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2052562">
            <text:p>0.02052562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1077797">
            <text:p>0.01077797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3972499">
            <text:p>0.03972499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1927424">
            <text:p>0.01927424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1132981">
            <text:p>0.01132981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1745436">
            <text:p>0.01745436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219523">
            <text:p>0.0219523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2158239">
            <text:p>0.02158239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09966091">
            <text:p>0.009966091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1605887">
            <text:p>0.01605887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3207628">
            <text:p>0.03207628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08148159">
            <text:p>0.008148159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2175787">
            <text:p>0.02175787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0306196">
            <text:p>0.00306196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2888091">
            <text:p>0.02888091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074832">
            <text:p>0.0074832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2103368">
            <text:p>0.02103368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1406439">
            <text:p>0.01406439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06933221">
            <text:p>0.006933221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1447007">
            <text:p>0.01447007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01962784">
            <text:p>0.001962784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344081">
            <text:p>0.0344081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1874764">
            <text:p>0.01874764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1642795">
            <text:p>0.01642795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04684956">
            <text:p>0.004684956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0975369">
            <text:p>0.00975369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08069281">
            <text:p>0.008069281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01348508">
            <text:p>0.001348508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417423">
            <text:p>0.0417423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07453399">
            <text:p>0.007453399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07881153">
            <text:p>0.007881153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1237851">
            <text:p>0.01237851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02477644">
            <text:p>0.002477644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05929598">
            <text:p>0.005929598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3564898">
            <text:p>0.03564898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1135052">
            <text:p>0.01135052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4206344">
            <text:p>0.04206344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string">
            <text:p>2.029794E-05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2152067">
            <text:p>0.02152067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2622164">
            <text:p>0.02622164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06239838">
            <text:p>0.006239838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09528677">
            <text:p>0.009528677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09969748">
            <text:p>0.009969748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04952083">
            <text:p>0.004952083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1363742">
            <text:p>0.01363742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1446661">
            <text:p>0.01446661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1085073">
            <text:p>0.01085073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01088883">
            <text:p>0.001088883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04163384">
            <text:p>0.004163384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1725505">
            <text:p>0.01725505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1129046">
            <text:p>0.01129046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03434669">
            <text:p>0.003434669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1263521">
            <text:p>0.01263521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08683132">
            <text:p>0.008683132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07693791">
            <text:p>0.007693791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-0.002147864">
            <text:p>-0.002147864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-0.0006607825">
            <text:p>-0.0006607825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07923556">
            <text:p>0.007923556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2614923">
            <text:p>0.02614923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1563798">
            <text:p>0.01563798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118173">
            <text:p>0.0118173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09313216">
            <text:p>0.009313216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1476033">
            <text:p>0.01476033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string">
            <text:p>-8.807523E-05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06684022">
            <text:p>0.006684022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1427321">
            <text:p>0.01427321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0889375">
            <text:p>0.00889375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05686293">
            <text:p>0.005686293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1276738">
            <text:p>0.01276738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1471228">
            <text:p>0.01471228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02762489">
            <text:p>0.002762489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005317207">
            <text:p>0.0005317207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1203564">
            <text:p>0.01203564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1441188">
            <text:p>0.01441188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2997908">
            <text:p>0.02997908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-0.000358309">
            <text:p>-0.000358309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2530265">
            <text:p>0.02530265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08426965">
            <text:p>0.008426965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2624523">
            <text:p>0.02624523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1487839">
            <text:p>0.01487839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1962754">
            <text:p>0.01962754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2208644">
            <text:p>0.02208644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1020002">
            <text:p>0.01020002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-0.0003708263">
            <text:p>-0.0003708263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03046156">
            <text:p>0.003046156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2053808">
            <text:p>0.02053808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1535339">
            <text:p>0.01535339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05639309">
            <text:p>0.005639309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0271821">
            <text:p>0.00271821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-0.0003542058">
            <text:p>-0.0003542058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176274">
            <text:p>0.0176274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2039659">
            <text:p>0.02039659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-0.003120803">
            <text:p>-0.003120803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1153422">
            <text:p>0.01153422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-0.001419578">
            <text:p>-0.001419578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02831473">
            <text:p>0.002831473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0292077">
            <text:p>0.00292077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01813096">
            <text:p>0.001813096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3086633">
            <text:p>0.03086633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1960882">
            <text:p>0.01960882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2025104">
            <text:p>0.02025104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01278801">
            <text:p>0.001278801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0500845">
            <text:p>0.00500845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09190219">
            <text:p>0.009190219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104064">
            <text:p>0.04104064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2281685">
            <text:p>0.02281685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1987152">
            <text:p>0.01987152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01441717">
            <text:p>0.001441717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1588248">
            <text:p>0.01588248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06509978">
            <text:p>0.006509978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-0.0005205566">
            <text:p>-0.0005205566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0493687">
            <text:p>0.00493687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1119973">
            <text:p>0.01119973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1917397">
            <text:p>0.01917397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07157786">
            <text:p>0.007157786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06168006">
            <text:p>0.006168006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1553237">
            <text:p>0.01553237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2207764">
            <text:p>0.02207764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01574446">
            <text:p>0.001574446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1768455">
            <text:p>0.01768455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05707179">
            <text:p>0.005707179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2617677">
            <text:p>0.02617677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-0.001595477">
            <text:p>-0.001595477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07783622">
            <text:p>0.007783622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07951986">
            <text:p>0.007951986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009959">
            <text:p>0.02009959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06570586">
            <text:p>0.006570586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08103909">
            <text:p>0.008103909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03425841">
            <text:p>0.003425841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-0.002468523">
            <text:p>-0.002468523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1438783">
            <text:p>0.01438783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25822">
            <text:p>0.0425822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-0.0001515731">
            <text:p>-0.0001515731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05557361">
            <text:p>0.005557361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02870031">
            <text:p>0.002870031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1921009">
            <text:p>0.01921009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-0.002224138">
            <text:p>-0.002224138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07842463">
            <text:p>0.007842463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04264304">
            <text:p>0.004264304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005732861">
            <text:p>0.0005732861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003894105">
            <text:p>0.0003894105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07800914">
            <text:p>0.007800914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02343382">
            <text:p>0.002343382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126215">
            <text:p>0.03126215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007858568">
            <text:p>0.0007858568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-0.002092056">
            <text:p>-0.002092056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1249358">
            <text:p>0.01249358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1483398">
            <text:p>0.01483398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04513795">
            <text:p>0.004513795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-0.006582758">
            <text:p>-0.006582758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2668123">
            <text:p>0.02668123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1316313">
            <text:p>0.01316313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-0.002733878">
            <text:p>-0.002733878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08234522">
            <text:p>0.008234522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05860122">
            <text:p>0.005860122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001404093">
            <text:p>0.0001404093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002924927">
            <text:p>0.0002924927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1870062">
            <text:p>0.01870062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1780063">
            <text:p>0.01780063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07394709">
            <text:p>0.007394709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1776284">
            <text:p>0.01776284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-0.002508635">
            <text:p>-0.002508635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03718576">
            <text:p>0.003718576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-0.003666277">
            <text:p>-0.003666277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-0.00331032">
            <text:p>-0.00331032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09126961">
            <text:p>0.009126961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1896025">
            <text:p>0.01896025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-0.004020965">
            <text:p>-0.004020965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007776">
            <text:p>0.03007776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07087282">
            <text:p>0.007087282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02006474">
            <text:p>0.002006474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-0.004369982">
            <text:p>-0.004369982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-0.00495077">
            <text:p>-0.00495077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-0.00157433">
            <text:p>-0.00157433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1789936">
            <text:p>0.01789936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2301935">
            <text:p>0.02301935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01524095">
            <text:p>0.001524095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02173458">
            <text:p>0.002173458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-0.001619694">
            <text:p>-0.001619694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049137">
            <text:p>0.02049137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08419158">
            <text:p>0.008419158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06880087">
            <text:p>-0.006880087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-0.0004591968">
            <text:p>-0.0004591968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06327313">
            <text:p>0.006327313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008081458">
            <text:p>0.0008081458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01472445">
            <text:p>0.001472445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055155">
            <text:p>0.02055155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-0.002391893">
            <text:p>-0.002391893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011832">
            <text:p>0.02011832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-0.000898106">
            <text:p>-0.000898106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1656704">
            <text:p>0.01656704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04544991">
            <text:p>0.004544991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-0.002871671">
            <text:p>-0.002871671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33464">
            <text:p>0.0133464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383712">
            <text:p>0.01383712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-0.001490904">
            <text:p>-0.001490904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05736729">
            <text:p>-0.005736729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07074592">
            <text:p>-0.007074592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-0.001382097">
            <text:p>-0.001382097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-0.000420479">
            <text:p>-0.000420479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07115142">
            <text:p>0.007115142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1295207">
            <text:p>0.01295207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02499619">
            <text:p>0.002499619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-0.00387716">
            <text:p>-0.00387716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08560118">
            <text:p>0.008560118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007794808">
            <text:p>0.0007794808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04773054">
            <text:p>0.004773054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-0.001214225">
            <text:p>-0.001214225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-0.003196138">
            <text:p>-0.003196138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-0.0008410734">
            <text:p>-0.0008410734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429646">
            <text:p>0.01429646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-0.003809965">
            <text:p>-0.003809965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-0.0003767418">
            <text:p>-0.0003767418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03511478">
            <text:p>0.003511478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263058">
            <text:p>0.01263058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07287856">
            <text:p>0.007287856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03777572">
            <text:p>0.003777572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1619819">
            <text:p>0.01619819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1278804">
            <text:p>0.01278804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09376762">
            <text:p>0.009376762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4906721">
            <text:p>0.004906721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01426775">
            <text:p>0.001426775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256632">
            <text:p>0.02256632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-0.003112914">
            <text:p>-0.003112914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-0.003810308">
            <text:p>-0.003810308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00484559">
            <text:p>0.000484559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005984484">
            <text:p>0.0005984484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-0.0005648033">
            <text:p>-0.0005648033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-0.001058398">
            <text:p>-0.001058398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121926">
            <text:p>0.01121926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119504">
            <text:p>0.01119504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502389">
            <text:p>0.01502389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400133">
            <text:p>0.01400133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03825662">
            <text:p>0.003825662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-0.001812665">
            <text:p>-0.001812665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3637755">
            <text:p>0.003637755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06246694">
            <text:p>0.0006246694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-0.002877248">
            <text:p>-0.002877248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02593125">
            <text:p>0.002593125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05609468">
            <text:p>0.0005609468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0545366">
            <text:p>-0.00545366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118958">
            <text:p>0.01118958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5260193">
            <text:p>0.005260193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1655927">
            <text:p>0.01655927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-0.0001468385">
            <text:p>-0.0001468385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08447821">
            <text:p>0.008447821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129952">
            <text:p>0.03129952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09347651">
            <text:p>0.009347651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2102384">
            <text:p>0.002102384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1026323">
            <text:p>0.001026323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025459">
            <text:p>0.01025459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02378973">
            <text:p>0.0002378973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0708257">
            <text:p>0.00708257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201702">
            <text:p>0.03201702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-0.004825152">
            <text:p>-0.004825152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2978273">
            <text:p>0.02978273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05221776">
            <text:p>-0.005221776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269122">
            <text:p>0.02269122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212143">
            <text:p>0.01212143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1618572">
            <text:p>0.001618572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05888128">
            <text:p>0.005888128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02675741">
            <text:p>0.002675741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07906507">
            <text:p>-0.007906507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-0.001133245">
            <text:p>-0.001133245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2022118">
            <text:p>0.002022118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03619191">
            <text:p>0.003619191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08921998">
            <text:p>0.008921998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06462169">
            <text:p>-0.006462169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-0.0008797119">
            <text:p>-0.0008797119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358951">
            <text:p>0.02358951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07064016">
            <text:p>0.007064016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0795412">
            <text:p>0.00795412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-0.00175598">
            <text:p>-0.00175598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07110626">
            <text:p>-0.007110626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-0.004922905">
            <text:p>-0.004922905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2601391">
            <text:p>0.002601391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-0.002093154">
            <text:p>-0.002093154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06579243">
            <text:p>0.006579243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string">
            <text:p>6.054135E-05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09819175">
            <text:p>0.009819175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294682">
            <text:p>0.01294682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3388863">
            <text:p>0.003388863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470884">
            <text:p>0.01470884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1304248">
            <text:p>0.001304248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2748282">
            <text:p>0.002748282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-0.0006812745">
            <text:p>-0.0006812745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041654">
            <text:p>0.01041654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04677013">
            <text:p>0.0004677013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4585614">
            <text:p>-0.004585614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517933">
            <text:p>0.00517933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-0.0009364585">
            <text:p>-0.0009364585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-0.00057724">
            <text:p>-0.00057724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5782091">
            <text:p>0.005782091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05963264">
            <text:p>-0.005963264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1028104">
            <text:p>0.001028104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07354917">
            <text:p>-0.007354917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0827684">
            <text:p>0.00827684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-0.003399363">
            <text:p>-0.003399363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541794">
            <text:p>0.00541794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-0.004431693">
            <text:p>-0.004431693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5195302">
            <text:p>0.005195302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240369">
            <text:p>0.02240369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07367551">
            <text:p>0.007367551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76529">
            <text:p>0.0276529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6664509">
            <text:p>0.006664509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086564">
            <text:p>0.02086564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05573861">
            <text:p>-0.005573861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-0.001927835">
            <text:p>-0.001927835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9874814">
            <text:p>-0.009874814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09998395">
            <text:p>0.009998395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-0.003282709">
            <text:p>-0.003282709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08635256">
            <text:p>0.008635256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08057225">
            <text:p>0.0008057225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-0.0007708696">
            <text:p>-0.0007708696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194738">
            <text:p>0.0194738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-0.0003693948">
            <text:p>-0.000369394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060152">
            <text:p>0.01060152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916285">
            <text:p>-0.00916285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1876019">
            <text:p>0.001876019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8810982">
            <text:p>-0.008810982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3228083">
            <text:p>0.003228083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06723255">
            <text:p>-0.006723255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9607165">
            <text:p>-0.009607165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3949465">
            <text:p>0.003949465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-0.0003530695">
            <text:p>-0.0003530695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041136">
            <text:p>0.02041136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-0.0002458864">
            <text:p>-0.0002458864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4853404">
            <text:p>0.004853404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332482">
            <text:p>0.02332482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2503452">
            <text:p>0.002503452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-0.001650231">
            <text:p>-0.001650231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5594046">
            <text:p>0.005594046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-0.002717728">
            <text:p>-0.002717728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784243">
            <text:p>0.01784243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142128">
            <text:p>0.01142128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6455942">
            <text:p>0.006455942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894433">
            <text:p>0.01894433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08903066">
            <text:p>0.008903066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5371337">
            <text:p>-0.005371337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-0.003040109">
            <text:p>-0.003040109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7482519">
            <text:p>-0.007482519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713652">
            <text:p>0.01713652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558623">
            <text:p>0.03558623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-0.002473725">
            <text:p>-0.002473725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4650739">
            <text:p>-0.004650739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-0.0001461145">
            <text:p>-0.0001461145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5326828">
            <text:p>-0.005326828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-0.001709588">
            <text:p>-0.001709588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6405943">
            <text:p>-0.006405943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6468928">
            <text:p>0.006468928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5183119">
            <text:p>0.005183119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232959">
            <text:p>0.00232959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2786415">
            <text:p>0.002786415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4230929">
            <text:p>0.004230929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6390303">
            <text:p>-0.006390303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-0.002130606">
            <text:p>-0.002130606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8007979">
            <text:p>-0.008007979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7708942">
            <text:p>0.007708942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5008833">
            <text:p>0.005008833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768274">
            <text:p>0.01768274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1087643">
            <text:p>-0.01087643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5364658">
            <text:p>-0.005364658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04915871">
            <text:p>0.0004915871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8201174">
            <text:p>-0.008201174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7065856">
            <text:p>0.007065856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7579153">
            <text:p>0.007579153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-0.0006560432">
            <text:p>-0.0006560432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1486851">
            <text:p>0.001486851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338271">
            <text:p>0.01338271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3977244">
            <text:p>-0.003977244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4809254">
            <text:p>0.004809254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209159">
            <text:p>0.01209159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3417139">
            <text:p>0.003417139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-0.002664887">
            <text:p>-0.002664887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5550062">
            <text:p>-0.005550062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4426979">
            <text:p>-0.004426979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09661205">
            <text:p>0.0009661205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4027849">
            <text:p>0.004027849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08624809">
            <text:p>0.008624809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7728043">
            <text:p>-0.007728043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-0.00146411">
            <text:p>-0.00146411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1263075">
            <text:p>0.001263075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0870743">
            <text:p>0.000870743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3002172">
            <text:p>0.003002172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09399366">
            <text:p>0.0009399366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3621046">
            <text:p>0.003621046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02561717">
            <text:p>0.0002561717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3302291">
            <text:p>0.003302291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02391398">
            <text:p>0.0002391398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5352508">
            <text:p>0.005352508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-0.001088475">
            <text:p>-0.001088475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6793119">
            <text:p>-0.006793119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-0.0005290656">
            <text:p>-0.0005290656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5981918">
            <text:p>0.005981918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-0.001232678">
            <text:p>-0.001232678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7276624">
            <text:p>-0.007276624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8089052">
            <text:p>0.008089052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7884287">
            <text:p>0.007884287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-0.0004963101">
            <text:p>-0.0004963101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8489138">
            <text:p>0.008489138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7609811">
            <text:p>-0.007609811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532888">
            <text:p>0.01532888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085546">
            <text:p>0.01085546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2335212">
            <text:p>0.002335212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5287204">
            <text:p>-0.005287204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823587">
            <text:p>0.01823587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6340837">
            <text:p>-0.006340837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036742">
            <text:p>0.02036742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3101388">
            <text:p>-0.003101388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08896886">
            <text:p>0.008896886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08998549">
            <text:p>0.008998549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1119386">
            <text:p>0.001119386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03480081">
            <text:p>0.0003480081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4240077">
            <text:p>-0.004240077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271583">
            <text:p>0.00271583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3894711">
            <text:p>0.003894711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2164325">
            <text:p>0.002164325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017615">
            <text:p>0.01017615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2530236">
            <text:p>-0.002530236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5596238">
            <text:p>-0.005596238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5513373">
            <text:p>-0.005513373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1218975">
            <text:p>-0.01218975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7031786">
            <text:p>0.007031786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1145089">
            <text:p>-0.01145089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06086613">
            <text:p>0.0006086613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5650563">
            <text:p>0.005650563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0309234">
            <text:p>0.000309234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-0.002519683">
            <text:p>-0.002519683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-0.002274935">
            <text:p>-0.002274935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-0.001903742">
            <text:p>-0.001903742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7882337">
            <text:p>0.007882337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2810891">
            <text:p>0.002810891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7067021">
            <text:p>-0.007067021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539987">
            <text:p>0.01539987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5146397">
            <text:p>0.005146397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4854331">
            <text:p>-0.004854331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5509601">
            <text:p>-0.005509601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1995244">
            <text:p>0.001995244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03606143">
            <text:p>0.0003606143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7367779">
            <text:p>-0.007367779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7385">
            <text:p>0.0167385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4283272">
            <text:p>0.004283272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392184">
            <text:p>0.01392184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443446">
            <text:p>0.00443446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8266285">
            <text:p>0.008266285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-0.0004793538">
            <text:p>-0.0004793538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087415">
            <text:p>0.01087415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9300575">
            <text:p>0.009300575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6542471">
            <text:p>-0.006542471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246542">
            <text:p>0.00246542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8799994">
            <text:p>0.008799994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8359546">
            <text:p>-0.008359546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3694776">
            <text:p>-0.003694776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107828">
            <text:p>0.01107828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1234043">
            <text:p>0.001234043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-0.0002045476">
            <text:p>-0.0002045476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2581582">
            <text:p>-0.002581582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-0.001940549">
            <text:p>-0.001940549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5811163">
            <text:p>-0.005811163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1015858">
            <text:p>-0.01015858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5578849">
            <text:p>-0.005578849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436266">
            <text:p>0.00436266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1556507">
            <text:p>0.001556507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648677">
            <text:p>0.01648677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09963298">
            <text:p>0.009963298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2838757">
            <text:p>0.002838757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1156781">
            <text:p>-0.01156781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196302">
            <text:p>0.02196302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107584">
            <text:p>-0.0107584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452961">
            <text:p>-0.00452961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2017365">
            <text:p>-0.002017365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2662368">
            <text:p>0.002662368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-0.00196966">
            <text:p>-0.00196966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844899">
            <text:p>0.00844899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7099494">
            <text:p>-0.007099494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9098465">
            <text:p>-0.009098465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1984747">
            <text:p>0.001984747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3541683">
            <text:p>0.003541683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725218">
            <text:p>0.00725218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4227447">
            <text:p>-0.004227447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2633">
            <text:p>0.01263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6838514">
            <text:p>-0.006838514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5652025">
            <text:p>-0.005652025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4253612">
            <text:p>0.004253612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387181">
            <text:p>0.01387181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083563">
            <text:p>0.01083563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6468666">
            <text:p>0.006468666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7957672">
            <text:p>0.007957672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9377647">
            <text:p>-0.009377647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8508778">
            <text:p>0.008508778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06038844">
            <text:p>0.0006038844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7349536">
            <text:p>-0.007349536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089533">
            <text:p>0.01089533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0864884">
            <text:p>0.000864884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834394">
            <text:p>-0.00834394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1272375">
            <text:p>-0.01272375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3236411">
            <text:p>-0.003236411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2567029">
            <text:p>0.002567029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string">
            <text:p>3.630985E-05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5791563">
            <text:p>-0.005791563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8687099">
            <text:p>0.008687099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437096">
            <text:p>-0.00437096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4208385">
            <text:p>0.004208385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3996316">
            <text:p>-0.003996316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4060453">
            <text:p>0.004060453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06904543">
            <text:p>0.0006904543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2562119">
            <text:p>-0.002562119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2480783">
            <text:p>-0.002480783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1990454">
            <text:p>0.001990454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600679">
            <text:p>-0.00600679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893668">
            <text:p>0.01893668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06685362">
            <text:p>-0.0006685362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3169598">
            <text:p>0.003169598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5622395">
            <text:p>0.005622395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3730063">
            <text:p>0.003730063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-0.0005322708">
            <text:p>-0.0005322708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7982845">
            <text:p>0.007982845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8981585">
            <text:p>0.008981585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5946237">
            <text:p>-0.005946237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5288994">
            <text:p>0.005288994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-0.001270098">
            <text:p>-0.001270098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2995126">
            <text:p>0.002995126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-0.002272301">
            <text:p>-0.002272301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7047566">
            <text:p>-0.007047566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044917">
            <text:p>0.01044917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5324119">
            <text:p>-0.005324119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4301022">
            <text:p>-0.004301022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-0.00113449">
            <text:p>-0.00113449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2982137">
            <text:p>0.002982137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3437625">
            <text:p>0.003437625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-0.0002831916">
            <text:p>-0.0002831916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2120499">
            <text:p>-0.002120499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2698358">
            <text:p>-0.002698358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2469961">
            <text:p>0.002469961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594121">
            <text:p>0.00594121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1216805">
            <text:p>-0.01216805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04356693">
            <text:p>0.0004356693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7904514">
            <text:p>-0.007904514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2770571">
            <text:p>0.002770571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3714257">
            <text:p>-0.003714257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6021594">
            <text:p>-0.006021594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6554254">
            <text:p>-0.006554254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-0.001591707">
            <text:p>-0.001591707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2454805">
            <text:p>0.002454805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2783264">
            <text:p>-0.002783264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5266145">
            <text:p>-0.005266145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string">
            <text:p>4.468065E-05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05014381">
            <text:p>0.0005014381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7919303">
            <text:p>-0.007919303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-0.001197897">
            <text:p>-0.001197897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1103012">
            <text:p>-0.01103012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8240215">
            <text:p>-0.008240215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6272323">
            <text:p>-0.006272323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3553947">
            <text:p>-0.003553947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6339485">
            <text:p>-0.006339485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6903635">
            <text:p>-0.006903635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3769684">
            <text:p>0.003769684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1297569">
            <text:p>-0.01297569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582172">
            <text:p>-0.00582172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991157">
            <text:p>-0.00991157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5452687">
            <text:p>0.005452687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6255362">
            <text:p>-0.006255362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212684">
            <text:p>0.008212684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9127932">
            <text:p>0.009127932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495764">
            <text:p>-0.00495764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07448772">
            <text:p>0.0007448772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80208">
            <text:p>0.01180208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3139816">
            <text:p>0.003139816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493416">
            <text:p>-0.00493416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349817">
            <text:p>0.01349817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-0.001041229">
            <text:p>-0.001041229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string">
            <text:p>-5.156238E-05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3582972">
            <text:p>-0.003582972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155118">
            <text:p>0.00155118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9435329">
            <text:p>-0.009435329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8834458">
            <text:p>-0.008834458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-0.0005826012">
            <text:p>-0.0005826012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2640745">
            <text:p>-0.002640745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1982265">
            <text:p>0.001982265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2857094">
            <text:p>-0.002857094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8273575">
            <text:p>0.008273575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3079749">
            <text:p>0.003079749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1088566">
            <text:p>-0.01088566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1815086">
            <text:p>0.001815086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7619752">
            <text:p>-0.007619752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9825372">
            <text:p>-0.009825372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251539">
            <text:p>0.01251539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1193113">
            <text:p>-0.001193113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-0.005508013">
            <text:p>-0.005508013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8754754">
            <text:p>0.008754754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3513897">
            <text:p>0.003513897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6164082">
            <text:p>-0.006164082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2934428">
            <text:p>-0.002934428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7056432">
            <text:p>-0.007056432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8647798">
            <text:p>-0.008647798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6207043">
            <text:p>-0.006207043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4059229">
            <text:p>-0.004059229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5332985">
            <text:p>-0.005332985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01340657">
            <text:p>0.0001340657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-0.0007004673">
            <text:p>-0.0007004673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845898">
            <text:p>0.01845898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4797742">
            <text:p>0.004797742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571591">
            <text:p>0.00571591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509405">
            <text:p>0.00509405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45803">
            <text:p>-0.0045803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4418485">
            <text:p>-0.004418485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4253987">
            <text:p>0.004253987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08760573">
            <text:p>0.0008760573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-0.001050937">
            <text:p>-0.001050937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3280363">
            <text:p>0.003280363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296342">
            <text:p>0.02296342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9343463">
            <text:p>-0.009343463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-0.001767826">
            <text:p>-0.001767826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4512202">
            <text:p>0.04512202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2712787">
            <text:p>0.002712787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3725342">
            <text:p>0.003725342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2969899">
            <text:p>-0.002969899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272868">
            <text:p>0.01272868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1714092">
            <text:p>0.001714092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1101383">
            <text:p>-0.01101383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09392">
            <text:p>0.0109392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7635295">
            <text:p>-0.007635295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5854903">
            <text:p>-0.005854903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429002">
            <text:p>0.009429002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3969383">
            <text:p>0.003969383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424861">
            <text:p>0.01424861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3497697">
            <text:p>0.003497697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5739621">
            <text:p>0.005739621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-0.0008926095">
            <text:p>-0.0008926095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1932645">
            <text:p>0.001932645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-0.0009885229">
            <text:p>-0.0009885229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-0.0009349465">
            <text:p>-0.0009349465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9498768">
            <text:p>-0.009498768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6821764">
            <text:p>-0.006821764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324139">
            <text:p>-0.01324139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2010028">
            <text:p>-0.002010028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4994602">
            <text:p>-0.004994602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43789">
            <text:p>0.0143789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8207916">
            <text:p>-0.008207916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1482664">
            <text:p>-0.001482664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-0.0003377969">
            <text:p>-0.0003377969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1611943">
            <text:p>-0.001611943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1198929">
            <text:p>-0.001198929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177423">
            <text:p>0.009177423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1950535">
            <text:p>-0.001950535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3868597">
            <text:p>-0.003868597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1197143">
            <text:p>-0.01197143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1390084">
            <text:p>-0.001390084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1040488">
            <text:p>0.001040488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3355394">
            <text:p>0.003355394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8347481">
            <text:p>-0.008347481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1039735">
            <text:p>-0.01039735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902025">
            <text:p>0.00902025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1327578">
            <text:p>0.001327578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3551086">
            <text:p>-0.003551086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2154407">
            <text:p>-0.002154407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8909301">
            <text:p>-0.008909301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794968">
            <text:p>0.02794968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7764448">
            <text:p>-0.007764448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49209">
            <text:p>0.0149209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8193058">
            <text:p>-0.008193058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7250321">
            <text:p>-0.007250321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1070956">
            <text:p>-0.01070956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9106198">
            <text:p>-0.009106198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354277">
            <text:p>-0.01354277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7824107">
            <text:p>0.007824107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2929098">
            <text:p>0.002929098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8293755">
            <text:p>-0.008293755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-0.0005426733">
            <text:p>-0.0005426733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7872038">
            <text:p>-0.007872038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84179">
            <text:p>0.0284179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06064">
            <text:p>0.00706064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519204">
            <text:p>0.01519204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2352418">
            <text:p>0.002352418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9780128">
            <text:p>-0.009780128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4674774">
            <text:p>-0.004674774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4018788">
            <text:p>0.004018788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150189">
            <text:p>0.003150189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813">
            <text:p>0.02813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15671">
            <text:p>-0.0015671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-0.0001606401">
            <text:p>-0.0001606401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5841631">
            <text:p>0.005841631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-0.000602373">
            <text:p>-0.000602373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1390562">
            <text:p>0.001390562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4869352">
            <text:p>0.004869352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21012">
            <text:p>0.01121012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3232694">
            <text:p>-0.003232694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3428825">
            <text:p>-0.003428825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861021">
            <text:p>0.02861021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84023">
            <text:p>0.01184023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09192853">
            <text:p>0.0009192853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2078452">
            <text:p>-0.002078452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2789675">
            <text:p>0.002789675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232952">
            <text:p>0.01232952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1265506">
            <text:p>0.001265506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1414877">
            <text:p>0.001414877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7197007">
            <text:p>-0.007197007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3170151">
            <text:p>-0.003170151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4438482">
            <text:p>0.004438482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508458">
            <text:p>-0.00508458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720152">
            <text:p>0.01720152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019053">
            <text:p>0.007019053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6316777">
            <text:p>-0.006316777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407452">
            <text:p>0.006407452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1163764">
            <text:p>-0.01163764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6815691">
            <text:p>-0.006815691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4840473">
            <text:p>0.004840473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82477">
            <text:p>0.01082477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6117995">
            <text:p>-0.006117995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5747547">
            <text:p>-0.005747547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713276">
            <text:p>0.009713276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906789">
            <text:p>0.01906789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9974206">
            <text:p>-0.0009974206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1104744">
            <text:p>0.001104744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3724355">
            <text:p>-0.003724355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1637802">
            <text:p>-0.001637802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2790763">
            <text:p>-0.002790763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6952719">
            <text:p>-0.006952719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1107125">
            <text:p>0.0001107125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355507">
            <text:p>0.01355507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1197714">
            <text:p>-0.01197714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6646541">
            <text:p>0.006646541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5995939">
            <text:p>-0.005995939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3988954">
            <text:p>-0.003988954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6007665">
            <text:p>-0.006007665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6242587">
            <text:p>-0.006242587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64427">
            <text:p>0.01064427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5107842">
            <text:p>-0.005107842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7731173">
            <text:p>-0.007731173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108284">
            <text:p>-0.0108284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9651328">
            <text:p>-0.009651328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2117054">
            <text:p>0.002117054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05355176">
            <text:p>0.0005355176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4924085">
            <text:p>-0.004924085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250912">
            <text:p>0.01250912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3152092">
            <text:p>-0.003152092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10821">
            <text:p>0.0010821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41616">
            <text:p>0.0141616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3301106">
            <text:p>-0.003301106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3861005">
            <text:p>-0.003861005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2124725">
            <text:p>0.02124725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2035037">
            <text:p>-0.002035037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1787956">
            <text:p>0.001787956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4728585">
            <text:p>0.004728585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5080814">
            <text:p>-0.005080814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1036825">
            <text:p>0.01036825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string">
            <text:p>-7.895839E-05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941143">
            <text:p>-0.00941143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108832">
            <text:p>-0.0108832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1751628">
            <text:p>0.001751628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177741">
            <text:p>0.004177741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4673566">
            <text:p>0.004673566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8062522">
            <text:p>-0.008062522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070424">
            <text:p>0.002070424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277017">
            <text:p>0.004277017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9313735">
            <text:p>0.009313735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2711976">
            <text:p>-0.002711976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1592659">
            <text:p>0.001592659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3977257">
            <text:p>0.003977257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5705481">
            <text:p>-0.005705481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4662484">
            <text:p>-0.004662484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6091419">
            <text:p>-0.006091419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321812">
            <text:p>0.01321812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1124127">
            <text:p>-0.01124127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2228416">
            <text:p>-0.002228416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1653969">
            <text:p>0.001653969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1913215">
            <text:p>0.001913215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05845734">
            <text:p>0.0005845734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6460305">
            <text:p>-0.006460305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7903152">
            <text:p>-0.007903152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2063385">
            <text:p>0.002063385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2160957">
            <text:p>-0.002160957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954761">
            <text:p>-0.002954761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7301515">
            <text:p>0.007301515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07118996">
            <text:p>0.0007118996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9372965">
            <text:p>-0.009372965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61142">
            <text:p>0.00961142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3569981">
            <text:p>-0.003569981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8533762">
            <text:p>-0.008533762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04782272">
            <text:p>0.0004782272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-0.0009352967">
            <text:p>-0.0009352967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-0.0002839697">
            <text:p>-0.0002839697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1125061">
            <text:p>-0.01125061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8729977">
            <text:p>-0.008729977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53926">
            <text:p>0.00353926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4990526">
            <text:p>-0.004990526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49858">
            <text:p>0.0149858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9643907">
            <text:p>-0.009643907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4397776">
            <text:p>-0.004397776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0634797">
            <text:p>-0.000634797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560568">
            <text:p>0.008560568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370489">
            <text:p>0.004370489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7795678">
            <text:p>-0.007795678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8128187">
            <text:p>0.008128187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7293804">
            <text:p>-0.007293804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205331">
            <text:p>-0.01205331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5480446">
            <text:p>-0.005480446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9927">
            <text:p>0.019927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816246">
            <text:p>0.01816246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785576">
            <text:p>0.01785576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1199026">
            <text:p>-0.01199026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1212411">
            <text:p>-0.001212411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913037">
            <text:p>0.004913037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4669725">
            <text:p>0.004669725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9058248">
            <text:p>-0.009058248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1913922">
            <text:p>-0.001913922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208072">
            <text:p>-0.01208072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1062919">
            <text:p>0.01062919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5127816">
            <text:p>0.005127816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-0.0009235064">
            <text:p>-0.0009235064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271452">
            <text:p>0.004271452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564762">
            <text:p>0.01564762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4207938">
            <text:p>-0.004207938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454241">
            <text:p>0.004454241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521839">
            <text:p>0.002521839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3895962">
            <text:p>0.003895962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1199048">
            <text:p>-0.01199048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4866579">
            <text:p>-0.004866579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0902122">
            <text:p>0.000902122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845348">
            <text:p>-0.00845348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147506">
            <text:p>0.002147506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2597486">
            <text:p>-0.002597486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7362046">
            <text:p>-0.007362046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-0.001454346">
            <text:p>-0.001454346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9516665">
            <text:p>-0.009516665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199485">
            <text:p>-0.01199485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538769">
            <text:p>0.005538769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08432621">
            <text:p>0.0008432621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-0.0002374065">
            <text:p>-0.0002374065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-0.0001553278">
            <text:p>-0.0001553278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60216">
            <text:p>0.00160216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6183107">
            <text:p>0.006183107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7115679">
            <text:p>-0.007115679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1134282">
            <text:p>-0.01134282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0890343">
            <text:p>0.000890343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1788243">
            <text:p>-0.001788243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-0.000467841">
            <text:p>-0.000467841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03856639">
            <text:p>0.0003856639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328949">
            <text:p>-0.00328949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094425">
            <text:p>0.001094425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750301">
            <text:p>-0.00750301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4951392">
            <text:p>0.004951392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2761758">
            <text:p>-0.002761758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3788199">
            <text:p>-0.003788199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533032">
            <text:p>0.001533032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3272415">
            <text:p>-0.003272415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00495">
            <text:p>0.00100495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5581559">
            <text:p>0.005581559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8667052">
            <text:p>0.008667052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1403232">
            <text:p>-0.001403232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5892901">
            <text:p>-0.005892901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1041183">
            <text:p>0.01041183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495109">
            <text:p>-0.00495109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1086892">
            <text:p>-0.01086892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111445">
            <text:p>-0.0111445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489046">
            <text:p>0.004489046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8047599">
            <text:p>-0.008047599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1143019">
            <text:p>0.01143019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1108291">
            <text:p>-0.01108291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08140703">
            <text:p>0.0008140703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642756">
            <text:p>0.02642756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70835">
            <text:p>0.00170835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06490263">
            <text:p>0.0006490263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6018263">
            <text:p>0.006018263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242852">
            <text:p>0.005242852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4248046">
            <text:p>-0.004248046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-0.0006885611">
            <text:p>-0.0006885611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08748795">
            <text:p>0.0008748795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960639">
            <text:p>0.01960639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1113596">
            <text:p>-0.01113596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917518">
            <text:p>0.01917518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3452957">
            <text:p>-0.003452957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8706185">
            <text:p>-0.008706185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639681">
            <text:p>0.01639681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4194619">
            <text:p>-0.004194619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9553524">
            <text:p>-0.009553524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1036664">
            <text:p>-0.01036664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7366145">
            <text:p>-0.007366145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35957">
            <text:p>0.00235957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1021892">
            <text:p>-0.01021892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0903572">
            <text:p>0.000903572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341655">
            <text:p>0.00341655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929068">
            <text:p>0.01929068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167454">
            <text:p>0.001167454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6080914">
            <text:p>-0.006080914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07515493">
            <text:p>0.0007515493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6219905">
            <text:p>-0.006219905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6675184">
            <text:p>-0.006675184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2736756">
            <text:p>0.002736756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7060659">
            <text:p>-0.0007060659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420864">
            <text:p>-0.01420864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9402197">
            <text:p>-0.009402197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953085">
            <text:p>-0.00953085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249109">
            <text:p>-0.01249109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321691">
            <text:p>0.006321691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1121243">
            <text:p>-0.01121243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1000467">
            <text:p>-0.01000467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2852319">
            <text:p>0.002852319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8131216">
            <text:p>-0.008131216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9684823">
            <text:p>-0.009684823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964685">
            <text:p>0.02964685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2915828">
            <text:p>-0.002915828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2560428">
            <text:p>-0.002560428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7173494">
            <text:p>-0.007173494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554239">
            <text:p>0.002554239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2446871">
            <text:p>-0.002446871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-0.0003989516">
            <text:p>-0.0003989516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4219346">
            <text:p>-0.004219346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365045">
            <text:p>0.009365045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-0.001123918">
            <text:p>-0.001123918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-0.0002730987">
            <text:p>-0.0002730987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5353246">
            <text:p>-0.005353246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6750741">
            <text:p>-0.006750741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333788">
            <text:p>-0.01333788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5725574">
            <text:p>0.005725574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2509621">
            <text:p>-0.002509621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344079">
            <text:p>0.01344079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3204246">
            <text:p>-0.003204246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05624563">
            <text:p>-0.0005624563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2707845">
            <text:p>-0.002707845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103999">
            <text:p>-0.0103999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344199">
            <text:p>-0.01344199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664713">
            <text:p>0.002664713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168899">
            <text:p>-0.01168899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54634">
            <text:p>-0.0054634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1090135">
            <text:p>-0.01090135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335232">
            <text:p>0.005335232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1146379">
            <text:p>-0.01146379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string">
            <text:p>-6.899098E-06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2695817">
            <text:p>0.002695817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8601085">
            <text:p>-0.008601085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string">
            <text:p>8.383145E-05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9196083">
            <text:p>0.009196083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2402284">
            <text:p>0.002402284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115769">
            <text:p>-0.00115769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594887">
            <text:p>0.00594887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728398">
            <text:p>0.02728398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8397034">
            <text:p>-0.008397034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9754077">
            <text:p>-0.009754077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324239">
            <text:p>0.01324239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571877">
            <text:p>0.004571877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3244051">
            <text:p>-0.003244051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1458222">
            <text:p>0.001458222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764818">
            <text:p>0.005764818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224771">
            <text:p>-0.00224771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342968">
            <text:p>0.01342968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5727609">
            <text:p>0.005727609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50924">
            <text:p>0.0150924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7155669">
            <text:p>-0.007155669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02882505">
            <text:p>0.0002882505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9193472">
            <text:p>-0.009193472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3892759">
            <text:p>-0.003892759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8633483">
            <text:p>0.008633483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962825">
            <text:p>0.008962825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4886793">
            <text:p>0.004886793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3736737">
            <text:p>-0.003736737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897565">
            <text:p>0.01897565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6359697">
            <text:p>-0.006359697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7412533">
            <text:p>-0.007412533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8001508">
            <text:p>-0.008001508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17436">
            <text:p>-0.00217436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559665">
            <text:p>0.003559665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4687856">
            <text:p>-0.004687856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4210311">
            <text:p>-0.004210311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7074292">
            <text:p>-0.007074292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1055306">
            <text:p>-0.01055306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5046551">
            <text:p>-0.005046551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1852702">
            <text:p>-0.001852702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1856633">
            <text:p>0.001856633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3901272">
            <text:p>-0.003901272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16759">
            <text:p>-0.0016759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771402">
            <text:p>0.007771402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string">
            <text:p>-6.600605E-05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7609844">
            <text:p>0.007609844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9598265">
            <text:p>-0.009598265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113489">
            <text:p>-0.0113489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3604025">
            <text:p>-0.003604025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425097">
            <text:p>0.006425097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1061042">
            <text:p>-0.001061042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9687469">
            <text:p>-0.009687469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8725102">
            <text:p>-0.008725102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2100094">
            <text:p>-0.002100094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2057036">
            <text:p>0.02057036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4191284">
            <text:p>0.004191284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2002017">
            <text:p>-0.002002017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744547">
            <text:p>0.003744547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724791">
            <text:p>0.005724791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102826">
            <text:p>0.0102826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1441561">
            <text:p>0.001441561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1747333">
            <text:p>0.001747333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6812026">
            <text:p>-0.006812026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2173205">
            <text:p>0.0002173205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492386">
            <text:p>0.00492386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18179">
            <text:p>0.00318179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326805">
            <text:p>0.01326805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844835">
            <text:p>0.00844835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332315">
            <text:p>0.01332315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1898913">
            <text:p>-0.001898913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821455">
            <text:p>0.004821455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6674448">
            <text:p>0.006674448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367058">
            <text:p>0.003367058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2667415">
            <text:p>0.002667415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9842244">
            <text:p>-0.009842244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6612574">
            <text:p>0.006612574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238462">
            <text:p>0.002238462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597208">
            <text:p>0.005597208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5430186">
            <text:p>0.005430186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2955181">
            <text:p>-0.002955181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723872">
            <text:p>0.01723872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5196033">
            <text:p>0.005196033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5531904">
            <text:p>-0.005531904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1761874">
            <text:p>-0.001761874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7455602">
            <text:p>-0.007455602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32585">
            <text:p>0.0132585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600076">
            <text:p>-0.003600076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9184522">
            <text:p>0.009184522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-0.0002283223">
            <text:p>-0.0002283223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2266689">
            <text:p>-0.0002266689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5457034">
            <text:p>-0.005457034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1215959">
            <text:p>-0.01215959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4261277">
            <text:p>-0.004261277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281505">
            <text:p>-0.01281505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5327787">
            <text:p>-0.005327787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3887464">
            <text:p>-0.003887464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2166194">
            <text:p>-0.002166194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1078906">
            <text:p>0.01078906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566782">
            <text:p>0.01566782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1011025">
            <text:p>-0.01011025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9676813">
            <text:p>0.009676813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-0.0002663906">
            <text:p>-0.0002663906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809561">
            <text:p>-0.00809561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6413949">
            <text:p>-0.006413949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617574">
            <text:p>0.02617574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820075">
            <text:p>-0.00820075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string">
            <text:p>5.043694E-07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1066162">
            <text:p>0.01066162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8921688">
            <text:p>-0.0008921688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2111261">
            <text:p>0.02111261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3130793">
            <text:p>-0.003130793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814696">
            <text:p>0.005814696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856478">
            <text:p>0.00856478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1747602">
            <text:p>0.001747602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6844334">
            <text:p>-0.006844334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-0.0006408269">
            <text:p>-0.0006408269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3568418">
            <text:p>-0.003568418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478792">
            <text:p>-0.00478792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5593061">
            <text:p>0.005593061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504698">
            <text:p>0.01504698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0354772">
            <text:p>0.000354772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221304">
            <text:p>-0.01221304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2705485">
            <text:p>0.002705485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108867">
            <text:p>-0.0108867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8417571">
            <text:p>-0.008417571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9324814">
            <text:p>-0.009324814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654037">
            <text:p>0.03654037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919555">
            <text:p>-0.00919555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6092779">
            <text:p>-0.0609277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6299328">
            <text:p>-0.06299328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439833">
            <text:p>-0.06439833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500512">
            <text:p>-0.06500512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541543">
            <text:p>-0.06541543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495342">
            <text:p>-0.0649534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3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3:01:59.37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8cm" svg:width="10.685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939624">
                <text:p>0.006939624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242109">
                <text:p>0.001242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398135">
                <text:p>0.003398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481453">
                <text:p>0.01481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9535124">
                <text:p>0.009535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275101">
                <text:p>0.005275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872682">
                <text:p>0.0187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945492">
                <text:p>-0.001945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1053009">
                <text:p>0.001053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728858">
                <text:p>0.006728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1097509">
                <text:p>0.0109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369084">
                <text:p>0.01369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3378506">
                <text:p>-0.003378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100545">
                <text:p>0.002100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-0.000237412">
                <text:p>-0.000237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37732">
                <text:p>0.00737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535989">
                <text:p>-0.002535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2642848">
                <text:p>0.002642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4581587">
                <text:p>0.04581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8040567">
                <text:p>-0.008040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4217674">
                <text:p>-0.004217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22323">
                <text:p>0.0122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990967">
                <text:p>0.01990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2010483">
                <text:p>-0.002010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6704777">
                <text:p>-0.006704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448208">
                <text:p>0.004448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5690821">
                <text:p>-0.005690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852119">
                <text:p>0.002852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1095736">
                <text:p>0.01095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96368">
                <text:p>0.00396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1246325">
                <text:p>0.001246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2142344">
                <text:p>0.02142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934974">
                <text:p>-0.00934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173448">
                <text:p>0.001173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5783855">
                <text:p>0.0005783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4269317">
                <text:p>-0.004269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410451">
                <text:p>0.003410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121804">
                <text:p>0.005121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824531">
                <text:p>0.003824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6414162">
                <text:p>0.006414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933256">
                <text:p>0.003933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07126539">
                <text:p>0.0007126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247809">
                <text:p>0.008247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930915">
                <text:p>0.01930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538699">
                <text:p>-0.00538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103089">
                <text:p>0.0103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764467">
                <text:p>0.02764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2032218">
                <text:p>0.02032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716317">
                <text:p>0.005716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1090381">
                <text:p>0.0109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325555">
                <text:p>0.004325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874615">
                <text:p>0.00787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2331277">
                <text:p>-0.002331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290203">
                <text:p>0.005290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2316949">
                <text:p>0.02316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1902672">
                <text:p>-0.001902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1098616">
                <text:p>0.01098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3985611">
                <text:p>-0.003985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8829585">
                <text:p>-0.008829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1116774">
                <text:p>-0.001116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762119">
                <text:p>0.003762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7075827">
                <text:p>0.007075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3677618">
                <text:p>-0.003677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926712">
                <text:p>-0.001926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9545877">
                <text:p>-0.0095458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181072">
                <text:p>0.002181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630545">
                <text:p>0.02630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488527">
                <text:p>0.001488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1066483">
                <text:p>0.01066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367574">
                <text:p>0.009367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881455">
                <text:p>0.01881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907251">
                <text:p>-0.002907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4710789">
                <text:p>-0.004710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2652646">
                <text:p>0.002652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3723433">
                <text:p>-0.003723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9751642">
                <text:p>0.0097516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882079">
                <text:p>0.04882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1278959">
                <text:p>0.0012789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57316">
                <text:p>0.00157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1002566">
                <text:p>-0.01002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909708">
                <text:p>0.01909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516991">
                <text:p>0.009516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1133818">
                <text:p>0.01133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4509485">
                <text:p>-0.004509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688049">
                <text:p>0.005688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834333">
                <text:p>0.0183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333291">
                <text:p>0.01333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509362">
                <text:p>0.03509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11403">
                <text:p>0.0111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403047">
                <text:p>0.024030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5281389">
                <text:p>-0.005281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5114641">
                <text:p>-0.005114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2639378">
                <text:p>0.002639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712239">
                <text:p>0.009712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8388762">
                <text:p>-0.0008388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4665161">
                <text:p>-0.004665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677216">
                <text:p>0.006677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1370342">
                <text:p>-0.001370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1141458">
                <text:p>-0.011414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4396603">
                <text:p>-0.004396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285246">
                <text:p>0.02285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465832">
                <text:p>0.014658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5171554">
                <text:p>0.0051715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9392167">
                <text:p>-0.009392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03009486">
                <text:p>-0.0003009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395257">
                <text:p>0.0053952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991388">
                <text:p>0.059913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3694835">
                <text:p>-0.003694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1098535">
                <text:p>0.0010985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815918">
                <text:p>0.0018159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8026891">
                <text:p>-0.008026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071384">
                <text:p>0.008071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2592406">
                <text:p>0.0025924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318276">
                <text:p>-0.01318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-0.0005980033">
                <text:p>-0.0005980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325224">
                <text:p>0.005325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1890102">
                <text:p>-0.001890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4323519">
                <text:p>0.0004323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7548638">
                <text:p>-0.0075486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831663">
                <text:p>0.01831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1605339">
                <text:p>-0.001605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247896">
                <text:p>0.009247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9287293">
                <text:p>0.009287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8632403">
                <text:p>0.008632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2454167">
                <text:p>0.00024541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7568528">
                <text:p>0.007568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883554">
                <text:p>0.008835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568447">
                <text:p>0.035684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136959">
                <text:p>0.009136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8133514">
                <text:p>0.0081335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287156">
                <text:p>-0.0012871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52125">
                <text:p>0.01052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419282">
                <text:p>0.024192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6886915">
                <text:p>-0.0068869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3433207">
                <text:p>0.003433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978305">
                <text:p>0.01978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3552757">
                <text:p>0.0035527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6447115">
                <text:p>-0.0064471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3283652">
                <text:p>-0.0032836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306321">
                <text:p>-0.003063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210452">
                <text:p>0.0022104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8288323">
                <text:p>-0.0082883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1071381">
                <text:p>-0.010713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857081">
                <text:p>0.028570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03245562">
                <text:p>0.00032455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520543">
                <text:p>0.0035205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4582907">
                <text:p>-0.004582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254535">
                <text:p>-0.002545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4826713">
                <text:p>-0.004826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995162">
                <text:p>-0.0039951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324014">
                <text:p>-0.00324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464321">
                <text:p>0.014643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203097">
                <text:p>0.012030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3209349">
                <text:p>-0.003209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971359">
                <text:p>0.02971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782216">
                <text:p>0.005782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397871">
                <text:p>0.013978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5698102">
                <text:p>-0.005698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5240686">
                <text:p>-0.0052406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718626">
                <text:p>0.003718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711943">
                <text:p>0.0097119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6935261">
                <text:p>-0.0069352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1067837">
                <text:p>0.01067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01976">
                <text:p>0.00201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205135">
                <text:p>0.012051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967533">
                <text:p>0.003967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3795559">
                <text:p>0.0037955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-0.0005651404">
                <text:p>-0.00056514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934694">
                <text:p>0.019346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67142">
                <text:p>0.00267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2072307">
                <text:p>0.020723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70952">
                <text:p>0.0070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9776081">
                <text:p>0.0097760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9729155">
                <text:p>-0.0097291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209858">
                <text:p>0.0209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990634">
                <text:p>0.019906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744366">
                <text:p>0.017443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5533959">
                <text:p>-0.005533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3233601">
                <text:p>-0.003233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452026">
                <text:p>-0.004520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788752">
                <text:p>0.017887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6120363">
                <text:p>0.006120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729468">
                <text:p>0.02729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31311">
                <text:p>0.02313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822986">
                <text:p>0.018229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2538542">
                <text:p>-0.002538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3872776">
                <text:p>-0.003872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-0.0001980829">
                <text:p>-0.00019808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205473">
                <text:p>0.012054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691645">
                <text:p>0.004691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1382102">
                <text:p>-0.001382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307569">
                <text:p>0.01307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5243786">
                <text:p>-0.0052437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8248767">
                <text:p>0.008248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843752">
                <text:p>0.01843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86747">
                <text:p>0.013867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3648303">
                <text:p>-0.0036483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8765342">
                <text:p>-0.0087653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327346">
                <text:p>0.0093273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06664375">
                <text:p>0.000666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4062502">
                <text:p>-0.004062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4948634">
                <text:p>-0.0049486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04568634">
                <text:p>0.00045686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624286">
                <text:p>0.0046242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1122966">
                <text:p>-0.01122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256533">
                <text:p>0.012565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3759532">
                <text:p>-0.0037595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5778498">
                <text:p>0.0057784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5781875">
                <text:p>-0.00578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3395114">
                <text:p>-0.0003395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9081583">
                <text:p>-0.00090815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-0.001426995">
                <text:p>-0.0014269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7010199">
                <text:p>0.0070101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298843">
                <text:p>0.01298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3091537">
                <text:p>-0.003091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09401579">
                <text:p>0.0009401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722358">
                <text:p>0.027223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8286404">
                <text:p>-0.0082864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6320244">
                <text:p>-0.0063202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728911">
                <text:p>0.003728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2596779">
                <text:p>-0.0025967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266218">
                <text:p>0.012662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323866">
                <text:p>0.013238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726464">
                <text:p>-0.001726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660304">
                <text:p>-0.0036603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5890235">
                <text:p>-0.0058902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420797">
                <text:p>0.0024207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3795591">
                <text:p>-0.0037955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5309419">
                <text:p>-0.0053094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223832">
                <text:p>0.0012238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265278">
                <text:p>0.012652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570254">
                <text:p>0.03570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1083032">
                <text:p>-0.010830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1041136">
                <text:p>-0.010411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2782234">
                <text:p>0.002782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358449">
                <text:p>-0.003584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6278614">
                <text:p>0.0062786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487313">
                <text:p>-0.014873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396415">
                <text:p>0.0033964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3010566">
                <text:p>-0.0030105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177106">
                <text:p>0.0021771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8784933">
                <text:p>0.0087849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-0.0002732229">
                <text:p>-0.00027322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497389">
                <text:p>0.014973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1018288">
                <text:p>-0.010182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7133963">
                <text:p>-0.000713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3025479">
                <text:p>-0.0030254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429457">
                <text:p>0.024294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1330625">
                <text:p>-0.0001330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4994282">
                <text:p>0.004994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-0.0002132727">
                <text:p>-0.00021327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291957">
                <text:p>0.012919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1004938">
                <text:p>-0.010049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1170072">
                <text:p>-0.011700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789698">
                <text:p>0.0097896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48011">
                <text:p>0.003480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8405532">
                <text:p>-0.0084055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5163863">
                <text:p>-0.0051638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638584">
                <text:p>0.016385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15222">
                <text:p>0.01152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174783">
                <text:p>0.011747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8957076">
                <text:p>-0.008957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2268103">
                <text:p>-0.0022681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4314236">
                <text:p>0.0043142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444023">
                <text:p>0.0034440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594543">
                <text:p>0.0055945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884595">
                <text:p>0.0048845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627807">
                <text:p>0.016278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222089">
                <text:p>-0.012220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4324867">
                <text:p>0.0043248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512252">
                <text:p>0.0025122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392431">
                <text:p>0.013924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1030147">
                <text:p>0.010301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1151425">
                <text:p>-0.011514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81627">
                <text:p>0.011816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03080507">
                <text:p>0.00030805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109818">
                <text:p>-0.01098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375071">
                <text:p>0.001375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1539148">
                <text:p>-0.0015391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139691">
                <text:p>0.0021396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6294512">
                <text:p>0.006294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09946">
                <text:p>-0.002099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1769458">
                <text:p>0.0017694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939467">
                <text:p>0.019394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6907296">
                <text:p>-0.0069072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8502726">
                <text:p>-0.0085027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824053">
                <text:p>0.01824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2675">
                <text:p>0.012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1482891">
                <text:p>-0.0014828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3310466">
                <text:p>-0.0033104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228378">
                <text:p>0.0052283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625922">
                <text:p>0.0046259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1143304">
                <text:p>0.011433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601077">
                <text:p>-0.001601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562145">
                <text:p>-0.005621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811359">
                <text:p>0.018113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6895495">
                <text:p>-0.0068954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6635228">
                <text:p>0.0066352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1785643">
                <text:p>0.0017856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4575761">
                <text:p>0.0045757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5379607">
                <text:p>0.005379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976523">
                <text:p>0.0049765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07504257">
                <text:p>0.00075042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342107">
                <text:p>0.013421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06923343">
                <text:p>0.00069233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9452537">
                <text:p>0.0094525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3421597">
                <text:p>-0.0034215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273067">
                <text:p>0.0042730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885901">
                <text:p>0.003885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449176">
                <text:p>0.001449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102653">
                <text:p>0.01026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478727">
                <text:p>0.014787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783339">
                <text:p>0.017833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8126131">
                <text:p>-0.0081261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173437">
                <text:p>0.011734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4051827">
                <text:p>-0.0040518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7339951">
                <text:p>-0.0073399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4008383">
                <text:p>0.0040083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2646193">
                <text:p>0.002646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1365027">
                <text:p>-0.0013650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7888298">
                <text:p>-0.007888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7196488">
                <text:p>-0.0071964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9643798">
                <text:p>-0.0096437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109417">
                <text:p>-0.01094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1486754">
                <text:p>0.00014867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397764">
                <text:p>0.0053977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486374">
                <text:p>0.0034863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781168">
                <text:p>0.0087811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5466547">
                <text:p>-0.0054665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1717312">
                <text:p>-0.0017173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766514">
                <text:p>0.017665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03253805">
                <text:p>0.00032538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1995193">
                <text:p>-0.0019951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315263">
                <text:p>0.013152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243879">
                <text:p>0.012438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1274081">
                <text:p>0.0012740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9019295">
                <text:p>0.0090192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665006">
                <text:p>-0.00665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66516">
                <text:p>0.001665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56064">
                <text:p>0.010560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7155178">
                <text:p>-0.0071551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948249">
                <text:p>0.0029482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755918">
                <text:p>0.017559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169886">
                <text:p>0.0051698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235581">
                <text:p>0.002355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1193519">
                <text:p>-0.01193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316144">
                <text:p>0.013161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67177">
                <text:p>-0.000671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2632146">
                <text:p>-0.0026321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222182">
                <text:p>0.007222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721857">
                <text:p>-0.007218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546571">
                <text:p>0.01546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324124">
                <text:p>0.013241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17149">
                <text:p>0.01171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278439">
                <text:p>0.0027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4121464">
                <text:p>0.0041214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831357">
                <text:p>-0.0038313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09401701">
                <text:p>0.00094017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1013066">
                <text:p>-0.010130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-0.0003287641">
                <text:p>-0.00032876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08219578">
                <text:p>0.00082195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1501838">
                <text:p>0.0015018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8609494">
                <text:p>-0.0086094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6585588">
                <text:p>-0.0065855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9799233">
                <text:p>0.0097992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1754252">
                <text:p>0.0017542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1219776">
                <text:p>-0.0012197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1577661">
                <text:p>-0.0015776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59503">
                <text:p>0.003595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2176797">
                <text:p>0.021767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21195">
                <text:p>0.01211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2834205">
                <text:p>-0.0028342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3508795">
                <text:p>-0.0035087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9491558">
                <text:p>0.0094915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354376">
                <text:p>0.013543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280799">
                <text:p>0.0012807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09277092">
                <text:p>-0.00092770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1952087">
                <text:p>-0.0019520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5941517">
                <text:p>0.0059415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363916">
                <text:p>0.0063639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7975442">
                <text:p>-0.0079754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608983">
                <text:p>0.016089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729556">
                <text:p>0.0087295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79718">
                <text:p>0.005797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6580099">
                <text:p>-0.0065800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899154">
                <text:p>-0.00899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789428">
                <text:p>-0.0047894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3662914">
                <text:p>-0.0036629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6537191">
                <text:p>-0.0065371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125675">
                <text:p>0.0071256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213184">
                <text:p>0.012131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4111758">
                <text:p>0.0041117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5530258">
                <text:p>0.005530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5893494">
                <text:p>-0.0058934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762445">
                <text:p>-0.007624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1050199">
                <text:p>-0.010501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53493">
                <text:p>0.010534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333752">
                <text:p>0.0333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837302">
                <text:p>0.0048373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8419706">
                <text:p>0.0084197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537605">
                <text:p>0.0095376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2533723">
                <text:p>-0.0025337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137328">
                <text:p>0.011373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785539">
                <text:p>0.0037855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602899">
                <text:p>0.0046028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3696031">
                <text:p>-0.0036960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09154743">
                <text:p>-0.00091547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7873081">
                <text:p>-0.00078730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942253">
                <text:p>0.0019422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2661803">
                <text:p>-0.0026618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176147">
                <text:p>0.011761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997119">
                <text:p>-0.003997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-0.0006118197">
                <text:p>-0.00061181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43196">
                <text:p>0.01431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752675">
                <text:p>0.017526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360288">
                <text:p>0.023602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32531">
                <text:p>0.01032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8263499">
                <text:p>-0.0082634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4442518">
                <text:p>-0.0044425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1064107">
                <text:p>-0.010641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1048712">
                <text:p>-0.010487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-0.001610516">
                <text:p>-0.0016105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40917">
                <text:p>-0.003409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-0.0001225305">
                <text:p>-0.00012253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1883539">
                <text:p>-0.001883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294371">
                <text:p>0.002943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9665656">
                <text:p>0.0096656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8235889">
                <text:p>-0.0082358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4640736">
                <text:p>-0.0046407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223832">
                <text:p>-0.012238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1118586">
                <text:p>-0.011185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1098908">
                <text:p>-0.010989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9971204">
                <text:p>-0.0099712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1257458">
                <text:p>-0.0012574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395427">
                <text:p>0.0033954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731034">
                <text:p>0.007310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5834616">
                <text:p>-0.0058346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236532">
                <text:p>0.0022365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7113348">
                <text:p>-0.0071133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1004376">
                <text:p>0.010043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7796332">
                <text:p>0.007796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185777">
                <text:p>0.021857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362421">
                <text:p>0.013624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798971">
                <text:p>0.0027989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5076318">
                <text:p>-0.0050763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1142649">
                <text:p>-0.011426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639412">
                <text:p>0.0076394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8888061">
                <text:p>-0.0088880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431197">
                <text:p>0.0044311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7337645">
                <text:p>-0.0073376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5838104">
                <text:p>-0.005838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01698123">
                <text:p>0.00016981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421717">
                <text:p>0.01421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9992328">
                <text:p>-0.0099923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6743249">
                <text:p>-0.0067432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1036353">
                <text:p>-0.010363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238261">
                <text:p>0.0032382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6418326">
                <text:p>-0.0064183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798939">
                <text:p>-0.007989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7199013">
                <text:p>-0.0071990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9058026">
                <text:p>-0.00090580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502813">
                <text:p>0.0025028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175231">
                <text:p>-0.011752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2917115">
                <text:p>0.00029171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34896">
                <text:p>0.006348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198453">
                <text:p>-0.011984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869915">
                <text:p>-0.0018699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498743">
                <text:p>0.034987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2569957">
                <text:p>-0.002569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-0.0003038307">
                <text:p>-0.00030383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8669825">
                <text:p>-0.0086698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271013">
                <text:p>0.012710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5662004">
                <text:p>0.005662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6259714">
                <text:p>-0.0062597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1150302">
                <text:p>-0.00115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6632127">
                <text:p>-0.0066321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1014452">
                <text:p>-0.010144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4579097">
                <text:p>-0.0045790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7002193">
                <text:p>-0.0070021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7259312">
                <text:p>0.0072593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1056561">
                <text:p>0.010565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5323588">
                <text:p>-0.0053235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2032288">
                <text:p>-0.0020322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2150596">
                <text:p>-0.0021505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1614307">
                <text:p>-0.0016143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4557941">
                <text:p>-0.0045579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9720903">
                <text:p>-0.0097209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2448833">
                <text:p>0.0024488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929626">
                <text:p>-0.0019296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8648291">
                <text:p>0.0086482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2081583">
                <text:p>-0.0020815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5421733">
                <text:p>-0.0054217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3167745">
                <text:p>-0.0031677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8131403">
                <text:p>-0.0081314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3473659">
                <text:p>-0.0034736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268031">
                <text:p>-0.012680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1089985">
                <text:p>-0.0010899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2520812">
                <text:p>-0.0025208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05278328">
                <text:p>0.00052783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46999">
                <text:p>0.0146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770181">
                <text:p>0.017701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6145019">
                <text:p>-0.0061450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987744">
                <text:p>0.0039877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8376682">
                <text:p>-0.0083766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6713646">
                <text:p>0.0067136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5289314">
                <text:p>-0.0052893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434875">
                <text:p>0.002434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7951343">
                <text:p>-0.0079513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8697477">
                <text:p>-0.0086974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4252092">
                <text:p>-0.0042520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375764">
                <text:p>0.013757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3608">
                <text:p>0.01036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8143541">
                <text:p>-0.0081435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4165143">
                <text:p>-0.00041651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5637809">
                <text:p>0.0056378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2173121">
                <text:p>0.002173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302947">
                <text:p>0.003029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5087211">
                <text:p>0.0050872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155722">
                <text:p>0.011557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8216034">
                <text:p>-0.0082160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719082">
                <text:p>0.007190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268302">
                <text:p>-0.012683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937591">
                <text:p>-0.009375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3189551">
                <text:p>-0.0031895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200773">
                <text:p>0.012007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735636">
                <text:p>-0.007356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3528656">
                <text:p>-0.0035286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7043061">
                <text:p>-0.0070430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271708">
                <text:p>0.012717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7317579">
                <text:p>0.0073175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395614">
                <text:p>-0.013956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1021532">
                <text:p>-0.010215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2236413">
                <text:p>-0.0022364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247585">
                <text:p>-0.012475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635609">
                <text:p>0.016356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27734">
                <text:p>-0.001277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6914337">
                <text:p>-0.0069143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7449719">
                <text:p>-0.0074497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5910074">
                <text:p>-0.0059100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310197">
                <text:p>0.013101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129846">
                <text:p>0.011298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394381">
                <text:p>0.013943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1117436">
                <text:p>0.011174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7792758">
                <text:p>-0.0077927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1028331">
                <text:p>0.01028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-0.0001089651">
                <text:p>-0.00010896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762436">
                <text:p>0.0047624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6561293">
                <text:p>-0.0065612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093139">
                <text:p>0.0040931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860797">
                <text:p>0.018607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3847951">
                <text:p>-0.0038479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8466146">
                <text:p>0.0084661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4558338">
                <text:p>0.0045583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1073838">
                <text:p>0.010738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225055">
                <text:p>0.0032250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483516">
                <text:p>0.014835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68675">
                <text:p>0.003686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2941191">
                <text:p>-0.0029411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1585684">
                <text:p>-0.0015856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347851">
                <text:p>0.013478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59698">
                <text:p>0.01596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2811421">
                <text:p>-0.00028114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2130225">
                <text:p>-0.0021302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1086179">
                <text:p>-0.010861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265272">
                <text:p>0.01265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9606155">
                <text:p>-0.0096061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263782">
                <text:p>0.012637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321442">
                <text:p>0.013214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1171221">
                <text:p>-0.011712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4779937">
                <text:p>-0.0047799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823976">
                <text:p>0.018239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78468">
                <text:p>0.013784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7442238">
                <text:p>-0.007442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677537">
                <text:p>0.016775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9300943">
                <text:p>0.0093009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4670472">
                <text:p>-0.004670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3688607">
                <text:p>0.0036886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5233727">
                <text:p>-0.00523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9928769">
                <text:p>-0.0099287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87388">
                <text:p>0.012873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4076043">
                <text:p>-0.0040760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47334">
                <text:p>0.01473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-0.0008907777">
                <text:p>-0.0008907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8104311">
                <text:p>0.0081043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121028">
                <text:p>0.0021210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765218">
                <text:p>0.0027652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190705">
                <text:p>0.0031907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4091666">
                <text:p>0.00040916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3791024">
                <text:p>-0.0037910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5975476">
                <text:p>-0.0059754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9469537">
                <text:p>0.0094695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6927378">
                <text:p>-0.0069273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608979">
                <text:p>0.016089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213393">
                <text:p>0.0042133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5108511">
                <text:p>-0.00051085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569497">
                <text:p>0.015694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094886">
                <text:p>0.0020948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698579">
                <text:p>0.0046985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339282">
                <text:p>0.0013392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06941595">
                <text:p>0.00069415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548886">
                <text:p>-0.005488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9699884">
                <text:p>-0.0096998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350062">
                <text:p>0.0063500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5041572">
                <text:p>0.0050415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09591073">
                <text:p>-0.00095910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102147">
                <text:p>-0.01021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722259">
                <text:p>0.0027222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2065985">
                <text:p>-0.0020659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05240124">
                <text:p>0.00052401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3115084">
                <text:p>-0.0031150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043525">
                <text:p>0.0040435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769587">
                <text:p>-0.0037695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514432">
                <text:p>0.015144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4260461">
                <text:p>-0.0042604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4244397">
                <text:p>-0.0042443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2865886">
                <text:p>-0.0028658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3293502">
                <text:p>-0.0032935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55267">
                <text:p>0.01552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-0.0004757187">
                <text:p>-0.0004757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-0.0001286981">
                <text:p>-0.00012869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581099">
                <text:p>0.0015810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4098477">
                <text:p>-0.004098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687495">
                <text:p>0.016874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8390092">
                <text:p>0.00083900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2000362">
                <text:p>0.00020003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8718797">
                <text:p>-0.0087187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862112">
                <text:p>0.018621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2261208">
                <text:p>-0.0022612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408044">
                <text:p>0.014080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1116009">
                <text:p>-0.011160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3313003">
                <text:p>0.003313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111434">
                <text:p>-0.01114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358459">
                <text:p>0.013584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075265">
                <text:p>0.0020752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9994452">
                <text:p>-0.0099944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-0.001065519">
                <text:p>-0.0010655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86775">
                <text:p>0.01867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309932">
                <text:p>0.013099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5493889">
                <text:p>-0.0054938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9812812">
                <text:p>-0.0098128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1180799">
                <text:p>-0.0011807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-0.001242838">
                <text:p>-0.0012428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1336">
                <text:p>0.004133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654599">
                <text:p>0.016545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5060034">
                <text:p>-0.0050600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3009716">
                <text:p>-0.0030097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7240362">
                <text:p>-0.0072403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168942">
                <text:p>-0.011689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1882913">
                <text:p>0.00018829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7895864">
                <text:p>-0.0078958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367723">
                <text:p>0.013677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435038">
                <text:p>0.024350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8377673">
                <text:p>-0.0083776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614512">
                <text:p>0.0016145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792564">
                <text:p>0.0057925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899389">
                <text:p>-0.0018993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9493926">
                <text:p>-0.0094939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753224">
                <text:p>0.0037532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4310469">
                <text:p>-0.0043104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334002">
                <text:p>0.0083340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4174459">
                <text:p>-0.0041744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1095059">
                <text:p>0.010950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4129836">
                <text:p>-0.0041298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9808828">
                <text:p>-0.0098088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3623289">
                <text:p>-0.0036232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8660165">
                <text:p>-0.0086601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5104408">
                <text:p>0.051044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4809495">
                <text:p>-0.0048094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154191">
                <text:p>0.0031541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334714">
                <text:p>0.0023347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5482582">
                <text:p>0.054825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2471788">
                <text:p>-0.0024717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644868">
                <text:p>-0.0016448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7220677">
                <text:p>-0.0072206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990322">
                <text:p>-0.009903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4468913">
                <text:p>-0.0044689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41671">
                <text:p>0.01416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5013421">
                <text:p>-0.0050134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5747033">
                <text:p>-0.0057470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7475771">
                <text:p>0.0074757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2616929">
                <text:p>0.0026169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4058308">
                <text:p>-0.0040583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6545547">
                <text:p>0.0065455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3983317">
                <text:p>-0.0039833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1796434">
                <text:p>0.0017964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2186064">
                <text:p>0.00021860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5253996">
                <text:p>0.0052539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696264">
                <text:p>-0.0036962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5506837">
                <text:p>-0.0055068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3986319">
                <text:p>-0.0039863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2968933">
                <text:p>-0.0029689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2825547">
                <text:p>-0.0028255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9548609">
                <text:p>-0.0095486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7046747">
                <text:p>-0.0070467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5274927">
                <text:p>-0.0052749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432717">
                <text:p>0.024327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3265754">
                <text:p>-0.0032657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82781">
                <text:p>0.01827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5016489">
                <text:p>-0.0050164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9893802">
                <text:p>0.0098938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1007817">
                <text:p>-0.0010078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3328109">
                <text:p>-0.0033281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8731573">
                <text:p>-0.0087315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4853164">
                <text:p>-0.0048531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7714519">
                <text:p>-0.0077145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838839">
                <text:p>-0.0008388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3056433">
                <text:p>-0.0030564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420853">
                <text:p>0.0024208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3426776">
                <text:p>-0.0034267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5165025">
                <text:p>0.0051650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6050007">
                <text:p>-0.0060500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538101">
                <text:p>0.0065381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437806">
                <text:p>0.0074378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721706">
                <text:p>-0.0017217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220647">
                <text:p>0.0052206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5112307">
                <text:p>0.0051123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06133312">
                <text:p>0.00061333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3091771">
                <text:p>-0.0030917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1103472">
                <text:p>-0.0011034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4382322">
                <text:p>-0.0043823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388544">
                <text:p>0.0013885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08538472">
                <text:p>0.00085384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7285211">
                <text:p>-0.0072852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158021">
                <text:p>0.011580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985395">
                <text:p>-0.0029853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2542618">
                <text:p>-0.0025426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-0.000374901">
                <text:p>-0.0003749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6834774">
                <text:p>0.0068347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415288">
                <text:p>0.0054152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21173">
                <text:p>0.003211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515672">
                <text:p>0.015156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572838">
                <text:p>0.0025728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369787">
                <text:p>0.0136978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1348509">
                <text:p>-0.0013485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7771578">
                <text:p>-0.0077715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467966">
                <text:p>0.0024679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951796">
                <text:p>-0.009517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047274">
                <text:p>0.0020472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3532676">
                <text:p>-0.0035326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2225201">
                <text:p>-0.0022252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1634283">
                <text:p>-0.0016342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1120154">
                <text:p>-0.011201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982127">
                <text:p>0.0099821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1119897">
                <text:p>-0.011198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32437">
                <text:p>0.00532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4751609">
                <text:p>0.0047516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3828714">
                <text:p>0.0038287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1082874">
                <text:p>-0.010828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455498">
                <text:p>0.0024554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641043">
                <text:p>0.016410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6332306">
                <text:p>-0.0063323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-0.0009072958">
                <text:p>-0.00090729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3404754">
                <text:p>0.00034047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438279">
                <text:p>0.0094382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371686">
                <text:p>-0.003716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3705016">
                <text:p>-0.0037050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4557052">
                <text:p>-0.0045570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949079">
                <text:p>0.019490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9141343">
                <text:p>-0.0091413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507196">
                <text:p>0.0065071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2845066">
                <text:p>-0.000284506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7941647">
                <text:p>-0.0079416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-0.0006682367">
                <text:p>-0.00066823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7912572">
                <text:p>-0.0079125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8754349">
                <text:p>-0.0087543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6380478">
                <text:p>-0.0063804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04163587">
                <text:p>0.00041635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5511744">
                <text:p>-0.0055117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957303">
                <text:p>0.019573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138875">
                <text:p>0.0041388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2989205">
                <text:p>-0.0029892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954816">
                <text:p>0.009548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3893966">
                <text:p>-0.0038939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472718">
                <text:p>0.014727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958477">
                <text:p>0.0059584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9983345">
                <text:p>0.0099833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056424">
                <text:p>0.0030564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307111">
                <text:p>0.023071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391313">
                <text:p>-0.013913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3178176">
                <text:p>-0.0031781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643819">
                <text:p>-0.006438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2410399">
                <text:p>-0.0024103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4897169">
                <text:p>-0.0048971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3692085">
                <text:p>-0.0036920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8053081">
                <text:p>-0.0080530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827593">
                <text:p>0.0018275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587811">
                <text:p>0.0025878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1004295">
                <text:p>-0.010042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371925">
                <text:p>-0.003719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8078145">
                <text:p>-0.0080781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09250491">
                <text:p>0.00092504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8786448">
                <text:p>-0.00087864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335082">
                <text:p>0.0013350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3520321">
                <text:p>-0.0035203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612253">
                <text:p>0.0036122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830769">
                <text:p>0.0028307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48874">
                <text:p>-0.00488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2183894">
                <text:p>0.021838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8562482">
                <text:p>0.0085624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582663">
                <text:p>-0.0058266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3237957">
                <text:p>0.0032379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3109328">
                <text:p>0.031093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663963">
                <text:p>0.0066639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634478">
                <text:p>0.016344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8233932">
                <text:p>0.0082339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222883">
                <text:p>0.0032228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960357">
                <text:p>0.029603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2787461">
                <text:p>0.0027874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682405">
                <text:p>0.026824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0298638">
                <text:p>0.00029863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191994">
                <text:p>0.001919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9778449">
                <text:p>-0.0097784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1025565">
                <text:p>0.010255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1313502">
                <text:p>0.0013135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1081224">
                <text:p>-0.010812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3501167">
                <text:p>-0.0035011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-0.0009871593">
                <text:p>-0.00098715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2634845">
                <text:p>-0.0026348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1216946">
                <text:p>-0.012169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8307613">
                <text:p>-0.0083076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2479104">
                <text:p>-0.0024791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111836">
                <text:p>0.0001118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4241629">
                <text:p>-0.0042416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2861818">
                <text:p>-0.0028618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8506828">
                <text:p>-0.0085068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1765246">
                <text:p>0.0017652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821887">
                <text:p>0.0028218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4178432">
                <text:p>-0.0041784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74982">
                <text:p>0.012749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04833889">
                <text:p>0.00048338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9623405">
                <text:p>0.0096234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255713">
                <text:p>-0.012557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960947">
                <text:p>0.0069609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5590821">
                <text:p>-0.0055908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289668">
                <text:p>-0.0032896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484179">
                <text:p>0.0044841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032425">
                <text:p>0.0020324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-0.0002830631">
                <text:p>-0.000283063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5534096">
                <text:p>-0.0055340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3693542">
                <text:p>-0.0036935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5635893">
                <text:p>-0.0056358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-0.0005739765">
                <text:p>-0.00057397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8139345">
                <text:p>-0.0081393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7192906">
                <text:p>0.0071929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6117437">
                <text:p>-0.0061174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1168527">
                <text:p>-0.0116852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1112719">
                <text:p>-0.011127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2518496">
                <text:p>-0.00025184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4737636">
                <text:p>-0.0047376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4858126">
                <text:p>0.00048581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5521418">
                <text:p>-0.0055214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5827258">
                <text:p>-0.0058272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4934363">
                <text:p>-0.0049343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7514954">
                <text:p>-0.0075149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386491">
                <text:p>0.013864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2627259">
                <text:p>0.0026272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319099">
                <text:p>0.023190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264232">
                <text:p>-0.012642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7900662">
                <text:p>-0.0079006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02060713">
                <text:p>0.00020607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1377433">
                <text:p>0.0013774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805994">
                <text:p>-0.018059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9469611">
                <text:p>-0.0094696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569808">
                <text:p>0.035698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691586">
                <text:p>0.016915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066796">
                <text:p>0.00506679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6120757">
                <text:p>0.0061207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1711901">
                <text:p>0.00017119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-0.0008735688">
                <text:p>-0.00087356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116341">
                <text:p>0.0011163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977319">
                <text:p>0.0039773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7159933">
                <text:p>-0.0071599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1139939">
                <text:p>-0.011399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8927755">
                <text:p>-0.0089277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1711594">
                <text:p>-0.0017115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174086">
                <text:p>0.011740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141294">
                <text:p>0.0061412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1025125">
                <text:p>0.010251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358013">
                <text:p>0.0013580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403427">
                <text:p>0.014034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4963879">
                <text:p>-0.0049638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0.0004362002">
                <text:p>0.00043620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9961461">
                <text:p>-0.0099614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7688363">
                <text:p>-0.0076883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6309405">
                <text:p>-0.0063094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701546">
                <text:p>0.0027015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5769015">
                <text:p>0.0057690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426993">
                <text:p>0.0054269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533353">
                <text:p>0.015333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4753696">
                <text:p>-0.0047536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8089">
                <text:p>-0.00580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149903">
                <text:p>0.0011499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277258">
                <text:p>0.012772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1104375">
                <text:p>-0.01104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4154689">
                <text:p>0.0041546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4463227">
                <text:p>-0.0044632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9485631">
                <text:p>0.0094856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7602493">
                <text:p>0.00760249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2356713">
                <text:p>-0.0023567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546914">
                <text:p>0.025469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5108988">
                <text:p>-0.0051089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1022571">
                <text:p>-0.010225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1081096">
                <text:p>-0.010810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456734">
                <text:p>0.0094567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8950243">
                <text:p>-0.0089502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334528">
                <text:p>0.013345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947408">
                <text:p>0.0069474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3695225">
                <text:p>-0.0036952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653801">
                <text:p>-0.006538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330688">
                <text:p>0.0023306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1162959">
                <text:p>-0.0116295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54155">
                <text:p>0.010541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8777673">
                <text:p>-0.00087776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5383099">
                <text:p>-0.0053830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224725">
                <text:p>-0.012247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399201">
                <text:p>0.0043992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200145">
                <text:p>0.012001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7299482">
                <text:p>0.0072994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56746">
                <text:p>-0.00567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240283">
                <text:p>0.002402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17099">
                <text:p>-0.00170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8437594">
                <text:p>-0.0084375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374778">
                <text:p>-0.003747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77624">
                <text:p>0.01776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6214264">
                <text:p>-0.0062142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839277">
                <text:p>-0.0038392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628792">
                <text:p>-0.016287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2816611">
                <text:p>-0.0028166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279663">
                <text:p>0.0052796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094366">
                <text:p>0.00509436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6090216">
                <text:p>-0.0060902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8983198">
                <text:p>-0.0089831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625026">
                <text:p>0.0036250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294842">
                <text:p>0.012948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502903">
                <text:p>-0.0055029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116187">
                <text:p>0.011161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1225931">
                <text:p>-0.00122593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770533">
                <text:p>-0.0027705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217932">
                <text:p>0.002179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401187">
                <text:p>0.0084011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36184">
                <text:p>0.0093618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5271426">
                <text:p>-0.0052714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5267912">
                <text:p>-0.0052679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505455">
                <text:p>0.0035054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714256">
                <text:p>0.0027142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6827298">
                <text:p>0.000682729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1159909">
                <text:p>-0.011599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222061">
                <text:p>0.0022220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4054231">
                <text:p>0.00405423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7106335">
                <text:p>-0.0071063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166816">
                <text:p>-0.011668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3509327">
                <text:p>-0.0035093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863521">
                <text:p>0.0088635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3043633">
                <text:p>-0.0030436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8423189">
                <text:p>-0.0084231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4985659">
                <text:p>-0.0049856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19707">
                <text:p>0.003197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9719796">
                <text:p>-0.00097197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8456894">
                <text:p>0.0084568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8612786">
                <text:p>-0.0086127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539934">
                <text:p>-0.005399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7832206">
                <text:p>-0.0078322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2090215">
                <text:p>0.020902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977971">
                <text:p>0.029779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-0.0003944444">
                <text:p>-0.00039444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6548911">
                <text:p>-0.0065489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605058">
                <text:p>0.0076050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2526269">
                <text:p>-0.0025262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9009846">
                <text:p>0.0090098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934795">
                <text:p>0.009347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5582962">
                <text:p>-0.0055829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318035">
                <text:p>0.013180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4549553">
                <text:p>-0.0045495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6354432">
                <text:p>0.00063544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3384026">
                <text:p>-0.0033840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331693">
                <text:p>0.0063316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2481195">
                <text:p>-0.0024811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447685">
                <text:p>-0.004476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8154817">
                <text:p>-0.0081548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992129">
                <text:p>0.0039921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5581977">
                <text:p>-0.0055819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2903901">
                <text:p>-0.00290390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4840422">
                <text:p>-0.0048404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9850415">
                <text:p>0.0098504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220344">
                <text:p>0.012203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929386">
                <text:p>0.0069293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222842">
                <text:p>0.022228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8063688">
                <text:p>-0.00806368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3427947">
                <text:p>-0.0034279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1401226">
                <text:p>0.0014012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3707678">
                <text:p>0.00370767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5592066">
                <text:p>-0.00559206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407434">
                <text:p>0.0140743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958494">
                <text:p>0.0195849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702305">
                <text:p>0.0087023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2188832">
                <text:p>0.0021888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642739">
                <text:p>0.00364273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716092">
                <text:p>-0.0017160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250237">
                <text:p>0.0042502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4168011">
                <text:p>-0.0041680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844507">
                <text:p>-0.00484450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646974">
                <text:p>-0.0064697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672576">
                <text:p>0.016725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168589">
                <text:p>-0.0011685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982016">
                <text:p>0.0029820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906969">
                <text:p>-0.009069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7479792">
                <text:p>-0.00747979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479965">
                <text:p>0.024799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5995388">
                <text:p>-0.00599538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3837325">
                <text:p>-0.0038373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6048379">
                <text:p>-0.00604837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122023">
                <text:p>0.0021220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3433848">
                <text:p>-0.0034338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2280318">
                <text:p>-0.0022803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5787244">
                <text:p>0.0057872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1009617">
                <text:p>-0.010096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883764">
                <text:p>-0.008837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6098555">
                <text:p>-0.0060985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36237">
                <text:p>0.013623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2069457">
                <text:p>0.0020694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240413">
                <text:p>-0.012404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2956303">
                <text:p>0.0029563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3342174">
                <text:p>-0.0033421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983333">
                <text:p>0.029833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1765201">
                <text:p>-0.0017652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2261197">
                <text:p>-0.00226119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5644106">
                <text:p>0.00564410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1903072">
                <text:p>0.0019030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1176311">
                <text:p>-0.011763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6097954">
                <text:p>0.0060979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269219">
                <text:p>0.002692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1954746">
                <text:p>-0.00195474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2614797">
                <text:p>0.00261479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4014397">
                <text:p>0.0040143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-0.001328823">
                <text:p>-0.0013288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2538732">
                <text:p>-0.0025387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5034267">
                <text:p>0.0050342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5026894">
                <text:p>-0.00502689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95566">
                <text:p>0.014955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3950994">
                <text:p>0.0039509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747554">
                <text:p>-0.007475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217687">
                <text:p>-0.0121768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2549542">
                <text:p>-0.0025495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6985902">
                <text:p>0.00698590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1025938">
                <text:p>-0.0102593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391666">
                <text:p>-0.0139166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4451286">
                <text:p>-0.0044512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1662696">
                <text:p>0.0016626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1161034">
                <text:p>-0.0116103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8610939">
                <text:p>-0.00861093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025053">
                <text:p>0.00302505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267805">
                <text:p>0.022678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6052193">
                <text:p>-0.0060521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1103263">
                <text:p>-0.0110326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9782228">
                <text:p>-0.0097822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6836136">
                <text:p>0.068361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1591668">
                <text:p>-0.00159166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4642267">
                <text:p>-0.00464226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222415">
                <text:p>0.0072224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587863">
                <text:p>0.035878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5847313">
                <text:p>-0.00058473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986669">
                <text:p>-0.019866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387999">
                <text:p>0.023879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94299">
                <text:p>0.0109429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4378412">
                <text:p>-0.00437841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018184">
                <text:p>-0.00201818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4428146">
                <text:p>0.00442814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3056203">
                <text:p>-0.00305620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1080049">
                <text:p>0.000108004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824322">
                <text:p>0.018243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-0.0001804529">
                <text:p>-0.00018045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5153273">
                <text:p>0.0051532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323964">
                <text:p>-0.0132396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039651">
                <text:p>0.0010396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958585">
                <text:p>0.009585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8012022">
                <text:p>-0.0080120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3032499">
                <text:p>-0.000303249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466378">
                <text:p>0.024663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07426537">
                <text:p>0.000742653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3824834">
                <text:p>-0.00382483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7796613">
                <text:p>-0.000779661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3944706">
                <text:p>-0.0039447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8079316">
                <text:p>0.0080793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2984694">
                <text:p>0.00298469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584963">
                <text:p>-0.0055849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1977606">
                <text:p>-0.00197760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2314431">
                <text:p>0.0023144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8521215">
                <text:p>-0.0085212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1192734">
                <text:p>-0.011927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189814">
                <text:p>0.001898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65693">
                <text:p>-0.00656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3038006">
                <text:p>0.0030380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971297">
                <text:p>0.029712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507151">
                <text:p>-0.0050715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1634523">
                <text:p>-0.0016345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02755525">
                <text:p>0.00027555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6021908">
                <text:p>-0.00602190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3748886">
                <text:p>-0.0037488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3921397">
                <text:p>0.00392139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686321">
                <text:p>0.00668632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429127">
                <text:p>-0.004291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181259">
                <text:p>-0.0118125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511412">
                <text:p>0.0055114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1675913">
                <text:p>-0.0016759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81617">
                <text:p>-0.00816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1450968">
                <text:p>0.0014509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-0.0008486697">
                <text:p>-0.00084866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2960414">
                <text:p>0.0029604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5572234">
                <text:p>-0.00557223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1259213">
                <text:p>-0.00125921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4376543">
                <text:p>0.00437654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2170378">
                <text:p>0.0021703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5897315">
                <text:p>-0.0058973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1172514">
                <text:p>0.0011725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388042">
                <text:p>0.013880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5441281">
                <text:p>-0.00544128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889492">
                <text:p>-0.0028894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4476591">
                <text:p>-0.0044765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497018">
                <text:p>0.014970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642395">
                <text:p>0.0016423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985454">
                <text:p>0.00398545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9341761">
                <text:p>0.00934176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-0.0003314314">
                <text:p>-0.00033143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091299">
                <text:p>0.00309129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7742981">
                <text:p>-0.0077429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1049285">
                <text:p>-0.0104928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9201865">
                <text:p>-0.00920186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214924">
                <text:p>0.0121492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9727873">
                <text:p>-0.00972787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379712">
                <text:p>-0.0023797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084423">
                <text:p>0.0060844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9638097">
                <text:p>0.0096380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269712">
                <text:p>0.012697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1000551">
                <text:p>-0.010005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3393616">
                <text:p>-0.0033936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3795321">
                <text:p>-0.00379532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356844">
                <text:p>-0.0135684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-0.0002439472">
                <text:p>-0.00024394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559366">
                <text:p>0.0155936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5393919">
                <text:p>0.000539391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090721">
                <text:p>0.0109072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289743">
                <text:p>-0.0128974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862315">
                <text:p>0.0068623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5131492">
                <text:p>-0.0051314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552829">
                <text:p>-0.0025528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540459">
                <text:p>-0.0154045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5101014">
                <text:p>0.0051010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1440745">
                <text:p>0.0014407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-0.0003759031">
                <text:p>-0.000375903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441872">
                <text:p>-0.0144187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093328">
                <text:p>0.00809332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844776">
                <text:p>-0.0084477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211656">
                <text:p>-0.002116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604479">
                <text:p>-0.0160447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-0.0009594791">
                <text:p>-0.00095947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254322">
                <text:p>0.012543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219876">
                <text:p>0.00121987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490177">
                <text:p>-0.0149017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799843">
                <text:p>0.0077998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051408">
                <text:p>0.010514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8797068">
                <text:p>-0.0087970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2842106">
                <text:p>-0.00284210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1889641">
                <text:p>0.0018896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7605847">
                <text:p>0.00760584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304079">
                <text:p>-0.0130407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343271">
                <text:p>0.003432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8857512">
                <text:p>0.0088575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4827816">
                <text:p>0.0048278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104891">
                <text:p>0.01048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809027">
                <text:p>-0.0080902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4481493">
                <text:p>-0.00448149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633461">
                <text:p>0.0056334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214818">
                <text:p>-0.0121481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5026114">
                <text:p>-0.00502611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724875">
                <text:p>0.017248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9000652">
                <text:p>-0.0090006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4846233">
                <text:p>-0.0048462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818069">
                <text:p>-0.0038180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08217299">
                <text:p>0.000821729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4358098">
                <text:p>-0.00435809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318637">
                <text:p>-0.013186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777411">
                <text:p>-0.017774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130661">
                <text:p>0.00613066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192441">
                <text:p>0.00819244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7585242">
                <text:p>-0.00758524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386046">
                <text:p>-0.0038604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009048">
                <text:p>0.010090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213535">
                <text:p>0.0121353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8643117">
                <text:p>-0.0086431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6925111">
                <text:p>-0.0069251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23389">
                <text:p>0.007233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7919624">
                <text:p>0.00791962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1217313">
                <text:p>-0.0121731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225123">
                <text:p>-0.012251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108959">
                <text:p>0.0110895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2372758">
                <text:p>-0.00237275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755588">
                <text:p>-0.0075558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5852896">
                <text:p>-0.00585289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7541002">
                <text:p>-0.00754100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990379">
                <text:p>0.0089903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1208635">
                <text:p>-0.0120863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72285">
                <text:p>-0.01722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57014">
                <text:p>0.01570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-0.001533894">
                <text:p>-0.00153389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359529">
                <text:p>-0.0135952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1060492">
                <text:p>0.0106049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448503">
                <text:p>0.00244850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41074">
                <text:p>0.0024107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587632">
                <text:p>-0.015876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2120422">
                <text:p>0.0212042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9154961">
                <text:p>0.00915496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232255">
                <text:p>0.012322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603332">
                <text:p>-0.00160333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07036689">
                <text:p>-0.00070366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4428601">
                <text:p>-0.0044286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426987">
                <text:p>0.0042698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510952">
                <text:p>0.015109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4872121">
                <text:p>0.000487212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234012">
                <text:p>0.0072340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749296">
                <text:p>0.0174929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826463">
                <text:p>-0.0082646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2080577">
                <text:p>-0.00208057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58264">
                <text:p>0.010582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871199">
                <text:p>0.0387119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311609">
                <text:p>0.0131160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8767967">
                <text:p>-0.00876796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3437605">
                <text:p>0.00343760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2829363">
                <text:p>-0.00282936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7570644">
                <text:p>0.00757064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6170385">
                <text:p>-0.00617038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8518543">
                <text:p>0.0085185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413117">
                <text:p>0.041311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662898">
                <text:p>0.0166289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280898">
                <text:p>-0.012808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5735565">
                <text:p>-0.00573556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14417">
                <text:p>0.010144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3675525">
                <text:p>-0.00367552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283309">
                <text:p>0.00828330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446435">
                <text:p>0.0144643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07207598">
                <text:p>-0.000720759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315895">
                <text:p>-0.0131589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2269421">
                <text:p>-0.00226942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6014474">
                <text:p>0.00601447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207775">
                <text:p>-0.00120777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1167405">
                <text:p>-0.0116740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8647295">
                <text:p>0.00864729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382398">
                <text:p>0.00238239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8760939">
                <text:p>0.00876093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2764692">
                <text:p>-0.00276469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672349">
                <text:p>0.00567234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-0.0002228797">
                <text:p>-0.000222879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135032">
                <text:p>0.011350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115892">
                <text:p>-0.0011589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1842991">
                <text:p>0.00184299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93345">
                <text:p>0.0129334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964117">
                <text:p>-0.0096411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6151911">
                <text:p>-0.00615191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613723">
                <text:p>0.00661372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4470273">
                <text:p>0.00447027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9711603">
                <text:p>-0.00971160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641495">
                <text:p>0.016414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7650821">
                <text:p>0.00765082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4659267">
                <text:p>0.00465926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06039761">
                <text:p>-0.000603976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323126">
                <text:p>-0.0132312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0848">
                <text:p>0.001084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632558">
                <text:p>-0.0063255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731803">
                <text:p>-0.0073180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11039">
                <text:p>-0.01103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576219">
                <text:p>0.0057621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5816252">
                <text:p>-0.00581625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688901">
                <text:p>-0.00368890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8968434">
                <text:p>-0.0089684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2869248">
                <text:p>0.00286924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544755">
                <text:p>0.0154475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7792331">
                <text:p>-0.00779233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568547">
                <text:p>-0.0156854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1065312">
                <text:p>-0.0106531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08329867">
                <text:p>0.000832986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936177">
                <text:p>-0.00493617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8075903">
                <text:p>-0.0080759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169203">
                <text:p>0.00316920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913657">
                <text:p>0.00491365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1546342">
                <text:p>-0.00154634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032974">
                <text:p>-0.0103297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817522">
                <text:p>0.0181752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3870976">
                <text:p>-0.00387097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472976">
                <text:p>-0.0147297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5524235">
                <text:p>0.00552423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865428">
                <text:p>0.0286542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2230995">
                <text:p>-0.0022309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6597576">
                <text:p>-0.00659757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1062296">
                <text:p>0.010622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5837838">
                <text:p>-0.00583783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07246954">
                <text:p>0.000724695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7103875">
                <text:p>-0.0071038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1045718">
                <text:p>-0.0104571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07381492">
                <text:p>0.00073814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294686">
                <text:p>-0.012946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784198">
                <text:p>-0.00678419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9058888">
                <text:p>-0.00905888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224522">
                <text:p>-0.002245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1065227">
                <text:p>0.010652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2558631">
                <text:p>-0.00255863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4166871">
                <text:p>-0.0041668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1981418">
                <text:p>-0.0019814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9048036">
                <text:p>-0.0090480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706581">
                <text:p>-0.0070658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496705">
                <text:p>-0.0049670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940995">
                <text:p>0.0294099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1995645">
                <text:p>-0.0019956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572998">
                <text:p>0.00457299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132965">
                <text:p>0.0113296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9471367">
                <text:p>0.0094713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37165">
                <text:p>0.0103716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2237242">
                <text:p>0.0022372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864259">
                <text:p>-0.00586425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4487732">
                <text:p>-0.0044877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252891">
                <text:p>0.00525289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152353">
                <text:p>-0.0115235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6120688">
                <text:p>0.00612068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66013">
                <text:p>0.0056601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09752921">
                <text:p>-0.000975292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1097581">
                <text:p>-0.0109758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286408">
                <text:p>0.0128640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5217281">
                <text:p>0.0521728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1357765">
                <text:p>0.00135776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2133134">
                <text:p>0.0213313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319054">
                <text:p>-0.013190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424083">
                <text:p>0.00742408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349426">
                <text:p>0.003494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2098819">
                <text:p>0.020988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03082042">
                <text:p>-0.000308204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210058">
                <text:p>0.022100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655888">
                <text:p>0.0165588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7673272">
                <text:p>0.00767327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485924">
                <text:p>-0.00848592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3124545">
                <text:p>0.00312454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2328689">
                <text:p>0.00232868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482932">
                <text:p>-0.014829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1022109">
                <text:p>-0.010221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9752764">
                <text:p>0.0097527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2653357">
                <text:p>-0.00265335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746516">
                <text:p>-0.00774651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200304">
                <text:p>-0.0120030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570329">
                <text:p>0.0157032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5419313">
                <text:p>0.00541931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5562851">
                <text:p>-0.00556285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1367308">
                <text:p>-0.00136730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863345">
                <text:p>0.0186334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3134437">
                <text:p>0.0313443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387647">
                <text:p>-0.00438764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5414094">
                <text:p>0.00541409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232602">
                <text:p>0.00223260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2182607">
                <text:p>0.0218260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728506">
                <text:p>0.0272850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284735">
                <text:p>-0.0128473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8866367">
                <text:p>0.0088663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4193579">
                <text:p>-0.00419357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7888571">
                <text:p>-0.00788857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6576048">
                <text:p>-0.00657604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5768423">
                <text:p>0.0057684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7236972">
                <text:p>-0.00723697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4360508">
                <text:p>-0.00436050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5282828">
                <text:p>0.0052828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1018382">
                <text:p>0.0101838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2427572">
                <text:p>0.0024275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09992626">
                <text:p>-0.00999262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072594">
                <text:p>-0.0107259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2477698">
                <text:p>0.00247769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904931">
                <text:p>0.0090493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1069731">
                <text:p>0.0106973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222998">
                <text:p>-0.0122299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813058">
                <text:p>0.0181305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1176773">
                <text:p>0.0011767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7240932">
                <text:p>-0.00724093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4628946">
                <text:p>-0.0046289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2027056">
                <text:p>0.0202705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3043705">
                <text:p>0.00304370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175715">
                <text:p>-0.0117571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6844405">
                <text:p>-0.00684440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977772">
                <text:p>0.0197777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7851413">
                <text:p>-0.00785141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1235662">
                <text:p>-0.00123566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184333">
                <text:p>-0.0118433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5859779">
                <text:p>-0.00585977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488169">
                <text:p>0.014881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280899">
                <text:p>-0.0128089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3363116">
                <text:p>-0.00336311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6354985">
                <text:p>0.00635498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2714998">
                <text:p>0.00271499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039261">
                <text:p>-0.0103926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3615931">
                <text:p>-0.00361593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551533">
                <text:p>0.0155153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0.0001023296">
                <text:p>0.000102329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09377614">
                <text:p>-0.00093776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013636">
                <text:p>-0.0101363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05391731">
                <text:p>-0.000539173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671889">
                <text:p>0.0267188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5857007">
                <text:p>-0.00585700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3033836">
                <text:p>-0.00303383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5280639">
                <text:p>0.00528063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4649422">
                <text:p>0.00464942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2784192">
                <text:p>-0.00278419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04125906">
                <text:p>-0.00041259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7329905">
                <text:p>0.0073299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95776">
                <text:p>0.019577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07456284">
                <text:p>-0.000745628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122984">
                <text:p>-0.0012298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1286063">
                <text:p>0.012860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01452772">
                <text:p>-0.000145277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5827227">
                <text:p>-0.00582722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09335467">
                <text:p>-0.00093354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5543421">
                <text:p>0.00554342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8884738">
                <text:p>0.00888473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1129279">
                <text:p>0.0112927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0558135">
                <text:p>-0.005581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05495092">
                <text:p>-0.000549509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9616578">
                <text:p>0.00961657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04723535">
                <text:p>-0.00472353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0.001504667">
                <text:p>0.00150466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0.002507418">
                <text:p>0.00250741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2415986">
                <text:p>0.0241598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2188115">
                <text:p>-0.00218811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0.004074482">
                <text:p>0.00407448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2093369">
                <text:p>0.0209336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2623697">
                <text:p>0.0262369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03307601">
                <text:p>-0.000330760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1170159">
                <text:p>0.0117015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0.001667258">
                <text:p>0.00166725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1817392">
                <text:p>0.0181739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08944074">
                <text:p>-0.00894407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9828217">
                <text:p>0.00982821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125619">
                <text:p>0.012561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1976305">
                <text:p>0.019763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0.008269275">
                <text:p>0.00826927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0.0003286695">
                <text:p>0.000328669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1074389">
                <text:p>0.0107438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2897719">
                <text:p>0.028977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02337646">
                <text:p>-0.00233764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05491323">
                <text:p>-0.00549132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1884643">
                <text:p>0.0188464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0.009973635">
                <text:p>0.00997363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0.008540148">
                <text:p>0.00854014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004330087">
                <text:p>-0.000433008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0.008244126">
                <text:p>0.00824412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1539511">
                <text:p>0.0153951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02862224">
                <text:p>-0.00286222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0.006511734">
                <text:p>0.00651173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2707487">
                <text:p>0.0270748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1419773">
                <text:p>0.0141977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2303847">
                <text:p>0.0230384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0.005710473">
                <text:p>0.00571047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0.01225929">
                <text:p>0.0122592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414821">
                <text:p>0.041482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0.002512555">
                <text:p>0.00251255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0.005532186">
                <text:p>0.00553218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3992021">
                <text:p>0.0399202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1642033">
                <text:p>0.0164203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0.01498498">
                <text:p>0.0149849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0.01542911">
                <text:p>0.0154291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2247926">
                <text:p>0.0224792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1922716">
                <text:p>0.0192271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195054">
                <text:p>0.019505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0.01327933">
                <text:p>0.0132793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2783944">
                <text:p>0.0278394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0.01472397">
                <text:p>0.0147239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3282708">
                <text:p>0.0328270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2243639">
                <text:p>0.0224363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2779985">
                <text:p>0.0277998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2862042">
                <text:p>0.0286204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3098493">
                <text:p>0.0309849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0.0113654">
                <text:p>0.011365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2704695">
                <text:p>0.0270469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4246577">
                <text:p>0.0424657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0.01789823">
                <text:p>0.017898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0.01138958">
                <text:p>0.0113895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3192795">
                <text:p>0.0319279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0.02148052">
                <text:p>0.0214805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0.01125786">
                <text:p>0.0112578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0.01174033">
                <text:p>0.0117403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3411153">
                <text:p>0.034111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0.02236636">
                <text:p>0.0223663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0.02635416">
                <text:p>0.026354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0.01921344">
                <text:p>0.0192134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3363879">
                <text:p>0.033638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3281031">
                <text:p>0.0328103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0.01397219">
                <text:p>0.0139721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0.0253346">
                <text:p>0.025334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389118">
                <text:p>0.038911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3170726">
                <text:p>0.0317072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0.01940816">
                <text:p>0.0194081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4932579">
                <text:p>0.0493257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4135178">
                <text:p>0.0413517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0.02092559">
                <text:p>0.0209255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0.03628228">
                <text:p>0.036282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0.03212481">
                <text:p>0.0321248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4880293">
                <text:p>0.0488029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408066">
                <text:p>0.040806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0.0358305">
                <text:p>0.03583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40372">
                <text:p>0.04037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5231494">
                <text:p>0.0523149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0.03820146">
                <text:p>0.0382014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0.03200669">
                <text:p>0.0320066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5428689">
                <text:p>0.0542868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4382863">
                <text:p>0.0438286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0.04054461">
                <text:p>0.0405446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0.03274676">
                <text:p>0.0327467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5275374">
                <text:p>0.0527537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5223754">
                <text:p>0.0522375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0.03675261">
                <text:p>0.036752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5380058">
                <text:p>0.0538005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5289756">
                <text:p>0.0528975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5387616">
                <text:p>0.0538761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0.04757386">
                <text:p>0.047573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0.04481064">
                <text:p>0.0448106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6863598">
                <text:p>0.0686359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0.05087887">
                <text:p>0.0508788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0.04945667">
                <text:p>0.0494566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0.05974365">
                <text:p>0.0597436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7319834">
                <text:p>0.0731983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6460079">
                <text:p>0.0646007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6369697">
                <text:p>0.0636969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0.05138129">
                <text:p>0.0513812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0.05853214">
                <text:p>0.0585321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7164585">
                <text:p>0.071645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697664">
                <text:p>0.069766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0.06774127">
                <text:p>0.0677412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0.06382658">
                <text:p>0.0638265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0.06786932">
                <text:p>0.0678693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0.06533922">
                <text:p>0.0653392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0.06808882">
                <text:p>0.0680888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0.07179033">
                <text:p>0.0717903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8380231">
                <text:p>0.083802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0.06297278">
                <text:p>0.0629727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0.06661554">
                <text:p>0.0666155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8311723">
                <text:p>0.0831172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9127687">
                <text:p>0.0912768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0.06784854">
                <text:p>0.0678485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9118777">
                <text:p>0.0911877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0.0811153">
                <text:p>0.081115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1148373">
                <text:p>0.114837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0.08769573">
                <text:p>0.0876957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1000387">
                <text:p>0.100038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0.08637481">
                <text:p>0.0863748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0.08472176">
                <text:p>0.0847217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1109921">
                <text:p>0.110992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0.08501234">
                <text:p>0.0850123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107039">
                <text:p>0.10703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1046265">
                <text:p>0.104626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0.09782558">
                <text:p>0.0978255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1065748">
                <text:p>0.106574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130279">
                <text:p>0.13027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1097056">
                <text:p>0.109705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0.1039119">
                <text:p>0.103911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0.1003638">
                <text:p>0.100363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1156901">
                <text:p>0.115690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1199742">
                <text:p>0.119974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1142844">
                <text:p>0.114284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0.1022775">
                <text:p>0.102277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1249792">
                <text:p>0.124979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1390305">
                <text:p>0.139030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0.1171653">
                <text:p>0.117165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0.1229686">
                <text:p>0.122968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1408492">
                <text:p>0.14084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0.1251053">
                <text:p>0.125105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1331464">
                <text:p>0.133146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0.1151824">
                <text:p>0.115182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1349748">
                <text:p>0.134974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1676637">
                <text:p>0.167663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0.1270078">
                <text:p>0.127007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0.1315264">
                <text:p>0.131526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1479921">
                <text:p>0.147992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0.1388842">
                <text:p>0.138884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0.1339635">
                <text:p>0.133963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0.1306732">
                <text:p>0.130673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1475636">
                <text:p>0.147563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1791985">
                <text:p>0.17919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0.1466314">
                <text:p>0.146631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1563513">
                <text:p>0.156351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1567959">
                <text:p>0.156795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1571153">
                <text:p>0.157115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0.1482015">
                <text:p>0.14820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0.1479258">
                <text:p>0.147925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1622563">
                <text:p>0.162256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16751">
                <text:p>0.1675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0.1516709">
                <text:p>0.151670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0.1646383">
                <text:p>0.164638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1792917">
                <text:p>0.179291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1708399">
                <text:p>0.170839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0.1715802">
                <text:p>0.171580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2581387">
                <text:p>0.258138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1781201">
                <text:p>0.178120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0.1778148">
                <text:p>0.177814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1876912">
                <text:p>0.187691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0.1709635">
                <text:p>0.170963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1884771">
                <text:p>0.188477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0.1817005">
                <text:p>0.181700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0.1799943">
                <text:p>0.179994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1922844">
                <text:p>0.192284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197997">
                <text:p>0.19799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0.1956144">
                <text:p>0.195614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0.1906914">
                <text:p>0.190691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0.1905523">
                <text:p>0.190552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0.1991064">
                <text:p>0.199106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2109328">
                <text:p>0.21093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0.193943">
                <text:p>0.19394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0.2001282">
                <text:p>0.200128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2102186">
                <text:p>0.210218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0.2073197">
                <text:p>0.207319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0.2110604">
                <text:p>0.211060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0.2017408">
                <text:p>0.201740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0.2157148">
                <text:p>0.215714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2259713">
                <text:p>0.225971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2287066">
                <text:p>0.228706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0.2148526">
                <text:p>0.214852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0.2206182">
                <text:p>0.220618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2247843">
                <text:p>0.224784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0.2254674">
                <text:p>0.225467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0.2284316">
                <text:p>0.228431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2400229">
                <text:p>0.240022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2621297">
                <text:p>0.262129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0.2338053">
                <text:p>0.233805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0.2318208">
                <text:p>0.231820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2417037">
                <text:p>0.241703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2518261">
                <text:p>0.251826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0.2320231">
                <text:p>0.232023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0.2390424">
                <text:p>0.239042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2485072">
                <text:p>0.248507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2482388">
                <text:p>0.248238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247718">
                <text:p>0.24771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0.246923">
                <text:p>0.24692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2618144">
                <text:p>0.261814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255089">
                <text:p>0.25508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2570756">
                <text:p>0.257075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2641917">
                <text:p>0.26419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2686002">
                <text:p>0.268600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0.2571784">
                <text:p>0.257178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0.2559943">
                <text:p>0.25599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0.2483745">
                <text:p>0.248374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0.2577137">
                <text:p>0.257713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0.2641747">
                <text:p>0.264174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0.2530377">
                <text:p>0.253037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0.2600662">
                <text:p>0.260066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0.2678172">
                <text:p>0.267817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0.2665381">
                <text:p>0.266538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0.2670384">
                <text:p>0.267038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2736923">
                <text:p>0.273692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2770914">
                <text:p>0.277091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0.2696577">
                <text:p>0.269657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0.2672549">
                <text:p>0.267254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0.269085">
                <text:p>0.26908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298586">
                <text:p>0.29858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2881795">
                <text:p>0.288179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0.2762917">
                <text:p>0.27629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0.2835129">
                <text:p>0.283512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3027858">
                <text:p>0.302785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0.2813724">
                <text:p>0.281372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0.2844414">
                <text:p>0.28444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0.2778148">
                <text:p>0.277814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2974577">
                <text:p>0.297457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29435">
                <text:p>0.2943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0.2888368">
                <text:p>0.288836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0.2815488">
                <text:p>0.281548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0.287272">
                <text:p>0.28727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2966985">
                <text:p>0.296698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0.2901662">
                <text:p>0.290166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0.2818884">
                <text:p>0.281888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3028456">
                <text:p>0.302845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2977672">
                <text:p>0.297767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0.2811387">
                <text:p>0.281138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3091353">
                <text:p>0.309135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0.2943531">
                <text:p>0.294353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0.2924666">
                <text:p>0.292466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0.2864287">
                <text:p>0.286428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0.2872024">
                <text:p>0.287202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0.2956008">
                <text:p>0.29560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0.2952498">
                <text:p>0.295249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0.2986232">
                <text:p>0.29862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0.2995145">
                <text:p>0.299514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0.2958698">
                <text:p>0.295869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3093885">
                <text:p>0.30938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3230922">
                <text:p>0.323092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0.3039828">
                <text:p>0.303982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3138475">
                <text:p>0.31384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0.3038469">
                <text:p>0.303846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3302811">
                <text:p>0.33028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0.2935203">
                <text:p>0.293520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3087717">
                <text:p>0.308771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310502">
                <text:p>0.31050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0.2945571">
                <text:p>0.294557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0.2952539">
                <text:p>0.295253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3183001">
                <text:p>0.318300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3114649">
                <text:p>0.311464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0.2988307">
                <text:p>0.298830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3166267">
                <text:p>0.316626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312036">
                <text:p>0.31203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3143341">
                <text:p>0.314334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3199894">
                <text:p>0.319989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0.2999991">
                <text:p>0.299999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3087282">
                <text:p>0.308728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3125462">
                <text:p>0.312546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0.2967047">
                <text:p>0.296704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3041585">
                <text:p>0.304158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3075337">
                <text:p>0.307533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3127075">
                <text:p>0.312707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0.3037427">
                <text:p>0.303742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0.2924215">
                <text:p>0.292421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0.3036959">
                <text:p>0.303695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311581">
                <text:p>0.31158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3064955">
                <text:p>0.30649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3107055">
                <text:p>0.310705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0.3033944">
                <text:p>0.303394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3210322">
                <text:p>0.321032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3066902">
                <text:p>0.306690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3081254">
                <text:p>0.30812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0.3015351">
                <text:p>0.301535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0.2968956">
                <text:p>0.296895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0.2955495">
                <text:p>0.29554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0.3024533">
                <text:p>0.30245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0.3017729">
                <text:p>0.30177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3179578">
                <text:p>0.317957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3358544">
                <text:p>0.335854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0.2962033">
                <text:p>0.29620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3029522">
                <text:p>0.302952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3083095">
                <text:p>0.308309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0.2944975">
                <text:p>0.294497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3038492">
                <text:p>0.303849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3113335">
                <text:p>0.311333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2995279">
                <text:p>0.299527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3026022">
                <text:p>0.30260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2998488">
                <text:p>0.299848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0.2910918">
                <text:p>0.291091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3043108">
                <text:p>0.304310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3104968">
                <text:p>0.310496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3025306">
                <text:p>0.302530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3196897">
                <text:p>0.319689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304634">
                <text:p>0.30463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0.2834973">
                <text:p>0.283497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0.2835042">
                <text:p>0.283504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2965272">
                <text:p>0.296527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2921844">
                <text:p>0.292184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2991806">
                <text:p>0.299180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2898944">
                <text:p>0.289894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2938834">
                <text:p>0.293883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29318">
                <text:p>0.2931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0.2863856">
                <text:p>0.28638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0.2845618">
                <text:p>0.284561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3044442">
                <text:p>0.304444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0.2818145">
                <text:p>0.281814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2895734">
                <text:p>0.289573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0.2772315">
                <text:p>0.277231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2824253">
                <text:p>0.282425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0.2759551">
                <text:p>0.275955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0.2770661">
                <text:p>0.277066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2796608">
                <text:p>0.279660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3096196">
                <text:p>0.309619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2847446">
                <text:p>0.284744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0.2730926">
                <text:p>0.273092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2826656">
                <text:p>0.282665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2886594">
                <text:p>0.288659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0.2701807">
                <text:p>0.270180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0.2697046">
                <text:p>0.269704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2746272">
                <text:p>0.274627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0.269539">
                <text:p>0.26953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2912802">
                <text:p>0.291280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2759386">
                <text:p>0.27593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3209331">
                <text:p>0.320933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2844705">
                <text:p>0.284470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2726302">
                <text:p>0.272630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2676994">
                <text:p>0.267699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2738585">
                <text:p>0.273858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2722915">
                <text:p>0.272291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2885452">
                <text:p>0.288545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0.2605309">
                <text:p>0.260530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2880228">
                <text:p>0.288022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2767146">
                <text:p>0.27671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2669661">
                <text:p>0.266966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2700019">
                <text:p>0.27000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2674977">
                <text:p>0.267497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2619368">
                <text:p>0.261936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2572432">
                <text:p>0.25724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0.2531477">
                <text:p>0.253147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2730821">
                <text:p>0.27308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2663975">
                <text:p>0.266397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2680719">
                <text:p>0.268071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0.2489004">
                <text:p>0.248900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2832917">
                <text:p>0.283291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2656008">
                <text:p>0.265600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0.2484984">
                <text:p>0.248498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2495719">
                <text:p>0.249571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2586739">
                <text:p>0.258673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2793877">
                <text:p>0.279387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2492279">
                <text:p>0.249227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2517262">
                <text:p>0.251726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2607455">
                <text:p>0.260745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2593047">
                <text:p>0.259304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2478595">
                <text:p>0.247859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0.2367284">
                <text:p>0.236728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2496225">
                <text:p>0.249622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2429385">
                <text:p>0.242938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2442893">
                <text:p>0.244289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2660128">
                <text:p>0.266012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2396101">
                <text:p>0.239610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260596">
                <text:p>0.26059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2382399">
                <text:p>0.238239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2486594">
                <text:p>0.248659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2578358">
                <text:p>0.257835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2430998">
                <text:p>0.243099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2655849">
                <text:p>0.265584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2305732">
                <text:p>0.23057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2452917">
                <text:p>0.245291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2381385">
                <text:p>0.238138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2298531">
                <text:p>0.229853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2248788">
                <text:p>0.224878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2440193">
                <text:p>0.244019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2423328">
                <text:p>0.242332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2269834">
                <text:p>0.226983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2336666">
                <text:p>0.233666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2419073">
                <text:p>0.241907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226079">
                <text:p>0.22607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2559642">
                <text:p>0.255964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2486496">
                <text:p>0.248649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2357458">
                <text:p>0.235745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2323332">
                <text:p>0.23233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2253107">
                <text:p>0.225310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2154458">
                <text:p>0.215445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2337501">
                <text:p>0.233750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243145">
                <text:p>0.24314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2221031">
                <text:p>0.222103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2298452">
                <text:p>0.229845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2265433">
                <text:p>0.22654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2240475">
                <text:p>0.224047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2247152">
                <text:p>0.224715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2234018">
                <text:p>0.223401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2245397">
                <text:p>0.224539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2215868">
                <text:p>0.221586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2125423">
                <text:p>0.212542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2078502">
                <text:p>0.207850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2216888">
                <text:p>0.221688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2818816">
                <text:p>0.281881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2284112">
                <text:p>0.228411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2208859">
                <text:p>0.220885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2202006">
                <text:p>0.220200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2150406">
                <text:p>0.215040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2179516">
                <text:p>0.217951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2200722">
                <text:p>0.220072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2102015">
                <text:p>0.210201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2099622">
                <text:p>0.209962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2130611">
                <text:p>0.213061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2072895">
                <text:p>0.207289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2128162">
                <text:p>0.212816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2420112">
                <text:p>0.242011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2149182">
                <text:p>0.214918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2281414">
                <text:p>0.228141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1974946">
                <text:p>0.197494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2043957">
                <text:p>0.204395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2067908">
                <text:p>0.20679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1939306">
                <text:p>0.193930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2149497">
                <text:p>0.214949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1976688">
                <text:p>0.197668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1969603">
                <text:p>0.196960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2320303">
                <text:p>0.232030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1988069">
                <text:p>0.198806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2090573">
                <text:p>0.209057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2074986">
                <text:p>0.207498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1880907">
                <text:p>0.188090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2141273">
                <text:p>0.214127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2061245">
                <text:p>0.206124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197785">
                <text:p>0.19778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2051736">
                <text:p>0.205173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1909284">
                <text:p>0.19092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2035936">
                <text:p>0.203593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1832691">
                <text:p>0.183269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1912911">
                <text:p>0.191291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1853159">
                <text:p>0.185315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1818119">
                <text:p>0.181811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1972239">
                <text:p>0.197223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1900877">
                <text:p>0.190087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1911357">
                <text:p>0.191135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1777105">
                <text:p>0.177710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1820193">
                <text:p>0.182019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1828888">
                <text:p>0.18288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1936103">
                <text:p>0.193610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1991129">
                <text:p>0.199112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1954875">
                <text:p>0.195487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1845215">
                <text:p>0.184521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1790221">
                <text:p>0.179022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1706625">
                <text:p>0.170662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1737851">
                <text:p>0.17378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1785681">
                <text:p>0.178568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1816948">
                <text:p>0.18169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202643">
                <text:p>0.20264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1782923">
                <text:p>0.178292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1815256">
                <text:p>0.181525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1788352">
                <text:p>0.178835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1811132">
                <text:p>0.181113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1729253">
                <text:p>0.172925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1786986">
                <text:p>0.178698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1752245">
                <text:p>0.17522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1788301">
                <text:p>0.178830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1616673">
                <text:p>0.161667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2141828">
                <text:p>0.214182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1752862">
                <text:p>0.175286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2071168">
                <text:p>0.207116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174236">
                <text:p>0.17423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2096344">
                <text:p>0.209634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1695971">
                <text:p>0.169597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1767098">
                <text:p>0.176709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1588995">
                <text:p>0.15889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1793111">
                <text:p>0.179311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1722429">
                <text:p>0.172242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1596129">
                <text:p>0.159612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1677254">
                <text:p>0.167725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1661178">
                <text:p>0.166117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1661872">
                <text:p>0.166187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1621947">
                <text:p>0.162194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1541551">
                <text:p>0.154155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1714814">
                <text:p>0.17148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1551457">
                <text:p>0.155145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1544999">
                <text:p>0.154499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1622543">
                <text:p>0.162254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1588082">
                <text:p>0.158808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1790023">
                <text:p>0.179002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1586945">
                <text:p>0.158694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158911">
                <text:p>0.1589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1503805">
                <text:p>0.150380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1598875">
                <text:p>0.159887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1605775">
                <text:p>0.160577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156092">
                <text:p>0.15609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170088">
                <text:p>0.17008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1552413">
                <text:p>0.155241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1597628">
                <text:p>0.159762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1737607">
                <text:p>0.173760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1549885">
                <text:p>0.15498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1444042">
                <text:p>0.144404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1590606">
                <text:p>0.159060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1586953">
                <text:p>0.158695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1466611">
                <text:p>0.146661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1640729">
                <text:p>0.164072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1524337">
                <text:p>0.152433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1455213">
                <text:p>0.14552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1633057">
                <text:p>0.16330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1486236">
                <text:p>0.148623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1601587">
                <text:p>0.160158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1400274">
                <text:p>0.140027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1534931">
                <text:p>0.153493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1585735">
                <text:p>0.158573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1398546">
                <text:p>0.139854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1526117">
                <text:p>0.152611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1423323">
                <text:p>0.142332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1434723">
                <text:p>0.143472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1505604">
                <text:p>0.150560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1468055">
                <text:p>0.146805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1479415">
                <text:p>0.147941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15466">
                <text:p>0.1546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138227">
                <text:p>0.13822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15123">
                <text:p>0.1512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1511494">
                <text:p>0.151149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149728">
                <text:p>0.14972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1352666">
                <text:p>0.135266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144507">
                <text:p>0.14450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1477961">
                <text:p>0.147796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1447931">
                <text:p>0.144793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1295124">
                <text:p>0.129512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1435857">
                <text:p>0.143585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1487676">
                <text:p>0.148767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1477145">
                <text:p>0.147714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1438375">
                <text:p>0.143837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1544403">
                <text:p>0.154440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1554002">
                <text:p>0.155400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1554915">
                <text:p>0.155491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135007">
                <text:p>0.13500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1461011">
                <text:p>0.146101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1457917">
                <text:p>0.145791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1426266">
                <text:p>0.142626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1417457">
                <text:p>0.141745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1477384">
                <text:p>0.147738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1338479">
                <text:p>0.133847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1435503">
                <text:p>0.143550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1454959">
                <text:p>0.145495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1426372">
                <text:p>0.142637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1284673">
                <text:p>0.128467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1389602">
                <text:p>0.138960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141372">
                <text:p>0.14137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1339703">
                <text:p>0.133970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1228169">
                <text:p>0.122816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1273026">
                <text:p>0.12730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1443065">
                <text:p>0.14430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1254191">
                <text:p>0.125419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1476895">
                <text:p>0.147689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1315735">
                <text:p>0.131573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1429982">
                <text:p>0.142998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127042">
                <text:p>0.12704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1249688">
                <text:p>0.124968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1304235">
                <text:p>0.130423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1259112">
                <text:p>0.125911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138952">
                <text:p>0.1389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1302255">
                <text:p>0.130225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1355898">
                <text:p>0.135589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1493538">
                <text:p>0.149353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1402164">
                <text:p>0.140216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1327627">
                <text:p>0.132762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1387421">
                <text:p>0.138742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1169891">
                <text:p>0.116989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1314075">
                <text:p>0.131407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1224743">
                <text:p>0.12247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1283662">
                <text:p>0.128366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1391308">
                <text:p>0.139130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1330099">
                <text:p>0.133009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1287274">
                <text:p>0.128727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1306145">
                <text:p>0.130614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1217219">
                <text:p>0.121721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1280612">
                <text:p>0.128061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1156501">
                <text:p>0.115650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1311659">
                <text:p>0.131165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1150018">
                <text:p>0.115001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1416729">
                <text:p>0.141672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1220499">
                <text:p>0.122049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1160361">
                <text:p>0.116036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1282554">
                <text:p>0.128255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1176843">
                <text:p>0.117684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1359096">
                <text:p>0.135909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1208815">
                <text:p>0.120881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12347">
                <text:p>0.1234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1395879">
                <text:p>0.139587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1183624">
                <text:p>0.118362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1192349">
                <text:p>0.119234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1162771">
                <text:p>0.116277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1171722">
                <text:p>0.117172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1231613">
                <text:p>0.123161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1423666">
                <text:p>0.142366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1107335">
                <text:p>0.110733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1324729">
                <text:p>0.132472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1198198">
                <text:p>0.119819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1151377">
                <text:p>0.115137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1065535">
                <text:p>0.106553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1190471">
                <text:p>0.119047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1128774">
                <text:p>0.112877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1398887">
                <text:p>0.139888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1183281">
                <text:p>0.118328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1157832">
                <text:p>0.115783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1170341">
                <text:p>0.117034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1092733">
                <text:p>0.109273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1094715">
                <text:p>0.109471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1060804">
                <text:p>0.106080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1115311">
                <text:p>0.111531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1125589">
                <text:p>0.112558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1149032">
                <text:p>0.114903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114918">
                <text:p>0.11491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1136254">
                <text:p>0.113625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1224219">
                <text:p>0.122421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1184475">
                <text:p>0.118447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1036912">
                <text:p>0.103691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1126017">
                <text:p>0.112601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1061309">
                <text:p>0.106130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123382">
                <text:p>0.12338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1242345">
                <text:p>0.124234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1135729">
                <text:p>0.113572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1132291">
                <text:p>0.113229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1086393">
                <text:p>0.108639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1070749">
                <text:p>0.107074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1154129">
                <text:p>0.115412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1093747">
                <text:p>0.109374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1028809">
                <text:p>0.102880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125875">
                <text:p>0.12587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1068807">
                <text:p>0.106880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09580789">
                <text:p>0.0958078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1102747">
                <text:p>0.11027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1042295">
                <text:p>0.104229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1071338">
                <text:p>0.107133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09256873">
                <text:p>0.0925687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09512361">
                <text:p>0.0951236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1006759">
                <text:p>0.100675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1141822">
                <text:p>0.11418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0994608">
                <text:p>0.099460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1048971">
                <text:p>0.104897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1071394">
                <text:p>0.107139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1104622">
                <text:p>0.110462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09716719">
                <text:p>0.0971671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104962">
                <text:p>0.10496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1036045">
                <text:p>0.103604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100857">
                <text:p>0.10085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1086447">
                <text:p>0.108644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08958655">
                <text:p>0.0895865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1032566">
                <text:p>0.103256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1102456">
                <text:p>0.110245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09794385">
                <text:p>0.0979438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1016533">
                <text:p>0.101653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1031123">
                <text:p>0.103112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09607502">
                <text:p>0.0960750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09066379">
                <text:p>0.0906637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1045141">
                <text:p>0.104514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1276684">
                <text:p>0.12766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08973145">
                <text:p>0.0897314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09089698">
                <text:p>0.0908969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1034267">
                <text:p>0.103426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09549817">
                <text:p>0.0954981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09137239">
                <text:p>0.0913723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1030651">
                <text:p>0.103065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09255496">
                <text:p>0.0925549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1094673">
                <text:p>0.109467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08948623">
                <text:p>0.0894862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08407923">
                <text:p>0.0840792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1060621">
                <text:p>0.106062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1130827">
                <text:p>0.113082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08881862">
                <text:p>0.0888186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1022833">
                <text:p>0.102283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09851401">
                <text:p>0.0985140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09644746">
                <text:p>0.0964474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09347778">
                <text:p>0.0934777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08044268">
                <text:p>0.0804426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08550049">
                <text:p>0.0855004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08469815">
                <text:p>0.0846981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09412442">
                <text:p>0.0941244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1090442">
                <text:p>0.109044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08292746">
                <text:p>0.0829274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09408133">
                <text:p>0.0940813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1083716">
                <text:p>0.108371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08193392">
                <text:p>0.0819339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0820647">
                <text:p>0.082064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08974975">
                <text:p>0.0897497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08290636">
                <text:p>0.0829063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07593206">
                <text:p>0.0759320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1007837">
                <text:p>0.100783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0969268">
                <text:p>0.096926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8904806">
                <text:p>0.0890480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09684973">
                <text:p>0.0968497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1267261">
                <text:p>0.126726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8863553">
                <text:p>0.0886355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8824165">
                <text:p>0.0882416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09729324">
                <text:p>0.0972932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09211195">
                <text:p>0.0921119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07571889">
                <text:p>0.0757188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8465534">
                <text:p>0.0846553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07873164">
                <text:p>0.0787316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09205381">
                <text:p>0.0920538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8651583">
                <text:p>0.0865158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1010022">
                <text:p>0.101002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8669372">
                <text:p>0.0866937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8353098">
                <text:p>0.0835309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8733487">
                <text:p>0.0873348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8997643">
                <text:p>0.0899764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07467705">
                <text:p>0.0746770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1054577">
                <text:p>0.105457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8986024">
                <text:p>0.0898602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8027947">
                <text:p>0.0802794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9067906">
                <text:p>0.0906790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1075596">
                <text:p>0.107559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09485425">
                <text:p>0.0948542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8618199">
                <text:p>0.0861819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8039338">
                <text:p>0.0803933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09862831">
                <text:p>0.0986283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8674648">
                <text:p>0.0867464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8992278">
                <text:p>0.0899227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8080157">
                <text:p>0.0808015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1102738">
                <text:p>0.110273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1150972">
                <text:p>0.115097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07183314">
                <text:p>0.0718331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7919769">
                <text:p>0.0791976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09197704">
                <text:p>0.0919770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09368362">
                <text:p>0.0936836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06385636">
                <text:p>0.0638563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8617772">
                <text:p>0.0861777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8949362">
                <text:p>0.0894936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1050911">
                <text:p>0.105091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06599367">
                <text:p>0.0659936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8265346">
                <text:p>0.0826534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8311205">
                <text:p>0.0831120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9088831">
                <text:p>0.0908883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8218809">
                <text:p>0.0821880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06721824">
                <text:p>0.0672182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06532637">
                <text:p>0.0653263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7447974">
                <text:p>0.0744797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7514153">
                <text:p>0.0751415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05827027">
                <text:p>0.0582702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73158">
                <text:p>0.07315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8917385">
                <text:p>0.0891738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8943048">
                <text:p>0.0894304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7200058">
                <text:p>0.0720005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6758688">
                <text:p>0.0675868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7569429">
                <text:p>0.0756942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6320404">
                <text:p>0.0632040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7223091">
                <text:p>0.0722309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7394904">
                <text:p>0.0739490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7181793">
                <text:p>0.0718179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5917708">
                <text:p>0.0591770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7947143">
                <text:p>0.0794714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6410279">
                <text:p>0.0641027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09239331">
                <text:p>0.0923933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6458976">
                <text:p>0.0645897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7906806">
                <text:p>0.0790680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6202871">
                <text:p>0.0620287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6027101">
                <text:p>0.0602710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5691567">
                <text:p>0.0569156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6421098">
                <text:p>0.0642109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6908598">
                <text:p>0.0690859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566712">
                <text:p>0.056671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5592731">
                <text:p>0.0559273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7156815">
                <text:p>0.0715681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627168">
                <text:p>0.062716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6288967">
                <text:p>0.0628896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7448645">
                <text:p>0.0744864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5954188">
                <text:p>0.0595418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6540384">
                <text:p>0.0654038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5635435">
                <text:p>0.0563543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6047571">
                <text:p>0.0604757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5647335">
                <text:p>0.0564733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5744163">
                <text:p>0.0574416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5305193">
                <text:p>0.0530519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6438172">
                <text:p>0.0643817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6189072">
                <text:p>0.0618907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5954827">
                <text:p>0.0595482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631259">
                <text:p>0.063125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6783813">
                <text:p>0.0678381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5342584">
                <text:p>0.0534258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826666">
                <text:p>0.082666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5188688">
                <text:p>0.0518868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7063215">
                <text:p>0.0706321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5005185">
                <text:p>0.0500518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4960623">
                <text:p>0.0496062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4973294">
                <text:p>0.0497329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511759">
                <text:p>0.051175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6139627">
                <text:p>0.0613962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5849704">
                <text:p>0.0584970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4811883">
                <text:p>0.0481188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6321149">
                <text:p>0.0632114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6623385">
                <text:p>0.0662338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5163703">
                <text:p>0.0516370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7064312">
                <text:p>0.0706431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4435217">
                <text:p>0.0443521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4982833">
                <text:p>0.0498283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6216766">
                <text:p>0.0621676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538027">
                <text:p>0.053802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5933408">
                <text:p>0.0593340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4254418">
                <text:p>0.0425441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5906029">
                <text:p>0.0590602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4357883">
                <text:p>0.0435788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4728853">
                <text:p>0.0472885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5090137">
                <text:p>0.0509013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454026">
                <text:p>0.045402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6831051">
                <text:p>0.0683105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4514221">
                <text:p>0.0451422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437766">
                <text:p>0.043776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469046">
                <text:p>0.046904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4751115">
                <text:p>0.0475111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6101663">
                <text:p>0.0610166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8241318">
                <text:p>0.0824131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3900363">
                <text:p>0.0390036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4596775">
                <text:p>0.0459677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5295071">
                <text:p>0.0529507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4394275">
                <text:p>0.0439427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4991582">
                <text:p>0.0499158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422137">
                <text:p>0.042213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4398476">
                <text:p>0.0439847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4596793">
                <text:p>0.0459679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3814721">
                <text:p>0.0381472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3933189">
                <text:p>0.0393318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5154476">
                <text:p>0.05154476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6379229">
                <text:p>0.0637922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5121433">
                <text:p>0.0512143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441428">
                <text:p>0.044142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4227818">
                <text:p>0.0422781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5648125">
                <text:p>0.0564812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4857696">
                <text:p>0.0485769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4629754">
                <text:p>0.0462975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4374106">
                <text:p>0.0437410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5678192">
                <text:p>0.0567819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6045252">
                <text:p>0.0604525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4895336">
                <text:p>0.0489533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56701">
                <text:p>0.05670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4058429">
                <text:p>0.0405842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3647801">
                <text:p>0.0364780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4173768">
                <text:p>0.0417376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4280007">
                <text:p>0.0428000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4438284">
                <text:p>0.0443828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4875409">
                <text:p>0.0487540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4146427">
                <text:p>0.0414642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4501728">
                <text:p>0.0450172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3915363">
                <text:p>0.0391536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3558514">
                <text:p>0.0355851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4539953">
                <text:p>0.0453995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3424051">
                <text:p>0.0342405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3763704">
                <text:p>0.0376370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7296952">
                <text:p>0.0729695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4183243">
                <text:p>0.0418324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3542024">
                <text:p>0.0354202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4211747">
                <text:p>0.0421174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3517842">
                <text:p>0.0351784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3186997">
                <text:p>0.0318699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4699619">
                <text:p>0.0469961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2991558">
                <text:p>0.0299155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4951375">
                <text:p>0.0495137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4234342">
                <text:p>0.0423434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3762097">
                <text:p>0.0376209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4505257">
                <text:p>0.0450525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4992312">
                <text:p>0.0499231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4034446">
                <text:p>0.0403444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4050448">
                <text:p>0.0405044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3770696">
                <text:p>0.0377069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2762591">
                <text:p>0.0276259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435894">
                <text:p>0.043589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4529139">
                <text:p>0.0452913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3556617">
                <text:p>0.0355661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6347574">
                <text:p>0.0634757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2747707">
                <text:p>0.0274770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3844484">
                <text:p>0.0384448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4372754">
                <text:p>0.043727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2734304">
                <text:p>0.0273430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3028938">
                <text:p>0.0302893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3942353">
                <text:p>0.0394235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4154219">
                <text:p>0.0415421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4012016">
                <text:p>0.0401201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5053883">
                <text:p>0.0505388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4373915">
                <text:p>0.0437391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4835434">
                <text:p>0.0483543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2996296">
                <text:p>0.0299629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3274213">
                <text:p>0.0327421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4688553">
                <text:p>0.0468855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3976833">
                <text:p>0.0397683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4726529">
                <text:p>0.0472652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2811551">
                <text:p>0.0281155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3797327">
                <text:p>0.0379732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446448">
                <text:p>0.044644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4839034">
                <text:p>0.0483903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3895062">
                <text:p>0.0389506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3890231">
                <text:p>0.0389023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3997108">
                <text:p>0.0399710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5072814">
                <text:p>0.0507281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3678166">
                <text:p>0.0367816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3061416">
                <text:p>0.0306141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2802144">
                <text:p>0.0280214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3545634">
                <text:p>0.0354563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30733">
                <text:p>0.03073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4285334">
                <text:p>0.0428533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2637688">
                <text:p>0.0263768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323498">
                <text:p>0.032349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3062108">
                <text:p>0.0306210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2471772">
                <text:p>0.0247177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4141863">
                <text:p>0.0414186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2594293">
                <text:p>0.0259429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3351248">
                <text:p>0.0335124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2817829">
                <text:p>0.0281782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3486082">
                <text:p>0.0348608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2402038">
                <text:p>0.0240203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7756502">
                <text:p>0.0775650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4065072">
                <text:p>0.0406507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2589904">
                <text:p>0.0258990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2907387">
                <text:p>0.0290738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4109969">
                <text:p>0.0410996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4132335">
                <text:p>0.0413233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2694618">
                <text:p>0.0269461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2518451">
                <text:p>0.0251845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3923866">
                <text:p>0.0392386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2899704">
                <text:p>0.0289970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4725514">
                <text:p>0.0472551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315594">
                <text:p>0.031559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4688908">
                <text:p>0.0468890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3176288">
                <text:p>0.0317628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3684258">
                <text:p>0.0368425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2334663">
                <text:p>0.0233466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2504169">
                <text:p>0.0250416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5153642">
                <text:p>0.0515364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2589552">
                <text:p>0.0258955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2288975">
                <text:p>0.0228897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2320667">
                <text:p>0.0232066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2859337">
                <text:p>0.0285933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2229683">
                <text:p>0.0222968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2096331">
                <text:p>0.0209633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1808983">
                <text:p>0.0180898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1654925">
                <text:p>0.0165492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3556017">
                <text:p>0.0355601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2215983">
                <text:p>0.0221598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2548121">
                <text:p>0.0254812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2657772">
                <text:p>0.0265777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2386428">
                <text:p>0.0238642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2327264">
                <text:p>0.0232726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2632298">
                <text:p>0.0263229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3219707">
                <text:p>0.0321970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2021618">
                <text:p>0.0202161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2444885">
                <text:p>0.0244488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3007022">
                <text:p>0.030070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2542803">
                <text:p>0.0254280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2185813">
                <text:p>0.0218581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285401">
                <text:p>0.028540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4056085">
                <text:p>0.0405608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5615243">
                <text:p>0.0561524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2886156">
                <text:p>0.0288615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3892124">
                <text:p>0.0389212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1960305">
                <text:p>0.0196030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2568594">
                <text:p>0.0256859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2431595">
                <text:p>0.0243159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357101">
                <text:p>0.035710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2718524">
                <text:p>0.0271852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3137918">
                <text:p>0.0313791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2461003">
                <text:p>0.0246100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4265999">
                <text:p>0.04265999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2411425">
                <text:p>0.0241142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2978529">
                <text:p>0.0297852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2674648">
                <text:p>0.0267464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2283051">
                <text:p>0.0228305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2610213">
                <text:p>0.0261021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2399306">
                <text:p>0.0239930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4062062">
                <text:p>0.040620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2415425">
                <text:p>0.0241542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1785266">
                <text:p>0.0178526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4819779">
                <text:p>0.0481977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3034952">
                <text:p>0.0303495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3380986">
                <text:p>0.0338098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2512178">
                <text:p>0.0251217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2102553">
                <text:p>0.021025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3564326">
                <text:p>0.0356432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2944259">
                <text:p>0.0294425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2449424">
                <text:p>0.0244942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3463073">
                <text:p>0.0346307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2034333">
                <text:p>0.0203433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2436149">
                <text:p>0.0243614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3785691">
                <text:p>0.0378569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3801196">
                <text:p>0.0380119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2896664">
                <text:p>0.0289666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1217426">
                <text:p>0.0121742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3306223">
                <text:p>0.033062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1713701">
                <text:p>0.0171370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2217279">
                <text:p>0.0221727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291349">
                <text:p>0.029134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3059466">
                <text:p>0.0305946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2189063">
                <text:p>0.02189063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3051643">
                <text:p>0.0305164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1984257">
                <text:p>0.0198425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1621605">
                <text:p>0.0162160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5090581">
                <text:p>0.0509058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1508638">
                <text:p>0.0150863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2252916">
                <text:p>0.0225291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117589">
                <text:p>0.011758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2599415">
                <text:p>0.0259941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1192437">
                <text:p>0.0119243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2516687">
                <text:p>0.0251668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2578819">
                <text:p>0.0257881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2278255">
                <text:p>0.0227825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1958052">
                <text:p>0.0195805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2344578">
                <text:p>0.0234457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2508182">
                <text:p>0.0250818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1737536">
                <text:p>0.0173753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2794931">
                <text:p>0.0279493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3201563">
                <text:p>0.0320156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1082033">
                <text:p>0.0108203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2608305">
                <text:p>0.0260830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2814487">
                <text:p>0.0281448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1225026">
                <text:p>0.0122502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1546863">
                <text:p>0.0154686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05260213">
                <text:p>0.0052602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2074099">
                <text:p>0.0207409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2372497">
                <text:p>0.0237249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3078887">
                <text:p>0.03078887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2932831">
                <text:p>0.0293283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2136285">
                <text:p>0.0213628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2037665">
                <text:p>0.0203766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1831717">
                <text:p>0.0183171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09930855">
                <text:p>0.00993085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126658">
                <text:p>0.012665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1458818">
                <text:p>0.0145881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1062289">
                <text:p>0.0106228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3695792">
                <text:p>0.0369579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185185">
                <text:p>0.018518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1462692">
                <text:p>0.0146269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1761203">
                <text:p>0.0176120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3282365">
                <text:p>0.0328236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289276">
                <text:p>0.028927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1697076">
                <text:p>0.0169707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1193675">
                <text:p>0.0119367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1075635">
                <text:p>0.0107563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2161559">
                <text:p>0.0216155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1612625">
                <text:p>0.0161262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1987759">
                <text:p>0.0198775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1377068">
                <text:p>0.0137706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3107879">
                <text:p>0.0310787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3067906">
                <text:p>0.0306790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2164418">
                <text:p>0.0216441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3281944">
                <text:p>0.0328194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1181378">
                <text:p>0.0118137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2726038">
                <text:p>0.0272603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1157827">
                <text:p>0.01157827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2028997">
                <text:p>0.0202899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1230498">
                <text:p>0.0123049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1281829">
                <text:p>0.0128182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09809407">
                <text:p>0.00980940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3968833">
                <text:p>0.0396883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2926229">
                <text:p>0.0292622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229056">
                <text:p>0.022905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2013075">
                <text:p>0.0201307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2593907">
                <text:p>0.0259390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4191694">
                <text:p>0.0419169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2858908">
                <text:p>0.0285890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109978">
                <text:p>0.010997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1743329">
                <text:p>0.0174332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1680003">
                <text:p>0.0168000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1329338">
                <text:p>0.013293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2190919">
                <text:p>0.021909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3353737">
                <text:p>0.0335373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1955822">
                <text:p>0.0195582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2150622">
                <text:p>0.0215062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06802631">
                <text:p>0.00680263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1029615">
                <text:p>0.0102961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08263422">
                <text:p>0.00826342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3265906">
                <text:p>0.0326590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2157312">
                <text:p>0.0215731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2089761">
                <text:p>0.0208976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1657772">
                <text:p>0.0165777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1553374">
                <text:p>0.0155337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1994894">
                <text:p>0.0199489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1498216">
                <text:p>0.0149821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1390689">
                <text:p>0.0139068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3696222">
                <text:p>0.0369622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2049117">
                <text:p>0.0204911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1646692">
                <text:p>0.0164669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1007918">
                <text:p>0.01007918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1896589">
                <text:p>0.0189658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1117025">
                <text:p>0.0111702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2421735">
                <text:p>0.0242173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1939621">
                <text:p>0.0193962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1528877">
                <text:p>0.0152887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1261675">
                <text:p>0.0126167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05162469">
                <text:p>0.00516246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1891151">
                <text:p>0.0189115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2040101">
                <text:p>0.0204010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1781025">
                <text:p>0.0178102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17934">
                <text:p>0.01793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2025221">
                <text:p>0.0202522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1183524">
                <text:p>0.0118352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2560543">
                <text:p>0.0256054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2727751">
                <text:p>0.0272775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1341211">
                <text:p>0.0134121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06406381">
                <text:p>0.00640638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2824407">
                <text:p>0.0282440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08404219">
                <text:p>0.00840421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1724408">
                <text:p>0.0172440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1104793">
                <text:p>0.0110479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1625">
                <text:p>0.0162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2108819">
                <text:p>0.0210881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08856836">
                <text:p>0.00885683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04524914">
                <text:p>0.004524914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09633637">
                <text:p>0.00963363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0845624">
                <text:p>0.0084562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02674381">
                <text:p>0.00267438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1096835">
                <text:p>0.0109683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3334872">
                <text:p>0.0333487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07319176">
                <text:p>0.007319176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07505241">
                <text:p>0.00750524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07839418">
                <text:p>0.00783941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220691">
                <text:p>0.022069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1010709">
                <text:p>0.0101070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166413">
                <text:p>0.016641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1422023">
                <text:p>0.0142202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4315902">
                <text:p>0.0431590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1692295">
                <text:p>0.0169229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1708473">
                <text:p>0.0170847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08815408">
                <text:p>0.00881540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2361687">
                <text:p>0.0236168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1044409">
                <text:p>0.0104440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1417364">
                <text:p>0.01417364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1004803">
                <text:p>0.01004803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1400013">
                <text:p>0.0140001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2115278">
                <text:p>0.0211527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08390999">
                <text:p>0.00839099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3085406">
                <text:p>0.0308540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08383083">
                <text:p>0.00838308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03129284">
                <text:p>0.00312928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07865228">
                <text:p>0.00786522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1524249">
                <text:p>0.0152424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1141212">
                <text:p>0.0114121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2304997">
                <text:p>0.0230499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06208143">
                <text:p>0.00620814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125204">
                <text:p>0.012520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2052562">
                <text:p>0.0205256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1077797">
                <text:p>0.01077797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3972499">
                <text:p>0.0397249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1927424">
                <text:p>0.01927424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1132981">
                <text:p>0.0113298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1745436">
                <text:p>0.0174543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219523">
                <text:p>0.021952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2158239">
                <text:p>0.0215823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09966091">
                <text:p>0.00996609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1605887">
                <text:p>0.0160588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3207628">
                <text:p>0.0320762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08148159">
                <text:p>0.00814815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2175787">
                <text:p>0.0217578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0306196">
                <text:p>0.0030619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2888091">
                <text:p>0.0288809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074832">
                <text:p>0.007483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2103368">
                <text:p>0.0210336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1406439">
                <text:p>0.0140643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06933221">
                <text:p>0.00693322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1447007">
                <text:p>0.01447007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01962784">
                <text:p>0.00196278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344081">
                <text:p>0.034408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1874764">
                <text:p>0.0187476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1642795">
                <text:p>0.0164279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04684956">
                <text:p>0.00468495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0975369">
                <text:p>0.00975369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08069281">
                <text:p>0.00806928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01348508">
                <text:p>0.00134850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417423">
                <text:p>0.041742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07453399">
                <text:p>0.00745339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07881153">
                <text:p>0.00788115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1237851">
                <text:p>0.0123785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02477644">
                <text:p>0.00247764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05929598">
                <text:p>0.00592959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3564898">
                <text:p>0.03564898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1135052">
                <text:p>0.0113505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4206344">
                <text:p>0.0420634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2152067">
                <text:p>0.0215206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2622164">
                <text:p>0.0262216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06239838">
                <text:p>0.00623983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09528677">
                <text:p>0.00952867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09969748">
                <text:p>0.00996974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04952083">
                <text:p>0.00495208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1363742">
                <text:p>0.0136374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1446661">
                <text:p>0.014466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1085073">
                <text:p>0.0108507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01088883">
                <text:p>0.00108888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04163384">
                <text:p>0.00416338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1725505">
                <text:p>0.0172550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1129046">
                <text:p>0.01129046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03434669">
                <text:p>0.00343466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1263521">
                <text:p>0.0126352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08683132">
                <text:p>0.00868313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07693791">
                <text:p>0.00769379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-0.002147864">
                <text:p>-0.00214786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-0.0006607825">
                <text:p>-0.000660782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07923556">
                <text:p>0.007923556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2614923">
                <text:p>0.0261492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1563798">
                <text:p>0.0156379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118173">
                <text:p>0.011817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09313216">
                <text:p>0.00931321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1476033">
                <text:p>0.0147603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06684022">
                <text:p>0.00668402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1427321">
                <text:p>0.0142732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0889375">
                <text:p>0.0088937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05686293">
                <text:p>0.00568629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1276738">
                <text:p>0.01276738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1471228">
                <text:p>0.0147122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02762489">
                <text:p>0.00276248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005317207">
                <text:p>0.000531720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1203564">
                <text:p>0.0120356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1441188">
                <text:p>0.0144118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2997908">
                <text:p>0.0299790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-0.000358309">
                <text:p>-0.00035830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2530265">
                <text:p>0.0253026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08426965">
                <text:p>0.00842696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2624523">
                <text:p>0.0262452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1487839">
                <text:p>0.0148783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1962754">
                <text:p>0.0196275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2208644">
                <text:p>0.0220864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1020002">
                <text:p>0.0102000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-0.0003708263">
                <text:p>-0.000370826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03046156">
                <text:p>0.003046156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2053808">
                <text:p>0.0205380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1535339">
                <text:p>0.01535339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05639309">
                <text:p>0.00563930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0271821">
                <text:p>0.00271821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-0.0003542058">
                <text:p>-0.0003542058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176274">
                <text:p>0.017627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2039659">
                <text:p>0.0203965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-0.003120803">
                <text:p>-0.00312080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1153422">
                <text:p>0.0115342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-0.001419578">
                <text:p>-0.001419578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02831473">
                <text:p>0.00283147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0292077">
                <text:p>0.0029207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01813096">
                <text:p>0.00181309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3086633">
                <text:p>0.0308663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1960882">
                <text:p>0.0196088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2025104">
                <text:p>0.0202510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01278801">
                <text:p>0.00127880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0500845">
                <text:p>0.0050084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09190219">
                <text:p>0.00919021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104064">
                <text:p>0.0410406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2281685">
                <text:p>0.0228168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1987152">
                <text:p>0.0198715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01441717">
                <text:p>0.00144171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1588248">
                <text:p>0.0158824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06509978">
                <text:p>0.00650997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-0.0005205566">
                <text:p>-0.000520556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0493687">
                <text:p>0.0049368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1119973">
                <text:p>0.0111997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1917397">
                <text:p>0.01917397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07157786">
                <text:p>0.00715778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06168006">
                <text:p>0.00616800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1553237">
                <text:p>0.0155323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2207764">
                <text:p>0.0220776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01574446">
                <text:p>0.00157444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1768455">
                <text:p>0.0176845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05707179">
                <text:p>0.00570717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2617677">
                <text:p>0.0261767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-0.001595477">
                <text:p>-0.00159547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07783622">
                <text:p>0.00778362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07951986">
                <text:p>0.00795198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009959">
                <text:p>0.0200995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06570586">
                <text:p>0.00657058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08103909">
                <text:p>0.00810390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03425841">
                <text:p>0.00342584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-0.002468523">
                <text:p>-0.002468523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1438783">
                <text:p>0.0143878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25822">
                <text:p>0.042582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-0.0001515731">
                <text:p>-0.000151573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05557361">
                <text:p>0.00555736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02870031">
                <text:p>0.00287003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1921009">
                <text:p>0.0192100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-0.002224138">
                <text:p>-0.00222413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07842463">
                <text:p>0.00784246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04264304">
                <text:p>0.00426430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005732861">
                <text:p>0.0005732861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003894105">
                <text:p>0.000389410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07800914">
                <text:p>0.007800914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02343382">
                <text:p>0.00234338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126215">
                <text:p>0.0312621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007858568">
                <text:p>0.000785856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-0.002092056">
                <text:p>-0.002092056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1249358">
                <text:p>0.0124935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1483398">
                <text:p>0.0148339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04513795">
                <text:p>0.00451379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-0.006582758">
                <text:p>-0.00658275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2668123">
                <text:p>0.0266812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1316313">
                <text:p>0.0131631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-0.002733878">
                <text:p>-0.002733878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08234522">
                <text:p>0.00823452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05860122">
                <text:p>0.00586012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001404093">
                <text:p>0.0001404093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002924927">
                <text:p>0.000292492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1870062">
                <text:p>0.0187006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1780063">
                <text:p>0.0178006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07394709">
                <text:p>0.00739470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1776284">
                <text:p>0.0177628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-0.002508635">
                <text:p>-0.00250863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03718576">
                <text:p>0.003718576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-0.003666277">
                <text:p>-0.00366627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-0.00331032">
                <text:p>-0.0033103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09126961">
                <text:p>0.00912696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1896025">
                <text:p>0.0189602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-0.004020965">
                <text:p>-0.00402096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007776">
                <text:p>0.0300777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07087282">
                <text:p>0.00708728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02006474">
                <text:p>0.00200647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-0.004369982">
                <text:p>-0.00436998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-0.00495077">
                <text:p>-0.0049507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-0.00157433">
                <text:p>-0.0015743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1789936">
                <text:p>0.0178993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2301935">
                <text:p>0.0230193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01524095">
                <text:p>0.0015240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02173458">
                <text:p>0.00217345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-0.001619694">
                <text:p>-0.00161969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049137">
                <text:p>0.0204913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08419158">
                <text:p>0.00841915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06880087">
                <text:p>-0.00688008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-0.0004591968">
                <text:p>-0.000459196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06327313">
                <text:p>0.006327313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008081458">
                <text:p>0.000808145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01472445">
                <text:p>0.001472445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055155">
                <text:p>0.0205515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-0.002391893">
                <text:p>-0.00239189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011832">
                <text:p>0.0201183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-0.000898106">
                <text:p>-0.00089810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1656704">
                <text:p>0.0165670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04544991">
                <text:p>0.00454499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-0.002871671">
                <text:p>-0.00287167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33464">
                <text:p>0.013346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383712">
                <text:p>0.0138371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-0.001490904">
                <text:p>-0.00149090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05736729">
                <text:p>-0.00573672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07074592">
                <text:p>-0.00707459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-0.001382097">
                <text:p>-0.00138209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-0.000420479">
                <text:p>-0.00042047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07115142">
                <text:p>0.00711514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1295207">
                <text:p>0.0129520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02499619">
                <text:p>0.00249961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-0.00387716">
                <text:p>-0.00387716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08560118">
                <text:p>0.00856011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007794808">
                <text:p>0.000779480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04773054">
                <text:p>0.00477305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-0.001214225">
                <text:p>-0.00121422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-0.003196138">
                <text:p>-0.00319613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-0.0008410734">
                <text:p>-0.000841073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429646">
                <text:p>0.0142964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-0.003809965">
                <text:p>-0.00380996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-0.0003767418">
                <text:p>-0.000376741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03511478">
                <text:p>0.00351147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263058">
                <text:p>0.0126305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07287856">
                <text:p>0.00728785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03777572">
                <text:p>0.003777572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1619819">
                <text:p>0.0161981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1278804">
                <text:p>0.0127880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09376762">
                <text:p>0.00937676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4906721">
                <text:p>0.00490672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01426775">
                <text:p>0.00142677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256632">
                <text:p>0.0225663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-0.003112914">
                <text:p>-0.00311291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-0.003810308">
                <text:p>-0.00381030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00484559">
                <text:p>0.00048455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005984484">
                <text:p>0.000598448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-0.0005648033">
                <text:p>-0.0005648033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-0.001058398">
                <text:p>-0.00105839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121926">
                <text:p>0.0112192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119504">
                <text:p>0.01119504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502389">
                <text:p>0.0150238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400133">
                <text:p>0.0140013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03825662">
                <text:p>0.00382566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-0.001812665">
                <text:p>-0.001812665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3637755">
                <text:p>0.00363775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06246694">
                <text:p>0.000624669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-0.002877248">
                <text:p>-0.002877248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02593125">
                <text:p>0.00259312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05609468">
                <text:p>0.000560946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0545366">
                <text:p>-0.0054536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118958">
                <text:p>0.0111895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5260193">
                <text:p>0.005260193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1655927">
                <text:p>0.0165592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-0.0001468385">
                <text:p>-0.000146838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08447821">
                <text:p>0.00844782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129952">
                <text:p>0.0312995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09347651">
                <text:p>0.0093476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2102384">
                <text:p>0.00210238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1026323">
                <text:p>0.00102632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025459">
                <text:p>0.0102545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02378973">
                <text:p>0.000237897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0708257">
                <text:p>0.0070825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201702">
                <text:p>0.0320170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-0.004825152">
                <text:p>-0.00482515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2978273">
                <text:p>0.02978273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05221776">
                <text:p>-0.00522177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269122">
                <text:p>0.0226912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212143">
                <text:p>0.0121214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1618572">
                <text:p>0.00161857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05888128">
                <text:p>0.00588812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02675741">
                <text:p>0.002675741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07906507">
                <text:p>-0.00790650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-0.001133245">
                <text:p>-0.00113324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2022118">
                <text:p>0.00202211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03619191">
                <text:p>0.00361919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08921998">
                <text:p>0.00892199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06462169">
                <text:p>-0.00646216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-0.0008797119">
                <text:p>-0.000879711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358951">
                <text:p>0.0235895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07064016">
                <text:p>0.00706401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0795412">
                <text:p>0.0079541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-0.00175598">
                <text:p>-0.0017559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07110626">
                <text:p>-0.00711062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-0.004922905">
                <text:p>-0.00492290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2601391">
                <text:p>0.00260139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-0.002093154">
                <text:p>-0.00209315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06579243">
                <text:p>0.00657924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09819175">
                <text:p>0.00981917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294682">
                <text:p>0.0129468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3388863">
                <text:p>0.00338886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470884">
                <text:p>0.0147088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1304248">
                <text:p>0.00130424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2748282">
                <text:p>0.00274828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-0.0006812745">
                <text:p>-0.000681274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041654">
                <text:p>0.0104165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04677013">
                <text:p>0.000467701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4585614">
                <text:p>-0.00458561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517933">
                <text:p>0.0051793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-0.0009364585">
                <text:p>-0.000936458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-0.00057724">
                <text:p>-0.0005772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5782091">
                <text:p>0.00578209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05963264">
                <text:p>-0.005963264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1028104">
                <text:p>0.00102810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07354917">
                <text:p>-0.00735491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0827684">
                <text:p>0.0082768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-0.003399363">
                <text:p>-0.00339936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541794">
                <text:p>0.0054179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-0.004431693">
                <text:p>-0.004431693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5195302">
                <text:p>0.00519530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240369">
                <text:p>0.0224036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07367551">
                <text:p>0.00736755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76529">
                <text:p>0.027652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6664509">
                <text:p>0.00666450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086564">
                <text:p>0.0208656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05573861">
                <text:p>-0.00557386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-0.001927835">
                <text:p>-0.00192783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9874814">
                <text:p>-0.00987481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09998395">
                <text:p>0.00999839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-0.003282709">
                <text:p>-0.00328270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08635256">
                <text:p>0.008635256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08057225">
                <text:p>0.000805722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-0.0007708696">
                <text:p>-0.000770869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194738">
                <text:p>0.019473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-0.0003693948">
                <text:p>-0.000369394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060152">
                <text:p>0.0106015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916285">
                <text:p>-0.0091628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1876019">
                <text:p>0.00187601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8810982">
                <text:p>-0.0088109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3228083">
                <text:p>0.00322808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06723255">
                <text:p>-0.00672325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9607165">
                <text:p>-0.00960716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3949465">
                <text:p>0.00394946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-0.0003530695">
                <text:p>-0.000353069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041136">
                <text:p>0.020411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-0.0002458864">
                <text:p>-0.000245886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4853404">
                <text:p>0.00485340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332482">
                <text:p>0.0233248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2503452">
                <text:p>0.002503452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-0.001650231">
                <text:p>-0.00165023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5594046">
                <text:p>0.00559404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-0.002717728">
                <text:p>-0.00271772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784243">
                <text:p>0.0178424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142128">
                <text:p>0.0114212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6455942">
                <text:p>0.00645594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894433">
                <text:p>0.01894433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08903066">
                <text:p>0.00890306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5371337">
                <text:p>-0.00537133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-0.003040109">
                <text:p>-0.00304010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7482519">
                <text:p>-0.00748251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713652">
                <text:p>0.0171365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558623">
                <text:p>0.0355862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-0.002473725">
                <text:p>-0.002473725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4650739">
                <text:p>-0.00465073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-0.0001461145">
                <text:p>-0.000146114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5326828">
                <text:p>-0.005326828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-0.001709588">
                <text:p>-0.00170958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6405943">
                <text:p>-0.00640594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6468928">
                <text:p>0.006468928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5183119">
                <text:p>0.00518311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232959">
                <text:p>0.0023295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2786415">
                <text:p>0.00278641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4230929">
                <text:p>0.00423092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6390303">
                <text:p>-0.006390303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-0.002130606">
                <text:p>-0.00213060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8007979">
                <text:p>-0.00800797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7708942">
                <text:p>0.00770894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5008833">
                <text:p>0.00500883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768274">
                <text:p>0.0176827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1087643">
                <text:p>-0.0108764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5364658">
                <text:p>-0.00536465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04915871">
                <text:p>0.000491587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8201174">
                <text:p>-0.00820117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7065856">
                <text:p>0.007065856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7579153">
                <text:p>0.00757915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-0.0006560432">
                <text:p>-0.000656043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1486851">
                <text:p>0.00148685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338271">
                <text:p>0.0133827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3977244">
                <text:p>-0.00397724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4809254">
                <text:p>0.00480925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209159">
                <text:p>0.0120915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3417139">
                <text:p>0.00341713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-0.002664887">
                <text:p>-0.002664887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5550062">
                <text:p>-0.00555006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4426979">
                <text:p>-0.00442697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09661205">
                <text:p>0.000966120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4027849">
                <text:p>0.00402784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08624809">
                <text:p>0.00862480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7728043">
                <text:p>-0.007728043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-0.00146411">
                <text:p>-0.0014641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1263075">
                <text:p>0.00126307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0870743">
                <text:p>0.00087074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3002172">
                <text:p>0.00300217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09399366">
                <text:p>0.0009399366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3621046">
                <text:p>0.00362104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02561717">
                <text:p>0.0002561717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3302291">
                <text:p>0.00330229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02391398">
                <text:p>0.000239139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5352508">
                <text:p>0.00535250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-0.001088475">
                <text:p>-0.00108847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6793119">
                <text:p>-0.00679311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-0.0005290656">
                <text:p>-0.000529065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5981918">
                <text:p>0.00598191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-0.001232678">
                <text:p>-0.00123267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7276624">
                <text:p>-0.00727662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8089052">
                <text:p>0.00808905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7884287">
                <text:p>0.00788428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-0.0004963101">
                <text:p>-0.000496310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8489138">
                <text:p>0.00848913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7609811">
                <text:p>-0.00760981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532888">
                <text:p>0.0153288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085546">
                <text:p>0.0108554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2335212">
                <text:p>0.002335212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5287204">
                <text:p>-0.005287204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823587">
                <text:p>0.0182358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6340837">
                <text:p>-0.006340837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036742">
                <text:p>0.0203674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3101388">
                <text:p>-0.003101388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08896886">
                <text:p>0.00889688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08998549">
                <text:p>0.00899854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1119386">
                <text:p>0.001119386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03480081">
                <text:p>0.000348008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4240077">
                <text:p>-0.004240077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271583">
                <text:p>0.0027158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3894711">
                <text:p>0.003894711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2164325">
                <text:p>0.00216432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017615">
                <text:p>0.0101761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2530236">
                <text:p>-0.002530236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5596238">
                <text:p>-0.005596238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5513373">
                <text:p>-0.00551337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1218975">
                <text:p>-0.0121897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7031786">
                <text:p>0.007031786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1145089">
                <text:p>-0.0114508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06086613">
                <text:p>0.000608661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5650563">
                <text:p>0.00565056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0309234">
                <text:p>0.00030923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-0.002519683">
                <text:p>-0.002519683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-0.002274935">
                <text:p>-0.002274935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-0.001903742">
                <text:p>-0.0019037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7882337">
                <text:p>0.007882337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2810891">
                <text:p>0.002810891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7067021">
                <text:p>-0.007067021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539987">
                <text:p>0.01539987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5146397">
                <text:p>0.00514639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4854331">
                <text:p>-0.0048543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5509601">
                <text:p>-0.00550960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1995244">
                <text:p>0.00199524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03606143">
                <text:p>0.000360614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7367779">
                <text:p>-0.00736777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7385">
                <text:p>0.016738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4283272">
                <text:p>0.00428327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392184">
                <text:p>0.01392184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443446">
                <text:p>0.00443446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8266285">
                <text:p>0.00826628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-0.0004793538">
                <text:p>-0.000479353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087415">
                <text:p>0.0108741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9300575">
                <text:p>0.00930057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6542471">
                <text:p>-0.00654247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246542">
                <text:p>0.0024654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8799994">
                <text:p>0.008799994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8359546">
                <text:p>-0.00835954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3694776">
                <text:p>-0.003694776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107828">
                <text:p>0.01107828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1234043">
                <text:p>0.00123404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-0.0002045476">
                <text:p>-0.0002045476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2581582">
                <text:p>-0.002581582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-0.001940549">
                <text:p>-0.00194054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5811163">
                <text:p>-0.005811163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1015858">
                <text:p>-0.0101585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5578849">
                <text:p>-0.00557884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436266">
                <text:p>0.00436266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1556507">
                <text:p>0.001556507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648677">
                <text:p>0.0164867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09963298">
                <text:p>0.00996329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2838757">
                <text:p>0.002838757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1156781">
                <text:p>-0.0115678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196302">
                <text:p>0.02196302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107584">
                <text:p>-0.0107584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452961">
                <text:p>-0.00452961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2017365">
                <text:p>-0.00201736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2662368">
                <text:p>0.002662368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-0.00196966">
                <text:p>-0.00196966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844899">
                <text:p>0.0084489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7099494">
                <text:p>-0.007099494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9098465">
                <text:p>-0.009098465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1984747">
                <text:p>0.00198474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3541683">
                <text:p>0.00354168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725218">
                <text:p>0.00725218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4227447">
                <text:p>-0.00422744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2633">
                <text:p>0.01263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6838514">
                <text:p>-0.00683851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5652025">
                <text:p>-0.005652025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4253612">
                <text:p>0.00425361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387181">
                <text:p>0.0138718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083563">
                <text:p>0.01083563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6468666">
                <text:p>0.006468666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7957672">
                <text:p>0.00795767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9377647">
                <text:p>-0.00937764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8508778">
                <text:p>0.00850877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06038844">
                <text:p>0.0006038844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7349536">
                <text:p>-0.00734953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089533">
                <text:p>0.0108953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0864884">
                <text:p>0.000864884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834394">
                <text:p>-0.00834394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1272375">
                <text:p>-0.0127237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3236411">
                <text:p>-0.003236411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2567029">
                <text:p>0.00256702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5791563">
                <text:p>-0.005791563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8687099">
                <text:p>0.00868709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437096">
                <text:p>-0.0043709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4208385">
                <text:p>0.00420838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3996316">
                <text:p>-0.003996316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4060453">
                <text:p>0.004060453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06904543">
                <text:p>0.000690454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2562119">
                <text:p>-0.002562119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2480783">
                <text:p>-0.002480783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1990454">
                <text:p>0.00199045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600679">
                <text:p>-0.0060067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893668">
                <text:p>0.0189366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06685362">
                <text:p>-0.000668536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3169598">
                <text:p>0.00316959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5622395">
                <text:p>0.00562239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3730063">
                <text:p>0.003730063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-0.0005322708">
                <text:p>-0.0005322708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7982845">
                <text:p>0.00798284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8981585">
                <text:p>0.00898158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5946237">
                <text:p>-0.005946237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5288994">
                <text:p>0.005288994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-0.001270098">
                <text:p>-0.00127009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2995126">
                <text:p>0.002995126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-0.002272301">
                <text:p>-0.002272301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7047566">
                <text:p>-0.00704756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044917">
                <text:p>0.0104491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5324119">
                <text:p>-0.005324119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4301022">
                <text:p>-0.00430102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-0.00113449">
                <text:p>-0.001134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2982137">
                <text:p>0.002982137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3437625">
                <text:p>0.003437625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-0.0002831916">
                <text:p>-0.000283191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2120499">
                <text:p>-0.002120499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2698358">
                <text:p>-0.00269835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2469961">
                <text:p>0.00246996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594121">
                <text:p>0.0059412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1216805">
                <text:p>-0.01216805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04356693">
                <text:p>0.000435669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7904514">
                <text:p>-0.00790451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2770571">
                <text:p>0.00277057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3714257">
                <text:p>-0.003714257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6021594">
                <text:p>-0.006021594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6554254">
                <text:p>-0.00655425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-0.001591707">
                <text:p>-0.001591707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2454805">
                <text:p>0.002454805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2783264">
                <text:p>-0.00278326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5266145">
                <text:p>-0.00526614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05014381">
                <text:p>0.0005014381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7919303">
                <text:p>-0.00791930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-0.001197897">
                <text:p>-0.001197897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1103012">
                <text:p>-0.0110301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8240215">
                <text:p>-0.008240215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6272323">
                <text:p>-0.00627232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3553947">
                <text:p>-0.00355394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6339485">
                <text:p>-0.00633948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6903635">
                <text:p>-0.0069036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3769684">
                <text:p>0.00376968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1297569">
                <text:p>-0.0129756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582172">
                <text:p>-0.0058217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991157">
                <text:p>-0.0099115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5452687">
                <text:p>0.00545268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6255362">
                <text:p>-0.00625536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212684">
                <text:p>0.00821268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9127932">
                <text:p>0.00912793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495764">
                <text:p>-0.00495764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07448772">
                <text:p>0.0007448772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80208">
                <text:p>0.0118020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3139816">
                <text:p>0.003139816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493416">
                <text:p>-0.0049341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349817">
                <text:p>0.01349817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-0.001041229">
                <text:p>-0.00104122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3582972">
                <text:p>-0.00358297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155118">
                <text:p>0.0015511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9435329">
                <text:p>-0.00943532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8834458">
                <text:p>-0.008834458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-0.0005826012">
                <text:p>-0.000582601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2640745">
                <text:p>-0.00264074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1982265">
                <text:p>0.00198226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2857094">
                <text:p>-0.00285709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8273575">
                <text:p>0.00827357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3079749">
                <text:p>0.00307974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1088566">
                <text:p>-0.01088566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1815086">
                <text:p>0.00181508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7619752">
                <text:p>-0.00761975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9825372">
                <text:p>-0.00982537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251539">
                <text:p>0.0125153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1193113">
                <text:p>-0.00119311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-0.005508013">
                <text:p>-0.005508013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8754754">
                <text:p>0.008754754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3513897">
                <text:p>0.003513897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6164082">
                <text:p>-0.00616408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2934428">
                <text:p>-0.00293442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7056432">
                <text:p>-0.00705643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8647798">
                <text:p>-0.008647798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6207043">
                <text:p>-0.0062070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4059229">
                <text:p>-0.00405922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5332985">
                <text:p>-0.005332985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01340657">
                <text:p>0.000134065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-0.0007004673">
                <text:p>-0.0007004673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845898">
                <text:p>0.0184589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4797742">
                <text:p>0.00479774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571591">
                <text:p>0.0057159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509405">
                <text:p>0.0050940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45803">
                <text:p>-0.0045803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4418485">
                <text:p>-0.00441848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4253987">
                <text:p>0.00425398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08760573">
                <text:p>0.000876057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-0.001050937">
                <text:p>-0.001050937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3280363">
                <text:p>0.003280363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296342">
                <text:p>0.0229634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9343463">
                <text:p>-0.009343463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-0.001767826">
                <text:p>-0.00176782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4512202">
                <text:p>0.0451220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2712787">
                <text:p>0.00271278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3725342">
                <text:p>0.00372534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2969899">
                <text:p>-0.002969899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272868">
                <text:p>0.0127286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1714092">
                <text:p>0.00171409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1101383">
                <text:p>-0.0110138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09392">
                <text:p>0.010939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7635295">
                <text:p>-0.00763529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5854903">
                <text:p>-0.005854903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429002">
                <text:p>0.009429002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3969383">
                <text:p>0.003969383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424861">
                <text:p>0.0142486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3497697">
                <text:p>0.00349769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5739621">
                <text:p>0.00573962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-0.0008926095">
                <text:p>-0.0008926095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1932645">
                <text:p>0.00193264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-0.0009885229">
                <text:p>-0.000988522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-0.0009349465">
                <text:p>-0.0009349465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9498768">
                <text:p>-0.009498768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6821764">
                <text:p>-0.006821764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324139">
                <text:p>-0.01324139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2010028">
                <text:p>-0.002010028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4994602">
                <text:p>-0.004994602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43789">
                <text:p>0.0143789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8207916">
                <text:p>-0.008207916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1482664">
                <text:p>-0.00148266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-0.0003377969">
                <text:p>-0.000337796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1611943">
                <text:p>-0.001611943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1198929">
                <text:p>-0.0011989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177423">
                <text:p>0.009177423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1950535">
                <text:p>-0.00195053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3868597">
                <text:p>-0.00386859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1197143">
                <text:p>-0.01197143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1390084">
                <text:p>-0.00139008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1040488">
                <text:p>0.00104048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3355394">
                <text:p>0.00335539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8347481">
                <text:p>-0.00834748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1039735">
                <text:p>-0.01039735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902025">
                <text:p>0.0090202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1327578">
                <text:p>0.001327578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3551086">
                <text:p>-0.00355108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2154407">
                <text:p>-0.00215440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8909301">
                <text:p>-0.008909301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794968">
                <text:p>0.02794968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7764448">
                <text:p>-0.007764448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49209">
                <text:p>0.014920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8193058">
                <text:p>-0.008193058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7250321">
                <text:p>-0.00725032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1070956">
                <text:p>-0.01070956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9106198">
                <text:p>-0.009106198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354277">
                <text:p>-0.01354277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7824107">
                <text:p>0.007824107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2929098">
                <text:p>0.00292909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8293755">
                <text:p>-0.00829375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-0.0005426733">
                <text:p>-0.000542673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7872038">
                <text:p>-0.007872038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84179">
                <text:p>0.028417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06064">
                <text:p>0.00706064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519204">
                <text:p>0.0151920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2352418">
                <text:p>0.002352418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9780128">
                <text:p>-0.009780128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4674774">
                <text:p>-0.00467477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4018788">
                <text:p>0.004018788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150189">
                <text:p>0.003150189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15671">
                <text:p>-0.0015671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-0.0001606401">
                <text:p>-0.0001606401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5841631">
                <text:p>0.00584163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-0.000602373">
                <text:p>-0.000602373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1390562">
                <text:p>0.00139056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4869352">
                <text:p>0.004869352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21012">
                <text:p>0.0112101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3232694">
                <text:p>-0.003232694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3428825">
                <text:p>-0.00342882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861021">
                <text:p>0.02861021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84023">
                <text:p>0.0118402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09192853">
                <text:p>0.0009192853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2078452">
                <text:p>-0.00207845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2789675">
                <text:p>0.002789675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232952">
                <text:p>0.01232952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1265506">
                <text:p>0.001265506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1414877">
                <text:p>0.00141487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7197007">
                <text:p>-0.007197007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3170151">
                <text:p>-0.00317015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4438482">
                <text:p>0.00443848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508458">
                <text:p>-0.00508458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720152">
                <text:p>0.0172015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019053">
                <text:p>0.00701905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6316777">
                <text:p>-0.00631677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407452">
                <text:p>0.006407452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1163764">
                <text:p>-0.01163764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6815691">
                <text:p>-0.00681569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4840473">
                <text:p>0.00484047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82477">
                <text:p>0.01082477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6117995">
                <text:p>-0.00611799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5747547">
                <text:p>-0.00574754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713276">
                <text:p>0.009713276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906789">
                <text:p>0.0190678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9974206">
                <text:p>-0.0009974206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1104744">
                <text:p>0.001104744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3724355">
                <text:p>-0.003724355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1637802">
                <text:p>-0.00163780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2790763">
                <text:p>-0.002790763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6952719">
                <text:p>-0.00695271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1107125">
                <text:p>0.0001107125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355507">
                <text:p>0.0135550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1197714">
                <text:p>-0.0119771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6646541">
                <text:p>0.00664654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5995939">
                <text:p>-0.00599593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3988954">
                <text:p>-0.003988954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6007665">
                <text:p>-0.00600766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6242587">
                <text:p>-0.00624258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64427">
                <text:p>0.01064427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5107842">
                <text:p>-0.00510784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7731173">
                <text:p>-0.007731173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108284">
                <text:p>-0.0108284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9651328">
                <text:p>-0.00965132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2117054">
                <text:p>0.00211705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05355176">
                <text:p>0.0005355176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4924085">
                <text:p>-0.004924085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250912">
                <text:p>0.01250912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3152092">
                <text:p>-0.00315209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10821">
                <text:p>0.0010821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41616">
                <text:p>0.0141616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3301106">
                <text:p>-0.00330110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3861005">
                <text:p>-0.003861005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2124725">
                <text:p>0.0212472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2035037">
                <text:p>-0.00203503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1787956">
                <text:p>0.0017879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4728585">
                <text:p>0.004728585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5080814">
                <text:p>-0.005080814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1036825">
                <text:p>0.01036825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941143">
                <text:p>-0.009411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108832">
                <text:p>-0.010883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1751628">
                <text:p>0.00175162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177741">
                <text:p>0.00417774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4673566">
                <text:p>0.00467356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8062522">
                <text:p>-0.008062522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070424">
                <text:p>0.00207042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277017">
                <text:p>0.004277017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9313735">
                <text:p>0.00931373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2711976">
                <text:p>-0.002711976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1592659">
                <text:p>0.00159265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3977257">
                <text:p>0.00397725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5705481">
                <text:p>-0.00570548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4662484">
                <text:p>-0.004662484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6091419">
                <text:p>-0.00609141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321812">
                <text:p>0.0132181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1124127">
                <text:p>-0.0112412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2228416">
                <text:p>-0.002228416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1653969">
                <text:p>0.00165396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1913215">
                <text:p>0.00191321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05845734">
                <text:p>0.0005845734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6460305">
                <text:p>-0.00646030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7903152">
                <text:p>-0.00790315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2063385">
                <text:p>0.002063385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2160957">
                <text:p>-0.00216095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954761">
                <text:p>-0.002954761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7301515">
                <text:p>0.00730151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07118996">
                <text:p>0.0007118996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9372965">
                <text:p>-0.00937296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61142">
                <text:p>0.00961142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3569981">
                <text:p>-0.003569981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8533762">
                <text:p>-0.00853376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04782272">
                <text:p>0.000478227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-0.0009352967">
                <text:p>-0.0009352967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-0.0002839697">
                <text:p>-0.0002839697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1125061">
                <text:p>-0.01125061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8729977">
                <text:p>-0.00872997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53926">
                <text:p>0.00353926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4990526">
                <text:p>-0.004990526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49858">
                <text:p>0.0149858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9643907">
                <text:p>-0.00964390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4397776">
                <text:p>-0.004397776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0634797">
                <text:p>-0.00063479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560568">
                <text:p>0.008560568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370489">
                <text:p>0.004370489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7795678">
                <text:p>-0.00779567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8128187">
                <text:p>0.00812818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7293804">
                <text:p>-0.00729380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205331">
                <text:p>-0.0120533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5480446">
                <text:p>-0.005480446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9927">
                <text:p>0.019927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816246">
                <text:p>0.01816246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785576">
                <text:p>0.01785576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1199026">
                <text:p>-0.0119902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1212411">
                <text:p>-0.001212411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913037">
                <text:p>0.00491303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4669725">
                <text:p>0.00466972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9058248">
                <text:p>-0.009058248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1913922">
                <text:p>-0.001913922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208072">
                <text:p>-0.0120807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1062919">
                <text:p>0.0106291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5127816">
                <text:p>0.005127816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-0.0009235064">
                <text:p>-0.0009235064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271452">
                <text:p>0.004271452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564762">
                <text:p>0.0156476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4207938">
                <text:p>-0.00420793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454241">
                <text:p>0.00445424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521839">
                <text:p>0.00252183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3895962">
                <text:p>0.003895962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1199048">
                <text:p>-0.0119904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4866579">
                <text:p>-0.00486657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0902122">
                <text:p>0.000902122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845348">
                <text:p>-0.00845348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147506">
                <text:p>0.00214750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2597486">
                <text:p>-0.002597486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7362046">
                <text:p>-0.00736204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-0.001454346">
                <text:p>-0.00145434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9516665">
                <text:p>-0.009516665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199485">
                <text:p>-0.01199485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538769">
                <text:p>0.00553876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08432621">
                <text:p>0.0008432621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-0.0002374065">
                <text:p>-0.0002374065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-0.0001553278">
                <text:p>-0.000155327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60216">
                <text:p>0.00160216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6183107">
                <text:p>0.006183107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7115679">
                <text:p>-0.00711567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1134282">
                <text:p>-0.0113428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0890343">
                <text:p>0.000890343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1788243">
                <text:p>-0.001788243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-0.000467841">
                <text:p>-0.000467841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03856639">
                <text:p>0.000385663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328949">
                <text:p>-0.0032894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094425">
                <text:p>0.001094425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750301">
                <text:p>-0.00750301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4951392">
                <text:p>0.00495139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2761758">
                <text:p>-0.00276175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3788199">
                <text:p>-0.00378819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533032">
                <text:p>0.00153303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3272415">
                <text:p>-0.003272415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00495">
                <text:p>0.00100495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5581559">
                <text:p>0.005581559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8667052">
                <text:p>0.008667052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1403232">
                <text:p>-0.00140323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5892901">
                <text:p>-0.00589290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1041183">
                <text:p>0.01041183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495109">
                <text:p>-0.00495109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1086892">
                <text:p>-0.01086892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111445">
                <text:p>-0.0111445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489046">
                <text:p>0.004489046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8047599">
                <text:p>-0.00804759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1143019">
                <text:p>0.0114301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1108291">
                <text:p>-0.01108291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08140703">
                <text:p>0.000814070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642756">
                <text:p>0.02642756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70835">
                <text:p>0.00170835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06490263">
                <text:p>0.000649026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6018263">
                <text:p>0.006018263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242852">
                <text:p>0.00524285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4248046">
                <text:p>-0.004248046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-0.0006885611">
                <text:p>-0.0006885611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08748795">
                <text:p>0.000874879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960639">
                <text:p>0.01960639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1113596">
                <text:p>-0.0111359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917518">
                <text:p>0.01917518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3452957">
                <text:p>-0.003452957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8706185">
                <text:p>-0.008706185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639681">
                <text:p>0.0163968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4194619">
                <text:p>-0.00419461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9553524">
                <text:p>-0.009553524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1036664">
                <text:p>-0.01036664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7366145">
                <text:p>-0.007366145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35957">
                <text:p>0.0023595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1021892">
                <text:p>-0.01021892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0903572">
                <text:p>0.000903572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341655">
                <text:p>0.0034165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929068">
                <text:p>0.01929068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167454">
                <text:p>0.001167454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6080914">
                <text:p>-0.006080914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07515493">
                <text:p>0.000751549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6219905">
                <text:p>-0.006219905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6675184">
                <text:p>-0.006675184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2736756">
                <text:p>0.002736756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7060659">
                <text:p>-0.000706065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420864">
                <text:p>-0.0142086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9402197">
                <text:p>-0.00940219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953085">
                <text:p>-0.0095308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249109">
                <text:p>-0.0124910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321691">
                <text:p>0.00632169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1121243">
                <text:p>-0.01121243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1000467">
                <text:p>-0.01000467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2852319">
                <text:p>0.00285231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8131216">
                <text:p>-0.008131216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9684823">
                <text:p>-0.009684823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964685">
                <text:p>0.02964685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2915828">
                <text:p>-0.00291582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2560428">
                <text:p>-0.002560428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7173494">
                <text:p>-0.00717349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554239">
                <text:p>0.00255423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2446871">
                <text:p>-0.00244687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-0.0003989516">
                <text:p>-0.0003989516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4219346">
                <text:p>-0.004219346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365045">
                <text:p>0.009365045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-0.001123918">
                <text:p>-0.00112391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-0.0002730987">
                <text:p>-0.000273098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5353246">
                <text:p>-0.00535324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6750741">
                <text:p>-0.006750741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333788">
                <text:p>-0.01333788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5725574">
                <text:p>0.005725574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2509621">
                <text:p>-0.00250962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344079">
                <text:p>0.0134407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3204246">
                <text:p>-0.003204246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05624563">
                <text:p>-0.0005624563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2707845">
                <text:p>-0.00270784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103999">
                <text:p>-0.010399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344199">
                <text:p>-0.01344199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664713">
                <text:p>0.002664713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168899">
                <text:p>-0.0116889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54634">
                <text:p>-0.0054634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1090135">
                <text:p>-0.010901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335232">
                <text:p>0.00533523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1146379">
                <text:p>-0.0114637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2695817">
                <text:p>0.00269581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8601085">
                <text:p>-0.00860108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9196083">
                <text:p>0.009196083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2402284">
                <text:p>0.002402284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115769">
                <text:p>-0.0011576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594887">
                <text:p>0.0059488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728398">
                <text:p>0.0272839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8397034">
                <text:p>-0.00839703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9754077">
                <text:p>-0.009754077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324239">
                <text:p>0.0132423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571877">
                <text:p>0.004571877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3244051">
                <text:p>-0.003244051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1458222">
                <text:p>0.00145822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764818">
                <text:p>0.00576481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224771">
                <text:p>-0.0022477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342968">
                <text:p>0.01342968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5727609">
                <text:p>0.00572760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50924">
                <text:p>0.0150924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7155669">
                <text:p>-0.00715566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02882505">
                <text:p>0.000288250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9193472">
                <text:p>-0.00919347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3892759">
                <text:p>-0.00389275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8633483">
                <text:p>0.00863348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962825">
                <text:p>0.00896282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4886793">
                <text:p>0.00488679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3736737">
                <text:p>-0.003736737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897565">
                <text:p>0.0189756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6359697">
                <text:p>-0.00635969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7412533">
                <text:p>-0.007412533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8001508">
                <text:p>-0.008001508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17436">
                <text:p>-0.00217436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559665">
                <text:p>0.00355966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4687856">
                <text:p>-0.004687856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4210311">
                <text:p>-0.004210311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7074292">
                <text:p>-0.007074292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1055306">
                <text:p>-0.01055306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5046551">
                <text:p>-0.005046551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1852702">
                <text:p>-0.001852702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1856633">
                <text:p>0.00185663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3901272">
                <text:p>-0.003901272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16759">
                <text:p>-0.001675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771402">
                <text:p>0.007771402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7609844">
                <text:p>0.007609844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9598265">
                <text:p>-0.009598265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113489">
                <text:p>-0.0113489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3604025">
                <text:p>-0.00360402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425097">
                <text:p>0.00642509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1061042">
                <text:p>-0.00106104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9687469">
                <text:p>-0.00968746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8725102">
                <text:p>-0.00872510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2100094">
                <text:p>-0.002100094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2057036">
                <text:p>0.02057036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4191284">
                <text:p>0.004191284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2002017">
                <text:p>-0.00200201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744547">
                <text:p>0.003744547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724791">
                <text:p>0.005724791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102826">
                <text:p>0.0102826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1441561">
                <text:p>0.0014415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1747333">
                <text:p>0.00174733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6812026">
                <text:p>-0.00681202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2173205">
                <text:p>0.000217320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492386">
                <text:p>0.00492386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18179">
                <text:p>0.0031817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326805">
                <text:p>0.0132680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844835">
                <text:p>0.0084483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332315">
                <text:p>0.01332315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1898913">
                <text:p>-0.001898913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821455">
                <text:p>0.0048214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6674448">
                <text:p>0.00667444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367058">
                <text:p>0.003367058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2667415">
                <text:p>0.00266741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9842244">
                <text:p>-0.009842244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6612574">
                <text:p>0.006612574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238462">
                <text:p>0.00223846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597208">
                <text:p>0.005597208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5430186">
                <text:p>0.005430186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2955181">
                <text:p>-0.00295518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723872">
                <text:p>0.01723872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5196033">
                <text:p>0.005196033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5531904">
                <text:p>-0.00553190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1761874">
                <text:p>-0.00176187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7455602">
                <text:p>-0.00745560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32585">
                <text:p>0.013258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600076">
                <text:p>-0.003600076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9184522">
                <text:p>0.00918452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-0.0002283223">
                <text:p>-0.0002283223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2266689">
                <text:p>-0.000226668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5457034">
                <text:p>-0.005457034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1215959">
                <text:p>-0.01215959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4261277">
                <text:p>-0.004261277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281505">
                <text:p>-0.0128150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5327787">
                <text:p>-0.005327787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3887464">
                <text:p>-0.003887464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2166194">
                <text:p>-0.002166194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1078906">
                <text:p>0.01078906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566782">
                <text:p>0.0156678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1011025">
                <text:p>-0.0101102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9676813">
                <text:p>0.00967681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-0.0002663906">
                <text:p>-0.0002663906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809561">
                <text:p>-0.00809561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6413949">
                <text:p>-0.006413949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617574">
                <text:p>0.02617574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820075">
                <text:p>-0.00820075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1066162">
                <text:p>0.010661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8921688">
                <text:p>-0.0008921688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2111261">
                <text:p>0.021112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3130793">
                <text:p>-0.003130793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814696">
                <text:p>0.005814696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856478">
                <text:p>0.00856478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1747602">
                <text:p>0.001747602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6844334">
                <text:p>-0.00684433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-0.0006408269">
                <text:p>-0.000640826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3568418">
                <text:p>-0.003568418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478792">
                <text:p>-0.0047879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5593061">
                <text:p>0.005593061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504698">
                <text:p>0.0150469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0354772">
                <text:p>0.000354772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221304">
                <text:p>-0.0122130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2705485">
                <text:p>0.00270548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108867">
                <text:p>-0.0108867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8417571">
                <text:p>-0.008417571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9324814">
                <text:p>-0.009324814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654037">
                <text:p>0.03654037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919555">
                <text:p>-0.0091955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6092779">
                <text:p>-0.0609277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6299328">
                <text:p>-0.0629932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439833">
                <text:p>-0.06439833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500512">
                <text:p>-0.06500512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541543">
                <text:p>-0.06541543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495342">
                <text:p>-0.06495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